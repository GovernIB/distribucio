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3A50000011A191EDCE7.png" manifest:media-type="image/png"/>
  <manifest:file-entry manifest:full-path="Pictures/10000000000006A400000104792F8214.png" manifest:media-type="image/png"/>
  <manifest:file-entry manifest:full-path="Pictures/10000000000001E70000005F3D868FE3.png" manifest:media-type="image/png"/>
  <manifest:file-entry manifest:full-path="Pictures/10000000000001940000006567358005.png" manifest:media-type="image/png"/>
  <manifest:file-entry manifest:full-path="Pictures/100000000000001800000013C4DED6E2.png" manifest:media-type="image/png"/>
  <manifest:file-entry manifest:full-path="Pictures/10000000000005000000018B94E5A950.png" manifest:media-type="image/png"/>
  <manifest:file-entry manifest:full-path="Pictures/10000001000002E6000002BBD71058E4.png" manifest:media-type="image/png"/>
  <manifest:file-entry manifest:full-path="Pictures/10000000000001670000006EB543C092.png" manifest:media-type="image/png"/>
  <manifest:file-entry manifest:full-path="Pictures/10000000000002750000008FD442AA45.png" manifest:media-type="image/png"/>
  <manifest:file-entry manifest:full-path="Pictures/100000000000031E00000160EE59E714.png" manifest:media-type="image/png"/>
  <manifest:file-entry manifest:full-path="Pictures/100000000000001A0000001764E3CB42.png" manifest:media-type="image/png"/>
  <manifest:file-entry manifest:full-path="Pictures/1000000000000015000000172198EC24.png" manifest:media-type="image/png"/>
  <manifest:file-entry manifest:full-path="Pictures/10000001000000DB00000093F7200B0A.png" manifest:media-type="image/png"/>
  <manifest:file-entry manifest:full-path="Pictures/1000000100000178000000B45BA1E2CC.png" manifest:media-type="image/png"/>
  <manifest:file-entry manifest:full-path="Pictures/100000000000008300000014F23A1794.png" manifest:media-type="image/png"/>
  <manifest:file-entry manifest:full-path="Pictures/1000000000000141000000E8FFB2FA52.png" manifest:media-type="image/png"/>
  <manifest:file-entry manifest:full-path="Pictures/10000000000004F2000001CE718C8F1F.png" manifest:media-type="image/png"/>
  <manifest:file-entry manifest:full-path="Pictures/100000000000066E000003358D070C06.png" manifest:media-type="image/png"/>
  <manifest:file-entry manifest:full-path="Pictures/100000000000005900000026A8ADC43B.png" manifest:media-type="image/png"/>
  <manifest:file-entry manifest:full-path="Pictures/10000001000004F4000000E82E4DCA8D.png" manifest:media-type="image/png"/>
  <manifest:file-entry manifest:full-path="Pictures/100000000000005A00000026F8B00DC6.png" manifest:media-type="image/png"/>
  <manifest:file-entry manifest:full-path="Pictures/100000000000007000000023DE0D7229.png" manifest:media-type="image/png"/>
  <manifest:file-entry manifest:full-path="Pictures/100000000000050000000191023EBA7A.png" manifest:media-type="image/png"/>
  <manifest:file-entry manifest:full-path="Pictures/1000000000000490000000D751B617BE.png" manifest:media-type="image/png"/>
  <manifest:file-entry manifest:full-path="Pictures/1000000000000387000000381DF5DF64.png" manifest:media-type="image/png"/>
  <manifest:file-entry manifest:full-path="Pictures/10000001000004E70000017495DE3013.png" manifest:media-type="image/png"/>
  <manifest:file-entry manifest:full-path="Pictures/10000000000000FD00000039762F8AFE.png" manifest:media-type="image/png"/>
  <manifest:file-entry manifest:full-path="Pictures/10000001000000930000006980EB54FA.png" manifest:media-type="image/png"/>
  <manifest:file-entry manifest:full-path="Pictures/100000000000013E000000B9CD63DA2E.png" manifest:media-type="image/png"/>
  <manifest:file-entry manifest:full-path="Pictures/10000001000004E90000020A106FA5C7.png" manifest:media-type="image/png"/>
  <manifest:file-entry manifest:full-path="Pictures/100000000000031F0000019A901F02EC.png" manifest:media-type="image/png"/>
  <manifest:file-entry manifest:full-path="Pictures/10000001000004F0000001A2BA957159.png" manifest:media-type="image/png"/>
  <manifest:file-entry manifest:full-path="Pictures/10000000000003720000010BF24E6EFA.png" manifest:media-type="image/png"/>
  <manifest:file-entry manifest:full-path="Pictures/10000001000002670000015FB028ABB5.png" manifest:media-type="image/png"/>
  <manifest:file-entry manifest:full-path="Pictures/100000010000050200000152395A43A0.png" manifest:media-type="image/png"/>
  <manifest:file-entry manifest:full-path="Pictures/1000000100000526000002384BAC5624.png" manifest:media-type="image/png"/>
  <manifest:file-entry manifest:full-path="Pictures/100000000000038E000001243AEE8BCD.png" manifest:media-type="image/png"/>
  <manifest:file-entry manifest:full-path="Pictures/10000001000000D00000004D0F89587F.png" manifest:media-type="image/png"/>
  <manifest:file-entry manifest:full-path="Pictures/100000010000045A0000016591D30073.png" manifest:media-type="image/png"/>
  <manifest:file-entry manifest:full-path="Pictures/10000000000004D8000001B38366D8E4.png" manifest:media-type="image/png"/>
  <manifest:file-entry manifest:full-path="Pictures/100000000000038B0000029F35E8C63B.png" manifest:media-type="image/png"/>
  <manifest:file-entry manifest:full-path="Pictures/100000000000037600000136ACCEED93.png" manifest:media-type="image/png"/>
  <manifest:file-entry manifest:full-path="Pictures/100000000000038B000000FC93CCC07A.png" manifest:media-type="image/png"/>
  <manifest:file-entry manifest:full-path="Pictures/10000001000000490000001396689F9A.png" manifest:media-type="image/png"/>
  <manifest:file-entry manifest:full-path="Pictures/100000010000026D0000024BD43D0242.png" manifest:media-type="image/png"/>
  <manifest:file-entry manifest:full-path="Pictures/100000010000037B0000021EFF98F148.png" manifest:media-type="image/png"/>
  <manifest:file-entry manifest:full-path="Pictures/10000001000004FA000000DEE32CD0E3.png" manifest:media-type="image/png"/>
  <manifest:file-entry manifest:full-path="Pictures/10000001000004FE00000203E8016BE6.png" manifest:media-type="image/png"/>
  <manifest:file-entry manifest:full-path="Pictures/10000001000002D60000019FE739BEA5.png" manifest:media-type="image/png"/>
  <manifest:file-entry manifest:full-path="Pictures/10000001000002F0000001C743AE6A7D.png" manifest:media-type="image/png"/>
  <manifest:file-entry manifest:full-path="Pictures/10000000000000CA000000787F2D35E3.png" manifest:media-type="image/png"/>
  <manifest:file-entry manifest:full-path="Pictures/100000000000038A000001A8B2B6A107.png" manifest:media-type="image/png"/>
  <manifest:file-entry manifest:full-path="Pictures/10000000000006C5000001987D502792.png" manifest:media-type="image/png"/>
  <manifest:file-entry manifest:full-path="Pictures/100000000000073400000123BB8120AB.png" manifest:media-type="image/png"/>
  <manifest:file-entry manifest:full-path="Pictures/10000001000000AB000000906B1FA2B5.png" manifest:media-type="image/png"/>
  <manifest:file-entry manifest:full-path="Pictures/100000000000003E0000002F6AE360E0.png" manifest:media-type="image/png"/>
  <manifest:file-entry manifest:full-path="Pictures/100000000000000C0000000E25855A0E.png" manifest:media-type="image/png"/>
  <manifest:file-entry manifest:full-path="Pictures/100000000000001B0000000E03D4C585.png" manifest:media-type="image/png"/>
  <manifest:file-entry manifest:full-path="Pictures/100000000000000D0000000BC2F71D36.png" manifest:media-type="image/png"/>
  <manifest:file-entry manifest:full-path="Pictures/10000000000004A000000122948EE0CF.png" manifest:media-type="image/png"/>
  <manifest:file-entry manifest:full-path="Pictures/10000001000004E5000001969C0E9993.png" manifest:media-type="image/png"/>
  <manifest:file-entry manifest:full-path="Pictures/1000000000000029000000228D358339.png" manifest:media-type="image/png"/>
  <manifest:file-entry manifest:full-path="Pictures/10000000000000B70000009492EFDDEC.png" manifest:media-type="image/png"/>
  <manifest:file-entry manifest:full-path="Pictures/10000001000004FE0000011042B35F79.png" manifest:media-type="image/png"/>
  <manifest:file-entry manifest:full-path="Pictures/10000000000000EE00000059783CF345.png" manifest:media-type="image/png"/>
  <manifest:file-entry manifest:full-path="Pictures/10000000000004A80000017F091EA820.png" manifest:media-type="image/png"/>
  <manifest:file-entry manifest:full-path="Pictures/1000000100000500000000D546FAC1A0.png" manifest:media-type="image/png"/>
  <manifest:file-entry manifest:full-path="Pictures/10000000000003CC000000DDB923AB86.png" manifest:media-type="image/png"/>
  <manifest:file-entry manifest:full-path="Pictures/10000000000002BF000001AF010F605E.png" manifest:media-type="image/png"/>
  <manifest:file-entry manifest:full-path="Pictures/100000000000041A0000022CE460ADAC.png" manifest:media-type="image/png"/>
  <manifest:file-entry manifest:full-path="Pictures/100000000000007500000012CE62DA0E.png" manifest:media-type="image/png"/>
  <manifest:file-entry manifest:full-path="Pictures/100000000000006A00000014D6DAA008.png" manifest:media-type="image/png"/>
  <manifest:file-entry manifest:full-path="Pictures/10000000000000C000000016778A55FD.png" manifest:media-type="image/png"/>
  <manifest:file-entry manifest:full-path="Pictures/100000010000051E00000236D198385B.png" manifest:media-type="image/png"/>
  <manifest:file-entry manifest:full-path="Pictures/10000000000005430000034BD00256D5.png" manifest:media-type="image/png"/>
  <manifest:file-entry manifest:full-path="Pictures/100000010000051C00000233BBA3E2A9.png" manifest:media-type="image/png"/>
  <manifest:file-entry manifest:full-path="Pictures/10000000000002C80000018E3B1FAEAE.png" manifest:media-type="image/png"/>
  <manifest:file-entry manifest:full-path="Pictures/10000000000001270000009789043152.png" manifest:media-type="image/png"/>
  <manifest:file-entry manifest:full-path="Pictures/1000000000000410000000EDC3BF9369.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 Narrow" svg:font-family="'Arial Narrow'" style:font-family-generic="roman" style:font-pitch="variable"/>
    <style:font-face style:name="Arial Narrow1" svg:font-family="'Arial Narrow'" style:font-family-generic="system"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adornments="Negrita" style:font-family-generic="swiss" style:font-pitch="variable"/>
    <style:font-face style:name="Calibri3" svg:font-family="Calibri" style:font-adornments="Negrita cursiva" style:font-family-generic="swiss" style:font-pitch="variable"/>
    <style:font-face style:name="Calibri4" svg:font-family="Calibri" style:font-adornments="Normal" style:font-family-generic="swiss" style:font-pitch="variable"/>
    <style:font-face style:name="Calibri5" svg:font-family="Calibri" style:font-adornments="Regular" style:font-family-generic="swiss" style:font-pitch="variable"/>
    <style:font-face style:name="Courier New" svg:font-family="'Courier New'" style:font-family-generic="modern" style:font-pitch="fixed"/>
    <style:font-face style:name="Courier New1" svg:font-family="'Courier New'" style:font-family-generic="system" style:font-pitch="variable"/>
    <style:font-face style:name="Courier New2" svg:font-family="'Courier New'" style:font-adornments="Normal" style:font-family-generic="modern" style:font-pitch="fixed"/>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OpenSymbol" svg:font-family="OpenSymbol" style:font-charset="x-symbol"/>
    <style:font-face style:name="OpenSymbol1" svg:font-family="OpenSymbol" style:font-family-generic="system" style:font-charset="x-symbol"/>
    <style:font-face style:name="SimSun" svg:font-family="SimSun" style:font-family-generic="system" style:font-pitch="variable"/>
    <style:font-face style:name="StarSymbol" svg:font-family="StarSymbol" style:font-charset="x-symbol"/>
    <style:font-face style:name="StarSymbol1" svg:font-family="StarSymbol" style:font-family-generic="system" style:font-charset="x-symbol"/>
    <style:font-face style:name="Symbol" svg:font-family="Symbol" style:font-family-generic="roman" style:font-pitch="variable" style:font-charset="x-symbol"/>
    <style:font-face style:name="Symbol1" svg:font-family="Symbol" style:font-adornments="Normal" style:font-family-generic="roman" style:font-pitch="variable" style:font-charset="x-symbol"/>
    <style:font-face style:name="Times New Roman" svg:font-family="'Times New Roman'" style:font-family-generic="system" style:font-pitch="variable"/>
    <style:font-face style:name="Wingdings" svg:font-family="Wingdings" style:font-family-generic="system" style:font-pitch="variable" style:font-charset="x-symbol"/>
    <style:font-face style:name="Wingdings1" svg:font-family="Wingdings" style:font-adornments="Normal" style:font-pitch="variable" style:font-charset="x-symbol"/>
  </office:font-face-decls>
  <office:automatic-styles>
    <style:style style:name="Tabla2" style:family="table">
      <style:table-properties style:width="17cm" style:rel-width="100%" fo:margin-left="-0.132cm" fo:margin-top="0cm" fo:margin-bottom="0cm" table:align="left" style:writing-mode="lr-tb"/>
    </style:style>
    <style:style style:name="Tabla2.A" style:family="table-column">
      <style:table-column-properties style:column-width="2.26cm" style:rel-column-width="8709*"/>
    </style:style>
    <style:style style:name="Tabla2.B" style:family="table-column">
      <style:table-column-properties style:column-width="3.743cm" style:rel-column-width="14431*"/>
    </style:style>
    <style:style style:name="Tabla2.C" style:family="table-column">
      <style:table-column-properties style:column-width="1.568cm" style:rel-column-width="6042*"/>
    </style:style>
    <style:style style:name="Tabla2.D" style:family="table-column">
      <style:table-column-properties style:column-width="9.43cm" style:rel-column-width="36350*"/>
    </style:style>
    <style:style style:name="Tabla2.1" style:family="table-row">
      <style:table-row-properties style:min-row-height="0.614cm" fo:keep-together="auto"/>
    </style:style>
    <style:style style:name="Tabla2.A1" style:family="table-cell">
      <style:table-cell-properties fo:background-color="#007dc3" fo:padding-left="0.132cm" fo:padding-right="0.123cm" fo:padding-top="0cm" fo:padding-bottom="0cm" fo:border-left="1.5pt solid #00000a" fo:border-right="1.5pt solid #00000a" fo:border-top="1.5pt solid #00000a" fo:border-bottom="0.5pt solid #00000a">
        <style:background-image/>
      </style:table-cell-properties>
    </style:style>
    <style:style style:name="Tabla2.A2" style:family="table-cell">
      <style:table-cell-properties fo:background-color="#ffffff" fo:padding-left="0.132cm" fo:padding-right="0.123cm" fo:padding-top="0cm" fo:padding-bottom="0cm" fo:border-left="1.5pt solid #00000a" fo:border-right="0.5pt solid #00000a" fo:border-top="0.5pt solid #00000a" fo:border-bottom="0.5pt solid #00000a">
        <style:background-image/>
      </style:table-cell-properties>
    </style:style>
    <style:style style:name="Tabla2.B2" style:family="table-cell">
      <style:table-cell-properties fo:background-color="#ffffff" fo:padding-left="0.132cm" fo:padding-right="0.123cm" fo:padding-top="0cm" fo:padding-bottom="0cm" fo:border="0.5pt solid #00000a">
        <style:background-image/>
      </style:table-cell-properties>
    </style:style>
    <style:style style:name="Tabla2.D2" style:family="table-cell">
      <style:table-cell-properties fo:background-color="#ffffff" fo:padding-left="0.132cm" fo:padding-right="0.123cm" fo:padding-top="0cm" fo:padding-bottom="0cm" fo:border-left="0.5pt solid #00000a" fo:border-right="1.5pt solid #00000a" fo:border-top="0.5pt solid #00000a" fo:border-bottom="0.5pt solid #00000a">
        <style:background-image/>
      </style:table-cell-properties>
    </style:style>
    <style:style style:name="Tabla2.A3" style:family="table-cell">
      <style:table-cell-properties fo:padding-left="0.132cm" fo:padding-right="0.123cm" fo:padding-top="0cm" fo:padding-bottom="0cm" fo:border-left="1.5pt solid #00000a" fo:border-right="0.5pt solid #00000a" fo:border-top="0.5pt solid #00000a" fo:border-bottom="0.5pt solid #00000a"/>
    </style:style>
    <style:style style:name="Tabla2.B3" style:family="table-cell">
      <style:table-cell-properties fo:padding-left="0.132cm" fo:padding-right="0.123cm" fo:padding-top="0cm" fo:padding-bottom="0cm" fo:border="0.5pt solid #00000a"/>
    </style:style>
    <style:style style:name="Tabla2.C3" style:family="table-cell">
      <style:table-cell-properties fo:padding-left="0.132cm" fo:padding-right="0.123cm" fo:padding-top="0cm" fo:padding-bottom="0cm" fo:border="0.5pt solid #00000a"/>
    </style:style>
    <style:style style:name="Tabla2.D3" style:family="table-cell">
      <style:table-cell-properties fo:padding-left="0.132cm" fo:padding-right="0.123cm" fo:padding-top="0cm" fo:padding-bottom="0cm" fo:border-left="0.5pt solid #00000a" fo:border-right="1.5pt solid #00000a" fo:border-top="0.5pt solid #00000a" fo:border-bottom="0.5pt solid #00000a"/>
    </style:style>
    <style:style style:name="Tabla2.A4" style:family="table-cell">
      <style:table-cell-properties fo:padding-left="0.132cm" fo:padding-right="0.123cm" fo:padding-top="0cm" fo:padding-bottom="0cm" fo:border-left="1.5pt solid #00000a" fo:border-right="0.5pt solid #00000a" fo:border-top="0.5pt solid #00000a" fo:border-bottom="0.5pt solid #00000a"/>
    </style:style>
    <style:style style:name="Tabla2.B4" style:family="table-cell">
      <style:table-cell-properties fo:padding-left="0.132cm" fo:padding-right="0.123cm" fo:padding-top="0cm" fo:padding-bottom="0cm" fo:border="0.5pt solid #00000a"/>
    </style:style>
    <style:style style:name="Tabla2.C4" style:family="table-cell">
      <style:table-cell-properties fo:padding-left="0.132cm" fo:padding-right="0.123cm" fo:padding-top="0cm" fo:padding-bottom="0cm" fo:border="0.5pt solid #00000a"/>
    </style:style>
    <style:style style:name="Tabla2.D4" style:family="table-cell">
      <style:table-cell-properties fo:padding-left="0.132cm" fo:padding-right="0.123cm" fo:padding-top="0cm" fo:padding-bottom="0cm" fo:border-left="0.5pt solid #00000a" fo:border-right="1.5pt solid #00000a" fo:border-top="0.5pt solid #00000a" fo:border-bottom="0.5pt solid #00000a"/>
    </style:style>
    <style:style style:name="Tabla2.A5" style:family="table-cell">
      <style:table-cell-properties fo:padding-left="0.132cm" fo:padding-right="0.123cm" fo:padding-top="0cm" fo:padding-bottom="0cm" fo:border-left="1.5pt solid #00000a" fo:border-right="0.5pt solid #00000a" fo:border-top="0.5pt solid #00000a" fo:border-bottom="0.5pt solid #00000a"/>
    </style:style>
    <style:style style:name="Tabla2.B5" style:family="table-cell">
      <style:table-cell-properties fo:padding-left="0.132cm" fo:padding-right="0.123cm" fo:padding-top="0cm" fo:padding-bottom="0cm" fo:border="0.5pt solid #00000a"/>
    </style:style>
    <style:style style:name="Tabla2.C5" style:family="table-cell">
      <style:table-cell-properties fo:padding-left="0.132cm" fo:padding-right="0.123cm" fo:padding-top="0cm" fo:padding-bottom="0cm" fo:border="0.5pt solid #00000a"/>
    </style:style>
    <style:style style:name="Tabla2.D5" style:family="table-cell">
      <style:table-cell-properties fo:padding-left="0.132cm" fo:padding-right="0.123cm" fo:padding-top="0cm" fo:padding-bottom="0cm" fo:border-left="0.5pt solid #00000a" fo:border-right="1.5pt solid #00000a" fo:border-top="0.5pt solid #00000a" fo:border-bottom="0.5pt solid #00000a"/>
    </style:style>
    <style:style style:name="Tabla2.A6" style:family="table-cell">
      <style:table-cell-properties fo:padding-left="0.132cm" fo:padding-right="0.123cm" fo:padding-top="0cm" fo:padding-bottom="0cm" fo:border-left="1.5pt solid #00000a" fo:border-right="0.5pt solid #00000a" fo:border-top="0.5pt solid #00000a" fo:border-bottom="1.5pt solid #00000a"/>
    </style:style>
    <style:style style:name="Tabla2.B6" style:family="table-cell">
      <style:table-cell-properties fo:padding-left="0.132cm" fo:padding-right="0.123cm" fo:padding-top="0cm" fo:padding-bottom="0cm" fo:border-left="0.5pt solid #00000a" fo:border-right="0.5pt solid #00000a" fo:border-top="0.5pt solid #00000a" fo:border-bottom="1.5pt solid #00000a"/>
    </style:style>
    <style:style style:name="Tabla2.C6" style:family="table-cell">
      <style:table-cell-properties fo:padding-left="0.132cm" fo:padding-right="0.123cm" fo:padding-top="0cm" fo:padding-bottom="0cm" fo:border-left="0.5pt solid #00000a" fo:border-right="0.5pt solid #00000a" fo:border-top="0.5pt solid #00000a" fo:border-bottom="1.5pt solid #00000a"/>
    </style:style>
    <style:style style:name="Tabla2.D6" style:family="table-cell">
      <style:table-cell-properties fo:padding-left="0.132cm" fo:padding-right="0.123cm" fo:padding-top="0cm" fo:padding-bottom="0cm" fo:border-left="0.5pt solid #00000a" fo:border-right="1.5pt solid #00000a" fo:border-top="0.5pt solid #00000a" fo:border-bottom="1.5pt solid #00000a"/>
    </style:style>
    <style:style style:name="Tabla3" style:family="table">
      <style:table-properties style:width="17cm" style:rel-width="100%" fo:margin-left="-0.132cm" fo:margin-top="0cm" fo:margin-bottom="0cm" table:align="left" style:writing-mode="lr-tb"/>
    </style:style>
    <style:style style:name="Tabla3.A" style:family="table-column">
      <style:table-column-properties style:column-width="6.78cm" style:rel-column-width="26135*"/>
    </style:style>
    <style:style style:name="Tabla3.B" style:family="table-column">
      <style:table-column-properties style:column-width="2.468cm" style:rel-column-width="9516*"/>
    </style:style>
    <style:style style:name="Tabla3.C" style:family="table-column">
      <style:table-column-properties style:column-width="7.752cm" style:rel-column-width="29884*"/>
    </style:style>
    <style:style style:name="Tabla3.1" style:family="table-row">
      <style:table-row-properties style:min-row-height="0.614cm" fo:keep-together="auto"/>
    </style:style>
    <style:style style:name="Tabla3.A1" style:family="table-cell">
      <style:table-cell-properties fo:background-color="#007dbd" fo:padding-left="0.132cm" fo:padding-right="0.123cm" fo:padding-top="0cm" fo:padding-bottom="0cm" fo:border-left="1.5pt solid #00000a" fo:border-right="1.5pt solid #00000a" fo:border-top="1.5pt solid #00000a" fo:border-bottom="0.5pt solid #00000a">
        <style:background-image/>
      </style:table-cell-properties>
    </style:style>
    <style:style style:name="Tabla3.A2" style:family="table-cell">
      <style:table-cell-properties fo:background-color="#ffffff" fo:padding-left="0.132cm" fo:padding-right="0.123cm" fo:padding-top="0cm" fo:padding-bottom="0cm" fo:border-left="1.5pt solid #00000a" fo:border-right="0.5pt solid #00000a" fo:border-top="0.5pt solid #00000a" fo:border-bottom="0.5pt solid #00000a">
        <style:background-image/>
      </style:table-cell-properties>
    </style:style>
    <style:style style:name="Tabla3.B2" style:family="table-cell">
      <style:table-cell-properties fo:background-color="#ffffff" fo:padding-left="0.132cm" fo:padding-right="0.123cm" fo:padding-top="0cm" fo:padding-bottom="0cm" fo:border="0.5pt solid #00000a">
        <style:background-image/>
      </style:table-cell-properties>
    </style:style>
    <style:style style:name="Tabla3.C2" style:family="table-cell">
      <style:table-cell-properties fo:background-color="#ffffff" fo:padding-left="0.132cm" fo:padding-right="0.123cm" fo:padding-top="0cm" fo:padding-bottom="0cm" fo:border-left="0.5pt solid #00000a" fo:border-right="1.5pt solid #00000a" fo:border-top="0.5pt solid #00000a" fo:border-bottom="0.5pt solid #00000a">
        <style:background-image/>
      </style:table-cell-properties>
    </style:style>
    <style:style style:name="Tabla3.A3" style:family="table-cell">
      <style:table-cell-properties fo:padding-left="0.132cm" fo:padding-right="0.123cm" fo:padding-top="0cm" fo:padding-bottom="0cm" fo:border-left="1.5pt solid #00000a" fo:border-right="0.5pt solid #00000a" fo:border-top="0.5pt solid #00000a" fo:border-bottom="0.5pt solid #00000a"/>
    </style:style>
    <style:style style:name="Tabla3.B3" style:family="table-cell">
      <style:table-cell-properties fo:padding-left="0.132cm" fo:padding-right="0.123cm" fo:padding-top="0cm" fo:padding-bottom="0cm" fo:border="0.5pt solid #00000a"/>
    </style:style>
    <style:style style:name="Tabla3.C3" style:family="table-cell">
      <style:table-cell-properties fo:padding-left="0.132cm" fo:padding-right="0.123cm" fo:padding-top="0cm" fo:padding-bottom="0cm" fo:border-left="0.5pt solid #00000a" fo:border-right="1.5pt solid #00000a" fo:border-top="0.5pt solid #00000a" fo:border-bottom="0.5pt solid #00000a"/>
    </style:style>
    <style:style style:name="Tabla3.A4" style:family="table-cell">
      <style:table-cell-properties fo:padding-left="0.132cm" fo:padding-right="0.123cm" fo:padding-top="0cm" fo:padding-bottom="0cm" fo:border-left="1.5pt solid #00000a" fo:border-right="0.5pt solid #00000a" fo:border-top="0.5pt solid #00000a" fo:border-bottom="0.5pt solid #00000a"/>
    </style:style>
    <style:style style:name="Tabla3.B4" style:family="table-cell">
      <style:table-cell-properties fo:padding-left="0.132cm" fo:padding-right="0.123cm" fo:padding-top="0cm" fo:padding-bottom="0cm" fo:border="0.5pt solid #00000a"/>
    </style:style>
    <style:style style:name="Tabla3.C4" style:family="table-cell">
      <style:table-cell-properties fo:padding-left="0.132cm" fo:padding-right="0.123cm" fo:padding-top="0cm" fo:padding-bottom="0cm" fo:border-left="0.5pt solid #00000a" fo:border-right="1.5pt solid #00000a" fo:border-top="0.5pt solid #00000a" fo:border-bottom="0.5pt solid #00000a"/>
    </style:style>
    <style:style style:name="Tabla3.A5" style:family="table-cell">
      <style:table-cell-properties fo:padding-left="0.132cm" fo:padding-right="0.123cm" fo:padding-top="0cm" fo:padding-bottom="0cm" fo:border-left="1.5pt solid #00000a" fo:border-right="0.5pt solid #00000a" fo:border-top="0.5pt solid #00000a" fo:border-bottom="0.5pt solid #00000a"/>
    </style:style>
    <style:style style:name="Tabla3.B5" style:family="table-cell">
      <style:table-cell-properties fo:padding-left="0.132cm" fo:padding-right="0.123cm" fo:padding-top="0cm" fo:padding-bottom="0cm" fo:border="0.5pt solid #00000a"/>
    </style:style>
    <style:style style:name="Tabla3.C5" style:family="table-cell">
      <style:table-cell-properties fo:padding-left="0.132cm" fo:padding-right="0.123cm" fo:padding-top="0cm" fo:padding-bottom="0cm" fo:border-left="0.5pt solid #00000a" fo:border-right="1.5pt solid #00000a" fo:border-top="0.5pt solid #00000a" fo:border-bottom="0.5pt solid #00000a"/>
    </style:style>
    <style:style style:name="Tabla3.A6" style:family="table-cell">
      <style:table-cell-properties fo:padding-left="0.132cm" fo:padding-right="0.123cm" fo:padding-top="0cm" fo:padding-bottom="0cm" fo:border-left="1.5pt solid #00000a" fo:border-right="0.5pt solid #00000a" fo:border-top="0.5pt solid #00000a" fo:border-bottom="1.5pt solid #00000a"/>
    </style:style>
    <style:style style:name="Tabla3.B6" style:family="table-cell">
      <style:table-cell-properties fo:padding-left="0.132cm" fo:padding-right="0.123cm" fo:padding-top="0cm" fo:padding-bottom="0cm" fo:border-left="0.5pt solid #00000a" fo:border-right="0.5pt solid #00000a" fo:border-top="0.5pt solid #00000a" fo:border-bottom="1.5pt solid #00000a"/>
    </style:style>
    <style:style style:name="Tabla3.C6" style:family="table-cell">
      <style:table-cell-properties fo:padding-left="0.132cm" fo:padding-right="0.123cm" fo:padding-top="0cm" fo:padding-bottom="0cm" fo:border-left="0.5pt solid #00000a" fo:border-right="1.5pt solid #00000a" fo:border-top="0.5pt solid #00000a" fo:border-bottom="1.5pt solid #00000a"/>
    </style:style>
    <style:style style:name="Tabla4" style:family="table">
      <style:table-properties style:width="17cm" style:rel-width="100%" fo:margin-left="-0.132cm" fo:margin-top="0cm" fo:margin-bottom="0cm" table:align="left" style:writing-mode="lr-tb"/>
    </style:style>
    <style:style style:name="Tabla4.A" style:family="table-column">
      <style:table-column-properties style:column-width="6.78cm" style:rel-column-width="26135*"/>
    </style:style>
    <style:style style:name="Tabla4.B" style:family="table-column">
      <style:table-column-properties style:column-width="2.468cm" style:rel-column-width="9516*"/>
    </style:style>
    <style:style style:name="Tabla4.C" style:family="table-column">
      <style:table-column-properties style:column-width="7.752cm" style:rel-column-width="29884*"/>
    </style:style>
    <style:style style:name="Tabla4.1" style:family="table-row">
      <style:table-row-properties style:min-row-height="0.614cm" fo:keep-together="auto"/>
    </style:style>
    <style:style style:name="Tabla4.A1" style:family="table-cell">
      <style:table-cell-properties fo:background-color="#007dc3" fo:padding-left="0.132cm" fo:padding-right="0.123cm" fo:padding-top="0cm" fo:padding-bottom="0cm" fo:border-left="1.5pt solid #00000a" fo:border-right="1.5pt solid #00000a" fo:border-top="1.5pt solid #00000a" fo:border-bottom="0.5pt solid #00000a">
        <style:background-image/>
      </style:table-cell-properties>
    </style:style>
    <style:style style:name="Tabla4.A2" style:family="table-cell">
      <style:table-cell-properties fo:background-color="#ffffff" fo:padding-left="0.132cm" fo:padding-right="0.123cm" fo:padding-top="0cm" fo:padding-bottom="0cm" fo:border-left="1.5pt solid #00000a" fo:border-right="0.5pt solid #00000a" fo:border-top="0.5pt solid #00000a" fo:border-bottom="0.5pt solid #00000a">
        <style:background-image/>
      </style:table-cell-properties>
    </style:style>
    <style:style style:name="Tabla4.B2" style:family="table-cell">
      <style:table-cell-properties fo:background-color="#ffffff" fo:padding-left="0.132cm" fo:padding-right="0.123cm" fo:padding-top="0cm" fo:padding-bottom="0cm" fo:border="0.5pt solid #00000a">
        <style:background-image/>
      </style:table-cell-properties>
    </style:style>
    <style:style style:name="Tabla4.C2" style:family="table-cell">
      <style:table-cell-properties fo:background-color="#ffffff" fo:padding-left="0.132cm" fo:padding-right="0.123cm" fo:padding-top="0cm" fo:padding-bottom="0cm" fo:border-left="0.5pt solid #00000a" fo:border-right="1.5pt solid #00000a" fo:border-top="0.5pt solid #00000a" fo:border-bottom="0.5pt solid #00000a">
        <style:background-image/>
      </style:table-cell-properties>
    </style:style>
    <style:style style:name="Tabla4.A3" style:family="table-cell">
      <style:table-cell-properties fo:padding-left="0.132cm" fo:padding-right="0.123cm" fo:padding-top="0cm" fo:padding-bottom="0cm" fo:border-left="1.5pt solid #00000a" fo:border-right="0.5pt solid #00000a" fo:border-top="0.5pt solid #00000a" fo:border-bottom="0.5pt solid #00000a"/>
    </style:style>
    <style:style style:name="Tabla4.B3" style:family="table-cell">
      <style:table-cell-properties fo:padding-left="0.132cm" fo:padding-right="0.123cm" fo:padding-top="0cm" fo:padding-bottom="0cm" fo:border="0.5pt solid #00000a"/>
    </style:style>
    <style:style style:name="Tabla4.C3" style:family="table-cell">
      <style:table-cell-properties fo:padding-left="0.132cm" fo:padding-right="0.123cm" fo:padding-top="0cm" fo:padding-bottom="0cm" fo:border-left="0.5pt solid #00000a" fo:border-right="1.5pt solid #00000a" fo:border-top="0.5pt solid #00000a" fo:border-bottom="0.5pt solid #00000a"/>
    </style:style>
    <style:style style:name="Tabla4.A4" style:family="table-cell">
      <style:table-cell-properties fo:padding-left="0.132cm" fo:padding-right="0.123cm" fo:padding-top="0cm" fo:padding-bottom="0cm" fo:border-left="1.5pt solid #00000a" fo:border-right="0.5pt solid #00000a" fo:border-top="0.5pt solid #00000a" fo:border-bottom="0.5pt solid #00000a"/>
    </style:style>
    <style:style style:name="Tabla4.B4" style:family="table-cell">
      <style:table-cell-properties fo:padding-left="0.132cm" fo:padding-right="0.123cm" fo:padding-top="0cm" fo:padding-bottom="0cm" fo:border="0.5pt solid #00000a"/>
    </style:style>
    <style:style style:name="Tabla4.C4" style:family="table-cell">
      <style:table-cell-properties fo:padding-left="0.132cm" fo:padding-right="0.123cm" fo:padding-top="0cm" fo:padding-bottom="0cm" fo:border-left="0.5pt solid #00000a" fo:border-right="1.5pt solid #00000a" fo:border-top="0.5pt solid #00000a" fo:border-bottom="0.5pt solid #00000a"/>
    </style:style>
    <style:style style:name="Tabla4.A5" style:family="table-cell">
      <style:table-cell-properties fo:padding-left="0.132cm" fo:padding-right="0.123cm" fo:padding-top="0cm" fo:padding-bottom="0cm" fo:border-left="1.5pt solid #00000a" fo:border-right="0.5pt solid #00000a" fo:border-top="0.5pt solid #00000a" fo:border-bottom="0.5pt solid #00000a"/>
    </style:style>
    <style:style style:name="Tabla4.B5" style:family="table-cell">
      <style:table-cell-properties fo:padding-left="0.132cm" fo:padding-right="0.123cm" fo:padding-top="0cm" fo:padding-bottom="0cm" fo:border="0.5pt solid #00000a"/>
    </style:style>
    <style:style style:name="Tabla4.C5" style:family="table-cell">
      <style:table-cell-properties fo:padding-left="0.132cm" fo:padding-right="0.123cm" fo:padding-top="0cm" fo:padding-bottom="0cm" fo:border-left="0.5pt solid #00000a" fo:border-right="1.5pt solid #00000a" fo:border-top="0.5pt solid #00000a" fo:border-bottom="0.5pt solid #00000a"/>
    </style:style>
    <style:style style:name="Tabla4.A6" style:family="table-cell">
      <style:table-cell-properties fo:padding-left="0.132cm" fo:padding-right="0.123cm" fo:padding-top="0cm" fo:padding-bottom="0cm" fo:border-left="1.5pt solid #00000a" fo:border-right="0.5pt solid #00000a" fo:border-top="0.5pt solid #00000a" fo:border-bottom="0.5pt solid #00000a"/>
    </style:style>
    <style:style style:name="Tabla4.B6" style:family="table-cell">
      <style:table-cell-properties fo:padding-left="0.132cm" fo:padding-right="0.123cm" fo:padding-top="0cm" fo:padding-bottom="0cm" fo:border="0.5pt solid #00000a"/>
    </style:style>
    <style:style style:name="Tabla4.C6" style:family="table-cell">
      <style:table-cell-properties fo:padding-left="0.132cm" fo:padding-right="0.123cm" fo:padding-top="0cm" fo:padding-bottom="0cm" fo:border-left="0.5pt solid #00000a" fo:border-right="1.5pt solid #00000a" fo:border-top="0.5pt solid #00000a" fo:border-bottom="0.5pt solid #00000a"/>
    </style:style>
    <style:style style:name="Tabla5" style:family="table">
      <style:table-properties style:width="17cm" style:rel-width="100%" fo:margin-left="-0.132cm" fo:margin-top="0cm" fo:margin-bottom="0cm" table:align="left" style:writing-mode="lr-tb"/>
    </style:style>
    <style:style style:name="Tabla5.A" style:family="table-column">
      <style:table-column-properties style:column-width="6.639cm" style:rel-column-width="25597*"/>
    </style:style>
    <style:style style:name="Tabla5.B" style:family="table-column">
      <style:table-column-properties style:column-width="4.824cm" style:rel-column-width="18599*"/>
    </style:style>
    <style:style style:name="Tabla5.C" style:family="table-column">
      <style:table-column-properties style:column-width="5.535cm" style:rel-column-width="21339*"/>
    </style:style>
    <style:style style:name="Tabla5.1" style:family="table-row">
      <style:table-row-properties style:min-row-height="0.614cm" fo:keep-together="auto"/>
    </style:style>
    <style:style style:name="Tabla5.A1" style:family="table-cell">
      <style:table-cell-properties fo:background-color="#007dc3" fo:padding-left="0.132cm" fo:padding-right="0.123cm" fo:padding-top="0cm" fo:padding-bottom="0cm" fo:border-left="1.5pt solid #00000a" fo:border-right="1.5pt solid #00000a" fo:border-top="1.5pt solid #00000a" fo:border-bottom="0.5pt solid #00000a">
        <style:background-image/>
      </style:table-cell-properties>
    </style:style>
    <style:style style:name="Tabla5.A2" style:family="table-cell">
      <style:table-cell-properties fo:background-color="#ffffff" fo:padding-left="0.132cm" fo:padding-right="0.123cm" fo:padding-top="0cm" fo:padding-bottom="0cm" fo:border-left="1.5pt solid #00000a" fo:border-right="0.5pt solid #00000a" fo:border-top="0.5pt solid #00000a" fo:border-bottom="0.5pt solid #00000a">
        <style:background-image/>
      </style:table-cell-properties>
    </style:style>
    <style:style style:name="Tabla5.B2" style:family="table-cell">
      <style:table-cell-properties fo:background-color="#ffffff" fo:padding-left="0.132cm" fo:padding-right="0.123cm" fo:padding-top="0cm" fo:padding-bottom="0cm" fo:border="0.5pt solid #00000a">
        <style:background-image/>
      </style:table-cell-properties>
    </style:style>
    <style:style style:name="Tabla5.C2" style:family="table-cell">
      <style:table-cell-properties fo:background-color="#ffffff" fo:padding-left="0.132cm" fo:padding-right="0.123cm" fo:padding-top="0cm" fo:padding-bottom="0cm" fo:border-left="0.5pt solid #00000a" fo:border-right="1.5pt solid #00000a" fo:border-top="0.5pt solid #00000a" fo:border-bottom="0.5pt solid #00000a">
        <style:background-image/>
      </style:table-cell-properties>
    </style:style>
    <style:style style:name="Tabla5.A3" style:family="table-cell">
      <style:table-cell-properties fo:padding-left="0.132cm" fo:padding-right="0.123cm" fo:padding-top="0cm" fo:padding-bottom="0cm" fo:border-left="1.5pt solid #00000a" fo:border-right="0.5pt solid #00000a" fo:border-top="0.5pt solid #00000a" fo:border-bottom="0.5pt solid #00000a"/>
    </style:style>
    <style:style style:name="Tabla5.B3" style:family="table-cell">
      <style:table-cell-properties fo:padding-left="0.132cm" fo:padding-right="0.123cm" fo:padding-top="0cm" fo:padding-bottom="0cm" fo:border="0.5pt solid #00000a"/>
    </style:style>
    <style:style style:name="Tabla5.C3" style:family="table-cell">
      <style:table-cell-properties fo:padding-left="0.132cm" fo:padding-right="0.123cm" fo:padding-top="0cm" fo:padding-bottom="0cm" fo:border-left="0.5pt solid #00000a" fo:border-right="1.5pt solid #00000a" fo:border-top="0.5pt solid #00000a" fo:border-bottom="0.5pt solid #00000a"/>
    </style:style>
    <style:style style:name="Tabla5.A4" style:family="table-cell">
      <style:table-cell-properties fo:padding-left="0.132cm" fo:padding-right="0.123cm" fo:padding-top="0cm" fo:padding-bottom="0cm" fo:border-left="1.5pt solid #00000a" fo:border-right="0.5pt solid #00000a" fo:border-top="0.5pt solid #00000a" fo:border-bottom="0.5pt solid #00000a"/>
    </style:style>
    <style:style style:name="Tabla5.B4" style:family="table-cell">
      <style:table-cell-properties fo:padding-left="0.132cm" fo:padding-right="0.123cm" fo:padding-top="0cm" fo:padding-bottom="0cm" fo:border="0.5pt solid #00000a"/>
    </style:style>
    <style:style style:name="Tabla5.C4" style:family="table-cell">
      <style:table-cell-properties fo:padding-left="0.132cm" fo:padding-right="0.123cm" fo:padding-top="0cm" fo:padding-bottom="0cm" fo:border-left="0.5pt solid #00000a" fo:border-right="1.5pt solid #00000a" fo:border-top="0.5pt solid #00000a" fo:border-bottom="0.5pt solid #00000a"/>
    </style:style>
    <style:style style:name="P1" style:family="paragraph" style:parent-style-name="Header">
      <style:text-properties fo:language="ca" fo:country="ES" officeooo:paragraph-rsid="000e1972"/>
    </style:style>
    <style:style style:name="P2" style:family="paragraph" style:parent-style-name="Standard">
      <style:text-properties fo:language="ca" fo:country="ES" officeooo:paragraph-rsid="000e1972"/>
    </style:style>
    <style:style style:name="P3" style:family="paragraph" style:parent-style-name="Footer">
      <style:text-properties fo:language="ca" fo:country="ES" officeooo:paragraph-rsid="000e1972"/>
    </style:style>
    <style:style style:name="P4" style:family="paragraph" style:parent-style-name="Standard">
      <style:paragraph-properties fo:text-align="start" style:justify-single-word="false"/>
      <style:text-properties fo:language="ca" fo:country="ES" officeooo:paragraph-rsid="000e1972"/>
    </style:style>
    <style:style style:name="P5" style:family="paragraph" style:parent-style-name="Footer">
      <style:paragraph-properties fo:margin-left="-0.123cm" fo:margin-right="0cm" fo:text-align="start" style:justify-single-word="false" fo:text-indent="0cm" style:auto-text-indent="false"/>
      <style:text-properties fo:language="ca" fo:country="ES" officeooo:paragraph-rsid="000e1972"/>
    </style:style>
    <style:style style:name="P6" style:family="paragraph" style:parent-style-name="Standard">
      <style:paragraph-properties fo:text-align="end" style:justify-single-word="false"/>
      <style:text-properties fo:language="ca" fo:country="ES" officeooo:paragraph-rsid="000e1972"/>
    </style:style>
    <style:style style:name="P7" style:family="paragraph" style:parent-style-name="western">
      <style:paragraph-properties fo:text-align="end" style:justify-single-word="false"/>
      <style:text-properties fo:language="ca" fo:country="ES" officeooo:paragraph-rsid="000e1972"/>
    </style:style>
    <style:style style:name="P8" style:family="paragraph" style:parent-style-name="Standard">
      <style:text-properties fo:language="ca" fo:country="ES"/>
    </style:style>
    <style:style style:name="P9" style:family="paragraph" style:parent-style-name="Standard">
      <style:text-properties fo:language="ca" fo:country="ES" officeooo:rsid="000f0c3e" officeooo:paragraph-rsid="000f0c3e"/>
    </style:style>
    <style:style style:name="P10" style:family="paragraph" style:parent-style-name="Standard">
      <style:text-properties fo:language="ca" fo:country="ES" officeooo:paragraph-rsid="000f0c3e"/>
    </style:style>
    <style:style style:name="P11" style:family="paragraph" style:parent-style-name="Standard">
      <style:text-properties fo:language="ca" fo:country="ES" officeooo:paragraph-rsid="005a35d6"/>
    </style:style>
    <style:style style:name="P12" style:family="paragraph" style:parent-style-name="Standard">
      <style:text-properties fo:language="ca" fo:country="ES" officeooo:rsid="0064c74a" officeooo:paragraph-rsid="0064c74a"/>
    </style:style>
    <style:style style:name="P13" style:family="paragraph" style:parent-style-name="Text_20_body">
      <style:text-properties fo:language="ca" fo:country="ES"/>
    </style:style>
    <style:style style:name="P14" style:family="paragraph" style:parent-style-name="Text_20_body">
      <style:text-properties fo:language="ca" fo:country="ES" officeooo:rsid="001a1fdd" officeooo:paragraph-rsid="001a1fdd"/>
    </style:style>
    <style:style style:name="P15" style:family="paragraph" style:parent-style-name="Text_20_body">
      <style:text-properties fo:language="ca" fo:country="ES" fo:font-weight="bold" officeooo:rsid="002119a2" officeooo:paragraph-rsid="002119a2" style:font-weight-asian="bold" style:font-weight-complex="bold"/>
    </style:style>
    <style:style style:name="P16" style:family="paragraph" style:parent-style-name="Text_20_body">
      <style:text-properties fo:language="ca" fo:country="ES" fo:font-weight="bold" officeooo:rsid="0035798f" officeooo:paragraph-rsid="009b2572" style:font-weight-asian="bold" style:font-weight-complex="bold"/>
    </style:style>
    <style:style style:name="P17" style:family="paragraph" style:parent-style-name="Text_20_body">
      <style:text-properties fo:language="ca" fo:country="ES" fo:font-weight="bold" officeooo:rsid="003dd30a" officeooo:paragraph-rsid="00b24c63" style:font-weight-asian="bold" style:font-weight-complex="bold"/>
    </style:style>
    <style:style style:name="P18" style:family="paragraph" style:parent-style-name="Text_20_body">
      <style:text-properties fo:language="ca" fo:country="ES" fo:font-weight="normal" officeooo:rsid="001a1fdd" officeooo:paragraph-rsid="001a1fdd" style:font-weight-asian="normal" style:font-weight-complex="normal"/>
    </style:style>
    <style:style style:name="P19" style:family="paragraph" style:parent-style-name="Text_20_body">
      <style:text-properties fo:language="ca" fo:country="ES" fo:font-weight="normal" officeooo:rsid="001b1053" officeooo:paragraph-rsid="001b1053" style:font-weight-asian="normal" style:font-weight-complex="normal"/>
    </style:style>
    <style:style style:name="P20" style:family="paragraph" style:parent-style-name="Text_20_body">
      <style:text-properties fo:language="ca" fo:country="ES" fo:font-weight="normal" officeooo:rsid="001b1053" officeooo:paragraph-rsid="00663ddb" style:font-weight-asian="normal" style:font-weight-complex="normal"/>
    </style:style>
    <style:style style:name="P21" style:family="paragraph" style:parent-style-name="Text_20_body">
      <style:text-properties fo:language="ca" fo:country="ES" fo:font-weight="normal" officeooo:rsid="001fc3e5" officeooo:paragraph-rsid="001fc3e5" style:font-weight-asian="normal" style:font-weight-complex="normal"/>
    </style:style>
    <style:style style:name="P22" style:family="paragraph" style:parent-style-name="Text_20_body">
      <style:text-properties fo:language="ca" fo:country="ES" fo:font-weight="normal" officeooo:rsid="0024a62d" officeooo:paragraph-rsid="00663ddb" style:font-weight-asian="normal" style:font-weight-complex="normal"/>
    </style:style>
    <style:style style:name="P23" style:family="paragraph" style:parent-style-name="Text_20_body">
      <style:text-properties fo:language="ca" fo:country="ES" fo:font-weight="normal" officeooo:rsid="0025d08d" officeooo:paragraph-rsid="00663ddb" style:font-weight-asian="normal" style:font-weight-complex="normal"/>
    </style:style>
    <style:style style:name="P24" style:family="paragraph" style:parent-style-name="Text_20_body">
      <style:text-properties fo:language="ca" fo:country="ES" fo:font-weight="normal" officeooo:rsid="0048df05" officeooo:paragraph-rsid="00663ddb" style:font-weight-asian="normal" style:font-weight-complex="normal"/>
    </style:style>
    <style:style style:name="P25" style:family="paragraph" style:parent-style-name="Text_20_body">
      <style:text-properties fo:language="ca" fo:country="ES" fo:font-weight="normal" officeooo:rsid="002749e4" officeooo:paragraph-rsid="00663ddb" style:font-weight-asian="normal" style:font-weight-complex="normal"/>
    </style:style>
    <style:style style:name="P26" style:family="paragraph" style:parent-style-name="Text_20_body">
      <style:text-properties fo:language="ca" fo:country="ES" fo:font-weight="normal" officeooo:rsid="002ddca3" officeooo:paragraph-rsid="00663ddb" style:font-weight-asian="normal" style:font-weight-complex="normal"/>
    </style:style>
    <style:style style:name="P27" style:family="paragraph" style:parent-style-name="Text_20_body">
      <style:text-properties fo:language="ca" fo:country="ES" fo:font-weight="normal" officeooo:rsid="002ddca3" officeooo:paragraph-rsid="00d26d4d" style:font-weight-asian="normal" style:font-weight-complex="normal"/>
    </style:style>
    <style:style style:name="P28" style:family="paragraph" style:parent-style-name="Text_20_body">
      <style:text-properties fo:language="ca" fo:country="ES" fo:font-weight="normal" officeooo:rsid="0040f69f" officeooo:paragraph-rsid="00663ddb" style:font-weight-asian="normal" style:font-weight-complex="normal"/>
    </style:style>
    <style:style style:name="P29" style:family="paragraph" style:parent-style-name="Text_20_body">
      <style:text-properties fo:language="ca" fo:country="ES" fo:font-weight="normal" officeooo:rsid="009577a4" officeooo:paragraph-rsid="009577a4" style:font-weight-asian="normal" style:font-weight-complex="normal"/>
    </style:style>
    <style:style style:name="P30" style:family="paragraph" style:parent-style-name="Text_20_body">
      <style:text-properties fo:language="ca" fo:country="ES" fo:font-weight="normal" officeooo:rsid="008b5603" officeooo:paragraph-rsid="008b5603" style:font-weight-asian="normal" style:font-weight-complex="normal"/>
    </style:style>
    <style:style style:name="P31" style:family="paragraph" style:parent-style-name="Text_20_body">
      <style:text-properties fo:language="ca" fo:country="ES" fo:font-weight="normal" officeooo:rsid="00551f02" officeooo:paragraph-rsid="00663ddb" style:font-weight-asian="normal" style:font-weight-complex="normal"/>
    </style:style>
    <style:style style:name="P32" style:family="paragraph" style:parent-style-name="Text_20_body">
      <style:text-properties fo:language="ca" fo:country="ES" fo:font-weight="normal" officeooo:rsid="00d20af4" officeooo:paragraph-rsid="00663ddb" style:font-weight-asian="normal" style:font-weight-complex="normal"/>
    </style:style>
    <style:style style:name="P33" style:family="paragraph" style:parent-style-name="Text_20_body">
      <style:text-properties fo:language="ca" fo:country="ES" fo:font-weight="normal" officeooo:rsid="00be4301" officeooo:paragraph-rsid="00ecb670" style:font-weight-asian="normal" style:font-weight-complex="normal"/>
    </style:style>
    <style:style style:name="P34" style:family="paragraph" style:parent-style-name="Text_20_body">
      <style:text-properties fo:language="ca" fo:country="ES" fo:font-weight="normal" officeooo:rsid="00365bd0" officeooo:paragraph-rsid="00ecb670" style:font-weight-asian="normal" style:font-weight-complex="normal"/>
    </style:style>
    <style:style style:name="P35" style:family="paragraph" style:parent-style-name="Text_20_body">
      <style:text-properties fo:language="ca" fo:country="ES" officeooo:rsid="002119a2" officeooo:paragraph-rsid="002119a2"/>
    </style:style>
    <style:style style:name="P36" style:family="paragraph" style:parent-style-name="Text_20_body">
      <style:text-properties fo:language="ca" fo:country="ES" officeooo:rsid="0019fa0c" officeooo:paragraph-rsid="0019fa0c"/>
    </style:style>
    <style:style style:name="P37" style:family="paragraph" style:parent-style-name="Text_20_body">
      <style:text-properties fo:language="ca" fo:country="ES" officeooo:rsid="00179ecd" officeooo:paragraph-rsid="00179ecd"/>
    </style:style>
    <style:style style:name="P38" style:family="paragraph" style:parent-style-name="Text_20_body">
      <style:text-properties fo:language="ca" fo:country="ES" officeooo:rsid="001b1053" officeooo:paragraph-rsid="001b1053"/>
    </style:style>
    <style:style style:name="P39" style:family="paragraph" style:parent-style-name="Text_20_body">
      <style:text-properties fo:language="ca" fo:country="ES" officeooo:rsid="001b1053" officeooo:paragraph-rsid="00663ddb"/>
    </style:style>
    <style:style style:name="P40" style:family="paragraph" style:parent-style-name="Text_20_body">
      <style:text-properties fo:language="ca" fo:country="ES" officeooo:rsid="001b1053" officeooo:paragraph-rsid="0091f042"/>
    </style:style>
    <style:style style:name="P41" style:family="paragraph" style:parent-style-name="Text_20_body">
      <style:text-properties fo:language="ca" fo:country="ES" officeooo:rsid="001df521" officeooo:paragraph-rsid="001b5cf5"/>
    </style:style>
    <style:style style:name="P42" style:family="paragraph" style:parent-style-name="Text_20_body">
      <style:text-properties fo:language="ca" fo:country="ES" officeooo:rsid="00180ee2" officeooo:paragraph-rsid="00180ee2"/>
    </style:style>
    <style:style style:name="P43" style:family="paragraph" style:parent-style-name="Text_20_body">
      <style:text-properties fo:language="ca" fo:country="ES" officeooo:rsid="00180ee2" officeooo:paragraph-rsid="00663ddb"/>
    </style:style>
    <style:style style:name="P44" style:family="paragraph" style:parent-style-name="Text_20_body">
      <style:text-properties fo:language="ca" fo:country="ES" officeooo:rsid="00180ee2" officeooo:paragraph-rsid="00d3e721"/>
    </style:style>
    <style:style style:name="P45" style:family="paragraph" style:parent-style-name="Text_20_body">
      <style:text-properties fo:language="ca" fo:country="ES" officeooo:rsid="001f540c" officeooo:paragraph-rsid="001f540c"/>
    </style:style>
    <style:style style:name="P46" style:family="paragraph" style:parent-style-name="Text_20_body">
      <style:text-properties fo:language="ca" fo:country="ES" officeooo:rsid="001f94a7" officeooo:paragraph-rsid="001f94a7"/>
    </style:style>
    <style:style style:name="P47" style:family="paragraph" style:parent-style-name="Text_20_body">
      <style:text-properties fo:language="ca" fo:country="ES" officeooo:rsid="00398d41" officeooo:paragraph-rsid="00663ddb"/>
    </style:style>
    <style:style style:name="P48" style:family="paragraph" style:parent-style-name="Text_20_body">
      <style:text-properties fo:language="ca" fo:country="ES" officeooo:rsid="003c3723" officeooo:paragraph-rsid="00663ddb"/>
    </style:style>
    <style:style style:name="P49" style:family="paragraph" style:parent-style-name="Text_20_body">
      <style:text-properties fo:language="ca" fo:country="ES" officeooo:rsid="00226e93" officeooo:paragraph-rsid="00663ddb"/>
    </style:style>
    <style:style style:name="P50" style:family="paragraph" style:parent-style-name="Text_20_body">
      <style:text-properties fo:language="ca" fo:country="ES" officeooo:rsid="0023c1b9" officeooo:paragraph-rsid="00663ddb"/>
    </style:style>
    <style:style style:name="P51" style:family="paragraph" style:parent-style-name="Text_20_body">
      <style:text-properties fo:language="ca" fo:country="ES" officeooo:rsid="0024a62d" officeooo:paragraph-rsid="00663ddb"/>
    </style:style>
    <style:style style:name="P52" style:family="paragraph" style:parent-style-name="Text_20_body">
      <style:text-properties fo:language="ca" fo:country="ES" officeooo:rsid="0024a62d" officeooo:paragraph-rsid="008935c2"/>
    </style:style>
    <style:style style:name="P53" style:family="paragraph" style:parent-style-name="Text_20_body">
      <style:text-properties fo:language="ca" fo:country="ES" officeooo:rsid="0024a62d" officeooo:paragraph-rsid="008b5603"/>
    </style:style>
    <style:style style:name="P54" style:family="paragraph" style:parent-style-name="Text_20_body">
      <style:text-properties fo:language="ca" fo:country="ES" officeooo:rsid="00302d7f" officeooo:paragraph-rsid="00663ddb"/>
    </style:style>
    <style:style style:name="P55" style:family="paragraph" style:parent-style-name="Text_20_body">
      <style:text-properties fo:language="ca" fo:country="ES" officeooo:rsid="0037b183" officeooo:paragraph-rsid="00663ddb"/>
    </style:style>
    <style:style style:name="P56" style:family="paragraph" style:parent-style-name="Text_20_body">
      <style:text-properties fo:language="ca" fo:country="ES" officeooo:rsid="0040f69f" officeooo:paragraph-rsid="00663ddb"/>
    </style:style>
    <style:style style:name="P57" style:family="paragraph" style:parent-style-name="Text_20_body">
      <style:text-properties fo:language="ca" fo:country="ES" officeooo:rsid="008520a6" officeooo:paragraph-rsid="008520a6"/>
    </style:style>
    <style:style style:name="P58" style:family="paragraph" style:parent-style-name="Text_20_body">
      <style:text-properties fo:language="ca" fo:country="ES" officeooo:rsid="008520a6" officeooo:paragraph-rsid="0089595f"/>
    </style:style>
    <style:style style:name="P59" style:family="paragraph" style:parent-style-name="Text_20_body">
      <style:text-properties fo:language="ca" fo:country="ES" officeooo:rsid="002749e4" officeooo:paragraph-rsid="00663ddb"/>
    </style:style>
    <style:style style:name="P60" style:family="paragraph" style:parent-style-name="Text_20_body">
      <style:text-properties fo:language="ca" fo:country="ES" officeooo:rsid="009ca0f5" officeooo:paragraph-rsid="009ca0f5"/>
    </style:style>
    <style:style style:name="P61" style:family="paragraph" style:parent-style-name="Text_20_body">
      <style:text-properties fo:language="ca" fo:country="ES" officeooo:rsid="008d1405" officeooo:paragraph-rsid="008d1405"/>
    </style:style>
    <style:style style:name="P62" style:family="paragraph" style:parent-style-name="Text_20_body">
      <style:text-properties fo:language="ca" fo:country="ES" officeooo:rsid="0029d734" officeooo:paragraph-rsid="00663ddb"/>
    </style:style>
    <style:style style:name="P63" style:family="paragraph" style:parent-style-name="Text_20_body">
      <style:text-properties fo:language="ca" fo:country="ES" officeooo:rsid="0029d734" officeooo:paragraph-rsid="00d2b6ff"/>
    </style:style>
    <style:style style:name="P64" style:family="paragraph" style:parent-style-name="Text_20_body">
      <style:text-properties fo:language="ca" fo:country="ES" officeooo:rsid="0091f042" officeooo:paragraph-rsid="0091f042"/>
    </style:style>
    <style:style style:name="P65" style:family="paragraph" style:parent-style-name="Standard">
      <style:paragraph-properties fo:margin-left="0cm" fo:margin-right="-0.191cm" fo:text-align="start" style:justify-single-word="false" fo:text-indent="0cm" style:auto-text-indent="false" fo:padding="0cm" fo:border="none"/>
      <style:text-properties fo:language="ca" fo:country="ES" officeooo:rsid="000e1972" officeooo:paragraph-rsid="000e1972"/>
    </style:style>
    <style:style style:name="P66" style:family="paragraph" style:parent-style-name="Text_20_body">
      <style:text-properties fo:language="ca" fo:country="ES" officeooo:rsid="00e7135e" officeooo:paragraph-rsid="00663ddb"/>
    </style:style>
    <style:style style:name="P67" style:family="paragraph" style:parent-style-name="Text_20_body">
      <style:text-properties fo:language="ca" fo:country="ES" officeooo:rsid="00be4301" officeooo:paragraph-rsid="00ecb670"/>
    </style:style>
    <style:style style:name="P68" style:family="paragraph" style:parent-style-name="Header">
      <style:paragraph-properties fo:margin-left="0cm" fo:margin-right="1.812cm" fo:text-align="center" style:justify-single-word="false" fo:text-indent="0cm" style:auto-text-indent="false">
        <style:tab-stops>
          <style:tab-stop style:position="7.31cm"/>
          <style:tab-stop style:position="7.62cm" style:type="center"/>
          <style:tab-stop style:position="15.24cm" style:type="right"/>
        </style:tab-stops>
      </style:paragraph-properties>
      <style:text-properties fo:color="#cc3300" loext:opacity="100%" style:font-name="Calibri" fo:font-size="10pt" fo:language="ca" fo:country="ES" fo:font-weight="bold" officeooo:paragraph-rsid="000e1972" style:font-size-asian="10pt" style:font-weight-asian="bold" style:font-name-complex="Arial1" style:font-size-complex="10pt"/>
    </style:style>
    <style:style style:name="P69" style:family="paragraph" style:parent-style-name="Standard">
      <style:paragraph-properties fo:text-align="center" style:justify-single-word="false" fo:padding="0cm" fo:border="none"/>
      <style:text-properties fo:color="#cc3300" loext:opacity="100%" style:font-name="Calibri" fo:font-size="14pt" fo:language="ca" fo:country="ES" fo:font-weight="bold" officeooo:paragraph-rsid="000e1972" style:font-size-asian="14pt" style:font-weight-asian="bold" style:font-size-complex="14pt" style:font-weight-complex="bold"/>
    </style:style>
    <style:style style:name="P70" style:family="paragraph" style:parent-style-name="Footer">
      <style:paragraph-properties fo:margin-left="-0.123cm" fo:margin-right="0cm" fo:text-indent="0cm" style:auto-text-indent="false"/>
      <style:text-properties style:font-name="Calibri" fo:font-size="11pt" fo:language="ca" fo:country="ES" officeooo:paragraph-rsid="000e1972" style:font-size-asian="11pt" style:font-size-complex="11pt"/>
    </style:style>
    <style:style style:name="P71" style:family="paragraph" style:parent-style-name="Footer">
      <style:text-properties style:font-name="Calibri" fo:font-size="11pt" fo:language="ca" fo:country="ES" officeooo:paragraph-rsid="000e1972" style:font-size-asian="11pt" style:font-size-complex="11pt"/>
    </style:style>
    <style:style style:name="P72" style:family="paragraph" style:parent-style-name="Footer">
      <style:paragraph-properties fo:text-align="end" style:justify-single-word="false"/>
      <style:text-properties style:font-name="Calibri" fo:font-size="11pt" fo:language="ca" fo:country="ES" officeooo:paragraph-rsid="000e1972" style:font-size-asian="11pt" style:font-size-complex="11pt"/>
    </style:style>
    <style:style style:name="P73" style:family="paragraph" style:parent-style-name="Standard">
      <style:text-properties style:font-name="Calibri" fo:language="ca" fo:country="ES" fo:font-weight="bold" officeooo:rsid="003dd30a" officeooo:paragraph-rsid="00b24c63" style:font-weight-asian="bold" style:font-weight-complex="bold"/>
    </style:style>
    <style:style style:name="P74"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0e1972" style:font-weight-asian="bold" style:font-name-complex="Arial Narrow1" style:font-weight-complex="bold"/>
    </style:style>
    <style:style style:name="P75"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0e1972" style:font-weight-asian="bold" style:font-name-complex="Arial Narrow1"/>
    </style:style>
    <style:style style:name="P76" style:family="paragraph" style:parent-style-name="Standard">
      <style:text-properties style:font-name="Calibri" fo:language="ca" fo:country="ES" officeooo:rsid="001ca2a7" officeooo:paragraph-rsid="0064c74a"/>
    </style:style>
    <style:style style:name="P77" style:family="paragraph" style:parent-style-name="Standard">
      <style:text-properties style:font-name="Calibri" fo:language="ca" fo:country="ES" officeooo:rsid="001ca2a7" officeooo:paragraph-rsid="000f0c3e"/>
    </style:style>
    <style:style style:name="P78" style:family="paragraph" style:parent-style-name="Standard">
      <style:text-properties style:font-name="Calibri" fo:language="ca" fo:country="ES" officeooo:paragraph-rsid="00b24c63"/>
    </style:style>
    <style:style style:name="P79" style:family="paragraph" style:parent-style-name="Standard">
      <style:paragraph-properties fo:margin-top="0cm" fo:margin-bottom="0.212cm" style:contextual-spacing="false" fo:text-align="start" style:justify-single-word="false"/>
      <style:text-properties style:font-name="Calibri" fo:language="ca" fo:country="ES" officeooo:paragraph-rsid="000e1972" style:font-name-complex="Arial Narrow1"/>
    </style:style>
    <style:style style:name="P80" style:family="paragraph" style:parent-style-name="Standard">
      <style:paragraph-properties fo:margin-top="0cm" fo:margin-bottom="0.212cm" style:contextual-spacing="false" fo:text-align="start" style:justify-single-word="false"/>
      <style:text-properties style:font-name="Calibri" fo:language="ca" fo:country="ES" officeooo:paragraph-rsid="00ee40b9" style:font-name-complex="Arial Narrow1"/>
    </style:style>
    <style:style style:name="P81" style:family="paragraph" style:parent-style-name="Standard">
      <style:paragraph-properties fo:margin-top="0cm" fo:margin-bottom="0.212cm" style:contextual-spacing="false" fo:text-align="start" style:justify-single-word="false"/>
      <style:text-properties style:font-name="Calibri" fo:language="ca" fo:country="ES" officeooo:rsid="00c911e8" officeooo:paragraph-rsid="00c911e8" style:font-name-complex="Arial Narrow1"/>
    </style:style>
    <style:style style:name="P82" style:family="paragraph" style:parent-style-name="Text_20_body">
      <style:text-properties style:font-name="Calibri" fo:language="ca" fo:country="ES" officeooo:rsid="003dd471" officeooo:paragraph-rsid="00663ddb"/>
    </style:style>
    <style:style style:name="P83" style:family="paragraph" style:parent-style-name="Standard">
      <style:paragraph-properties fo:margin-top="0cm" fo:margin-bottom="0.212cm" style:contextual-spacing="false" fo:text-align="start" style:justify-single-word="false"/>
      <style:text-properties style:font-name="Calibri" fo:font-size="10pt" fo:language="ca" fo:country="ES" officeooo:rsid="00ee40b9" officeooo:paragraph-rsid="00ee40b9" style:font-size-asian="10.5pt" style:font-name-complex="Arial Narrow1"/>
    </style:style>
    <style:style style:name="P84" style:family="paragraph" style:parent-style-name="Standard">
      <style:paragraph-properties fo:text-align="center" style:justify-single-word="false"/>
      <style:text-properties fo:color="#ff7f00" loext:opacity="100%" style:font-name="Calibri1" fo:language="ca" fo:country="ES" fo:font-weight="bold" officeooo:rsid="000f0c3e" officeooo:paragraph-rsid="000f0c3e" style:font-weight-asian="bold" style:font-weight-complex="bold"/>
    </style:style>
    <style:style style:name="P85" style:family="paragraph" style:parent-style-name="Standard">
      <style:text-properties officeooo:paragraph-rsid="0064c74a"/>
    </style:style>
    <style:style style:name="P86" style:family="paragraph" style:parent-style-name="Standard">
      <style:text-properties style:font-name="Calibri1" officeooo:paragraph-rsid="0064c74a"/>
    </style:style>
    <style:style style:name="P87" style:family="paragraph" style:parent-style-name="Standard">
      <style:text-properties style:font-name="Calibri1" officeooo:rsid="00673e05" officeooo:paragraph-rsid="00673e05"/>
    </style:style>
    <style:style style:name="P88" style:family="paragraph" style:parent-style-name="Standard">
      <style:text-properties style:font-name="Calibri1" fo:language="ca" fo:country="ES" officeooo:rsid="00673e05" officeooo:paragraph-rsid="000f0c3e"/>
    </style:style>
    <style:style style:name="P89" style:family="paragraph" style:parent-style-name="Standard">
      <style:paragraph-properties fo:break-before="page"/>
      <style:text-properties style:font-name="Calibri1" fo:language="ca" fo:country="ES" officeooo:rsid="00673e05" officeooo:paragraph-rsid="000f0c3e"/>
    </style:style>
    <style:style style:name="P90" style:family="paragraph" style:parent-style-name="Standard">
      <style:text-properties officeooo:rsid="008392d7" officeooo:paragraph-rsid="008392d7"/>
    </style:style>
    <style:style style:name="P91" style:family="paragraph" style:parent-style-name="Standard">
      <style:text-properties fo:font-size="10pt" fo:language="ca" fo:country="ES" fo:font-style="normal" officeooo:rsid="0064c74a" officeooo:paragraph-rsid="0064c74a" style:font-size-asian="10.5pt" style:font-style-asian="normal" style:font-style-complex="normal"/>
    </style:style>
    <style:style style:name="P92" style:family="paragraph" style:parent-style-name="Standard">
      <style:text-properties officeooo:paragraph-rsid="00d2b6ff"/>
    </style:style>
    <style:style style:name="P93" style:family="paragraph" style:parent-style-name="Text_20_body">
      <style:text-properties officeooo:paragraph-rsid="00d2b6ff"/>
    </style:style>
    <style:style style:name="P94" style:family="paragraph" style:parent-style-name="Standard">
      <style:text-properties officeooo:paragraph-rsid="00d55c27"/>
    </style:style>
    <style:style style:name="P95" style:family="paragraph" style:parent-style-name="Text_20_body">
      <style:text-properties officeooo:paragraph-rsid="00d55c27"/>
    </style:style>
    <style:style style:name="P96" style:family="paragraph" style:parent-style-name="Standard">
      <style:paragraph-properties fo:margin-top="0cm" fo:margin-bottom="0.212cm" style:contextual-spacing="false" fo:text-align="start" style:justify-single-word="false"/>
      <style:text-properties style:font-name="Arial Narrow" fo:language="ca" fo:country="ES" officeooo:paragraph-rsid="000e1972" style:font-name-complex="Arial Narrow1"/>
    </style:style>
    <style:style style:name="P97" style:family="paragraph" style:parent-style-name="Standard">
      <style:paragraph-properties fo:margin-top="0cm" fo:margin-bottom="0.212cm" style:contextual-spacing="false" fo:text-align="start" style:justify-single-word="false"/>
      <style:text-properties fo:color="#ffffff" loext:opacity="100%" style:font-name="Calibri" fo:language="ca" fo:country="ES" officeooo:paragraph-rsid="000e1972" style:font-name-complex="Arial Narrow1"/>
    </style:style>
    <style:style style:name="P98" style:family="paragraph" style:parent-style-name="western">
      <style:paragraph-properties fo:text-align="end" style:justify-single-word="false"/>
      <style:text-properties fo:color="#f3901d" loext:opacity="100%" style:font-name="Georgia" fo:font-size="28pt" fo:language="ca" fo:country="ES" fo:font-weight="bold" officeooo:paragraph-rsid="000e1972" style:font-size-asian="28pt" style:font-weight-asian="bold" style:font-name-complex="Times New Roman" style:font-size-complex="28pt" style:font-weight-complex="bold"/>
    </style:style>
    <style:style style:name="P99" style:family="paragraph" style:parent-style-name="western">
      <style:paragraph-properties fo:text-align="end" style:justify-single-word="false"/>
      <style:text-properties fo:color="#007dc3" loext:opacity="100%" fo:font-size="12pt" fo:language="ca" fo:country="ES" officeooo:paragraph-rsid="000e1972" style:font-size-asian="12pt" style:font-name-complex="Times New Roman" style:font-size-complex="12pt"/>
    </style:style>
    <style:style style:name="P100" style:family="paragraph" style:parent-style-name="western">
      <style:text-properties fo:color="#007dc3" loext:opacity="100%" fo:font-size="12pt" fo:language="ca" fo:country="ES" officeooo:paragraph-rsid="000e1972" style:font-size-asian="12pt" style:font-name-complex="Times New Roman" style:font-size-complex="12pt"/>
    </style:style>
    <style:style style:name="P101" style:family="paragraph" style:parent-style-name="western">
      <style:paragraph-properties fo:text-align="end" style:justify-single-word="false"/>
      <style:text-properties fo:color="#007dc3" loext:opacity="100%" fo:font-size="14pt" fo:language="ca" fo:country="ES" fo:font-weight="bold" officeooo:paragraph-rsid="000e1972" style:font-size-asian="14pt" style:font-weight-asian="bold" style:font-name-complex="Times New Roman" style:font-size-complex="12pt"/>
    </style:style>
    <style:style style:name="P102" style:family="paragraph" style:parent-style-name="western">
      <style:paragraph-properties fo:text-align="end" style:justify-single-word="false"/>
      <style:text-properties fo:color="#007dc3" loext:opacity="100%" fo:font-size="14pt" fo:language="ca" fo:country="ES" officeooo:paragraph-rsid="000e1972" style:font-size-asian="14pt" style:font-name-complex="Times New Roman" style:font-size-complex="12pt"/>
    </style:style>
    <style:style style:name="P103" style:family="paragraph" style:parent-style-name="western">
      <style:paragraph-properties fo:text-align="end" style:justify-single-word="false"/>
      <style:text-properties officeooo:paragraph-rsid="000e1972"/>
    </style:style>
    <style:style style:name="P104" style:family="paragraph" style:parent-style-name="Text_20_body">
      <style:text-properties officeooo:paragraph-rsid="008d1405"/>
    </style:style>
    <style:style style:name="P105" style:family="paragraph" style:parent-style-name="Text_20_body">
      <style:text-properties fo:font-weight="bold" officeooo:rsid="00970b99" officeooo:paragraph-rsid="00970b99" style:font-weight-asian="bold" style:font-weight-complex="bold"/>
    </style:style>
    <style:style style:name="P106" style:family="paragraph" style:parent-style-name="Text_20_body">
      <style:text-properties fo:font-weight="bold" officeooo:paragraph-rsid="00d3e721" style:font-weight-asian="bold" style:font-weight-complex="bold"/>
    </style:style>
    <style:style style:name="P107" style:family="paragraph" style:parent-style-name="Text_20_body">
      <style:text-properties fo:font-weight="normal" officeooo:rsid="00970b99" officeooo:paragraph-rsid="00970b99" style:font-weight-asian="normal" style:font-weight-complex="normal"/>
    </style:style>
    <style:style style:name="P108" style:family="paragraph" style:parent-style-name="Text_20_body">
      <style:text-properties officeooo:paragraph-rsid="008cd1d3"/>
    </style:style>
    <style:style style:name="P109" style:family="paragraph" style:parent-style-name="Text_20_body">
      <style:text-properties officeooo:rsid="008d1405" officeooo:paragraph-rsid="008d1405"/>
    </style:style>
    <style:style style:name="P110" style:family="paragraph" style:parent-style-name="Text_20_body">
      <style:text-properties officeooo:rsid="0091cc3b" officeooo:paragraph-rsid="0091cc3b"/>
    </style:style>
    <style:style style:name="P111" style:family="paragraph" style:parent-style-name="Text_20_body">
      <style:text-properties officeooo:paragraph-rsid="0019fa0c"/>
    </style:style>
    <style:style style:name="P112" style:family="paragraph" style:parent-style-name="Text_20_body">
      <style:text-properties officeooo:rsid="0091f042" officeooo:paragraph-rsid="0091f042"/>
    </style:style>
    <style:style style:name="P113" style:family="paragraph" style:parent-style-name="Text_20_body">
      <style:text-properties officeooo:paragraph-rsid="001a1fdd"/>
    </style:style>
    <style:style style:name="P114" style:family="paragraph" style:parent-style-name="Text_20_body">
      <style:text-properties officeooo:rsid="00970b99" officeooo:paragraph-rsid="00970b99"/>
    </style:style>
    <style:style style:name="P115" style:family="paragraph" style:parent-style-name="Text_20_body">
      <style:text-properties officeooo:rsid="00970b99" officeooo:paragraph-rsid="00d6b4ca"/>
    </style:style>
    <style:style style:name="P116" style:family="paragraph" style:parent-style-name="Text_20_body">
      <style:text-properties officeooo:rsid="00996805" officeooo:paragraph-rsid="00996805"/>
    </style:style>
    <style:style style:name="P117" style:family="paragraph" style:parent-style-name="Text_20_body">
      <style:text-properties style:font-name="Calibri4" fo:font-size="10pt" fo:language="ca" fo:country="ES" officeooo:rsid="008cd1d3" officeooo:paragraph-rsid="008cd1d3" style:font-size-asian="10.5pt"/>
    </style:style>
    <style:style style:name="P118" style:family="paragraph" style:parent-style-name="Text_20_body">
      <style:text-properties style:font-name="Calibri4" fo:font-size="10pt" fo:language="ca" fo:country="ES" fo:font-weight="normal" officeooo:rsid="009aa1a8" officeooo:paragraph-rsid="00d321d5" style:font-size-asian="10.5pt" style:font-weight-asian="normal" style:font-weight-complex="normal"/>
    </style:style>
    <style:style style:name="P119" style:family="paragraph" style:parent-style-name="Text_20_body">
      <style:text-properties officeooo:rsid="009ca0f5" officeooo:paragraph-rsid="009ca0f5"/>
    </style:style>
    <style:style style:name="P120" style:family="paragraph" style:parent-style-name="Text_20_body">
      <style:text-properties officeooo:paragraph-rsid="00996805"/>
    </style:style>
    <style:style style:name="P121" style:family="paragraph" style:parent-style-name="Text_20_body">
      <style:text-properties officeooo:paragraph-rsid="00ade611"/>
    </style:style>
    <style:style style:name="P122" style:family="paragraph" style:parent-style-name="Text_20_body">
      <style:text-properties officeooo:rsid="00ade611" officeooo:paragraph-rsid="00ade611"/>
    </style:style>
    <style:style style:name="P123" style:family="paragraph" style:parent-style-name="Text_20_body">
      <style:text-properties officeooo:paragraph-rsid="00663ddb"/>
    </style:style>
    <style:style style:name="P124" style:family="paragraph" style:parent-style-name="Text_20_body">
      <style:text-properties officeooo:paragraph-rsid="00d321d5"/>
    </style:style>
    <style:style style:name="P125" style:family="paragraph" style:parent-style-name="Text_20_body">
      <style:text-properties officeooo:paragraph-rsid="00d35ad5"/>
    </style:style>
    <style:style style:name="P126" style:family="paragraph" style:parent-style-name="Text_20_body">
      <style:text-properties officeooo:paragraph-rsid="00d3e721"/>
    </style:style>
    <style:style style:name="P127" style:family="paragraph" style:parent-style-name="Text_20_body">
      <style:text-properties officeooo:paragraph-rsid="00d6b4ca"/>
    </style:style>
    <style:style style:name="P128" style:family="paragraph" style:parent-style-name="fig.">
      <style:text-properties officeooo:paragraph-rsid="009d1c93"/>
    </style:style>
    <style:style style:name="P129" style:family="paragraph" style:parent-style-name="Text_20_body">
      <style:paragraph-properties fo:margin-left="0.635cm" fo:margin-right="0cm" fo:text-indent="0cm" style:auto-text-indent="false">
        <style:tab-stops/>
      </style:paragraph-properties>
      <style:text-properties officeooo:paragraph-rsid="00d6b4ca"/>
    </style:style>
    <style:style style:name="P130" style:family="paragraph" style:parent-style-name="Text_20_body">
      <style:paragraph-properties fo:margin-left="1.905cm" fo:margin-right="0cm" fo:text-indent="0cm" style:auto-text-indent="false">
        <style:tab-stops/>
      </style:paragraph-properties>
      <style:text-properties officeooo:paragraph-rsid="00d55c27"/>
    </style:style>
    <style:style style:name="P131" style:family="paragraph" style:parent-style-name="Contents_20_1">
      <style:paragraph-properties>
        <style:tab-stops>
          <style:tab-stop style:position="17cm" style:type="right" style:leader-style="dotted" style:leader-text="."/>
        </style:tab-stops>
      </style:paragraph-properties>
    </style:style>
    <style:style style:name="P132" style:family="paragraph" style:parent-style-name="Contents_20_3">
      <style:paragraph-properties>
        <style:tab-stops>
          <style:tab-stop style:position="17cm" style:type="right" style:leader-style="dotted" style:leader-text="."/>
        </style:tab-stops>
      </style:paragraph-properties>
    </style:style>
    <style:style style:name="P133" style:family="paragraph" style:parent-style-name="Contents_20_4">
      <style:paragraph-properties>
        <style:tab-stops>
          <style:tab-stop style:position="17cm" style:type="right" style:leader-style="dotted" style:leader-text="."/>
        </style:tab-stops>
      </style:paragraph-properties>
    </style:style>
    <style:style style:name="P134" style:family="paragraph" style:parent-style-name="Contents_20_5">
      <style:paragraph-properties>
        <style:tab-stops>
          <style:tab-stop style:position="17cm" style:type="right" style:leader-style="dotted" style:leader-text="."/>
        </style:tab-stops>
      </style:paragraph-properties>
    </style:style>
    <style:style style:name="P135" style:family="paragraph" style:parent-style-name="Standard">
      <style:text-properties officeooo:paragraph-rsid="000f0c3e"/>
    </style:style>
    <style:style style:name="P136" style:family="paragraph" style:parent-style-name="Standard">
      <style:paragraph-properties fo:break-before="page"/>
    </style:style>
    <style:style style:name="P137" style:family="paragraph" style:parent-style-name="Text_20_body">
      <style:text-properties officeooo:paragraph-rsid="00eac735"/>
    </style:style>
    <style:style style:name="P138" style:family="paragraph" style:parent-style-name="Text_20_body">
      <style:text-properties officeooo:paragraph-rsid="00ecb670"/>
    </style:style>
    <style:style style:name="P139" style:family="paragraph" style:parent-style-name="Contents_20_1">
      <style:paragraph-properties>
        <style:tab-stops>
          <style:tab-stop style:position="17cm" style:type="right" style:leader-style="dotted" style:leader-text="."/>
        </style:tab-stops>
      </style:paragraph-properties>
    </style:style>
    <style:style style:name="P140" style:family="paragraph" style:parent-style-name="Contents_20_2">
      <style:paragraph-properties>
        <style:tab-stops>
          <style:tab-stop style:position="17cm" style:type="right" style:leader-style="dotted" style:leader-text="."/>
        </style:tab-stops>
      </style:paragraph-properties>
    </style:style>
    <style:style style:name="P141" style:family="paragraph" style:parent-style-name="Contents_20_3">
      <style:paragraph-properties>
        <style:tab-stops>
          <style:tab-stop style:position="17cm" style:type="right" style:leader-style="dotted" style:leader-text="."/>
        </style:tab-stops>
      </style:paragraph-properties>
    </style:style>
    <style:style style:name="P142" style:family="paragraph" style:parent-style-name="Contents_20_4">
      <style:paragraph-properties>
        <style:tab-stops>
          <style:tab-stop style:position="17cm" style:type="right" style:leader-style="dotted" style:leader-text="."/>
        </style:tab-stops>
      </style:paragraph-properties>
    </style:style>
    <style:style style:name="P143" style:family="paragraph" style:parent-style-name="Contents_20_5">
      <style:paragraph-properties>
        <style:tab-stops>
          <style:tab-stop style:position="17cm" style:type="right" style:leader-style="dotted" style:leader-text="."/>
        </style:tab-stops>
      </style:paragraph-properties>
    </style:style>
    <style:style style:name="P144" style:family="paragraph" style:parent-style-name="Heading_20_1" style:master-page-name="Converted2">
      <style:paragraph-properties fo:text-align="center" style:justify-single-word="false" style:page-number="auto"/>
      <style:text-properties fo:language="ca" fo:country="ES" officeooo:paragraph-rsid="000e1972"/>
    </style:style>
    <style:style style:name="P145" style:family="paragraph" style:parent-style-name="Heading_20_1">
      <style:text-properties officeooo:paragraph-rsid="00663ddb"/>
    </style:style>
    <style:style style:name="P146" style:family="paragraph" style:parent-style-name="List_20_Paragraph" style:list-style-name="WWNum3">
      <style:text-properties officeooo:paragraph-rsid="00ee5c8c"/>
    </style:style>
    <style:style style:name="P147" style:family="paragraph" style:parent-style-name="List_20_Paragraph" style:list-style-name="WWNum3">
      <style:text-properties officeooo:rsid="0077d900" officeooo:paragraph-rsid="00ee5c8c"/>
    </style:style>
    <style:style style:name="P148" style:family="paragraph" style:parent-style-name="List_20_Paragraph" style:list-style-name="WWNum3">
      <style:text-properties fo:font-weight="bold" officeooo:rsid="0077d900" officeooo:paragraph-rsid="00ee5c8c" style:font-weight-asian="bold" style:font-weight-complex="bold"/>
    </style:style>
    <style:style style:name="P149" style:family="paragraph" style:parent-style-name="List_20_Paragraph" style:list-style-name="WWNum3">
      <style:text-properties fo:font-weight="bold" officeooo:rsid="00ef392c" officeooo:paragraph-rsid="00ee5c8c" style:font-weight-asian="bold" style:font-weight-complex="bold"/>
    </style:style>
    <style:style style:name="P150" style:family="paragraph" style:parent-style-name="List_20_Paragraph" style:list-style-name="WWNum3">
      <style:text-properties officeooo:rsid="00b24c63" officeooo:paragraph-rsid="00ee5c8c"/>
    </style:style>
    <style:style style:name="P151" style:family="paragraph" style:parent-style-name="List_20_Paragraph" style:list-style-name="WWNum3">
      <style:text-properties style:font-name="Calibri" fo:language="ca" fo:country="ES" fo:font-weight="normal" officeooo:rsid="00484b61" officeooo:paragraph-rsid="00ee5c8c" style:font-weight-asian="normal" style:font-weight-complex="normal"/>
    </style:style>
    <style:style style:name="P152" style:family="paragraph" style:parent-style-name="List_20_Paragraph" style:list-style-name="WWNum3">
      <style:text-properties style:font-name="Calibri" fo:language="ca" fo:country="ES" fo:font-weight="normal" officeooo:rsid="0077d900" officeooo:paragraph-rsid="00ee5c8c" style:font-weight-asian="normal" style:font-weight-complex="normal"/>
    </style:style>
    <style:style style:name="P153" style:family="paragraph" style:parent-style-name="List_20_Paragraph" style:list-style-name="WWNum3">
      <style:text-properties style:font-name="Calibri" fo:language="ca" fo:country="ES" fo:font-weight="normal" officeooo:rsid="00780e29" officeooo:paragraph-rsid="00ee5c8c" style:font-weight-asian="normal" style:font-weight-complex="normal"/>
    </style:style>
    <style:style style:name="P154" style:family="paragraph" style:parent-style-name="List_20_Paragraph" style:list-style-name="WWNum3">
      <style:text-properties style:font-name="Calibri" fo:language="ca" fo:country="ES" fo:font-weight="bold" officeooo:rsid="00b24c63" officeooo:paragraph-rsid="00ee5c8c" style:font-weight-asian="bold" style:font-weight-complex="bold"/>
    </style:style>
    <style:style style:name="P155" style:family="paragraph" style:parent-style-name="List_20_Paragraph" style:list-style-name="WWNum3">
      <style:text-properties officeooo:rsid="00ee5c8c" officeooo:paragraph-rsid="00ee5c8c"/>
    </style:style>
    <style:style style:name="P156" style:family="paragraph" style:parent-style-name="List_20_Paragraph" style:list-style-name="WWNum3">
      <style:text-properties officeooo:rsid="00ef392c" officeooo:paragraph-rsid="00ee5c8c"/>
    </style:style>
    <style:style style:name="P157" style:family="paragraph" style:parent-style-name="Standard" style:master-page-name="Standard">
      <style:paragraph-properties fo:text-align="center" style:justify-single-word="false" style:page-number="auto"/>
      <style:text-properties fo:language="ca" fo:country="ES" officeooo:paragraph-rsid="000e1972"/>
    </style:style>
    <style:style style:name="P158" style:family="paragraph" style:parent-style-name="Standard" style:list-style-name="L1">
      <style:text-properties officeooo:rsid="008392d7" officeooo:paragraph-rsid="008392d7"/>
    </style:style>
    <style:style style:name="P159" style:family="paragraph" style:parent-style-name="Standard" style:list-style-name="L20">
      <style:text-properties fo:font-style="italic" officeooo:rsid="000754cc" officeooo:paragraph-rsid="00d3e721" style:font-style-asian="italic" style:font-style-complex="italic"/>
    </style:style>
    <style:style style:name="P160" style:family="paragraph" style:parent-style-name="Standard">
      <style:paragraph-properties fo:margin-top="0cm" fo:margin-bottom="0.212cm" style:contextual-spacing="false" fo:text-align="start" style:justify-single-word="false"/>
      <style:text-properties style:font-name="Calibri" fo:font-size="10pt" fo:language="ca" fo:country="ES" officeooo:rsid="00f10c3d" officeooo:paragraph-rsid="00f10c3d" style:font-size-asian="10.5pt" style:font-name-complex="Arial Narrow1"/>
    </style:style>
    <style:style style:name="P161" style:family="paragraph" style:parent-style-name="Standard">
      <style:paragraph-properties fo:margin-top="0cm" fo:margin-bottom="0.212cm" style:contextual-spacing="false" fo:text-align="start" style:justify-single-word="false"/>
      <style:text-properties style:font-name="Calibri" fo:language="ca" fo:country="ES" officeooo:paragraph-rsid="00f10c3d" style:font-name-complex="Arial Narrow1"/>
    </style:style>
    <style:style style:name="P162" style:family="paragraph" style:parent-style-name="Standard">
      <style:paragraph-properties fo:margin-top="0cm" fo:margin-bottom="0.212cm" style:contextual-spacing="false" fo:text-align="start" style:justify-single-word="false"/>
      <style:text-properties style:font-name="Calibri" fo:language="ca" fo:country="ES" officeooo:rsid="00f10c3d" officeooo:paragraph-rsid="00f10c3d" style:font-name-complex="Arial Narrow1"/>
    </style:style>
    <style:style style:name="P163" style:family="paragraph" style:parent-style-name="Text_20_body" style:list-style-name="L2">
      <style:text-properties fo:language="ca" fo:country="ES" fo:font-weight="bold" officeooo:rsid="0024a62d" officeooo:paragraph-rsid="00663ddb" style:font-weight-asian="bold" style:font-weight-complex="bold"/>
    </style:style>
    <style:style style:name="P164" style:family="paragraph" style:parent-style-name="Text_20_body" style:list-style-name="L3">
      <style:text-properties fo:language="ca" fo:country="ES" fo:font-weight="bold" officeooo:rsid="0048df05" officeooo:paragraph-rsid="00663ddb" style:font-weight-asian="bold" style:font-weight-complex="bold"/>
    </style:style>
    <style:style style:name="P165" style:family="paragraph" style:parent-style-name="Text_20_body" style:list-style-name="L4">
      <style:text-properties fo:language="ca" fo:country="ES" fo:font-weight="bold" officeooo:rsid="001b1053" officeooo:paragraph-rsid="00663ddb" style:font-weight-asian="bold" style:font-weight-complex="bold"/>
    </style:style>
    <style:style style:name="P166" style:family="paragraph" style:parent-style-name="Text_20_body" style:list-style-name="L4">
      <style:text-properties fo:language="ca" fo:country="ES" fo:font-weight="bold" officeooo:rsid="001b1053" officeooo:paragraph-rsid="00ee40b9" style:font-weight-asian="bold" style:font-weight-complex="bold"/>
    </style:style>
    <style:style style:name="P167" style:family="paragraph" style:parent-style-name="Text_20_body" style:list-style-name="L26">
      <style:text-properties fo:language="ca" fo:country="ES" fo:font-weight="bold" officeooo:rsid="001b1053" officeooo:paragraph-rsid="001b1053" style:font-weight-asian="bold" style:font-weight-complex="bold"/>
    </style:style>
    <style:style style:name="P168" style:family="paragraph" style:parent-style-name="Text_20_body" style:list-style-name="L4">
      <style:text-properties fo:language="ca" fo:country="ES" fo:font-weight="bold" officeooo:rsid="001b5cf5" officeooo:paragraph-rsid="00663ddb" style:font-weight-asian="bold" style:font-weight-complex="bold"/>
    </style:style>
    <style:style style:name="P169" style:family="paragraph" style:parent-style-name="Text_20_body" style:list-style-name="L5">
      <style:text-properties fo:language="ca" fo:country="ES" fo:font-weight="bold" officeooo:rsid="001b5cf5" officeooo:paragraph-rsid="00663ddb" style:font-weight-asian="bold" style:font-weight-complex="bold"/>
    </style:style>
    <style:style style:name="P170" style:family="paragraph" style:parent-style-name="Text_20_body" style:list-style-name="L26">
      <style:text-properties fo:language="ca" fo:country="ES" fo:font-weight="bold" officeooo:rsid="001b5cf5" officeooo:paragraph-rsid="001b5cf5" style:font-weight-asian="bold" style:font-weight-complex="bold"/>
    </style:style>
    <style:style style:name="P171" style:family="paragraph" style:parent-style-name="Text_20_body" style:list-style-name="L27">
      <style:text-properties fo:language="ca" fo:country="ES" fo:font-weight="bold" officeooo:rsid="001b5cf5" officeooo:paragraph-rsid="001b5cf5" style:font-weight-asian="bold" style:font-weight-complex="bold"/>
    </style:style>
    <style:style style:name="P172" style:family="paragraph" style:parent-style-name="Text_20_body" style:list-style-name="L28">
      <style:text-properties fo:language="ca" fo:country="ES" fo:font-weight="bold" officeooo:rsid="001b5cf5" officeooo:paragraph-rsid="001f540c" style:font-weight-asian="bold" style:font-weight-complex="bold"/>
    </style:style>
    <style:style style:name="P173" style:family="paragraph" style:parent-style-name="Text_20_body" style:list-style-name="L6">
      <style:text-properties fo:language="ca" fo:country="ES" fo:font-weight="bold" officeooo:rsid="0029d734" officeooo:paragraph-rsid="008d1405" style:font-weight-asian="bold" style:font-weight-complex="bold"/>
    </style:style>
    <style:style style:name="P174" style:family="paragraph" style:parent-style-name="Text_20_body" style:list-style-name="L8">
      <style:text-properties fo:language="ca" fo:country="ES" fo:font-weight="bold" officeooo:rsid="002749e4" officeooo:paragraph-rsid="00663ddb" style:font-weight-asian="bold" style:font-weight-complex="bold"/>
    </style:style>
    <style:style style:name="P175" style:family="paragraph" style:parent-style-name="Text_20_body" style:list-style-name="L9">
      <style:text-properties fo:language="ca" fo:country="ES" fo:font-weight="bold" officeooo:rsid="00290227" officeooo:paragraph-rsid="00663ddb" style:font-weight-asian="bold" style:font-weight-complex="bold"/>
    </style:style>
    <style:style style:name="P176" style:family="paragraph" style:parent-style-name="Text_20_body" style:list-style-name="L10">
      <style:text-properties fo:language="ca" fo:country="ES" fo:font-weight="bold" officeooo:rsid="00302d7f" officeooo:paragraph-rsid="00663ddb" style:font-weight-asian="bold" style:font-weight-complex="bold"/>
    </style:style>
    <style:style style:name="P177" style:family="paragraph" style:parent-style-name="Text_20_body" style:list-style-name="L10">
      <style:text-properties fo:language="ca" fo:country="ES" fo:font-weight="bold" officeooo:rsid="00302d7f" officeooo:paragraph-rsid="009aa1a8" style:font-weight-asian="bold" style:font-weight-complex="bold"/>
    </style:style>
    <style:style style:name="P178" style:family="paragraph" style:parent-style-name="Text_20_body" style:list-style-name="L11">
      <style:paragraph-properties fo:margin-left="1.905cm" fo:margin-right="0cm" fo:text-indent="0cm" style:auto-text-indent="false">
        <style:tab-stops/>
      </style:paragraph-properties>
      <style:text-properties fo:language="ca" fo:country="ES" fo:font-weight="bold" officeooo:rsid="00551f02" officeooo:paragraph-rsid="00d321d5" style:font-weight-asian="bold" style:font-weight-complex="bold"/>
    </style:style>
    <style:style style:name="P179" style:family="paragraph" style:parent-style-name="Text_20_body" style:list-style-name="L15">
      <style:text-properties fo:language="ca" fo:country="ES" fo:font-weight="bold" officeooo:rsid="00398d41" officeooo:paragraph-rsid="00663ddb" style:font-weight-asian="bold" style:font-weight-complex="bold"/>
    </style:style>
    <style:style style:name="P180" style:family="paragraph" style:parent-style-name="Text_20_body" style:list-style-name="L18">
      <style:text-properties fo:language="ca" fo:country="ES" fo:font-weight="bold" officeooo:rsid="003f51e9" officeooo:paragraph-rsid="00663ddb" style:font-weight-asian="bold" style:font-weight-complex="bold"/>
    </style:style>
    <style:style style:name="P181" style:family="paragraph" style:parent-style-name="Text_20_body" style:list-style-name="L19">
      <style:text-properties fo:language="ca" fo:country="ES" fo:font-weight="bold" officeooo:rsid="00d35d62" officeooo:paragraph-rsid="00d35d62" style:font-weight-asian="bold" style:font-weight-complex="bold"/>
    </style:style>
    <style:style style:name="P182" style:family="paragraph" style:parent-style-name="Text_20_body" style:list-style-name="L19">
      <style:text-properties fo:language="ca" fo:country="ES" fo:font-weight="bold" officeooo:rsid="0040f69f" officeooo:paragraph-rsid="00663ddb" style:font-weight-asian="bold" style:font-weight-complex="bold"/>
    </style:style>
    <style:style style:name="P183" style:family="paragraph" style:parent-style-name="Text_20_body" style:list-style-name="L20">
      <style:text-properties fo:language="ca" fo:country="ES" fo:font-weight="bold" officeooo:rsid="0040f69f" officeooo:paragraph-rsid="00663ddb" style:font-weight-asian="bold" style:font-weight-complex="bold"/>
    </style:style>
    <style:style style:name="P184" style:family="paragraph" style:parent-style-name="Text_20_body" style:list-style-name="L20">
      <style:text-properties fo:language="ca" fo:country="ES" fo:font-weight="bold" officeooo:rsid="0040f69f" officeooo:paragraph-rsid="00d3e721" style:font-weight-asian="bold" style:font-weight-complex="bold"/>
    </style:style>
    <style:style style:name="P185" style:family="paragraph" style:parent-style-name="Text_20_body" style:list-style-name="L20">
      <style:text-properties fo:language="ca" fo:country="ES" fo:font-weight="bold" officeooo:rsid="0042a686" officeooo:paragraph-rsid="00663ddb" style:font-weight-asian="bold" style:font-weight-complex="bold"/>
    </style:style>
    <style:style style:name="P186" style:family="paragraph" style:parent-style-name="Text_20_body" style:list-style-name="L24">
      <style:text-properties fo:language="ca" fo:country="ES" fo:font-weight="bold" officeooo:rsid="001a1fdd" officeooo:paragraph-rsid="00d5e511" style:font-weight-asian="bold" style:font-weight-complex="bold"/>
    </style:style>
    <style:style style:name="P187" style:family="paragraph" style:parent-style-name="Text_20_body" style:list-style-name="L25">
      <style:text-properties fo:language="ca" fo:country="ES" fo:font-weight="bold" officeooo:rsid="001a1fdd" officeooo:paragraph-rsid="00d5e511" style:font-weight-asian="bold" style:font-weight-complex="bold"/>
    </style:style>
    <style:style style:name="P188" style:family="paragraph" style:parent-style-name="Text_20_body" style:list-style-name="L25">
      <style:text-properties fo:language="ca" fo:country="ES" fo:font-weight="bold" officeooo:rsid="0091f042" officeooo:paragraph-rsid="00d5e511" style:font-weight-asian="bold" style:font-weight-complex="bold"/>
    </style:style>
    <style:style style:name="P189" style:family="paragraph" style:parent-style-name="Text_20_body" style:list-style-name="L28">
      <style:text-properties fo:language="ca" fo:country="ES" fo:font-weight="bold" officeooo:rsid="001f540c" officeooo:paragraph-rsid="001f540c" style:font-weight-asian="bold" style:font-weight-complex="bold"/>
    </style:style>
    <style:style style:name="P190" style:family="paragraph" style:parent-style-name="Text_20_body" style:list-style-name="L29">
      <style:text-properties fo:language="ca" fo:country="ES" fo:font-weight="bold" officeooo:rsid="001f540c" officeooo:paragraph-rsid="001f540c" style:font-weight-asian="bold" style:font-weight-complex="bold"/>
    </style:style>
    <style:style style:name="P191" style:family="paragraph" style:parent-style-name="Text_20_body" style:list-style-name="L29">
      <style:text-properties fo:language="ca" fo:country="ES" fo:font-weight="bold" officeooo:rsid="0095470e" officeooo:paragraph-rsid="0095470e" style:font-weight-asian="bold" style:font-weight-complex="bold"/>
    </style:style>
    <style:style style:name="P192" style:family="paragraph" style:parent-style-name="Text_20_body" style:list-style-name="L29">
      <style:text-properties fo:language="ca" fo:country="ES" fo:font-weight="bold" officeooo:rsid="0095470e" officeooo:paragraph-rsid="00d5e511" style:font-weight-asian="bold" style:font-weight-complex="bold"/>
    </style:style>
    <style:style style:name="P193" style:family="paragraph" style:parent-style-name="Text_20_body" style:list-style-name="L30">
      <style:text-properties fo:language="ca" fo:country="ES" fo:font-weight="bold" officeooo:rsid="001fc3e5" officeooo:paragraph-rsid="00d5e511" style:font-weight-asian="bold" style:font-weight-complex="bold"/>
    </style:style>
    <style:style style:name="P194" style:family="paragraph" style:parent-style-name="Text_20_body" style:list-style-name="L31">
      <style:text-properties fo:language="ca" fo:country="ES" fo:font-weight="bold" officeooo:rsid="001fc3e5" officeooo:paragraph-rsid="001fc3e5" style:font-weight-asian="bold" style:font-weight-complex="bold"/>
    </style:style>
    <style:style style:name="P195" style:family="paragraph" style:parent-style-name="Text_20_body" style:list-style-name="L31">
      <style:text-properties fo:language="ca" fo:country="ES" fo:font-weight="bold" officeooo:rsid="00207651" officeooo:paragraph-rsid="00207651" style:font-weight-asian="bold" style:font-weight-complex="bold"/>
    </style:style>
    <style:style style:name="P196" style:family="paragraph" style:parent-style-name="Text_20_body" style:list-style-name="L32">
      <style:text-properties fo:language="ca" fo:country="ES" fo:font-weight="bold" officeooo:rsid="002119a2" officeooo:paragraph-rsid="002119a2" style:font-weight-asian="bold" style:font-weight-complex="bold"/>
    </style:style>
    <style:style style:name="P197" style:family="paragraph" style:parent-style-name="Text_20_body" style:list-style-name="L7">
      <style:text-properties fo:language="ca" fo:country="ES" officeooo:paragraph-rsid="00663ddb"/>
    </style:style>
    <style:style style:name="P198" style:family="paragraph" style:parent-style-name="Text_20_body" style:list-style-name="L8">
      <style:text-properties fo:language="ca" fo:country="ES" officeooo:paragraph-rsid="00663ddb"/>
    </style:style>
    <style:style style:name="P199" style:family="paragraph" style:parent-style-name="Text_20_body" style:list-style-name="L10">
      <style:text-properties fo:language="ca" fo:country="ES" fo:font-weight="normal" officeooo:rsid="0030bbb5" officeooo:paragraph-rsid="00d321d5" style:font-weight-asian="normal" style:font-weight-complex="normal"/>
    </style:style>
    <style:style style:name="P200" style:family="paragraph" style:parent-style-name="Text_20_body" style:list-style-name="L12">
      <style:text-properties fo:language="ca" fo:country="ES" fo:font-weight="normal" officeooo:rsid="00be4301" officeooo:paragraph-rsid="00ecb670" style:font-weight-asian="normal" style:font-weight-complex="normal"/>
    </style:style>
    <style:style style:name="P201" style:family="paragraph" style:parent-style-name="Text_20_body" style:list-style-name="L29">
      <style:text-properties fo:language="ca" fo:country="ES" fo:font-weight="normal" officeooo:rsid="00acd915" officeooo:paragraph-rsid="00d5e511" style:font-weight-asian="normal" style:font-weight-complex="normal"/>
    </style:style>
    <style:style style:name="P202" style:family="paragraph" style:parent-style-name="Text_20_body" style:list-style-name="L14">
      <style:text-properties fo:language="ca" fo:country="ES" officeooo:rsid="00180ee2" officeooo:paragraph-rsid="00663ddb"/>
    </style:style>
    <style:style style:name="P203" style:family="paragraph" style:parent-style-name="Text_20_body" style:list-style-name="L15">
      <style:text-properties fo:language="ca" fo:country="ES" officeooo:paragraph-rsid="00663ddb"/>
    </style:style>
    <style:style style:name="P204" style:family="paragraph" style:parent-style-name="Text_20_body" style:list-style-name="L15">
      <style:text-properties fo:language="ca" fo:country="ES" officeooo:rsid="00398d41" officeooo:paragraph-rsid="00663ddb"/>
    </style:style>
    <style:style style:name="P205" style:family="paragraph" style:parent-style-name="Text_20_body" style:list-style-name="L16">
      <style:text-properties fo:language="ca" fo:country="ES" officeooo:rsid="00398d41" officeooo:paragraph-rsid="00663ddb"/>
    </style:style>
    <style:style style:name="P206" style:family="paragraph" style:parent-style-name="Text_20_body" style:list-style-name="L17">
      <style:text-properties fo:language="ca" fo:country="ES" officeooo:rsid="003c3723" officeooo:paragraph-rsid="00663ddb"/>
    </style:style>
    <style:style style:name="P207" style:family="paragraph" style:parent-style-name="Text_20_body" style:list-style-name="L17">
      <style:text-properties fo:language="ca" fo:country="ES" officeooo:rsid="00d35d62" officeooo:paragraph-rsid="00d35d62"/>
    </style:style>
    <style:style style:name="P208" style:family="paragraph" style:parent-style-name="Text_20_body" style:list-style-name="L28">
      <style:text-properties fo:language="ca" fo:country="ES" officeooo:paragraph-rsid="001f540c"/>
    </style:style>
    <style:style style:name="P209" style:family="paragraph" style:parent-style-name="Text_20_body" style:list-style-name="L6">
      <style:text-properties officeooo:paragraph-rsid="008d1405"/>
    </style:style>
    <style:style style:name="P210" style:family="paragraph" style:parent-style-name="Text_20_body" style:list-style-name="L6">
      <style:text-properties style:font-name="Calibri4" fo:font-size="10pt" fo:language="ca" fo:country="ES" fo:font-weight="bold" officeooo:rsid="008cd1d3" officeooo:paragraph-rsid="008d1405" style:font-size-asian="10.5pt" style:font-weight-asian="bold" style:font-weight-complex="bold"/>
    </style:style>
    <style:style style:name="P211" style:family="paragraph" style:parent-style-name="Text_20_body" style:list-style-name="L10">
      <style:text-properties officeooo:paragraph-rsid="00d321d5"/>
    </style:style>
    <style:style style:name="P212" style:family="paragraph" style:parent-style-name="Text_20_body" style:list-style-name="L10">
      <style:text-properties fo:font-weight="bold" officeooo:rsid="009aa1a8" officeooo:paragraph-rsid="00d321d5" style:font-weight-asian="bold" style:font-weight-complex="bold"/>
    </style:style>
    <style:style style:name="P213" style:family="paragraph" style:parent-style-name="Text_20_body" style:list-style-name="L11">
      <style:text-properties fo:font-weight="bold" officeooo:paragraph-rsid="00d321d5" style:font-weight-asian="bold" style:font-weight-complex="bold"/>
    </style:style>
    <style:style style:name="P214" style:family="paragraph" style:parent-style-name="Text_20_body" style:list-style-name="L21">
      <style:text-properties fo:font-weight="bold" officeooo:paragraph-rsid="00d55c27" style:font-weight-asian="bold" style:font-weight-complex="bold"/>
    </style:style>
    <style:style style:name="P215" style:family="paragraph" style:parent-style-name="Text_20_body" style:list-style-name="L30">
      <style:text-properties fo:font-weight="bold" officeooo:paragraph-rsid="00d5e511" style:font-weight-asian="bold" style:font-weight-complex="bold"/>
    </style:style>
    <style:style style:name="P216" style:family="paragraph" style:parent-style-name="Text_20_body" style:list-style-name="L36">
      <style:text-properties fo:font-weight="bold" officeooo:rsid="00970b99" officeooo:paragraph-rsid="00970b99" style:font-weight-asian="bold" style:font-weight-complex="bold"/>
    </style:style>
    <style:style style:name="P217" style:family="paragraph" style:parent-style-name="Text_20_body" style:list-style-name="L37">
      <style:text-properties fo:font-weight="bold" officeooo:rsid="00970b99" officeooo:paragraph-rsid="00970b99" style:font-weight-asian="bold" style:font-weight-complex="bold"/>
    </style:style>
    <style:style style:name="P218" style:family="paragraph" style:parent-style-name="Text_20_body" style:list-style-name="L11">
      <style:text-properties officeooo:paragraph-rsid="00d321d5"/>
    </style:style>
    <style:style style:name="P219" style:family="paragraph" style:parent-style-name="Text_20_body" style:list-style-name="L11">
      <style:paragraph-properties fo:margin-left="1.905cm" fo:margin-right="0cm" fo:text-indent="0cm" style:auto-text-indent="false">
        <style:tab-stops/>
      </style:paragraph-properties>
      <style:text-properties officeooo:paragraph-rsid="00d321d5"/>
    </style:style>
    <style:style style:name="P220" style:family="paragraph" style:parent-style-name="Text_20_body" style:list-style-name="L12">
      <style:text-properties officeooo:rsid="00be4301" officeooo:paragraph-rsid="00ecb670"/>
    </style:style>
    <style:style style:name="P221" style:family="paragraph" style:parent-style-name="Text_20_body" style:list-style-name="L13">
      <style:text-properties officeooo:paragraph-rsid="00d35ad5"/>
    </style:style>
    <style:style style:name="P222" style:family="paragraph" style:parent-style-name="Text_20_body" style:list-style-name="L20">
      <style:text-properties officeooo:paragraph-rsid="00d3e721"/>
    </style:style>
    <style:style style:name="P223" style:family="paragraph" style:parent-style-name="Text_20_body" style:list-style-name="L21">
      <style:text-properties officeooo:paragraph-rsid="00d3e721"/>
    </style:style>
    <style:style style:name="P224" style:family="paragraph" style:parent-style-name="Text_20_body" style:list-style-name="L21">
      <style:text-properties officeooo:paragraph-rsid="00d55c27"/>
    </style:style>
    <style:style style:name="P225" style:family="paragraph" style:parent-style-name="Text_20_body" style:list-style-name="L22">
      <style:text-properties officeooo:paragraph-rsid="00d55c27"/>
    </style:style>
    <style:style style:name="P226" style:family="paragraph" style:parent-style-name="Text_20_body" style:list-style-name="L23">
      <style:text-properties officeooo:paragraph-rsid="00d55c27"/>
    </style:style>
    <style:style style:name="P227" style:family="paragraph" style:parent-style-name="Text_20_body" style:list-style-name="L24">
      <style:text-properties officeooo:paragraph-rsid="00d5e511"/>
    </style:style>
    <style:style style:name="P228" style:family="paragraph" style:parent-style-name="Text_20_body" style:list-style-name="L25">
      <style:text-properties officeooo:paragraph-rsid="00d5e511"/>
    </style:style>
    <style:style style:name="P229" style:family="paragraph" style:parent-style-name="Text_20_body" style:list-style-name="L29">
      <style:text-properties officeooo:paragraph-rsid="00d5e511"/>
    </style:style>
    <style:style style:name="P230" style:family="paragraph" style:parent-style-name="Text_20_body" style:list-style-name="L33">
      <style:text-properties officeooo:rsid="00ade611" officeooo:paragraph-rsid="00ade611"/>
    </style:style>
    <style:style style:name="P231" style:family="paragraph" style:parent-style-name="Text_20_body" style:list-style-name="L34">
      <style:text-properties officeooo:rsid="00970b99" officeooo:paragraph-rsid="00d6b4ca"/>
    </style:style>
    <style:style style:name="P232" style:family="paragraph" style:parent-style-name="Text_20_body">
      <style:text-properties officeooo:rsid="00970b99" officeooo:paragraph-rsid="00d6b4ca"/>
    </style:style>
    <style:style style:name="P233" style:family="paragraph" style:parent-style-name="Text_20_body" style:list-style-name="L35">
      <style:text-properties officeooo:paragraph-rsid="00d6b4ca"/>
    </style:style>
    <style:style style:name="P234" style:family="paragraph" style:parent-style-name="Text_20_body" style:list-style-name="L35">
      <style:text-properties officeooo:rsid="000ca359" officeooo:paragraph-rsid="00d6b4ca"/>
    </style:style>
    <style:style style:name="P235" style:family="paragraph" style:parent-style-name="Text_20_body">
      <style:text-properties officeooo:rsid="00fa1cfd" officeooo:paragraph-rsid="00d6b4ca"/>
    </style:style>
    <style:style style:name="P236" style:family="paragraph" style:parent-style-name="Text_20_body">
      <style:text-properties officeooo:paragraph-rsid="00b24c63"/>
    </style:style>
    <style:style style:name="P237" style:family="paragraph">
      <loext:graphic-properties draw:fill="none"/>
      <style:paragraph-properties fo:text-align="center"/>
    </style:style>
    <style:style style:name="T1" style:family="text">
      <style:text-properties style:font-name="Calibri" fo:font-size="11pt" style:font-size-asian="11pt" style:font-size-complex="11pt"/>
    </style:style>
    <style:style style:name="T2" style:family="text">
      <style:text-properties style:font-name="Calibri" officeooo:rsid="001ca2a7"/>
    </style:style>
    <style:style style:name="T3" style:family="text">
      <style:text-properties style:font-name="Calibri" fo:language="ca" fo:country="ES"/>
    </style:style>
    <style:style style:name="T4" style:family="text">
      <style:text-properties style:font-name="Calibri" fo:language="ca" fo:country="ES" officeooo:rsid="0044a5d3"/>
    </style:style>
    <style:style style:name="T5" style:family="text">
      <style:text-properties style:font-name="Calibri" fo:language="ca" fo:country="ES" fo:font-weight="bold" style:font-weight-asian="bold"/>
    </style:style>
    <style:style style:name="T6" style:family="text">
      <style:text-properties style:font-name="Calibri" fo:language="ca" fo:country="ES" fo:font-weight="bold" officeooo:rsid="00484b61" style:font-weight-asian="bold" style:font-weight-complex="bold"/>
    </style:style>
    <style:style style:name="T7" style:family="text">
      <style:text-properties style:font-name="Calibri" fo:language="ca" fo:country="ES" fo:font-weight="bold" officeooo:rsid="00a4c287" style:font-weight-asian="bold" style:font-weight-complex="bold"/>
    </style:style>
    <style:style style:name="T8" style:family="text">
      <style:text-properties style:font-name="Calibri" fo:language="ca" fo:country="ES" fo:font-weight="bold" officeooo:rsid="00b24c63" style:font-weight-asian="bold" style:font-weight-complex="bold"/>
    </style:style>
    <style:style style:name="T9" style:family="text">
      <style:text-properties style:font-name="Calibri" fo:language="ca" fo:country="ES" fo:font-weight="bold" officeooo:rsid="0077d900" style:font-weight-asian="bold" style:font-weight-complex="normal"/>
    </style:style>
    <style:style style:name="T10" style:family="text">
      <style:text-properties style:font-name="Calibri" fo:language="ca" fo:country="ES" fo:font-weight="bold" officeooo:rsid="0077d900" style:font-weight-asian="bold"/>
    </style:style>
    <style:style style:name="T11" style:family="text">
      <style:text-properties style:font-name="Calibri" fo:language="ca" fo:country="ES" fo:font-weight="bold" officeooo:rsid="00780e29" style:font-weight-asian="bold"/>
    </style:style>
    <style:style style:name="T12" style:family="text">
      <style:text-properties style:font-name="Calibri" fo:language="ca" fo:country="ES" fo:font-weight="normal" style:font-weight-asian="normal" style:font-weight-complex="normal"/>
    </style:style>
    <style:style style:name="T13" style:family="text">
      <style:text-properties style:font-name="Calibri" fo:language="ca" fo:country="ES" fo:font-weight="normal" officeooo:rsid="00484b61" style:font-weight-asian="normal" style:font-weight-complex="normal"/>
    </style:style>
    <style:style style:name="T14" style:family="text">
      <style:text-properties style:font-name="Calibri" fo:language="ca" fo:country="ES" fo:font-weight="normal" officeooo:rsid="0077d900" style:font-weight-asian="normal" style:font-weight-complex="normal"/>
    </style:style>
    <style:style style:name="T15" style:family="text">
      <style:text-properties style:font-name="Calibri" fo:language="ca" fo:country="ES" fo:font-weight="normal" officeooo:rsid="0044a5d3" style:font-weight-asian="normal" style:font-weight-complex="normal"/>
    </style:style>
    <style:style style:name="T16" style:family="text">
      <style:text-properties style:font-name="Calibri" fo:language="ca" fo:country="ES" fo:font-weight="normal" officeooo:rsid="00a497e2" style:font-weight-asian="normal" style:font-weight-complex="normal"/>
    </style:style>
    <style:style style:name="T17" style:family="text">
      <style:text-properties style:font-name="Calibri" fo:language="ca" fo:country="ES" fo:font-weight="normal" officeooo:rsid="00a4c287" style:font-weight-asian="normal" style:font-weight-complex="normal"/>
    </style:style>
    <style:style style:name="T18" style:family="text">
      <style:text-properties style:font-name="Calibri" fo:language="ca" fo:country="ES" fo:font-weight="normal" officeooo:rsid="00b39b2c" style:font-weight-asian="normal" style:font-weight-complex="normal"/>
    </style:style>
    <style:style style:name="T19" style:family="text">
      <style:text-properties style:font-name="Calibri" fo:language="ca" fo:country="ES" officeooo:rsid="00780e29"/>
    </style:style>
    <style:style style:name="T20" style:family="text">
      <style:text-properties style:font-name="Calibri" fo:font-weight="normal" officeooo:rsid="00a497e2" style:font-weight-asian="normal" style:font-weight-complex="normal"/>
    </style:style>
    <style:style style:name="T21" style:family="text">
      <style:text-properties style:font-name="Calibri" fo:font-weight="normal" officeooo:rsid="00a259c5" style:font-weight-asian="normal" style:font-weight-complex="normal"/>
    </style:style>
    <style:style style:name="T22" style:family="text">
      <style:text-properties style:font-name="Calibri" fo:font-size="10pt" fo:language="ca" fo:country="ES" style:font-size-asian="10.5pt"/>
    </style:style>
    <style:style style:name="T23" style:family="text">
      <style:text-properties style:font-name="Calibri" fo:font-size="10pt" fo:language="ca" fo:country="ES" officeooo:rsid="007361b5" style:font-size-asian="10.5pt"/>
    </style:style>
    <style:style style:name="T24" style:family="text">
      <style:text-properties style:font-name="Calibri" fo:font-size="10pt" fo:language="ca" fo:country="ES" officeooo:rsid="00780e29" style:font-size-asian="10.5pt"/>
    </style:style>
    <style:style style:name="T25" style:family="text">
      <style:text-properties style:font-name="Calibri" fo:font-size="10pt" fo:language="ca" fo:country="ES" officeooo:rsid="00abd58a" style:font-size-asian="10.5pt"/>
    </style:style>
    <style:style style:name="T26" style:family="text">
      <style:text-properties style:font-name="Calibri" fo:font-size="10pt" fo:language="ca" fo:country="ES" officeooo:rsid="00b24c63" style:font-size-asian="10.5pt"/>
    </style:style>
    <style:style style:name="T27" style:family="text">
      <style:text-properties style:font-name="Calibri" fo:font-size="10pt" fo:language="ca" fo:country="ES" fo:font-weight="bold" officeooo:rsid="00780e29" style:font-size-asian="10.5pt" style:font-weight-asian="bold"/>
    </style:style>
    <style:style style:name="T28" style:family="text">
      <style:text-properties style:font-name="Calibri" fo:font-size="10pt" fo:language="ca" fo:country="ES" fo:font-weight="bold" style:font-size-asian="10.5pt" style:font-weight-asian="bold" style:font-weight-complex="bold"/>
    </style:style>
    <style:style style:name="T29" style:family="text">
      <style:text-properties style:font-name="Calibri" fo:font-size="10pt" fo:language="ca" fo:country="ES" fo:font-weight="bold" officeooo:rsid="00abd58a" style:font-size-asian="10.5pt" style:font-weight-asian="bold" style:font-weight-complex="bold"/>
    </style:style>
    <style:style style:name="T30" style:family="text">
      <style:text-properties style:font-name="Calibri" fo:font-size="10pt" fo:language="ca" fo:country="ES" fo:font-weight="bold" officeooo:rsid="00b24c63" style:font-size-asian="10.5pt" style:font-weight-asian="bold" style:font-weight-complex="bold"/>
    </style:style>
    <style:style style:name="T31" style:family="text">
      <style:text-properties style:font-name="Calibri" fo:font-size="10pt" fo:language="ca" fo:country="ES" fo:font-weight="bold" officeooo:rsid="0077d900" style:font-size-asian="10.5pt" style:font-weight-asian="bold"/>
    </style:style>
    <style:style style:name="T32" style:family="text">
      <style:text-properties style:font-name="Calibri" fo:font-size="10pt" fo:language="ca" fo:country="ES" fo:font-weight="bold" officeooo:rsid="00b24c63" style:font-size-asian="10.5pt" style:font-weight-asian="bold"/>
    </style:style>
    <style:style style:name="T33" style:family="text">
      <style:text-properties style:font-name="Calibri" fo:font-size="10pt" fo:language="ca" fo:country="ES" fo:font-weight="normal" style:font-size-asian="10.5pt" style:font-weight-asian="normal" style:font-weight-complex="normal"/>
    </style:style>
    <style:style style:name="T34" style:family="text">
      <style:text-properties style:font-name="Calibri" fo:font-size="10pt" fo:language="ca" fo:country="ES" fo:font-weight="normal" officeooo:rsid="0077d900" style:font-size-asian="10.5pt" style:font-weight-asian="normal" style:font-weight-complex="normal"/>
    </style:style>
    <style:style style:name="T35" style:family="text">
      <style:text-properties style:font-name="Calibri" fo:font-size="10pt" fo:language="ca" fo:country="ES" fo:font-weight="normal" officeooo:rsid="00b24c63" style:font-size-asian="10.5pt" style:font-weight-asian="normal" style:font-weight-complex="normal"/>
    </style:style>
    <style:style style:name="T36" style:family="text">
      <style:text-properties style:font-name="Calibri" fo:font-size="10pt" fo:language="ca" fo:country="ES" fo:font-weight="normal" officeooo:rsid="00484b61" style:font-size-asian="10.5pt" style:font-weight-asian="normal" style:font-weight-complex="normal"/>
    </style:style>
    <style:style style:name="T37" style:family="text">
      <style:text-properties style:font-name="Calibri" officeooo:rsid="0064c74a"/>
    </style:style>
    <style:style style:name="T38" style:family="text">
      <style:text-properties fo:color="#f3901d" loext:opacity="100%" style:font-name="Georgia" fo:font-size="28pt" fo:font-weight="bold" style:font-size-asian="28pt" style:font-weight-asian="bold" style:font-name-complex="Times New Roman" style:font-size-complex="28pt" style:font-weight-complex="bold"/>
    </style:style>
    <style:style style:name="T39" style:family="text">
      <style:text-properties fo:color="#f3901d" loext:opacity="100%" style:font-name="Georgia" fo:font-size="28pt" fo:font-weight="bold" officeooo:rsid="000e1972" style:font-size-asian="28pt" style:font-weight-asian="bold" style:font-name-complex="Times New Roman" style:font-size-complex="28pt" style:font-weight-complex="bold"/>
    </style:style>
    <style:style style:name="T40" style:family="text">
      <style:text-properties fo:color="#f3901d" loext:opacity="100%" style:font-name="Georgia" fo:font-size="28pt" fo:font-weight="bold" officeooo:rsid="00ea3059" style:font-size-asian="28pt" style:font-weight-asian="bold" style:font-name-complex="Times New Roman" style:font-size-complex="28pt" style:font-weight-complex="bold"/>
    </style:style>
    <style:style style:name="T41" style:family="text">
      <style:text-properties fo:language="ca" fo:country="ES"/>
    </style:style>
    <style:style style:name="T42" style:family="text">
      <style:text-properties fo:language="ca" fo:country="ES" officeooo:rsid="0064c74a"/>
    </style:style>
    <style:style style:name="T43" style:family="text">
      <style:text-properties fo:language="ca" fo:country="ES" fo:font-weight="bold" style:font-weight-asian="bold" style:font-weight-complex="bold"/>
    </style:style>
    <style:style style:name="T44" style:family="text">
      <style:text-properties fo:language="ca" fo:country="ES" fo:font-weight="bold" officeooo:rsid="008809df" style:font-weight-asian="bold" style:font-weight-complex="bold"/>
    </style:style>
    <style:style style:name="T45" style:family="text">
      <style:text-properties fo:language="ca" fo:country="ES" fo:font-weight="bold" officeooo:rsid="0029d734" style:font-weight-asian="bold" style:font-weight-complex="bold"/>
    </style:style>
    <style:style style:name="T46" style:family="text">
      <style:text-properties fo:language="ca" fo:country="ES" fo:font-weight="bold" officeooo:rsid="001b1053" style:font-weight-asian="bold" style:font-weight-complex="bold"/>
    </style:style>
    <style:style style:name="T47" style:family="text">
      <style:text-properties fo:language="ca" fo:country="ES" fo:font-weight="normal" style:font-weight-asian="normal" style:font-weight-complex="normal"/>
    </style:style>
    <style:style style:name="T48" style:family="text">
      <style:text-properties fo:language="ca" fo:country="ES" fo:font-weight="normal" officeooo:rsid="008809df" style:font-weight-asian="normal" style:font-weight-complex="normal"/>
    </style:style>
    <style:style style:name="T49" style:family="text">
      <style:text-properties fo:language="ca" fo:country="ES" fo:font-weight="normal" officeooo:rsid="00ecb670" style:font-weight-asian="normal" style:font-weight-complex="normal"/>
    </style:style>
    <style:style style:name="T50" style:family="text">
      <style:text-properties fo:language="ca" fo:country="ES" officeooo:rsid="00180ee2"/>
    </style:style>
    <style:style style:name="T51" style:family="text">
      <style:text-properties fo:language="ca" fo:country="ES" officeooo:rsid="00290227"/>
    </style:style>
    <style:style style:name="T52" style:family="text">
      <style:text-properties fo:language="ca" fo:country="ES" officeooo:rsid="008cd1d3"/>
    </style:style>
    <style:style style:name="T53" style:family="text">
      <style:text-properties fo:language="ca" fo:country="ES" officeooo:rsid="008d1405"/>
    </style:style>
    <style:style style:name="T54" style:family="text">
      <style:text-properties fo:language="ca" fo:country="ES" officeooo:rsid="0029d734"/>
    </style:style>
    <style:style style:name="T55" style:family="text">
      <style:text-properties fo:language="ca" fo:country="ES" officeooo:rsid="00109022"/>
    </style:style>
    <style:style style:name="T56" style:family="text">
      <style:text-properties fo:language="ca" fo:country="ES" officeooo:rsid="0019fa0c"/>
    </style:style>
    <style:style style:name="T57" style:family="text">
      <style:text-properties fo:language="ca" fo:country="ES" officeooo:rsid="0091f042"/>
    </style:style>
    <style:style style:name="T58" style:family="text">
      <style:text-properties fo:language="ca" fo:country="ES" officeooo:rsid="00179ecd"/>
    </style:style>
    <style:style style:name="T59" style:family="text">
      <style:text-properties fo:language="ca" fo:country="ES" officeooo:rsid="001a1fdd"/>
    </style:style>
    <style:style style:name="T60" style:family="text">
      <style:text-properties fo:language="ca" fo:country="ES" officeooo:rsid="003c3723"/>
    </style:style>
    <style:style style:name="T61" style:family="text">
      <style:text-properties fo:language="ca" fo:country="ES" officeooo:rsid="003dd30a"/>
    </style:style>
    <style:style style:name="T62" style:family="text">
      <style:text-properties fo:language="ca" fo:country="ES" officeooo:rsid="00b24c63"/>
    </style:style>
    <style:style style:name="T63" style:family="text">
      <style:text-properties fo:font-weight="normal" style:font-weight-asian="normal" style:font-weight-complex="normal"/>
    </style:style>
    <style:style style:name="T64" style:family="text">
      <style:text-properties fo:font-weight="normal" officeooo:rsid="001f540c" style:font-weight-asian="normal" style:font-weight-complex="normal"/>
    </style:style>
    <style:style style:name="T65" style:family="text">
      <style:text-properties fo:font-weight="normal" officeooo:rsid="00207651" style:font-weight-asian="normal" style:font-weight-complex="normal"/>
    </style:style>
    <style:style style:name="T66" style:family="text">
      <style:text-properties fo:font-weight="normal" officeooo:rsid="00337d58" style:font-weight-asian="normal" style:font-weight-complex="normal"/>
    </style:style>
    <style:style style:name="T67" style:family="text">
      <style:text-properties fo:font-weight="normal" officeooo:rsid="00180ee2" style:font-weight-asian="normal" style:font-weight-complex="normal"/>
    </style:style>
    <style:style style:name="T68" style:family="text">
      <style:text-properties fo:font-weight="normal" officeooo:rsid="001b5cf5" style:font-weight-asian="normal" style:font-weight-complex="normal"/>
    </style:style>
    <style:style style:name="T69" style:family="text">
      <style:text-properties fo:font-weight="normal" officeooo:rsid="002749e4" style:font-weight-asian="normal" style:font-weight-complex="normal"/>
    </style:style>
    <style:style style:name="T70" style:family="text">
      <style:text-properties fo:font-weight="normal" officeooo:rsid="0029d734" style:font-weight-asian="normal" style:font-weight-complex="normal"/>
    </style:style>
    <style:style style:name="T71" style:family="text">
      <style:text-properties fo:font-weight="normal" officeooo:rsid="002ddca3" style:font-weight-asian="normal" style:font-weight-complex="normal"/>
    </style:style>
    <style:style style:name="T72" style:family="text">
      <style:text-properties fo:font-weight="normal" officeooo:rsid="0030bbb5" style:font-weight-asian="normal" style:font-weight-complex="normal"/>
    </style:style>
    <style:style style:name="T73" style:family="text">
      <style:text-properties fo:font-weight="normal" officeooo:rsid="003b0066" style:font-weight-asian="normal" style:font-weight-complex="normal"/>
    </style:style>
    <style:style style:name="T74" style:family="text">
      <style:text-properties fo:font-weight="normal" officeooo:rsid="00398d41" style:font-weight-asian="normal" style:font-weight-complex="normal"/>
    </style:style>
    <style:style style:name="T75" style:family="text">
      <style:text-properties fo:font-weight="normal" officeooo:rsid="008520a6" style:font-weight-asian="normal" style:font-weight-complex="normal"/>
    </style:style>
    <style:style style:name="T76" style:family="text">
      <style:text-properties fo:font-weight="normal" officeooo:rsid="00877a2f" style:font-weight-asian="normal" style:font-weight-complex="normal"/>
    </style:style>
    <style:style style:name="T77" style:family="text">
      <style:text-properties fo:font-weight="normal" officeooo:rsid="009577a4" style:font-weight-asian="normal" style:font-weight-complex="normal"/>
    </style:style>
    <style:style style:name="T78" style:family="text">
      <style:text-properties fo:font-weight="normal" officeooo:rsid="00985b9b" style:font-weight-asian="normal" style:font-weight-complex="normal"/>
    </style:style>
    <style:style style:name="T79" style:family="text">
      <style:text-properties fo:font-weight="normal" officeooo:rsid="00acd915" style:font-weight-asian="normal" style:font-weight-complex="normal"/>
    </style:style>
    <style:style style:name="T80" style:family="text">
      <style:text-properties fo:font-weight="normal" officeooo:rsid="00ee40b9" style:font-weight-asian="normal" style:font-weight-complex="normal"/>
    </style:style>
    <style:style style:name="T81" style:family="text">
      <style:text-properties officeooo:rsid="001df521"/>
    </style:style>
    <style:style style:name="T82" style:family="text">
      <style:text-properties officeooo:rsid="0026ed69"/>
    </style:style>
    <style:style style:name="T83" style:family="text">
      <style:text-properties officeooo:rsid="003dd30a"/>
    </style:style>
    <style:style style:name="T84" style:family="text">
      <style:text-properties officeooo:rsid="00180ee2"/>
    </style:style>
    <style:style style:name="T85" style:family="text">
      <style:text-properties officeooo:rsid="00434c2e"/>
    </style:style>
    <style:style style:name="T86" style:family="text">
      <style:text-properties fo:color="#007dc3" loext:opacity="100%" fo:font-size="18pt" fo:language="ca" fo:country="ES" style:font-size-asian="18pt" style:font-name-complex="Times New Roman" style:font-size-complex="18pt"/>
    </style:style>
    <style:style style:name="T87" style:family="text">
      <style:text-properties fo:color="#007dc3" loext:opacity="100%" fo:font-size="18pt" fo:language="ca" fo:country="ES" officeooo:rsid="00ea3059" style:font-size-asian="18pt" style:font-name-complex="Times New Roman" style:font-size-complex="18pt"/>
    </style:style>
    <style:style style:name="T88" style:family="text">
      <style:text-properties fo:color="#007dc3" loext:opacity="100%" style:font-name="Calibri" fo:font-size="18pt" fo:language="ca" fo:country="ES" officeooo:rsid="00589ea1" style:font-size-asian="18pt" style:language-asian="en" style:country-asian="US" style:font-name-complex="Times New Roman" style:font-size-complex="18pt"/>
    </style:style>
    <style:style style:name="T89" style:family="text">
      <style:text-properties fo:color="#007dc3" loext:opacity="100%" style:font-name="Calibri" fo:font-size="18pt" fo:language="ca" fo:country="ES" officeooo:rsid="00e52657" style:font-size-asian="18pt" style:language-asian="en" style:country-asian="US" style:font-name-complex="Times New Roman" style:font-size-complex="18pt"/>
    </style:style>
    <style:style style:name="T90" style:family="text">
      <style:text-properties fo:color="#007dc3" loext:opacity="100%" style:font-name="Calibri" fo:font-size="18pt" fo:language="ca" fo:country="ES" officeooo:rsid="00ea3059" style:font-size-asian="18pt" style:language-asian="en" style:country-asian="US" style:font-name-complex="Times New Roman" style:font-size-complex="18pt"/>
    </style:style>
    <style:style style:name="T91" style:family="text">
      <style:text-properties officeooo:rsid="00179ecd"/>
    </style:style>
    <style:style style:name="T92" style:family="text">
      <style:text-properties officeooo:rsid="001a1fdd"/>
    </style:style>
    <style:style style:name="T93" style:family="text">
      <style:text-properties fo:font-weight="bold" style:font-weight-asian="bold" style:font-weight-complex="bold"/>
    </style:style>
    <style:style style:name="T94" style:family="text">
      <style:text-properties fo:font-weight="bold" officeooo:rsid="00180ee2" style:font-weight-asian="bold" style:font-weight-complex="bold"/>
    </style:style>
    <style:style style:name="T95" style:family="text">
      <style:text-properties fo:font-weight="bold" officeooo:rsid="002749e4" style:font-weight-asian="bold" style:font-weight-complex="bold"/>
    </style:style>
    <style:style style:name="T96" style:family="text">
      <style:text-properties fo:font-weight="bold" officeooo:rsid="0037b183" style:font-weight-asian="bold" style:font-weight-complex="bold"/>
    </style:style>
    <style:style style:name="T97" style:family="text">
      <style:text-properties officeooo:rsid="001fc3e5"/>
    </style:style>
    <style:style style:name="T98" style:family="text">
      <style:text-properties officeooo:rsid="0029d734"/>
    </style:style>
    <style:style style:name="T99" style:family="text">
      <style:text-properties officeooo:rsid="00337d58"/>
    </style:style>
    <style:style style:name="T100" style:family="text">
      <style:text-properties officeooo:rsid="003c3723"/>
    </style:style>
    <style:style style:name="T101" style:family="text">
      <style:text-properties officeooo:rsid="0064c74a"/>
    </style:style>
    <style:style style:name="T102" style:family="text">
      <style:text-properties fo:font-size="10pt" fo:language="ca" fo:country="ES" officeooo:rsid="0064c74a" style:font-size-asian="10.5pt"/>
    </style:style>
    <style:style style:name="T103" style:family="text">
      <style:text-properties fo:font-size="10pt" fo:language="ca" fo:country="ES" fo:font-style="italic" officeooo:rsid="0064c74a" style:font-size-asian="10.5pt" style:font-style-asian="italic" style:font-style-complex="italic"/>
    </style:style>
    <style:style style:name="T104" style:family="text">
      <style:text-properties fo:font-size="10pt" fo:language="ca" fo:country="ES" fo:font-style="normal" officeooo:rsid="0064c74a" style:font-size-asian="10.5pt" style:font-style-asian="normal" style:font-style-complex="normal"/>
    </style:style>
    <style:style style:name="T105" style:family="text">
      <style:text-properties text:display="none"/>
    </style:style>
    <style:style style:name="T106" style:family="text">
      <style:text-properties style:font-name="Calibri1"/>
    </style:style>
    <style:style style:name="T107" style:family="text">
      <style:text-properties style:font-name="Calibri1" officeooo:rsid="0064c74a"/>
    </style:style>
    <style:style style:name="T108" style:family="text">
      <style:text-properties style:font-name="Calibri1" fo:language="ca" fo:country="ES" officeooo:rsid="001ca2a7"/>
    </style:style>
    <style:style style:name="T109" style:family="text">
      <style:text-properties style:font-name="Calibri1" fo:language="ca" fo:country="ES" officeooo:rsid="00673e05"/>
    </style:style>
    <style:style style:name="T110" style:family="text">
      <style:text-properties style:font-name="Calibri4" fo:font-size="10pt" fo:language="ca" fo:country="ES" fo:font-weight="bold" officeooo:rsid="0029d734" style:font-size-asian="10.5pt" style:font-weight-asian="bold" style:font-weight-complex="bold"/>
    </style:style>
    <style:style style:name="T111" style:family="text">
      <style:text-properties style:font-name="Calibri4" fo:font-size="10pt" fo:language="ca" fo:country="ES" fo:font-weight="bold" officeooo:rsid="008809df" style:font-size-asian="10.5pt" style:font-weight-asian="bold" style:font-weight-complex="bold"/>
    </style:style>
    <style:style style:name="T112" style:family="text">
      <style:text-properties style:font-name="Calibri4" fo:font-size="10pt" fo:language="ca" fo:country="ES" fo:font-weight="normal" style:font-size-asian="10.5pt" style:font-weight-asian="normal" style:font-weight-complex="normal"/>
    </style:style>
    <style:style style:name="T113" style:family="text">
      <style:text-properties style:font-name="Calibri4" fo:font-size="10pt" fo:language="ca" fo:country="ES" fo:font-weight="normal" officeooo:rsid="008809df" style:font-size-asian="10.5pt" style:font-weight-asian="normal" style:font-weight-complex="normal"/>
    </style:style>
    <style:style style:name="T114" style:family="text">
      <style:text-properties style:font-name="Calibri4" fo:font-size="10pt" fo:language="ca" fo:country="ES" style:font-size-asian="10.5pt"/>
    </style:style>
    <style:style style:name="T115" style:family="text">
      <style:text-properties style:font-name="Calibri4" fo:font-size="10pt" fo:language="ca" fo:country="ES" officeooo:rsid="008cd1d3" style:font-size-asian="10.5pt"/>
    </style:style>
    <style:style style:name="T116" style:family="text">
      <style:text-properties style:font-name="Calibri4" fo:font-size="10pt" fo:language="ca" fo:country="ES" officeooo:rsid="0029d734" style:font-size-asian="10.5pt"/>
    </style:style>
    <style:style style:name="T117" style:family="text">
      <style:text-properties style:font-name="Calibri4" fo:font-size="10pt" fo:language="ca" fo:country="ES" officeooo:rsid="008d1405" style:font-size-asian="10.5pt"/>
    </style:style>
    <style:style style:name="T118" style:family="text">
      <style:text-properties style:font-name="Calibri4" fo:font-size="10pt" fo:language="ca" fo:country="ES" officeooo:rsid="0019fa0c" style:font-size-asian="10.5pt"/>
    </style:style>
    <style:style style:name="T119" style:family="text">
      <style:text-properties style:font-name="Calibri4" fo:font-size="10pt" fo:language="ca" fo:country="ES" officeooo:rsid="0091f042" style:font-size-asian="10.5pt"/>
    </style:style>
    <style:style style:name="T120" style:family="text">
      <style:text-properties style:font-name="Calibri4" fo:font-size="10pt" fo:language="ca" fo:country="ES" officeooo:rsid="001a1fdd" style:font-size-asian="10.5pt"/>
    </style:style>
    <style:style style:name="T121" style:family="text">
      <style:text-properties style:font-name="Calibri4" fo:font-size="10pt" fo:language="ca" fo:country="ES" officeooo:rsid="003dd30a" style:font-size-asian="10.5pt"/>
    </style:style>
    <style:style style:name="T122" style:family="text">
      <style:text-properties style:font-name="Calibri4" fo:font-size="10pt" fo:language="ca" fo:country="ES" officeooo:rsid="00b532aa" style:font-size-asian="10.5pt"/>
    </style:style>
    <style:style style:name="T123" style:family="text">
      <style:text-properties fo:color="#4f81bd" loext:opacity="100%" style:font-name="Liberation Sans" fo:font-size="9.80000019073486pt" fo:language="ca" fo:country="ES" fo:font-weight="bold" officeooo:rsid="00180ee2" style:font-name-asian="Microsoft YaHei" style:font-size-asian="14.1000003814697pt" style:font-weight-asian="bold" style:font-name-complex="Arial1" style:font-size-complex="14.1000003814697pt" style:font-weight-complex="bold"/>
    </style:style>
    <style:style style:name="T124" style:family="text">
      <style:text-properties fo:color="#4f81bd" loext:opacity="100%" style:font-name="Liberation Sans" fo:font-size="9.80000019073486pt" fo:language="ca" fo:country="ES" fo:font-weight="bold" officeooo:rsid="008935c2" style:font-name-asian="Microsoft YaHei" style:font-size-asian="14.1000003814697pt" style:font-weight-asian="bold" style:font-name-complex="Arial1" style:font-size-complex="14.1000003814697pt" style:font-weight-complex="bold"/>
    </style:style>
    <style:style style:name="T125" style:family="text">
      <style:text-properties fo:color="#4f81bd" loext:opacity="100%" style:font-name="Liberation Sans" fo:language="ca" fo:country="ES" fo:font-weight="bold" officeooo:rsid="00180ee2" style:font-name-asian="Microsoft YaHei" style:font-weight-asian="bold" style:font-name-complex="Arial1" style:font-weight-complex="bold"/>
    </style:style>
    <style:style style:name="T126" style:family="text">
      <style:text-properties fo:color="#4f81bd" loext:opacity="100%" style:font-name="Liberation Sans" fo:language="ca" fo:country="ES" fo:font-weight="bold" officeooo:rsid="008935c2" style:font-name-asian="Microsoft YaHei" style:font-weight-asian="bold" style:font-name-complex="Arial1" style:font-weight-complex="bold"/>
    </style:style>
    <style:style style:name="T127" style:family="text">
      <style:text-properties fo:color="#4f81bd" loext:opacity="100%" fo:language="ca" fo:country="ES" fo:font-weight="bold" officeooo:rsid="00180ee2" style:font-name-asian="Microsoft YaHei" style:font-weight-asian="bold" style:font-name-complex="Arial1" style:font-weight-complex="bold"/>
    </style:style>
    <style:style style:name="T128" style:family="text">
      <style:text-properties fo:color="#4f81bd" loext:opacity="100%" fo:language="ca" fo:country="ES" fo:font-weight="bold" officeooo:rsid="008935c2" style:font-name-asian="Microsoft YaHei" style:font-weight-asian="bold" style:font-name-complex="Arial1" style:font-weight-complex="bold"/>
    </style:style>
    <style:style style:name="T129" style:family="text">
      <style:text-properties officeooo:rsid="008520a6"/>
    </style:style>
    <style:style style:name="T130" style:family="text">
      <style:text-properties officeooo:rsid="0086f52e"/>
    </style:style>
    <style:style style:name="T131" style:family="text">
      <style:text-properties officeooo:rsid="008935c2"/>
    </style:style>
    <style:style style:name="T132" style:family="text">
      <style:text-properties officeooo:rsid="0089595f"/>
    </style:style>
    <style:style style:name="T133" style:family="text">
      <style:text-properties officeooo:rsid="0095470e"/>
    </style:style>
    <style:style style:name="T134" style:family="text">
      <style:text-properties officeooo:rsid="009577a4"/>
    </style:style>
    <style:style style:name="T135" style:family="text">
      <style:text-properties officeooo:rsid="00acd915"/>
    </style:style>
    <style:style style:name="T136" style:family="text">
      <style:text-properties officeooo:rsid="00996805"/>
    </style:style>
    <style:style style:name="T137" style:family="text">
      <style:text-properties officeooo:rsid="00d321d5"/>
    </style:style>
    <style:style style:name="T138" style:family="text">
      <style:text-properties officeooo:rsid="00d3e721"/>
    </style:style>
    <style:style style:name="T139" style:family="text">
      <style:text-properties officeooo:rsid="00d6b4ca"/>
    </style:style>
    <style:style style:name="T140" style:family="text">
      <style:text-properties officeooo:rsid="00df1e58"/>
    </style:style>
    <style:style style:name="T141" style:family="text">
      <style:text-properties officeooo:rsid="00c911e8"/>
    </style:style>
    <style:style style:name="T142" style:family="text">
      <style:text-properties officeooo:rsid="00be4301"/>
    </style:style>
    <style:style style:name="T143" style:family="text">
      <style:text-properties officeooo:rsid="00ecb670"/>
    </style:style>
    <style:style style:name="T144" style:family="text">
      <style:text-properties officeooo:rsid="00ee40b9"/>
    </style:style>
    <style:style style:name="T145" style:family="text">
      <style:text-properties officeooo:rsid="00f8bb0d"/>
    </style:style>
    <style:style style:name="T146" style:family="text">
      <style:text-properties officeooo:rsid="00fa1cfd"/>
    </style:style>
    <style:style style:name="T147" style:family="text">
      <style:text-properties officeooo:rsid="00970b99"/>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horizontal-pos="from-left" style:horizontal-rel="paragraph-content" fo:padding="0cm" fo:border="none"/>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049cm" fo:border="0.06pt solid #dddddd"/>
    </style:style>
    <style:style style:name="fr6"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7"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8"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draw:shadow-opacity="100%"/>
    </style:style>
    <style:style style:name="fr9" style:family="graphic" style:parent-style-name="Frame">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loext:rel-width-rel="paragraph"/>
    </style:style>
    <style:style style:name="fr10"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049cm" fo:border="0.06pt solid #cccccc"/>
    </style:style>
    <style:style style:name="fr11" style:family="graphic" style:parent-style-name="Frame">
      <style:graphic-properties fo:margin-left="0cm" fo:margin-right="0cm" fo:margin-top="0cm" fo:margin-bottom="0cm" style:run-through="foreground" style:wrap="parallel" style:number-wrapped-paragraphs="no-limit" style:vertical-pos="top" style:vertical-rel="paragraph" style:horizontal-pos="center" style:horizontal-rel="paragraph" fo:padding="0.049cm" fo:border="0.06pt solid #cccccc"/>
    </style:style>
    <style:style style:name="fr1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049cm" fo:border="0.06pt solid #dddddd" style:shadow="none" draw:shadow-opacity="100%"/>
    </style:style>
    <style:style style:name="fr13"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1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5"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run-through="foreground" style:wrap="none" style:vertical-pos="top" style:vertical-rel="paragraph" fo:padding="0.049cm" fo:border="0.06pt solid #dddddd"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3.016cm, 1.032cm, 1.582cm, 1.027cm)" draw:luminance="0%" draw:contrast="0%" draw:red="0%" draw:green="0%" draw:blue="0%" draw:gamma="100%" draw:color-inversion="false" draw:image-opacity="100%" draw:color-mode="standard" loext:rel-width-rel="paragraph"/>
    </style:style>
    <style:style style:name="fr19"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run-through="foreground"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run-through="foreground" style:wrap="parallel"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0.06pt solid #dddddd" style:shadow="none" draw:shadow-opacity="100%" style:mirror="none" fo:clip="rect(0cm, 0cm, 0cm, 0cm)" draw:luminance="0%" draw:contrast="0%" draw:red="0%" draw:green="0%" draw:blue="0%" draw:gamma="100%" draw:color-inversion="false" draw:image-opacity="100%" draw:color-mode="standard" loext:rel-width-rel="paragraph"/>
    </style:style>
    <style:style style:name="fr2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6" style:family="graphic" style:parent-style-name="Graphics">
      <style:graphic-properties style:run-through="foreground" style:wrap="none" style:vertical-pos="from-top" style:horizontal-pos="from-left" style:horizontal-rel="paragraph" style:mirror="none" fo:clip="rect(0.813cm, 1.418cm, 0.58cm, 1.729cm)" draw:luminance="0%" draw:contrast="0%" draw:red="0%" draw:green="0%" draw:blue="0%" draw:gamma="100%" draw:color-inversion="false" draw:image-opacity="100%" draw:color-mode="standard"/>
    </style:style>
    <style:style style:name="fr27"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8" style:family="graphic" style:parent-style-name="Graphics">
      <style:graphic-properties style:run-through="foreground" style:wrap="non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9"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30"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4" style:family="graphic" style:parent-style-name="Graphics">
      <style:graphic-properties style:wrap="parallel" style:number-wrapped-paragraphs="no-limit" style:wrap-contour="fals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5"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3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7"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8" style:family="graphic" style:parent-style-name="Graphics">
      <style:graphic-properties style:run-through="foreground" style:wrap="none" style:vertical-pos="top" style:vertical-rel="paragraph" fo:padding="0.049cm" fo:border="0.06pt solid #cccccc" style:mirror="none" fo:clip="rect(0cm, 0cm, 0cm, 0cm)" draw:luminance="0%" draw:contrast="0%" draw:red="0%" draw:green="0%" draw:blue="0%" draw:gamma="100%" draw:color-inversion="false" draw:image-opacity="100%" draw:color-mode="standard"/>
    </style:style>
    <style:style style:name="fr39" style:family="graphic" style:parent-style-name="Graphics">
      <style:graphic-properties style:run-through="foreground"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40" style:family="graphic" style:parent-style-name="Graphics">
      <style:graphic-properties style:mirror="none" fo:clip="rect(0cm, 0cm, 5.749cm, 0cm)" draw:luminance="0%" draw:contrast="0%" draw:red="0%" draw:green="0%" draw:blue="0%" draw:gamma="100%" draw:color-inversion="false" draw:image-opacity="100%" draw:color-mode="standard"/>
    </style:style>
    <style:style style:name="fr4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loext:num-list-format="%1%"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
      <text:list-level-style-bullet text:level="1"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WW_5f_CharLFO30LVL1" loext:num-list-format="%1%"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WW_5f_CharLFO30LVL2" loext:num-list-format="%2%"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text:style-name="WW_5f_CharLFO30LVL3" loext:num-list-format="%3%"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WW_5f_CharLFO30LVL4" loext:num-list-format="%4%"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WW_5f_CharLFO30LVL5" loext:num-list-format="%5%"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text:style-name="WW_5f_CharLFO30LVL6" loext:num-list-format="%6%"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WW_5f_CharLFO30LVL7" loext:num-list-format="%7%"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WW_5f_CharLFO30LVL8" loext:num-list-format="%8%"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text:style-name="WW_5f_CharLFO30LVL9" loext:num-list-format="%9%"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loext:num-list-format="%1%"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loext:num-list-format="%2%"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loext:num-list-format="%3%"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4" loext:num-list-format="%4%"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5" loext:num-list-format="%5%"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6" loext:num-list-format="%6%"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7" loext:num-list-format="%7%"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8" loext:num-list-format="%8%"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9" loext:num-list-format="%9%"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10" loext:num-list-format="%10%"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WW_5f_CharLFO31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1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1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1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1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1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1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1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1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WW_5f_CharLFO32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2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2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2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2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2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2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2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2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WW_5f_CharLFO33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3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3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3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3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3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3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3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3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WW_5f_CharLFO34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4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34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34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34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34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34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34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34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Character_5f_20_5f_style"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Character_5f_20_5f_style" loext:num-list-format="%2%"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Character_5f_20_5f_style"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Character_5f_20_5f_style"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Character_5f_20_5f_style"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Character_5f_20_5f_style"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Character_5f_20_5f_style"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Character_5f_20_5f_style"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Character_5f_20_5f_style"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loext:decorative="false" style:run-through="background" style:wrap="run-through" style:number-wrapped-paragraphs="no-limit" style:vertical-pos="from-top" style:horizontal-pos="from-left" style:horizontal-rel="paragraph" draw:wrap-influence-on-position="once-concurrent" loext:allow-overlap="true" style:flow-with-text="false"/>
    </style:style>
    <style:style style:name="gr2" style:family="graphic">
      <style:graphic-properties draw:stroke="none" draw:fill="none" draw:textarea-horizontal-align="center" draw:textarea-vertical-align="middle" draw:color-mode="standard" draw:luminance="0%" draw:contrast="0%" draw:gamma="100%" draw:red="0%" draw:green="0%" draw:blue="0%" fo:clip="rect(0cm, 0cm, 0cm, 4.732cm)" draw:image-opacity="100%" style:mirror="none" loext:decorative="false" style:run-through="background"/>
    </style:style>
    <style:style style:name="gr3"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run-through="back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p text:style-name="P157"><draw:g text:anchor-type="as-char" svg:y="0cm" draw:z-index="0" draw:name="Group 6" draw:style-name="gr1"><draw:frame draw:name="Picture 2" draw:style-name="gr2" draw:text-style-name="P237" svg:width="13.553cm" svg:height="2.514cm" svg:x="3.438cm" svg:y="0cm"><draw:image xlink:href="Pictures/10000000000006A400000104792F8214.png" xlink:type="simple" xlink:show="embed" xlink:actuate="onLoad" draw:mime-type="image/png"><text:p/></draw:image></draw:frame><draw:frame draw:name="Picture 3" draw:style-name="gr3" draw:text-style-name="P237" svg:width="3.211cm" svg:height="2.513cm" svg:x="0cm" svg:y="0cm"><draw:image xlink:href="Pictures/10000001000002E6000002BBD71058E4.png" xlink:type="simple" xlink:show="embed" xlink:actuate="onLoad" draw:mime-type="image/png"><text:p/></draw:image></draw:frame></draw:g></text:p>
      <text:p text:style-name="P4"/>
      <text:p text:style-name="P4"/>
      <text:p text:style-name="P4"/>
      <text:p text:style-name="P4"/>
      <text:p text:style-name="P4"/>
      <text:p text:style-name="P4"/>
      <text:p text:style-name="P4"/>
      <text:p text:style-name="P4"/>
      <text:p text:style-name="P4"/>
      <text:p text:style-name="P98"/>
      <text:p text:style-name="P98"/>
      <text:p text:style-name="P7"><text:span text:style-name="T39">DISTRIBUCIÓ</text:span><text:span text:style-name="T38">: Manual d'</text:span><text:span text:style-name="T40">administrador</text:span></text:p>
      <text:p text:style-name="P103"><text:span text:style-name="T90">20</text:span><text:span text:style-name="T86"> d</text:span><text:span text:style-name="T87">'octubre </text:span><text:span text:style-name="T86">de 20</text:span><text:span text:style-name="T88">2</text:span><text:span text:style-name="T89">2</text:span></text:p>
      <text:p text:style-name="P101">Serveis d'Administració Electrònica en el Govern de les Illes Balears</text:p>
      <text:p text:style-name="P102">Lot 3 (Serveis de tramitació d'expedients electrònics)</text:p>
      <text:p text:style-name="P99"/>
      <text:p text:style-name="P100"/>
      <text:p text:style-name="P99"/>
      <text:p text:style-name="P99"/>
      <text:p text:style-name="P99"/>
      <text:p text:style-name="P99"/>
      <text:p text:style-name="P69">Oficina Tècnica de Direcció de Projecte</text:p>
      <text:h text:style-name="P144" text:outline-level="1" text:is-list-header="true"><text:bookmark-start text:name="_Toc511319541"/><text:bookmark-start text:name="__RefHeading___Toc1440_1726870378"/>Control de versions del document<text:bookmark-end text:name="_Toc511319541"/><text:bookmark-end text:name="__RefHeading___Toc1440_1726870378"/></text:h>
      <text:p text:style-name="P2"/>
      <table:table table:name="Tabla2" table:style-name="Tabla2">
        <table:table-column table:style-name="Tabla2.A"/>
        <table:table-column table:style-name="Tabla2.B"/>
        <table:table-column table:style-name="Tabla2.C"/>
        <table:table-column table:style-name="Tabla2.D"/>
        <table:table-row table:style-name="Tabla2.1">
          <table:table-cell table:style-name="Tabla2.A1" table:number-columns-spanned="4" office:value-type="string">
            <text:p text:style-name="P97">Control de Canvis</text:p>
          </table:table-cell>
          <table:covered-table-cell/>
          <table:covered-table-cell/>
          <table:covered-table-cell/>
        </table:table-row>
        <table:table-row table:style-name="Tabla2.1">
          <table:table-cell table:style-name="Tabla2.A2" office:value-type="string">
            <text:p text:style-name="P74">Data</text:p>
          </table:table-cell>
          <table:table-cell table:style-name="Tabla2.B2" office:value-type="string">
            <text:p text:style-name="P75">Autor</text:p>
          </table:table-cell>
          <table:table-cell table:style-name="Tabla2.B2" office:value-type="string">
            <text:p text:style-name="P75">Versió</text:p>
          </table:table-cell>
          <table:table-cell table:style-name="Tabla2.D2" office:value-type="string">
            <text:p text:style-name="P75">Canvis</text:p>
          </table:table-cell>
        </table:table-row>
        <table:table-row table:style-name="Tabla2.1">
          <table:table-cell table:style-name="Tabla2.A3" office:value-type="string">
            <text:p text:style-name="P79"><text:span text:style-name="T141">20</text:span>/<text:span text:style-name="T85">1</text:span>0/20<text:span text:style-name="T141">22</text:span></text:p>
          </table:table-cell>
          <table:table-cell table:style-name="Tabla2.B3" office:value-type="string">
            <text:p text:style-name="P79">Limit Tecnologies</text:p>
          </table:table-cell>
          <table:table-cell table:style-name="Tabla2.C3" office:value-type="string">
            <text:p text:style-name="P79">v1.0</text:p>
          </table:table-cell>
          <table:table-cell table:style-name="Tabla2.D3" office:value-type="string">
            <text:p text:style-name="P81">Part d'administració separada del manual d'usuari</text:p>
          </table:table-cell>
        </table:table-row>
        <table:table-row table:style-name="Tabla2.1">
          <table:table-cell table:style-name="Tabla2.A4" office:value-type="string">
            <text:p text:style-name="P83">1/10/2025</text:p>
          </table:table-cell>
          <table:table-cell table:style-name="Tabla2.B4" office:value-type="string">
            <text:p text:style-name="P79">Limit Tecnologies</text:p>
          </table:table-cell>
          <table:table-cell table:style-name="Tabla2.C4" office:value-type="string">
            <text:p text:style-name="P80">v1.0</text:p>
          </table:table-cell>
          <table:table-cell table:style-name="Tabla2.D4" office:value-type="string">
            <text:p text:style-name="P83">Afegir tipus de permisos de bustia</text:p>
          </table:table-cell>
        </table:table-row>
        <table:table-row table:style-name="Tabla2.1">
          <table:table-cell table:style-name="Tabla2.A5" office:value-type="string">
            <text:p text:style-name="P160">20/04/2026</text:p>
          </table:table-cell>
          <table:table-cell table:style-name="Tabla2.B5" office:value-type="string">
            <text:p text:style-name="P161">Limit Tecnologies</text:p>
          </table:table-cell>
          <table:table-cell table:style-name="Tabla2.C5" office:value-type="string">
            <text:p text:style-name="P162"><text:span text:style-name="T145">v</text:span>1.0.8</text:p>
          </table:table-cell>
          <table:table-cell table:style-name="Tabla2.D5" office:value-type="string">
            <text:p text:style-name="P160">Canvi <text:span text:style-name="T145">a la pagina d’anotacions</text:span></text:p>
          </table:table-cell>
        </table:table-row>
        <table:table-row table:style-name="Tabla2.1">
          <table:table-cell table:style-name="Tabla2.A6" office:value-type="string">
            <text:p text:style-name="P96"/>
          </table:table-cell>
          <table:table-cell table:style-name="Tabla2.B6" office:value-type="string">
            <text:p text:style-name="P96"/>
          </table:table-cell>
          <table:table-cell table:style-name="Tabla2.C6" office:value-type="string">
            <text:p text:style-name="P96"/>
          </table:table-cell>
          <table:table-cell table:style-name="Tabla2.D6" office:value-type="string">
            <text:p text:style-name="P96"/>
          </table:table-cell>
        </table:table-row>
      </table:table>
      <text:p text:style-name="P2"/>
      <text:p text:style-name="P2"/>
      <table:table table:name="Tabla3" table:style-name="Tabla3">
        <table:table-column table:style-name="Tabla3.A"/>
        <table:table-column table:style-name="Tabla3.B"/>
        <table:table-column table:style-name="Tabla3.C"/>
        <table:table-row table:style-name="Tabla3.1">
          <table:table-cell table:style-name="Tabla3.A1" table:number-columns-spanned="3" office:value-type="string">
            <text:p text:style-name="P97">Revisat per</text:p>
          </table:table-cell>
          <table:covered-table-cell/>
          <table:covered-table-cell/>
        </table:table-row>
        <table:table-row table:style-name="Tabla3.1">
          <table:table-cell table:style-name="Tabla3.A2" office:value-type="string">
            <text:p text:style-name="P74">Nom</text:p>
          </table:table-cell>
          <table:table-cell table:style-name="Tabla3.B2" office:value-type="string">
            <text:p text:style-name="P75">Data</text:p>
          </table:table-cell>
          <table:table-cell table:style-name="Tabla3.C2" office:value-type="string">
            <text:p text:style-name="P75">Àrea, departament o empresa</text:p>
          </table:table-cell>
        </table:table-row>
        <table:table-row table:style-name="Tabla3.1">
          <table:table-cell table:style-name="Tabla3.A3" office:value-type="string">
            <text:p text:style-name="P79"/>
          </table:table-cell>
          <table:table-cell table:style-name="Tabla3.B3" office:value-type="string">
            <text:p text:style-name="P79"/>
          </table:table-cell>
          <table:table-cell table:style-name="Tabla3.C3" office:value-type="string">
            <text:p text:style-name="P79"/>
          </table:table-cell>
        </table:table-row>
        <table:table-row table:style-name="Tabla3.1">
          <table:table-cell table:style-name="Tabla3.A4" office:value-type="string">
            <text:p text:style-name="P96"/>
          </table:table-cell>
          <table:table-cell table:style-name="Tabla3.B4" office:value-type="string">
            <text:p text:style-name="P96"/>
          </table:table-cell>
          <table:table-cell table:style-name="Tabla3.C4" office:value-type="string">
            <text:p text:style-name="P96"/>
          </table:table-cell>
        </table:table-row>
        <table:table-row table:style-name="Tabla3.1">
          <table:table-cell table:style-name="Tabla3.A5" office:value-type="string">
            <text:p text:style-name="P96"/>
          </table:table-cell>
          <table:table-cell table:style-name="Tabla3.B5" office:value-type="string">
            <text:p text:style-name="P96"/>
          </table:table-cell>
          <table:table-cell table:style-name="Tabla3.C5" office:value-type="string">
            <text:p text:style-name="P96"/>
          </table:table-cell>
        </table:table-row>
        <table:table-row table:style-name="Tabla3.1">
          <table:table-cell table:style-name="Tabla3.A6" office:value-type="string">
            <text:p text:style-name="P96"/>
          </table:table-cell>
          <table:table-cell table:style-name="Tabla3.B6" office:value-type="string">
            <text:p text:style-name="P96"/>
          </table:table-cell>
          <table:table-cell table:style-name="Tabla3.C6" office:value-type="string">
            <text:p text:style-name="P96"/>
          </table:table-cell>
        </table:table-row>
      </table:table>
      <text:p text:style-name="P2"/>
      <text:p text:style-name="P2"/>
      <table:table table:name="Tabla4" table:style-name="Tabla4">
        <table:table-column table:style-name="Tabla4.A"/>
        <table:table-column table:style-name="Tabla4.B"/>
        <table:table-column table:style-name="Tabla4.C"/>
        <table:table-row table:style-name="Tabla4.1">
          <table:table-cell table:style-name="Tabla4.A1" table:number-columns-spanned="3" office:value-type="string">
            <text:p text:style-name="P97">Aprovat per</text:p>
          </table:table-cell>
          <table:covered-table-cell/>
          <table:covered-table-cell/>
        </table:table-row>
        <table:table-row table:style-name="Tabla4.1">
          <table:table-cell table:style-name="Tabla4.A2" office:value-type="string">
            <text:p text:style-name="P74">Nom</text:p>
          </table:table-cell>
          <table:table-cell table:style-name="Tabla4.B2" office:value-type="string">
            <text:p text:style-name="P75">Data</text:p>
          </table:table-cell>
          <table:table-cell table:style-name="Tabla4.C2" office:value-type="string">
            <text:p text:style-name="P75">Àrea, departament o empresa</text:p>
          </table:table-cell>
        </table:table-row>
        <table:table-row table:style-name="Tabla4.1">
          <table:table-cell table:style-name="Tabla4.A3" office:value-type="string">
            <text:p text:style-name="P79"/>
          </table:table-cell>
          <table:table-cell table:style-name="Tabla4.B3" office:value-type="string">
            <text:p text:style-name="P79"/>
          </table:table-cell>
          <table:table-cell table:style-name="Tabla4.C3" office:value-type="string">
            <text:p text:style-name="P79"/>
          </table:table-cell>
        </table:table-row>
        <table:table-row table:style-name="Tabla4.1">
          <table:table-cell table:style-name="Tabla4.A4" office:value-type="string">
            <text:p text:style-name="P96"/>
          </table:table-cell>
          <table:table-cell table:style-name="Tabla4.B4" office:value-type="string">
            <text:p text:style-name="P96"/>
          </table:table-cell>
          <table:table-cell table:style-name="Tabla4.C4" office:value-type="string">
            <text:p text:style-name="P96"/>
          </table:table-cell>
        </table:table-row>
        <table:table-row table:style-name="Tabla4.1">
          <table:table-cell table:style-name="Tabla4.A5" office:value-type="string">
            <text:p text:style-name="P96"/>
          </table:table-cell>
          <table:table-cell table:style-name="Tabla4.B5" office:value-type="string">
            <text:p text:style-name="P96"/>
          </table:table-cell>
          <table:table-cell table:style-name="Tabla4.C5" office:value-type="string">
            <text:p text:style-name="P96"/>
          </table:table-cell>
        </table:table-row>
        <table:table-row table:style-name="Tabla4.1">
          <table:table-cell table:style-name="Tabla4.A6" office:value-type="string">
            <text:p text:style-name="P96"/>
          </table:table-cell>
          <table:table-cell table:style-name="Tabla4.B6" office:value-type="string">
            <text:p text:style-name="P96"/>
          </table:table-cell>
          <table:table-cell table:style-name="Tabla4.C6" office:value-type="string">
            <text:p text:style-name="P96"/>
          </table:table-cell>
        </table:table-row>
      </table:table>
      <text:p text:style-name="P2"/>
      <text:p text:style-name="P2"/>
      <table:table table:name="Tabla5" table:style-name="Tabla5">
        <table:table-column table:style-name="Tabla5.A"/>
        <table:table-column table:style-name="Tabla5.B"/>
        <table:table-column table:style-name="Tabla5.C"/>
        <table:table-row table:style-name="Tabla5.1">
          <table:table-cell table:style-name="Tabla5.A1" table:number-columns-spanned="3" office:value-type="string">
            <text:p text:style-name="P97">Llista de distribució</text:p>
          </table:table-cell>
          <table:covered-table-cell/>
          <table:covered-table-cell/>
        </table:table-row>
        <table:table-row table:style-name="Tabla5.1">
          <table:table-cell table:style-name="Tabla5.A2" office:value-type="string">
            <text:p text:style-name="P74">Nom</text:p>
          </table:table-cell>
          <table:table-cell table:style-name="Tabla5.B2" office:value-type="string">
            <text:p text:style-name="P75">Àrea, departament o empresa</text:p>
          </table:table-cell>
          <table:table-cell table:style-name="Tabla5.C2" office:value-type="string">
            <text:p text:style-name="P75">Correu electrònic</text:p>
          </table:table-cell>
        </table:table-row>
        <table:table-row table:style-name="Tabla5.1">
          <table:table-cell table:style-name="Tabla5.A3" office:value-type="string">
            <text:p text:style-name="P79"/>
          </table:table-cell>
          <table:table-cell table:style-name="Tabla5.B3" office:value-type="string">
            <text:p text:style-name="P79"/>
          </table:table-cell>
          <table:table-cell table:style-name="Tabla5.C3" office:value-type="string">
            <text:p text:style-name="P79"/>
          </table:table-cell>
        </table:table-row>
        <table:table-row table:style-name="Tabla5.1">
          <table:table-cell table:style-name="Tabla5.A4" office:value-type="string">
            <text:p text:style-name="P96"/>
          </table:table-cell>
          <table:table-cell table:style-name="Tabla5.B4" office:value-type="string">
            <text:p text:style-name="P96"/>
          </table:table-cell>
          <table:table-cell table:style-name="Tabla5.C4" office:value-type="string">
            <text:p text:style-name="P96"/>
          </table:table-cell>
        </table:table-row>
      </table:table>
      <text:p text:style-name="P65"/>
      <text:p text:style-name="P9"/>
      <text:p text:style-name="P8"/>
      <text:p text:style-name="P84"/>
      <text:p text:style-name="P84"/>
      <text:p text:style-name="P84"/>
      <text:p text:style-name="P84"/>
      <text:p text:style-name="P84"/>
      <text:p text:style-name="P84"/>
      <text:p text:style-name="P84"/>
      <text:p text:style-name="P84"><text:soft-page-break/>ÍNDEX</text:p>
      <text:p text:style-name="Standard"><text:alphabetical-index-mark text:string-value="1" text:key1="1" text:key2="1" text:main-entry="true"/><text:alphabetical-index-mark text:string-value="1" text:key1="1"/><text:alphabetical-index-mark text:string-value="1"/><text:alphabetical-index-mark text:string-value="xcv"/></text:p>
      <text:table-of-content text:style-name="Sect1" text:protected="true"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Sumario</text:p>
          </text:index-title>
          <text:p text:style-name="P131"><text:a xlink:type="simple" xlink:href="#__RefHeading___Toc1440_1726870378" text:style-name="Index_20_Link" text:visited-style-name="Index_20_Link">Control de versions del document<text:tab/>2</text:a></text:p>
          <text:p text:style-name="P131"><text:a xlink:type="simple" xlink:href="#__RefHeading___Toc32799_3233606579" text:style-name="Index_20_Link" text:visited-style-name="Index_20_Link"><text:s/>1 Introducció<text:tab/>3</text:a></text:p>
          <text:p text:style-name="P131"><text:a xlink:type="simple" xlink:href="#__RefHeading___Toc32803_3233606579" text:style-name="Index_20_Link" text:visited-style-name="Index_20_Link"><text:s/>2 Administrador<text:tab/>6</text:a></text:p>
          <text:p text:style-name="P140"><text:a xlink:type="simple" xlink:href="#__RefHeading___Toc2417_1085490558" text:style-name="Index_20_Link" text:visited-style-name="Index_20_Link">2.1. Configurar<text:tab/>6</text:a></text:p>
          <text:p text:style-name="P140"><text:a xlink:type="simple" xlink:href="#__RefHeading___Toc9027_678410495" text:style-name="Index_20_Link" text:visited-style-name="Index_20_Link">2.2. Configuració de bústies<text:tab/>6</text:a></text:p>
          <text:p text:style-name="P140"><text:a xlink:type="simple" xlink:href="#__RefHeading___Toc2423_1085490558" text:style-name="Index_20_Link" text:visited-style-name="Index_20_Link">2.3. Configuració d'unitats organitzatives<text:tab/>11</text:a></text:p>
          <text:p text:style-name="P140"><text:a xlink:type="simple" xlink:href="#__RefHeading___Toc2431_1085490558" text:style-name="Index_20_Link" text:visited-style-name="Index_20_Link">2.4. Configurar regles<text:tab/>13</text:a></text:p>
          <text:p text:style-name="P132"><text:a xlink:type="simple" xlink:href="#__RefHeading___Toc2433_1085490558" text:style-name="Index_20_Link" text:visited-style-name="Index_20_Link">2.4.1. Camps creació de nova regla<text:tab/>15</text:a></text:p>
          <text:p text:style-name="P132"><text:a xlink:type="simple" xlink:href="#__RefHeading___Toc78145_3965979134" text:style-name="Index_20_Link" text:visited-style-name="Index_20_Link">2.4.2. Camps del llistat de regles<text:tab/>16</text:a></text:p>
          <text:p text:style-name="P132"><text:a xlink:type="simple" xlink:href="#__RefHeading___Toc78147_3965979134" text:style-name="Index_20_Link" text:visited-style-name="Index_20_Link">2.4.3. Simulador de regles<text:tab/>17</text:a></text:p>
          <text:p text:style-name="P140"><text:a xlink:type="simple" xlink:href="#__RefHeading___Toc245158_3767406981" text:style-name="Index_20_Link" text:visited-style-name="Index_20_Link">2.5. Configurar Backoffice<text:tab/>18</text:a></text:p>
          <text:p text:style-name="P132"><text:a xlink:type="simple" xlink:href="#__RefHeading___Toc613630_3453696013" text:style-name="Index_20_Link" text:visited-style-name="Index_20_Link">2.5.1. Comunicació d’anotacions amb els backoffices<text:tab/>20</text:a></text:p>
          <text:p text:style-name="P140"><text:a xlink:type="simple" xlink:href="#__RefHeading___Toc2435_1085490558" text:style-name="Index_20_Link" text:visited-style-name="Index_20_Link">2.6. Configurar permisos de l'entitat<text:tab/>21</text:a></text:p>
          <text:p text:style-name="P140"><text:a xlink:type="simple" xlink:href="#__RefHeading___Toc2437_1085490558" text:style-name="Index_20_Link" text:visited-style-name="Index_20_Link">2.7. Consultar<text:tab/>22</text:a></text:p>
          <text:p text:style-name="P140"><text:a xlink:type="simple" xlink:href="#__RefHeading___Toc2439_1085490558" text:style-name="Index_20_Link" text:visited-style-name="Index_20_Link">2.8. Consultar continguts<text:tab/>22</text:a></text:p>
          <text:p text:style-name="P132"><text:a xlink:type="simple" xlink:href="#__RefHeading___Toc2441_10854905581" text:style-name="Index_20_Link" text:visited-style-name="Index_20_Link">2.8.1. Filtres<text:tab/>22</text:a></text:p>
          <text:p text:style-name="P132"><text:a xlink:type="simple" xlink:href="#__RefHeading___Toc2443_1085490558" text:style-name="Index_20_Link" text:visited-style-name="Index_20_Link">2.8.2. Llistat<text:tab/>23</text:a></text:p>
          <text:p text:style-name="P132"><text:a xlink:type="simple" xlink:href="#__RefHeading___Toc2445_1085490558" text:style-name="Index_20_Link" text:visited-style-name="Index_20_Link">2.8.3. Accions<text:tab/>23</text:a></text:p>
          <text:p text:style-name="P140"><text:a xlink:type="simple" xlink:href="#__RefHeading___Toc2447_1085490558" text:style-name="Index_20_Link" text:visited-style-name="Index_20_Link">2.9. Consultar anotacions de registre<text:tab/>24</text:a></text:p>
          <text:p text:style-name="P132"><text:a xlink:type="simple" xlink:href="#__RefHeading___Toc2449_1085490558" text:style-name="Index_20_Link" text:visited-style-name="Index_20_Link">2.9.1. Filtres<text:tab/>25</text:a></text:p>
          <text:p text:style-name="P132"><text:a xlink:type="simple" xlink:href="#__RefHeading___Toc2451_1085490558" text:style-name="Index_20_Link" text:visited-style-name="Index_20_Link">2.9.2. Llistat<text:tab/>26</text:a></text:p>
          <text:p text:style-name="P140"><text:a xlink:type="simple" xlink:href="#__RefHeading___Toc2447_10854905581" text:style-name="Index_20_Link" text:visited-style-name="Index_20_Link">2.10. Consultar anotacions de registre<text:tab/>26</text:a></text:p>
          <text:p text:style-name="P131"><text:a xlink:type="simple" xlink:href="#__RefHeading___Toc2775_1726870378" text:style-name="Index_20_Link" text:visited-style-name="Index_20_Link"><text:s/>3 Superusuari<text:tab/>30</text:a></text:p>
          <text:p text:style-name="P140"><text:a xlink:type="simple" xlink:href="#__RefHeading___Toc2399_1085490558" text:style-name="Index_20_Link" text:visited-style-name="Index_20_Link">3.1. Entitats<text:tab/>30</text:a></text:p>
          <text:p text:style-name="P132"><text:a xlink:type="simple" xlink:href="#__RefHeading___Toc2401_1085490558" text:style-name="Index_20_Link" text:visited-style-name="Index_20_Link">3.1.1. Llistat entitats<text:tab/>31</text:a></text:p>
          <text:p text:style-name="P132"><text:a xlink:type="simple" xlink:href="#__RefHeading___Toc2403_1085490558" text:style-name="Index_20_Link" text:visited-style-name="Index_20_Link">3.1.2. Nova entitat<text:tab/>31</text:a></text:p>
          <text:p text:style-name="P132"><text:a xlink:type="simple" xlink:href="#__RefHeading___Toc2405_1085490558" text:style-name="Index_20_Link" text:visited-style-name="Index_20_Link">3.1.3. Gestió de permisos<text:tab/>32</text:a></text:p>
          <text:p text:style-name="P132"><text:a xlink:type="simple" xlink:href="#__RefHeading___Toc2407_1085490558" text:style-name="Index_20_Link" text:visited-style-name="Index_20_Link">3.1.4. Accions (Permisos)<text:tab/>34</text:a></text:p>
          <text:p text:style-name="P132"><text:a xlink:type="simple" xlink:href="#__RefHeading___Toc2409_1085490558" text:style-name="Index_20_Link" text:visited-style-name="Index_20_Link">3.1.5. Accions (Entitats)<text:tab/>34</text:a></text:p>
          <text:p text:style-name="P140"><text:a xlink:type="simple" xlink:href="#__RefHeading___Toc2411_1085490558" text:style-name="Index_20_Link" text:visited-style-name="Index_20_Link">3.2. Monitoritzar<text:tab/>35</text:a></text:p>
          <text:p text:style-name="P132"><text:a xlink:type="simple" xlink:href="#__RefHeading___Toc2413_1085490558" text:style-name="Index_20_Link" text:visited-style-name="Index_20_Link">3.2.1. Monitorar integracions<text:tab/>35</text:a></text:p>
          <text:p text:style-name="P132"><text:a xlink:type="simple" xlink:href="#__RefHeading___Toc2415_1085490558" text:style-name="Index_20_Link" text:visited-style-name="Index_20_Link">3.2.2. Monitorar excepcions<text:tab/>36</text:a></text:p>
          <text:p text:style-name="P132"><text:a xlink:type="simple" xlink:href="#__RefHeading___Toc37404_3531032951" text:style-name="Index_20_Link" text:visited-style-name="Index_20_Link">3.2.3. Mètriques<text:tab/>37</text:a></text:p>
          <text:p text:style-name="P132"><text:a xlink:type="simple" xlink:href="#__RefHeading___Toc258224_83721363" text:style-name="Index_20_Link" text:visited-style-name="Index_20_Link">3.2.4. Monitor anotacions pendents d'Arxiu<text:tab/>38</text:a></text:p>
          <text:p text:style-name="P132"><text:a xlink:type="simple" xlink:href="#__RefHeading___Toc258224_837213631" text:style-name="Index_20_Link" text:visited-style-name="Index_20_Link">4.1.2.5. Monitor de sistema<text:tab/>39</text:a></text:p>
          <text:p text:style-name="P140"><text:a xlink:type="simple" xlink:href="#__RefHeading___Toc37406_35310329511" text:style-name="Index_20_Link" text:visited-style-name="Index_20_Link">3.3. Configuració<text:tab/>40</text:a></text:p>
          <text:p text:style-name="P132"><text:a xlink:type="simple" xlink:href="#__RefHeading___Toc258224_8372136311%20Copia%201" text:style-name="Index_20_Link" text:visited-style-name="Index_20_Link">3.3.1. Propietats de configuració<text:tab/>40</text:a></text:p>
          <text:p text:style-name="P140"><text:a xlink:type="simple" xlink:href="#__RefHeading___Toc37406_3531032951" text:style-name="Index_20_Link" text:visited-style-name="Index_20_Link">3.4. Avisos<text:tab/>41</text:a></text:p>
        </text:index-body>
      </text:table-of-content>
      <text:h text:style-name="Heading_20_1" text:outline-level="1"><text:bookmark-start text:name="__RefHeading___Toc32799_3233606579"/>Introducció<text:bookmark-end text:name="__RefHeading___Toc32799_3233606579"/></text:h>
      <text:p text:style-name="P11"/>
      <text:p text:style-name="P85"><text:span text:style-name="T42">L'aplicació de DISTRIBUCIO s'encarrega de rebre altes d'anotacions de registre via WS. </text:span><text:span text:style-name="T102">Aquestes anotacions de registre han d'anar destinades a entitat o unitat organitzativa arrel i poden anar destinades a una unitat organitzativa destinatària en concret. L'aplicació de DISTRIBUCIO s'encarrega de rebre i decidir la bústia destí. També és possible distribuir mitjançant regles específiques les anotacions de registre cap a aplicacions </text:span><text:span text:style-name="T103">backoffice </text:span><text:span text:style-name="T104">de DISTRIBUCIO.</text:span></text:p>
      <text:p text:style-name="P91"/>
      <text:p text:style-name="P91"><draw:frame draw:style-name="fr1" draw:name="Frame1" text:anchor-type="paragraph" svg:width="13.404cm" draw:z-index="51"><draw:text-box fo:min-height="3.048cm"><text:p text:style-name="fig."><draw:frame draw:style-name="fr14" draw:name="Image3" text:anchor-type="as-char" svg:width="13.404cm" style:rel-width="100%" svg:height="3.048cm" style:rel-height="scale" draw:z-index="108"><draw:image xlink:href="Pictures/10000000000002750000008FD442AA45.png" xlink:type="simple" xlink:show="embed" xlink:actuate="onLoad" draw:mime-type="image/png"/></draw:frame><text:span text:style-name="T105"><text:line-break/></text:span>fig. <text:sequence text:ref-name="reffig.0" text:name="fig." text:formula="ooow:fig.+1" style:num-format="1">1</text:sequence>: Logotip en la capçalera de l'aplicació de DISTRIBUCIO.</text:p></draw:text-box></draw:frame><text:soft-page-break/></text:p>
      <text:p text:style-name="P12">La interfície web de l'aplicació de DISTRIBUCIÓ permet l'accés a un usuari identificat i l'usuari pot ser de 3 tipus:</text:p>
      <text:p text:style-name="P77"/>
      <text:p text:style-name="P10"><text:span text:style-name="T2"><text:tab/>1. </text:span><text:a xlink:type="simple" xlink:href="#2.Usuari|outline" text:style-name="Internet_20_link" text:visited-style-name="Visited_20_Internet_20_Link"><text:span text:style-name="T2">Usuari</text:span></text:a><text:span text:style-name="T37">: Són els usuaris que poden gestionar anotacions de DISTRIBUCIO per a les bústies sobre les quals tinguin permís d'accés per a una entitat específica. El rol que ha de tenir l'usuari per accedir com a tipus usuari és DIS_USER. </text:span></text:p>
      <text:p text:style-name="P77"><text:tab/>2. <text:a xlink:type="simple" xlink:href="#3.Administrador|outline" text:style-name="Internet_20_link" text:visited-style-name="Visited_20_Internet_20_Link">Administrador</text:a><text:span text:style-name="T101">: Els usuaris de tipus administrador d'entitat pot gestionar bústies i permisos per a usuaris d'aquestes bústies per a les diferents unitats organitzatives que depenen de l'entitat arrel de l'entorn. El rol que ha de t</text:span><text:span text:style-name="T107">enir un usuari administrador per poder administrar entitats és DIS_ADMIN i ha de tenir permís d'administrador sobre l'entitat.</text:span></text:p>
      <text:p text:style-name="P76"><text:span text:style-name="T106"><text:tab/>3. </text:span><text:a xlink:type="simple" xlink:href="#4.Superusuari|outline" text:style-name="Internet_20_link" text:visited-style-name="Visited_20_Internet_20_Link"><text:span text:style-name="T107">Superusuari</text:span></text:a><text:span text:style-name="T107">: Els usuaris de tipus Superusuari poden definir entitats arrels i accedir a paràmetres i monitoratge de DISTRIBUCIO a nivell general. Per a que un usuari pugui actuar com a Superusuari ha de tenir el rol assignat de DIS_SUPER.</text:span></text:p>
      <text:p text:style-name="P86"><draw:frame draw:style-name="fr30" draw:name="Image5" text:anchor-type="paragraph" svg:x="14.418cm" svg:y="0.33cm" svg:width="0.688cm" svg:height="0.609cm" draw:z-index="60"><draw:image xlink:href="Pictures/100000000000001A0000001764E3CB42.png" xlink:type="simple" xlink:show="embed" xlink:actuate="onLoad" draw:mime-type="image/png"/></draw:frame></text:p>
      <text:p text:style-name="P87">Si un usuari té permís d'accés a més d'una entitat la pot escollir des del desplegable de la capçalera.</text:p>
      <text:p text:style-name="P87"/>
      <text:p text:style-name="P87"><draw:frame draw:style-name="fr1" draw:name="Frame2" text:anchor-type="paragraph" svg:width="12.885cm" draw:z-index="61"><draw:text-box fo:min-height="2.514cm"><text:p text:style-name="fig."><draw:frame draw:style-name="fr14" draw:name="Image6" text:anchor-type="as-char" svg:width="12.885cm" style:rel-width="100%" svg:height="2.514cm" style:rel-height="scale" draw:z-index="109"><draw:image xlink:href="Pictures/10000000000001E70000005F3D868FE3.png" xlink:type="simple" xlink:show="embed" xlink:actuate="onLoad" draw:mime-type="image/png"/></draw:frame><text:span text:style-name="T105"><text:line-break/></text:span>fig. <text:sequence text:ref-name="reffig.1" text:name="fig." text:formula="ooow:fig.+1" style:num-format="1">2</text:sequence>: Opció desplegable per seleccionar l'enitat amb què treballar.</text:p></draw:text-box></draw:frame></text:p>
      <text:p text:style-name="P87"/>
      <text:p text:style-name="P87"/>
      <text:p text:style-name="P87"/>
      <text:p text:style-name="P87"/>
      <text:p text:style-name="P87"/>
      <text:p text:style-name="P87"/>
      <text:p text:style-name="P87"><draw:frame draw:style-name="fr24" draw:name="Image7" text:anchor-type="paragraph" svg:x="2.021cm" svg:y="0.459cm" svg:width="0.635cm" svg:height="0.503cm" draw:z-index="62"><draw:image xlink:href="Pictures/100000000000001800000013C4DED6E2.png" xlink:type="simple" xlink:show="embed" xlink:actuate="onLoad" draw:mime-type="image/png"/></draw:frame>Si un usuari disposa de diferents rols llavors pot pot escollir el rol amb què treballar amb el menú desplegable de la capçalera.</text:p>
      <text:p text:style-name="P87"/>
      <text:p text:style-name="P87"><draw:frame draw:style-name="fr1" draw:name="Frame3" text:anchor-type="paragraph" svg:width="10.689cm" draw:z-index="63"><draw:text-box fo:min-height="2.672cm"><text:p text:style-name="fig."><draw:frame draw:style-name="fr14" draw:name="Image8" text:anchor-type="as-char" svg:width="10.689cm" style:rel-width="100%" svg:height="2.672cm" style:rel-height="scale" draw:z-index="110"><draw:image xlink:href="Pictures/10000000000001940000006567358005.png" xlink:type="simple" xlink:show="embed" xlink:actuate="onLoad" draw:mime-type="image/png"/></draw:frame><text:span text:style-name="T105"><text:line-break/></text:span>fig. <text:sequence text:ref-name="reffig.2" text:name="fig." text:formula="ooow:fig.+1" style:num-format="1">3</text:sequence>: Opció desplegable per seleccionar el tipus d'usuari amb què fer feina.</text:p></draw:text-box></draw:frame></text:p>
      <text:p text:style-name="P87"><text:soft-page-break/></text:p>
      <text:p text:style-name="P135"><draw:frame draw:style-name="fr41" draw:name="Image10" text:anchor-type="paragraph" svg:x="3.122cm" svg:y="0.471cm" svg:width="0.556cm" svg:height="0.609cm" draw:z-index="64"><draw:image xlink:href="Pictures/1000000000000015000000172198EC24.png" xlink:type="simple" xlink:show="embed" xlink:actuate="onLoad" draw:mime-type="image/png"/></draw:frame><text:span text:style-name="T108">Segons el tipus d'usuari seleccionat l'usuari tindrà accés a diferents opcions i pantalle</text:span><text:span text:style-name="T109">s</text:span><text:span text:style-name="T108"> que es descriuen en els següents apartats.</text:span><text:span text:style-name="T109"> </text:span></text:p>
      <text:p text:style-name="P88"/>
      <text:p text:style-name="P89"/>
      <text:h text:style-name="P145" text:outline-level="1"><text:bookmark-start text:name="__RefHeading___Toc32803_3233606579"/>Administrador<text:bookmark-end text:name="__RefHeading___Toc32803_3233606579"/></text:h>
      <text:p text:style-name="P90">Quan l'usuari escull el tipus d'usuari Administrador apareixen un seguit d'opcions per administrar l'entitat seleccionada sobre la qual té permís d'administració. <text:s/>Les diferents opcions són:</text:p>
      <text:list text:style-name="L1">
        <text:list-item>
          <text:p text:style-name="P158">Configurar</text:p>
          <text:list>
            <text:list-item>
              <text:p text:style-name="P158">Bústies</text:p>
            </text:list-item>
            <text:list-item>
              <text:p text:style-name="P158">Unitats Oranitzatives</text:p>
            </text:list-item>
            <text:list-item>
              <text:p text:style-name="P158">Regles</text:p>
            </text:list-item>
            <text:list-item>
              <text:p text:style-name="P158">Permisos de l'entitat</text:p>
            </text:list-item>
          </text:list>
        </text:list-item>
        <text:list-item>
          <text:p text:style-name="P158">Consultar</text:p>
          <text:list>
            <text:list-item>
              <text:p text:style-name="P158">Continguts</text:p>
            </text:list-item>
            <text:list-item>
              <text:p text:style-name="P158">Anotacions de registre</text:p>
            </text:list-item>
          </text:list>
        </text:list-item>
      </text:list>
      <text:p text:style-name="P90">En els propers subapartats es detallen les diferents opcions del menú.</text:p>
      <text:p text:style-name="P90"/>
      <text:p text:style-name="P90"/>
      <text:p text:style-name="P90"/>
      <text:p text:style-name="P90"/>
      <text:p text:style-name="P90"/>
      <text:p text:style-name="P90"/>
      <text:p text:style-name="P90"/>
      <text:p text:style-name="P90"/>
      <text:p text:style-name="P90"/>
      <text:p text:style-name="P90"/>
      <text:h text:style-name="Heading_20_2" text:outline-level="2"><text:bookmark-start text:name="__RefHeading___Toc2417_1085490558"/>Configurar<text:bookmark-end text:name="__RefHeading___Toc2417_1085490558"/></text:h>
      <text:p text:style-name="P49">Si polsem el boto de configurar s'ens desplegaran cinc opcions més:</text:p>
      <text:p text:style-name="P49"><draw:frame draw:style-name="fr13" draw:name="Frame44" text:anchor-type="as-char" svg:width="8.493cm" draw:z-index="77"><draw:text-box fo:min-height="6.138cm"><text:p text:style-name="fig."><draw:frame draw:style-name="fr25" draw:name="Imagen34" text:anchor-type="paragraph" svg:width="8.493cm" style:rel-width="100%" svg:height="6.138cm" style:rel-height="scale" draw:z-index="78"><draw:image xlink:href="Pictures/1000000000000141000000E8FFB2FA52.png" xlink:type="simple" xlink:show="embed" xlink:actuate="onLoad" draw:mime-type="image/png"/></draw:frame>fig. <text:sequence text:ref-name="reffig.3" text:name="fig." text:formula="ooow:fig.+1" style:num-format="1">4</text:sequence>: Detall del botó de configurar amb les seves opcions. </text:p></draw:text-box></draw:frame></text:p>
      <text:p text:style-name="P50">A partir d'aquestes opcions accedirem a les distintes configuracions.</text:p>
      <text:h text:style-name="Heading_20_2" text:outline-level="2"><text:bookmark-start text:name="__RefHeading___Toc9027_678410495"/>Configuració de bústies<text:bookmark-end text:name="__RefHeading___Toc9027_678410495"/></text:h>
      <text:p text:style-name="P52"><text:span text:style-name="T131">Quan se selecciona la opció del menú "Configurar &gt; Bústies" s'accedeix a la configuració de les bústies </text:span>amb un filtre superior per facilitar-ne la cerca:</text:p>
      <text:p text:style-name="P51"><draw:frame draw:style-name="fr40" draw:name="Image39" text:anchor-type="paragraph" svg:width="17cm" svg:height="3.286cm" draw:z-index="65"><draw:image xlink:href="Pictures/10000000000004F2000001CE718C8F1F.png" xlink:type="simple" xlink:show="embed" xlink:actuate="onLoad" draw:mime-type="image/png"/></draw:frame><text:soft-page-break/></text:p>
      <text:p text:style-name="P51">Podrem filtrar per el nom de la bústia,<text:span text:style-name="T129"> per codi d'unitat organitzativa superior o </text:span>per la unitat organitzativa<text:span text:style-name="T129">. També es poden filtrar per </text:span>si està pendent de gestionar<text:span text:style-name="T129">, si és una bústia per defecte i per si està activa</text:span>.<text:span text:style-name="T129"> </text:span>El filtre tindrà una opció per netejar-lo, i fer que surtin tots els registres sens filtre.</text:p>
      <text:p text:style-name="P57">Amb el botó <draw:frame draw:style-name="fr39" draw:name="Image41" text:anchor-type="as-char" svg:y="-0.466cm" svg:width="1.522cm" svg:height="0.651cm" draw:z-index="111"><draw:image xlink:href="Pictures/100000000000005900000026A8ADC43B.png" xlink:type="simple" xlink:show="embed" xlink:actuate="onLoad" draw:mime-type="image/png"/></draw:frame><text:span text:style-name="T130"><text:s/>és possible descarregar una fulla XLS amb el lllistat d'usuaris per bústia.</text:span></text:p>
      <text:p text:style-name="P58">El resultat és<text:span text:style-name="T132"> organigrama de bústes o </text:span><text:s/>un llistat de bústies o un arbre segons el tipus de vista escollit. Es pot alternar entre llistat i arbre amb el botó "Canvi vista"<text:span text:style-name="T132"> </text:span><text:span text:style-name="T132"><draw:frame draw:style-name="fr29" draw:name="Image45" text:anchor-type="as-char" svg:y="-0.353cm" svg:width="1.773cm" svg:height="0.748cm" draw:z-index="112"><draw:image xlink:href="Pictures/100000000000005A00000026F8B00DC6.png" xlink:type="simple" xlink:show="embed" xlink:actuate="onLoad" draw:mime-type="image/png"/></draw:frame></text:span>.<text:span text:style-name="T132"> Tant l'organigrama de bústies en forma d'arbre permetes les mateixes accions però presentades de forma diferent. </text:span></text:p>
      <text:p text:style-name="P53">Aquesta pantalla tindrà també un botó de creació de busties <draw:frame draw:style-name="fr29" draw:name="Image44" text:anchor-type="as-char" svg:y="-0.58cm" svg:width="2.053cm" svg:height="0.642cm" draw:z-index="113"><draw:image xlink:href="Pictures/100000000000007000000023DE0D7229.png" xlink:type="simple" xlink:show="embed" xlink:actuate="onLoad" draw:mime-type="image/png"/></draw:frame>el qual si el polsem s'ens obrira una modal amb un formulari que si omplim correctament podrem crear una nova bústia.</text:p>
      <text:p text:style-name="P53"/>
      <text:p text:style-name="P58"/>
      <text:p text:style-name="P51"><draw:frame draw:style-name="fr36" draw:name="Imagen36" text:anchor-type="paragraph" svg:width="17cm" svg:height="5.138cm" draw:z-index="52"><draw:image xlink:href="Pictures/10000000000003A50000011A191EDCE7.png" xlink:type="simple" xlink:show="embed" xlink:actuate="onLoad" draw:mime-type="image/png"/></draw:frame>Els camps seran: </text:p>
      <text:list text:style-name="L2">
        <text:list-item>
          <text:p text:style-name="P163">Unitat organitzativa: <text:span text:style-name="T63">Que la seleccionarem cercant 3 caràcters en el component i triant la unitat organitzativa.</text:span><text:span text:style-name="T75"> Si la unitat organitzativa està obsoleta estarà marcada amb un senyal d'advertència.</text:span></text:p>
        </text:list-item>
      </text:list>
      <text:p text:style-name="P22"><draw:frame draw:style-name="fr38" draw:name="Image40" text:anchor-type="paragraph" svg:width="17cm" svg:height="7.498cm" draw:z-index="66"><draw:image xlink:href="Pictures/100000000000031E00000160EE59E714.png" xlink:type="simple" xlink:show="embed" xlink:actuate="onLoad" draw:mime-type="image/png"/></draw:frame><text:soft-page-break/></text:p>
      <text:list text:continue-numbering="true" text:style-name="L2">
        <text:list-item>
          <text:p text:style-name="P163">Nom: <text:span text:style-name="T63">Aquí haurem de posar el nom que volem per la bústia.</text:span></text:p>
        </text:list-item>
      </text:list>
      <text:p text:style-name="P23">A continuació del botó de creació tindrem el llistat, el qual al mateix temps que el filtre, podrem ordenar ascendent-ment i descendent-ment els registres amb les capçaleres de les columnes del llistat depenent del camp triat.</text:p>
      <text:p text:style-name="P23"><draw:frame draw:style-name="fr23" draw:name="Imagen38" text:anchor-type="paragraph" svg:width="17cm" svg:height="1.053cm" draw:z-index="53"><draw:image xlink:href="Pictures/1000000000000387000000381DF5DF64.png" xlink:type="simple" xlink:show="embed" xlink:actuate="onLoad" draw:mime-type="image/png"/></draw:frame>Tot seguit aquests camps tindrem dos botons més per cada registre:</text:p>
      <text:p text:style-name="P24"><draw:frame draw:style-name="fr37" draw:name="Imagen39" text:anchor-type="paragraph" svg:width="6.694cm" svg:height="1.508cm" draw:z-index="54"><draw:image xlink:href="Pictures/10000000000000FD00000039762F8AFE.png" xlink:type="simple" xlink:show="embed" xlink:actuate="onLoad" draw:mime-type="image/png"/></draw:frame>Les accions que es poden realitzar sobre les bústies són les següents:</text:p>
      <text:p text:style-name="P24"><draw:frame draw:style-name="fr15" draw:name="Imagen52" text:anchor-type="paragraph" svg:width="8.414cm" svg:height="4.895cm" draw:z-index="59"><draw:image xlink:href="Pictures/100000000000013E000000B9CD63DA2E.png" xlink:type="simple" xlink:show="embed" xlink:actuate="onLoad" draw:mime-type="image/png"/></draw:frame></text:p>
      <text:list text:style-name="L3">
        <text:list-item>
          <text:p text:style-name="P164">Modificar: <text:span text:style-name="T63">Permet canviar la unitat organitzativa i el nom de la bústia.</text:span><text:span text:style-name="T76"> Dins de la modal de modificació de la bústia és possible consultar en una taula els diferents usuaris que hi tenen accés i si hi tenen accés per permís directe de l'usuari o per algun rol assignat.</text:span></text:p>
        </text:list-item>
        <text:list-item>
          <text:p text:style-name="P164"><draw:frame draw:style-name="fr12" draw:name="Frame15" text:anchor-type="paragraph" svg:width="16.365cm" draw:z-index="67"><draw:text-box fo:min-height="8.396cm"><text:p text:style-name="fig."><draw:frame draw:style-name="fr14" draw:name="Image42" text:anchor-type="as-char" svg:width="16.263cm" style:rel-width="100%" svg:height="8.343cm" style:rel-height="scale" draw:z-index="114"><draw:image xlink:href="Pictures/100000000000031F0000019A901F02EC.png" xlink:type="simple" xlink:show="embed" xlink:actuate="onLoad" draw:mime-type="image/png"/></draw:frame><text:span text:style-name="T105"><text:line-break/></text:span>fig. <text:sequence text:ref-name="reffig.4" text:name="fig." text:formula="ooow:fig.+1" style:num-format="1">5</text:sequence>: Modal per modificar una bústia amb el llistat d'usuari que hi tenen accés.</text:p></draw:text-box></draw:frame><text:soft-page-break/>Marcar per defecte:<text:span text:style-name="T63"> La bústia es marcarà per defecte en la seva unitat organitzativa.</text:span></text:p>
        </text:list-item>
        <text:list-item>
          <text:p text:style-name="P164">Desactivar:<text:span text:style-name="T63"> Desactiva la bústia i ja no se li podran enviar anotacions de registre. Tampoc es veurà per defecte el seu contingut en la vista per l'usuari.</text:span></text:p>
        </text:list-item>
        <text:list-item>
          <text:p text:style-name="P164">Moure anotacions:<text:span text:style-name="T63"> Aquesta opció serveix per moure totes les anotacions de registre de la bústia. És útil quan s'han de reestructurar les bústies. Permet inserir un comentari en el moviment i s'enregistra el moviment en els logs.</text:span></text:p>
        </text:list-item>
        <text:list-item>
          <text:p text:style-name="P164">Esborrar<text:span text:style-name="T63">: Esborra la bústia.</text:span></text:p>
        </text:list-item>
      </text:list>
      <text:p text:style-name="P23"/>
      <text:p text:style-name="P39">Per gestionar els permisos d'una <text:span text:style-name="T82">bústia</text:span> haurem de polsar el bot<text:span text:style-name="T82">ó</text:span> amb el símbol de la clau assenyalat a la imatge anterior, el botó també ens mostrarà els permisos que té actualment.</text:p>
      <text:p text:style-name="P39">Una vegada polsat el botó apareixerà la següent pantalla amb les següents columnes, i un botó de creació de permisos: </text:p>
      <text:p text:style-name="P39"><draw:frame draw:style-name="fr36" draw:name="Imagen40" text:anchor-type="paragraph" svg:width="17cm" svg:height="5.461cm" draw:z-index="55"><draw:image xlink:href="Pictures/10000000000003720000010BF24E6EFA.png" xlink:type="simple" xlink:show="embed" xlink:actuate="onLoad" draw:mime-type="image/png"/></draw:frame></text:p>
      <text:list text:style-name="L4">
        <text:list-item>
          <text:p text:style-name="P165"><text:soft-page-break/>Tipus: <text:span text:style-name="T63">Es el tipus de permís que volem crear.</text:span></text:p>
        </text:list-item>
        <text:list-item>
          <text:p text:style-name="P166">Principal: <text:span text:style-name="T63">Es l'usuari pel qual va destinat el permís.</text:span><text:span text:style-name="T46"/></text:p>
        </text:list-item>
        <text:list-item>
          <text:p text:style-name="P166"><text:span text:style-name="T144">Descripció:</text:span><text:span text:style-name="T80"> La descripció de l’usuar</text:span><text:span text:style-name="T63">i pel qual va destinat el permís</text:span><text:span text:style-name="T80">.</text:span></text:p>
        </text:list-item>
        <text:list-item>
          <text:p text:style-name="P166"><text:span text:style-name="T144">Accés:</text:span><text:span text:style-name="T80"> El tipus d’accés que te l’usuari.</text:span></text:p>
        </text:list-item>
        <text:list-item>
          <text:p text:style-name="P168">Accions: <text:span text:style-name="T63">Els permisos tindran una serie de accions per interactuar amb ells.</text:span></text:p>
        </text:list-item>
      </text:list>
      <text:p text:style-name="P20">Aquests mateixos camps sortiran a la modal de creació de permisos:</text:p>
      <text:p text:style-name="P20"><draw:frame draw:style-name="fr36" draw:name="Imagen41" text:anchor-type="paragraph" svg:width="17cm" svg:height="5.948cm" draw:z-index="56"><draw:image xlink:href="Pictures/100000000000038E000001243AEE8BCD.png" xlink:type="simple" xlink:show="embed" xlink:actuate="onLoad" draw:mime-type="image/png"/></draw:frame></text:p>
      <text:p text:style-name="P20">A la qual si els omplim correctament i polsem el botó de guardar li crearem el permís a <text:span text:style-name="T82">la bústia</text:span> corresponent.</text:p>
      <text:p text:style-name="P30">Les accions que es poden realitzar sobre els permisos són:</text:p>
      <text:list text:style-name="L5">
        <text:list-item>
          <text:p text:style-name="P169">Modificar: <text:s/><text:span text:style-name="T63">S'obrirà una modal en la qual podrem modificar tots els camps del permís.</text:span></text:p>
        </text:list-item>
        <text:list-item>
          <text:p text:style-name="P169">Esborrar: <text:span text:style-name="T63">S'obrira un panell de confirmació per saber si realment vols esborrar el permís.</text:span></text:p>
        </text:list-item>
      </text:list>
      <text:p text:style-name="P30">En el cas d'administrar les bústies amb la vista en forma d'arbre organigrama es visualitzarà a l'esquerra l'arbre amb les diferents bústies i en el cas de prémer sobre alguna bústia es carregarà a la part dreta de la pantalla les dades i opcions per modificar la bústia i els permisos.</text:p>
      <text:p text:style-name="P30"><draw:frame draw:style-name="fr1" draw:name="Frame16" text:anchor-type="paragraph" svg:width="17cm" draw:z-index="68"><draw:text-box fo:min-height="9.31cm"><text:p text:style-name="fig."><draw:frame draw:style-name="fr14" draw:name="Image46" text:anchor-type="as-char" svg:width="17cm" style:rel-width="100%" svg:height="9.31cm" style:rel-height="scale" draw:z-index="115"><draw:image xlink:href="Pictures/100000000000066E000003358D070C06.png" xlink:type="simple" xlink:show="embed" xlink:actuate="onLoad" draw:mime-type="image/png"/></draw:frame><text:span text:style-name="T105"><text:line-break/></text:span>fig. <text:sequence text:ref-name="reffig.5" text:name="fig." text:formula="ooow:fig.+1" style:num-format="1">6</text:sequence>: Administració de bústies amb la vista d'arbre o organigrama.</text:p></draw:text-box></draw:frame><text:soft-page-break/></text:p>
      <text:h text:style-name="Heading_20_2" text:outline-level="2"><text:bookmark-start text:name="__RefHeading___Toc2423_1085490558"/>Configuració d'unitats organitzatives<text:bookmark-end text:name="__RefHeading___Toc2423_1085490558"/></text:h>
      <text:p text:style-name="P108"><text:span text:style-name="T51">L</text:span><text:span text:style-name="T52">a pantalla de configuració d'unitats organitzatives serveix per comprovar l'arbre actual </text:span><text:span text:style-name="T115">i les unitats organitzatives amb un filtre i un llistat o també permet visualitzar l'arbre d'unitats vigents i sincronitzar els canvis amb l'aplicació externa DIR3.</text:span></text:p>
      <text:p text:style-name="P117"><draw:frame draw:style-name="fr35" draw:name="Image43" text:anchor-type="paragraph" svg:width="17cm" svg:height="5.964cm" draw:z-index="69"><draw:image xlink:href="Pictures/10000000000004D8000001B38366D8E4.png" xlink:type="simple" xlink:show="embed" xlink:actuate="onLoad" draw:mime-type="image/png"/></draw:frame></text:p>
      <text:p text:style-name="P109"><text:span text:style-name="T115">E</text:span><text:span text:style-name="T114">l filtre permet filtrar les unitats organitzatives per codi DIR3, denominació, codi d'unitat superior o estat.</text:span></text:p>
      <text:p text:style-name="P104"><text:span text:style-name="T116">E</text:span><text:span text:style-name="T117">l</text:span><text:span text:style-name="T54"> llistat </text:span><text:span text:style-name="T116">c</text:span><text:span text:style-name="T117">onté </text:span><text:span text:style-name="T54">5 columnes amb possibilitat </text:span><text:span text:style-name="T116">d</text:span><text:span text:style-name="T117">'</text:span><text:span text:style-name="T54">ordenar ascendent i descendent</text:span><text:span text:style-name="T53"> per columna. Les columnes són les següents:</text:span></text:p>
      <text:list text:style-name="L6">
        <text:list-item>
          <text:p text:style-name="P173"><text:soft-page-break/>Codi.</text:p>
        </text:list-item>
        <text:list-item>
          <text:p text:style-name="P173">Denominació.</text:p>
        </text:list-item>
        <text:list-item>
          <text:p text:style-name="P209"><text:span text:style-name="T110">U</text:span><text:span text:style-name="T111">nitat pare: </text:span><text:span text:style-name="T113">Unitat organitzativa immediatament superior.</text:span></text:p>
        </text:list-item>
        <text:list-item>
          <text:p text:style-name="P209"><text:span text:style-name="T110">U</text:span><text:span text:style-name="T45">nitat arrel</text:span><text:span text:style-name="T44">:</text:span><text:span text:style-name="T48"> Unitat organitzativa de segon nivell.</text:span></text:p>
        </text:list-item>
        <text:list-item>
          <text:p text:style-name="P210">Estat.</text:p>
        </text:list-item>
      </text:list>
      <text:p text:style-name="P59"/>
      <text:p text:style-name="P61">A més, a la pantalla hi ha dos botons per mostrar un arbre amb les unitats organitzatives vigents i un altre per sincronitzar la informació dels canvis amb DIR3. El detall de les accions és el següent:</text:p>
      <text:list text:style-name="L7">
        <text:list-item>
          <text:p text:style-name="P197"><text:span text:style-name="T95">Mostrar arbre d'unitats vigents: </text:span><text:span text:style-name="T69">Aquest botó obrira una modal en la qual es mostraran totes les unitats organitzatives disponibles:</text:span></text:p>
        </text:list-item>
      </text:list>
      <text:p text:style-name="P32"><draw:frame draw:style-name="fr24" draw:name="Imagen45" text:anchor-type="paragraph" svg:x="0cm" svg:y="0.122cm" svg:width="17cm" svg:height="12.577cm" draw:z-index="85"><draw:image xlink:href="Pictures/100000000000038B0000029F35E8C63B.png" xlink:type="simple" xlink:show="embed" xlink:actuate="onLoad" draw:mime-type="image/png"/></draw:frame></text:p>
      <text:p text:style-name="P25">Aquesta modal contindrà tres botons que serviran per interactuar amb l'arbre.</text:p>
      <text:list text:style-name="L8">
        <text:list-item>
          <text:p text:style-name="P198"><text:span text:style-name="T95">Expandeix tots: </text:span><text:span text:style-name="T69">Expandira totes les unitats amb més unitats filles.</text:span></text:p>
        </text:list-item>
        <text:list-item>
          <text:p text:style-name="P174">Expandeix seleccionat: <text:span text:style-name="T63">Expandira, únicament, la unitat seleccionada.</text:span></text:p>
        </text:list-item>
        <text:list-item>
          <text:p text:style-name="P174"><text:soft-page-break/>Contreu tots: <text:span text:style-name="T63">Tancarà tot l'arbre com a l'inici.</text:span></text:p>
        </text:list-item>
      </text:list>
      <text:p text:style-name="P25"/>
      <text:list text:style-name="L9">
        <text:list-item>
          <text:p text:style-name="P175">Sincronitzar: <text:span text:style-name="T70">Aquest botó sincronitzara les unitats amb les dades del </text:span><text:span text:style-name="T98">DIR3. </text:span><text:span text:style-name="T71">Després ens mostrarà els canvis que es duran a terme si es polsa el boto de sincronitzar per aplicar els canvis.</text:span></text:p>
        </text:list-item>
      </text:list>
      <text:p text:style-name="P27"><text:tab/>Si hi ha canvis se’ns mostraran les possibles noves unitats i les substitucions que puguin existir. A més, tindrem dos botons: un per acceptar la sincronització (Sincronitzar) i altre per cancel·lar-la (Cancel·lar):</text:p>
      <text:p text:style-name="P26"><draw:frame draw:style-name="fr3" draw:name="Frame45" text:anchor-type="as-char" svg:y="0cm" svg:width="17cm" style:rel-width="scale" svg:height="8.094cm" style:rel-height="scale-min" draw:z-index="116"><draw:text-box><text:p text:style-name="fig.">fig. <text:sequence text:ref-name="reffig.6" text:name="fig." text:formula="ooow:fig.+1" style:num-format="1">7</text:sequence>: Modal on es veuen els canvis abans d’acceptar la sincronització. </text:p></draw:text-box></draw:frame></text:p>
      <text:p text:style-name="P62"/>
      <text:p text:style-name="P92">Si no es troben canvis apareixerà la següent pantalla:</text:p>
      <text:p text:style-name="P93"><draw:frame draw:style-name="fr34" draw:name="Imagen49" text:anchor-type="paragraph" svg:width="17cm" style:rel-width="scale" svg:height="4.722cm" style:rel-height="scale" draw:z-index="88"><draw:image xlink:href="Pictures/100000000000038B000000FC93CCC07A.png" xlink:type="simple" xlink:show="embed" xlink:actuate="onLoad" draw:mime-type="image/png"/></draw:frame></text:p>
      <text:p text:style-name="P63"><text:bookmark-start text:name="__RefHeading___Toc2425_1085490558"/><text:bookmark-end text:name="__RefHeading___Toc2425_1085490558"/></text:p>
      <text:h text:style-name="Heading_20_2" text:outline-level="2"><text:bookmark-start text:name="__RefHeading___Toc2431_1085490558"/>Configurar regles<text:bookmark-end text:name="__RefHeading___Toc2431_1085490558"/></text:h>
      <text:p text:style-name="P54"><text:span text:style-name="T84">U</text:span>na vegada <text:span text:style-name="T140">accedeixes</text:span> com administrador i selecciones la configuració de regles apareixerem a la pantalla següent:</text:p>
      <text:p text:style-name="P54"><draw:frame draw:style-name="fr11" draw:name="Frame46" text:anchor-type="paragraph" svg:width="17cm" draw:z-index="82"><draw:text-box fo:min-height="6.405cm"><text:p text:style-name="fig."><draw:frame draw:style-name="fr23" draw:name="Imatge7" text:anchor-type="char" svg:width="16.898cm" svg:height="5.588cm" draw:z-index="97"><draw:image xlink:href="Pictures/10000001000004F0000001A2BA957159.png" xlink:type="simple" xlink:show="embed" xlink:actuate="onLoad" draw:mime-type="image/png"/></draw:frame></text:p><text:p text:style-name="fig.">fig. <text:sequence text:ref-name="reffig.7" text:name="fig." text:formula="ooow:fig.+1" style:num-format="1">8</text:sequence>: Vista de l’apartat de regles amb el formulari de filtratge i el llistat.</text:p></draw:text-box></draw:frame><text:soft-page-break/></text:p>
      <text:p text:style-name="P60">Les regles són accions automàtiques que s'apliquen quan arriben les anotacions de registre o quan es classifiquen amb un codi de procediment i poden ser del tipus moure a bústia, reenviar a una altre unitat organitzativa o enviar al backoffice. S'apliquen segons els camps de filtre d'unitat organitzativa, bústia o codis de procediment o d'assumpte. Com és filtres informat tingui més restrictives són a l'hora d'aplicar-se. En cas de poder-se aplicar dues regles només s'aplicarà la primera per ordre en el llistat. Un cop aplicada la regla es tornarà a mirar si hi ha cap altra regla que apliqui després de moure de bústia o de reenviar a una altra unitat organitzativa. Si s'envia a un backoffice de Distribució ja no s'aplicaran més regles. Per saber quines regles s'aplicaran segons les dades de l'anotació de registre es pot utilitzar l'opció del simulador.</text:p>
      <text:p text:style-name="P54">Com hi sol haver a tots els llistats hi ha un botó de creació de registres que ens obrira una modal de creació, en aquest cas, de regles:</text:p>
      <text:p text:style-name="P54"/>
      <text:p text:style-name="Standard"><draw:frame draw:style-name="fr10" draw:name="Frame47" text:anchor-type="paragraph" svg:x="0.515cm" svg:y="-0.286cm" svg:width="15.73cm" draw:z-index="83"><draw:text-box fo:min-height="13.594cm"><text:p text:style-name="fig."><draw:frame draw:style-name="fr33" draw:name="Imatge21" text:anchor-type="char" svg:width="15.628cm" svg:height="14.771cm" draw:z-index="98"><draw:image xlink:href="Pictures/100000010000026D0000024BD43D0242.png" xlink:type="simple" xlink:show="embed" xlink:actuate="onLoad" draw:mime-type="image/png"/></draw:frame></text:p><text:p text:style-name="fig.">fig. <text:sequence text:ref-name="reffig.8" text:name="fig." text:formula="ooow:fig.+1" style:num-format="1">9</text:sequence>: Formulari per crear una nova regla<text:span text:style-name="T137">.</text:span></text:p></draw:text-box></draw:frame><text:soft-page-break/></text:p>
      <text:h text:style-name="Heading_20_3" text:outline-level="3"><text:bookmark-start text:name="__RefHeading___Toc2433_1085490558"/>Camps creació de nova regla<text:bookmark-end text:name="__RefHeading___Toc2433_1085490558"/></text:h>
      <text:list text:style-name="L10">
        <text:list-item>
          <text:p text:style-name="P176">Dades comunes: </text:p>
          <text:list>
            <text:list-item>
              <text:p text:style-name="P177">Nom <text:span text:style-name="T99">(Obligatori)</text:span>: <text:span text:style-name="T72">Nom per la regla.</text:span></text:p>
            </text:list-item>
            <text:list-item>
              <text:p text:style-name="P177">Descripció: <text:span text:style-name="T72">Descripció de la regla.</text:span></text:p>
            </text:list-item>
          </text:list>
        </text:list-item>
        <text:list-item>
          <text:p text:style-name="P199">Camps per l'acció:</text:p>
          <text:list>
            <text:list-item>
              <text:p text:style-name="P211"><text:span text:style-name="Fuente_20_de_20_párrafo_20_predeter."><text:span text:style-name="T93">Tipus (Obligatori): </text:span></text:span>Desplegable per seleccionar el tipus de regla. Pot ser:</text:p>
              <text:list>
                <text:list-item>
                  <text:p text:style-name="P211">Posar a bústia: Mou l'anotació a la bústia especificada.</text:p>
                </text:list-item>
                <text:list-item>
                  <text:p text:style-name="P211">Gestionar amb backoffice: Envia l'anotació al backoffice de Distribucio.</text:p>
                </text:list-item>
                <text:list-item>
                  <text:p text:style-name="P211">Enviar a unitat organitzativa: Reenvia l'anotació a una altra unitat organitzativa.</text:p>
                </text:list-item>
              </text:list>
            </text:list-item>
          </text:list>
        </text:list-item>
        <text:list-item>
          <text:p text:style-name="P211"><text:soft-page-break/>Dades específiques per regles de tipus posar a bústia:</text:p>
          <text:list>
            <text:list-item>
              <text:p text:style-name="P211"><text:span text:style-name="Fuente_20_de_20_párrafo_20_predeter."><text:span text:style-name="T93">Bústia: </text:span></text:span>Desplegable per seleccionar la bústia on anirà destinada la nova regla.</text:p>
            </text:list-item>
          </text:list>
        </text:list-item>
        <text:list-item>
          <text:p text:style-name="P211">Dades específiques per regles de tipus gestionar amb backoffice:</text:p>
          <text:list>
            <text:list-item>
              <text:p text:style-name="P211"><text:span text:style-name="Fuente_20_de_20_párrafo_20_predeter."><text:span text:style-name="T93">Backoffice:</text:span></text:span> Desplegable per seleccionar un backoffice de la llista del manteniment de backoffices.</text:p>
            </text:list-item>
          </text:list>
        </text:list-item>
        <text:list-item>
          <text:p text:style-name="P211">Dades específiques per regles de tipus enviar a uniat organitzativa:</text:p>
          <text:list>
            <text:list-item>
              <text:p text:style-name="P211"><text:span text:style-name="Fuente_20_de_20_párrafo_20_predeter."><text:span text:style-name="T93">Unitat organitzativa: </text:span></text:span>Desplegable per seleccionar la unitat organtizativa destí a la que reenviar l'anotació.</text:p>
            </text:list-item>
          </text:list>
        </text:list-item>
        <text:list-item>
          <text:p text:style-name="P211">Dades de filtre per aplicar la regla (s'ha d'informar mínim un camp):</text:p>
          <text:list>
            <text:list-item>
              <text:p text:style-name="P211"><text:span text:style-name="Fuente_20_de_20_párrafo_20_predeter."><text:span text:style-name="T93">Unitat organitzativa: </text:span></text:span>Desplegable per seleccionar una unitat organitzativa a la que aplica la regla.</text:p>
            </text:list-item>
            <text:list-item>
              <text:p text:style-name="P211"><text:span text:style-name="Fuente_20_de_20_párrafo_20_predeter."><text:span text:style-name="T93">Bústia:</text:span></text:span> Desplegable per seleccionar la bústia a la que aplica la regla.</text:p>
            </text:list-item>
            <text:list-item>
              <text:p text:style-name="P211"><text:span text:style-name="Fuente_20_de_20_párrafo_20_predeter."><text:span text:style-name="T93">Codis SIA: </text:span></text:span>Codis de procediments separats per coma als quals pot aplicar la regla.</text:p>
            </text:list-item>
            <text:list-item>
              <text:p text:style-name="P212"><text:span text:style-name="Fuente_20_de_20_párrafo_20_predeter."><text:span text:style-name="T114">Codi assumpte: </text:span></text:span><text:span text:style-name="T112">Codi d'assumpte al qual aplica la regla. Està en desús però es manté per compatibilitat amb sistemes que encara l'utilitzen.</text:span></text:p>
            </text:list-item>
          </text:list>
        </text:list-item>
      </text:list>
      <text:p text:style-name="P118"><text:s/>Com més filtres es defineixen més restrictiva és la regla. Si es defineixen tots els camps del filtre llavors només aplicarà la regla si s'acompleixen tots.</text:p>
      <text:p text:style-name="P16"/>
      <text:h text:style-name="Heading_20_3" text:outline-level="3"><text:bookmark-start text:name="__RefHeading___Toc78145_3965979134"/>Camps del llistat de regles<text:bookmark-end text:name="__RefHeading___Toc78145_3965979134"/></text:h>
      <text:p text:style-name="P16"><text:span text:style-name="T66">A</text:span><text:span text:style-name="T63">l llistat hi tindrem les següents columnes:</text:span></text:p>
      <text:list text:style-name="L11">
        <text:list-item>
          <text:p text:style-name="P218">Al llistat hi tindrem les següents columnes:</text:p>
        </text:list-item>
        <text:list-item>
          <text:p text:style-name="P218"><text:span text:style-name="Fuente_20_de_20_párrafo_20_predeter."><text:span text:style-name="T93">Ordenar: </text:span></text:span>En aquesta columna no hi ha capçalera, però tindrem l'opció de seleccionar el botó que contenen els registres per ordenar-los com vulguem arrastrant per amunt i per avall.</text:p>
        </text:list-item>
        <text:list-item>
          <text:p text:style-name="P218"><text:span text:style-name="Fuente_20_de_20_párrafo_20_predeter."><text:span text:style-name="T93">Nom: </text:span></text:span>Nom donat a la regla</text:p>
        </text:list-item>
        <text:list-item>
          <text:p text:style-name="P218"><text:span text:style-name="Fuente_20_de_20_párrafo_20_predeter."><text:span text:style-name="T93">Tipus</text:span></text:span>: Tipus d'acció de la regla</text:p>
        </text:list-item>
        <text:list-item>
          <text:p text:style-name="P213">Codi assumpte</text:p>
        </text:list-item>
        <text:list-item>
          <text:p text:style-name="P213">Codis SIA</text:p>
        </text:list-item>
        <text:list-item>
          <text:p text:style-name="P213">Unitat organitzativa</text:p>
        </text:list-item>
        <text:list-item>
          <text:p text:style-name="P213">Bústia</text:p>
        </text:list-item>
        <text:list-item>
          <text:p text:style-name="P213">Destinació</text:p>
        </text:list-item>
        <text:list-item>
          <text:p text:style-name="P218"><text:span text:style-name="Fuente_20_de_20_párrafo_20_predeter."><text:span text:style-name="T93">Activa: </text:span></text:span>Indica si la regla està activa i per tant pot ser aplicada.</text:p>
          <text:p text:style-name="P218"><text:soft-page-break/><draw:frame draw:style-name="fr27" draw:name="Imatge9" text:anchor-type="as-char" svg:y="0cm" svg:width="17cm" style:rel-width="scale" svg:height="5.447cm" style:rel-height="scale" draw:z-index="120"><draw:image xlink:href="Pictures/100000010000045A0000016591D30073.png" xlink:type="simple" xlink:show="embed" xlink:actuate="onLoad" draw:mime-type="image/png"/><svg:desc>Interfaz de usuario gráfica, Texto, Aplicación, Correo electrónico

Descripción generada automáticamente</svg:desc></draw:frame></text:p>
        </text:list-item>
      </text:list>
      <text:p text:style-name="P124"/>
      <text:list text:continue-numbering="true" text:style-name="L11">
        <text:list-item>
          <text:p text:style-name="P213">Accions:</text:p>
          <text:list>
            <text:list-item>
              <text:list>
                <text:list-item>
                  <text:p text:style-name="P219"><text:span text:style-name="Fuente_20_de_20_párrafo_20_predeter."><text:span text:style-name="T93">Modificar: </text:span></text:span>S'obrira una modal com la de creació però amb els camps inicialitzats, ja que es l'edició d'un registre.</text:p>
                </text:list-item>
                <text:list-item>
                  <text:p text:style-name="P219"><text:span text:style-name="Fuente_20_de_20_párrafo_20_predeter."><text:span text:style-name="T93">Aplicar manualment:</text:span></text:span> Amb aquesta acció s’assignarà la regla a les anotacions que coincideixin amb el filtre per a que es processin en segon pla. Un cop acabada l’assignació es refrescarà la pàgina.</text:p>
                </text:list-item>
                <text:list-item>
                  <text:p text:style-name="P219"><text:span text:style-name="Fuente_20_de_20_párrafo_20_predeter."><text:span text:style-name="T93">Amunt: </text:span></text:span>Mouràs una posició amunt el registre seleccionat.</text:p>
                </text:list-item>
                <text:list-item>
                  <text:p text:style-name="P219"><text:span text:style-name="Fuente_20_de_20_párrafo_20_predeter."><text:span text:style-name="T93">Avall: </text:span></text:span>Mouràs una posició avall el registre seleccionat.</text:p>
                </text:list-item>
                <text:list-item>
                  <text:p text:style-name="P219"><text:span text:style-name="Fuente_20_de_20_párrafo_20_predeter."><text:span text:style-name="T93">Desactivar: </text:span></text:span>Es desactivarà la regla.</text:p>
                  <text:list>
                    <text:list-item>
                      <text:p text:style-name="P178"><text:span text:style-name="Fuente_20_de_20_párrafo_20_predeter.">Esborrar</text:span><text:span text:style-name="T63">: Apareixerà un panell de confirmació per esborrar la regla.</text:span></text:p>
                    </text:list-item>
                  </text:list>
                </text:list-item>
              </text:list>
            </text:list-item>
          </text:list>
        </text:list-item>
      </text:list>
      <text:p text:style-name="P31"/>
      <text:h text:style-name="Heading_20_3" text:outline-level="3"><text:bookmark-start text:name="__RefHeading___Toc78147_3965979134"/>Simulador de regles<text:bookmark-end text:name="__RefHeading___Toc78147_3965979134"/></text:h>
      <text:p text:style-name="P119">Per facilitar l'aplicació i definició de regles hi ha l'utilitat del simulador amb el botó "Simular". Introduïnt les dades de l'anotació de registre de la unitat organitzativa i el codi de procediment o assumpte es pot saber quines regles i accions es duran a terme.</text:p>
      <text:p text:style-name="P128"><text:soft-page-break/><draw:frame draw:style-name="fr3" draw:name="Frame48" text:anchor-type="as-char" svg:y="0cm" svg:width="17cm" style:rel-width="scale" svg:height="10.342cm" style:rel-height="scale-min" draw:z-index="121"><draw:text-box><text:p text:style-name="fig."><draw:frame draw:style-name="fr17" draw:name="Imatge10" text:anchor-type="paragraph" svg:width="17cm" style:rel-width="100%" svg:height="10.342cm" style:rel-height="scale" draw:z-index="124"><draw:image xlink:href="Pictures/100000010000037B0000021EFF98F148.png" xlink:type="simple" xlink:show="embed" xlink:actuate="onLoad" draw:mime-type="image/png"/><svg:desc>Interfaz de usuario gráfica, Texto, Aplicación, Correo electrónico

Descripción generada automáticamente</svg:desc></draw:frame>fig. <text:sequence text:ref-name="reffig.9" text:name="fig." text:formula="ooow:fig.+1" style:num-format="1">10</text:sequence>: Exemple de simulació de regles per a dades específiques d'una anotació de registre.</text:p></draw:text-box></draw:frame></text:p>
      <text:h text:style-name="Heading_20_2" text:outline-level="2"><text:bookmark-start text:name="__RefHeading___Toc245158_3767406981"/>Configurar Backoffice<text:bookmark-end text:name="__RefHeading___Toc245158_3767406981"/></text:h>
      <text:p text:style-name="P138"><text:span text:style-name="T143">En aquesta patnalla hi ha </text:span>un llistat de tots els Backoffices <text:span text:style-name="T143">donats d'alta a Distribucio </text:span>on es poden llistar de forma ascendent o descendent per el codi, el nom<text:span text:style-name="T143">,</text:span> la url<text:span text:style-name="T143"> i el tipus de backoffice</text:span>. En el manteniment dels backoffices els camps d'usuari de connexió i contrasenya poden estar guardats en el fitxer de propietats i en compte d'informar-los directament al formulari es poden fer referència a les claus del fitxer de propietats amb el format ${clau.fitxer.propietats}</text:p>
      <text:p text:style-name="P137"><draw:frame draw:style-name="fr6" draw:name="Frame4" text:anchor-type="char" svg:width="17cm" draw:z-index="101"><draw:text-box fo:min-height="6.849cm"><text:p text:style-name="fig."><draw:frame draw:style-name="fr25" draw:name="Image1" text:anchor-type="paragraph" svg:width="17cm" style:rel-width="100%" svg:height="6.849cm" style:rel-height="scale" draw:z-index="102"><draw:image xlink:href="Pictures/10000001000004FE00000203E8016BE6.png" xlink:type="simple" xlink:show="embed" xlink:actuate="onLoad" draw:mime-type="image/png"/></draw:frame>fig. <text:sequence text:ref-name="reffig.10" text:name="fig." text:formula="ooow:fig.+1" style:num-format="1">11</text:sequence><text:s/><text:span text:style-name="T142">Detall del llistat dels backoffices</text:span></text:p></draw:text-box></draw:frame></text:p>
      <text:p text:style-name="P33"><text:soft-page-break/>Els camps que tenim al llistat són: </text:p>
      <text:list text:style-name="L12">
        <text:list-item>
          <text:p text:style-name="P200"><text:span text:style-name="T93">Codi</text:span><text:span text:style-name="T143">:</text:span> <text:s/>Ens mostra el codi del backoffice. </text:p>
        </text:list-item>
        <text:list-item>
          <text:p text:style-name="P200"><text:span text:style-name="T93">Nom</text:span><text:span text:style-name="T143">:</text:span> <text:s/>Ens mostra el nom del backoffice. </text:p>
        </text:list-item>
        <text:list-item>
          <text:p text:style-name="P200"><text:span text:style-name="T93">Url</text:span><text:span text:style-name="T143">:</text:span> Ens mostra la url <text:span text:style-name="T143">configurada a la que Distribucio comunicarà les anotacions pendents</text:span>. </text:p>
        </text:list-item>
        <text:list-item>
          <text:p text:style-name="P220"><text:span text:style-name="T43">Tipus</text:span><text:span text:style-name="T49">:</text:span><text:span text:style-name="T47"> – Ens mostra el tipus de servei que utilitza per comunicar-se. Hi de tipus SOAP (obsolet) o REST. </text:span></text:p>
        </text:list-item>
      </text:list>
      <text:p text:style-name="P33">També tenim un botó d’accions per cadascun dels backoffices que ens permetrà modificar les dades del backoffice per mitjà d’una modal o esborrar-ho. </text:p>
      <text:p text:style-name="P33"><draw:frame draw:style-name="fr6" draw:name="Frame7" text:anchor-type="char" svg:width="3.889cm" draw:z-index="103"><draw:text-box fo:min-height="2.778cm"><text:p text:style-name="fig."><draw:frame draw:style-name="fr25" draw:name="Image9" text:anchor-type="paragraph" svg:width="3.889cm" style:rel-width="100%" svg:height="2.778cm" style:rel-height="scale" draw:z-index="104"><draw:image xlink:href="Pictures/10000001000000930000006980EB54FA.png" xlink:type="simple" xlink:show="embed" xlink:actuate="onLoad" draw:mime-type="image/png"/></draw:frame>fig. <text:sequence text:ref-name="reffig.11" text:name="fig." text:formula="ooow:fig.+1" style:num-format="1">12</text:sequence>: Detall accions backoffices</text:p></draw:text-box></draw:frame></text:p>
      <text:p text:style-name="P33"/>
      <text:p text:style-name="P34"/>
      <text:p text:style-name="P34"/>
      <text:p text:style-name="Standard"/>
      <text:p text:style-name="Standard"/>
      <text:p text:style-name="P67"/>
      <text:p text:style-name="P67">A l’hora de modificar un backoffice cal tenir en compte que el codi no es podrà modificar. </text:p>
      <text:p text:style-name="P138"><draw:frame draw:style-name="fr6" draw:name="Frame10" text:anchor-type="char" svg:width="17cm" draw:z-index="105"><draw:text-box fo:min-height="9.716cm"><text:p text:style-name="fig."><draw:frame draw:style-name="fr25" draw:name="Image12" text:anchor-type="paragraph" svg:width="17cm" style:rel-width="100%" svg:height="9.716cm" style:rel-height="scale" draw:z-index="106"><draw:image xlink:href="Pictures/10000001000002D60000019FE739BEA5.png" xlink:type="simple" xlink:show="embed" xlink:actuate="onLoad" draw:mime-type="image/png"/></draw:frame>fig. <text:sequence text:ref-name="reffig.12" text:name="fig." text:formula="ooow:fig.+1" style:num-format="1">13</text:sequence>: Detall modal modificació backoffice</text:p></draw:text-box></draw:frame></text:p>
      <text:p text:style-name="P125">També tenim l’opció <text:s/>de crear un nou backoffice amb es botó</text:p>
      <text:p text:style-name="P125"><text:soft-page-break/><text:s/><draw:frame draw:style-name="fr27" draw:name="Imagen 168" text:anchor-type="as-char" svg:y="0cm" svg:width="5.503cm" style:rel-width="scale" svg:height="2.037cm" style:rel-height="scale" draw:z-index="125"><draw:image xlink:href="Pictures/10000001000000D00000004D0F89587F.png" xlink:type="simple" xlink:show="embed" xlink:actuate="onLoad" draw:mime-type="image/png"/><svg:desc>Interfaz de usuario gráfica, Texto, Aplicación, Correo electrónico

Descripción generada automáticamente</svg:desc></draw:frame></text:p>
      <text:p text:style-name="P125">Si el donam clic, se’ns obrirà un modal amb els camps corresponents per poder crear un nou backoffice. Son els següents: </text:p>
      <text:list text:style-name="L13">
        <text:list-item>
          <text:p text:style-name="P221"><text:span text:style-name="Fuente_20_de_20_párrafo_20_predeter."><text:span text:style-name="T93">Codi: </text:span></text:span>(Camp obligatori). Aquest codi és el que referenciarem a l’anotació per saber amb quin backoffice s’ha distribuït haurà de ser únic. </text:p>
        </text:list-item>
        <text:list-item>
          <text:p text:style-name="P221"><text:span text:style-name="Fuente_20_de_20_párrafo_20_predeter."><text:span text:style-name="T93">Nom: </text:span></text:span>(Camp obligatori). El nom que el volem donar al nou backoffice. </text:p>
        </text:list-item>
        <text:list-item>
          <text:p text:style-name="P221"><text:span text:style-name="Fuente_20_de_20_párrafo_20_predeter."><text:span text:style-name="T93">Url: </text:span></text:span>(Camp obligatori). Url on es troba el backoffice al que ens estem referint. </text:p>
        </text:list-item>
        <text:list-item>
          <text:p text:style-name="P221"><text:span text:style-name="Fuente_20_de_20_párrafo_20_predeter."><text:span text:style-name="T93">Usuari: </text:span></text:span>Si cal introduir el nom d’usuari per a la connexió. S’ha d’utilitzar el format ‘${clau.fitxer.propietats.usuari}’ o l’usuari directament.</text:p>
        </text:list-item>
        <text:list-item>
          <text:p text:style-name="P221"><text:span text:style-name="Fuente_20_de_20_párrafo_20_predeter."><text:span text:style-name="T93">Contrasenya: </text:span></text:span>Si cal introduir contrasenya per a la connexió. S’ha d’utilitzar el format ‘${clau.fitxer.propietats.contrasenya}’ o contrasenya directament.</text:p>
        </text:list-item>
      </text:list>
      <text:h text:style-name="Heading_20_3" text:outline-level="3"><text:bookmark-start text:name="__RefHeading___Toc613630_3453696013"/>Comunicació d’anotacions amb els backoffices<text:bookmark-end text:name="__RefHeading___Toc613630_3453696013"/></text:h>
      <text:p text:style-name="P43">Un cop Distribució troba una anotació amb estat pendent d’enviar al backoffice aquesta l’envia al seu backoffice corresponent i canvia l’estat de l’anotació a ‘Enviada al backoffice’. A partir d’aquí ja serà el backoffice qui s’encarregui de canviar l’estat a l’anotació. Un cop arribada al backoffice passa a estat ‘Rebuda al backoffice’ i, en aquest punt, poden passar 3 opcions que mostren 3 estats diferents:</text:p>
      <text:list text:style-name="L14">
        <text:list-item>
          <text:p text:style-name="P202">REBUTJADA PEL BACKOFFICE - El backoffice rebutja l’anotació. </text:p>
        </text:list-item>
        <text:list-item>
          <text:p text:style-name="P202">PROCESSADA AL BACKOFFICE AMB ERRORS - El backoffice processa l’anotació amb errors. </text:p>
        </text:list-item>
        <text:list-item>
          <text:p text:style-name="P202">PROCESSADA PEL BACKOFFICE - El backoffice processa l’anotació. </text:p>
        </text:list-item>
      </text:list>
      <text:p text:style-name="P66">El diagrama d'estats del procés és el següent:</text:p>
      <text:p text:style-name="P43"><draw:frame draw:style-name="fr9" draw:name="Frame9" text:anchor-type="paragraph" svg:width="17cm" style:rel-width="100%" svg:height="11.014cm" style:rel-height="scale-min" draw:z-index="99"><draw:text-box><text:p text:style-name="fig."><draw:frame draw:style-name="fr25" draw:name="Image2" text:anchor-type="paragraph" svg:width="17cm" style:rel-width="100%" svg:height="10.285cm" style:rel-height="scale" draw:z-index="100"><draw:image xlink:href="Pictures/10000001000002F0000001C743AE6A7D.png" xlink:type="simple" xlink:show="embed" xlink:actuate="onLoad" draw:mime-type="image/png"/></draw:frame>fig. <text:sequence text:ref-name="reffig.13" text:name="fig." text:formula="ooow:fig.+1" style:num-format="1">14</text:sequence>: Diagrama d'estat: procés d'una anotació quan es comunica amb el backoffice</text:p></draw:text-box></draw:frame><text:soft-page-break/></text:p>
      <text:h text:style-name="Heading_20_2" text:outline-level="2"><text:bookmark-start text:name="__RefHeading___Toc2435_1085490558"/>Configurar permisos de l'entitat<text:bookmark-end text:name="__RefHeading___Toc2435_1085490558"/></text:h>
      <text:p text:style-name="P55"><text:span text:style-name="T84">N</text:span>ou llistat de permisos destinats a l'entitat.</text:p>
      <text:p text:style-name="P55"><draw:frame draw:style-name="fr8" draw:name="Marc1" text:anchor-type="as-char" svg:width="17cm" draw:z-index="86"><draw:text-box fo:min-height="3.129cm"><text:p text:style-name="fig."><draw:frame draw:style-name="fr25" draw:name="Imagen53" text:anchor-type="paragraph" svg:width="17cm" style:rel-width="100%" svg:height="3.129cm" style:rel-height="scale" draw:z-index="87"><draw:image xlink:href="Pictures/1000000000000490000000D751B617BE.png" xlink:type="simple" xlink:show="embed" xlink:actuate="onLoad" draw:mime-type="image/png"/></draw:frame>fig. <text:sequence text:ref-name="reffig.14" text:name="fig." text:formula="ooow:fig.+1" style:num-format="1">15</text:sequence>: Vista del llistat dels permisos.</text:p></draw:text-box></draw:frame></text:p>
      <text:p text:style-name="P47">El botó de <text:span text:style-name="T93">Nou permís</text:span><text:span text:style-name="T63"> obrira una modal de creació de permisos que per crear-ne haurem d'omplir els camps i seleccionar guardar per crear un nou registre. </text:span><text:span text:style-name="T73">(Els camps son els que apareixen al llistat).</text:span></text:p>
      <text:list text:style-name="L15">
        <text:list-item>
          <text:p text:style-name="P203"><text:span text:style-name="T96">Tipus: </text:span><text:span text:style-name="T73">Tipus de permís que es crearà.</text:span></text:p>
        </text:list-item>
        <text:list-item>
          <text:p text:style-name="P203"><text:span text:style-name="T96">Principal: </text:span><text:span text:style-name="T74">Usuari al que va destinat</text:span></text:p>
        </text:list-item>
        <text:list-item>
          <text:p text:style-name="P203"><text:span text:style-name="T96">Administració : </text:span><text:span text:style-name="T74">Booleà que ens indicara si té rol de administració</text:span></text:p>
        </text:list-item>
        <text:list-item>
          <text:p text:style-name="P204"><text:span text:style-name="T96">U</text:span><text:span text:style-name="T93">suari: </text:span><text:span text:style-name="T63">Booleà que ens indicara si té rol d'usuari</text:span></text:p>
        </text:list-item>
        <text:list-item>
          <text:p text:style-name="P179">Accions:</text:p>
        </text:list-item>
      </text:list>
      <text:list text:style-name="L16">
        <text:list-item>
          <text:p text:style-name="P205"><text:soft-page-break/><text:span text:style-name="T93">Modificar: </text:span><text:span text:style-name="T63">Obrira una modal de edició pel permís ja creat.</text:span></text:p>
        </text:list-item>
        <text:list-item>
          <text:p text:style-name="P205"><text:span text:style-name="T93">Esborrar: </text:span><text:span text:style-name="T63">Apareixerà un panell per confirmar l'eliminació del permís.</text:span></text:p>
        </text:list-item>
      </text:list>
      <text:h text:style-name="Heading_20_2" text:outline-level="2"><text:bookmark-start text:name="__RefHeading___Toc2437_1085490558"/>Consultar<text:bookmark-end text:name="__RefHeading___Toc2437_1085490558"/></text:h>
      <text:p text:style-name="P48"><text:span text:style-name="T84">A</text:span>quest desplegable obrira dues opcions per consultar les informacions de la aplicació.</text:p>
      <text:list text:style-name="L17">
        <text:list-item>
          <text:p text:style-name="P206">Continguts.</text:p>
        </text:list-item>
        <text:list-item>
          <text:p text:style-name="P206">Anotacions de registre.</text:p>
        </text:list-item>
        <text:list-item>
          <text:p text:style-name="P207">Dades estadístiques .</text:p>
        </text:list-item>
      </text:list>
      <text:p text:style-name="P48"><draw:frame draw:style-name="fr3" draw:name="Marc3" text:anchor-type="as-char" svg:y="0cm" svg:width="5.794cm" style:rel-width="scale" svg:height="3.889cm" style:rel-height="scale-min" draw:z-index="126"><draw:text-box><text:p text:style-name="fig."><draw:frame draw:style-name="fr17" draw:name="Imagen 163" text:anchor-type="paragraph" svg:width="5.794cm" style:rel-width="100%" svg:height="3.889cm" style:rel-height="scale" draw:z-index="127"><draw:image xlink:href="Pictures/10000001000000DB00000093F7200B0A.png" xlink:type="simple" xlink:show="embed" xlink:actuate="onLoad" draw:mime-type="image/png"/><svg:desc>Interfaz de usuario gráfica, Texto, Aplicación, Chat o mensaje de texto

Descripción generada automáticamente</svg:desc></draw:frame>fig. <text:sequence text:ref-name="reffig.15" text:name="fig." text:formula="ooow:fig.+1" style:num-format="1">16</text:sequence>: Detall del botó Consultar amb les seves opcions. </text:p></draw:text-box></draw:frame></text:p>
      <text:h text:style-name="Heading_20_2" text:outline-level="2"><text:bookmark-start text:name="__RefHeading___Toc2439_1085490558"/>Consultar continguts<text:bookmark-end text:name="__RefHeading___Toc2439_1085490558"/></text:h>
      <text:p text:style-name="P43">En aquesta pantalla apareixeran una serie de filtres per cercar registres en el llistat de continguts.</text:p>
      <text:p text:style-name="Standard"><text:bookmark-start text:name="__RefHeading___Toc2441_1085490558"/><draw:frame draw:style-name="fr7" draw:name="Marc4" text:anchor-type="char" svg:width="17.034cm" draw:z-index="89"><draw:text-box fo:min-height="5.927cm"><text:p text:style-name="fig."><draw:frame draw:style-name="fr25" draw:name="Imatge1" text:anchor-type="paragraph" svg:width="17cm" style:rel-width="100%" svg:height="5.198cm" style:rel-height="scale" draw:z-index="90"><draw:image xlink:href="Pictures/100000010000050200000152395A43A0.png" xlink:type="simple" xlink:show="embed" xlink:actuate="onLoad" draw:mime-type="image/png"/></draw:frame>fig. <text:sequence text:ref-name="reffig.16" text:name="fig." text:formula="ooow:fig.+1" style:num-format="1">17</text:sequence>: Vista del llistat de continguts amb el seu formulari de filtratge.</text:p></draw:text-box></draw:frame><text:bookmark-end text:name="__RefHeading___Toc2441_1085490558"/></text:p>
      <text:h text:style-name="Heading_20_3" text:outline-level="3"><text:bookmark-start text:name="__RefHeading___Toc2441_10854905581"/>Filtres<text:bookmark-end text:name="__RefHeading___Toc2441_10854905581"/></text:h>
      <text:list text:style-name="L18">
        <text:list-item>
          <text:p text:style-name="P180"><text:span text:style-name="T100">N</text:span>om: <text:span text:style-name="T63">nom del contingut per filtrar.</text:span></text:p>
        </text:list-item>
        <text:list-item>
          <text:p text:style-name="P180">Tipus d'element: <text:span text:style-name="T63">Desplegable per seleccionar el tipus d'element que vols veure en el llistat.</text:span></text:p>
        </text:list-item>
        <text:list-item>
          <text:p text:style-name="P180">Data inici</text:p>
        </text:list-item>
        <text:list-item>
          <text:p text:style-name="P180">Data fi</text:p>
        </text:list-item>
        <text:list-item>
          <text:p text:style-name="P180"><text:soft-page-break/>Desplegable per seleccionar si vols veure tots els continguts, només els esborrats o només els no esborrats.</text:p>
        </text:list-item>
      </text:list>
      <text:h text:style-name="Heading_20_3" text:outline-level="3"><text:bookmark-start text:name="__RefHeading___Toc2443_1085490558"/>Llistat<text:bookmark-end text:name="__RefHeading___Toc2443_1085490558"/></text:h>
      <text:p text:style-name="P56"><text:span text:style-name="T83">A</text:span>quest llistat serà ordenable ascendent i descendent ment per els camps: <text:span text:style-name="T93">Nom</text:span>, <text:span text:style-name="T93">Creat per</text:span> i <text:span text:style-name="T93">creat el.</text:span></text:p>
      <text:p text:style-name="P28">El llistat tindrà les següents columnes:</text:p>
      <text:list text:style-name="L19">
        <text:list-item>
          <text:p text:style-name="P181">Contingut</text:p>
        </text:list-item>
        <text:list-item>
          <text:p text:style-name="P181">Remitent</text:p>
        </text:list-item>
        <text:list-item>
          <text:p text:style-name="P181">Data creació</text:p>
        </text:list-item>
        <text:list-item>
          <text:p text:style-name="P181">Bústia</text:p>
        </text:list-item>
        <text:list-item>
          <text:p text:style-name="P182">Accions</text:p>
        </text:list-item>
      </text:list>
      <text:h text:style-name="Heading_20_3" text:outline-level="3"><text:bookmark-start text:name="__RefHeading___Toc2445_1085490558"/>Accions<text:bookmark-end text:name="__RefHeading___Toc2445_1085490558"/></text:h>
      <text:p text:style-name="P43"><draw:frame draw:style-name="fr19" draw:name="Imagen59" text:anchor-type="as-char" svg:width="5.345cm" svg:height="3.175cm" draw:z-index="79"><draw:image xlink:href="Pictures/10000000000000CA000000787F2D35E3.png" xlink:type="simple" xlink:show="embed" xlink:actuate="onLoad" draw:mime-type="image/png"/></draw:frame></text:p>
      <text:list text:style-name="L20">
        <text:list-item>
          <text:p text:style-name="P183"><text:span text:style-name="T84">D</text:span>etalls: <text:span text:style-name="T63">Obrira una modal per veure'n tots els detalls del contingut.</text:span></text:p>
          <text:p text:style-name="P183"><draw:frame draw:style-name="fr3" draw:name="Marc5" text:anchor-type="as-char" svg:y="0cm" svg:width="17cm" style:rel-width="scale" svg:height="7.327cm" style:rel-height="scale-min" draw:z-index="128"><draw:text-box><text:p text:style-name="fig."><draw:frame draw:style-name="fr17" draw:name="Imagen 164" text:anchor-type="paragraph" svg:width="17cm" style:rel-width="100%" svg:height="7.327cm" style:rel-height="scale" draw:z-index="129"><draw:image xlink:href="Pictures/1000000100000526000002384BAC5624.png" xlink:type="simple" xlink:show="embed" xlink:actuate="onLoad" draw:mime-type="image/png"/><svg:desc>Interfaz de usuario gráfica, Texto, Aplicación, Correo electrónico

Descripción generada automáticamente</svg:desc></draw:frame>fig. <text:sequence text:ref-name="reffig.17" text:name="fig." text:formula="ooow:fig.+1" style:num-format="1">18</text:sequence>: Exemple de modal amb els detalls del contingut. </text:p></draw:text-box></draw:frame></text:p>
          <text:p text:style-name="P159"/>
          <text:list>
            <text:list-item>
              <text:list>
                <text:list-item>
                  <text:p text:style-name="P222"><text:span text:style-name="Fuente_20_de_20_párrafo_20_predeter."><text:span text:style-name="T93">Resum: </text:span></text:span>Apareix un resum de tota la informació del contingut.</text:p>
                </text:list-item>
                <text:list-item>
                  <text:p text:style-name="P222"><text:span text:style-name="Fuente_20_de_20_párrafo_20_predeter."><text:span text:style-name="T93">Informació del registre:</text:span></text:span> Mostra el tipus de contingut que hi és, el contingut que té, el número assignat, l’estat que té en aquest moment i si és presencial. A més, ens mostra les dades obligatòries i les dades opcionals. </text:p>
                </text:list-item>
                <text:list-item>
                  <text:p text:style-name="P222"><text:soft-page-break/><text:span text:style-name="Fuente_20_de_20_párrafo_20_predeter."><text:span text:style-name="T93">Interessats:</text:span></text:span> Ens mostra un llistat de les persones associades al contingut. </text:p>
                </text:list-item>
                <text:list-item>
                  <text:p text:style-name="P222"><text:span text:style-name="Fuente_20_de_20_párrafo_20_predeter."><text:span text:style-name="T93">Annexos:</text:span></text:span> Ens mostra un llistat amb tots els annexes. </text:p>
                </text:list-item>
                <text:list-item>
                  <text:p text:style-name="P184"><text:span text:style-name="Fuente_20_de_20_párrafo_20_predeter.">Arxiu Info: </text:span><text:span text:style-name="T63">Mostra altre tipus d’informació. L’identificador d’arxiu que ens està mostrant, es nom, la sèrie documental que té assignada, la versió, l’identificador del contingut, els òrgans, la data quan s’ha obert el contingut, la classificació i l’estat que té actualment. </text:span></text:p>
                </text:list-item>
              </text:list>
            </text:list-item>
          </text:list>
        </text:list-item>
        <text:list-item>
          <text:p text:style-name="P183">Històric d'accions: <text:span text:style-name="T63">S'obrira una modal</text:span> <text:span text:style-name="T63">en la qual podràs veure totes les accions i moviments realitzats per el contingut seleccionat. Aquesta modal tindrà tres pestanyes:</text:span></text:p>
        </text:list-item>
      </text:list>
      <text:p text:style-name="P28"/>
      <text:list text:continue-numbering="true" text:style-name="L20">
        <text:list-item>
          <text:list>
            <text:list-item>
              <text:p text:style-name="P185"><draw:frame draw:style-name="fr2" draw:name="Marc6" text:anchor-type="paragraph" svg:width="16.365cm" draw:z-index="57"><draw:text-box fo:min-height="7.659cm"><text:p text:style-name="fig."><draw:frame draw:style-name="fr25" draw:name="Imagen61" text:anchor-type="paragraph" svg:width="16.365cm" style:rel-width="100%" svg:height="7.659cm" style:rel-height="scale" draw:z-index="58"><draw:image xlink:href="Pictures/100000000000038A000001A8B2B6A107.png" xlink:type="simple" xlink:show="embed" xlink:actuate="onLoad" draw:mime-type="image/png"/></draw:frame>fig. <text:sequence text:ref-name="reffig.18" text:name="fig." text:formula="ooow:fig.+1" style:num-format="1">19</text:sequence>: Modal amb l’històric d’accions de l’element seleccionat. </text:p></draw:text-box></draw:frame>Accions: <text:span text:style-name="T63">Veuràs les accions realitzades pel contingut.</text:span></text:p>
            </text:list-item>
            <text:list-item>
              <text:p text:style-name="P185">Moviments: <text:span text:style-name="T63">Veuràs els moviments realitzats pel contingut.</text:span></text:p>
            </text:list-item>
            <text:list-item>
              <text:p text:style-name="P185">Auditoria: <text:span text:style-name="T63">Aquí veuràs l'usuari i data de creació, i l'usuari i data de la darrera modificació que s'ha realitzat al contingut.</text:span></text:p>
            </text:list-item>
          </text:list>
        </text:list-item>
      </text:list>
      <text:h text:style-name="Heading_20_2" text:outline-level="2"><text:bookmark-start text:name="__RefHeading___Toc2447_1085490558"/>Consultar anotacions de registre<text:bookmark-end text:name="__RefHeading___Toc2447_1085490558"/></text:h>
      <text:p text:style-name="P110"><text:span text:style-name="T50">E</text:span><text:span text:style-name="T41">l llistat de consulta d'anotacions de registre per Adminstradors és molt semblant al llistat d'anotacions de registre per Usuaris però amb algunes diferències i sense limitar el resultat a les bústies pel qual l'usuari té accés. En aquest cas l'usuari Administrador pot consultar totes les anotacions de l'entitat independentment de si el seu usuari té permís d'accés sobre la bústia.</text:span></text:p>
      <text:p text:style-name="P48"><text:soft-page-break/><draw:frame draw:style-name="fr3" draw:name="Marc7" text:anchor-type="as-char" svg:y="0cm" svg:width="17cm" style:rel-width="scale" svg:height="6.837cm" style:rel-height="scale-min" draw:z-index="130"><draw:text-box><text:p text:style-name="fig."><draw:frame draw:style-name="fr32" draw:name="Imagen 165" text:anchor-type="paragraph" svg:x="0cm" svg:y="2.566cm" svg:width="17cm" style:rel-width="100%" svg:height="4.043cm" style:rel-height="scale" draw:z-index="131"><draw:image xlink:href="Pictures/10000000000006C5000001987D502792.png" xlink:type="simple" xlink:show="embed" xlink:actuate="onLoad" draw:mime-type="image/png"/><svg:desc>Una captura de pantalla de una computadora

Descripción generada automáticamente</svg:desc></draw:frame><draw:frame draw:style-name="fr31" draw:name="Imagen1" text:anchor-type="char" svg:x="0cm" svg:y="-0.113cm" svg:width="17cm" svg:height="2.681cm" draw:z-index="132"><draw:image xlink:href="Pictures/100000000000073400000123BB8120AB.png" xlink:type="simple" xlink:show="embed" xlink:actuate="onLoad" draw:mime-type="image/png"/></draw:frame>fig. <text:sequence text:ref-name="reffig.19" text:name="fig." text:formula="ooow:fig.+1" style:num-format="1">20</text:sequence>: Vista del llistat d’anotacions amb un formulari de filtratge. </text:p></draw:text-box></draw:frame></text:p>
      <text:h text:style-name="Heading_20_3" text:outline-level="3"><text:bookmark-start text:name="__RefHeading___Toc2449_1085490558"/>Filtres<text:bookmark-end text:name="__RefHeading___Toc2449_1085490558"/></text:h>
      <text:p text:style-name="P236"><text:span text:style-name="T60">E</text:span><text:span text:style-name="T62">ls filtre és el mateix que el dels usuaris ampliat amb l'opció de filtrar per estat específic, amb error i amb una unitat organitzativa. La llista completa de camps pel filtre és la següent:</text:span></text:p>
      <text:p text:style-name="P78">Tal i com es mostra en la imatge, el llistat es podrà filtrar a partir dels següents camps:</text:p>
      <text:p text:style-name="P78"/>
      <text:list text:style-name="WWNum3">
        <text:list-item>
          <text:p text:style-name="P147"><text:span text:style-name="T5">Número: </text:span><text:span text:style-name="T12">Text per filtrar pel número de l'anotació de registre.</text:span></text:p>
        </text:list-item>
        <text:list-item>
          <text:p text:style-name="P146"><text:span text:style-name="T31">T</text:span><text:span text:style-name="T32">ítol</text:span><text:span text:style-name="T10">: </text:span><text:span text:style-name="T14">Text per filtrar </text:span><text:span text:style-name="T34">p</text:span><text:span text:style-name="T35">er l'extracte de l'antoació de registre</text:span><text:span text:style-name="T14">.</text:span></text:p>
        </text:list-item>
        <text:list-item>
          <text:p text:style-name="P148"><text:span text:style-name="T3">Origen núm.:</text:span><text:span text:style-name="T12"> Text per filtrar per la referència al número de registre original. </text:span></text:p>
        </text:list-item>
        <text:list-item>
          <text:p text:style-name="P146"><text:span text:style-name="T5">Remitent:</text:span><text:span text:style-name="T3"> Text lliure per filtrar </text:span><text:span text:style-name="T23">les</text:span><text:span text:style-name="T3"> anotacions de registre pel nom d'un remitent concret.</text:span></text:p>
        </text:list-item>
        <text:list-item>
          <text:p text:style-name="P146"><text:span text:style-name="T27">Interessat: </text:span><text:span text:style-name="T24">Camp lliure per buscar per interessat de l'anotació de registre.</text:span></text:p>
        </text:list-item>
        <text:list-item>
          <text:p text:style-name="P146"><text:span text:style-name="T5">Data recep.</text:span><text:span text:style-name="T3"> </text:span><text:span text:style-name="T5">inicial</text:span><text:span text:style-name="T3">: Camp tipus data per mostrar </text:span><text:span text:style-name="T23">les</text:span><text:span text:style-name="T3"> anotacions de registre rebuts pel </text:span><text:span text:style-name="T4">DISTRIBUCIÓ</text:span><text:span text:style-name="T3"> a partir d'una data concreta.</text:span></text:p>
        </text:list-item>
        <text:list-item>
          <text:p text:style-name="P146"><text:span text:style-name="T9">Data recep.</text:span><text:span text:style-name="T14"> </text:span><text:span text:style-name="T9">final</text:span><text:span text:style-name="T14">: Camp tipus data per mostrar les anotacions de registre rebuts pe</text:span><text:span text:style-name="T15">r</text:span><text:span text:style-name="T14"> </text:span><text:span text:style-name="T15">DISTRIBUCIÓ</text:span><text:span text:style-name="T14"> fins a una data concreta.</text:span></text:p>
        </text:list-item>
        <text:list-item>
          <text:p text:style-name="P150"><text:span text:style-name="T5">Unitat Organitzativa: </text:span><text:span text:style-name="T12">Desplegable per filtrar les anotacions que estiguin en una bústia de la unitat organitzativa escollida.</text:span><text:span text:style-name="T18"> Si se selecciona una unitat organitzativa llavors només es poden escollir bústies en el desplegable de filtre de bústies que pertanyin a la unitat organitzativa escollida.</text:span></text:p>
        </text:list-item>
        <text:list-item>
          <text:p text:style-name="P146"><draw:frame draw:style-name="fr30" draw:name="Imagen6" text:anchor-type="paragraph" svg:x="4.441cm" svg:y="1.411cm" svg:width="0.826cm" svg:height="0.626cm" draw:z-index="107"><draw:image xlink:href="Pictures/100000000000003E0000002F6AE360E0.png" xlink:type="simple" xlink:show="embed" xlink:actuate="onLoad" draw:mime-type="image/png"/></draw:frame><text:span text:style-name="T5">Bústia: </text:span><text:span text:style-name="T3">Desplegable que mostrarà la llista de bústies a les quals l'usuari distribuïdor té permisos. Filtrarà el contingut de la llista mostrant només </text:span><text:span text:style-name="T23">les</text:span><text:span text:style-name="T3"> anotacions de registre distribuïts en aquella bústia.</text:span><text:span text:style-name="T6"> </text:span><text:span text:style-name="T13">Si es prem el botó es mostraran les bústies inactives en la selecció de bústies i es mostrarà el contingut de les bústies inactives en el llistat.</text:span></text:p>
          <text:p text:style-name="P151"><text:span text:style-name="T36"/></text:p>
        </text:list-item>
        <text:list-item>
          <text:p text:style-name="P146"><text:span text:style-name="T27">Enviament email</text:span><text:span text:style-name="T11">: </text:span><text:span text:style-name="T19">Camp desplegable que per mostrar les anotacions de registre que s'han enviat per email, les que no s'han enviat o totes. Una anotació s'envia per correu electrònic quan s'ha guardat al registre i l'usuari escull l'opció d'enviar-la per email.</text:span></text:p>
        </text:list-item>
        <text:list-item>
          <text:p text:style-name="P146"><text:span text:style-name="T29">Documentació</text:span><text:span text:style-name="T7">:</text:span><text:span text:style-name="T17"> Filtre per tipus de documentació.</text:span></text:p>
          <text:list>
            <text:list-item text:start-value="1">
              <text:p text:style-name="P146"><draw:frame draw:style-name="fr29" draw:name="Image70" text:anchor-type="as-char" svg:y="-0.3cm" svg:width="0.318cm" svg:height="0.37cm" draw:z-index="133"><draw:image xlink:href="Pictures/100000000000000C0000000E25855A0E.png" xlink:type="simple" xlink:show="embed" xlink:actuate="onLoad" draw:mime-type="image/png"/></draw:frame><text:span text:style-name="T20"><text:s/></text:span><text:span text:style-name="T21">Documentació adjunta digita</text:span><text:span text:style-name="T20">litzada.</text:span></text:p>
            </text:list-item>
            <text:list-item>
              <text:p text:style-name="P146"><draw:frame draw:style-name="fr19" draw:name="Image71" text:anchor-type="as-char" svg:width="0.714cm" svg:height="0.37cm" draw:z-index="134"><draw:image xlink:href="Pictures/100000000000001B0000000E03D4C585.png" xlink:type="simple" xlink:show="embed" xlink:actuate="onLoad" draw:mime-type="image/png"/></draw:frame><text:span text:style-name="T20"><text:s/>Documentació adjunta digitalitzada i complementàriament en paper.</text:span></text:p>
            </text:list-item>
            <text:list-item>
              <text:p text:style-name="P146"><draw:frame draw:style-name="fr19" draw:name="Image72" text:anchor-type="as-char" svg:width="0.344cm" svg:height="0.291cm" draw:z-index="135"><draw:image xlink:href="Pictures/100000000000000D0000000BC2F71D36.png" xlink:type="simple" xlink:show="embed" xlink:actuate="onLoad" draw:mime-type="image/png"/></draw:frame><text:span text:style-name="T16"><text:s/>Documentació adjunta en suport PAPER (o altres suports)</text:span></text:p>
            </text:list-item>
          </text:list>
        </text:list-item>
        <text:list-item>
          <text:p text:style-name="P149"><text:span text:style-name="T26">Botó </text:span><text:span text:style-name="T26"><draw:frame draw:style-name="fr28" draw:name="Image74 Copia 1" text:anchor-type="as-char" svg:y="-0.612cm" svg:width="1.085cm" svg:height="0.9cm" draw:z-index="136"><draw:image xlink:href="Pictures/1000000000000029000000228D358339.png" xlink:type="simple" xlink:show="embed" xlink:actuate="onLoad" draw:mime-type="image/png"/></draw:frame></text:span><text:span text:style-name="T26"><text:s/>N</text:span><text:span text:style-name="T22">omés amb annexos esborrany:</text:span><text:span text:style-name="T33"> </text:span><text:span text:style-name="T35">Botó per filtrar només les anotacions </text:span><text:span text:style-name="T33">amb annexos en estat esborrany.</text:span></text:p>
        </text:list-item>
        <text:list-item>
          <text:p text:style-name="P148"><text:span text:style-name="T26">Codi Backoffice: </text:span><text:span text:style-name="T35">Text per filtrar pel codi de backoffice al qual ha estat enviada l'anotació.</text:span></text:p>
        </text:list-item>
        <text:list-item>
          <text:p text:style-name="P148"><text:soft-page-break/><text:span text:style-name="T25">Penden</text:span><text:span text:style-name="T3">t: </text:span><text:span text:style-name="T12">Desplegable per seleccionar només les anotacions pendents, processades o totes. Els estats pendents de processar són:</text:span></text:p>
          <text:list>
            <text:list-item>
              <text:p text:style-name="P152">Pendent de guardar annexos</text:p>
            </text:list-item>
            <text:list-item>
              <text:p text:style-name="P152">Pendent de processar regla</text:p>
            </text:list-item>
            <text:list-item>
              <text:p text:style-name="P152">Pendent de l'usuari</text:p>
            </text:list-item>
          </text:list>
          <text:p text:style-name="P152">Els estats processats són:</text:p>
          <text:list text:continue-numbering="true">
            <text:list-item>
              <text:p text:style-name="P152">Processada a la bústia</text:p>
            </text:list-item>
            <text:list-item>
              <text:p text:style-name="P152">Pendent de comunicar backoffice</text:p>
            </text:list-item>
            <text:list-item>
              <text:p text:style-name="P152">Comunicada al backoffice</text:p>
            </text:list-item>
            <text:list-item>
              <text:p text:style-name="P152">Rebuda al backoffice</text:p>
            </text:list-item>
            <text:list-item>
              <text:p text:style-name="P152">Processada pel backoffice</text:p>
            </text:list-item>
            <text:list-item>
              <text:p text:style-name="P152">Rebutjada pel backoffice</text:p>
            </text:list-item>
            <text:list-item>
              <text:p text:style-name="P152">Processada al backoffice amb error</text:p>
            </text:list-item>
          </text:list>
          <text:p text:style-name="P153">Per defecte en el llistat es filtren les anotacions pendents de processar.</text:p>
        </text:list-item>
        <text:list-item>
          <text:p text:style-name="P154">Estat específic:<text:span text:style-name="T63"> Desplegable per seleccionar un dels estats específics en què es pot trobar l'anotació. És independent del desplegable d'estat simple anterior.</text:span></text:p>
        </text:list-item>
        <text:list-item>
          <text:p text:style-name="P146"><text:span text:style-name="T8">Botó </text:span><draw:frame draw:style-name="fr28" draw:name="Image74" text:anchor-type="as-char" svg:y="-0.612cm" svg:width="1.085cm" svg:height="0.9cm" draw:z-index="137"><draw:image xlink:href="Pictures/1000000000000029000000228D358339.png" xlink:type="simple" xlink:show="embed" xlink:actuate="onLoad" draw:mime-type="image/png"/></draw:frame><text:span text:style-name="T30"><text:s/>Només anotacions amb error: </text:span><text:span text:style-name="T35">Botó per filtrar només les anotacions marcades amb error.</text:span></text:p>
        </text:list-item>
        <text:list-item>
          <text:p text:style-name="P155"><text:span text:style-name="T30">S</text:span><text:span text:style-name="T28">obreescriure:</text:span><text:span text:style-name="T33"> </text:span><text:span text:style-name="T35">Desplegable per seleccionar </text:span><text:span text:style-name="T33">si l’anotació està marcada per a sobreescriure</text:span></text:p>
        </text:list-item>
        <text:list-item>
          <text:p text:style-name="P156"><text:span text:style-name="T30">N</text:span><text:span text:style-name="T28">ombre d’annexos:</text:span><text:span text:style-name="T33"> </text:span><text:span text:style-name="T35">Desplegable per seleccionar </text:span><text:span text:style-name="T33">el numero d’annexos de l’anotació</text:span></text:p>
        </text:list-item>
        <text:list-item>
          <text:p text:style-name="P156"><text:span text:style-name="T28">Codi SIA procediment/servei:</text:span><text:span text:style-name="T33"> </text:span><text:span text:style-name="T35">Text per filtrar pel codi </text:span><text:span text:style-name="T33">SIA </text:span><text:span text:style-name="T35">de </text:span><text:span text:style-name="T33">procediment o servei el qual empra</text:span><text:span text:style-name="T35"> l'anotació.</text:span></text:p>
        </text:list-item>
        <text:list-item>
          <text:p text:style-name="P156"><text:span text:style-name="T30">Reintents:</text:span><text:span text:style-name="T35"> Desplegable per seleccionar si l’anotació te reintents pendents.</text:span></text:p>
        </text:list-item>
      </text:list>
      <text:p text:style-name="P78"/>
      <text:p text:style-name="P73">Un cop seleccionats els filtres desitjats es podrà fer clic sobre el botó “Filtrar” per obtenir el llistat filtrat. El botó “Netejar” reinicia els filtres.</text:p>
      <text:p text:style-name="P17"/>
      <text:h text:style-name="Heading_20_3" text:outline-level="3"><text:bookmark-start text:name="__RefHeading___Toc2451_1085490558"/>Llistat<text:bookmark-end text:name="__RefHeading___Toc2451_1085490558"/></text:h>
      <text:p text:style-name="P123"><text:span text:style-name="T121">E</text:span><text:span text:style-name="T122">l llistat pels administradors conté les mateixes columnes que el llistat per usuaris del punt </text:span><text:span text:style-name="T122"><text:bookmark-ref text:reference-format="number-all-superior" text:ref-name="__RefHeading___Toc2743_1726870378">Error: no se encontró el origen de la referencia</text:bookmark-ref></text:span><text:span text:style-name="T122">.</text:span><text:span text:style-name="T61"> </text:span></text:p>
      <text:p text:style-name="P82"><draw:frame draw:style-name="fr23" draw:name="Imatge4" text:anchor-type="char" svg:width="17cm" svg:height="2.962cm" draw:z-index="91"><draw:image xlink:href="Pictures/10000001000004FA000000DEE32CD0E3.png" xlink:type="simple" xlink:show="embed" xlink:actuate="onLoad" draw:mime-type="image/png"/></draw:frame></text:p>
      <text:h text:style-name="Heading_20_2" text:outline-level="2"><text:bookmark-start text:name="__RefHeading___Toc2447_10854905581"/>Consultar anotacions de registre<text:bookmark-end text:name="__RefHeading___Toc2447_10854905581"/></text:h>
      <text:p text:style-name="P126">Aquí tenim tres llistats, tots els camps es poden filtrar de forma ascendent i descendent: </text:p>
      <text:list text:style-name="L21">
        <text:list-item>
          <text:p text:style-name="P223">Dades per unitat organitzativa, amb els camps: Data, Codi UO, UO, Anotacions noves, Anotacions totals, Reenviades, Per email, Justificants, Annexos, Bústies, Usuaris. </text:p>
        </text:list-item>
      </text:list>
      <text:p text:style-name="P44"><text:soft-page-break/><draw:frame draw:style-name="fr3" draw:name="Marc8" text:anchor-type="as-char" svg:y="0cm" svg:width="17cm" style:rel-width="scale" svg:height="5.039cm" style:rel-height="scale-min" draw:z-index="138"><draw:text-box><text:p text:style-name="fig."><draw:frame draw:style-name="fr17" draw:name="Imagen 169" text:anchor-type="paragraph" svg:width="17cm" style:rel-width="100%" svg:height="5.039cm" style:rel-height="scale" draw:z-index="139"><draw:image xlink:href="Pictures/10000001000004E70000017495DE3013.png" xlink:type="simple" xlink:show="embed" xlink:actuate="onLoad" draw:mime-type="image/png"/><svg:desc>Captura de pantalla de computadora

Descripción generada automáticamente con confianza media</svg:desc></draw:frame>fig. <text:sequence text:ref-name="reffig.20" text:name="fig." text:formula="ooow:fig.+1" style:num-format="1">21</text:sequence>: Vista de dades per unitat organitzativa. </text:p></draw:text-box></draw:frame></text:p>
      <text:p text:style-name="P44"/>
      <text:list text:continue-numbering="true" text:style-name="L21">
        <text:list-item>
          <text:p text:style-name="P223">Dades per estat, amb els camps: Data, Estat, Anotacions correctes, Anotacions correctes totals, Anotacions amb error, Anotacions amb error totals, Total d’anotacions. </text:p>
        </text:list-item>
      </text:list>
      <text:p text:style-name="P44"><draw:frame draw:style-name="fr3" draw:name="Marc9" text:anchor-type="as-char" svg:y="0cm" svg:width="17cm" style:rel-width="scale" svg:height="7.061cm" style:rel-height="scale-min" draw:z-index="140"><draw:text-box><text:p text:style-name="fig."><draw:frame draw:style-name="fr17" draw:name="Imagen 170" text:anchor-type="paragraph" svg:width="17cm" style:rel-width="100%" svg:height="7.061cm" style:rel-height="scale" draw:z-index="141"><draw:image xlink:href="Pictures/10000001000004E90000020A106FA5C7.png" xlink:type="simple" xlink:show="embed" xlink:actuate="onLoad" draw:mime-type="image/png"/><svg:desc>Pantalla de computadora

Descripción generada automáticamente con confianza media</svg:desc></draw:frame>fig. <text:sequence text:ref-name="reffig.21" text:name="fig." text:formula="ooow:fig.+1" style:num-format="1">22</text:sequence>: Vista de dades per estat. </text:p></draw:text-box></draw:frame></text:p>
      <text:list text:continue-numbering="true" text:style-name="L21">
        <text:list-item>
          <text:p text:style-name="P224">Usuaris de bústies, amb els camps: Data, Codi UO, UO, Id Bústia, Nom Bústia, Usuaris totals, Usuaris per permís directe, Usuaris per rol. </text:p>
        </text:list-item>
      </text:list>
      <text:p text:style-name="P95"><text:soft-page-break/><draw:frame draw:style-name="fr3" draw:name="Marc10" text:anchor-type="as-char" svg:y="0cm" svg:width="17cm" style:rel-width="scale" svg:height="5.509cm" style:rel-height="scale-min" draw:z-index="142"><draw:text-box><text:p text:style-name="fig."><draw:frame draw:style-name="fr17" draw:name="Imagen 171" text:anchor-type="paragraph" svg:width="17cm" style:rel-width="100%" svg:height="5.509cm" style:rel-height="scale" draw:z-index="143"><draw:image xlink:href="Pictures/10000001000004E5000001969C0E9993.png" xlink:type="simple" xlink:show="embed" xlink:actuate="onLoad" draw:mime-type="image/png"/><svg:desc>Calendario

Descripción generada automáticamente con confianza baja</svg:desc></draw:frame>fig. <text:sequence text:ref-name="reffig.22" text:name="fig." text:formula="ooow:fig.+1" style:num-format="1">23</text:sequence>: Vista d’usuaris de bústies. </text:p></draw:text-box></draw:frame></text:p>
      <text:p text:style-name="P95"/>
      <text:p text:style-name="P95">Amunt trobarem la part per filtrar amb diferents opcions </text:p>
      <text:p text:style-name="P126"><draw:frame draw:style-name="fr3" draw:name="Marc11" text:anchor-type="as-char" svg:y="0cm" svg:width="17cm" style:rel-width="scale" svg:height="3.618cm" style:rel-height="scale-min" draw:z-index="145"><draw:text-box><text:p text:style-name="fig."><draw:frame draw:style-name="fr17" draw:name="Imagen 172" text:anchor-type="paragraph" svg:width="17cm" style:rel-width="100%" svg:height="3.618cm" style:rel-height="scale" draw:z-index="146"><draw:image xlink:href="Pictures/10000001000004FE0000011042B35F79.png" xlink:type="simple" xlink:show="embed" xlink:actuate="onLoad" draw:mime-type="image/png"/><svg:desc>Interfaz de usuario gráfica, Texto, Aplicación

Descripción generada automáticamente</svg:desc></draw:frame>fig. <text:sequence text:ref-name="reffig.23" text:name="fig." text:formula="ooow:fig.+1" style:num-format="1">24</text:sequence>: Formulari de filtratge per l’apartat consultar dades estadístiques.</text:p></draw:text-box></draw:frame></text:p>
      <text:p text:style-name="P126"/>
      <text:p text:style-name="P126"/>
      <text:list text:continue-numbering="true" text:style-name="L21">
        <text:list-item>
          <text:p text:style-name="P214">Data d’inici.</text:p>
        </text:list-item>
        <text:list-item>
          <text:p text:style-name="P214">Data de fi. </text:p>
        </text:list-item>
        <text:list-item>
          <text:p text:style-name="P214">Codi d’unitat superior. </text:p>
        </text:list-item>
        <text:list-item>
          <text:p text:style-name="P214">Unitat organitzativa. </text:p>
        </text:list-item>
        <text:list-item>
          <text:p text:style-name="P214">Un camp on podem indicar quines estadístiques volem veure. Tenim tres opcions: </text:p>
          <text:list>
            <text:list-item>
              <text:p text:style-name="P214">Dades per Unitat Organitzativa. </text:p>
            </text:list-item>
            <text:list-item>
              <text:p text:style-name="P214">Dades per estat. </text:p>
            </text:list-item>
            <text:list-item>
              <text:p text:style-name="P214">Usuaris bústies. </text:p>
            </text:list-item>
          </text:list>
        </text:list-item>
      </text:list>
      <text:p text:style-name="P130">Podem seleccionar una, dues o les tres. </text:p>
      <text:list text:style-name="L22">
        <text:list-item>
          <text:p text:style-name="P225"><text:span text:style-name="Fuente_20_de_20_párrafo_20_predeter."><text:span text:style-name="T93">Tres botons que ens permeten per dades actuals, per un dia en concret i per un mes en concret. </text:span></text:span></text:p>
        </text:list-item>
        <text:list-item>
          <text:p text:style-name="P225"><text:span text:style-name="Fuente_20_de_20_párrafo_20_predeter."><text:span text:style-name="T93">Tenim l’opció de descarregar les estadístiques en diferents formats: </text:span></text:span></text:p>
          <text:list>
            <text:list-item>
              <text:p text:style-name="P225"><text:soft-page-break/><text:span text:style-name="Fuente_20_de_20_párrafo_20_predeter."><text:span text:style-name="T93">JSON</text:span></text:span></text:p>
            </text:list-item>
            <text:list-item>
              <text:p text:style-name="P225"><text:span text:style-name="Fuente_20_de_20_párrafo_20_predeter."><text:span text:style-name="T93">XLSX</text:span></text:span></text:p>
            </text:list-item>
            <text:list-item>
              <text:p text:style-name="P225"><text:span text:style-name="Fuente_20_de_20_párrafo_20_predeter."><text:span text:style-name="T93">ODT</text:span></text:span></text:p>
            </text:list-item>
            <text:list-item>
              <text:p text:style-name="P225"><text:span text:style-name="Fuente_20_de_20_párrafo_20_predeter."><text:span text:style-name="T93">XML</text:span></text:span></text:p>
            </text:list-item>
          </text:list>
        </text:list-item>
      </text:list>
      <text:p text:style-name="P106"/>
      <text:p text:style-name="P95">Tenim dos formes de visualitzar els registres: </text:p>
      <text:list text:style-name="L23">
        <text:list-item>
          <text:p text:style-name="P226"><text:span text:style-name="Fuente_20_de_20_párrafo_20_predeter."><text:span text:style-name="T93">En forma de taula.</text:span></text:span></text:p>
        </text:list-item>
        <text:list-item>
          <text:p text:style-name="P226"><text:span text:style-name="Fuente_20_de_20_párrafo_20_predeter."><text:span text:style-name="T93">Amb gràfics. </text:span></text:span></text:p>
        </text:list-item>
      </text:list>
      <text:p text:style-name="P126"/>
      <text:p text:style-name="P94"><text:span text:style-name="Fuente_20_de_20_párrafo_20_predeter."><text:span text:style-name="T106">Just abans del llistat, a la part dreta, com passava als usuaris amb rol ‘usuari’, tenim un botó d’accions </text:span></text:span><text:span text:style-name="Fuente_20_de_20_párrafo_20_predeter."><text:span text:style-name="T106"><draw:frame draw:style-name="fr27" draw:name="Imagen 188" text:anchor-type="as-char" svg:y="0cm" svg:width="1.931cm" style:rel-width="scale" svg:height="0.503cm" style:rel-height="scale" draw:z-index="147"><draw:image xlink:href="Pictures/10000001000000490000001396689F9A.png" xlink:type="simple" xlink:show="embed" xlink:actuate="onLoad" draw:mime-type="image/png"/></draw:frame></text:span></text:span><text:span text:style-name="Fuente_20_de_20_párrafo_20_predeter."><text:span text:style-name="T106"><text:s/>que ens permet fer diferents accions en grup amb totes les anotacions de registre que tinguin el seu checkbox activat.</text:span></text:span></text:p>
      <text:p text:style-name="P94"><text:span text:style-name="Fuente_20_de_20_párrafo_20_predeter."><text:span text:style-name="T106"><draw:frame draw:style-name="fr3" draw:name="Marc12" text:anchor-type="as-char" svg:y="0cm" svg:width="17cm" style:rel-width="scale" svg:height="3.11cm" style:rel-height="scale-min" draw:z-index="148"><draw:text-box><text:p text:style-name="fig."><draw:frame draw:style-name="fr17" draw:name="Imagen 190" text:anchor-type="paragraph" svg:width="17cm" style:rel-width="100%" svg:height="3.11cm" style:rel-height="scale" draw:z-index="149"><draw:image xlink:href="Pictures/10000001000004F4000000E82E4DCA8D.png" xlink:type="simple" xlink:show="embed" xlink:actuate="onLoad" draw:mime-type="image/png"/><svg:desc>Interfaz de usuario gráfica, Aplicación

Descripción generada automáticamente</svg:desc></draw:frame>fig. <text:sequence text:ref-name="reffig.24" text:name="fig." text:formula="ooow:fig.+1" style:num-format="1">25</text:sequence>: Exemple de com es poden fer accions en grup. </text:p></draw:text-box></draw:frame></text:span></text:span></text:p>
      <text:p text:style-name="P126"/>
      <text:p text:style-name="P126"/>
      <text:p text:style-name="Standard"/>
      <text:p text:style-name="P136"/>
      <text:h text:style-name="Heading_20_1" text:outline-level="1"><text:bookmark-start text:name="__RefHeading___Toc2775_1726870378"/>Superusuari<text:bookmark-end text:name="__RefHeading___Toc2775_1726870378"/></text:h>
      <text:p text:style-name="Standard"/>
      <text:p text:style-name="P111"><text:span text:style-name="T55">E</text:span><text:span text:style-name="T56">ls </text:span><text:span text:style-name="T57">tipus d'usuari Superusuari</text:span><text:span text:style-name="T118"> </text:span><text:span text:style-name="T119">pot accedir a la configuració de les entitats i </text:span><text:span text:style-name="T56">al monitoratge de integracions i excepcions.</text:span></text:p>
      <text:p text:style-name="P36">Com pots veure el boto on amb l'usuari només sortien les bústies ara hi ha dues opcions i en una d'elles (La de monitoratge) tindrà dues opcions incloses:</text:p>
      <text:p text:style-name="P111"><draw:frame draw:style-name="fr1" draw:name="Frame18" text:anchor-type="paragraph" svg:width="9.393cm" draw:z-index="70"><draw:text-box fo:min-height="3.81cm"><text:p text:style-name="fig."><draw:frame draw:style-name="fr6" draw:name="Marc13" text:anchor-type="char" svg:width="9.393cm" draw:z-index="92"><draw:text-box fo:min-height="4.496cm"><text:p text:style-name="fig."><draw:frame draw:style-name="fr25" draw:name="Imatge8" text:anchor-type="paragraph" svg:width="9.393cm" style:rel-width="100%" svg:height="4.496cm" style:rel-height="scale" draw:z-index="93"><draw:image xlink:href="Pictures/1000000100000178000000B45BA1E2CC.png" xlink:type="simple" xlink:show="embed" xlink:actuate="onLoad" draw:mime-type="image/png"/></draw:frame>fig. <text:sequence text:ref-name="reffig.25" text:name="fig." text:formula="ooow:fig.+1" style:num-format="1">26</text:sequence>: Menú d'opcions per l'usuari com a Superusuari.</text:p></draw:text-box></draw:frame></text:p></draw:text-box></draw:frame><text:span text:style-name="T118">E</text:span><text:span text:style-name="T119">n els següents apartats es detallen les diferents opcions</text:span><text:span text:style-name="T56">.</text:span></text:p>
      <text:h text:style-name="Heading_20_2" text:outline-level="2"><text:bookmark-start text:name="__RefHeading___Toc2399_1085490558"/>Entitats<text:bookmark-end text:name="__RefHeading___Toc2399_1085490558"/></text:h>
      <text:p text:style-name="P112"><text:span text:style-name="T58">L</text:span><text:span text:style-name="T41">'aplicació de Distribució pot separar la funcionalitat per entitat, de manera que diferents organitzacions poden emprar la mateixa instància d'aplicació separant per entitat. L'usuari pot escollir l'entitat amb la que vol fer feina seleccionant l'entitat a la capçalera de DISTRIBUCIO. </text:span></text:p>
      <text:p text:style-name="P64">L'usuari Superusuari és qui pot administrar les diferents entitats donades d'alta a DISTRIBUCIO i donar permisos als usuaris.</text:p>
      <text:p text:style-name="P64"><draw:frame draw:style-name="fr3" draw:name="Marc14" text:anchor-type="as-char" svg:y="0cm" svg:width="17cm" style:rel-width="scale" svg:height="5.246cm" style:rel-height="scale-min" draw:z-index="150"><draw:text-box><text:p text:style-name="fig."><draw:frame draw:style-name="fr17" draw:name="Imagen 174" text:anchor-type="paragraph" svg:width="17cm" style:rel-width="100%" svg:height="5.246cm" style:rel-height="scale" draw:z-index="160"><draw:image xlink:href="Pictures/10000000000005000000018B94E5A950.png" xlink:type="simple" xlink:show="embed" xlink:actuate="onLoad" draw:mime-type="image/png"/><svg:desc>Interfaz de usuario gráfica

Descripción generada automáticamente</svg:desc></draw:frame>fig. <text:sequence text:ref-name="reffig.26" text:name="fig." text:formula="ooow:fig.+1" style:num-format="1">27</text:sequence>: Pàgina per a la gestió i configuració de les entitats.</text:p></draw:text-box></draw:frame></text:p>
      <text:p text:style-name="P37"/>
      <text:p text:style-name="P36"><text:soft-page-break/><text:span text:style-name="T91">E</text:span>n l'apartat de les entitats tindrem un llistat de aquestes amb les seves columnes mes importants <text:span text:style-name="T92">i un boto per crear-ne de noves.</text:span></text:p>
      <text:h text:style-name="Heading_20_3" text:outline-level="3"><text:bookmark-start text:name="__RefHeading___Toc2401_1085490558"/>Llistat entitats<text:bookmark-end text:name="__RefHeading___Toc2401_1085490558"/></text:h>
      <text:p text:style-name="P14">En aquest llistat hi haurà les següents columnes:</text:p>
      <text:list text:style-name="L24">
        <text:list-item>
          <text:p text:style-name="P186"><text:span text:style-name="Fuente_20_de_20_párrafo_20_predeter.">Codi: </text:span>És el codi de la entitat.</text:p>
        </text:list-item>
        <text:list-item>
          <text:p text:style-name="P227"><text:span text:style-name="Fuente_20_de_20_párrafo_20_predeter."><text:span text:style-name="T93">Nom: </text:span></text:span>Nom de la entitat.</text:p>
        </text:list-item>
        <text:list-item>
          <text:p text:style-name="P227"><text:span text:style-name="Fuente_20_de_20_párrafo_20_predeter."><text:span text:style-name="T93">Codi DIR3: </text:span></text:span>Per cada entitat es posara un codi DIR3 únic.</text:p>
        </text:list-item>
        <text:list-item>
          <text:p text:style-name="P227"><text:span text:style-name="Fuente_20_de_20_párrafo_20_predeter."><text:span text:style-name="T93">Activa: </text:span></text:span>Si la entitat és activa o no.</text:p>
        </text:list-item>
        <text:list-item>
          <text:p text:style-name="P227"><text:span text:style-name="Fuente_20_de_20_párrafo_20_predeter."><text:span text:style-name="T93">Permisos: </text:span></text:span>Botó per entrar a l'edició dels permisos d'aquesta entitat.</text:p>
        </text:list-item>
        <text:list-item>
          <text:p text:style-name="P186"><text:span text:style-name="Fuente_20_de_20_párrafo_20_predeter.">Accions: </text:span><text:span text:style-name="T63">Boto per obrir un desplegable on podràs triar entre les opcions disponibles.</text:span></text:p>
          <text:p text:style-name="P186"><draw:frame draw:style-name="fr27" draw:name="Imagen 175" text:anchor-type="as-char" svg:y="0cm" svg:width="4.524cm" style:rel-width="scale" svg:height="3.812cm" style:rel-height="scale" draw:z-index="161"><draw:image xlink:href="Pictures/10000001000000AB000000906B1FA2B5.png" xlink:type="simple" xlink:show="embed" xlink:actuate="onLoad" draw:mime-type="image/png"/><svg:desc>Interfaz de usuario gráfica, Texto, Aplicación, Chat o mensaje de texto

Descripción generada automáticamente</svg:desc></draw:frame></text:p>
        </text:list-item>
      </text:list>
      <text:h text:style-name="Heading_20_3" text:outline-level="3"><text:bookmark-start text:name="__RefHeading___Toc2403_1085490558"/>Nova entitat<text:bookmark-end text:name="__RefHeading___Toc2403_1085490558"/></text:h>
      <text:p text:style-name="P113"><text:span text:style-name="T57">En prémer sobre el botó "Nova entitat" </text:span><text:span text:style-name="T57"><draw:frame draw:style-name="fr26" draw:name="Imagen15" text:anchor-type="as-char" svg:y="-0.656cm" svg:width="3.149cm" svg:height="0.96cm" draw:z-index="117"><draw:image xlink:href="Pictures/10000000000000EE00000059783CF345.png" xlink:type="simple" xlink:show="embed" xlink:actuate="onLoad" draw:mime-type="image/png"/></draw:frame></text:span><text:span text:style-name="T120">s</text:span><text:span text:style-name="T119">'</text:span><text:span text:style-name="T59">obr</text:span><text:span text:style-name="T57">e</text:span><text:span text:style-name="T59"> una modal on haurem de omplir els següents camps per crear una nova entitat:</text:span></text:p>
      <text:p text:style-name="P14"/>
      <text:p text:style-name="P14"><draw:frame draw:style-name="fr6" draw:name="Marc15" text:anchor-type="char" svg:width="16.274cm" draw:z-index="94"><draw:text-box fo:min-height="9.289cm"><text:p text:style-name="fig."><draw:frame draw:style-name="fr25" draw:name="Imatge11" text:anchor-type="paragraph" svg:width="16.274cm" style:rel-width="100%" svg:height="9.289cm" style:rel-height="scale" draw:z-index="95"><draw:image xlink:href="Pictures/10000001000002670000015FB028ABB5.png" xlink:type="simple" xlink:show="embed" xlink:actuate="onLoad" draw:mime-type="image/png"/></draw:frame>fig. <text:sequence text:ref-name="reffig.27" text:name="fig." text:formula="ooow:fig.+1" style:num-format="1">28</text:sequence>: Modal per crear una nova entitat com a superusuari.</text:p></draw:text-box></draw:frame><text:soft-page-break/></text:p>
      <text:list text:style-name="L25">
        <text:list-item>
          <text:p text:style-name="P228"><text:span text:style-name="Fuente_20_de_20_párrafo_20_predeter."><text:span text:style-name="T93">Codi. </text:span></text:span>(Camp obligatori) Codi lliure per identificar l'entitat.</text:p>
        </text:list-item>
        <text:list-item>
          <text:p text:style-name="P228"><text:span text:style-name="Fuente_20_de_20_párrafo_20_predeter."><text:span text:style-name="T93">Nom. </text:span></text:span>(Camp obligatori) Nom de l'entitat.</text:p>
        </text:list-item>
        <text:list-item>
          <text:p text:style-name="P228"><text:span text:style-name="Fuente_20_de_20_párrafo_20_predeter."><text:span text:style-name="T93">CIF. </text:span></text:span>(Camp obligatori) Es farà servir el CIF de l’entitat.</text:p>
        </text:list-item>
        <text:list-item>
          <text:p text:style-name="P228"><text:span text:style-name="Fuente_20_de_20_párrafo_20_predeter."><text:span text:style-name="T93">Codi Dir3. </text:span></text:span>(Camp obligatori) Codi DIR3 de l'entitat. servirà com a codi DIR3 arrel per crear bústies per unitats organitzatives a l'arbre d'unitats organitzatives de l'entitat.</text:p>
        </text:list-item>
        <text:list-item>
          <text:p text:style-name="P228"><text:span text:style-name="Fuente_20_de_20_párrafo_20_predeter."><text:span text:style-name="T93">Logo capçalera. </text:span></text:span>Es podrà introduir una imatge que farà de logo. Per defecte té assignada una, però es pot llevar o canviar. </text:p>
        </text:list-item>
        <text:list-item>
          <text:p text:style-name="P188">Color de fons. </text:p>
        </text:list-item>
        <text:list-item>
          <text:p text:style-name="P187">Color de la lletra. </text:p>
        </text:list-item>
      </text:list>
      <text:p text:style-name="P18">Una vegada omplerts tots els camps podrem polsar el botó de guardar per crear l'entitat.</text:p>
      <text:h text:style-name="Heading_20_3" text:outline-level="3"><text:bookmark-start text:name="__RefHeading___Toc2405_1085490558"/>Gestió de permisos<text:bookmark-end text:name="__RefHeading___Toc2405_1085490558"/></text:h>
      <text:p text:style-name="P40">Per gestionar els permisos d'una entitat haurem de polsar el boto amb el símbol de la clau assenyalat a la imatge anterior, el botó també ens mostrarà els permisos que té actualment.</text:p>
      <text:p text:style-name="P38"><draw:frame draw:style-name="fr2" draw:name="Marc16" text:anchor-type="paragraph" svg:width="17cm" draw:z-index="43"><draw:text-box fo:min-height="4.163cm"><text:p text:style-name="fig."><draw:frame draw:style-name="fr25" draw:name="Imagen18" text:anchor-type="paragraph" svg:width="17cm" style:rel-width="100%" svg:height="4.163cm" style:rel-height="scale" draw:z-index="44"><draw:image xlink:href="Pictures/10000000000004A000000122948EE0CF.png" xlink:type="simple" xlink:show="embed" xlink:actuate="onLoad" draw:mime-type="image/png"/></draw:frame>fig. <text:sequence text:ref-name="reffig.28" text:name="fig." text:formula="ooow:fig.+1" style:num-format="1">29</text:sequence>: Detall de localització per anar als permisos d’una entitat. </text:p></draw:text-box></draw:frame><text:soft-page-break/></text:p>
      <text:p text:style-name="P38"/>
      <text:p text:style-name="P38">Una vegada polsat el botó apareixerà la següent pantalla amb les següents columnes, i un botó de creació de permisos: </text:p>
      <text:p text:style-name="P38"><draw:frame draw:style-name="fr2" draw:name="Marc17" text:anchor-type="paragraph" svg:width="17cm" draw:z-index="45"><draw:text-box fo:min-height="5.461cm"><text:p text:style-name="fig."><draw:frame draw:style-name="fr25" draw:name="Imagen26" text:anchor-type="paragraph" svg:width="17cm" style:rel-width="100%" svg:height="5.461cm" style:rel-height="scale" draw:z-index="46"><draw:image xlink:href="Pictures/10000000000004A80000017F091EA820.png" xlink:type="simple" xlink:show="embed" xlink:actuate="onLoad" draw:mime-type="image/png"/></draw:frame>fig. <text:sequence text:ref-name="reffig.29" text:name="fig." text:formula="ooow:fig.+1" style:num-format="1">30</text:sequence>: <text:s/>Exemple de llistat dels permisos d’una entitat.</text:p></draw:text-box></draw:frame></text:p>
      <text:list text:style-name="L26">
        <text:list-item>
          <text:p text:style-name="P167">Tipus: <text:span text:style-name="T63">Es el tipus de permís que volem crear.</text:span></text:p>
        </text:list-item>
        <text:list-item>
          <text:p text:style-name="P167">Principal: <text:span text:style-name="T63">Es l'usuari pel qual va destinat el permís.</text:span></text:p>
        </text:list-item>
        <text:list-item>
          <text:p text:style-name="P167">Administració: <text:span text:style-name="T63">Si vols que el permís doni accés a l'espai d'administració.</text:span></text:p>
        </text:list-item>
        <text:list-item>
          <text:p text:style-name="P167">Usuari: <text:span text:style-name="T63">Si vols que el permís doni accés a l'espai d'usuari.</text:span></text:p>
        </text:list-item>
        <text:list-item>
          <text:p text:style-name="P170">Accions: <text:span text:style-name="T63">Els permisos tindran una serie de accions per interactuar amb ells</text:span></text:p>
        </text:list-item>
      </text:list>
      <text:p text:style-name="P19">Aquests mateixos camps sortiran a la modal de creació de permisos:</text:p>
      <text:p text:style-name="P19"><draw:frame draw:style-name="fr2" draw:name="Marc18" text:anchor-type="paragraph" svg:width="17cm" draw:z-index="47"><draw:text-box fo:min-height="5.948cm"><text:p text:style-name="fig."><draw:frame draw:style-name="fr25" draw:name="Imagen29" text:anchor-type="paragraph" svg:width="17cm" style:rel-width="100%" svg:height="5.948cm" style:rel-height="scale" draw:z-index="48"><draw:image xlink:href="Pictures/100000000000037600000136ACCEED93.png" xlink:type="simple" xlink:show="embed" xlink:actuate="onLoad" draw:mime-type="image/png"/></draw:frame>fig. <text:sequence text:ref-name="reffig.30" text:name="fig." text:formula="ooow:fig.+1" style:num-format="1">31</text:sequence>: Formulari per crear un nou permís per una entitat. </text:p></draw:text-box></draw:frame><text:soft-page-break/></text:p>
      <text:p text:style-name="P19">A la qual si els omplim correctament i polsem el botó de guardar li crearem el permís a l'entitat corresponent.</text:p>
      <text:h text:style-name="Heading_20_3" text:outline-level="3"><text:bookmark-start text:name="__RefHeading___Toc2407_1085490558"/>Accions <text:span text:style-name="T81">(Permisos)</text:span><text:bookmark-end text:name="__RefHeading___Toc2407_1085490558"/></text:h>
      <text:p text:style-name="P41"><draw:frame draw:style-name="fr24" draw:name="Imagen30" text:anchor-type="paragraph" svg:x="2.893cm" svg:y="0.196cm" svg:width="9.499cm" svg:height="2.91cm" draw:z-index="49"><draw:image xlink:href="Pictures/10000000000001670000006EB543C092.png" xlink:type="simple" xlink:show="embed" xlink:actuate="onLoad" draw:mime-type="image/png"/></draw:frame></text:p>
      <text:p text:style-name="P41"/>
      <text:p text:style-name="P41"/>
      <text:p text:style-name="P41"/>
      <text:p text:style-name="P41"/>
      <text:p text:style-name="P41"/>
      <text:list text:style-name="L27">
        <text:list-item>
          <text:p text:style-name="P171">Modificar: <text:s/><text:span text:style-name="T63">S'obrirà una modal en la qual podrem modificar tots els camps del permís.</text:span></text:p>
        </text:list-item>
        <text:list-item>
          <text:p text:style-name="P171">Esborrar: <text:span text:style-name="T63">S'obrira un panell de confirmació per saber si realment vols esborrar el permís.</text:span></text:p>
        </text:list-item>
      </text:list>
      <text:h text:style-name="Heading_20_3" text:outline-level="3"><text:bookmark-start text:name="__RefHeading___Toc2409_1085490558"/>Accions (Entitats)<text:bookmark-end text:name="__RefHeading___Toc2409_1085490558"/></text:h>
      <text:p text:style-name="P13"><draw:frame draw:style-name="fr24" draw:name="Imagen31" text:anchor-type="paragraph" svg:x="6.08cm" svg:y="-0.044cm" svg:width="4.842cm" svg:height="3.916cm" draw:z-index="50"><draw:image xlink:href="Pictures/10000000000000B70000009492EFDDEC.png" xlink:type="simple" xlink:show="embed" xlink:actuate="onLoad" draw:mime-type="image/png"/></draw:frame></text:p>
      <text:p text:style-name="P13"/>
      <text:p text:style-name="P13"/>
      <text:p text:style-name="P13"/>
      <text:p text:style-name="P42"/>
      <text:list text:style-name="L28">
        <text:list-item>
          <text:p text:style-name="P172"/>
        </text:list-item>
        <text:list-item>
          <text:p text:style-name="P172">Modificar: <text:s/><text:span text:style-name="T63">S'obrirà una modal en la qual podrem modificar tots els camps </text:span><text:span text:style-name="T64">de l'entitat</text:span><text:span text:style-name="T63">.</text:span></text:p>
        </text:list-item>
        <text:list-item>
          <text:p text:style-name="P189">Desactivar: <text:span text:style-name="T63">Es desactivara la entitat.</text:span></text:p>
        </text:list-item>
        <text:list-item>
          <text:p text:style-name="P208"><text:span text:style-name="T94">Esborrar: </text:span><text:span text:style-name="T67">S'obrira un panell de confirmació per saber si realment vols esborrar el </text:span><text:span text:style-name="T64">l'entitat</text:span><text:span text:style-name="T68">.</text:span></text:p>
        </text:list-item>
      </text:list>
      <text:h text:style-name="Heading_20_2" text:outline-level="2"><text:bookmark-start text:name="__RefHeading___Toc2411_1085490558"/><text:soft-page-break/>M<text:span text:style-name="T133">onitoritzar</text:span><text:bookmark-end text:name="__RefHeading___Toc2411_1085490558"/></text:h>
      <text:p text:style-name="P45">A la funcionalitat per monitorar haurem de seleccionar quins tipus de registres volem supervisar a partir del desplegable que apareixerà quant polsem el botó de monitoritzar.</text:p>
      <text:list text:style-name="L29">
        <text:list-item>
          <text:p text:style-name="P190">Integracions<text:span text:style-name="T134">: </text:span><text:span text:style-name="T77">Peticions amb sistemes integrats amb DISTRIBUCIO com d'Arxiu, el Portafirmes o dades externes.</text:span></text:p>
        </text:list-item>
        <text:list-item>
          <text:p text:style-name="P190">Excepcions<text:span text:style-name="T134">: </text:span><text:span text:style-name="T77">Pàgina on es llisten les darreres excepcions no controlades de DISTRIBUCIO.</text:span></text:p>
        </text:list-item>
        <text:list-item>
          <text:p text:style-name="P191">Mètr<text:span text:style-name="T134">i</text:span>ques<text:span text:style-name="T134">: </text:span><text:span text:style-name="T77">Pàgina per consultar i descarregar mètriques mesurades dins de DISTRIBUCIO.</text:span></text:p>
        </text:list-item>
        <text:list-item>
          <text:p text:style-name="P192"><text:span text:style-name="T135">Anotacions pendents d'Arxiu</text:span><text:span text:style-name="T79">: Pàgina per consultar el número d'anotacions pendents de guardar a l'Arxiu i l'histograma de les darreres 2 hores.</text:span></text:p>
        </text:list-item>
        <text:list-item>
          <text:p text:style-name="P229"><text:span text:style-name="Fuente_20_de_20_párrafo_20_predeter."><text:span text:style-name="T93">Monitor de sistema</text:span></text:span>: S’obre una modal amb dues pipelles: </text:p>
          <text:list>
            <text:list-item>
              <text:p text:style-name="P229">Sistema -&gt; Informació rellevant de l’ordinador. </text:p>
            </text:list-item>
            <text:list-item>
              <text:p text:style-name="P201">Fils d’execució -&gt; On podem veure tots els fils utilitzats per dur a terme la tasca. </text:p>
            </text:list-item>
          </text:list>
        </text:list-item>
      </text:list>
      <text:h text:style-name="Heading_20_3" text:outline-level="3"><text:bookmark-start text:name="__RefHeading___Toc2413_1085490558"/>Monitorar integracions<text:bookmark-end text:name="__RefHeading___Toc2413_1085490558"/></text:h>
      <text:p text:style-name="P46"><text:span text:style-name="T84">E</text:span>n aquesta pantalla tindrem diferents pestanyes dels diferents objectes d'integraci<text:span text:style-name="T97">ó, com són:</text:span></text:p>
      <text:list text:style-name="L30">
        <text:list-item>
          <text:p text:style-name="P215">Usuaris.</text:p>
        </text:list-item>
        <text:list-item>
          <text:p text:style-name="P215">Unitats administratives.</text:p>
        </text:list-item>
        <text:list-item>
          <text:p text:style-name="P215">Arxiu digital.</text:p>
        </text:list-item>
        <text:list-item>
          <text:p text:style-name="P215">Dades externes.</text:p>
        </text:list-item>
        <text:list-item>
          <text:p text:style-name="P215">Signatura.</text:p>
        </text:list-item>
        <text:list-item>
          <text:p text:style-name="P215">Valida signatura.</text:p>
        </text:list-item>
        <text:list-item>
          <text:p text:style-name="P215">Gestió documental.</text:p>
        </text:list-item>
        <text:list-item>
          <text:p text:style-name="P215">Bústia WS.</text:p>
        </text:list-item>
        <text:list-item>
          <text:p text:style-name="P215">Procediments.</text:p>
        </text:list-item>
        <text:list-item>
          <text:p text:style-name="P215">Distribució. </text:p>
        </text:list-item>
        <text:list-item>
          <text:p text:style-name="P193"><text:span text:style-name="Fuente_20_de_20_párrafo_20_predeter.">Backoffice.</text:span></text:p>
        </text:list-item>
      </text:list>
      <text:p text:style-name="P21">Aquest tipus d'objectes tenen uns camps en comú els quals seran els que es mostraran en el llistat com a columnes.</text:p>
      <text:p text:style-name="P21"><draw:frame draw:style-name="fr1" draw:name="Frame19" text:anchor-type="paragraph" svg:width="17cm" draw:z-index="71"><draw:text-box fo:min-height="3.814cm"><text:p text:style-name="fig."><text:span text:style-name="T105"><text:line-break/></text:span><draw:frame draw:style-name="fr23" draw:name="Imatge12" text:anchor-type="char" svg:width="17cm" svg:height="2.828cm" draw:z-index="96"><draw:image xlink:href="Pictures/1000000100000500000000D546FAC1A0.png" xlink:type="simple" xlink:show="embed" xlink:actuate="onLoad" draw:mime-type="image/png"/></draw:frame>fig. <text:sequence text:ref-name="reffig.31" text:name="fig." text:formula="ooow:fig.+1" style:num-format="1">32</text:sequence>: Exemple de pantalla amb el llistat d'integracions d'usuaris.</text:p></draw:text-box></draw:frame></text:p>
      <text:p text:style-name="P21"><text:soft-page-break/>Aquestes columnes son: </text:p>
      <text:list text:style-name="L31">
        <text:list-item>
          <text:p text:style-name="P194">Data: <text:span text:style-name="T63">La data en que es va crear l'objecte.</text:span></text:p>
        </text:list-item>
        <text:list-item>
          <text:p text:style-name="P194">Descripció: <text:span text:style-name="T63">Breu descripció de l'objecte.</text:span></text:p>
        </text:list-item>
        <text:list-item>
          <text:p text:style-name="P194">Tipus: <text:span text:style-name="T63">El tipus d'objecte.</text:span></text:p>
        </text:list-item>
        <text:list-item>
          <text:p text:style-name="P194">Temps resposta: <text:span text:style-name="T63">El temps en que el receptor ha respost a l'enviament de la integració.</text:span></text:p>
        </text:list-item>
        <text:list-item>
          <text:p text:style-name="P194">Estat: <text:span text:style-name="T63"><text:s/></text:span><text:span text:style-name="T65">Estat en el que queda l'objecte després de la integració.</text:span></text:p>
        </text:list-item>
        <text:list-item>
          <text:p text:style-name="P195">Detalls: <text:span text:style-name="T63">Boto que quant el polsem s'obrira una modal en la qual es mostraran tots els detalls de l'objecte sumant-li els camps específics de cada objecte concret.</text:span></text:p>
        </text:list-item>
      </text:list>
      <text:p text:style-name="P21"/>
      <text:h text:style-name="Heading_20_3" text:outline-level="3"><text:bookmark-start text:name="__RefHeading___Toc2415_1085490558"/>Monitorar excepcions<text:bookmark-end text:name="__RefHeading___Toc2415_1085490558"/></text:h>
      <text:p text:style-name="P35">En aquesta pantalla es mostrarà un llistat de totes les excepcions que s'hauran generat.</text:p>
      <text:p text:style-name="P35">Aquestes excepcions tindran com camps principals les columnes que es veuen en el llistat.</text:p>
      <text:list text:style-name="L32">
        <text:list-item>
          <text:p text:style-name="P196">Data.</text:p>
        </text:list-item>
        <text:list-item>
          <text:p text:style-name="P196">Tipus.</text:p>
        </text:list-item>
        <text:list-item>
          <text:p text:style-name="P196">Objecte id.</text:p>
        </text:list-item>
        <text:list-item>
          <text:p text:style-name="P196">Objecte tipus.</text:p>
        </text:list-item>
        <text:list-item>
          <text:p text:style-name="P196">Missatge.</text:p>
        </text:list-item>
        <text:list-item>
          <text:p text:style-name="P196">Detalls: <text:span text:style-name="T63">Botó per obrir una modal i veure els detalls de la excepció.</text:span></text:p>
        </text:list-item>
      </text:list>
      <text:p text:style-name="P15"/>
      <text:p text:style-name="P15"><draw:frame draw:style-name="fr5" draw:name="Frame20" text:anchor-type="paragraph" svg:width="17cm" draw:z-index="72"><draw:text-box fo:min-height="3.865cm"><text:p text:style-name="fig."><draw:frame draw:style-name="fr14" draw:name="Image50" text:anchor-type="as-char" svg:width="16.898cm" style:rel-width="100%" svg:height="3.84cm" style:rel-height="scale" draw:z-index="118"><draw:image xlink:href="Pictures/10000000000003CC000000DDB923AB86.png" xlink:type="simple" xlink:show="embed" xlink:actuate="onLoad" draw:mime-type="image/png"/></draw:frame><text:span text:style-name="T105"><text:line-break/></text:span>fig. <text:sequence text:ref-name="reffig.32" text:name="fig." text:formula="ooow:fig.+1" style:num-format="1">33</text:sequence>: Exemple de llistat d'excepcions.</text:p></draw:text-box></draw:frame></text:p>
      <text:p text:style-name="P15"/>
      <text:p text:style-name="P29">En prémer sobre el botó "Detall" sobre una modal on es pot visualitzar el missatge i la traça de l'excepció.</text:p>
      <text:p text:style-name="Standard"><draw:frame draw:style-name="fr1" draw:name="Frame21" text:anchor-type="paragraph" svg:width="17cm" draw:z-index="73"><draw:text-box fo:min-height="10.421cm"><text:p text:style-name="fig."><draw:frame draw:style-name="fr22" draw:name="Image51" text:anchor-type="as-char" svg:width="17cm" style:rel-width="100%" svg:height="10.421cm" style:rel-height="scale" draw:z-index="119"><draw:image xlink:href="Pictures/10000000000002BF000001AF010F605E.png" xlink:type="simple" xlink:show="embed" xlink:actuate="onLoad" draw:mime-type="image/png"/></draw:frame><text:span text:style-name="T105"><text:line-break/></text:span>fig. <text:sequence text:ref-name="reffig.33" text:name="fig." text:formula="ooow:fig.+1" style:num-format="1">34</text:sequence>: Exemple de modal amb el detall de l'excepció.</text:p></draw:text-box></draw:frame><text:soft-page-break/></text:p>
      <text:h text:style-name="Heading_20_3" text:outline-level="3"><text:bookmark-start text:name="__RefHeading___Toc37404_3531032951"/>Mètriques<text:bookmark-end text:name="__RefHeading___Toc37404_3531032951"/></text:h>
      <text:p text:style-name="P120"><text:span text:style-name="T136">DISTRIBUCIO conté en diferents punts mètriques per mesurar el temps que triga i el número de vegades que s'executen diferents operacions com la cerca d'usuaris o la consulta d'anotacions. Aquestes mètriques es poden consultar, exportar i importar des de la modal de mètriques. El detall de cada mètrica conté informació del número de vegades que s'ha executat i els temps mínim, màxim, mig i mitjà a més de la desviació estàndard. Aquestes dades es guarden en memòria, de manera que després de cada reinici de DISTRIBUCIO aquestes dades es reinicien.</text:span> </text:p>
      <text:p text:style-name="P116"><draw:frame draw:style-name="fr5" draw:name="Frame24" text:anchor-type="paragraph" svg:width="17cm" draw:z-index="81"><draw:text-box fo:min-height="9.001cm"><text:p text:style-name="fig."><draw:frame draw:style-name="fr14" draw:name="Image56" text:anchor-type="as-char" svg:width="16.898cm" style:rel-width="100%" svg:height="8.946cm" style:rel-height="scale" draw:z-index="144"><draw:image xlink:href="Pictures/100000000000041A0000022CE460ADAC.png" xlink:type="simple" xlink:show="embed" xlink:actuate="onLoad" draw:mime-type="image/png"/></draw:frame><text:span text:style-name="T105"><text:line-break/></text:span>fig. <text:sequence text:ref-name="reffig.34" text:name="fig." text:formula="ooow:fig.+1" style:num-format="1">35</text:sequence>: Modal de mètriques de les operacions a DISTRIBUCIO.</text:p></draw:text-box></draw:frame><text:soft-page-break/></text:p>
      <text:p text:style-name="P116">El format d'exportació i importació de les mètriques és format JSON.</text:p>
      <text:h text:style-name="Heading_20_3" text:outline-level="3"><text:bookmark-start text:name="__RefHeading___Toc258224_83721363"/>Monitor anotacions pendents d'Arxiu<text:bookmark-end text:name="__RefHeading___Toc258224_83721363"/></text:h>
      <text:p text:style-name="P122">En la pàgina de monitoratge d'anotacions pendent d'Arxiu es mostra la informació del número d'anotacions que estan en estat pendent de guardar annexos a l'Arxiu i del número de threads concurrents configurat per processar les anotacions pendents de guardar a l'Arxiu de forma paral·lela.</text:p>
      <text:p text:style-name="P122">Adicionalment es mostra un histograma per mitut de les dues darreres hores amb les següents dades:</text:p>
      <text:list text:style-name="L33">
        <text:list-item>
          <text:p text:style-name="P230"><draw:frame draw:style-name="fr21" draw:name="Image66" text:anchor-type="as-char" svg:width="3.096cm" svg:height="0.476cm" draw:z-index="151"><draw:image xlink:href="Pictures/100000000000007500000012CE62DA0E.png" xlink:type="simple" xlink:show="embed" xlink:actuate="onLoad" draw:mime-type="image/png"/></draw:frame>: Evolució del número d'anotacions pendent de processar-se per la tasca en segon pla en cada minut.</text:p>
        </text:list-item>
        <text:list-item>
          <text:p text:style-name="P230"><draw:frame draw:style-name="fr20" draw:name="Image67" text:anchor-type="as-char" svg:width="3.466cm" svg:height="0.529cm" draw:z-index="152"><draw:image xlink:href="Pictures/100000000000008300000014F23A1794.png" xlink:type="simple" xlink:show="embed" xlink:actuate="onLoad" draw:mime-type="image/png"/></draw:frame>:Evolució del número d'anotacions processades per minut per la tasca en segon pla de processament d'anotacions pendents d'Arxiu.</text:p>
        </text:list-item>
        <text:list-item>
          <text:p text:style-name="P230"><draw:frame draw:style-name="fr20" draw:name="Image68" text:anchor-type="as-char" svg:width="2.805cm" svg:height="0.529cm" draw:z-index="153"><draw:image xlink:href="Pictures/100000000000006A00000014D6DAA008.png" xlink:type="simple" xlink:show="embed" xlink:actuate="onLoad" draw:mime-type="image/png"/></draw:frame>: Evolució del número d'errors capturats per minut en el processament per guardar l'anotació o els seus annexos a l'Arxiu.</text:p>
        </text:list-item>
        <text:list-item>
          <text:p text:style-name="P230"><draw:frame draw:style-name="fr19" draw:name="Image69" text:anchor-type="as-char" svg:width="5.08cm" svg:height="0.582cm" draw:z-index="154"><draw:image xlink:href="Pictures/10000000000000C000000016778A55FD.png" xlink:type="simple" xlink:show="embed" xlink:actuate="onLoad" draw:mime-type="image/png"/></draw:frame>: Evolució del temps mitjà de processament en segons de les anotacions processades per cada minut.</text:p>
        </text:list-item>
      </text:list>
      <text:p text:style-name="P121"/>
      <text:p text:style-name="Standard"><draw:frame draw:style-name="fr4" draw:name="Frame5" text:anchor-type="paragraph" svg:x="-0.236cm" svg:y="0.016cm" svg:width="17.334cm" draw:z-index="84"><draw:text-box fo:min-height="9.137cm"><text:p text:style-name="fig."><draw:frame draw:style-name="fr18" draw:name="Image25" text:anchor-type="as-char" svg:y="-8.719cm" svg:width="17cm" style:rel-width="100%" svg:height="8.961cm" style:rel-height="scale" draw:z-index="155"><draw:image xlink:href="Pictures/10000000000005430000034BD00256D5.png" xlink:type="simple" xlink:show="embed" xlink:actuate="onLoad" draw:mime-type="image/png"/></draw:frame><text:span text:style-name="T105"><text:line-break/></text:span>fig. <text:sequence text:ref-name="reffig.35" text:name="fig." text:formula="ooow:fig.+1" style:num-format="1">36</text:sequence>: Pàgina pel monitor d'anotacions pendents d'Arxiu.</text:p></draw:text-box></draw:frame><text:soft-page-break/></text:p>
      <text:p text:style-name="Standard"/>
      <text:h text:style-name="Heading_20_3" text:outline-level="3" text:is-list-header="true"><text:bookmark-start text:name="__RefHeading___Toc258224_837213631"/><text:span text:style-name="T139">4.1.2.5.</text:span> Monitor <text:span text:style-name="T139">de sistema</text:span><text:bookmark-end text:name="__RefHeading___Toc258224_837213631"/></text:h>
      <text:p text:style-name="P127">Aquí tenim dos pestanyes: </text:p>
      <text:list text:style-name="L34">
        <text:list-item>
          <text:p text:style-name="P231">Sistema. </text:p>
        </text:list-item>
      </text:list>
      <text:p text:style-name="P115"><draw:frame draw:style-name="fr3" draw:name="Marc19" text:anchor-type="as-char" svg:y="0cm" svg:width="17cm" style:rel-width="scale" svg:height="7.345cm" style:rel-height="scale-min" draw:z-index="156"><draw:text-box><text:p text:style-name="fig."><draw:frame draw:style-name="fr17" draw:name="Imagen 178" text:anchor-type="paragraph" svg:width="17cm" style:rel-width="100%" svg:height="7.345cm" style:rel-height="scale" draw:z-index="157"><draw:image xlink:href="Pictures/100000010000051E00000236D198385B.png" xlink:type="simple" xlink:show="embed" xlink:actuate="onLoad" draw:mime-type="image/png"/><svg:desc>Interfaz de usuario gráfica, Texto, Aplicación, Correo electrónico

Descripción generada automáticamente</svg:desc></draw:frame>fig. <text:sequence text:ref-name="reffig.36" text:name="fig." text:formula="ooow:fig.+1" style:num-format="1">37</text:sequence>: <text:s/>Detall pipella sistema</text:p></draw:text-box></draw:frame></text:p>
      <text:p text:style-name="P115"/>
      <text:p text:style-name="P115"/>
      <text:p text:style-name="P115"><text:soft-page-break/></text:p>
      <text:list text:continue-numbering="true" text:style-name="L34">
        <text:list-item>
          <text:p text:style-name="P231">Fils execució. </text:p>
        </text:list-item>
      </text:list>
      <text:p text:style-name="P115"><draw:frame draw:style-name="fr3" draw:name="Marc20" text:anchor-type="as-char" svg:y="0cm" svg:width="17cm" style:rel-width="scale" svg:height="7.318cm" style:rel-height="scale-min" draw:z-index="158"><draw:text-box><text:p text:style-name="fig."><draw:frame draw:style-name="fr17" draw:name="Imagen 180" text:anchor-type="paragraph" svg:width="17cm" style:rel-width="100%" svg:height="7.318cm" style:rel-height="scale" draw:z-index="159"><draw:image xlink:href="Pictures/100000010000051C00000233BBA3E2A9.png" xlink:type="simple" xlink:show="embed" xlink:actuate="onLoad" draw:mime-type="image/png"/><svg:desc>Tabla

Descripción generada automáticamente</svg:desc></draw:frame>fig. <text:sequence text:ref-name="reffig.37" text:name="fig." text:formula="ooow:fig.+1" style:num-format="1">38</text:sequence>: Detall pipella Fils execució.</text:p></draw:text-box></draw:frame></text:p>
      <text:p text:style-name="P115"/>
      <text:p text:style-name="P115"/>
      <text:h text:style-name="Heading_20_2" text:outline-level="2"><text:bookmark-start text:name="__RefHeading___Toc37406_35310329511"/>Configuració<text:bookmark-end text:name="__RefHeading___Toc37406_35310329511"/></text:h>
      <text:p text:style-name="P235"><text:span text:style-name="T147">Aquest botó ens mostrarà un desplegable amb els tipus de configuració que tenim per l’aplicació. </text:span></text:p>
      <text:h text:style-name="Heading_20_3" text:outline-level="3"><text:bookmark-start text:name="__RefHeading___Toc258224_8372136311 Copia 1"/>P<text:span text:style-name="T146">ropietats de configuració</text:span><text:bookmark-end text:name="__RefHeading___Toc258224_8372136311 Copia 1"/></text:h>
      <text:p text:style-name="P115">A aquesta pàgina tenim 4 apartats: </text:p>
      <text:list text:style-name="L35">
        <text:list-item>
          <text:p text:style-name="P233">Configuracions generals, on es fa referència a les configuracions generals de l’aplicació:</text:p>
          <text:p text:style-name="P234">Aquí ens trobam una pantalla per configurar via web les propietats de configuració de l’aplicació mitjançant un formulari.</text:p>
        </text:list-item>
        <text:list-item>
          <text:p text:style-name="P233">Enviament de correus, on es troba parametritzat: </text:p>
          <text:list>
            <text:list-item>
              <text:p text:style-name="P233">Remitent del correus que s’envien des de l’aplicació. </text:p>
            </text:list-item>
            <text:list-item>
              <text:p text:style-name="P233">JDNI email. </text:p>
            </text:list-item>
          </text:list>
        </text:list-item>
        <text:list-item>
          <text:p text:style-name="P233">Configuració de les tasques periòdiques, on trobem diferents tipus de tasques amb les seves configuracions: </text:p>
          <text:list>
            <text:list-item>
              <text:p text:style-name="P233">Tasca periòdica de guardar annexos a l’arxiu. </text:p>
            </text:list-item>
            <text:list-item>
              <text:p text:style-name="P233">Tasca periòdica d’enviament d’anotacions al backoffice. </text:p>
            </text:list-item>
            <text:list-item>
              <text:p text:style-name="P233">Tasca periòdica d’aplicació de regles del tipus backoffice. </text:p>
            </text:list-item>
            <text:list-item>
              <text:p text:style-name="P233">Tasca periòdica de tancar contenidors pendents. </text:p>
            </text:list-item>
            <text:list-item>
              <text:p text:style-name="P233"><text:soft-page-break/>Tasca periòdica de enviar emails no agrupats.</text:p>
            </text:list-item>
            <text:list-item>
              <text:p text:style-name="P233">Tasca periòdica de enviar emails agrupats. </text:p>
            </text:list-item>
          </text:list>
        </text:list-item>
      </text:list>
      <text:p text:style-name="P129">A totes les tasques tenim un camp on posarem, en milisegons, cada quan volem que s’executi la tasca. </text:p>
      <text:list text:continue-numbering="true" text:style-name="L35">
        <text:list-item>
          <text:p text:style-name="P233">Plugins de l’aplicació. Aquí trobam totes les configuracions que tenen cadascun dels plugins adherits a l’aplicació. A la versió 0.9.41 tenim incorporats els plugins: </text:p>
          <text:list>
            <text:list-item>
              <text:p text:style-name="P233">Configuració de l’arxiu. </text:p>
            </text:list-item>
            <text:list-item>
              <text:p text:style-name="P233">Unitats organitzatives. </text:p>
            </text:list-item>
            <text:list-item>
              <text:p text:style-name="P233">Gestió documental. </text:p>
            </text:list-item>
            <text:list-item>
              <text:p text:style-name="P233">Plugin d’usuaris. </text:p>
            </text:list-item>
            <text:list-item>
              <text:p text:style-name="P233">Distribució. </text:p>
            </text:list-item>
            <text:list-item>
              <text:p text:style-name="P233">Consulta de procediments. </text:p>
            </text:list-item>
            <text:list-item>
              <text:p text:style-name="P233">Dades externes. </text:p>
            </text:list-item>
            <text:list-item>
              <text:p text:style-name="P233">Signatura. </text:p>
            </text:list-item>
          </text:list>
        </text:list-item>
      </text:list>
      <text:p text:style-name="P115">Validació de firmes.</text:p>
      <text:h text:style-name="Heading_20_2" text:outline-level="2"><text:bookmark-start text:name="__RefHeading___Toc37406_3531032951"/>Avisos<text:bookmark-end text:name="__RefHeading___Toc37406_3531032951"/></text:h>
      <text:p text:style-name="P114">El Superusuari té l'opció de definir una llista d'avisos que sigui visible per a tots els usuaris de DISTRIBUCIO. Es poden definir avisos de tipus error, advertència o informació, especificar si estan actius i les dates d'inici i fi entre les quals s'ha de mostrar l'avís.</text:p>
      <text:p text:style-name="P114"><draw:frame draw:style-name="fr2" draw:name="Frame22" text:anchor-type="paragraph" svg:width="17cm" draw:z-index="74"><draw:text-box fo:min-height="5.325cm"><text:p text:style-name="fig."><draw:frame draw:style-name="fr14" draw:name="Image52" text:anchor-type="as-char" svg:width="17cm" style:rel-width="100%" svg:height="5.325cm" style:rel-height="scale" draw:z-index="122"><draw:image xlink:href="Pictures/100000000000050000000191023EBA7A.png" xlink:type="simple" xlink:show="embed" xlink:actuate="onLoad" draw:mime-type="image/png"/></draw:frame><text:span text:style-name="T105"><text:line-break/></text:span>fig. <text:sequence text:ref-name="reffig.38" text:name="fig." text:formula="ooow:fig.+1" style:num-format="1">39</text:sequence>: Pàgina de gestió d'avisos.</text:p></draw:text-box></draw:frame></text:p>
      <text:p text:style-name="P114">El formulari de creació i modificació d'avisos conté els següents camps:</text:p>
      <text:list text:style-name="L36">
        <text:list-item>
          <text:p text:style-name="P216"><draw:frame draw:style-name="fr16" draw:name="Image53" text:anchor-type="paragraph" svg:width="17cm" svg:height="9.502cm" draw:z-index="75"><draw:image xlink:href="Pictures/10000000000002C80000018E3B1FAEAE.png" xlink:type="simple" xlink:show="embed" xlink:actuate="onLoad" draw:mime-type="image/png"/></draw:frame><text:soft-page-break/>Assumpte:<text:span text:style-name="T63"> Títol de l'avís per mostrar als usuaris.</text:span></text:p>
        </text:list-item>
        <text:list-item>
          <text:p text:style-name="P216">Missatge<text:span text:style-name="T63">: Cos de l'avís quan l'usuari expandeixi l'avís.</text:span></text:p>
        </text:list-item>
        <text:list-item>
          <text:p text:style-name="P216">Data inici<text:span text:style-name="T63">: Data a partir del qual es mostra l'avís.</text:span></text:p>
        </text:list-item>
        <text:list-item>
          <text:p text:style-name="P216">Data final<text:span text:style-name="T63">: Data final per mostrar l'avís.</text:span></text:p>
        </text:list-item>
        <text:list-item>
          <text:p text:style-name="P216">Avís nivell<text:span text:style-name="T63">: Pot ser de tipus "Informació", "Advertència" o "Error" i depenent del nivell d'avís es visualitzarà amb un o altre color.</text:span></text:p>
        </text:list-item>
      </text:list>
      <text:p text:style-name="P107">Les opcions en el llistat són les següents:</text:p>
      <text:list text:style-name="L37">
        <text:list-item>
          <text:p text:style-name="P217"><draw:frame draw:style-name="fr15" draw:name="Image54" text:anchor-type="paragraph" svg:width="7.805cm" svg:height="3.995cm" draw:z-index="76"><draw:image xlink:href="Pictures/10000000000001270000009789043152.png" xlink:type="simple" xlink:show="embed" xlink:actuate="onLoad" draw:mime-type="image/png"/></draw:frame>Modificar<text:span text:style-name="T63">: Obre la modal per modificar l'avís.</text:span></text:p>
        </text:list-item>
        <text:list-item>
          <text:p text:style-name="P217">Activar/Desactivar<text:span text:style-name="T63">: Permet activar o desactivar l'avís independentment de les dates.</text:span></text:p>
        </text:list-item>
        <text:list-item>
          <text:p text:style-name="P217">Esborrar<text:span text:style-name="T63">.</text:span></text:p>
        </text:list-item>
      </text:list>
      <text:p text:style-name="P105"><draw:frame draw:style-name="fr1" draw:name="Frame23" text:anchor-type="paragraph" svg:width="17cm" draw:z-index="80"><draw:text-box fo:min-height="3.874cm"><text:p text:style-name="fig."><draw:frame draw:style-name="fr14" draw:name="Image55" text:anchor-type="as-char" svg:width="17cm" style:rel-width="100%" svg:height="3.874cm" style:rel-height="scale" draw:z-index="123"><draw:image xlink:href="Pictures/1000000000000410000000EDC3BF9369.png" xlink:type="simple" xlink:show="embed" xlink:actuate="onLoad" draw:mime-type="image/png"/></draw:frame><text:span text:style-name="T105"><text:line-break/></text:span>fig. <text:sequence text:ref-name="reffig.39" text:name="fig." text:formula="ooow:fig.+1" style:num-format="1">40</text:sequence>: Exemple de visualització de missatges amb el cos del missatge expandit.</text:p></draw:text-box></draw:frame><text:soft-page-break/><text:span text:style-name="T63">A continuació es mostra un exemple de com es visualitzen 3 tipus d'avisos amb el cos del missatge expandit per acció de l'usuari.</text:span><text:span text:style-name="T78"> Si el missatge no s'expandeix per part de l'usuari llavors només apareix el títol del missatge.</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 Narrow" svg:font-family="'Arial Narrow'" style:font-family-generic="roman" style:font-pitch="variable"/>
    <style:font-face style:name="Arial Narrow1" svg:font-family="'Arial Narrow'" style:font-family-generic="system"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adornments="Negrita" style:font-family-generic="swiss" style:font-pitch="variable"/>
    <style:font-face style:name="Calibri3" svg:font-family="Calibri" style:font-adornments="Negrita cursiva" style:font-family-generic="swiss" style:font-pitch="variable"/>
    <style:font-face style:name="Calibri4" svg:font-family="Calibri" style:font-adornments="Normal" style:font-family-generic="swiss" style:font-pitch="variable"/>
    <style:font-face style:name="Calibri5" svg:font-family="Calibri" style:font-adornments="Regular" style:font-family-generic="swiss" style:font-pitch="variable"/>
    <style:font-face style:name="Courier New" svg:font-family="'Courier New'" style:font-family-generic="modern" style:font-pitch="fixed"/>
    <style:font-face style:name="Courier New1" svg:font-family="'Courier New'" style:font-family-generic="system" style:font-pitch="variable"/>
    <style:font-face style:name="Courier New2" svg:font-family="'Courier New'" style:font-adornments="Normal" style:font-family-generic="modern" style:font-pitch="fixed"/>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OpenSymbol" svg:font-family="OpenSymbol" style:font-charset="x-symbol"/>
    <style:font-face style:name="OpenSymbol1" svg:font-family="OpenSymbol" style:font-family-generic="system" style:font-charset="x-symbol"/>
    <style:font-face style:name="SimSun" svg:font-family="SimSun" style:font-family-generic="system" style:font-pitch="variable"/>
    <style:font-face style:name="StarSymbol" svg:font-family="StarSymbol" style:font-charset="x-symbol"/>
    <style:font-face style:name="StarSymbol1" svg:font-family="StarSymbol" style:font-family-generic="system" style:font-charset="x-symbol"/>
    <style:font-face style:name="Symbol" svg:font-family="Symbol" style:font-family-generic="roman" style:font-pitch="variable" style:font-charset="x-symbol"/>
    <style:font-face style:name="Symbol1" svg:font-family="Symbol" style:font-adornments="Normal" style:font-family-generic="roman" style:font-pitch="variable" style:font-charset="x-symbol"/>
    <style:font-face style:name="Times New Roman" svg:font-family="'Times New Roman'" style:font-family-generic="system" style:font-pitch="variable"/>
    <style:font-face style:name="Wingdings" svg:font-family="Wingdings" style:font-family-generic="system" style:font-pitch="variable" style:font-charset="x-symbol"/>
    <style:font-face style:name="Wingdings1" svg:font-family="Wingdings" style:font-adornments="Normal"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ca" fo:country="ES"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ca" fo:country="ES" style:letter-kerning="true" style:font-name-asia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fo:font-size="10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writing-mode="page"/>
      <style:text-properties style:font-name="Calibri4" fo:font-family="Calibri" style:font-style-name="Normal" style:font-family-generic="swiss" style:font-pitch="variable" fo:font-size="10pt" style:font-size-asian="10.5pt"/>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western" style:family="paragraph" style:parent-style-name="Standard" style:default-outline-level="">
      <style:paragraph-properties fo:margin-top="0.494cm" fo:margin-bottom="0.203cm" style:contextual-spacing="false"/>
      <style:text-properties style:font-name="Calibri" fo:font-family="Calibri" style:font-family-generic="roman" style:font-pitch="variable" fo:font-size="10pt" style:font-size-asian="10pt" style:language-asian="en" style:country-asian="US"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default-outline-level="" style:class="extra">
      <style:paragraph-properties>
        <style:tab-stops>
          <style:tab-stop style:position="7.62cm" style:type="center"/>
          <style:tab-stop style:position="15.24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class="text">
      <style:paragraph-properties fo:margin-top="0.847cm" fo:margin-bottom="0cm" style:contextual-spacing="false" fo:keep-together="always" fo:keep-with-next="always">
        <style:tab-stops/>
      </style:paragraph-properties>
      <style:text-properties fo:color="#f39000" loext:opacity="100%" style:font-name="Calibri" fo:font-family="Calibri" style:font-family-generic="roman" style:font-pitch="variable" fo:font-size="16pt" fo:font-weight="bold" style:font-name-asian="SimSun" style:font-family-asian="SimSun" style:font-family-generic-asian="system" style:font-pitch-asian="variable" style:font-size-asian="16pt" style:font-weight-asian="bold" style:font-name-complex="Arial1" style:font-family-complex="Arial" style:font-family-generic-complex="system" style:font-pitch-complex="variable" style:font-size-complex="16pt" style:font-weight-complex="bold"/>
    </style:style>
    <style:style style:name="Footer" style:family="paragraph" style:parent-style-name="Standard" style:default-outline-level="" style:class="extra">
      <style:paragraph-properties>
        <style:tab-stops>
          <style:tab-stop style:position="7.62cm" style:type="center"/>
          <style:tab-stop style:position="15.24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master-page-name="">
      <loext:graphic-properties draw:fill="solid" draw:fill-color="#ffffff"/>
      <style:paragraph-properties fo:margin-top="0.353cm" fo:margin-bottom="0.212cm" style:contextual-spacing="false" style:page-number="auto" fo:background-color="#ffffff" style:writing-mode="page"/>
      <style:text-properties fo:color="#ff7f00" loext:opacity="100%" fo:font-size="90%"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cm" style:contextual-spacing="false" fo:hyphenation-ladder-count="no-limit"/>
      <style:text-properties fo:color="#4f81bd" loext:opacity="100%" fo:font-weight="bold" style:font-weight-asian="bold" style:font-weight-complex="bold" fo:hyphenate="false" fo:hyphenation-remain-char-count="2" fo:hyphenation-push-char-count="2" loext:hyphenation-no-caps="false" loext:hyphenation-no-last-word="false" loext:hyphenation-word-char-count="no-limit" loext:hyphenation-zone="no-limit"/>
    </style:style>
    <style:style style:name="Heading_20_4" style:display-name="Heading 4" style:family="paragraph" style:parent-style-name="Heading" style:next-style-name="Text_20_body" style:default-outline-level="4" style:class="text" style:master-page-name="">
      <style:paragraph-properties fo:margin-left="0.3cm" fo:margin-right="0cm" fo:margin-top="0.212cm" fo:margin-bottom="0.212cm" style:contextual-spacing="false" fo:text-align="start" style:justify-single-word="false" fo:text-indent="0cm" style:auto-text-indent="false" style:page-number="auto" style:writing-mode="page"/>
      <style:text-properties fo:color="#4f81bd" loext:opacity="100%" style:font-name="Calibri2" fo:font-family="Calibri" style:font-style-name="Negrita" style:font-family-generic="swiss" style:font-pitch="variable" fo:font-size="60%" fo:font-style="normal"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master-page-name="">
      <style:paragraph-properties fo:margin-left="0.499cm" fo:margin-right="0cm" fo:margin-top="0.212cm" fo:margin-bottom="0.106cm" style:contextual-spacing="false" fo:text-indent="0cm" style:auto-text-indent="false" style:page-number="auto" style:writing-mode="page"/>
      <style:text-properties fo:color="#4f81bd" loext:opacity="100%" fo:font-size="50%" fo:font-style="italic" fo:font-weight="bold" style:font-size-asian="85%" style:font-weight-asian="bold" style:font-size-complex="85%" style:font-weight-complex="bold"/>
    </style:style>
    <style:style style:name="List_20_Paragraph" style:display-name="List Paragraph" style:family="paragraph" style:parent-style-name="Standard" style:default-outline-level="">
      <style:paragraph-properties fo:margin-left="1.27cm" fo:margin-right="0cm" fo:margin-top="0cm" fo:margin-bottom="0cm" style:contextual-spacing="true" fo:text-indent="0cm" style:auto-text-indent="false"/>
    </style:style>
    <style:style style:name="Heading_20_6" style:display-name="Heading 6" style:family="paragraph" style:parent-style-name="Heading" style:next-style-name="Text_20_body" style:default-outline-level="6" style:class="text" style:master-page-name="">
      <style:paragraph-properties fo:margin-left="-0.499cm" fo:margin-right="0cm" fo:margin-top="0.106cm" fo:margin-bottom="0.106cm" style:contextual-spacing="false" fo:text-indent="0cm" style:auto-text-indent="false" style:page-number="auto" style:snap-to-layout-grid="true" style:writing-mode="page"/>
      <style:text-properties fo:color="#4f81bd" loext:opacity="100%" style:font-name="Calibri3" fo:font-family="Calibri" style:font-style-name="Negrita cursiva" style:font-family-generic="swiss" style:font-pitch="variable" fo:font-size="5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fig." style:family="paragraph" style:parent-style-name="Caption">
      <style:text-properties style:font-name="Calibri5" fo:font-family="Calibri" style:font-style-name="Regular" style:font-family-generic="swiss" style:font-pitch="variable" fo:font-style="italic" fo:font-weight="normal"/>
    </style:style>
    <style:style style:name="Frame_20_contents" style:display-name="Frame contents" style:family="paragraph" style:parent-style-name="Standard" style:class="extra"/>
    <style:style style:name="Figure" style:family="paragraph" style:parent-style-name="Caption" style:class="extra"/>
    <style:style style:name="Párrafo_20_de_20_lista" style:display-name="Párrafo de lista" style:family="paragraph" style:parent-style-name="Standard">
      <style:paragraph-properties fo:margin-left="1.27cm" fo:margin-right="0cm" fo:hyphenation-ladder-count="no-limit" fo:text-indent="0cm" style:auto-text-indent="false">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Normal" style:family="paragraph">
      <style:paragraph-properties fo:hyphenation-ladder-count="no-limit"/>
      <style:text-properties fo:hyphenate="false" fo:hyphenation-remain-char-count="2" fo:hyphenation-push-char-count="2" loext:hyphenation-no-caps="false" loext:hyphenation-no-last-word="false" loext:hyphenation-word-char-count="no-limit" loext:hyphenation-zone="no-limit"/>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WW_5f_CharLFO15LVL1" style:display-name="WW_CharLFO15LVL1" style:family="text">
      <style:text-properties style:font-name="Symbol" fo:font-family="Symbol" style:font-family-generic="roman" style:font-pitch="variable" style:font-charset="x-symbol"/>
    </style:style>
    <style:style style:name="WW_5f_CharLFO15LVL2" style:display-name="WW_CharLFO1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3" style:display-name="WW_CharLFO15LVL3" style:family="text">
      <style:text-properties style:font-name="Wingdings" fo:font-family="Wingdings" style:font-family-generic="system" style:font-pitch="variable" style:font-charset="x-symbol"/>
    </style:style>
    <style:style style:name="WW_5f_CharLFO15LVL4" style:display-name="WW_CharLFO15LVL4" style:family="text">
      <style:text-properties style:font-name="Symbol" fo:font-family="Symbol" style:font-family-generic="roman" style:font-pitch="variable" style:font-charset="x-symbol"/>
    </style:style>
    <style:style style:name="WW_5f_CharLFO15LVL5" style:display-name="WW_CharLFO1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6" style:display-name="WW_CharLFO15LVL6" style:family="text">
      <style:text-properties style:font-name="Wingdings" fo:font-family="Wingdings" style:font-family-generic="system" style:font-pitch="variable" style:font-charset="x-symbol"/>
    </style:style>
    <style:style style:name="WW_5f_CharLFO15LVL7" style:display-name="WW_CharLFO15LVL7" style:family="text">
      <style:text-properties style:font-name="Symbol" fo:font-family="Symbol" style:font-family-generic="roman" style:font-pitch="variable" style:font-charset="x-symbol"/>
    </style:style>
    <style:style style:name="WW_5f_CharLFO15LVL8" style:display-name="WW_CharLFO1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9" style:display-name="WW_CharLFO15LVL9" style:family="text">
      <style:text-properties style:font-name="Wingdings" fo:font-family="Wingdings" style:font-family-generic="system" style:font-pitch="variable" style:font-charset="x-symbol"/>
    </style:style>
    <style:style style:name="Fuente_20_de_20_párrafo_20_predeter." style:display-name="Fuente de párrafo predeter." style:family="text"/>
    <style:style style:name="WW_5f_CharLFO43LVL1" style:display-name="WW_CharLFO43LVL1" style:family="text">
      <style:text-properties style:font-name="Symbol" fo:font-family="Symbol" style:font-family-generic="roman" style:font-pitch="variable" style:font-charset="x-symbol"/>
    </style:style>
    <style:style style:name="WW_5f_CharLFO43LVL2" style:display-name="WW_CharLFO4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3LVL3" style:display-name="WW_CharLFO43LVL3" style:family="text">
      <style:text-properties style:font-name="Wingdings" fo:font-family="Wingdings" style:font-family-generic="system" style:font-pitch="variable" style:font-charset="x-symbol"/>
    </style:style>
    <style:style style:name="WW_5f_CharLFO43LVL4" style:display-name="WW_CharLFO43LVL4" style:family="text">
      <style:text-properties style:font-name="Symbol" fo:font-family="Symbol" style:font-family-generic="roman" style:font-pitch="variable" style:font-charset="x-symbol"/>
    </style:style>
    <style:style style:name="WW_5f_CharLFO43LVL5" style:display-name="WW_CharLFO4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3LVL6" style:display-name="WW_CharLFO43LVL6" style:family="text">
      <style:text-properties style:font-name="Wingdings" fo:font-family="Wingdings" style:font-family-generic="system" style:font-pitch="variable" style:font-charset="x-symbol"/>
    </style:style>
    <style:style style:name="WW_5f_CharLFO43LVL7" style:display-name="WW_CharLFO43LVL7" style:family="text">
      <style:text-properties style:font-name="Symbol" fo:font-family="Symbol" style:font-family-generic="roman" style:font-pitch="variable" style:font-charset="x-symbol"/>
    </style:style>
    <style:style style:name="WW_5f_CharLFO43LVL8" style:display-name="WW_CharLFO4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3LVL9" style:display-name="WW_CharLFO43LVL9" style:family="text">
      <style:text-properties style:font-name="Wingdings" fo:font-family="Wingdings" style:font-family-generic="system" style:font-pitch="variable" style:font-charset="x-symbol"/>
    </style:style>
    <style:style style:name="WW_5f_CharLFO38LVL1" style:display-name="WW_CharLFO38LVL1" style:family="text">
      <style:text-properties style:font-name="Symbol" fo:font-family="Symbol" style:font-family-generic="roman" style:font-pitch="variable" style:font-charset="x-symbol"/>
    </style:style>
    <style:style style:name="WW_5f_CharLFO38LVL2" style:display-name="WW_CharLFO3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8LVL3" style:display-name="WW_CharLFO38LVL3" style:family="text">
      <style:text-properties style:font-name="Wingdings" fo:font-family="Wingdings" style:font-family-generic="system" style:font-pitch="variable" style:font-charset="x-symbol"/>
    </style:style>
    <style:style style:name="WW_5f_CharLFO38LVL4" style:display-name="WW_CharLFO38LVL4" style:family="text">
      <style:text-properties style:font-name="Symbol" fo:font-family="Symbol" style:font-family-generic="roman" style:font-pitch="variable" style:font-charset="x-symbol"/>
    </style:style>
    <style:style style:name="WW_5f_CharLFO38LVL5" style:display-name="WW_CharLFO3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8LVL6" style:display-name="WW_CharLFO38LVL6" style:family="text">
      <style:text-properties style:font-name="Wingdings" fo:font-family="Wingdings" style:font-family-generic="system" style:font-pitch="variable" style:font-charset="x-symbol"/>
    </style:style>
    <style:style style:name="WW_5f_CharLFO38LVL7" style:display-name="WW_CharLFO38LVL7" style:family="text">
      <style:text-properties style:font-name="Symbol" fo:font-family="Symbol" style:font-family-generic="roman" style:font-pitch="variable" style:font-charset="x-symbol"/>
    </style:style>
    <style:style style:name="WW_5f_CharLFO38LVL8" style:display-name="WW_CharLFO3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8LVL9" style:display-name="WW_CharLFO38LVL9" style:family="text">
      <style:text-properties style:font-name="Wingdings" fo:font-family="Wingdings" style:font-family-generic="system" style:font-pitch="variable" style:font-charset="x-symbol"/>
    </style:style>
    <style:style style:name="WW_5f_CharLFO51LVL1" style:display-name="WW_CharLFO51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1LVL2" style:display-name="WW_CharLFO51LVL2" style:family="text">
      <style:text-properties style:font-name="StarSymbol1" fo:font-family="StarSymbol" style:font-family-generic="system" style:font-charset="x-symbol"/>
    </style:style>
    <style:style style:name="WW_5f_CharLFO51LVL3" style:display-name="WW_CharLFO51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1LVL4" style:display-name="WW_CharLFO51LVL4"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1LVL5" style:display-name="WW_CharLFO51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1LVL6" style:display-name="WW_CharLFO51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1LVL7" style:display-name="WW_CharLFO51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1LVL8" style:display-name="WW_CharLFO51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1LVL9" style:display-name="WW_CharLFO51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8LVL1" style:display-name="WW_CharLFO48LVL1" style:family="text">
      <style:text-properties style:font-name="Symbol" fo:font-family="Symbol" style:font-family-generic="roman" style:font-pitch="variable" style:font-charset="x-symbol"/>
    </style:style>
    <style:style style:name="WW_5f_CharLFO48LVL2" style:display-name="WW_CharLFO48LVL2" style:family="text">
      <style:text-properties style:font-name="StarSymbol1" fo:font-family="StarSymbol" style:font-family-generic="system" style:font-charset="x-symbol"/>
    </style:style>
    <style:style style:name="WW_5f_CharLFO48LVL3" style:display-name="WW_CharLFO48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8LVL4" style:display-name="WW_CharLFO48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8LVL5" style:display-name="WW_CharLFO48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8LVL6" style:display-name="WW_CharLFO48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8LVL7" style:display-name="WW_CharLFO48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8LVL8" style:display-name="WW_CharLFO48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8LVL9" style:display-name="WW_CharLFO48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9LVL1" style:display-name="WW_CharLFO49LVL1" style:family="text">
      <style:text-properties style:font-name="Symbol" fo:font-family="Symbol" style:font-family-generic="roman" style:font-pitch="variable" style:font-charset="x-symbol"/>
    </style:style>
    <style:style style:name="WW_5f_CharLFO49LVL2" style:display-name="WW_CharLFO49LVL2" style:family="text">
      <style:text-properties style:font-name="StarSymbol1" fo:font-family="StarSymbol" style:font-family-generic="system" style:font-charset="x-symbol"/>
    </style:style>
    <style:style style:name="WW_5f_CharLFO49LVL3" style:display-name="WW_CharLFO49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9LVL4" style:display-name="WW_CharLFO49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9LVL5" style:display-name="WW_CharLFO49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9LVL6" style:display-name="WW_CharLFO49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9LVL7" style:display-name="WW_CharLFO49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9LVL8" style:display-name="WW_CharLFO49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9LVL9" style:display-name="WW_CharLFO49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0LVL1" style:display-name="WW_CharLFO50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0LVL2" style:display-name="WW_CharLFO50LVL2" style:family="text">
      <style:text-properties style:font-name="StarSymbol1" fo:font-family="StarSymbol" style:font-family-generic="system" style:font-charset="x-symbol"/>
    </style:style>
    <style:style style:name="WW_5f_CharLFO50LVL3" style:display-name="WW_CharLFO50LVL3"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0LVL4" style:display-name="WW_CharLFO50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0LVL5" style:display-name="WW_CharLFO50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0LVL6" style:display-name="WW_CharLFO50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0LVL7" style:display-name="WW_CharLFO50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0LVL8" style:display-name="WW_CharLFO50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0LVL9" style:display-name="WW_CharLFO50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0LVL1" style:display-name="WW_CharLFO30LVL1" style:family="text">
      <style:text-properties style:font-name="Symbol" fo:font-family="Symbol" style:font-family-generic="roman" style:font-pitch="variable" style:font-charset="x-symbol"/>
    </style:style>
    <style:style style:name="WW_5f_CharLFO30LVL2" style:display-name="WW_CharLFO3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3" style:display-name="WW_CharLFO30LVL3" style:family="text">
      <style:text-properties style:font-name="Wingdings" fo:font-family="Wingdings" style:font-family-generic="system" style:font-pitch="variable" style:font-charset="x-symbol"/>
    </style:style>
    <style:style style:name="WW_5f_CharLFO30LVL4" style:display-name="WW_CharLFO30LVL4" style:family="text">
      <style:text-properties style:font-name="Symbol" fo:font-family="Symbol" style:font-family-generic="roman" style:font-pitch="variable" style:font-charset="x-symbol"/>
    </style:style>
    <style:style style:name="WW_5f_CharLFO30LVL5" style:display-name="WW_CharLFO3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6" style:display-name="WW_CharLFO30LVL6" style:family="text">
      <style:text-properties style:font-name="Wingdings" fo:font-family="Wingdings" style:font-family-generic="system" style:font-pitch="variable" style:font-charset="x-symbol"/>
    </style:style>
    <style:style style:name="WW_5f_CharLFO30LVL7" style:display-name="WW_CharLFO30LVL7" style:family="text">
      <style:text-properties style:font-name="Symbol" fo:font-family="Symbol" style:font-family-generic="roman" style:font-pitch="variable" style:font-charset="x-symbol"/>
    </style:style>
    <style:style style:name="WW_5f_CharLFO30LVL8" style:display-name="WW_CharLFO3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9" style:display-name="WW_CharLFO30LVL9" style:family="text">
      <style:text-properties style:font-name="Wingdings" fo:font-family="Wingdings" style:font-family-generic="system" style:font-pitch="variable" style:font-charset="x-symbol"/>
    </style:style>
    <style:style style:name="WW_5f_CharLFO59LVL1" style:display-name="WW_CharLFO59LVL1" style:family="text">
      <style:text-properties style:font-name="Symbol" fo:font-family="Symbol" style:font-family-generic="roman" style:font-pitch="variable" style:font-charset="x-symbol"/>
    </style:style>
    <style:style style:name="WW_5f_CharLFO59LVL2" style:display-name="WW_CharLFO59LVL2" style:family="text">
      <style:text-properties style:font-name="StarSymbol1" fo:font-family="StarSymbol" style:font-family-generic="system" style:font-charset="x-symbol"/>
    </style:style>
    <style:style style:name="WW_5f_CharLFO59LVL3" style:display-name="WW_CharLFO59LVL3"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9LVL4" style:display-name="WW_CharLFO59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9LVL5" style:display-name="WW_CharLFO59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9LVL6" style:display-name="WW_CharLFO59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9LVL7" style:display-name="WW_CharLFO59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9LVL8" style:display-name="WW_CharLFO59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9LVL9" style:display-name="WW_CharLFO59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1LVL1" style:display-name="WW_CharLFO31LVL1" style:family="text">
      <style:text-properties style:font-name="Symbol" fo:font-family="Symbol" style:font-family-generic="roman" style:font-pitch="variable" style:font-charset="x-symbol"/>
    </style:style>
    <style:style style:name="WW_5f_CharLFO31LVL2" style:display-name="WW_CharLFO3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3" style:display-name="WW_CharLFO31LVL3" style:family="text">
      <style:text-properties style:font-name="Wingdings" fo:font-family="Wingdings" style:font-family-generic="system" style:font-pitch="variable" style:font-charset="x-symbol"/>
    </style:style>
    <style:style style:name="WW_5f_CharLFO31LVL4" style:display-name="WW_CharLFO31LVL4" style:family="text">
      <style:text-properties style:font-name="Symbol" fo:font-family="Symbol" style:font-family-generic="roman" style:font-pitch="variable" style:font-charset="x-symbol"/>
    </style:style>
    <style:style style:name="WW_5f_CharLFO31LVL5" style:display-name="WW_CharLFO3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6" style:display-name="WW_CharLFO31LVL6" style:family="text">
      <style:text-properties style:font-name="Wingdings" fo:font-family="Wingdings" style:font-family-generic="system" style:font-pitch="variable" style:font-charset="x-symbol"/>
    </style:style>
    <style:style style:name="WW_5f_CharLFO31LVL7" style:display-name="WW_CharLFO31LVL7" style:family="text">
      <style:text-properties style:font-name="Symbol" fo:font-family="Symbol" style:font-family-generic="roman" style:font-pitch="variable" style:font-charset="x-symbol"/>
    </style:style>
    <style:style style:name="WW_5f_CharLFO31LVL8" style:display-name="WW_CharLFO3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9" style:display-name="WW_CharLFO31LVL9" style:family="text">
      <style:text-properties style:font-name="Wingdings" fo:font-family="Wingdings" style:font-family-generic="system" style:font-pitch="variable" style:font-charset="x-symbol"/>
    </style:style>
    <style:style style:name="WW_5f_CharLFO32LVL1" style:display-name="WW_CharLFO32LVL1" style:family="text">
      <style:text-properties style:font-name="Symbol" fo:font-family="Symbol" style:font-family-generic="roman" style:font-pitch="variable" style:font-charset="x-symbol"/>
    </style:style>
    <style:style style:name="WW_5f_CharLFO32LVL2" style:display-name="WW_CharLFO3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2LVL3" style:display-name="WW_CharLFO32LVL3" style:family="text">
      <style:text-properties style:font-name="Wingdings" fo:font-family="Wingdings" style:font-family-generic="system" style:font-pitch="variable" style:font-charset="x-symbol"/>
    </style:style>
    <style:style style:name="WW_5f_CharLFO32LVL4" style:display-name="WW_CharLFO32LVL4" style:family="text">
      <style:text-properties style:font-name="Symbol" fo:font-family="Symbol" style:font-family-generic="roman" style:font-pitch="variable" style:font-charset="x-symbol"/>
    </style:style>
    <style:style style:name="WW_5f_CharLFO32LVL5" style:display-name="WW_CharLFO3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2LVL6" style:display-name="WW_CharLFO32LVL6" style:family="text">
      <style:text-properties style:font-name="Wingdings" fo:font-family="Wingdings" style:font-family-generic="system" style:font-pitch="variable" style:font-charset="x-symbol"/>
    </style:style>
    <style:style style:name="WW_5f_CharLFO32LVL7" style:display-name="WW_CharLFO32LVL7" style:family="text">
      <style:text-properties style:font-name="Symbol" fo:font-family="Symbol" style:font-family-generic="roman" style:font-pitch="variable" style:font-charset="x-symbol"/>
    </style:style>
    <style:style style:name="WW_5f_CharLFO32LVL8" style:display-name="WW_CharLFO3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2LVL9" style:display-name="WW_CharLFO32LVL9" style:family="text">
      <style:text-properties style:font-name="Wingdings" fo:font-family="Wingdings" style:font-family-generic="system" style:font-pitch="variable" style:font-charset="x-symbol"/>
    </style:style>
    <style:style style:name="WW_5f_CharLFO33LVL1" style:display-name="WW_CharLFO33LVL1" style:family="text">
      <style:text-properties style:font-name="Symbol" fo:font-family="Symbol" style:font-family-generic="roman" style:font-pitch="variable" style:font-charset="x-symbol"/>
    </style:style>
    <style:style style:name="WW_5f_CharLFO33LVL2" style:display-name="WW_CharLFO3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3" style:display-name="WW_CharLFO33LVL3" style:family="text">
      <style:text-properties style:font-name="Wingdings" fo:font-family="Wingdings" style:font-family-generic="system" style:font-pitch="variable" style:font-charset="x-symbol"/>
    </style:style>
    <style:style style:name="WW_5f_CharLFO33LVL4" style:display-name="WW_CharLFO33LVL4" style:family="text">
      <style:text-properties style:font-name="Symbol" fo:font-family="Symbol" style:font-family-generic="roman" style:font-pitch="variable" style:font-charset="x-symbol"/>
    </style:style>
    <style:style style:name="WW_5f_CharLFO33LVL5" style:display-name="WW_CharLFO3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6" style:display-name="WW_CharLFO33LVL6" style:family="text">
      <style:text-properties style:font-name="Wingdings" fo:font-family="Wingdings" style:font-family-generic="system" style:font-pitch="variable" style:font-charset="x-symbol"/>
    </style:style>
    <style:style style:name="WW_5f_CharLFO33LVL7" style:display-name="WW_CharLFO33LVL7" style:family="text">
      <style:text-properties style:font-name="Symbol" fo:font-family="Symbol" style:font-family-generic="roman" style:font-pitch="variable" style:font-charset="x-symbol"/>
    </style:style>
    <style:style style:name="WW_5f_CharLFO33LVL8" style:display-name="WW_CharLFO3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9" style:display-name="WW_CharLFO33LVL9" style:family="text">
      <style:text-properties style:font-name="Wingdings" fo:font-family="Wingdings" style:font-family-generic="system" style:font-pitch="variable" style:font-charset="x-symbol"/>
    </style:style>
    <style:style style:name="WW_5f_CharLFO26LVL1" style:display-name="WW_CharLFO26LVL1" style:family="text">
      <style:text-properties style:font-name="StarSymbol1" fo:font-family="StarSymbol" style:font-family-generic="system" style:font-charset="x-symbol"/>
    </style:style>
    <style:style style:name="WW_5f_CharLFO26LVL2" style:display-name="WW_CharLFO26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6LVL3" style:display-name="WW_CharLFO26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6LVL4" style:display-name="WW_CharLFO26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6LVL5" style:display-name="WW_CharLFO26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6LVL6" style:display-name="WW_CharLFO26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6LVL7" style:display-name="WW_CharLFO26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6LVL8" style:display-name="WW_CharLFO26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6LVL9" style:display-name="WW_CharLFO26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6LVL1" style:display-name="WW_CharLFO66LVL1" style:family="text">
      <style:text-properties style:font-name="Symbol" fo:font-family="Symbol" style:font-family-generic="roman" style:font-pitch="variable" style:font-charset="x-symbol"/>
    </style:style>
    <style:style style:name="WW_5f_CharLFO66LVL2" style:display-name="WW_CharLFO66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6LVL3" style:display-name="WW_CharLFO66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6LVL4" style:display-name="WW_CharLFO66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6LVL5" style:display-name="WW_CharLFO66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6LVL6" style:display-name="WW_CharLFO66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6LVL7" style:display-name="WW_CharLFO66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6LVL8" style:display-name="WW_CharLFO66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6LVL9" style:display-name="WW_CharLFO66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0LVL1" style:display-name="WW_CharLFO70LVL1" style:family="text">
      <style:text-properties style:font-name="Symbol" fo:font-family="Symbol" style:font-family-generic="roman" style:font-pitch="variable" style:font-charset="x-symbol"/>
    </style:style>
    <style:style style:name="WW_5f_CharLFO70LVL2" style:display-name="WW_CharLFO70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0LVL3" style:display-name="WW_CharLFO70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0LVL4" style:display-name="WW_CharLFO70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0LVL5" style:display-name="WW_CharLFO70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0LVL6" style:display-name="WW_CharLFO70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0LVL7" style:display-name="WW_CharLFO70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0LVL8" style:display-name="WW_CharLFO70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0LVL9" style:display-name="WW_CharLFO70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1LVL1" style:display-name="WW_CharLFO71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1LVL2" style:display-name="WW_CharLFO7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1LVL3" style:display-name="WW_CharLFO71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1LVL4" style:display-name="WW_CharLFO71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1LVL5" style:display-name="WW_CharLFO71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1LVL6" style:display-name="WW_CharLFO71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1LVL7" style:display-name="WW_CharLFO71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1LVL8" style:display-name="WW_CharLFO71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1LVL9" style:display-name="WW_CharLFO71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2LVL1" style:display-name="WW_CharLFO72LVL1" style:family="text">
      <style:text-properties style:font-name="Symbol" fo:font-family="Symbol" style:font-family-generic="roman" style:font-pitch="variable" style:font-charset="x-symbol"/>
    </style:style>
    <style:style style:name="WW_5f_CharLFO72LVL2" style:display-name="WW_CharLFO7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2LVL3" style:display-name="WW_CharLFO72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2LVL4" style:display-name="WW_CharLFO72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2LVL5" style:display-name="WW_CharLFO72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2LVL6" style:display-name="WW_CharLFO72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2LVL7" style:display-name="WW_CharLFO72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2LVL8" style:display-name="WW_CharLFO72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2LVL9" style:display-name="WW_CharLFO72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4LVL1" style:display-name="WW_CharLFO34LVL1" style:family="text">
      <style:text-properties style:font-name="Symbol" fo:font-family="Symbol" style:font-family-generic="roman" style:font-pitch="variable" style:font-charset="x-symbol"/>
    </style:style>
    <style:style style:name="WW_5f_CharLFO34LVL2" style:display-name="WW_CharLFO34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4LVL3" style:display-name="WW_CharLFO34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4LVL4" style:display-name="WW_CharLFO34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4LVL5" style:display-name="WW_CharLFO34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4LVL6" style:display-name="WW_CharLFO34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4LVL7" style:display-name="WW_CharLFO34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4LVL8" style:display-name="WW_CharLFO34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4LVL9" style:display-name="WW_CharLFO34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5LVL1" style:display-name="WW_CharLFO35LVL1" style:family="text">
      <style:text-properties style:font-name="Symbol" fo:font-family="Symbol" style:font-family-generic="roman" style:font-pitch="variable" style:font-charset="x-symbol"/>
    </style:style>
    <style:style style:name="WW_5f_CharLFO35LVL2" style:display-name="WW_CharLFO3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5LVL3" style:display-name="WW_CharLFO35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5LVL4" style:display-name="WW_CharLFO35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5LVL5" style:display-name="WW_CharLFO35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5LVL6" style:display-name="WW_CharLFO35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5LVL7" style:display-name="WW_CharLFO35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5LVL8" style:display-name="WW_CharLFO35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5LVL9" style:display-name="WW_CharLFO35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Character_5f_20_5f_style" style:display-name="Character_20_style"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 %1% " style:num-prefix=" " style:num-suffix=" " style:num-format="1">
        <style:list-level-properties text:list-level-position-and-space-mode="label-alignment">
          <style:list-level-label-alignment text:label-followed-by="listtab"/>
        </style:list-level-properties>
      </text:outline-level-style>
      <text:outline-level-style text:level="2" loext:num-list-format="%1%.%2%." style:num-suffix="." style:num-format="1" text:display-levels="2">
        <style:list-level-properties text:list-level-position-and-space-mode="label-alignment">
          <style:list-level-label-alignment text:label-followed-by="listtab"/>
        </style:list-level-properties>
      </text:outline-level-style>
      <text:outline-level-style text:level="3"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1%.%2%.%3%.%4%." style:num-suffix="." style:num-format="1" text:display-levels="4">
        <style:list-level-properties text:list-level-position-and-space-mode="label-alignment">
          <style:list-level-label-alignment text:label-followed-by="listtab"/>
        </style:list-level-properties>
      </text:outline-level-style>
      <text:outline-level-style text:level="5" loext:num-list-format=" %1%.%2%.%3%.%4%.%5% " style:num-prefix=" " style:num-suffix=" " style:num-format="1" text:display-levels="5">
        <style:list-level-properties text:list-level-position-and-space-mode="label-alignment">
          <style:list-level-label-alignment text:label-followed-by="listtab"/>
        </style:list-level-properties>
      </text:outline-level-style>
      <text:outline-level-style text:level="6" loext:num-list-format=" %6% " style:num-prefix=" " style:num-suffix=" " style:num-format="">
        <style:list-level-properties text:list-level-position-and-space-mode="label-alignment">
          <style:list-level-label-alignment text:label-followed-by="listtab"/>
        </style:list-level-properties>
      </text:outline-level-style>
      <text:outline-level-style text:level="7" loext:num-list-format=" %1%.%2%.%3%.%4%.%5%.%6%.%7% " style:num-prefix=" " style:num-suffix=" " style:num-format="1" text:display-levels="7">
        <style:list-level-properties text:list-level-position-and-space-mode="label-alignment">
          <style:list-level-label-alignment text:label-followed-by="listtab"/>
        </style:list-level-properties>
      </text:outline-level-style>
      <text:outline-level-style text:level="8" loext:num-list-format=" %1%.%2%.%3%.%4%.%5%.%6%.%7%.%8% " style:num-prefix=" " style:num-suffix=" " style:num-format="1" text:display-levels="8">
        <style:list-level-properties text:list-level-position-and-space-mode="label-alignment">
          <style:list-level-label-alignment text:label-followed-by="listtab"/>
        </style:list-level-properties>
      </text:outline-level-style>
      <text:outline-level-style text:level="9" loext:num-list-format=" %1%.%2%.%3%.%4%.%5%.%6%.%7%.%8%.%9% " style:num-prefix=" " style:num-suffix=" " style:num-format="1" text:display-levels="9">
        <style:list-level-properties text:list-level-position-and-space-mode="label-alignment">
          <style:list-level-label-alignment text:label-followed-by="listtab"/>
        </style:list-level-properties>
      </text:outline-level-style>
      <text:outline-level-style text:level="10" loext:num-list-format=" %1%.%2%.%3%.%4%.%5%.%6%.%7%.%8%.%9%.%10% " style:num-prefix=" " style:num-suffix=" " style:num-format="1" text:display-levels="10">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1"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2"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3"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4"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5"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6"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7"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8"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9"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10"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1"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2"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13"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4"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5"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16"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7"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8"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19"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20"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21"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22"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23"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24"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a1" style:family="table">
      <style:table-properties style:width="17.688cm" fo:margin-left="-0.693cm" table:align="left"/>
    </style:style>
    <style:style style:name="Tabla1.A" style:family="table-column">
      <style:table-column-properties style:column-width="9.587cm"/>
    </style:style>
    <style:style style:name="Tabla1.B" style:family="table-column">
      <style:table-column-properties style:column-width="8.102cm"/>
    </style:style>
    <style:style style:name="Tabla1.1" style:family="table-row">
      <style:table-row-properties style:min-row-height="0.997cm"/>
    </style:style>
    <style:style style:name="Tabla1.A1" style:family="table-cell">
      <style:table-cell-properties fo:padding="0.097cm" fo:border-left="0.05pt solid #000000" fo:border-right="none" fo:border-top="0.05pt solid #000000" fo:border-bottom="0.05pt solid #000000"/>
    </style:style>
    <style:style style:name="Tabla1.B1" style:family="table-cell">
      <style:table-cell-properties fo:padding="0cm" fo:border="none"/>
    </style:style>
    <style:style style:name="Tabla6" style:family="table">
      <style:table-properties style:width="16.503cm" fo:margin-left="0cm" fo:margin-top="0cm" fo:margin-bottom="0cm" table:align="left" style:writing-mode="lr-tb"/>
    </style:style>
    <style:style style:name="Tabla6.A" style:family="table-column">
      <style:table-column-properties style:column-width="4.75cm"/>
    </style:style>
    <style:style style:name="Tabla6.B" style:family="table-column">
      <style:table-column-properties style:column-width="2.552cm"/>
    </style:style>
    <style:style style:name="Tabla6.C" style:family="table-column">
      <style:table-column-properties style:column-width="2.223cm"/>
    </style:style>
    <style:style style:name="Tabla6.D" style:family="table-column">
      <style:table-column-properties style:column-width="6.978cm"/>
    </style:style>
    <style:style style:name="Tabla6.1" style:family="table-row">
      <style:table-row-properties fo:keep-together="auto"/>
    </style:style>
    <style:style style:name="Tabla6.A1" style:family="table-cell">
      <style:table-cell-properties style:vertical-align="middle" fo:padding-left="0.123cm" fo:padding-right="0.123cm" fo:padding-top="0cm" fo:padding-bottom="0cm" fo:border-left="none" fo:border-right="none" fo:border-top="0.5pt solid #00000a" fo:border-bottom="none"/>
    </style:style>
    <style:style style:name="Tabla6.A2" style:family="table-cell">
      <style:table-cell-properties style:vertical-align="middle" fo:padding-left="0.123cm" fo:padding-right="0.123cm" fo:padding-top="0cm" fo:padding-bottom="0cm" fo:border="none"/>
    </style:style>
    <style:style style:name="MP1" style:family="paragraph" style:parent-style-name="Header">
      <style:text-properties fo:language="ca" fo:country="ES" officeooo:paragraph-rsid="000e1972"/>
    </style:style>
    <style:style style:name="MP2" style:family="paragraph" style:parent-style-name="Standard">
      <style:paragraph-properties fo:text-align="start" style:justify-single-word="false"/>
      <style:text-properties fo:language="ca" fo:country="ES" officeooo:paragraph-rsid="000e1972"/>
    </style:style>
    <style:style style:name="MP3" style:family="paragraph">
      <loext:graphic-properties draw:fill="none"/>
      <style:paragraph-properties fo:text-align="center"/>
    </style:style>
    <style:style style:name="MP4" style:family="paragraph" style:parent-style-name="Header">
      <style:paragraph-properties fo:margin-left="0cm" fo:margin-right="1.812cm" fo:text-align="center" style:justify-single-word="false" fo:text-indent="0cm" style:auto-text-indent="false">
        <style:tab-stops>
          <style:tab-stop style:position="7.31cm"/>
          <style:tab-stop style:position="7.62cm" style:type="center"/>
          <style:tab-stop style:position="15.24cm" style:type="right"/>
        </style:tab-stops>
      </style:paragraph-properties>
      <style:text-properties fo:color="#cc3300" loext:opacity="100%" style:font-name="Calibri" fo:font-size="10pt" fo:language="ca" fo:country="ES" fo:font-weight="bold" officeooo:paragraph-rsid="000e1972" style:font-size-asian="10pt" style:font-weight-asian="bold" style:font-name-complex="Arial1" style:font-size-complex="10pt"/>
    </style:style>
    <style:style style:name="MP5" style:family="paragraph" style:parent-style-name="Standard">
      <style:text-properties fo:language="ca" fo:country="ES" officeooo:paragraph-rsid="000e1972"/>
    </style:style>
    <style:style style:name="MP6" style:family="paragraph" style:parent-style-name="Footer">
      <style:text-properties fo:language="ca" fo:country="ES" officeooo:paragraph-rsid="000e1972"/>
    </style:style>
    <style:style style:name="MP7" style:family="paragraph" style:parent-style-name="Footer">
      <style:paragraph-properties fo:margin-left="-0.123cm" fo:margin-right="0cm" fo:text-align="start" style:justify-single-word="false" fo:text-indent="0cm" style:auto-text-indent="false"/>
      <style:text-properties fo:language="ca" fo:country="ES" officeooo:paragraph-rsid="000e1972"/>
    </style:style>
    <style:style style:name="MP8" style:family="paragraph" style:parent-style-name="Standard">
      <style:paragraph-properties fo:text-align="end" style:justify-single-word="false"/>
      <style:text-properties fo:language="ca" fo:country="ES" officeooo:paragraph-rsid="000e1972"/>
    </style:style>
    <style:style style:name="MP9" style:family="paragraph" style:parent-style-name="Footer">
      <style:paragraph-properties fo:margin-left="-0.123cm" fo:margin-right="0cm" fo:text-indent="0cm" style:auto-text-indent="false"/>
      <style:text-properties style:font-name="Calibri" fo:font-size="11pt" fo:language="ca" fo:country="ES" officeooo:paragraph-rsid="000e1972" style:font-size-asian="11pt" style:font-size-complex="11pt"/>
    </style:style>
    <style:style style:name="MP10" style:family="paragraph" style:parent-style-name="Footer">
      <style:paragraph-properties fo:text-align="end" style:justify-single-word="false"/>
      <style:text-properties style:font-name="Calibri" fo:font-size="11pt" fo:language="ca" fo:country="ES" officeooo:paragraph-rsid="000e1972" style:font-size-asian="11pt" style:font-size-complex="11pt"/>
    </style:style>
    <style:style style:name="MP11" style:family="paragraph" style:parent-style-name="Footer">
      <style:text-properties style:font-name="Calibri" fo:font-size="11pt" fo:language="ca" fo:country="ES" officeooo:paragraph-rsid="000e1972" style:font-size-asian="11pt" style:font-size-complex="11pt"/>
    </style:style>
    <style:style style:name="MT1" style:family="text">
      <style:text-properties style:font-name="Calibri" fo:font-size="11pt" style:font-size-asian="11pt" style:font-size-complex="11pt"/>
    </style:style>
    <style:style style:name="Mgr1" style:family="graphic">
      <style:graphic-properties loext:decorative="false" style:run-through="background" style:wrap="run-through" style:number-wrapped-paragraphs="no-limit" style:vertical-pos="from-top" style:horizontal-pos="from-left" style:horizontal-rel="paragraph" draw:wrap-influence-on-position="once-concurrent" loext:allow-overlap="true" style:flow-with-text="false"/>
    </style:style>
    <style:style style:name="Mgr2" style:family="graphic">
      <style:graphic-properties draw:stroke="none" draw:fill="none" draw:textarea-horizontal-align="center" draw:textarea-vertical-align="middle" draw:color-mode="standard" draw:luminance="0%" draw:contrast="0%" draw:gamma="100%" draw:red="0%" draw:green="0%" draw:blue="0%" fo:clip="rect(0cm, 0cm, 0cm, 4.732cm)" draw:image-opacity="100%" style:mirror="none" loext:decorative="false" style:run-through="background"/>
    </style:style>
    <style:style style:name="Mgr3"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run-through="backgroun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51cm" fo:margin-bottom="1.251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0.75cm" fo:margin-left="0cm" fo:margin-right="0cm" fo:margin-top="0.649cm" style:dynamic-spacing="true"/>
      </style:footer-style>
    </style:page-layout>
    <style:style style:name="Mdp1" style:family="drawing-page">
      <style:drawing-page-properties draw:background-size="full"/>
    </style:style>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draw:style-name="Mdp1"/>
    <style:master-page style:name="Converted2" style:page-layout-name="Mpm2" draw:style-name="Mdp1">
      <style:header>
        <text:p text:style-name="MP1"/>
        <table:table table:name="Tabla1" table:style-name="Tabla1">
          <table:table-column table:style-name="Tabla1.A"/>
          <table:table-column table:style-name="Tabla1.B"/>
          <table:table-row table:style-name="Tabla1.1">
            <table:table-cell table:style-name="Tabla1.A1" office:value-type="string">
              <text:p text:style-name="MP2"><draw:g text:anchor-type="as-char" svg:y="-0.011cm" draw:z-index="42" draw:name="Group 6" draw:style-name="Mgr1"><draw:frame draw:name="Picture 2" draw:style-name="Mgr2" draw:text-style-name="MP3" svg:width="6.966cm" svg:height="1.281cm" svg:x="1.767cm" svg:y="0cm"><draw:image xlink:href="Pictures/10000000000006A400000104792F8214.png" xlink:type="simple" xlink:show="embed" xlink:actuate="onLoad" draw:mime-type="image/png"><text:p/></draw:image></draw:frame><draw:frame draw:name="Picture 3" draw:style-name="Mgr3" draw:text-style-name="MP3" svg:width="1.65cm" svg:height="1.28cm" svg:x="0cm" svg:y="0cm"><draw:image xlink:href="Pictures/10000001000002E6000002BBD71058E4.png" xlink:type="simple" xlink:show="embed" xlink:actuate="onLoad" draw:mime-type="image/png"><text:p/></draw:image></draw:frame></draw:g></text:p>
            </table:table-cell>
            <table:table-cell table:style-name="Tabla1.B1" office:value-type="string">
              <text:p text:style-name="MP4">Oficina Tècnica de Direcció de Projecte</text:p>
            </table:table-cell>
          </table:table-row>
        </table:table>
        <text:p text:style-name="MP5"/>
      </style:header>
      <style:footer>
        <text:p text:style-name="MP6"/>
        <table:table table:name="Tabla6" table:style-name="Tabla6">
          <table:table-column table:style-name="Tabla6.A"/>
          <table:table-column table:style-name="Tabla6.B"/>
          <table:table-column table:style-name="Tabla6.C"/>
          <table:table-column table:style-name="Tabla6.D"/>
          <table:table-row table:style-name="Tabla6.1">
            <table:table-cell table:style-name="Tabla6.A1" table:number-columns-spanned="3" office:value-type="string">
              <text:p text:style-name="MP7"><text:file-name text:display="name-and-extension">02_Distribucio_Manual_Administrador.odt</text:file-name></text:p>
            </table:table-cell>
            <table:covered-table-cell/>
            <table:covered-table-cell/>
            <table:table-cell table:style-name="Tabla6.A1" office:value-type="string">
              <text:p text:style-name="MP8"><text:span text:style-name="MT1">Pàgina </text:span><text:span text:style-name="MT1"><text:page-number text:select-page="current">43</text:page-number></text:span><text:span text:style-name="MT1"><text:s/>/ </text:span><text:span text:style-name="MT1"><text:page-count>43</text:page-count></text:span></text:p>
            </table:table-cell>
          </table:table-row>
          <table:table-row table:style-name="Tabla6.1">
            <table:table-cell table:style-name="Tabla6.A2" office:value-type="string">
              <text:p text:style-name="MP9">Estrictament Confidencial</text:p>
            </table:table-cell>
            <table:table-cell table:style-name="Tabla6.A2" office:value-type="string">
              <text:p text:style-name="MP10">Data:</text:p>
            </table:table-cell>
            <table:table-cell table:style-name="Tabla6.A2" office:value-type="string">
              <text:p text:style-name="MP11"><text:date style:data-style-name="N10036" text:date-value="2026-04-20T10:51:07.479000077">20/04/2026</text:date></text:p>
            </table:table-cell>
            <table:table-cell table:style-name="Tabla6.A2" office:value-type="string">
              <text:p text:style-name="MP10">Document de treball intern</text:p>
            </table:table-cell>
          </table:table-row>
        </table:table>
        <text:p text:style-name="MP5"/>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8-09-25T15:02:21.392000000</meta:creation-date>
    <dc:date>2026-04-20T10:49:28.508000000</dc:date>
    <meta:editing-duration>PT22H14M10S</meta:editing-duration>
    <meta:editing-cycles>139</meta:editing-cycles>
    <meta:generator>LibreOffice/24.2.1.2$Windows_X86_64 LibreOffice_project/db4def46b0453cc22e2d0305797cf981b68ef5ac</meta:generator>
    <meta:document-statistic meta:table-count="6" meta:image-count="78" meta:object-count="0" meta:page-count="43" meta:paragraph-count="533" meta:word-count="5898" meta:character-count="36037" meta:non-whitespace-character-count="30817"/>
  </office:meta>
</office:document-meta>
</file>