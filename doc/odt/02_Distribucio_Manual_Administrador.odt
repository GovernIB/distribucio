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4F2000001CE718C8F1F.png" manifest:media-type="image/png"/>
  <manifest:file-entry manifest:full-path="Pictures/10000000000006A400000104792F8214.png" manifest:media-type="image/png"/>
  <manifest:file-entry manifest:full-path="Pictures/10000001000000AB000000906B1FA2B5.png" manifest:media-type="image/png"/>
  <manifest:file-entry manifest:full-path="Pictures/100000000000013E000000B9CD63DA2E.png" manifest:media-type="image/png"/>
  <manifest:file-entry manifest:full-path="Pictures/10000001000002E6000002BBD71058E4.png" manifest:media-type="image/png"/>
  <manifest:file-entry manifest:full-path="Pictures/100000000000038A000001A8B2B6A107.png" manifest:media-type="image/png"/>
  <manifest:file-entry manifest:full-path="Pictures/10000000000001E70000005F3D868FE3.png" manifest:media-type="image/png"/>
  <manifest:file-entry manifest:full-path="Pictures/1000000000000141000000E8FFB2FA52.png" manifest:media-type="image/png"/>
  <manifest:file-entry manifest:full-path="Pictures/10000000000002750000008FD442AA45.png" manifest:media-type="image/png"/>
  <manifest:file-entry manifest:full-path="Pictures/100000000000000C0000000E25855A0E.png" manifest:media-type="image/png"/>
  <manifest:file-entry manifest:full-path="Pictures/10000000000001940000006567358005.png" manifest:media-type="image/png"/>
  <manifest:file-entry manifest:full-path="Pictures/10000001000000DB00000093F7200B0A.png" manifest:media-type="image/png"/>
  <manifest:file-entry manifest:full-path="Pictures/100000000000001A0000001764E3CB42.png" manifest:media-type="image/png"/>
  <manifest:file-entry manifest:full-path="Pictures/1000000000000015000000172198EC24.png" manifest:media-type="image/png"/>
  <manifest:file-entry manifest:full-path="Pictures/100000000000001800000013C4DED6E2.png" manifest:media-type="image/png"/>
  <manifest:file-entry manifest:full-path="Pictures/10000001000000490000001396689F9A.png" manifest:media-type="image/png"/>
  <manifest:file-entry manifest:full-path="Pictures/100000000000005900000026A8ADC43B.png" manifest:media-type="image/png"/>
  <manifest:file-entry manifest:full-path="Pictures/100000000000007000000023DE0D7229.png" manifest:media-type="image/png"/>
  <manifest:file-entry manifest:full-path="Pictures/100000000000005A00000026F8B00DC6.png" manifest:media-type="image/png"/>
  <manifest:file-entry manifest:full-path="Pictures/10000000000000EE00000059783CF345.png" manifest:media-type="image/png"/>
  <manifest:file-entry manifest:full-path="Pictures/10000000000003A50000011A191EDCE7.png" manifest:media-type="image/png"/>
  <manifest:file-entry manifest:full-path="Pictures/100000000000008300000014F23A1794.png" manifest:media-type="image/png"/>
  <manifest:file-entry manifest:full-path="Pictures/100000000000038B0000029F35E8C63B.png" manifest:media-type="image/png"/>
  <manifest:file-entry manifest:full-path="Pictures/100000000000031E00000160EE59E714.png" manifest:media-type="image/png"/>
  <manifest:file-entry manifest:full-path="Pictures/10000000000002BF000001AF010F605E.png" manifest:media-type="image/png"/>
  <manifest:file-entry manifest:full-path="Pictures/1000000000000387000000381DF5DF64.png" manifest:media-type="image/png"/>
  <manifest:file-entry manifest:full-path="Pictures/10000000000000FD00000039762F8AFE.png" manifest:media-type="image/png"/>
  <manifest:file-entry manifest:full-path="Pictures/10000001000002F0000001C743AE6A7D.png" manifest:media-type="image/png"/>
  <manifest:file-entry manifest:full-path="Pictures/100000000000031F0000019A901F02EC.png" manifest:media-type="image/png"/>
  <manifest:file-entry manifest:full-path="Pictures/10000001000002670000015FB028ABB5.png" manifest:media-type="image/png"/>
  <manifest:file-entry manifest:full-path="Pictures/10000001000004FE00000203E8016BE6.png" manifest:media-type="image/png"/>
  <manifest:file-entry manifest:full-path="Pictures/100000000000006A00000014D6DAA008.png" manifest:media-type="image/png"/>
  <manifest:file-entry manifest:full-path="Pictures/10000000000003720000010BF24E6EFA.png" manifest:media-type="image/png"/>
  <manifest:file-entry manifest:full-path="Pictures/100000000000038E000001243AEE8BCD.png" manifest:media-type="image/png"/>
  <manifest:file-entry manifest:full-path="Pictures/10000000000005000000018B94E5A950.png" manifest:media-type="image/png"/>
  <manifest:file-entry manifest:full-path="Pictures/1000000100000754000001FB7DC1C372.png" manifest:media-type="image/png"/>
  <manifest:file-entry manifest:full-path="Pictures/10000001000000D00000004D0F89587F.png" manifest:media-type="image/png"/>
  <manifest:file-entry manifest:full-path="Pictures/100000000000066E000003358D070C06.png" manifest:media-type="image/png"/>
  <manifest:file-entry manifest:full-path="Pictures/10000001000004E5000001969C0E9993.png" manifest:media-type="image/png"/>
  <manifest:file-entry manifest:full-path="Pictures/10000001000004FA000000DEE32CD0E3.png" manifest:media-type="image/png"/>
  <manifest:file-entry manifest:full-path="Pictures/10000000000004D8000001B38366D8E4.png" manifest:media-type="image/png"/>
  <manifest:file-entry manifest:full-path="Pictures/100000000000038B000000FC93CCC07A.png" manifest:media-type="image/png"/>
  <manifest:file-entry manifest:full-path="Pictures/10000001000004F0000001A2BA957159.png" manifest:media-type="image/png"/>
  <manifest:file-entry manifest:full-path="Pictures/100000000000001B0000000E03D4C585.png" manifest:media-type="image/png"/>
  <manifest:file-entry manifest:full-path="Pictures/100000010000026D0000024BD43D0242.png" manifest:media-type="image/png"/>
  <manifest:file-entry manifest:full-path="Pictures/100000010000045A0000016591D30073.png" manifest:media-type="image/png"/>
  <manifest:file-entry manifest:full-path="Pictures/100000010000037B0000021EFF98F148.png" manifest:media-type="image/png"/>
  <manifest:file-entry manifest:full-path="Pictures/10000001000000930000006980EB54FA.png" manifest:media-type="image/png"/>
  <manifest:file-entry manifest:full-path="Pictures/10000001000002D60000019FE739BEA5.png" manifest:media-type="image/png"/>
  <manifest:file-entry manifest:full-path="Pictures/1000000000000490000000D751B617BE.png" manifest:media-type="image/png"/>
  <manifest:file-entry manifest:full-path="Pictures/100000010000050200000152395A43A0.png" manifest:media-type="image/png"/>
  <manifest:file-entry manifest:full-path="Pictures/10000000000000CA000000787F2D35E3.png" manifest:media-type="image/png"/>
  <manifest:file-entry manifest:full-path="Pictures/1000000000000029000000228D358339.png" manifest:media-type="image/png"/>
  <manifest:file-entry manifest:full-path="Pictures/10000000000006C5000001987D502792.png" manifest:media-type="image/png"/>
  <manifest:file-entry manifest:full-path="Pictures/1000000100000526000002384BAC5624.png" manifest:media-type="image/png"/>
  <manifest:file-entry manifest:full-path="Pictures/100000000000073400000123BB8120AB.png" manifest:media-type="image/png"/>
  <manifest:file-entry manifest:full-path="Pictures/100000000000003E0000002F6AE360E0.png" manifest:media-type="image/png"/>
  <manifest:file-entry manifest:full-path="Pictures/100000000000000D0000000BC2F71D36.png" manifest:media-type="image/png"/>
  <manifest:file-entry manifest:full-path="Pictures/10000001000004E70000017495DE3013.png" manifest:media-type="image/png"/>
  <manifest:file-entry manifest:full-path="Pictures/1000000100000178000000B45BA1E2CC.png" manifest:media-type="image/png"/>
  <manifest:file-entry manifest:full-path="Pictures/10000000000004A80000017F091EA820.png" manifest:media-type="image/png"/>
  <manifest:file-entry manifest:full-path="Pictures/10000001000004E90000020A106FA5C7.png" manifest:media-type="image/png"/>
  <manifest:file-entry manifest:full-path="Pictures/10000001000004FE0000011042B35F79.png" manifest:media-type="image/png"/>
  <manifest:file-entry manifest:full-path="Pictures/10000001000004F4000000E82E4DCA8D.png" manifest:media-type="image/png"/>
  <manifest:file-entry manifest:full-path="Pictures/10000000000004A000000122948EE0CF.png" manifest:media-type="image/png"/>
  <manifest:file-entry manifest:full-path="Pictures/100000000000037600000136ACCEED93.png" manifest:media-type="image/png"/>
  <manifest:file-entry manifest:full-path="Pictures/10000000000001670000006EB543C092.png" manifest:media-type="image/png"/>
  <manifest:file-entry manifest:full-path="Pictures/10000000000000B70000009492EFDDEC.png" manifest:media-type="image/png"/>
  <manifest:file-entry manifest:full-path="Pictures/100000010000073C000001C925FE2C38.png" manifest:media-type="image/png"/>
  <manifest:file-entry manifest:full-path="Pictures/10000000000003CC000000DDB923AB86.png" manifest:media-type="image/png"/>
  <manifest:file-entry manifest:full-path="Pictures/100000000000041A0000022CE460ADAC.png" manifest:media-type="image/png"/>
  <manifest:file-entry manifest:full-path="Pictures/100000000000007500000012CE62DA0E.png" manifest:media-type="image/png"/>
  <manifest:file-entry manifest:full-path="Pictures/10000000000000C000000016778A55FD.png" manifest:media-type="image/png"/>
  <manifest:file-entry manifest:full-path="Pictures/10000000000005430000034BD00256D5.png" manifest:media-type="image/png"/>
  <manifest:file-entry manifest:full-path="Pictures/100000010000051E00000236D198385B.png" manifest:media-type="image/png"/>
  <manifest:file-entry manifest:full-path="Pictures/100000010000051C00000233BBA3E2A9.png" manifest:media-type="image/png"/>
  <manifest:file-entry manifest:full-path="Pictures/100000000000050000000191023EBA7A.png" manifest:media-type="image/png"/>
  <manifest:file-entry manifest:full-path="Pictures/10000000000002C80000018E3B1FAEAE.png" manifest:media-type="image/png"/>
  <manifest:file-entry manifest:full-path="Pictures/10000000000001270000009789043152.png" manifest:media-type="image/png"/>
  <manifest:file-entry manifest:full-path="Pictures/1000000000000410000000EDC3BF9369.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Standard" style:master-page-name="Standard">
      <style:paragraph-properties fo:text-align="center" style:justify-single-word="false" style:page-number="auto"/>
      <style:text-properties fo:language="ca" fo:country="ES" officeooo:paragraph-rsid="000e1972"/>
    </style:style>
    <style:style style:name="P2" style:family="paragraph">
      <loext:graphic-properties draw:fill="none"/>
      <style:paragraph-properties fo:text-align="center"/>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5" style:family="paragraph" style:parent-style-name="western">
      <style:paragraph-properties fo:text-align="end" style:justify-single-word="false"/>
      <style:text-properties fo:language="ca" fo:country="ES" officeooo:paragraph-rsid="000e1972"/>
    </style:style>
    <style:style style:name="P6" style:family="paragraph" style:parent-style-name="western">
      <style:paragraph-properties fo:text-align="end" style:justify-single-word="false"/>
      <style:text-properties officeooo:paragraph-rsid="000e1972"/>
    </style:style>
    <style:style style:name="P7"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8"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1"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12"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3" style:family="paragraph" style:parent-style-name="Standard">
      <style:text-properties fo:language="ca" fo:country="ES" officeooo:paragraph-rsid="000e1972"/>
    </style:style>
    <style:style style:name="P1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1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e40b9" officeooo:paragraph-rsid="00ee40b9" style:font-size-asian="10.5pt" style:font-name-complex="Arial Narrow1"/>
    </style:style>
    <style:style style:name="P20" style:family="paragraph" style:parent-style-name="Standard">
      <style:paragraph-properties fo:margin-top="0cm" fo:margin-bottom="0.212cm" style:contextual-spacing="false" fo:text-align="start" style:justify-single-word="false"/>
      <style:text-properties style:font-name="Calibri" fo:language="ca" fo:country="ES" officeooo:paragraph-rsid="00ee40b9" style:font-name-complex="Arial Narrow1"/>
    </style:style>
    <style:style style:name="P21"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22"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23"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2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2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6" style:family="paragraph" style:parent-style-name="Standard">
      <style:text-properties fo:language="ca" fo:country="ES" officeooo:rsid="000f0c3e" officeooo:paragraph-rsid="000f0c3e"/>
    </style:style>
    <style:style style:name="P27" style:family="paragraph" style:parent-style-name="Standard">
      <style:text-properties fo:language="ca" fo:country="ES"/>
    </style:style>
    <style:style style:name="P28"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Standard">
      <style:text-properties fo:language="ca" fo:country="ES" officeooo:paragraph-rsid="005a35d6"/>
    </style:style>
    <style:style style:name="P33" style:family="paragraph" style:parent-style-name="Standard">
      <style:text-properties officeooo:paragraph-rsid="0064c74a"/>
    </style:style>
    <style:style style:name="P34"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35" style:family="paragraph" style:parent-style-name="Standard">
      <style:text-properties fo:language="ca" fo:country="ES" officeooo:rsid="0064c74a" officeooo:paragraph-rsid="0064c74a"/>
    </style:style>
    <style:style style:name="P36" style:family="paragraph" style:parent-style-name="Standard">
      <style:text-properties style:font-name="Calibri" fo:language="ca" fo:country="ES" officeooo:rsid="001ca2a7" officeooo:paragraph-rsid="000f0c3e"/>
    </style:style>
    <style:style style:name="P37" style:family="paragraph" style:parent-style-name="Standard">
      <style:text-properties fo:language="ca" fo:country="ES" officeooo:paragraph-rsid="000f0c3e"/>
    </style:style>
    <style:style style:name="P38" style:family="paragraph" style:parent-style-name="Standard">
      <style:text-properties style:font-name="Calibri" fo:language="ca" fo:country="ES" officeooo:rsid="001ca2a7" officeooo:paragraph-rsid="0064c74a"/>
    </style:style>
    <style:style style:name="P39" style:family="paragraph" style:parent-style-name="Standard">
      <style:text-properties style:font-name="Calibri1" officeooo:paragraph-rsid="0064c74a"/>
    </style:style>
    <style:style style:name="P40" style:family="paragraph" style:parent-style-name="Standard">
      <style:text-properties style:font-name="Calibri1" officeooo:rsid="00673e05" officeooo:paragraph-rsid="00673e05"/>
    </style:style>
    <style:style style:name="P41" style:family="paragraph" style:parent-style-name="Standard">
      <style:text-properties officeooo:paragraph-rsid="000f0c3e"/>
    </style:style>
    <style:style style:name="P42" style:family="paragraph" style:parent-style-name="Standard">
      <style:text-properties style:font-name="Calibri1" fo:language="ca" fo:country="ES" officeooo:rsid="00673e05" officeooo:paragraph-rsid="000f0c3e"/>
    </style:style>
    <style:style style:name="P43" style:family="paragraph" style:parent-style-name="Standard">
      <style:paragraph-properties fo:break-before="page"/>
      <style:text-properties style:font-name="Calibri1" fo:language="ca" fo:country="ES" officeooo:rsid="00673e05" officeooo:paragraph-rsid="000f0c3e"/>
    </style:style>
    <style:style style:name="P44" style:family="paragraph" style:parent-style-name="Heading_20_1">
      <style:text-properties officeooo:paragraph-rsid="00663ddb"/>
    </style:style>
    <style:style style:name="P45" style:family="paragraph" style:parent-style-name="Standard">
      <style:text-properties officeooo:rsid="008392d7" officeooo:paragraph-rsid="008392d7"/>
    </style:style>
    <style:style style:name="P46" style:family="paragraph" style:parent-style-name="Standard" style:list-style-name="L1">
      <style:text-properties officeooo:rsid="008392d7" officeooo:paragraph-rsid="008392d7"/>
    </style:style>
    <style:style style:name="P47" style:family="paragraph" style:parent-style-name="Text_20_body">
      <style:text-properties fo:language="ca" fo:country="ES" officeooo:rsid="00226e93" officeooo:paragraph-rsid="00663ddb"/>
    </style:style>
    <style:style style:name="P48" style:family="paragraph" style:parent-style-name="Text_20_body">
      <style:text-properties fo:language="ca" fo:country="ES" officeooo:rsid="0023c1b9" officeooo:paragraph-rsid="00663ddb"/>
    </style:style>
    <style:style style:name="P49" style:family="paragraph" style:parent-style-name="Text_20_body">
      <style:text-properties fo:language="ca" fo:country="ES" officeooo:rsid="0024a62d" officeooo:paragraph-rsid="008935c2"/>
    </style:style>
    <style:style style:name="P50" style:family="paragraph" style:parent-style-name="Text_20_body">
      <style:text-properties fo:language="ca" fo:country="ES" officeooo:rsid="0024a62d" officeooo:paragraph-rsid="00663ddb"/>
    </style:style>
    <style:style style:name="P51" style:family="paragraph" style:parent-style-name="Text_20_body">
      <style:text-properties fo:language="ca" fo:country="ES" officeooo:rsid="008520a6" officeooo:paragraph-rsid="008520a6"/>
    </style:style>
    <style:style style:name="P52" style:family="paragraph" style:parent-style-name="Text_20_body">
      <style:text-properties fo:language="ca" fo:country="ES" officeooo:rsid="008520a6" officeooo:paragraph-rsid="0089595f"/>
    </style:style>
    <style:style style:name="P53" style:family="paragraph" style:parent-style-name="Text_20_body">
      <style:text-properties fo:language="ca" fo:country="ES" officeooo:rsid="0024a62d" officeooo:paragraph-rsid="008b5603"/>
    </style:style>
    <style:style style:name="P54" style:family="paragraph" style:parent-style-name="Text_20_body" style:list-style-name="L2">
      <style:text-properties fo:language="ca" fo:country="ES" fo:font-weight="bold" officeooo:rsid="0024a62d" officeooo:paragraph-rsid="00663ddb" style:font-weight-asian="bold" style:font-weight-complex="bold"/>
    </style:style>
    <style:style style:name="P55" style:family="paragraph" style:parent-style-name="Text_20_body">
      <style:text-properties fo:language="ca" fo:country="ES" fo:font-weight="normal" officeooo:rsid="0024a62d" officeooo:paragraph-rsid="00663ddb" style:font-weight-asian="normal" style:font-weight-complex="normal"/>
    </style:style>
    <style:style style:name="P56" style:family="paragraph" style:parent-style-name="Text_20_body">
      <style:text-properties fo:language="ca" fo:country="ES" fo:font-weight="normal" officeooo:rsid="0025d08d" officeooo:paragraph-rsid="00663ddb" style:font-weight-asian="normal" style:font-weight-complex="normal"/>
    </style:style>
    <style:style style:name="P57" style:family="paragraph" style:parent-style-name="Text_20_body">
      <style:text-properties fo:language="ca" fo:country="ES" fo:font-weight="normal" officeooo:rsid="0048df05" officeooo:paragraph-rsid="00663ddb" style:font-weight-asian="normal" style:font-weight-complex="normal"/>
    </style:style>
    <style:style style:name="P58" style:family="paragraph" style:parent-style-name="Text_20_body" style:list-style-name="L3">
      <style:text-properties fo:language="ca" fo:country="ES" fo:font-weight="bold" officeooo:rsid="0048df05" officeooo:paragraph-rsid="00663ddb" style:font-weight-asian="bold" style:font-weight-complex="bold"/>
    </style:style>
    <style:style style:name="P59" style:family="paragraph" style:parent-style-name="Text_20_body">
      <style:text-properties fo:language="ca" fo:country="ES" officeooo:rsid="001b1053" officeooo:paragraph-rsid="00663ddb"/>
    </style:style>
    <style:style style:name="P60" style:family="paragraph" style:parent-style-name="Text_20_body" style:list-style-name="L4">
      <style:text-properties fo:language="ca" fo:country="ES" fo:font-weight="bold" officeooo:rsid="001b1053" officeooo:paragraph-rsid="00663ddb" style:font-weight-asian="bold" style:font-weight-complex="bold"/>
    </style:style>
    <style:style style:name="P61" style:family="paragraph" style:parent-style-name="Text_20_body" style:list-style-name="L4">
      <style:text-properties fo:language="ca" fo:country="ES" fo:font-weight="bold" officeooo:rsid="001b1053" officeooo:paragraph-rsid="00ee40b9" style:font-weight-asian="bold" style:font-weight-complex="bold"/>
    </style:style>
    <style:style style:name="P62" style:family="paragraph" style:parent-style-name="Text_20_body" style:list-style-name="L4">
      <style:text-properties fo:language="ca" fo:country="ES" fo:font-weight="bold" officeooo:rsid="001b5cf5" officeooo:paragraph-rsid="00663ddb" style:font-weight-asian="bold" style:font-weight-complex="bold"/>
    </style:style>
    <style:style style:name="P63" style:family="paragraph" style:parent-style-name="Text_20_body">
      <style:text-properties fo:language="ca" fo:country="ES" fo:font-weight="normal" officeooo:rsid="001b1053" officeooo:paragraph-rsid="00663ddb" style:font-weight-asian="normal" style:font-weight-complex="normal"/>
    </style:style>
    <style:style style:name="P64" style:family="paragraph" style:parent-style-name="Text_20_body">
      <style:text-properties fo:language="ca" fo:country="ES" fo:font-weight="normal" officeooo:rsid="008b5603" officeooo:paragraph-rsid="008b5603" style:font-weight-asian="normal" style:font-weight-complex="normal"/>
    </style:style>
    <style:style style:name="P65" style:family="paragraph" style:parent-style-name="Text_20_body" style:list-style-name="L5">
      <style:text-properties fo:language="ca" fo:country="ES" fo:font-weight="bold" officeooo:rsid="001b5cf5" officeooo:paragraph-rsid="00663ddb" style:font-weight-asian="bold" style:font-weight-complex="bold"/>
    </style:style>
    <style:style style:name="P66" style:family="paragraph" style:parent-style-name="Text_20_body">
      <style:text-properties officeooo:paragraph-rsid="008cd1d3"/>
    </style:style>
    <style:style style:name="P67" style:family="paragraph" style:parent-style-name="Text_20_body">
      <style:text-properties style:font-name="Calibri4" fo:font-size="10pt" fo:language="ca" fo:country="ES" officeooo:rsid="008cd1d3" officeooo:paragraph-rsid="008cd1d3" style:font-size-asian="10.5pt"/>
    </style:style>
    <style:style style:name="P68" style:family="paragraph" style:parent-style-name="Text_20_body">
      <style:text-properties officeooo:rsid="008d1405" officeooo:paragraph-rsid="008d1405"/>
    </style:style>
    <style:style style:name="P69" style:family="paragraph" style:parent-style-name="Text_20_body">
      <style:text-properties officeooo:paragraph-rsid="008d1405"/>
    </style:style>
    <style:style style:name="P70" style:family="paragraph" style:parent-style-name="Text_20_body" style:list-style-name="L6">
      <style:text-properties fo:language="ca" fo:country="ES" fo:font-weight="bold" officeooo:rsid="0029d734" officeooo:paragraph-rsid="008d1405" style:font-weight-asian="bold" style:font-weight-complex="bold"/>
    </style:style>
    <style:style style:name="P71" style:family="paragraph" style:parent-style-name="Text_20_body" style:list-style-name="L6">
      <style:text-properties officeooo:paragraph-rsid="008d1405"/>
    </style:style>
    <style:style style:name="P72"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73" style:family="paragraph" style:parent-style-name="Text_20_body">
      <style:text-properties fo:language="ca" fo:country="ES" officeooo:rsid="002749e4" officeooo:paragraph-rsid="00663ddb"/>
    </style:style>
    <style:style style:name="P74" style:family="paragraph" style:parent-style-name="Text_20_body">
      <style:text-properties fo:language="ca" fo:country="ES" officeooo:rsid="008d1405" officeooo:paragraph-rsid="008d1405"/>
    </style:style>
    <style:style style:name="P75" style:family="paragraph" style:parent-style-name="Text_20_body" style:list-style-name="L7">
      <style:text-properties fo:language="ca" fo:country="ES" officeooo:paragraph-rsid="00663ddb"/>
    </style:style>
    <style:style style:name="P76" style:family="paragraph" style:parent-style-name="Text_20_body">
      <style:text-properties fo:language="ca" fo:country="ES" fo:font-weight="normal" officeooo:rsid="00d20af4" officeooo:paragraph-rsid="00663ddb" style:font-weight-asian="normal" style:font-weight-complex="normal"/>
    </style:style>
    <style:style style:name="P77" style:family="paragraph" style:parent-style-name="Text_20_body">
      <style:text-properties fo:language="ca" fo:country="ES" fo:font-weight="normal" officeooo:rsid="002749e4" officeooo:paragraph-rsid="00663ddb" style:font-weight-asian="normal" style:font-weight-complex="normal"/>
    </style:style>
    <style:style style:name="P78" style:family="paragraph" style:parent-style-name="Text_20_body" style:list-style-name="L8">
      <style:text-properties fo:language="ca" fo:country="ES" officeooo:paragraph-rsid="00663ddb"/>
    </style:style>
    <style:style style:name="P79" style:family="paragraph" style:parent-style-name="Text_20_body" style:list-style-name="L8">
      <style:text-properties fo:language="ca" fo:country="ES" fo:font-weight="bold" officeooo:rsid="002749e4" officeooo:paragraph-rsid="00663ddb" style:font-weight-asian="bold" style:font-weight-complex="bold"/>
    </style:style>
    <style:style style:name="P80" style:family="paragraph" style:parent-style-name="Text_20_body" style:list-style-name="L9">
      <style:text-properties fo:language="ca" fo:country="ES" fo:font-weight="bold" officeooo:rsid="00290227" officeooo:paragraph-rsid="00663ddb" style:font-weight-asian="bold" style:font-weight-complex="bold"/>
    </style:style>
    <style:style style:name="P81" style:family="paragraph" style:parent-style-name="Text_20_body">
      <style:text-properties fo:language="ca" fo:country="ES" fo:font-weight="normal" officeooo:rsid="002ddca3" officeooo:paragraph-rsid="00d26d4d" style:font-weight-asian="normal" style:font-weight-complex="normal"/>
    </style:style>
    <style:style style:name="P82" style:family="paragraph" style:parent-style-name="Text_20_body">
      <style:text-properties fo:language="ca" fo:country="ES" fo:font-weight="normal" officeooo:rsid="002ddca3" officeooo:paragraph-rsid="00663ddb" style:font-weight-asian="normal" style:font-weight-complex="normal"/>
    </style:style>
    <style:style style:name="P83" style:family="paragraph" style:parent-style-name="Text_20_body">
      <style:text-properties fo:language="ca" fo:country="ES" officeooo:rsid="0029d734" officeooo:paragraph-rsid="00663ddb"/>
    </style:style>
    <style:style style:name="P84" style:family="paragraph" style:parent-style-name="Standard">
      <style:text-properties officeooo:paragraph-rsid="00d2b6ff"/>
    </style:style>
    <style:style style:name="P85" style:family="paragraph" style:parent-style-name="Text_20_body">
      <style:text-properties officeooo:paragraph-rsid="00d2b6ff"/>
    </style:style>
    <style:style style:name="P86" style:family="paragraph" style:parent-style-name="Text_20_body">
      <style:text-properties fo:language="ca" fo:country="ES" officeooo:rsid="0029d734" officeooo:paragraph-rsid="00d2b6ff"/>
    </style:style>
    <style:style style:name="P87" style:family="paragraph" style:parent-style-name="Text_20_body">
      <style:text-properties fo:language="ca" fo:country="ES" officeooo:rsid="00302d7f" officeooo:paragraph-rsid="00663ddb"/>
    </style:style>
    <style:style style:name="P88" style:family="paragraph" style:parent-style-name="Text_20_body">
      <style:text-properties fo:language="ca" fo:country="ES" officeooo:rsid="009ca0f5" officeooo:paragraph-rsid="009ca0f5"/>
    </style:style>
    <style:style style:name="P89" style:family="paragraph" style:parent-style-name="Text_20_body" style:list-style-name="L10">
      <style:text-properties fo:language="ca" fo:country="ES" fo:font-weight="bold" officeooo:rsid="00302d7f" officeooo:paragraph-rsid="00663ddb" style:font-weight-asian="bold" style:font-weight-complex="bold"/>
    </style:style>
    <style:style style:name="P90" style:family="paragraph" style:parent-style-name="Text_20_body" style:list-style-name="L10">
      <style:text-properties fo:language="ca" fo:country="ES" fo:font-weight="bold" officeooo:rsid="00302d7f" officeooo:paragraph-rsid="009aa1a8" style:font-weight-asian="bold" style:font-weight-complex="bold"/>
    </style:style>
    <style:style style:name="P91"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92" style:family="paragraph" style:parent-style-name="Text_20_body" style:list-style-name="L10">
      <style:text-properties officeooo:paragraph-rsid="00d321d5"/>
    </style:style>
    <style:style style:name="P93" style:family="paragraph" style:parent-style-name="Text_20_body" style:list-style-name="L10">
      <style:text-properties fo:font-weight="bold" officeooo:rsid="009aa1a8" officeooo:paragraph-rsid="00d321d5" style:font-weight-asian="bold" style:font-weight-complex="bold"/>
    </style:style>
    <style:style style:name="P94"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95" style:family="paragraph" style:parent-style-name="Text_20_body">
      <style:text-properties fo:language="ca" fo:country="ES" fo:font-weight="bold" officeooo:rsid="0035798f" officeooo:paragraph-rsid="009b2572" style:font-weight-asian="bold" style:font-weight-complex="bold"/>
    </style:style>
    <style:style style:name="P96" style:family="paragraph" style:parent-style-name="Text_20_body" style:list-style-name="L11">
      <style:text-properties officeooo:paragraph-rsid="00d321d5"/>
    </style:style>
    <style:style style:name="P97" style:family="paragraph" style:parent-style-name="Text_20_body" style:list-style-name="L11">
      <style:text-properties fo:font-weight="bold" officeooo:paragraph-rsid="00d321d5" style:font-weight-asian="bold" style:font-weight-complex="bold"/>
    </style:style>
    <style:style style:name="P98" style:family="paragraph" style:parent-style-name="Text_20_body">
      <style:text-properties officeooo:paragraph-rsid="00d321d5"/>
    </style:style>
    <style:style style:name="P99"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100" style:family="paragraph" style:parent-style-name="Text_20_body" style:list-style-name="L11">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101" style:family="paragraph" style:parent-style-name="Text_20_body">
      <style:text-properties fo:language="ca" fo:country="ES" fo:font-weight="normal" officeooo:rsid="00551f02" officeooo:paragraph-rsid="00663ddb" style:font-weight-asian="normal" style:font-weight-complex="normal"/>
    </style:style>
    <style:style style:name="P102" style:family="paragraph" style:parent-style-name="Text_20_body">
      <style:text-properties officeooo:rsid="009ca0f5" officeooo:paragraph-rsid="009ca0f5"/>
    </style:style>
    <style:style style:name="P103" style:family="paragraph" style:parent-style-name="fig.">
      <style:text-properties officeooo:paragraph-rsid="009d1c93"/>
    </style:style>
    <style:style style:name="P104" style:family="paragraph" style:parent-style-name="Text_20_body">
      <style:text-properties officeooo:paragraph-rsid="00ecb670"/>
    </style:style>
    <style:style style:name="P105" style:family="paragraph" style:parent-style-name="Text_20_body">
      <style:text-properties officeooo:paragraph-rsid="00eac735"/>
    </style:style>
    <style:style style:name="P106" style:family="paragraph" style:parent-style-name="Text_20_body">
      <style:text-properties fo:language="ca" fo:country="ES" fo:font-weight="normal" officeooo:rsid="00be4301" officeooo:paragraph-rsid="00ecb670" style:font-weight-asian="normal" style:font-weight-complex="normal"/>
    </style:style>
    <style:style style:name="P107"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108" style:family="paragraph" style:parent-style-name="Text_20_body" style:list-style-name="L12">
      <style:text-properties officeooo:rsid="00be4301" officeooo:paragraph-rsid="00ecb670"/>
    </style:style>
    <style:style style:name="P109" style:family="paragraph" style:parent-style-name="Text_20_body">
      <style:text-properties fo:language="ca" fo:country="ES" fo:font-weight="normal" officeooo:rsid="00365bd0" officeooo:paragraph-rsid="00ecb670" style:font-weight-asian="normal" style:font-weight-complex="normal"/>
    </style:style>
    <style:style style:name="P110" style:family="paragraph" style:parent-style-name="Text_20_body">
      <style:text-properties fo:language="ca" fo:country="ES" officeooo:rsid="00be4301" officeooo:paragraph-rsid="00ecb670"/>
    </style:style>
    <style:style style:name="P111" style:family="paragraph" style:parent-style-name="Text_20_body">
      <style:text-properties officeooo:paragraph-rsid="00d35ad5"/>
    </style:style>
    <style:style style:name="P112" style:family="paragraph" style:parent-style-name="Text_20_body" style:list-style-name="L13">
      <style:text-properties officeooo:paragraph-rsid="00d35ad5"/>
    </style:style>
    <style:style style:name="P113" style:family="paragraph" style:parent-style-name="Text_20_body">
      <style:text-properties fo:language="ca" fo:country="ES" officeooo:rsid="00180ee2" officeooo:paragraph-rsid="00663ddb"/>
    </style:style>
    <style:style style:name="P114" style:family="paragraph" style:parent-style-name="Text_20_body" style:list-style-name="L14">
      <style:text-properties fo:language="ca" fo:country="ES" officeooo:rsid="00180ee2" officeooo:paragraph-rsid="00663ddb"/>
    </style:style>
    <style:style style:name="P115" style:family="paragraph" style:parent-style-name="Text_20_body">
      <style:text-properties fo:language="ca" fo:country="ES" officeooo:rsid="00e7135e" officeooo:paragraph-rsid="00663ddb"/>
    </style:style>
    <style:style style:name="P116" style:family="paragraph" style:parent-style-name="Text_20_body">
      <style:text-properties fo:language="ca" fo:country="ES" officeooo:rsid="0037b183" officeooo:paragraph-rsid="00663ddb"/>
    </style:style>
    <style:style style:name="P117" style:family="paragraph" style:parent-style-name="Text_20_body">
      <style:text-properties fo:language="ca" fo:country="ES" officeooo:rsid="00398d41" officeooo:paragraph-rsid="00663ddb"/>
    </style:style>
    <style:style style:name="P118" style:family="paragraph" style:parent-style-name="Text_20_body" style:list-style-name="L15">
      <style:text-properties fo:language="ca" fo:country="ES" officeooo:paragraph-rsid="00663ddb"/>
    </style:style>
    <style:style style:name="P119" style:family="paragraph" style:parent-style-name="Text_20_body" style:list-style-name="L15">
      <style:text-properties fo:language="ca" fo:country="ES" officeooo:rsid="00398d41" officeooo:paragraph-rsid="00663ddb"/>
    </style:style>
    <style:style style:name="P120" style:family="paragraph" style:parent-style-name="Text_20_body" style:list-style-name="L15">
      <style:text-properties fo:language="ca" fo:country="ES" fo:font-weight="bold" officeooo:rsid="00398d41" officeooo:paragraph-rsid="00663ddb" style:font-weight-asian="bold" style:font-weight-complex="bold"/>
    </style:style>
    <style:style style:name="P121" style:family="paragraph" style:parent-style-name="Text_20_body" style:list-style-name="L16">
      <style:text-properties fo:language="ca" fo:country="ES" officeooo:rsid="00398d41" officeooo:paragraph-rsid="00663ddb"/>
    </style:style>
    <style:style style:name="P122" style:family="paragraph" style:parent-style-name="Text_20_body">
      <style:text-properties fo:language="ca" fo:country="ES" officeooo:rsid="003c3723" officeooo:paragraph-rsid="00663ddb"/>
    </style:style>
    <style:style style:name="P123" style:family="paragraph" style:parent-style-name="Text_20_body" style:list-style-name="L17">
      <style:text-properties fo:language="ca" fo:country="ES" officeooo:rsid="003c3723" officeooo:paragraph-rsid="00663ddb"/>
    </style:style>
    <style:style style:name="P124" style:family="paragraph" style:parent-style-name="Text_20_body" style:list-style-name="L17">
      <style:text-properties fo:language="ca" fo:country="ES" officeooo:rsid="00d35d62" officeooo:paragraph-rsid="00d35d62"/>
    </style:style>
    <style:style style:name="P125" style:family="paragraph" style:parent-style-name="Text_20_body" style:list-style-name="L18">
      <style:text-properties fo:language="ca" fo:country="ES" fo:font-weight="bold" officeooo:rsid="003f51e9" officeooo:paragraph-rsid="00663ddb" style:font-weight-asian="bold" style:font-weight-complex="bold"/>
    </style:style>
    <style:style style:name="P126" style:family="paragraph" style:parent-style-name="Text_20_body">
      <style:text-properties fo:language="ca" fo:country="ES" officeooo:rsid="0040f69f" officeooo:paragraph-rsid="00663ddb"/>
    </style:style>
    <style:style style:name="P127" style:family="paragraph" style:parent-style-name="Text_20_body">
      <style:text-properties fo:language="ca" fo:country="ES" fo:font-weight="normal" officeooo:rsid="0040f69f" officeooo:paragraph-rsid="00663ddb" style:font-weight-asian="normal" style:font-weight-complex="normal"/>
    </style:style>
    <style:style style:name="P128" style:family="paragraph" style:parent-style-name="Text_20_body" style:list-style-name="L19">
      <style:text-properties fo:language="ca" fo:country="ES" fo:font-weight="bold" officeooo:rsid="00d35d62" officeooo:paragraph-rsid="00d35d62" style:font-weight-asian="bold" style:font-weight-complex="bold"/>
    </style:style>
    <style:style style:name="P129" style:family="paragraph" style:parent-style-name="Text_20_body" style:list-style-name="L19">
      <style:text-properties fo:language="ca" fo:country="ES" fo:font-weight="bold" officeooo:rsid="0040f69f" officeooo:paragraph-rsid="00663ddb" style:font-weight-asian="bold" style:font-weight-complex="bold"/>
    </style:style>
    <style:style style:name="P130" style:family="paragraph" style:parent-style-name="Text_20_body" style:list-style-name="L20">
      <style:text-properties fo:language="ca" fo:country="ES" fo:font-weight="bold" officeooo:rsid="0040f69f" officeooo:paragraph-rsid="00663ddb" style:font-weight-asian="bold" style:font-weight-complex="bold"/>
    </style:style>
    <style:style style:name="P131" style:family="paragraph" style:parent-style-name="Standard" style:list-style-name="L20">
      <style:text-properties fo:font-style="italic" officeooo:rsid="000754cc" officeooo:paragraph-rsid="00d3e721" style:font-style-asian="italic" style:font-style-complex="italic"/>
    </style:style>
    <style:style style:name="P132" style:family="paragraph" style:parent-style-name="Text_20_body" style:list-style-name="L20">
      <style:text-properties officeooo:paragraph-rsid="00d3e721"/>
    </style:style>
    <style:style style:name="P133" style:family="paragraph" style:parent-style-name="Text_20_body" style:list-style-name="L20">
      <style:text-properties fo:language="ca" fo:country="ES" fo:font-weight="bold" officeooo:rsid="0040f69f" officeooo:paragraph-rsid="00d3e721" style:font-weight-asian="bold" style:font-weight-complex="bold"/>
    </style:style>
    <style:style style:name="P134" style:family="paragraph" style:parent-style-name="Text_20_body" style:list-style-name="L20">
      <style:text-properties fo:language="ca" fo:country="ES" fo:font-weight="bold" officeooo:rsid="0042a686" officeooo:paragraph-rsid="00663ddb" style:font-weight-asian="bold" style:font-weight-complex="bold"/>
    </style:style>
    <style:style style:name="P135" style:family="paragraph" style:parent-style-name="Text_20_body">
      <style:text-properties officeooo:rsid="0091cc3b" officeooo:paragraph-rsid="0091cc3b"/>
    </style:style>
    <style:style style:name="P136" style:family="paragraph" style:parent-style-name="Text_20_body">
      <style:text-properties officeooo:paragraph-rsid="00b24c63"/>
    </style:style>
    <style:style style:name="P137" style:family="paragraph" style:parent-style-name="Standard">
      <style:text-properties style:font-name="Calibri" fo:language="ca" fo:country="ES" officeooo:paragraph-rsid="00b24c63"/>
    </style:style>
    <style:style style:name="P138" style:family="paragraph" style:parent-style-name="List_20_Paragraph" style:list-style-name="WWNum3">
      <style:text-properties officeooo:rsid="0077d900" officeooo:paragraph-rsid="00ee5c8c"/>
    </style:style>
    <style:style style:name="P139" style:family="paragraph" style:parent-style-name="List_20_Paragraph" style:list-style-name="WWNum3">
      <style:text-properties officeooo:paragraph-rsid="00ee5c8c"/>
    </style:style>
    <style:style style:name="P140" style:family="paragraph" style:parent-style-name="List_20_Paragraph" style:list-style-name="WWNum3">
      <style:text-properties fo:font-weight="bold" officeooo:rsid="0077d900" officeooo:paragraph-rsid="00ee5c8c" style:font-weight-asian="bold" style:font-weight-complex="bold"/>
    </style:style>
    <style:style style:name="P141" style:family="paragraph" style:parent-style-name="List_20_Paragraph" style:list-style-name="WWNum3">
      <style:text-properties officeooo:rsid="00b24c63" officeooo:paragraph-rsid="00ee5c8c"/>
    </style:style>
    <style:style style:name="P142" style:family="paragraph" style:parent-style-name="List_20_Paragraph" style:list-style-name="WWNum3">
      <style:text-properties style:font-name="Calibri" fo:font-size="10pt" fo:language="ca" fo:country="ES" fo:font-weight="normal" officeooo:rsid="00484b61" officeooo:paragraph-rsid="00ee5c8c" style:font-size-asian="10.5pt" style:font-weight-asian="normal" style:font-weight-complex="normal"/>
    </style:style>
    <style:style style:name="P143" style:family="paragraph" style:parent-style-name="List_20_Paragraph" style:list-style-name="WWNum3">
      <style:text-properties fo:font-weight="bold" officeooo:rsid="00ef392c" officeooo:paragraph-rsid="00ee5c8c" style:font-weight-asian="bold" style:font-weight-complex="bold"/>
    </style:style>
    <style:style style:name="P144" style:family="paragraph" style:parent-style-name="List_20_Paragraph" style:list-style-name="WWNum3">
      <style:text-properties style:font-name="Calibri" fo:language="ca" fo:country="ES" fo:font-weight="normal" officeooo:rsid="0077d900" officeooo:paragraph-rsid="00ee5c8c" style:font-weight-asian="normal" style:font-weight-complex="normal"/>
    </style:style>
    <style:style style:name="P145" style:family="paragraph" style:parent-style-name="List_20_Paragraph" style:list-style-name="WWNum3">
      <style:text-properties style:font-name="Calibri" fo:language="ca" fo:country="ES" fo:font-weight="normal" officeooo:rsid="00780e29" officeooo:paragraph-rsid="00ee5c8c" style:font-weight-asian="normal" style:font-weight-complex="normal"/>
    </style:style>
    <style:style style:name="P146" style:family="paragraph" style:parent-style-name="List_20_Paragraph" style:list-style-name="WWNum3">
      <style:text-properties style:font-name="Calibri" fo:language="ca" fo:country="ES" fo:font-weight="bold" officeooo:rsid="00b24c63" officeooo:paragraph-rsid="00ee5c8c" style:font-weight-asian="bold" style:font-weight-complex="bold"/>
    </style:style>
    <style:style style:name="P147" style:family="paragraph" style:parent-style-name="List_20_Paragraph" style:list-style-name="WWNum3">
      <style:text-properties officeooo:rsid="00ee5c8c" officeooo:paragraph-rsid="00ee5c8c"/>
    </style:style>
    <style:style style:name="P148" style:family="paragraph" style:parent-style-name="List_20_Paragraph" style:list-style-name="WWNum3">
      <style:text-properties officeooo:rsid="00ef392c" officeooo:paragraph-rsid="00ee5c8c"/>
    </style:style>
    <style:style style:name="P149" style:family="paragraph" style:parent-style-name="Standard">
      <style:text-properties style:font-name="Calibri" fo:language="ca" fo:country="ES" fo:font-weight="bold" officeooo:rsid="003dd30a" officeooo:paragraph-rsid="00b24c63" style:font-weight-asian="bold" style:font-weight-complex="bold"/>
    </style:style>
    <style:style style:name="P150" style:family="paragraph" style:parent-style-name="Text_20_body">
      <style:text-properties fo:language="ca" fo:country="ES" fo:font-weight="bold" officeooo:rsid="003dd30a" officeooo:paragraph-rsid="00b24c63" style:font-weight-asian="bold" style:font-weight-complex="bold"/>
    </style:style>
    <style:style style:name="P151" style:family="paragraph" style:parent-style-name="Text_20_body">
      <style:text-properties officeooo:paragraph-rsid="00663ddb"/>
    </style:style>
    <style:style style:name="P152" style:family="paragraph" style:parent-style-name="Text_20_body">
      <style:text-properties style:font-name="Calibri" fo:language="ca" fo:country="ES" officeooo:rsid="003dd471" officeooo:paragraph-rsid="00663ddb"/>
    </style:style>
    <style:style style:name="P153" style:family="paragraph" style:parent-style-name="Text_20_body">
      <style:text-properties officeooo:paragraph-rsid="00d3e721"/>
    </style:style>
    <style:style style:name="P154" style:family="paragraph" style:parent-style-name="Text_20_body" style:list-style-name="L21">
      <style:text-properties officeooo:paragraph-rsid="00d3e721"/>
    </style:style>
    <style:style style:name="P155" style:family="paragraph" style:parent-style-name="Text_20_body">
      <style:text-properties fo:language="ca" fo:country="ES" officeooo:rsid="00180ee2" officeooo:paragraph-rsid="00d3e721"/>
    </style:style>
    <style:style style:name="P156" style:family="paragraph" style:parent-style-name="Text_20_body" style:list-style-name="L21">
      <style:text-properties officeooo:paragraph-rsid="00d55c27"/>
    </style:style>
    <style:style style:name="P157" style:family="paragraph" style:parent-style-name="Text_20_body">
      <style:text-properties officeooo:paragraph-rsid="00d55c27"/>
    </style:style>
    <style:style style:name="P158" style:family="paragraph" style:parent-style-name="Text_20_body" style:list-style-name="L21">
      <style:text-properties fo:font-weight="bold" officeooo:paragraph-rsid="00d55c27" style:font-weight-asian="bold" style:font-weight-complex="bold"/>
    </style:style>
    <style:style style:name="P159"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60" style:family="paragraph" style:parent-style-name="Text_20_body" style:list-style-name="L22">
      <style:text-properties officeooo:paragraph-rsid="00d55c27"/>
    </style:style>
    <style:style style:name="P161" style:family="paragraph" style:parent-style-name="Text_20_body">
      <style:text-properties fo:font-weight="bold" officeooo:paragraph-rsid="00d3e721" style:font-weight-asian="bold" style:font-weight-complex="bold"/>
    </style:style>
    <style:style style:name="P162" style:family="paragraph" style:parent-style-name="Text_20_body" style:list-style-name="L23">
      <style:text-properties officeooo:paragraph-rsid="00d55c27"/>
    </style:style>
    <style:style style:name="P163" style:family="paragraph" style:parent-style-name="Standard">
      <style:text-properties officeooo:paragraph-rsid="00d55c27"/>
    </style:style>
    <style:style style:name="P164" style:family="paragraph" style:parent-style-name="Standard">
      <style:paragraph-properties fo:break-before="page"/>
    </style:style>
    <style:style style:name="P165" style:family="paragraph" style:parent-style-name="Text_20_body">
      <style:text-properties officeooo:paragraph-rsid="0019fa0c"/>
    </style:style>
    <style:style style:name="P166" style:family="paragraph" style:parent-style-name="Text_20_body">
      <style:text-properties fo:language="ca" fo:country="ES" officeooo:rsid="0019fa0c" officeooo:paragraph-rsid="0019fa0c"/>
    </style:style>
    <style:style style:name="P167" style:family="paragraph" style:parent-style-name="Text_20_body">
      <style:text-properties officeooo:rsid="0091f042" officeooo:paragraph-rsid="0091f042"/>
    </style:style>
    <style:style style:name="P168" style:family="paragraph" style:parent-style-name="Text_20_body">
      <style:text-properties fo:language="ca" fo:country="ES" officeooo:rsid="0091f042" officeooo:paragraph-rsid="0091f042"/>
    </style:style>
    <style:style style:name="P169" style:family="paragraph" style:parent-style-name="Text_20_body">
      <style:text-properties fo:language="ca" fo:country="ES" officeooo:rsid="00179ecd" officeooo:paragraph-rsid="00179ecd"/>
    </style:style>
    <style:style style:name="P170" style:family="paragraph" style:parent-style-name="Text_20_body">
      <style:text-properties fo:language="ca" fo:country="ES" officeooo:rsid="001a1fdd" officeooo:paragraph-rsid="001a1fdd"/>
    </style:style>
    <style:style style:name="P171" style:family="paragraph" style:parent-style-name="Text_20_body" style:list-style-name="L24">
      <style:text-properties fo:language="ca" fo:country="ES" fo:font-weight="bold" officeooo:rsid="001a1fdd" officeooo:paragraph-rsid="00d5e511" style:font-weight-asian="bold" style:font-weight-complex="bold"/>
    </style:style>
    <style:style style:name="P172" style:family="paragraph" style:parent-style-name="Text_20_body" style:list-style-name="L24">
      <style:text-properties officeooo:paragraph-rsid="00d5e511"/>
    </style:style>
    <style:style style:name="P173" style:family="paragraph" style:parent-style-name="Text_20_body">
      <style:text-properties officeooo:paragraph-rsid="001a1fdd"/>
    </style:style>
    <style:style style:name="P174" style:family="paragraph" style:parent-style-name="Text_20_body" style:list-style-name="L25">
      <style:text-properties officeooo:paragraph-rsid="00d5e511"/>
    </style:style>
    <style:style style:name="P175" style:family="paragraph" style:parent-style-name="Text_20_body" style:list-style-name="L25">
      <style:text-properties fo:language="ca" fo:country="ES" fo:font-weight="bold" officeooo:rsid="0091f042" officeooo:paragraph-rsid="00d5e511" style:font-weight-asian="bold" style:font-weight-complex="bold"/>
    </style:style>
    <style:style style:name="P176" style:family="paragraph" style:parent-style-name="Text_20_body" style:list-style-name="L25">
      <style:text-properties fo:language="ca" fo:country="ES" fo:font-weight="bold" officeooo:rsid="001a1fdd" officeooo:paragraph-rsid="00d5e511" style:font-weight-asian="bold" style:font-weight-complex="bold"/>
    </style:style>
    <style:style style:name="P177" style:family="paragraph" style:parent-style-name="Text_20_body">
      <style:text-properties fo:language="ca" fo:country="ES" fo:font-weight="normal" officeooo:rsid="001a1fdd" officeooo:paragraph-rsid="001a1fdd" style:font-weight-asian="normal" style:font-weight-complex="normal"/>
    </style:style>
    <style:style style:name="P178" style:family="paragraph" style:parent-style-name="Text_20_body">
      <style:text-properties fo:language="ca" fo:country="ES" officeooo:rsid="001b1053" officeooo:paragraph-rsid="0091f042"/>
    </style:style>
    <style:style style:name="P179" style:family="paragraph" style:parent-style-name="Text_20_body">
      <style:text-properties fo:language="ca" fo:country="ES" officeooo:rsid="001b1053" officeooo:paragraph-rsid="001b1053"/>
    </style:style>
    <style:style style:name="P180" style:family="paragraph" style:parent-style-name="Text_20_body" style:list-style-name="L26">
      <style:text-properties fo:language="ca" fo:country="ES" fo:font-weight="bold" officeooo:rsid="001b1053" officeooo:paragraph-rsid="001b1053" style:font-weight-asian="bold" style:font-weight-complex="bold"/>
    </style:style>
    <style:style style:name="P181" style:family="paragraph" style:parent-style-name="Text_20_body" style:list-style-name="L26">
      <style:text-properties fo:language="ca" fo:country="ES" fo:font-weight="bold" officeooo:rsid="001b5cf5" officeooo:paragraph-rsid="001b5cf5" style:font-weight-asian="bold" style:font-weight-complex="bold"/>
    </style:style>
    <style:style style:name="P182" style:family="paragraph" style:parent-style-name="Text_20_body">
      <style:text-properties fo:language="ca" fo:country="ES" fo:font-weight="normal" officeooo:rsid="001b1053" officeooo:paragraph-rsid="001b1053" style:font-weight-asian="normal" style:font-weight-complex="normal"/>
    </style:style>
    <style:style style:name="P183" style:family="paragraph" style:parent-style-name="Text_20_body">
      <style:text-properties fo:language="ca" fo:country="ES" officeooo:rsid="001df521" officeooo:paragraph-rsid="001b5cf5"/>
    </style:style>
    <style:style style:name="P184" style:family="paragraph" style:parent-style-name="Text_20_body" style:list-style-name="L27">
      <style:text-properties fo:language="ca" fo:country="ES" fo:font-weight="bold" officeooo:rsid="001b5cf5" officeooo:paragraph-rsid="001b5cf5" style:font-weight-asian="bold" style:font-weight-complex="bold"/>
    </style:style>
    <style:style style:name="P185" style:family="paragraph" style:parent-style-name="Text_20_body">
      <style:text-properties fo:language="ca" fo:country="ES"/>
    </style:style>
    <style:style style:name="P186" style:family="paragraph" style:parent-style-name="Text_20_body">
      <style:text-properties fo:language="ca" fo:country="ES" officeooo:rsid="00180ee2" officeooo:paragraph-rsid="00180ee2"/>
    </style:style>
    <style:style style:name="P187" style:family="paragraph" style:parent-style-name="Text_20_body" style:list-style-name="L28">
      <style:text-properties fo:language="ca" fo:country="ES" fo:font-weight="bold" officeooo:rsid="001b5cf5" officeooo:paragraph-rsid="001f540c" style:font-weight-asian="bold" style:font-weight-complex="bold"/>
    </style:style>
    <style:style style:name="P188" style:family="paragraph" style:parent-style-name="Text_20_body" style:list-style-name="L28">
      <style:text-properties fo:language="ca" fo:country="ES" fo:font-weight="bold" officeooo:rsid="001f540c" officeooo:paragraph-rsid="001f540c" style:font-weight-asian="bold" style:font-weight-complex="bold"/>
    </style:style>
    <style:style style:name="P189" style:family="paragraph" style:parent-style-name="Text_20_body" style:list-style-name="L28">
      <style:text-properties fo:language="ca" fo:country="ES" officeooo:paragraph-rsid="001f540c"/>
    </style:style>
    <style:style style:name="P190" style:family="paragraph" style:parent-style-name="Text_20_body">
      <style:text-properties fo:language="ca" fo:country="ES" officeooo:rsid="001f540c" officeooo:paragraph-rsid="001f540c"/>
    </style:style>
    <style:style style:name="P191" style:family="paragraph" style:parent-style-name="Text_20_body" style:list-style-name="L29">
      <style:text-properties fo:language="ca" fo:country="ES" fo:font-weight="bold" officeooo:rsid="001f540c" officeooo:paragraph-rsid="001f540c" style:font-weight-asian="bold" style:font-weight-complex="bold"/>
    </style:style>
    <style:style style:name="P192" style:family="paragraph" style:parent-style-name="Text_20_body" style:list-style-name="L29">
      <style:text-properties fo:language="ca" fo:country="ES" fo:font-weight="bold" officeooo:rsid="0095470e" officeooo:paragraph-rsid="0095470e" style:font-weight-asian="bold" style:font-weight-complex="bold"/>
    </style:style>
    <style:style style:name="P193" style:family="paragraph" style:parent-style-name="Text_20_body" style:list-style-name="L29">
      <style:text-properties fo:language="ca" fo:country="ES" fo:font-weight="bold" officeooo:rsid="0095470e" officeooo:paragraph-rsid="00d5e511" style:font-weight-asian="bold" style:font-weight-complex="bold"/>
    </style:style>
    <style:style style:name="P194" style:family="paragraph" style:parent-style-name="Text_20_body" style:list-style-name="L29">
      <style:text-properties officeooo:paragraph-rsid="00d5e511"/>
    </style:style>
    <style:style style:name="P195" style:family="paragraph" style:parent-style-name="Text_20_body" style:list-style-name="L29">
      <style:text-properties fo:language="ca" fo:country="ES" fo:font-weight="normal" officeooo:rsid="00acd915" officeooo:paragraph-rsid="00d5e511" style:font-weight-asian="normal" style:font-weight-complex="normal"/>
    </style:style>
    <style:style style:name="P196" style:family="paragraph" style:parent-style-name="Text_20_body">
      <style:text-properties officeooo:paragraph-rsid="001f94a7"/>
    </style:style>
    <style:style style:name="P197" style:family="paragraph" style:parent-style-name="Text_20_body" style:list-style-name="L30">
      <style:text-properties fo:font-weight="bold" officeooo:paragraph-rsid="00d5e511" style:font-weight-asian="bold" style:font-weight-complex="bold"/>
    </style:style>
    <style:style style:name="P198" style:family="paragraph" style:parent-style-name="Text_20_body" style:list-style-name="L30">
      <style:text-properties fo:font-weight="bold" officeooo:rsid="00ff4397" officeooo:paragraph-rsid="00ff4397" style:font-weight-asian="bold" style:font-weight-complex="bold"/>
    </style:style>
    <style:style style:name="P199" style:family="paragraph" style:parent-style-name="Text_20_body" style:list-style-name="L30">
      <style:text-properties fo:language="ca" fo:country="ES" fo:font-weight="bold" officeooo:rsid="001fc3e5" officeooo:paragraph-rsid="00d5e511" style:font-weight-asian="bold" style:font-weight-complex="bold"/>
    </style:style>
    <style:style style:name="P200" style:family="paragraph" style:parent-style-name="Text_20_body">
      <style:text-properties fo:language="ca" fo:country="ES" fo:font-weight="normal" officeooo:rsid="001fc3e5" officeooo:paragraph-rsid="001fc3e5" style:font-weight-asian="normal" style:font-weight-complex="normal"/>
    </style:style>
    <style:style style:name="P201" style:family="paragraph" style:parent-style-name="Text_20_body" style:list-style-name="L31">
      <style:text-properties fo:language="ca" fo:country="ES" fo:font-weight="bold" officeooo:rsid="001fc3e5" officeooo:paragraph-rsid="001fc3e5" style:font-weight-asian="bold" style:font-weight-complex="bold"/>
    </style:style>
    <style:style style:name="P202" style:family="paragraph" style:parent-style-name="Text_20_body" style:list-style-name="L31">
      <style:text-properties fo:language="ca" fo:country="ES" fo:font-weight="normal" officeooo:rsid="00ff4397" officeooo:paragraph-rsid="00ff4397" style:font-weight-asian="normal" style:font-weight-complex="normal"/>
    </style:style>
    <style:style style:name="P203" style:family="paragraph" style:parent-style-name="Text_20_body" style:list-style-name="L31">
      <style:text-properties fo:language="ca" fo:country="ES" fo:font-weight="bold" officeooo:rsid="00207651" officeooo:paragraph-rsid="00207651" style:font-weight-asian="bold" style:font-weight-complex="bold"/>
    </style:style>
    <style:style style:name="P204" style:family="paragraph" style:parent-style-name="Text_20_body">
      <style:text-properties fo:language="ca" fo:country="ES" fo:font-weight="normal" officeooo:rsid="0100dd08" officeooo:paragraph-rsid="0101144f" style:font-weight-asian="normal" style:font-weight-complex="normal"/>
    </style:style>
    <style:style style:name="P205" style:family="paragraph" style:parent-style-name="Text_20_body" style:list-style-name="L32">
      <style:text-properties fo:language="ca" fo:country="ES" fo:font-weight="normal" officeooo:rsid="0100dd08" officeooo:paragraph-rsid="0100dd08" style:font-weight-asian="normal" style:font-weight-complex="normal"/>
    </style:style>
    <style:style style:name="P206" style:family="paragraph" style:parent-style-name="Text_20_body">
      <style:text-properties fo:language="ca" fo:country="ES" fo:font-weight="normal" officeooo:rsid="0100dd08" officeooo:paragraph-rsid="0100dd08" style:font-weight-asian="normal" style:font-weight-complex="normal"/>
    </style:style>
    <style:style style:name="P207" style:family="paragraph" style:parent-style-name="Text_20_body">
      <style:text-properties fo:language="ca" fo:country="ES" fo:font-weight="bold" officeooo:rsid="002119a2" officeooo:paragraph-rsid="0100dd08" style:font-weight-asian="bold" style:font-weight-complex="bold"/>
    </style:style>
    <style:style style:name="P208" style:family="paragraph" style:parent-style-name="Text_20_body">
      <style:text-properties fo:language="ca" fo:country="ES" officeooo:rsid="002119a2" officeooo:paragraph-rsid="002119a2"/>
    </style:style>
    <style:style style:name="P209" style:family="paragraph" style:parent-style-name="Text_20_body" style:list-style-name="L33">
      <style:text-properties fo:language="ca" fo:country="ES" fo:font-weight="bold" officeooo:rsid="002119a2" officeooo:paragraph-rsid="002119a2" style:font-weight-asian="bold" style:font-weight-complex="bold"/>
    </style:style>
    <style:style style:name="P210" style:family="paragraph" style:parent-style-name="Text_20_body">
      <style:text-properties fo:language="ca" fo:country="ES" fo:font-weight="bold" officeooo:rsid="002119a2" officeooo:paragraph-rsid="002119a2" style:font-weight-asian="bold" style:font-weight-complex="bold"/>
    </style:style>
    <style:style style:name="P211" style:family="paragraph" style:parent-style-name="Text_20_body">
      <style:text-properties fo:language="ca" fo:country="ES" fo:font-weight="normal" officeooo:rsid="009577a4" officeooo:paragraph-rsid="009577a4" style:font-weight-asian="normal" style:font-weight-complex="normal"/>
    </style:style>
    <style:style style:name="P212" style:family="paragraph" style:parent-style-name="Text_20_body">
      <style:text-properties officeooo:paragraph-rsid="00996805"/>
    </style:style>
    <style:style style:name="P213" style:family="paragraph" style:parent-style-name="Text_20_body">
      <style:text-properties officeooo:rsid="00996805" officeooo:paragraph-rsid="00996805"/>
    </style:style>
    <style:style style:name="P214" style:family="paragraph" style:parent-style-name="Text_20_body">
      <style:text-properties officeooo:rsid="00ade611" officeooo:paragraph-rsid="00ade611"/>
    </style:style>
    <style:style style:name="P215" style:family="paragraph" style:parent-style-name="Text_20_body" style:list-style-name="L34">
      <style:text-properties officeooo:rsid="00ade611" officeooo:paragraph-rsid="00ade611"/>
    </style:style>
    <style:style style:name="P216" style:family="paragraph" style:parent-style-name="Text_20_body">
      <style:text-properties officeooo:paragraph-rsid="00ade611"/>
    </style:style>
    <style:style style:name="P217" style:family="paragraph" style:parent-style-name="Text_20_body">
      <style:text-properties officeooo:paragraph-rsid="00d6b4ca"/>
    </style:style>
    <style:style style:name="P218" style:family="paragraph" style:parent-style-name="Text_20_body" style:list-style-name="L35">
      <style:text-properties officeooo:rsid="00970b99" officeooo:paragraph-rsid="00d6b4ca"/>
    </style:style>
    <style:style style:name="P219" style:family="paragraph" style:parent-style-name="Text_20_body">
      <style:text-properties officeooo:rsid="00970b99" officeooo:paragraph-rsid="00d6b4ca"/>
    </style:style>
    <style:style style:name="P220" style:family="paragraph" style:parent-style-name="Text_20_body" style:list-style-name="L36">
      <style:text-properties officeooo:paragraph-rsid="00d6b4ca"/>
    </style:style>
    <style:style style:name="P221" style:family="paragraph" style:parent-style-name="Text_20_body" style:list-style-name="L36">
      <style:text-properties officeooo:rsid="000ca359" officeooo:paragraph-rsid="00d6b4ca"/>
    </style:style>
    <style:style style:name="P222" style:family="paragraph" style:parent-style-name="Text_20_body">
      <style:paragraph-properties fo:margin-left="0.635cm" fo:margin-right="0cm" fo:text-indent="0cm" style:auto-text-indent="false">
        <style:tab-stops/>
      </style:paragraph-properties>
      <style:text-properties officeooo:paragraph-rsid="00d6b4ca"/>
    </style:style>
    <style:style style:name="P223" style:family="paragraph" style:parent-style-name="Text_20_body">
      <style:text-properties officeooo:rsid="00970b99" officeooo:paragraph-rsid="00970b99"/>
    </style:style>
    <style:style style:name="P224" style:family="paragraph" style:parent-style-name="Text_20_body" style:list-style-name="L37">
      <style:text-properties fo:font-weight="bold" officeooo:rsid="00970b99" officeooo:paragraph-rsid="00970b99" style:font-weight-asian="bold" style:font-weight-complex="bold"/>
    </style:style>
    <style:style style:name="P225" style:family="paragraph" style:parent-style-name="Text_20_body">
      <style:text-properties fo:font-weight="normal" officeooo:rsid="00970b99" officeooo:paragraph-rsid="00970b99" style:font-weight-asian="normal" style:font-weight-complex="normal"/>
    </style:style>
    <style:style style:name="P226" style:family="paragraph" style:parent-style-name="Text_20_body" style:list-style-name="L38">
      <style:text-properties fo:font-weight="bold" officeooo:rsid="00970b99" officeooo:paragraph-rsid="00970b99" style:font-weight-asian="bold" style:font-weight-complex="bold"/>
    </style:style>
    <style:style style:name="P227" style:family="paragraph" style:parent-style-name="Text_20_body">
      <style:text-properties fo:font-weight="bold" officeooo:rsid="00970b99" officeooo:paragraph-rsid="00970b99" style:font-weight-asian="bold" style:font-weight-complex="bold"/>
    </style:style>
    <style:style style:name="T1"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2"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4"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5" style:family="text">
      <style:text-properties fo:color="#007dc3" loext:opacity="100%" fo:font-size="18pt" fo:language="ca" fo:country="ES" style:font-size-asian="18pt" style:font-name-complex="Times New Roman" style:font-size-complex="18pt"/>
    </style:style>
    <style:style style:name="T6" style:family="text">
      <style:text-properties fo:color="#007dc3" loext:opacity="100%" fo:font-size="18pt" fo:language="ca" fo:country="ES" officeooo:rsid="00ea3059" style:font-size-asian="18pt" style:font-name-complex="Times New Roman" style:font-size-complex="18pt"/>
    </style:style>
    <style:style style:name="T7" style:family="text">
      <style:text-properties fo:color="#007dc3" loext:opacity="100%" fo:font-size="18pt" fo:language="ca" fo:country="ES" officeooo:rsid="00ff21a6" style:font-size-asian="18pt" style:font-name-complex="Times New Roman" style:font-size-complex="18pt"/>
    </style:style>
    <style:style style:name="T8"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9" style:family="text">
      <style:text-properties fo:color="#007dc3" loext:opacity="100%" style:font-name="Calibri" fo:font-size="18pt" fo:language="ca" fo:country="ES" officeooo:rsid="00ff21a6" style:font-size-asian="18pt" style:language-asian="en" style:country-asian="US" style:font-name-complex="Times New Roman" style:font-size-complex="18pt"/>
    </style:style>
    <style:style style:name="T10" style:family="text">
      <style:text-properties officeooo:rsid="00c911e8"/>
    </style:style>
    <style:style style:name="T11" style:family="text">
      <style:text-properties officeooo:rsid="00434c2e"/>
    </style:style>
    <style:style style:name="T12" style:family="text">
      <style:text-properties officeooo:rsid="00f8bb0d"/>
    </style:style>
    <style:style style:name="T13" style:family="text">
      <style:text-properties fo:language="ca" fo:country="ES" officeooo:rsid="0064c74a"/>
    </style:style>
    <style:style style:name="T14" style:family="text">
      <style:text-properties fo:font-size="10pt" fo:language="ca" fo:country="ES" officeooo:rsid="0064c74a" style:font-size-asian="10.5pt"/>
    </style:style>
    <style:style style:name="T15" style:family="text">
      <style:text-properties fo:font-size="10pt" fo:language="ca" fo:country="ES" fo:font-style="italic" officeooo:rsid="0064c74a" style:font-size-asian="10.5pt" style:font-style-asian="italic" style:font-style-complex="italic"/>
    </style:style>
    <style:style style:name="T16" style:family="text">
      <style:text-properties fo:font-size="10pt" fo:language="ca" fo:country="ES" fo:font-style="normal" officeooo:rsid="0064c74a" style:font-size-asian="10.5pt" style:font-style-asian="normal" style:font-style-complex="normal"/>
    </style:style>
    <style:style style:name="T17" style:family="text">
      <style:text-properties text:display="none"/>
    </style:style>
    <style:style style:name="T18" style:family="text">
      <style:text-properties style:font-name="Calibri" officeooo:rsid="001ca2a7"/>
    </style:style>
    <style:style style:name="T19" style:family="text">
      <style:text-properties style:font-name="Calibri" officeooo:rsid="0064c74a"/>
    </style:style>
    <style:style style:name="T20" style:family="text">
      <style:text-properties officeooo:rsid="0064c74a"/>
    </style:style>
    <style:style style:name="T21" style:family="text">
      <style:text-properties style:font-name="Calibri1" officeooo:rsid="0064c74a"/>
    </style:style>
    <style:style style:name="T22" style:family="text">
      <style:text-properties style:font-name="Calibri1"/>
    </style:style>
    <style:style style:name="T23" style:family="text">
      <style:text-properties style:font-name="Calibri1" fo:language="ca" fo:country="ES" officeooo:rsid="001ca2a7"/>
    </style:style>
    <style:style style:name="T24" style:family="text">
      <style:text-properties style:font-name="Calibri1" fo:language="ca" fo:country="ES" officeooo:rsid="00673e05"/>
    </style:style>
    <style:style style:name="T25" style:family="text">
      <style:text-properties officeooo:rsid="008935c2"/>
    </style:style>
    <style:style style:name="T26" style:family="text">
      <style:text-properties officeooo:rsid="008520a6"/>
    </style:style>
    <style:style style:name="T27" style:family="text">
      <style:text-properties officeooo:rsid="0086f52e"/>
    </style:style>
    <style:style style:name="T28" style:family="text">
      <style:text-properties officeooo:rsid="0089595f"/>
    </style:style>
    <style:style style:name="T29" style:family="text">
      <style:text-properties fo:font-weight="normal" style:font-weight-asian="normal" style:font-weight-complex="normal"/>
    </style:style>
    <style:style style:name="T30" style:family="text">
      <style:text-properties fo:font-weight="normal" officeooo:rsid="008520a6" style:font-weight-asian="normal" style:font-weight-complex="normal"/>
    </style:style>
    <style:style style:name="T31" style:family="text">
      <style:text-properties fo:font-weight="normal" officeooo:rsid="00877a2f" style:font-weight-asian="normal" style:font-weight-complex="normal"/>
    </style:style>
    <style:style style:name="T32" style:family="text">
      <style:text-properties officeooo:rsid="0026ed69"/>
    </style:style>
    <style:style style:name="T33" style:family="text">
      <style:text-properties officeooo:rsid="00ee40b9"/>
    </style:style>
    <style:style style:name="T34" style:family="text">
      <style:text-properties fo:font-weight="normal" officeooo:rsid="00ee40b9" style:font-weight-asian="normal" style:font-weight-complex="normal"/>
    </style:style>
    <style:style style:name="T35" style:family="text">
      <style:text-properties fo:language="ca" fo:country="ES" officeooo:rsid="00290227"/>
    </style:style>
    <style:style style:name="T36" style:family="text">
      <style:text-properties fo:language="ca" fo:country="ES" officeooo:rsid="008cd1d3"/>
    </style:style>
    <style:style style:name="T37" style:family="text">
      <style:text-properties style:font-name="Calibri4" fo:font-size="10pt" fo:language="ca" fo:country="ES" officeooo:rsid="008cd1d3" style:font-size-asian="10.5pt"/>
    </style:style>
    <style:style style:name="T38" style:family="text">
      <style:text-properties style:font-name="Calibri4" fo:font-size="10pt" fo:language="ca" fo:country="ES" style:font-size-asian="10.5pt"/>
    </style:style>
    <style:style style:name="T39" style:family="text">
      <style:text-properties style:font-name="Calibri4" fo:font-size="10pt" fo:language="ca" fo:country="ES" officeooo:rsid="0029d734" style:font-size-asian="10.5pt"/>
    </style:style>
    <style:style style:name="T40" style:family="text">
      <style:text-properties style:font-name="Calibri4" fo:font-size="10pt" fo:language="ca" fo:country="ES" officeooo:rsid="008d1405" style:font-size-asian="10.5pt"/>
    </style:style>
    <style:style style:name="T41" style:family="text">
      <style:text-properties fo:language="ca" fo:country="ES" officeooo:rsid="0029d734"/>
    </style:style>
    <style:style style:name="T42" style:family="text">
      <style:text-properties fo:language="ca" fo:country="ES" officeooo:rsid="008d1405"/>
    </style:style>
    <style:style style:name="T43" style:family="text">
      <style:text-properties style:font-name="Calibri4" fo:font-size="10pt" fo:language="ca" fo:country="ES" fo:font-weight="bold" officeooo:rsid="0029d734" style:font-size-asian="10.5pt" style:font-weight-asian="bold" style:font-weight-complex="bold"/>
    </style:style>
    <style:style style:name="T44" style:family="text">
      <style:text-properties style:font-name="Calibri4" fo:font-size="10pt" fo:language="ca" fo:country="ES" fo:font-weight="bold" officeooo:rsid="008809df" style:font-size-asian="10.5pt" style:font-weight-asian="bold" style:font-weight-complex="bold"/>
    </style:style>
    <style:style style:name="T45" style:family="text">
      <style:text-properties style:font-name="Calibri4" fo:font-size="10pt" fo:language="ca" fo:country="ES" fo:font-weight="normal" officeooo:rsid="008809df" style:font-size-asian="10.5pt" style:font-weight-asian="normal" style:font-weight-complex="normal"/>
    </style:style>
    <style:style style:name="T46" style:family="text">
      <style:text-properties fo:language="ca" fo:country="ES" fo:font-weight="bold" officeooo:rsid="0029d734" style:font-weight-asian="bold" style:font-weight-complex="bold"/>
    </style:style>
    <style:style style:name="T47" style:family="text">
      <style:text-properties fo:language="ca" fo:country="ES" fo:font-weight="bold" officeooo:rsid="008809df" style:font-weight-asian="bold" style:font-weight-complex="bold"/>
    </style:style>
    <style:style style:name="T48" style:family="text">
      <style:text-properties fo:language="ca" fo:country="ES" fo:font-weight="normal" officeooo:rsid="008809df" style:font-weight-asian="normal" style:font-weight-complex="normal"/>
    </style:style>
    <style:style style:name="T49" style:family="text">
      <style:text-properties fo:font-weight="bold" officeooo:rsid="002749e4" style:font-weight-asian="bold" style:font-weight-complex="bold"/>
    </style:style>
    <style:style style:name="T50" style:family="text">
      <style:text-properties fo:font-weight="normal" officeooo:rsid="002749e4" style:font-weight-asian="normal" style:font-weight-complex="normal"/>
    </style:style>
    <style:style style:name="T51" style:family="text">
      <style:text-properties fo:font-weight="normal" officeooo:rsid="0029d734" style:font-weight-asian="normal" style:font-weight-complex="normal"/>
    </style:style>
    <style:style style:name="T52" style:family="text">
      <style:text-properties officeooo:rsid="0029d734"/>
    </style:style>
    <style:style style:name="T53" style:family="text">
      <style:text-properties fo:font-weight="normal" officeooo:rsid="002ddca3" style:font-weight-asian="normal" style:font-weight-complex="normal"/>
    </style:style>
    <style:style style:name="T54" style:family="text">
      <style:text-properties officeooo:rsid="00180ee2"/>
    </style:style>
    <style:style style:name="T55" style:family="text">
      <style:text-properties officeooo:rsid="00df1e58"/>
    </style:style>
    <style:style style:name="T56" style:family="text">
      <style:text-properties officeooo:rsid="00d321d5"/>
    </style:style>
    <style:style style:name="T57" style:family="text">
      <style:text-properties officeooo:rsid="00337d58"/>
    </style:style>
    <style:style style:name="T58" style:family="text">
      <style:text-properties fo:font-weight="normal" officeooo:rsid="0030bbb5" style:font-weight-asian="normal" style:font-weight-complex="normal"/>
    </style:style>
    <style:style style:name="T59" style:family="text">
      <style:text-properties fo:font-weight="bold" style:font-weight-asian="bold" style:font-weight-complex="bold"/>
    </style:style>
    <style:style style:name="T60" style:family="text">
      <style:text-properties style:font-name="Calibri4" fo:font-size="10pt" fo:language="ca" fo:country="ES" fo:font-weight="normal" style:font-size-asian="10.5pt" style:font-weight-asian="normal" style:font-weight-complex="normal"/>
    </style:style>
    <style:style style:name="T61" style:family="text">
      <style:text-properties fo:font-weight="normal" officeooo:rsid="00337d58" style:font-weight-asian="normal" style:font-weight-complex="normal"/>
    </style:style>
    <style:style style:name="T62" style:family="text">
      <style:text-properties officeooo:rsid="00ecb670"/>
    </style:style>
    <style:style style:name="T63" style:family="text">
      <style:text-properties officeooo:rsid="00be4301"/>
    </style:style>
    <style:style style:name="T64" style:family="text">
      <style:text-properties fo:language="ca" fo:country="ES" fo:font-weight="bold" style:font-weight-asian="bold" style:font-weight-complex="bold"/>
    </style:style>
    <style:style style:name="T65" style:family="text">
      <style:text-properties fo:language="ca" fo:country="ES" fo:font-weight="normal" officeooo:rsid="00ecb670" style:font-weight-asian="normal" style:font-weight-complex="normal"/>
    </style:style>
    <style:style style:name="T66" style:family="text">
      <style:text-properties fo:language="ca" fo:country="ES" fo:font-weight="normal" style:font-weight-asian="normal" style:font-weight-complex="normal"/>
    </style:style>
    <style:style style:name="T67" style:family="text">
      <style:text-properties fo:font-weight="normal" officeooo:rsid="003b0066" style:font-weight-asian="normal" style:font-weight-complex="normal"/>
    </style:style>
    <style:style style:name="T68" style:family="text">
      <style:text-properties fo:font-weight="bold" officeooo:rsid="0037b183" style:font-weight-asian="bold" style:font-weight-complex="bold"/>
    </style:style>
    <style:style style:name="T69" style:family="text">
      <style:text-properties fo:font-weight="normal" officeooo:rsid="00398d41" style:font-weight-asian="normal" style:font-weight-complex="normal"/>
    </style:style>
    <style:style style:name="T70" style:family="text">
      <style:text-properties officeooo:rsid="003c3723"/>
    </style:style>
    <style:style style:name="T71" style:family="text">
      <style:text-properties officeooo:rsid="003dd30a"/>
    </style:style>
    <style:style style:name="T72" style:family="text">
      <style:text-properties fo:language="ca" fo:country="ES" officeooo:rsid="00180ee2"/>
    </style:style>
    <style:style style:name="T73" style:family="text">
      <style:text-properties fo:language="ca" fo:country="ES"/>
    </style:style>
    <style:style style:name="T74" style:family="text">
      <style:text-properties fo:language="ca" fo:country="ES" officeooo:rsid="003c3723"/>
    </style:style>
    <style:style style:name="T75" style:family="text">
      <style:text-properties fo:language="ca" fo:country="ES" officeooo:rsid="00b24c63"/>
    </style:style>
    <style:style style:name="T76" style:family="text">
      <style:text-properties style:font-name="Calibri" fo:language="ca" fo:country="ES" fo:font-weight="bold" style:font-weight-asian="bold"/>
    </style:style>
    <style:style style:name="T77" style:family="text">
      <style:text-properties style:font-name="Calibri" fo:language="ca" fo:country="ES" fo:font-weight="normal" style:font-weight-asian="normal" style:font-weight-complex="normal"/>
    </style:style>
    <style:style style:name="T78" style:family="text">
      <style:text-properties style:font-name="Calibri" fo:font-size="10pt" fo:language="ca" fo:country="ES" fo:font-weight="bold" officeooo:rsid="0077d900" style:font-size-asian="10.5pt" style:font-weight-asian="bold"/>
    </style:style>
    <style:style style:name="T79" style:family="text">
      <style:text-properties style:font-name="Calibri" fo:font-size="10pt" fo:language="ca" fo:country="ES" fo:font-weight="bold" officeooo:rsid="00b24c63" style:font-size-asian="10.5pt" style:font-weight-asian="bold"/>
    </style:style>
    <style:style style:name="T80" style:family="text">
      <style:text-properties style:font-name="Calibri" fo:language="ca" fo:country="ES" fo:font-weight="bold" officeooo:rsid="0077d900" style:font-weight-asian="bold"/>
    </style:style>
    <style:style style:name="T81" style:family="text">
      <style:text-properties style:font-name="Calibri" fo:language="ca" fo:country="ES" fo:font-weight="normal" officeooo:rsid="0077d900" style:font-weight-asian="normal" style:font-weight-complex="normal"/>
    </style:style>
    <style:style style:name="T82" style:family="text">
      <style:text-properties style:font-name="Calibri" fo:font-size="10pt" fo:language="ca" fo:country="ES" fo:font-weight="normal" officeooo:rsid="0077d900" style:font-size-asian="10.5pt" style:font-weight-asian="normal" style:font-weight-complex="normal"/>
    </style:style>
    <style:style style:name="T83" style:family="text">
      <style:text-properties style:font-name="Calibri" fo:font-size="10pt" fo:language="ca" fo:country="ES" fo:font-weight="normal" officeooo:rsid="00b24c63" style:font-size-asian="10.5pt" style:font-weight-asian="normal" style:font-weight-complex="normal"/>
    </style:style>
    <style:style style:name="T84" style:family="text">
      <style:text-properties style:font-name="Calibri" fo:language="ca" fo:country="ES"/>
    </style:style>
    <style:style style:name="T85" style:family="text">
      <style:text-properties style:font-name="Calibri" fo:font-size="10pt" fo:language="ca" fo:country="ES" officeooo:rsid="007361b5" style:font-size-asian="10.5pt"/>
    </style:style>
    <style:style style:name="T86" style:family="text">
      <style:text-properties style:font-name="Calibri" fo:font-size="10pt" fo:language="ca" fo:country="ES" fo:font-weight="bold" officeooo:rsid="00780e29" style:font-size-asian="10.5pt" style:font-weight-asian="bold"/>
    </style:style>
    <style:style style:name="T87" style:family="text">
      <style:text-properties style:font-name="Calibri" fo:font-size="10pt" fo:language="ca" fo:country="ES" officeooo:rsid="00780e29" style:font-size-asian="10.5pt"/>
    </style:style>
    <style:style style:name="T88" style:family="text">
      <style:text-properties style:font-name="Calibri" fo:language="ca" fo:country="ES" officeooo:rsid="0044a5d3"/>
    </style:style>
    <style:style style:name="T89" style:family="text">
      <style:text-properties style:font-name="Calibri" fo:language="ca" fo:country="ES" fo:font-weight="bold" officeooo:rsid="0077d900" style:font-weight-asian="bold" style:font-weight-complex="normal"/>
    </style:style>
    <style:style style:name="T90" style:family="text">
      <style:text-properties style:font-name="Calibri" fo:language="ca" fo:country="ES" fo:font-weight="normal" officeooo:rsid="0044a5d3" style:font-weight-asian="normal" style:font-weight-complex="normal"/>
    </style:style>
    <style:style style:name="T91" style:family="text">
      <style:text-properties style:font-name="Calibri" fo:language="ca" fo:country="ES" fo:font-weight="normal" officeooo:rsid="00b39b2c" style:font-weight-asian="normal" style:font-weight-complex="normal"/>
    </style:style>
    <style:style style:name="T92" style:family="text">
      <style:text-properties style:font-name="Calibri" fo:language="ca" fo:country="ES" fo:font-weight="bold" officeooo:rsid="00484b61" style:font-weight-asian="bold" style:font-weight-complex="bold"/>
    </style:style>
    <style:style style:name="T93" style:family="text">
      <style:text-properties style:font-name="Calibri" fo:language="ca" fo:country="ES" fo:font-weight="normal" officeooo:rsid="00484b61" style:font-weight-asian="normal" style:font-weight-complex="normal"/>
    </style:style>
    <style:style style:name="T94" style:family="text">
      <style:text-properties style:font-name="Calibri" fo:language="ca" fo:country="ES" fo:font-weight="bold" officeooo:rsid="00780e29" style:font-weight-asian="bold"/>
    </style:style>
    <style:style style:name="T95" style:family="text">
      <style:text-properties style:font-name="Calibri" fo:language="ca" fo:country="ES" officeooo:rsid="00780e29"/>
    </style:style>
    <style:style style:name="T96" style:family="text">
      <style:text-properties style:font-name="Calibri" fo:font-size="10pt" fo:language="ca" fo:country="ES" fo:font-weight="bold" officeooo:rsid="00abd58a" style:font-size-asian="10.5pt" style:font-weight-asian="bold" style:font-weight-complex="bold"/>
    </style:style>
    <style:style style:name="T97" style:family="text">
      <style:text-properties style:font-name="Calibri" fo:language="ca" fo:country="ES" fo:font-weight="bold" officeooo:rsid="00a4c287" style:font-weight-asian="bold" style:font-weight-complex="bold"/>
    </style:style>
    <style:style style:name="T98" style:family="text">
      <style:text-properties style:font-name="Calibri" fo:language="ca" fo:country="ES" fo:font-weight="normal" officeooo:rsid="00a4c287" style:font-weight-asian="normal" style:font-weight-complex="normal"/>
    </style:style>
    <style:style style:name="T99" style:family="text">
      <style:text-properties style:font-name="Calibri" fo:font-weight="normal" officeooo:rsid="00a497e2" style:font-weight-asian="normal" style:font-weight-complex="normal"/>
    </style:style>
    <style:style style:name="T100" style:family="text">
      <style:text-properties style:font-name="Calibri" fo:font-weight="normal" officeooo:rsid="00a259c5" style:font-weight-asian="normal" style:font-weight-complex="normal"/>
    </style:style>
    <style:style style:name="T101" style:family="text">
      <style:text-properties style:font-name="Calibri" fo:language="ca" fo:country="ES" fo:font-weight="normal" officeooo:rsid="00a497e2" style:font-weight-asian="normal" style:font-weight-complex="normal"/>
    </style:style>
    <style:style style:name="T102" style:family="text">
      <style:text-properties style:font-name="Calibri" fo:font-size="10pt" fo:language="ca" fo:country="ES" officeooo:rsid="00b24c63" style:font-size-asian="10.5pt"/>
    </style:style>
    <style:style style:name="T103" style:family="text">
      <style:text-properties style:font-name="Calibri" fo:font-size="10pt" fo:language="ca" fo:country="ES" style:font-size-asian="10.5pt"/>
    </style:style>
    <style:style style:name="T104" style:family="text">
      <style:text-properties style:font-name="Calibri" fo:font-size="10pt" fo:language="ca" fo:country="ES" fo:font-weight="normal" style:font-size-asian="10.5pt" style:font-weight-asian="normal" style:font-weight-complex="normal"/>
    </style:style>
    <style:style style:name="T105" style:family="text">
      <style:text-properties style:font-name="Calibri" fo:font-size="10pt" fo:language="ca" fo:country="ES" officeooo:rsid="00abd58a" style:font-size-asian="10.5pt"/>
    </style:style>
    <style:style style:name="T106" style:family="text">
      <style:text-properties style:font-name="Calibri" fo:language="ca" fo:country="ES" fo:font-weight="bold" officeooo:rsid="00b24c63" style:font-weight-asian="bold" style:font-weight-complex="bold"/>
    </style:style>
    <style:style style:name="T107" style:family="text">
      <style:text-properties style:font-name="Calibri" fo:font-size="10pt" fo:language="ca" fo:country="ES" fo:font-weight="bold" officeooo:rsid="00b24c63" style:font-size-asian="10.5pt" style:font-weight-asian="bold" style:font-weight-complex="bold"/>
    </style:style>
    <style:style style:name="T108" style:family="text">
      <style:text-properties style:font-name="Calibri" fo:font-size="10pt" fo:language="ca" fo:country="ES" fo:font-weight="bold" style:font-size-asian="10.5pt" style:font-weight-asian="bold" style:font-weight-complex="bold"/>
    </style:style>
    <style:style style:name="T109" style:family="text">
      <style:text-properties style:font-name="Calibri4" fo:font-size="10pt" fo:language="ca" fo:country="ES" officeooo:rsid="003dd30a" style:font-size-asian="10.5pt"/>
    </style:style>
    <style:style style:name="T110" style:family="text">
      <style:text-properties style:font-name="Calibri4" fo:font-size="10pt" fo:language="ca" fo:country="ES" officeooo:rsid="00b532aa" style:font-size-asian="10.5pt"/>
    </style:style>
    <style:style style:name="T111" style:family="text">
      <style:text-properties fo:language="ca" fo:country="ES" officeooo:rsid="003dd30a"/>
    </style:style>
    <style:style style:name="T112" style:family="text">
      <style:text-properties fo:language="ca" fo:country="ES" officeooo:rsid="00109022"/>
    </style:style>
    <style:style style:name="T113" style:family="text">
      <style:text-properties fo:language="ca" fo:country="ES" officeooo:rsid="0019fa0c"/>
    </style:style>
    <style:style style:name="T114" style:family="text">
      <style:text-properties fo:language="ca" fo:country="ES" officeooo:rsid="0091f042"/>
    </style:style>
    <style:style style:name="T115" style:family="text">
      <style:text-properties style:font-name="Calibri4" fo:font-size="10pt" fo:language="ca" fo:country="ES" officeooo:rsid="0019fa0c" style:font-size-asian="10.5pt"/>
    </style:style>
    <style:style style:name="T116" style:family="text">
      <style:text-properties style:font-name="Calibri4" fo:font-size="10pt" fo:language="ca" fo:country="ES" officeooo:rsid="0091f042" style:font-size-asian="10.5pt"/>
    </style:style>
    <style:style style:name="T117" style:family="text">
      <style:text-properties fo:language="ca" fo:country="ES" officeooo:rsid="00179ecd"/>
    </style:style>
    <style:style style:name="T118" style:family="text">
      <style:text-properties officeooo:rsid="00179ecd"/>
    </style:style>
    <style:style style:name="T119" style:family="text">
      <style:text-properties officeooo:rsid="001a1fdd"/>
    </style:style>
    <style:style style:name="T120" style:family="text">
      <style:text-properties style:font-name="Calibri4" fo:font-size="10pt" fo:language="ca" fo:country="ES" officeooo:rsid="001a1fdd" style:font-size-asian="10.5pt"/>
    </style:style>
    <style:style style:name="T121" style:family="text">
      <style:text-properties fo:language="ca" fo:country="ES" officeooo:rsid="001a1fdd"/>
    </style:style>
    <style:style style:name="T122" style:family="text">
      <style:text-properties officeooo:rsid="001df521"/>
    </style:style>
    <style:style style:name="T123" style:family="text">
      <style:text-properties fo:font-weight="normal" officeooo:rsid="001f540c" style:font-weight-asian="normal" style:font-weight-complex="normal"/>
    </style:style>
    <style:style style:name="T124" style:family="text">
      <style:text-properties fo:font-weight="bold" officeooo:rsid="00180ee2" style:font-weight-asian="bold" style:font-weight-complex="bold"/>
    </style:style>
    <style:style style:name="T125" style:family="text">
      <style:text-properties fo:font-weight="normal" officeooo:rsid="00180ee2" style:font-weight-asian="normal" style:font-weight-complex="normal"/>
    </style:style>
    <style:style style:name="T126" style:family="text">
      <style:text-properties fo:font-weight="normal" officeooo:rsid="001b5cf5" style:font-weight-asian="normal" style:font-weight-complex="normal"/>
    </style:style>
    <style:style style:name="T127" style:family="text">
      <style:text-properties officeooo:rsid="0095470e"/>
    </style:style>
    <style:style style:name="T128" style:family="text">
      <style:text-properties officeooo:rsid="009577a4"/>
    </style:style>
    <style:style style:name="T129" style:family="text">
      <style:text-properties fo:font-weight="normal" officeooo:rsid="009577a4" style:font-weight-asian="normal" style:font-weight-complex="normal"/>
    </style:style>
    <style:style style:name="T130" style:family="text">
      <style:text-properties officeooo:rsid="00acd915"/>
    </style:style>
    <style:style style:name="T131" style:family="text">
      <style:text-properties fo:font-weight="normal" officeooo:rsid="00acd915" style:font-weight-asian="normal" style:font-weight-complex="normal"/>
    </style:style>
    <style:style style:name="T132" style:family="text">
      <style:text-properties fo:language="ca" fo:country="ES" officeooo:rsid="001f94a7"/>
    </style:style>
    <style:style style:name="T133" style:family="text">
      <style:text-properties fo:language="ca" fo:country="ES" officeooo:rsid="001fc3e5"/>
    </style:style>
    <style:style style:name="T134" style:family="text">
      <style:text-properties fo:font-weight="normal" officeooo:rsid="00207651" style:font-weight-asian="normal" style:font-weight-complex="normal"/>
    </style:style>
    <style:style style:name="T135" style:family="text">
      <style:text-properties officeooo:rsid="0101144f"/>
    </style:style>
    <style:style style:name="T136" style:family="text">
      <style:text-properties officeooo:rsid="0100dd08"/>
    </style:style>
    <style:style style:name="T137" style:family="text">
      <style:text-properties officeooo:rsid="00996805"/>
    </style:style>
    <style:style style:name="T138" style:family="text">
      <style:text-properties officeooo:rsid="00d6b4ca"/>
    </style:style>
    <style:style style:name="T139" style:family="text">
      <style:text-properties officeooo:rsid="00fa1cfd"/>
    </style:style>
    <style:style style:name="T140" style:family="text">
      <style:text-properties fo:font-weight="normal" officeooo:rsid="00985b9b"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5.74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19"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2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38"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42"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fo:font-family="StarSymbol" style:font-charset="x-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draw:g text:anchor-type="as-char" svg:y="0cm" draw:z-index="0" draw:name="Group 6" draw:style-name="gr1"><draw:frame draw:name="Picture 2" draw:style-name="gr2" draw:text-style-name="P2" svg:width="13.553cm" svg:height="2.514cm" svg:x="3.438cm" svg:y="0cm"><draw:image xlink:href="Pictures/10000000000006A400000104792F8214.png" xlink:type="simple" xlink:show="embed" xlink:actuate="onLoad" draw:mime-type="image/png"><text:p/></draw:image></draw:frame><draw:frame draw:name="Picture 3" draw:style-name="gr3" draw:text-style-name="P2" svg:width="3.211cm" svg:height="2.513cm" svg:x="0cm" svg:y="0cm"><draw:image xlink:href="Pictures/10000001000002E6000002BBD71058E4.png" xlink:type="simple" xlink:show="embed" xlink:actuate="onLoad" draw:mime-type="image/png"><text:p/></draw:image></draw:frame></draw:g></text:p>
      <text:p text:style-name="P3"/>
      <text:p text:style-name="P3"/>
      <text:p text:style-name="P3"/>
      <text:p text:style-name="P3"/>
      <text:p text:style-name="P3"/>
      <text:p text:style-name="P3"/>
      <text:p text:style-name="P3"/>
      <text:p text:style-name="P3"/>
      <text:p text:style-name="P3"/>
      <text:p text:style-name="P4"/>
      <text:p text:style-name="P4"/>
      <text:p text:style-name="P5"><text:span text:style-name="T1">DISTRIBUCIÓ</text:span><text:span text:style-name="T2">: Manual d'</text:span><text:span text:style-name="T3">administrador</text:span></text:p>
      <text:p text:style-name="P6"><text:span text:style-name="T4">20</text:span><text:span text:style-name="T5"> d</text:span><text:span text:style-name="T6">'</text:span><text:span text:style-name="T7">abril</text:span><text:span text:style-name="T6"> </text:span><text:span text:style-name="T5">de 20</text:span><text:span text:style-name="T8">2</text:span><text:span text:style-name="T9">6</text:span></text:p>
      <text:p text:style-name="P7">Serveis d'Administració Electrònica en el Govern de les Illes Balears</text:p>
      <text:p text:style-name="P8">Lot 3 (Serveis de tramitació d'expedients electrònics)</text:p>
      <text:p text:style-name="P9"/>
      <text:p text:style-name="P10"/>
      <text:p text:style-name="P9"/>
      <text:p text:style-name="P9"/>
      <text:p text:style-name="P9"/>
      <text:p text:style-name="P9"/>
      <text:p text:style-name="P11">Oficina Tècnica de Direcció de Projecte</text:p>
      <text:h text:style-name="P12"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1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4">Control de Canvis</text:p>
          </table:table-cell>
          <table:covered-table-cell/>
          <table:covered-table-cell/>
          <table:covered-table-cell/>
        </table:table-row>
        <table:table-row table:style-name="Tabla2.1">
          <table:table-cell table:style-name="Tabla2.A2" office:value-type="string">
            <text:p text:style-name="P15">Data</text:p>
          </table:table-cell>
          <table:table-cell table:style-name="Tabla2.B2" office:value-type="string">
            <text:p text:style-name="P16">Autor</text:p>
          </table:table-cell>
          <table:table-cell table:style-name="Tabla2.B2" office:value-type="string">
            <text:p text:style-name="P16">Versió</text:p>
          </table:table-cell>
          <table:table-cell table:style-name="Tabla2.D2" office:value-type="string">
            <text:p text:style-name="P16">Canvis</text:p>
          </table:table-cell>
        </table:table-row>
        <table:table-row table:style-name="Tabla2.1">
          <table:table-cell table:style-name="Tabla2.A3" office:value-type="string">
            <text:p text:style-name="P17"><text:span text:style-name="T10">20</text:span>/<text:span text:style-name="T11">1</text:span>0/20<text:span text:style-name="T10">22</text:span></text:p>
          </table:table-cell>
          <table:table-cell table:style-name="Tabla2.B3" office:value-type="string">
            <text:p text:style-name="P17">Limit Tecnologies</text:p>
          </table:table-cell>
          <table:table-cell table:style-name="Tabla2.C3" office:value-type="string">
            <text:p text:style-name="P17">v1.0</text:p>
          </table:table-cell>
          <table:table-cell table:style-name="Tabla2.D3" office:value-type="string">
            <text:p text:style-name="P18">Part d'administració separada del manual d'usuari</text:p>
          </table:table-cell>
        </table:table-row>
        <table:table-row table:style-name="Tabla2.1">
          <table:table-cell table:style-name="Tabla2.A4" office:value-type="string">
            <text:p text:style-name="P19">1/10/2025</text:p>
          </table:table-cell>
          <table:table-cell table:style-name="Tabla2.B4" office:value-type="string">
            <text:p text:style-name="P17">Limit Tecnologies</text:p>
          </table:table-cell>
          <table:table-cell table:style-name="Tabla2.C4" office:value-type="string">
            <text:p text:style-name="P20">v1.0</text:p>
          </table:table-cell>
          <table:table-cell table:style-name="Tabla2.D4" office:value-type="string">
            <text:p text:style-name="P19">Afegir tipus de permisos de bustia</text:p>
          </table:table-cell>
        </table:table-row>
        <table:table-row table:style-name="Tabla2.1">
          <table:table-cell table:style-name="Tabla2.A5" office:value-type="string">
            <text:p text:style-name="P21">20/04/2026</text:p>
          </table:table-cell>
          <table:table-cell table:style-name="Tabla2.B5" office:value-type="string">
            <text:p text:style-name="P22">Limit Tecnologies</text:p>
          </table:table-cell>
          <table:table-cell table:style-name="Tabla2.C5" office:value-type="string">
            <text:p text:style-name="P23"><text:span text:style-name="T12">v</text:span>1.0.8</text:p>
          </table:table-cell>
          <table:table-cell table:style-name="Tabla2.D5" office:value-type="string">
            <text:p text:style-name="P21">Canvi <text:span text:style-name="T12">a la pagina d’anotacions</text:span></text:p>
          </table:table-cell>
        </table:table-row>
        <table:table-row table:style-name="Tabla2.1">
          <table:table-cell table:style-name="Tabla2.A6" office:value-type="string">
            <text:p text:style-name="P24"/>
          </table:table-cell>
          <table:table-cell table:style-name="Tabla2.B6" office:value-type="string">
            <text:p text:style-name="P24"/>
          </table:table-cell>
          <table:table-cell table:style-name="Tabla2.C6" office:value-type="string">
            <text:p text:style-name="P24"/>
          </table:table-cell>
          <table:table-cell table:style-name="Tabla2.D6" office:value-type="string">
            <text:p text:style-name="P24"/>
          </table:table-cell>
        </table:table-row>
      </table:table>
      <text:p text:style-name="P13"/>
      <text:p text:style-name="P1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4">Revisat per</text:p>
          </table:table-cell>
          <table:covered-table-cell/>
          <table:covered-table-cell/>
        </table:table-row>
        <table:table-row table:style-name="Tabla3.1">
          <table:table-cell table:style-name="Tabla3.A2" office:value-type="string">
            <text:p text:style-name="P15">Nom</text:p>
          </table:table-cell>
          <table:table-cell table:style-name="Tabla3.B2" office:value-type="string">
            <text:p text:style-name="P16">Data</text:p>
          </table:table-cell>
          <table:table-cell table:style-name="Tabla3.C2" office:value-type="string">
            <text:p text:style-name="P16">Àrea, departament o empresa</text:p>
          </table:table-cell>
        </table:table-row>
        <table:table-row table:style-name="Tabla3.1">
          <table:table-cell table:style-name="Tabla3.A3" office:value-type="string">
            <text:p text:style-name="P17"/>
          </table:table-cell>
          <table:table-cell table:style-name="Tabla3.B3" office:value-type="string">
            <text:p text:style-name="P17"/>
          </table:table-cell>
          <table:table-cell table:style-name="Tabla3.C3" office:value-type="string">
            <text:p text:style-name="P17"/>
          </table:table-cell>
        </table:table-row>
        <table:table-row table:style-name="Tabla3.1">
          <table:table-cell table:style-name="Tabla3.A4" office:value-type="string">
            <text:p text:style-name="P24"/>
          </table:table-cell>
          <table:table-cell table:style-name="Tabla3.B4" office:value-type="string">
            <text:p text:style-name="P24"/>
          </table:table-cell>
          <table:table-cell table:style-name="Tabla3.C4" office:value-type="string">
            <text:p text:style-name="P24"/>
          </table:table-cell>
        </table:table-row>
        <table:table-row table:style-name="Tabla3.1">
          <table:table-cell table:style-name="Tabla3.A5" office:value-type="string">
            <text:p text:style-name="P24"/>
          </table:table-cell>
          <table:table-cell table:style-name="Tabla3.B5" office:value-type="string">
            <text:p text:style-name="P24"/>
          </table:table-cell>
          <table:table-cell table:style-name="Tabla3.C5" office:value-type="string">
            <text:p text:style-name="P24"/>
          </table:table-cell>
        </table:table-row>
        <table:table-row table:style-name="Tabla3.1">
          <table:table-cell table:style-name="Tabla3.A6" office:value-type="string">
            <text:p text:style-name="P24"/>
          </table:table-cell>
          <table:table-cell table:style-name="Tabla3.B6" office:value-type="string">
            <text:p text:style-name="P24"/>
          </table:table-cell>
          <table:table-cell table:style-name="Tabla3.C6" office:value-type="string">
            <text:p text:style-name="P24"/>
          </table:table-cell>
        </table:table-row>
      </table:table>
      <text:p text:style-name="P13"/>
      <text:p text:style-name="P1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4">Aprovat per</text:p>
          </table:table-cell>
          <table:covered-table-cell/>
          <table:covered-table-cell/>
        </table:table-row>
        <table:table-row table:style-name="Tabla4.1">
          <table:table-cell table:style-name="Tabla4.A2" office:value-type="string">
            <text:p text:style-name="P15">Nom</text:p>
          </table:table-cell>
          <table:table-cell table:style-name="Tabla4.B2" office:value-type="string">
            <text:p text:style-name="P16">Data</text:p>
          </table:table-cell>
          <table:table-cell table:style-name="Tabla4.C2" office:value-type="string">
            <text:p text:style-name="P16">Àrea, departament o empresa</text:p>
          </table:table-cell>
        </table:table-row>
        <table:table-row table:style-name="Tabla4.1">
          <table:table-cell table:style-name="Tabla4.A3" office:value-type="string">
            <text:p text:style-name="P17"/>
          </table:table-cell>
          <table:table-cell table:style-name="Tabla4.B3" office:value-type="string">
            <text:p text:style-name="P17"/>
          </table:table-cell>
          <table:table-cell table:style-name="Tabla4.C3" office:value-type="string">
            <text:p text:style-name="P17"/>
          </table:table-cell>
        </table:table-row>
        <table:table-row table:style-name="Tabla4.1">
          <table:table-cell table:style-name="Tabla4.A4" office:value-type="string">
            <text:p text:style-name="P24"/>
          </table:table-cell>
          <table:table-cell table:style-name="Tabla4.B4" office:value-type="string">
            <text:p text:style-name="P24"/>
          </table:table-cell>
          <table:table-cell table:style-name="Tabla4.C4" office:value-type="string">
            <text:p text:style-name="P24"/>
          </table:table-cell>
        </table:table-row>
        <table:table-row table:style-name="Tabla4.1">
          <table:table-cell table:style-name="Tabla4.A5" office:value-type="string">
            <text:p text:style-name="P24"/>
          </table:table-cell>
          <table:table-cell table:style-name="Tabla4.B5" office:value-type="string">
            <text:p text:style-name="P24"/>
          </table:table-cell>
          <table:table-cell table:style-name="Tabla4.C5" office:value-type="string">
            <text:p text:style-name="P24"/>
          </table:table-cell>
        </table:table-row>
        <table:table-row table:style-name="Tabla4.1">
          <table:table-cell table:style-name="Tabla4.A6" office:value-type="string">
            <text:p text:style-name="P24"/>
          </table:table-cell>
          <table:table-cell table:style-name="Tabla4.B6" office:value-type="string">
            <text:p text:style-name="P24"/>
          </table:table-cell>
          <table:table-cell table:style-name="Tabla4.C6" office:value-type="string">
            <text:p text:style-name="P24"/>
          </table:table-cell>
        </table:table-row>
      </table:table>
      <text:p text:style-name="P13"/>
      <text:p text:style-name="P13"/>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4">Llista de distribució</text:p>
          </table:table-cell>
          <table:covered-table-cell/>
          <table:covered-table-cell/>
        </table:table-row>
        <table:table-row table:style-name="Tabla5.1">
          <table:table-cell table:style-name="Tabla5.A2" office:value-type="string">
            <text:p text:style-name="P15">Nom</text:p>
          </table:table-cell>
          <table:table-cell table:style-name="Tabla5.B2" office:value-type="string">
            <text:p text:style-name="P16">Àrea, departament o empresa</text:p>
          </table:table-cell>
          <table:table-cell table:style-name="Tabla5.C2" office:value-type="string">
            <text:p text:style-name="P16">Correu electrònic</text:p>
          </table:table-cell>
        </table:table-row>
        <table:table-row table:style-name="Tabla5.1">
          <table:table-cell table:style-name="Tabla5.A3" office:value-type="string">
            <text:p text:style-name="P17"/>
          </table:table-cell>
          <table:table-cell table:style-name="Tabla5.B3" office:value-type="string">
            <text:p text:style-name="P17"/>
          </table:table-cell>
          <table:table-cell table:style-name="Tabla5.C3" office:value-type="string">
            <text:p text:style-name="P17"/>
          </table:table-cell>
        </table:table-row>
        <table:table-row table:style-name="Tabla5.1">
          <table:table-cell table:style-name="Tabla5.A4" office:value-type="string">
            <text:p text:style-name="P24"/>
          </table:table-cell>
          <table:table-cell table:style-name="Tabla5.B4" office:value-type="string">
            <text:p text:style-name="P24"/>
          </table:table-cell>
          <table:table-cell table:style-name="Tabla5.C4" office:value-type="string">
            <text:p text:style-name="P24"/>
          </table:table-cell>
        </table:table-row>
      </table:table>
      <text:p text:style-name="P25"/>
      <text:p text:style-name="P26"/>
      <text:p text:style-name="P27"/>
      <text:p text:style-name="P28"/>
      <text:p text:style-name="P28"/>
      <text:p text:style-name="P28"/>
      <text:p text:style-name="P28"/>
      <text:p text:style-name="P28"/>
      <text:p text:style-name="P28"/>
      <text:p text:style-name="P28"><text:soft-page-break/></text:p>
      <text:p text:style-name="P28">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9"><text:a xlink:type="simple" xlink:href="#__RefHeading___Toc1440_1726870378" text:style-name="Index_20_Link" text:visited-style-name="Index_20_Link">Control de versions del document<text:tab/>2</text:a></text:p>
          <text:p text:style-name="P29"><text:a xlink:type="simple" xlink:href="#__RefHeading___Toc32799_3233606579" text:style-name="Index_20_Link" text:visited-style-name="Index_20_Link"><text:s/>1 <text:s/>Introducció<text:tab/>3</text:a></text:p>
          <text:p text:style-name="P29"><text:a xlink:type="simple" xlink:href="#__RefHeading___Toc32803_3233606579" text:style-name="Index_20_Link" text:visited-style-name="Index_20_Link"><text:s/>2 <text:s/>Administrador<text:tab/>6</text:a></text:p>
          <text:p text:style-name="P30"><text:a xlink:type="simple" xlink:href="#__RefHeading___Toc2417_1085490558" text:style-name="Index_20_Link" text:visited-style-name="Index_20_Link">2.1. Configurar<text:tab/>6</text:a></text:p>
          <text:p text:style-name="P30"><text:a xlink:type="simple" xlink:href="#__RefHeading___Toc9027_678410495" text:style-name="Index_20_Link" text:visited-style-name="Index_20_Link">2.2. Configuració de bústies<text:tab/>6</text:a></text:p>
          <text:p text:style-name="P30"><text:a xlink:type="simple" xlink:href="#__RefHeading___Toc2423_1085490558" text:style-name="Index_20_Link" text:visited-style-name="Index_20_Link">2.3. Configuració d'unitats organitzatives<text:tab/>11</text:a></text:p>
          <text:p text:style-name="P30"><text:a xlink:type="simple" xlink:href="#__RefHeading___Toc2431_1085490558" text:style-name="Index_20_Link" text:visited-style-name="Index_20_Link">2.4. Configurar regles<text:tab/>13</text:a></text:p>
          <text:p text:style-name="P31"><text:a xlink:type="simple" xlink:href="#__RefHeading___Toc2433_1085490558" text:style-name="Index_20_Link" text:visited-style-name="Index_20_Link">2.4.1. Camps creació de nova regla<text:tab/>15</text:a></text:p>
          <text:p text:style-name="P31"><text:a xlink:type="simple" xlink:href="#__RefHeading___Toc78145_3965979134" text:style-name="Index_20_Link" text:visited-style-name="Index_20_Link">2.4.2. Camps del llistat de regles<text:tab/>16</text:a></text:p>
          <text:p text:style-name="P31"><text:a xlink:type="simple" xlink:href="#__RefHeading___Toc78147_3965979134" text:style-name="Index_20_Link" text:visited-style-name="Index_20_Link">2.4.3. Simulador de regles<text:tab/>17</text:a></text:p>
          <text:p text:style-name="P30"><text:a xlink:type="simple" xlink:href="#__RefHeading___Toc245158_3767406981" text:style-name="Index_20_Link" text:visited-style-name="Index_20_Link">2.5. Configurar Backoffice<text:tab/>18</text:a></text:p>
          <text:p text:style-name="P31"><text:a xlink:type="simple" xlink:href="#__RefHeading___Toc613630_3453696013" text:style-name="Index_20_Link" text:visited-style-name="Index_20_Link">2.5.1. Comunicació d’anotacions amb els backoffices<text:tab/>20</text:a></text:p>
          <text:p text:style-name="P30"><text:a xlink:type="simple" xlink:href="#__RefHeading___Toc2435_1085490558" text:style-name="Index_20_Link" text:visited-style-name="Index_20_Link">2.6. Configurar permisos de l'entitat<text:tab/>21</text:a></text:p>
          <text:p text:style-name="P30"><text:a xlink:type="simple" xlink:href="#__RefHeading___Toc2437_1085490558" text:style-name="Index_20_Link" text:visited-style-name="Index_20_Link">2.7. Consultar<text:tab/>22</text:a></text:p>
          <text:p text:style-name="P30"><text:a xlink:type="simple" xlink:href="#__RefHeading___Toc2439_1085490558" text:style-name="Index_20_Link" text:visited-style-name="Index_20_Link">2.8. Consultar continguts<text:tab/>22</text:a></text:p>
          <text:p text:style-name="P31"><text:a xlink:type="simple" xlink:href="#__RefHeading___Toc2441_10854905581" text:style-name="Index_20_Link" text:visited-style-name="Index_20_Link">2.8.1. Filtres<text:tab/>22</text:a></text:p>
          <text:p text:style-name="P31"><text:a xlink:type="simple" xlink:href="#__RefHeading___Toc2443_1085490558" text:style-name="Index_20_Link" text:visited-style-name="Index_20_Link">2.8.2. Llistat<text:tab/>23</text:a></text:p>
          <text:p text:style-name="P31"><text:a xlink:type="simple" xlink:href="#__RefHeading___Toc2445_1085490558" text:style-name="Index_20_Link" text:visited-style-name="Index_20_Link">2.8.3. Accions<text:tab/>23</text:a></text:p>
          <text:p text:style-name="P30"><text:a xlink:type="simple" xlink:href="#__RefHeading___Toc2447_1085490558" text:style-name="Index_20_Link" text:visited-style-name="Index_20_Link">2.9. Consultar anotacions de registre<text:tab/>24</text:a></text:p>
          <text:p text:style-name="P31"><text:a xlink:type="simple" xlink:href="#__RefHeading___Toc2449_1085490558" text:style-name="Index_20_Link" text:visited-style-name="Index_20_Link">2.9.1. Filtres<text:tab/>25</text:a></text:p>
          <text:p text:style-name="P31"><text:a xlink:type="simple" xlink:href="#__RefHeading___Toc2451_1085490558" text:style-name="Index_20_Link" text:visited-style-name="Index_20_Link">2.9.2. Llistat<text:tab/>26</text:a></text:p>
          <text:p text:style-name="P30"><text:a xlink:type="simple" xlink:href="#__RefHeading___Toc2447_10854905581" text:style-name="Index_20_Link" text:visited-style-name="Index_20_Link">2.10. Consultar anotacions de registre<text:tab/>26</text:a></text:p>
          <text:p text:style-name="P29"><text:a xlink:type="simple" xlink:href="#__RefHeading___Toc2775_1726870378" text:style-name="Index_20_Link" text:visited-style-name="Index_20_Link"><text:s/>3 <text:s/>Superusuari<text:tab/>30</text:a></text:p>
          <text:p text:style-name="P30"><text:a xlink:type="simple" xlink:href="#__RefHeading___Toc2399_1085490558" text:style-name="Index_20_Link" text:visited-style-name="Index_20_Link">3.1. Entitats<text:tab/>30</text:a></text:p>
          <text:p text:style-name="P31"><text:a xlink:type="simple" xlink:href="#__RefHeading___Toc2401_1085490558" text:style-name="Index_20_Link" text:visited-style-name="Index_20_Link">3.1.1. Llistat entitats<text:tab/>31</text:a></text:p>
          <text:p text:style-name="P31"><text:a xlink:type="simple" xlink:href="#__RefHeading___Toc2403_1085490558" text:style-name="Index_20_Link" text:visited-style-name="Index_20_Link">3.1.2. Nova entitat<text:tab/>31</text:a></text:p>
          <text:p text:style-name="P31"><text:a xlink:type="simple" xlink:href="#__RefHeading___Toc2405_1085490558" text:style-name="Index_20_Link" text:visited-style-name="Index_20_Link">3.1.3. Gestió de permisos<text:tab/>32</text:a></text:p>
          <text:p text:style-name="P31"><text:a xlink:type="simple" xlink:href="#__RefHeading___Toc2407_1085490558" text:style-name="Index_20_Link" text:visited-style-name="Index_20_Link">3.1.4. Accions (Permisos)<text:tab/>34</text:a></text:p>
          <text:p text:style-name="P31"><text:a xlink:type="simple" xlink:href="#__RefHeading___Toc2409_1085490558" text:style-name="Index_20_Link" text:visited-style-name="Index_20_Link">3.1.5. Accions (Entitats)<text:tab/>34</text:a></text:p>
          <text:p text:style-name="P30"><text:a xlink:type="simple" xlink:href="#__RefHeading___Toc2411_1085490558" text:style-name="Index_20_Link" text:visited-style-name="Index_20_Link">3.2. Monitoritzar<text:tab/>35</text:a></text:p>
          <text:p text:style-name="P31"><text:a xlink:type="simple" xlink:href="#__RefHeading___Toc2413_1085490558" text:style-name="Index_20_Link" text:visited-style-name="Index_20_Link">3.2.1. Monitorar integracions<text:tab/>35</text:a></text:p>
          <text:p text:style-name="P31"><text:a xlink:type="simple" xlink:href="#__RefHeading___Toc2415_1085490558" text:style-name="Index_20_Link" text:visited-style-name="Index_20_Link">3.2.2. Monitorar excepcions<text:tab/>36</text:a></text:p>
          <text:p text:style-name="P31"><text:a xlink:type="simple" xlink:href="#__RefHeading___Toc37404_3531032951" text:style-name="Index_20_Link" text:visited-style-name="Index_20_Link">3.2.3. Mètriques<text:tab/>37</text:a></text:p>
          <text:p text:style-name="P31"><text:a xlink:type="simple" xlink:href="#__RefHeading___Toc258224_83721363" text:style-name="Index_20_Link" text:visited-style-name="Index_20_Link">3.2.4. Monitor anotacions pendents d'Arxiu<text:tab/>38</text:a></text:p>
          <text:p text:style-name="P31"><text:a xlink:type="simple" xlink:href="#__RefHeading___Toc258224_837213631" text:style-name="Index_20_Link" text:visited-style-name="Index_20_Link">4.1.2.5. Monitor de sistema<text:tab/>39</text:a></text:p>
          <text:p text:style-name="P30"><text:a xlink:type="simple" xlink:href="#__RefHeading___Toc37406_35310329511" text:style-name="Index_20_Link" text:visited-style-name="Index_20_Link">3.3. Configuració<text:tab/>40</text:a></text:p>
          <text:p text:style-name="P31"><text:a xlink:type="simple" xlink:href="#__RefHeading___Toc258224_8372136311%20Copia%201" text:style-name="Index_20_Link" text:visited-style-name="Index_20_Link">3.3.1. Propietats de configuració<text:tab/>40</text:a></text:p>
          <text:p text:style-name="P30"><text:a xlink:type="simple" xlink:href="#__RefHeading___Toc37406_3531032951" text:style-name="Index_20_Link" text:visited-style-name="Index_20_Link">3.4. Avisos<text:tab/>41</text:a></text:p>
        </text:index-body>
      </text:table-of-content>
      <text:h text:style-name="Heading_20_1" text:outline-level="1"><text:bookmark-start text:name="__RefHeading___Toc32799_3233606579"/>Introducció<text:bookmark-end text:name="__RefHeading___Toc32799_3233606579"/></text:h>
      <text:p text:style-name="P32"/>
      <text:p text:style-name="P33"><text:span text:style-name="T13">L'aplicació de DISTRIBUCIO s'encarrega de rebre altes d'anotacions de registre via WS. </text:span><text:span text:style-name="T14">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5">backoffice </text:span><text:span text:style-name="T16">de DISTRIBUCIO.</text:span></text:p>
      <text:p text:style-name="P34"/>
      <text:p text:style-name="P34"><draw:frame draw:style-name="fr1" draw:name="Frame1" text:anchor-type="paragraph" svg:width="13.404cm" draw:z-index="52"><draw:text-box fo:min-height="3.048cm"><text:p text:style-name="fig."><draw:frame draw:style-name="fr2" draw:name="Image3" text:anchor-type="as-char" svg:width="13.404cm" style:rel-width="100%" svg:height="3.048cm" style:rel-height="scale" draw:z-index="154"><draw:image xlink:href="Pictures/10000000000002750000008FD442AA45.png" xlink:type="simple" xlink:show="embed" xlink:actuate="onLoad" draw:mime-type="image/png"/></draw:frame><text:span text:style-name="T17"><text:line-break/></text:span>fig. <text:sequence text:ref-name="reffig.0" text:name="fig." text:formula="ooow:fig.+1" style:num-format="1">1</text:sequence>: Logotip en la capçalera de l'aplicació de DISTRIBUCIO.</text:p></draw:text-box></draw:frame><text:soft-page-break/></text:p>
      <text:p text:style-name="P35">La interfície web de l'aplicació de DISTRIBUCIÓ permet l'accés a un usuari identificat i l'usuari pot ser de 3 tipus:</text:p>
      <text:p text:style-name="P36"/>
      <text:p text:style-name="P37"><text:span text:style-name="T18"><text:tab/>1. </text:span><text:a xlink:type="simple" xlink:href="#2.Usuari|outline" text:style-name="Internet_20_link" text:visited-style-name="Visited_20_Internet_20_Link"><text:span text:style-name="T18">Usuari</text:span></text:a><text:span text:style-name="T19">: Són els usuaris que poden gestionar anotacions de DISTRIBUCIO per a les bústies sobre les quals tinguin permís d'accés per a una entitat específica. El rol que ha de tenir l'usuari per accedir com a tipus usuari és DIS_USER. </text:span></text:p>
      <text:p text:style-name="P36"><text:tab/>2. <text:a xlink:type="simple" xlink:href="#3.Administrador|outline" text:style-name="Internet_20_link" text:visited-style-name="Visited_20_Internet_20_Link">Administrador</text:a><text:span text:style-name="T20">: Els usuaris de tipus administrador d'entitat pot gestionar bústies i permisos per a usuaris d'aquestes bústies per a les diferents unitats organitzatives que depenen de l'entitat arrel de l'entorn. El rol que ha de t</text:span><text:span text:style-name="T21">enir un usuari administrador per poder administrar entitats és DIS_ADMIN i ha de tenir permís d'administrador sobre l'entitat.</text:span></text:p>
      <text:p text:style-name="P38"><text:span text:style-name="T22"><text:tab/>3. </text:span><text:a xlink:type="simple" xlink:href="#4.Superusuari|outline" text:style-name="Internet_20_link" text:visited-style-name="Visited_20_Internet_20_Link"><text:span text:style-name="T21">Superusuari</text:span></text:a><text:span text:style-name="T21">: Els usuaris de tipus Superusuari poden definir entitats arrels i accedir a paràmetres i monitoratge de DISTRIBUCIO a nivell general. Per a que un usuari pugui actuar com a Superusuari ha de tenir el rol assignat de DIS_SUPER.</text:span></text:p>
      <text:p text:style-name="P39"><draw:frame draw:style-name="fr3" draw:name="Image5" text:anchor-type="paragraph" svg:x="14.418cm" svg:y="0.33cm" svg:width="0.688cm" svg:height="0.609cm" draw:z-index="61"><draw:image xlink:href="Pictures/100000000000001A0000001764E3CB42.png" xlink:type="simple" xlink:show="embed" xlink:actuate="onLoad" draw:mime-type="image/png"/></draw:frame></text:p>
      <text:p text:style-name="P40">Si un usuari té permís d'accés a més d'una entitat la pot escollir des del desplegable de la capçalera.</text:p>
      <text:p text:style-name="P40"/>
      <text:p text:style-name="P40"><draw:frame draw:style-name="fr1" draw:name="Frame2" text:anchor-type="paragraph" svg:width="12.885cm" draw:z-index="62"><draw:text-box fo:min-height="2.514cm"><text:p text:style-name="fig."><draw:frame draw:style-name="fr2" draw:name="Image6" text:anchor-type="as-char" svg:width="12.885cm" style:rel-width="100%" svg:height="2.514cm" style:rel-height="scale" draw:z-index="155"><draw:image xlink:href="Pictures/10000000000001E70000005F3D868FE3.png" xlink:type="simple" xlink:show="embed" xlink:actuate="onLoad" draw:mime-type="image/png"/></draw:frame><text:span text:style-name="T17"><text:line-break/></text:span>fig. <text:sequence text:ref-name="reffig.1" text:name="fig." text:formula="ooow:fig.+1" style:num-format="1">2</text:sequence>: Opció desplegable per seleccionar l'enitat amb què treballar.</text:p></draw:text-box></draw:frame></text:p>
      <text:p text:style-name="P40"/>
      <text:p text:style-name="P40"/>
      <text:p text:style-name="P40"/>
      <text:p text:style-name="P40"/>
      <text:p text:style-name="P40"/>
      <text:p text:style-name="P40"/>
      <text:p text:style-name="P40"><draw:frame draw:style-name="fr4" draw:name="Image7" text:anchor-type="paragraph" svg:x="2.021cm" svg:y="0.459cm" svg:width="0.635cm" svg:height="0.503cm" draw:z-index="63"><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40"/>
      <text:p text:style-name="P40"><draw:frame draw:style-name="fr1" draw:name="Frame3" text:anchor-type="paragraph" svg:width="10.689cm" draw:z-index="65"><draw:text-box fo:min-height="2.672cm"><text:p text:style-name="fig."><draw:frame draw:style-name="fr2" draw:name="Image8" text:anchor-type="as-char" svg:width="10.689cm" style:rel-width="100%" svg:height="2.672cm" style:rel-height="scale" draw:z-index="157"><draw:image xlink:href="Pictures/10000000000001940000006567358005.png" xlink:type="simple" xlink:show="embed" xlink:actuate="onLoad" draw:mime-type="image/png"/></draw:frame><text:span text:style-name="T17"><text:line-break/></text:span>fig. <text:sequence text:ref-name="reffig.2" text:name="fig." text:formula="ooow:fig.+1" style:num-format="1">3</text:sequence>: Opció desplegable per seleccionar el tipus d'usuari amb què fer feina.</text:p></draw:text-box></draw:frame></text:p>
      <text:p text:style-name="P40"><text:soft-page-break/></text:p>
      <text:p text:style-name="P41"><draw:frame draw:style-name="fr5" draw:name="Image10" text:anchor-type="paragraph" svg:x="3.122cm" svg:y="0.471cm" svg:width="0.556cm" svg:height="0.609cm" draw:z-index="66"><draw:image xlink:href="Pictures/1000000000000015000000172198EC24.png" xlink:type="simple" xlink:show="embed" xlink:actuate="onLoad" draw:mime-type="image/png"/></draw:frame><text:span text:style-name="T23">Segons el tipus d'usuari seleccionat l'usuari tindrà accés a diferents opcions i pantalle</text:span><text:span text:style-name="T24">s</text:span><text:span text:style-name="T23"> que es descriuen en els següents apartats.</text:span><text:span text:style-name="T24"> </text:span></text:p>
      <text:p text:style-name="P42"/>
      <text:p text:style-name="P43"/>
      <text:h text:style-name="P44" text:outline-level="1"><text:bookmark-start text:name="__RefHeading___Toc32803_3233606579"/>Administrador<text:bookmark-end text:name="__RefHeading___Toc32803_3233606579"/></text:h>
      <text:p text:style-name="P45">Quan l'usuari escull el tipus d'usuari Administrador apareixen un seguit d'opcions per administrar l'entitat seleccionada sobre la qual té permís d'administració. <text:s/>Les diferents opcions són:</text:p>
      <text:list text:style-name="L1">
        <text:list-item>
          <text:p text:style-name="P46">Configurar</text:p>
          <text:list>
            <text:list-item>
              <text:p text:style-name="P46">Bústies</text:p>
            </text:list-item>
            <text:list-item>
              <text:p text:style-name="P46">Unitats Oranitzatives</text:p>
            </text:list-item>
            <text:list-item>
              <text:p text:style-name="P46">Regles</text:p>
            </text:list-item>
            <text:list-item>
              <text:p text:style-name="P46">Permisos de l'entitat</text:p>
            </text:list-item>
          </text:list>
        </text:list-item>
        <text:list-item>
          <text:p text:style-name="P46">Consultar</text:p>
          <text:list>
            <text:list-item>
              <text:p text:style-name="P46">Continguts</text:p>
            </text:list-item>
            <text:list-item>
              <text:p text:style-name="P46">Anotacions de registre</text:p>
            </text:list-item>
          </text:list>
        </text:list-item>
      </text:list>
      <text:p text:style-name="P45">En els propers subapartats es detallen les diferents opcions del menú.</text:p>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2417_1085490558"/>Configurar<text:bookmark-end text:name="__RefHeading___Toc2417_1085490558"/></text:h>
      <text:p text:style-name="P47">Si polsem el boto de configurar s'ens desplegaran cinc opcions més:</text:p>
      <text:p text:style-name="P47"><draw:frame draw:style-name="fr6" draw:name="Frame44" text:anchor-type="as-char" svg:width="8.493cm" draw:z-index="82"><draw:text-box fo:min-height="6.138cm"><text:p text:style-name="fig."><draw:frame draw:style-name="fr7" draw:name="Imagen34" text:anchor-type="paragraph" svg:width="8.493cm" style:rel-width="100%" svg:height="6.138cm" style:rel-height="scale" draw:z-index="83"><draw:image xlink:href="Pictures/1000000000000141000000E8FFB2FA52.png" xlink:type="simple" xlink:show="embed" xlink:actuate="onLoad" draw:mime-type="image/png"/></draw:frame>fig. <text:sequence text:ref-name="reffig.3" text:name="fig." text:formula="ooow:fig.+1" style:num-format="1">4</text:sequence>: Detall del botó de configurar amb les seves opcions. </text:p></draw:text-box></draw:frame></text:p>
      <text:p text:style-name="P48">A partir d'aquestes opcions accedirem a les distintes configuracions.</text:p>
      <text:h text:style-name="Heading_20_2" text:outline-level="2"><text:bookmark-start text:name="__RefHeading___Toc9027_678410495"/>Configuració de bústies<text:bookmark-end text:name="__RefHeading___Toc9027_678410495"/></text:h>
      <text:p text:style-name="P49"><text:span text:style-name="T25">Quan se selecciona la opció del menú "Configurar &gt; Bústies" s'accedeix a la configuració de les bústies </text:span>amb un filtre superior per facilitar-ne la cerca:</text:p>
      <text:p text:style-name="P50"><draw:frame draw:style-name="fr8" draw:name="Image39" text:anchor-type="paragraph" svg:width="17cm" svg:height="3.286cm" draw:z-index="67"><draw:image xlink:href="Pictures/10000000000004F2000001CE718C8F1F.png" xlink:type="simple" xlink:show="embed" xlink:actuate="onLoad" draw:mime-type="image/png"/></draw:frame><text:soft-page-break/></text:p>
      <text:p text:style-name="P50">Podrem filtrar per el nom de la bústia,<text:span text:style-name="T26"> per codi d'unitat organitzativa superior o </text:span>per la unitat organitzativa<text:span text:style-name="T26">. També es poden filtrar per </text:span>si està pendent de gestionar<text:span text:style-name="T26">, si és una bústia per defecte i per si està activa</text:span>.<text:span text:style-name="T26"> </text:span>El filtre tindrà una opció per netejar-lo, i fer que surtin tots els registres sens filtre.</text:p>
      <text:p text:style-name="P51">Amb el botó <draw:frame draw:style-name="fr9" draw:name="Image41" text:anchor-type="as-char" svg:y="-0.466cm" svg:width="1.522cm" svg:height="0.651cm" draw:z-index="159"><draw:image xlink:href="Pictures/100000000000005900000026A8ADC43B.png" xlink:type="simple" xlink:show="embed" xlink:actuate="onLoad" draw:mime-type="image/png"/></draw:frame><text:span text:style-name="T27"><text:s/>és possible descarregar una fulla XLS amb el lllistat d'usuaris per bústia.</text:span></text:p>
      <text:p text:style-name="P52">El resultat és<text:span text:style-name="T28"> organigrama de bústes o </text:span><text:s/>un llistat de bústies o un arbre segons el tipus de vista escollit. Es pot alternar entre llistat i arbre amb el botó "Canvi vista"<text:span text:style-name="T28"> </text:span><text:span text:style-name="T28"><draw:frame draw:style-name="fr10" draw:name="Image45" text:anchor-type="as-char" svg:y="-0.353cm" svg:width="1.773cm" svg:height="0.748cm" draw:z-index="161"><draw:image xlink:href="Pictures/100000000000005A00000026F8B00DC6.png" xlink:type="simple" xlink:show="embed" xlink:actuate="onLoad" draw:mime-type="image/png"/></draw:frame></text:span>.<text:span text:style-name="T28"> Tant l'organigrama de bústies en forma d'arbre permetes les mateixes accions però presentades de forma diferent. </text:span></text:p>
      <text:p text:style-name="P53">Aquesta pantalla tindrà també un botó de creació de busties <draw:frame draw:style-name="fr10" draw:name="Image44" text:anchor-type="as-char" svg:y="-0.58cm" svg:width="2.053cm" svg:height="0.642cm" draw:z-index="162"><draw:image xlink:href="Pictures/100000000000007000000023DE0D7229.png" xlink:type="simple" xlink:show="embed" xlink:actuate="onLoad" draw:mime-type="image/png"/></draw:frame>el qual si el polsem s'ens obrira una modal amb un formulari que si omplim correctament podrem crear una nova bústia.</text:p>
      <text:p text:style-name="P53"/>
      <text:p text:style-name="P52"/>
      <text:p text:style-name="P50"><draw:frame draw:style-name="fr11" draw:name="Imagen36" text:anchor-type="paragraph" svg:width="17cm" svg:height="5.138cm" draw:z-index="53"><draw:image xlink:href="Pictures/10000000000003A50000011A191EDCE7.png" xlink:type="simple" xlink:show="embed" xlink:actuate="onLoad" draw:mime-type="image/png"/></draw:frame>Els camps seran: </text:p>
      <text:list text:style-name="L2">
        <text:list-item>
          <text:p text:style-name="P54">Unitat organitzativa: <text:span text:style-name="T29">Que la seleccionarem cercant 3 caràcters en el component i triant la unitat organitzativa.</text:span><text:span text:style-name="T30"> Si la unitat organitzativa està obsoleta estarà marcada amb un senyal d'advertència.</text:span></text:p>
        </text:list-item>
      </text:list>
      <text:p text:style-name="P55"><draw:frame draw:style-name="fr12" draw:name="Image40" text:anchor-type="paragraph" svg:width="17cm" svg:height="7.498cm" draw:z-index="68"><draw:image xlink:href="Pictures/100000000000031E00000160EE59E714.png" xlink:type="simple" xlink:show="embed" xlink:actuate="onLoad" draw:mime-type="image/png"/></draw:frame><text:soft-page-break/></text:p>
      <text:list text:continue-numbering="true" text:style-name="L2">
        <text:list-item>
          <text:p text:style-name="P54">Nom: <text:span text:style-name="T29">Aquí haurem de posar el nom que volem per la bústia.</text:span></text:p>
        </text:list-item>
      </text:list>
      <text:p text:style-name="P56">A continuació del botó de creació tindrem el llistat, el qual al mateix temps que el filtre, podrem ordenar ascendent-ment i descendent-ment els registres amb les capçaleres de les columnes del llistat depenent del camp triat.</text:p>
      <text:p text:style-name="P56"><draw:frame draw:style-name="fr13" draw:name="Imagen38" text:anchor-type="paragraph" svg:width="17cm" svg:height="1.053cm" draw:z-index="54"><draw:image xlink:href="Pictures/1000000000000387000000381DF5DF64.png" xlink:type="simple" xlink:show="embed" xlink:actuate="onLoad" draw:mime-type="image/png"/></draw:frame>Tot seguit aquests camps tindrem dos botons més per cada registre:</text:p>
      <text:p text:style-name="P57"><draw:frame draw:style-name="fr14" draw:name="Imagen39" text:anchor-type="paragraph" svg:width="6.694cm" svg:height="1.508cm" draw:z-index="55"><draw:image xlink:href="Pictures/10000000000000FD00000039762F8AFE.png" xlink:type="simple" xlink:show="embed" xlink:actuate="onLoad" draw:mime-type="image/png"/></draw:frame>Les accions que es poden realitzar sobre les bústies són les següents:</text:p>
      <text:p text:style-name="P57"><draw:frame draw:style-name="fr15" draw:name="Imagen52" text:anchor-type="paragraph" svg:width="8.414cm" svg:height="4.895cm" draw:z-index="60"><draw:image xlink:href="Pictures/100000000000013E000000B9CD63DA2E.png" xlink:type="simple" xlink:show="embed" xlink:actuate="onLoad" draw:mime-type="image/png"/></draw:frame></text:p>
      <text:list text:style-name="L3">
        <text:list-item>
          <text:p text:style-name="P58">Modificar: <text:span text:style-name="T29">Permet canviar la unitat organitzativa i el nom de la bústia.</text:span><text:span text:style-name="T31"> Dins de la modal de modificació de la bústia és possible consultar en una taula els diferents usuaris que hi tenen accés i si hi tenen accés per permís directe de l'usuari o per algun rol assignat.</text:span></text:p>
        </text:list-item>
        <text:list-item>
          <text:p text:style-name="P58"><draw:frame draw:style-name="fr16" draw:name="Frame15" text:anchor-type="paragraph" svg:width="16.365cm" draw:z-index="69"><draw:text-box fo:min-height="8.396cm"><text:p text:style-name="fig."><draw:frame draw:style-name="fr2" draw:name="Image42" text:anchor-type="as-char" svg:width="16.263cm" style:rel-width="100%" svg:height="8.343cm" style:rel-height="scale" draw:z-index="160"><draw:image xlink:href="Pictures/100000000000031F0000019A901F02EC.png" xlink:type="simple" xlink:show="embed" xlink:actuate="onLoad" draw:mime-type="image/png"/></draw:frame><text:span text:style-name="T17"><text:line-break/></text:span>fig. <text:sequence text:ref-name="reffig.4" text:name="fig." text:formula="ooow:fig.+1" style:num-format="1">5</text:sequence>: Modal per modificar una bústia amb el llistat d'usuari que hi tenen accés.</text:p></draw:text-box></draw:frame><text:soft-page-break/>Marcar per defecte:<text:span text:style-name="T29"> La bústia es marcarà per defecte en la seva unitat organitzativa.</text:span></text:p>
        </text:list-item>
        <text:list-item>
          <text:p text:style-name="P58">Desactivar:<text:span text:style-name="T29"> Desactiva la bústia i ja no se li podran enviar anotacions de registre. Tampoc es veurà per defecte el seu contingut en la vista per l'usuari.</text:span></text:p>
        </text:list-item>
        <text:list-item>
          <text:p text:style-name="P58">Moure anotacions:<text:span text:style-name="T29"> Aquesta opció serveix per moure totes les anotacions de registre de la bústia. És útil quan s'han de reestructurar les bústies. Permet inserir un comentari en el moviment i s'enregistra el moviment en els logs.</text:span></text:p>
        </text:list-item>
        <text:list-item>
          <text:p text:style-name="P58">Esborrar<text:span text:style-name="T29">: Esborra la bústia.</text:span></text:p>
        </text:list-item>
      </text:list>
      <text:p text:style-name="P56"/>
      <text:p text:style-name="P59">Per gestionar els permisos d'una <text:span text:style-name="T32">bústia</text:span> haurem de polsar el bot<text:span text:style-name="T32">ó</text:span> amb el símbol de la clau assenyalat a la imatge anterior, el botó també ens mostrarà els permisos que té actualment.</text:p>
      <text:p text:style-name="P59">Una vegada polsat el botó apareixerà la següent pantalla amb les següents columnes, i un botó de creació de permisos: </text:p>
      <text:p text:style-name="P59"><draw:frame draw:style-name="fr11" draw:name="Imagen40" text:anchor-type="paragraph" svg:width="17cm" svg:height="5.461cm" draw:z-index="56"><draw:image xlink:href="Pictures/10000000000003720000010BF24E6EFA.png" xlink:type="simple" xlink:show="embed" xlink:actuate="onLoad" draw:mime-type="image/png"/></draw:frame></text:p>
      <text:list text:style-name="L4">
        <text:list-item>
          <text:p text:style-name="P60"><text:soft-page-break/>Tipus: <text:span text:style-name="T29">Es el tipus de permís que volem crear.</text:span></text:p>
        </text:list-item>
        <text:list-item>
          <text:p text:style-name="P61">Principal: <text:span text:style-name="T29">Es l'usuari pel qual va destinat el permís.</text:span></text:p>
        </text:list-item>
        <text:list-item>
          <text:p text:style-name="P61"><text:span text:style-name="T33">Descripció:</text:span><text:span text:style-name="T34"> La descripció de l’usuar</text:span><text:span text:style-name="T29">i pel qual va destinat el permís</text:span><text:span text:style-name="T34">.</text:span></text:p>
        </text:list-item>
        <text:list-item>
          <text:p text:style-name="P61"><text:span text:style-name="T33">Accés:</text:span><text:span text:style-name="T34"> El tipus d’accés que te l’usuari.</text:span></text:p>
        </text:list-item>
        <text:list-item>
          <text:p text:style-name="P62">Accions: <text:span text:style-name="T29">Els permisos tindran una serie de accions per interactuar amb ells.</text:span></text:p>
        </text:list-item>
      </text:list>
      <text:p text:style-name="P63">Aquests mateixos camps sortiran a la modal de creació de permisos:</text:p>
      <text:p text:style-name="P63"><draw:frame draw:style-name="fr11" draw:name="Imagen41" text:anchor-type="paragraph" svg:width="17cm" svg:height="5.948cm" draw:z-index="57"><draw:image xlink:href="Pictures/100000000000038E000001243AEE8BCD.png" xlink:type="simple" xlink:show="embed" xlink:actuate="onLoad" draw:mime-type="image/png"/></draw:frame></text:p>
      <text:p text:style-name="P63">A la qual si els omplim correctament i polsem el botó de guardar li crearem el permís a <text:span text:style-name="T32">la bústia</text:span> corresponent.</text:p>
      <text:p text:style-name="P64">Les accions que es poden realitzar sobre els permisos són:</text:p>
      <text:list text:style-name="L5">
        <text:list-item>
          <text:p text:style-name="P65">Modificar: <text:s/><text:span text:style-name="T29">S'obrirà una modal en la qual podrem modificar tots els camps del permís.</text:span></text:p>
        </text:list-item>
        <text:list-item>
          <text:p text:style-name="P65">Esborrar: <text:span text:style-name="T29">S'obrira un panell de confirmació per saber si realment vols esborrar el permís.</text:span></text:p>
        </text:list-item>
      </text:list>
      <text:p text:style-name="P64">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64"><draw:frame draw:style-name="fr1" draw:name="Frame16" text:anchor-type="paragraph" svg:width="17cm" draw:z-index="70"><draw:text-box fo:min-height="9.31cm"><text:p text:style-name="fig."><draw:frame draw:style-name="fr2" draw:name="Image46" text:anchor-type="as-char" svg:width="17cm" style:rel-width="100%" svg:height="9.31cm" style:rel-height="scale" draw:z-index="158"><draw:image xlink:href="Pictures/100000000000066E000003358D070C06.png" xlink:type="simple" xlink:show="embed" xlink:actuate="onLoad" draw:mime-type="image/png"/></draw:frame><text:span text:style-name="T17"><text:line-break/></text:span>fig. <text:sequence text:ref-name="reffig.5" text:name="fig." text:formula="ooow:fig.+1" style:num-format="1">6</text:sequence>: Administració de bústies amb la vista d'arbre o organigrama.</text:p></draw:text-box></draw:frame><text:soft-page-break/></text:p>
      <text:h text:style-name="Heading_20_2" text:outline-level="2"><text:bookmark-start text:name="__RefHeading___Toc2423_1085490558"/>Configuració d'unitats organitzatives<text:bookmark-end text:name="__RefHeading___Toc2423_1085490558"/></text:h>
      <text:p text:style-name="P66"><text:span text:style-name="T35">L</text:span><text:span text:style-name="T36">a pantalla de configuració d'unitats organitzatives serveix per comprovar l'arbre actual </text:span><text:span text:style-name="T37">i les unitats organitzatives amb un filtre i un llistat o també permet visualitzar l'arbre d'unitats vigents i sincronitzar els canvis amb l'aplicació externa DIR3.</text:span></text:p>
      <text:p text:style-name="P67"><draw:frame draw:style-name="fr17" draw:name="Image43" text:anchor-type="paragraph" svg:width="17cm" svg:height="5.964cm" draw:z-index="71"><draw:image xlink:href="Pictures/10000000000004D8000001B38366D8E4.png" xlink:type="simple" xlink:show="embed" xlink:actuate="onLoad" draw:mime-type="image/png"/></draw:frame></text:p>
      <text:p text:style-name="P68"><text:span text:style-name="T37">E</text:span><text:span text:style-name="T38">l filtre permet filtrar les unitats organitzatives per codi DIR3, denominació, codi d'unitat superior o estat.</text:span></text:p>
      <text:p text:style-name="P69"><text:span text:style-name="T39">E</text:span><text:span text:style-name="T40">l</text:span><text:span text:style-name="T41"> llistat </text:span><text:span text:style-name="T39">c</text:span><text:span text:style-name="T40">onté </text:span><text:span text:style-name="T41">5 columnes amb possibilitat </text:span><text:span text:style-name="T39">d</text:span><text:span text:style-name="T40">'</text:span><text:span text:style-name="T41">ordenar ascendent i descendent</text:span><text:span text:style-name="T42"> per columna. Les columnes són les següents:</text:span></text:p>
      <text:list text:style-name="L6">
        <text:list-item>
          <text:p text:style-name="P70"><text:soft-page-break/>Codi.</text:p>
        </text:list-item>
        <text:list-item>
          <text:p text:style-name="P70">Denominació.</text:p>
        </text:list-item>
        <text:list-item>
          <text:p text:style-name="P71"><text:span text:style-name="T43">U</text:span><text:span text:style-name="T44">nitat pare: </text:span><text:span text:style-name="T45">Unitat organitzativa immediatament superior.</text:span></text:p>
        </text:list-item>
        <text:list-item>
          <text:p text:style-name="P71"><text:span text:style-name="T43">U</text:span><text:span text:style-name="T46">nitat arrel</text:span><text:span text:style-name="T47">:</text:span><text:span text:style-name="T48"> Unitat organitzativa de segon nivell.</text:span></text:p>
        </text:list-item>
        <text:list-item>
          <text:p text:style-name="P72">Estat.</text:p>
        </text:list-item>
      </text:list>
      <text:p text:style-name="P73"/>
      <text:p text:style-name="P74">A més, a la pantalla hi ha dos botons per mostrar un arbre amb les unitats organitzatives vigents i un altre per sincronitzar la informació dels canvis amb DIR3. El detall de les accions és el següent:</text:p>
      <text:list text:style-name="L7">
        <text:list-item>
          <text:p text:style-name="P75"><text:span text:style-name="T49">Mostrar arbre d'unitats vigents: </text:span><text:span text:style-name="T50">Aquest botó obrira una modal en la qual es mostraran totes les unitats organitzatives disponibles:</text:span></text:p>
        </text:list-item>
      </text:list>
      <text:p text:style-name="P76"><draw:frame draw:style-name="fr4" draw:name="Imagen45" text:anchor-type="paragraph" svg:x="0cm" svg:y="0.122cm" svg:width="17cm" svg:height="12.577cm" draw:z-index="88"><draw:image xlink:href="Pictures/100000000000038B0000029F35E8C63B.png" xlink:type="simple" xlink:show="embed" xlink:actuate="onLoad" draw:mime-type="image/png"/></draw:frame></text:p>
      <text:p text:style-name="P77">Aquesta modal contindrà tres botons que serviran per interactuar amb l'arbre.</text:p>
      <text:list text:style-name="L8">
        <text:list-item>
          <text:p text:style-name="P78"><text:span text:style-name="T49">Expandeix tots: </text:span><text:span text:style-name="T50">Expandira totes les unitats amb més unitats filles.</text:span></text:p>
        </text:list-item>
        <text:list-item>
          <text:p text:style-name="P79">Expandeix seleccionat: <text:span text:style-name="T29">Expandira, únicament, la unitat seleccionada.</text:span></text:p>
        </text:list-item>
        <text:list-item>
          <text:p text:style-name="P79"><text:soft-page-break/>Contreu tots: <text:span text:style-name="T29">Tancarà tot l'arbre com a l'inici.</text:span></text:p>
        </text:list-item>
      </text:list>
      <text:p text:style-name="P77"/>
      <text:list text:style-name="L9">
        <text:list-item>
          <text:p text:style-name="P80">Sincronitzar: <text:span text:style-name="T51">Aquest botó sincronitzara les unitats amb les dades del </text:span><text:span text:style-name="T52">DIR3. </text:span><text:span text:style-name="T53">Després ens mostrarà els canvis que es duran a terme si es polsa el boto de sincronitzar per aplicar els canvis.</text:span></text:p>
        </text:list-item>
      </text:list>
      <text:p text:style-name="P81"><text:tab/>Si hi ha canvis se’ns mostraran les possibles noves unitats i les substitucions que puguin existir. A més, tindrem dos botons: un per acceptar la sincronització (Sincronitzar) i altre per cancel·lar-la (Cancel·lar):</text:p>
      <text:p text:style-name="P82"><draw:frame draw:style-name="fr18" draw:name="Frame45" text:anchor-type="as-char" svg:y="0cm" svg:width="17cm" style:rel-width="scale" svg:height="8.094cm" style:rel-height="scale-min" draw:z-index="156"><draw:text-box><text:p text:style-name="fig.">fig. <text:sequence text:ref-name="reffig.6" text:name="fig." text:formula="ooow:fig.+1" style:num-format="1">7</text:sequence>: Modal on es veuen els canvis abans d’acceptar la sincronització. </text:p></draw:text-box></draw:frame></text:p>
      <text:p text:style-name="P83"/>
      <text:p text:style-name="P84">Si no es troben canvis apareixerà la següent pantalla:</text:p>
      <text:p text:style-name="P85"><draw:frame draw:style-name="fr19" draw:name="Imagen49" text:anchor-type="paragraph" svg:width="17cm" style:rel-width="scale" svg:height="4.722cm" style:rel-height="scale" draw:z-index="90"><draw:image xlink:href="Pictures/100000000000038B000000FC93CCC07A.png" xlink:type="simple" xlink:show="embed" xlink:actuate="onLoad" draw:mime-type="image/png"/></draw:frame></text:p>
      <text:p text:style-name="P86"><text:bookmark text:name="__RefHeading___Toc2425_1085490558"/></text:p>
      <text:h text:style-name="Heading_20_2" text:outline-level="2"><text:bookmark-start text:name="__RefHeading___Toc2431_1085490558"/>Configurar regles<text:bookmark-end text:name="__RefHeading___Toc2431_1085490558"/></text:h>
      <text:p text:style-name="P87"><text:span text:style-name="T54">U</text:span>na vegada <text:span text:style-name="T55">accedeixes</text:span> com administrador i selecciones la configuració de regles apareixerem a la pantalla següent:</text:p>
      <text:p text:style-name="P87"><draw:frame draw:style-name="fr20" draw:name="Frame46" text:anchor-type="paragraph" svg:width="17cm" draw:z-index="85"><draw:text-box fo:min-height="6.405cm"><text:p text:style-name="fig."><draw:frame draw:style-name="fr13" draw:name="Imatge7" text:anchor-type="char" svg:width="16.898cm" svg:height="5.588cm" draw:z-index="103"><draw:image xlink:href="Pictures/10000001000004F0000001A2BA957159.png" xlink:type="simple" xlink:show="embed" xlink:actuate="onLoad" draw:mime-type="image/png"/></draw:frame></text:p><text:p text:style-name="fig.">fig. <text:sequence text:ref-name="reffig.7" text:name="fig." text:formula="ooow:fig.+1" style:num-format="1">8</text:sequence>: Vista de l’apartat de regles amb el formulari de filtratge i el llistat.</text:p></draw:text-box></draw:frame><text:soft-page-break/></text:p>
      <text:p text:style-name="P88">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87">Com hi sol haver a tots els llistats hi ha un botó de creació de registres que ens obrira una modal de creació, en aquest cas, de regles:</text:p>
      <text:p text:style-name="P87"/>
      <text:p text:style-name="Standard"><draw:frame draw:style-name="fr21" draw:name="Frame47" text:anchor-type="paragraph" svg:x="0.515cm" svg:y="-0.286cm" svg:width="15.73cm" draw:z-index="86"><draw:text-box fo:min-height="13.594cm"><text:p text:style-name="fig."><draw:frame draw:style-name="fr22" draw:name="Imatge21" text:anchor-type="char" svg:width="15.628cm" svg:height="14.771cm" draw:z-index="104"><draw:image xlink:href="Pictures/100000010000026D0000024BD43D0242.png" xlink:type="simple" xlink:show="embed" xlink:actuate="onLoad" draw:mime-type="image/png"/></draw:frame></text:p><text:p text:style-name="fig.">fig. <text:sequence text:ref-name="reffig.8" text:name="fig." text:formula="ooow:fig.+1" style:num-format="1">9</text:sequence>: Formulari per crear una nova regla<text:span text:style-name="T56">.</text:span></text:p></draw:text-box></draw:frame><text:soft-page-break/></text:p>
      <text:h text:style-name="Heading_20_3" text:outline-level="3"><text:bookmark-start text:name="__RefHeading___Toc2433_1085490558"/>Camps creació de nova regla<text:bookmark-end text:name="__RefHeading___Toc2433_1085490558"/></text:h>
      <text:list text:style-name="L10">
        <text:list-item>
          <text:p text:style-name="P89">Dades comunes: </text:p>
          <text:list>
            <text:list-item>
              <text:p text:style-name="P90">Nom <text:span text:style-name="T57">(Obligatori)</text:span>: <text:span text:style-name="T58">Nom per la regla.</text:span></text:p>
            </text:list-item>
            <text:list-item>
              <text:p text:style-name="P90">Descripció: <text:span text:style-name="T58">Descripció de la regla.</text:span></text:p>
            </text:list-item>
          </text:list>
        </text:list-item>
        <text:list-item>
          <text:p text:style-name="P91">Camps per l'acció:</text:p>
          <text:list>
            <text:list-item>
              <text:p text:style-name="P92"><text:span text:style-name="Fuente_20_de_20_párrafo_20_predeter."><text:span text:style-name="T59">Tipus (Obligatori): </text:span></text:span>Desplegable per seleccionar el tipus de regla. Pot ser:</text:p>
              <text:list>
                <text:list-item>
                  <text:p text:style-name="P92">Posar a bústia: Mou l'anotació a la bústia especificada.</text:p>
                </text:list-item>
                <text:list-item>
                  <text:p text:style-name="P92">Gestionar amb backoffice: Envia l'anotació al backoffice de Distribucio.</text:p>
                </text:list-item>
                <text:list-item>
                  <text:p text:style-name="P92">Enviar a unitat organitzativa: Reenvia l'anotació a una altra unitat organitzativa.</text:p>
                </text:list-item>
              </text:list>
            </text:list-item>
          </text:list>
        </text:list-item>
        <text:list-item>
          <text:p text:style-name="P92"><text:soft-page-break/>Dades específiques per regles de tipus posar a bústia:</text:p>
          <text:list>
            <text:list-item>
              <text:p text:style-name="P92"><text:span text:style-name="Fuente_20_de_20_párrafo_20_predeter."><text:span text:style-name="T59">Bústia: </text:span></text:span>Desplegable per seleccionar la bústia on anirà destinada la nova regla.</text:p>
            </text:list-item>
          </text:list>
        </text:list-item>
        <text:list-item>
          <text:p text:style-name="P92">Dades específiques per regles de tipus gestionar amb backoffice:</text:p>
          <text:list>
            <text:list-item>
              <text:p text:style-name="P92"><text:span text:style-name="Fuente_20_de_20_párrafo_20_predeter."><text:span text:style-name="T59">Backoffice:</text:span></text:span> Desplegable per seleccionar un backoffice de la llista del manteniment de backoffices.</text:p>
            </text:list-item>
          </text:list>
        </text:list-item>
        <text:list-item>
          <text:p text:style-name="P92">Dades específiques per regles de tipus enviar a uniat organitzativa:</text:p>
          <text:list>
            <text:list-item>
              <text:p text:style-name="P92"><text:span text:style-name="Fuente_20_de_20_párrafo_20_predeter."><text:span text:style-name="T59">Unitat organitzativa: </text:span></text:span>Desplegable per seleccionar la unitat organtizativa destí a la que reenviar l'anotació.</text:p>
            </text:list-item>
          </text:list>
        </text:list-item>
        <text:list-item>
          <text:p text:style-name="P92">Dades de filtre per aplicar la regla (s'ha d'informar mínim un camp):</text:p>
          <text:list>
            <text:list-item>
              <text:p text:style-name="P92"><text:span text:style-name="Fuente_20_de_20_párrafo_20_predeter."><text:span text:style-name="T59">Unitat organitzativa: </text:span></text:span>Desplegable per seleccionar una unitat organitzativa a la que aplica la regla.</text:p>
            </text:list-item>
            <text:list-item>
              <text:p text:style-name="P92"><text:span text:style-name="Fuente_20_de_20_párrafo_20_predeter."><text:span text:style-name="T59">Bústia:</text:span></text:span> Desplegable per seleccionar la bústia a la que aplica la regla.</text:p>
            </text:list-item>
            <text:list-item>
              <text:p text:style-name="P92"><text:span text:style-name="Fuente_20_de_20_párrafo_20_predeter."><text:span text:style-name="T59">Codis SIA: </text:span></text:span>Codis de procediments separats per coma als quals pot aplicar la regla.</text:p>
            </text:list-item>
            <text:list-item>
              <text:p text:style-name="P93"><text:span text:style-name="Fuente_20_de_20_párrafo_20_predeter."><text:span text:style-name="T38">Codi assumpte: </text:span></text:span><text:span text:style-name="T60">Codi d'assumpte al qual aplica la regla. Està en desús però es manté per compatibilitat amb sistemes que encara l'utilitzen.</text:span></text:p>
            </text:list-item>
          </text:list>
        </text:list-item>
      </text:list>
      <text:p text:style-name="P94"><text:s/>Com més filtres es defineixen més restrictiva és la regla. Si es defineixen tots els camps del filtre llavors només aplicarà la regla si s'acompleixen tots.</text:p>
      <text:p text:style-name="P95"/>
      <text:h text:style-name="Heading_20_3" text:outline-level="3"><text:bookmark-start text:name="__RefHeading___Toc78145_3965979134"/>Camps del llistat de regles<text:bookmark-end text:name="__RefHeading___Toc78145_3965979134"/></text:h>
      <text:p text:style-name="P95"><text:span text:style-name="T61">A</text:span><text:span text:style-name="T29">l llistat hi tindrem les següents columnes:</text:span></text:p>
      <text:list text:style-name="L11">
        <text:list-item>
          <text:p text:style-name="P96">Al llistat hi tindrem les següents columnes:</text:p>
        </text:list-item>
        <text:list-item>
          <text:p text:style-name="P96"><text:span text:style-name="Fuente_20_de_20_párrafo_20_predeter."><text:span text:style-name="T59">Ordenar: </text:span></text:span>En aquesta columna no hi ha capçalera, però tindrem l'opció de seleccionar el botó que contenen els registres per ordenar-los com vulguem arrastrant per amunt i per avall.</text:p>
        </text:list-item>
        <text:list-item>
          <text:p text:style-name="P96"><text:span text:style-name="Fuente_20_de_20_párrafo_20_predeter."><text:span text:style-name="T59">Nom: </text:span></text:span>Nom donat a la regla</text:p>
        </text:list-item>
        <text:list-item>
          <text:p text:style-name="P96"><text:span text:style-name="Fuente_20_de_20_párrafo_20_predeter."><text:span text:style-name="T59">Tipus</text:span></text:span>: Tipus d'acció de la regla</text:p>
        </text:list-item>
        <text:list-item>
          <text:p text:style-name="P97">Codi assumpte</text:p>
        </text:list-item>
        <text:list-item>
          <text:p text:style-name="P97">Codis SIA</text:p>
        </text:list-item>
        <text:list-item>
          <text:p text:style-name="P97">Unitat organitzativa</text:p>
        </text:list-item>
        <text:list-item>
          <text:p text:style-name="P97">Bústia</text:p>
        </text:list-item>
        <text:list-item>
          <text:p text:style-name="P97">Destinació</text:p>
        </text:list-item>
        <text:list-item>
          <text:p text:style-name="P96"><text:span text:style-name="Fuente_20_de_20_párrafo_20_predeter."><text:span text:style-name="T59">Activa: </text:span></text:span>Indica si la regla està activa i per tant pot ser aplicada.</text:p>
          <text:p text:style-name="P96"><text:soft-page-break/><draw:frame draw:style-name="fr23" draw:name="Imatge9" text:anchor-type="as-char" svg:y="0cm" svg:width="17cm" style:rel-width="scale" svg:height="5.447cm" style:rel-height="scale" draw:z-index="153"><draw:image xlink:href="Pictures/100000010000045A0000016591D30073.png" xlink:type="simple" xlink:show="embed" xlink:actuate="onLoad" draw:mime-type="image/png"/><svg:desc>Interfaz de usuario gráfica, Texto, Aplicación, Correo electrónico

Descripción generada automáticamente</svg:desc></draw:frame></text:p>
        </text:list-item>
      </text:list>
      <text:p text:style-name="P98"/>
      <text:list text:continue-numbering="true" text:style-name="L11">
        <text:list-item>
          <text:p text:style-name="P97">Accions:</text:p>
          <text:list>
            <text:list-item>
              <text:list>
                <text:list-item>
                  <text:p text:style-name="P99"><text:span text:style-name="Fuente_20_de_20_párrafo_20_predeter."><text:span text:style-name="T59">Modificar: </text:span></text:span>S'obrira una modal com la de creació però amb els camps inicialitzats, ja que es l'edició d'un registre.</text:p>
                </text:list-item>
                <text:list-item>
                  <text:p text:style-name="P99"><text:span text:style-name="Fuente_20_de_20_párrafo_20_predeter."><text:span text:style-name="T59">Aplicar manualment:</text:span></text:span> Amb aquesta acció s’assignarà la regla a les anotacions que coincideixin amb el filtre per a que es processin en segon pla. Un cop acabada l’assignació es refrescarà la pàgina.</text:p>
                </text:list-item>
                <text:list-item>
                  <text:p text:style-name="P99"><text:span text:style-name="Fuente_20_de_20_párrafo_20_predeter."><text:span text:style-name="T59">Amunt: </text:span></text:span>Mouràs una posició amunt el registre seleccionat.</text:p>
                </text:list-item>
                <text:list-item>
                  <text:p text:style-name="P99"><text:span text:style-name="Fuente_20_de_20_párrafo_20_predeter."><text:span text:style-name="T59">Avall: </text:span></text:span>Mouràs una posició avall el registre seleccionat.</text:p>
                </text:list-item>
                <text:list-item>
                  <text:p text:style-name="P99"><text:span text:style-name="Fuente_20_de_20_párrafo_20_predeter."><text:span text:style-name="T59">Desactivar: </text:span></text:span>Es desactivarà la regla.</text:p>
                  <text:list>
                    <text:list-item>
                      <text:p text:style-name="P100"><text:span text:style-name="Fuente_20_de_20_párrafo_20_predeter.">Esborrar</text:span><text:span text:style-name="T29">: Apareixerà un panell de confirmació per esborrar la regla.</text:span></text:p>
                    </text:list-item>
                  </text:list>
                </text:list-item>
              </text:list>
            </text:list-item>
          </text:list>
        </text:list-item>
      </text:list>
      <text:p text:style-name="P101"/>
      <text:h text:style-name="Heading_20_3" text:outline-level="3"><text:bookmark-start text:name="__RefHeading___Toc78147_3965979134"/>Simulador de regles<text:bookmark-end text:name="__RefHeading___Toc78147_3965979134"/></text:h>
      <text:p text:style-name="P102">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03"><text:soft-page-break/><draw:frame draw:style-name="fr18" draw:name="Frame48" text:anchor-type="as-char" svg:y="0cm" svg:width="17cm" style:rel-width="scale" svg:height="10.342cm" style:rel-height="scale-min" draw:z-index="151"><draw:text-box><text:p text:style-name="fig."><draw:frame draw:style-name="fr24" draw:name="Imatge10" text:anchor-type="paragraph" svg:width="17cm" style:rel-width="100%" svg:height="10.342cm" style:rel-height="scale" draw:z-index="152"><draw:image xlink:href="Pictures/100000010000037B0000021EFF98F148.png" xlink:type="simple" xlink:show="embed" xlink:actuate="onLoad" draw:mime-type="image/png"/><svg:desc>Interfaz de usuario gráfica, Texto, Aplicación, Correo electrónico

Descripción generada automáticamente</svg:desc></draw:frame>fig. <text:sequence text:ref-name="reffig.9" text:name="fig." text:formula="ooow:fig.+1" style:num-format="1">10</text:sequence>: Exemple de simulació de regles per a dades específiques d'una anotació de registre.</text:p></draw:text-box></draw:frame></text:p>
      <text:h text:style-name="Heading_20_2" text:outline-level="2"><text:bookmark-start text:name="__RefHeading___Toc245158_3767406981"/>Configurar Backoffice<text:bookmark-end text:name="__RefHeading___Toc245158_3767406981"/></text:h>
      <text:p text:style-name="P104"><text:span text:style-name="T62">En aquesta patnalla hi ha </text:span>un llistat de tots els Backoffices <text:span text:style-name="T62">donats d'alta a Distribucio </text:span>on es poden llistar de forma ascendent o descendent per el codi, el nom<text:span text:style-name="T62">,</text:span> la url<text:span text:style-name="T62">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05"><draw:frame draw:style-name="fr25" draw:name="Frame4" text:anchor-type="char" svg:width="17cm" draw:z-index="107"><draw:text-box fo:min-height="6.849cm"><text:p text:style-name="fig."><draw:frame draw:style-name="fr7" draw:name="Image1" text:anchor-type="paragraph" svg:width="17cm" style:rel-width="100%" svg:height="6.849cm" style:rel-height="scale" draw:z-index="108"><draw:image xlink:href="Pictures/10000001000004FE00000203E8016BE6.png" xlink:type="simple" xlink:show="embed" xlink:actuate="onLoad" draw:mime-type="image/png"/></draw:frame>fig. <text:sequence text:ref-name="reffig.10" text:name="fig." text:formula="ooow:fig.+1" style:num-format="1">11</text:sequence><text:s/><text:span text:style-name="T63">Detall del llistat dels backoffices</text:span></text:p></draw:text-box></draw:frame></text:p>
      <text:p text:style-name="P106"><text:soft-page-break/>Els camps que tenim al llistat són: </text:p>
      <text:list text:style-name="L12">
        <text:list-item>
          <text:p text:style-name="P107"><text:span text:style-name="T59">Codi</text:span><text:span text:style-name="T62">:</text:span> <text:s/>Ens mostra el codi del backoffice. </text:p>
        </text:list-item>
        <text:list-item>
          <text:p text:style-name="P107"><text:span text:style-name="T59">Nom</text:span><text:span text:style-name="T62">:</text:span> <text:s/>Ens mostra el nom del backoffice. </text:p>
        </text:list-item>
        <text:list-item>
          <text:p text:style-name="P107"><text:span text:style-name="T59">Url</text:span><text:span text:style-name="T62">:</text:span> Ens mostra la url <text:span text:style-name="T62">configurada a la que Distribucio comunicarà les anotacions pendents</text:span>. </text:p>
        </text:list-item>
        <text:list-item>
          <text:p text:style-name="P108"><text:span text:style-name="T64">Tipus</text:span><text:span text:style-name="T65">:</text:span><text:span text:style-name="T66"> – Ens mostra el tipus de servei que utilitza per comunicar-se. Hi de tipus SOAP (obsolet) o REST. </text:span></text:p>
        </text:list-item>
      </text:list>
      <text:p text:style-name="P106">També tenim un botó d’accions per cadascun dels backoffices que ens permetrà modificar les dades del backoffice per mitjà d’una modal o esborrar-ho. </text:p>
      <text:p text:style-name="P106"><draw:frame draw:style-name="fr25" draw:name="Frame7" text:anchor-type="char" svg:width="3.889cm" draw:z-index="109"><draw:text-box fo:min-height="2.778cm"><text:p text:style-name="fig."><draw:frame draw:style-name="fr7" draw:name="Image9" text:anchor-type="paragraph" svg:width="3.889cm" style:rel-width="100%" svg:height="2.778cm" style:rel-height="scale" draw:z-index="110"><draw:image xlink:href="Pictures/10000001000000930000006980EB54FA.png" xlink:type="simple" xlink:show="embed" xlink:actuate="onLoad" draw:mime-type="image/png"/></draw:frame>fig. <text:sequence text:ref-name="reffig.11" text:name="fig." text:formula="ooow:fig.+1" style:num-format="1">12</text:sequence>: Detall accions backoffices</text:p></draw:text-box></draw:frame></text:p>
      <text:p text:style-name="P106"/>
      <text:p text:style-name="P109"/>
      <text:p text:style-name="P109"/>
      <text:p text:style-name="Standard"/>
      <text:p text:style-name="Standard"/>
      <text:p text:style-name="P110"/>
      <text:p text:style-name="P110">A l’hora de modificar un backoffice cal tenir en compte que el codi no es podrà modificar. </text:p>
      <text:p text:style-name="P104"><draw:frame draw:style-name="fr25" draw:name="Frame10" text:anchor-type="char" svg:width="17cm" draw:z-index="111"><draw:text-box fo:min-height="9.716cm"><text:p text:style-name="fig."><draw:frame draw:style-name="fr7" draw:name="Image12" text:anchor-type="paragraph" svg:width="17cm" style:rel-width="100%" svg:height="9.716cm" style:rel-height="scale" draw:z-index="112"><draw:image xlink:href="Pictures/10000001000002D60000019FE739BEA5.png" xlink:type="simple" xlink:show="embed" xlink:actuate="onLoad" draw:mime-type="image/png"/></draw:frame>fig. <text:sequence text:ref-name="reffig.12" text:name="fig." text:formula="ooow:fig.+1" style:num-format="1">13</text:sequence>: Detall modal modificació backoffice</text:p></draw:text-box></draw:frame></text:p>
      <text:p text:style-name="P111">També tenim l’opció <text:s/>de crear un nou backoffice amb es botó</text:p>
      <text:p text:style-name="P111"><text:soft-page-break/><text:s/><draw:frame draw:style-name="fr23" draw:name="Imagen 168" text:anchor-type="as-char" svg:y="0cm" svg:width="5.503cm" style:rel-width="scale" svg:height="2.037cm" style:rel-height="scale" draw:z-index="150"><draw:image xlink:href="Pictures/10000001000000D00000004D0F89587F.png" xlink:type="simple" xlink:show="embed" xlink:actuate="onLoad" draw:mime-type="image/png"/><svg:desc>Interfaz de usuario gráfica, Texto, Aplicación, Correo electrónico

Descripción generada automáticamente</svg:desc></draw:frame></text:p>
      <text:p text:style-name="P111">Si el donam clic, se’ns obrirà un modal amb els camps corresponents per poder crear un nou backoffice. Son els següents: </text:p>
      <text:list text:style-name="L13">
        <text:list-item>
          <text:p text:style-name="P112"><text:span text:style-name="Fuente_20_de_20_párrafo_20_predeter."><text:span text:style-name="T59">Codi: </text:span></text:span>(Camp obligatori). Aquest codi és el que referenciarem a l’anotació per saber amb quin backoffice s’ha distribuït haurà de ser únic. </text:p>
        </text:list-item>
        <text:list-item>
          <text:p text:style-name="P112"><text:span text:style-name="Fuente_20_de_20_párrafo_20_predeter."><text:span text:style-name="T59">Nom: </text:span></text:span>(Camp obligatori). El nom que el volem donar al nou backoffice. </text:p>
        </text:list-item>
        <text:list-item>
          <text:p text:style-name="P112"><text:span text:style-name="Fuente_20_de_20_párrafo_20_predeter."><text:span text:style-name="T59">Url: </text:span></text:span>(Camp obligatori). Url on es troba el backoffice al que ens estem referint. </text:p>
        </text:list-item>
        <text:list-item>
          <text:p text:style-name="P112"><text:span text:style-name="Fuente_20_de_20_párrafo_20_predeter."><text:span text:style-name="T59">Usuari: </text:span></text:span>Si cal introduir el nom d’usuari per a la connexió. S’ha d’utilitzar el format ‘${clau.fitxer.propietats.usuari}’ o l’usuari directament.</text:p>
        </text:list-item>
        <text:list-item>
          <text:p text:style-name="P112"><text:span text:style-name="Fuente_20_de_20_párrafo_20_predeter."><text:span text:style-name="T59">Contrasenya: </text:span></text:span>Si cal introduir contrasenya per a la connexió. S’ha d’utilitzar el format ‘${clau.fitxer.propietats.contrasenya}’ o contrasenya directament.</text:p>
        </text:list-item>
      </text:list>
      <text:h text:style-name="Heading_20_3" text:outline-level="3"><text:bookmark-start text:name="__RefHeading___Toc613630_3453696013"/>Comunicació d’anotacions amb els backoffices<text:bookmark-end text:name="__RefHeading___Toc613630_3453696013"/></text:h>
      <text:p text:style-name="P113">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text:style-name="L14">
        <text:list-item>
          <text:p text:style-name="P114">REBUTJADA PEL BACKOFFICE - El backoffice rebutja l’anotació. </text:p>
        </text:list-item>
        <text:list-item>
          <text:p text:style-name="P114">PROCESSADA AL BACKOFFICE AMB ERRORS - El backoffice processa l’anotació amb errors. </text:p>
        </text:list-item>
        <text:list-item>
          <text:p text:style-name="P114">PROCESSADA PEL BACKOFFICE - El backoffice processa l’anotació. </text:p>
        </text:list-item>
      </text:list>
      <text:p text:style-name="P115">El diagrama d'estats del procés és el següent:</text:p>
      <text:p text:style-name="P113"><draw:frame draw:style-name="fr26" draw:name="Frame9" text:anchor-type="paragraph" svg:width="17cm" style:rel-width="100%" svg:height="11.014cm" style:rel-height="scale-min" draw:z-index="105"><draw:text-box><text:p text:style-name="fig."><draw:frame draw:style-name="fr7" draw:name="Image2" text:anchor-type="paragraph" svg:width="17cm" style:rel-width="100%" svg:height="10.285cm" style:rel-height="scale" draw:z-index="106"><draw:image xlink:href="Pictures/10000001000002F0000001C743AE6A7D.png" xlink:type="simple" xlink:show="embed" xlink:actuate="onLoad" draw:mime-type="image/png"/></draw:frame>fig. <text:sequence text:ref-name="reffig.13" text:name="fig." text:formula="ooow:fig.+1" style:num-format="1">14</text:sequence>: Diagrama d'estat: procés d'una anotació quan es comunica amb el backoffice</text:p></draw:text-box></draw:frame><text:soft-page-break/></text:p>
      <text:h text:style-name="Heading_20_2" text:outline-level="2"><text:bookmark-start text:name="__RefHeading___Toc2435_1085490558"/>Configurar permisos de l'entitat<text:bookmark-end text:name="__RefHeading___Toc2435_1085490558"/></text:h>
      <text:p text:style-name="P116"><text:span text:style-name="T54">N</text:span>ou llistat de permisos destinats a l'entitat.</text:p>
      <text:p text:style-name="P116"><draw:frame draw:style-name="fr27" draw:name="Marc1" text:anchor-type="as-char" svg:width="17cm" draw:z-index="75"><draw:text-box fo:min-height="3.129cm"><text:p text:style-name="fig."><draw:frame draw:style-name="fr7" draw:name="Imagen53" text:anchor-type="paragraph" svg:width="17cm" style:rel-width="100%" svg:height="3.129cm" style:rel-height="scale" draw:z-index="76"><draw:image xlink:href="Pictures/1000000000000490000000D751B617BE.png" xlink:type="simple" xlink:show="embed" xlink:actuate="onLoad" draw:mime-type="image/png"/></draw:frame>fig. <text:sequence text:ref-name="reffig.14" text:name="fig." text:formula="ooow:fig.+1" style:num-format="1">15</text:sequence>: Vista del llistat dels permisos.</text:p></draw:text-box></draw:frame></text:p>
      <text:p text:style-name="P117">El botó de <text:span text:style-name="T59">Nou permís</text:span><text:span text:style-name="T29"> obrira una modal de creació de permisos que per crear-ne haurem d'omplir els camps i seleccionar guardar per crear un nou registre. </text:span><text:span text:style-name="T67">(Els camps son els que apareixen al llistat).</text:span></text:p>
      <text:list text:style-name="L15">
        <text:list-item>
          <text:p text:style-name="P118"><text:span text:style-name="T68">Tipus: </text:span><text:span text:style-name="T67">Tipus de permís que es crearà.</text:span></text:p>
        </text:list-item>
        <text:list-item>
          <text:p text:style-name="P118"><text:span text:style-name="T68">Principal: </text:span><text:span text:style-name="T69">Usuari al que va destinat</text:span></text:p>
        </text:list-item>
        <text:list-item>
          <text:p text:style-name="P118"><text:span text:style-name="T68">Administració : </text:span><text:span text:style-name="T69">Booleà que ens indicara si té rol de administració</text:span></text:p>
        </text:list-item>
        <text:list-item>
          <text:p text:style-name="P119"><text:span text:style-name="T68">U</text:span><text:span text:style-name="T59">suari: </text:span><text:span text:style-name="T29">Booleà que ens indicara si té rol d'usuari</text:span></text:p>
        </text:list-item>
        <text:list-item>
          <text:p text:style-name="P120">Accions:</text:p>
        </text:list-item>
      </text:list>
      <text:list text:style-name="L16">
        <text:list-item>
          <text:p text:style-name="P121"><text:soft-page-break/><text:span text:style-name="T59">Modificar: </text:span><text:span text:style-name="T29">Obrira una modal de edició pel permís ja creat.</text:span></text:p>
        </text:list-item>
        <text:list-item>
          <text:p text:style-name="P121"><text:span text:style-name="T59">Esborrar: </text:span><text:span text:style-name="T29">Apareixerà un panell per confirmar l'eliminació del permís.</text:span></text:p>
        </text:list-item>
      </text:list>
      <text:h text:style-name="Heading_20_2" text:outline-level="2"><text:bookmark-start text:name="__RefHeading___Toc2437_1085490558"/>Consultar<text:bookmark-end text:name="__RefHeading___Toc2437_1085490558"/></text:h>
      <text:p text:style-name="P122"><text:span text:style-name="T54">A</text:span>quest desplegable obrira dues opcions per consultar les informacions de la aplicació.</text:p>
      <text:list text:style-name="L17">
        <text:list-item>
          <text:p text:style-name="P123">Continguts.</text:p>
        </text:list-item>
        <text:list-item>
          <text:p text:style-name="P123">Anotacions de registre.</text:p>
        </text:list-item>
        <text:list-item>
          <text:p text:style-name="P124">Dades estadístiques .</text:p>
        </text:list-item>
      </text:list>
      <text:p text:style-name="P122"><draw:frame draw:style-name="fr18" draw:name="Marc3" text:anchor-type="as-char" svg:y="0cm" svg:width="5.794cm" style:rel-width="scale" svg:height="3.889cm" style:rel-height="scale-min" draw:z-index="113"><draw:text-box><text:p text:style-name="fig."><draw:frame draw:style-name="fr24" draw:name="Imagen 163" text:anchor-type="paragraph" svg:width="5.794cm" style:rel-width="100%" svg:height="3.889cm" style:rel-height="scale" draw:z-index="114"><draw:image xlink:href="Pictures/10000001000000DB00000093F7200B0A.png" xlink:type="simple" xlink:show="embed" xlink:actuate="onLoad" draw:mime-type="image/png"/><svg:desc>Interfaz de usuario gráfica, Texto, Aplicación, Chat o mensaje de texto

Descripción generada automáticamente</svg:desc></draw:frame>fig. <text:sequence text:ref-name="reffig.15" text:name="fig." text:formula="ooow:fig.+1" style:num-format="1">16</text:sequence>: Detall del botó Consultar amb les seves opcions. </text:p></draw:text-box></draw:frame></text:p>
      <text:h text:style-name="Heading_20_2" text:outline-level="2"><text:bookmark-start text:name="__RefHeading___Toc2439_1085490558"/>Consultar continguts<text:bookmark-end text:name="__RefHeading___Toc2439_1085490558"/></text:h>
      <text:p text:style-name="P113">En aquesta pantalla apareixeran una serie de filtres per cercar registres en el llistat de continguts.</text:p>
      <text:p text:style-name="Standard"><text:bookmark-start text:name="__RefHeading___Toc2441_1085490558"/><draw:frame draw:style-name="fr28" draw:name="Marc4" text:anchor-type="char" svg:width="17.034cm" draw:z-index="92"><draw:text-box fo:min-height="5.927cm"><text:p text:style-name="fig."><draw:frame draw:style-name="fr7" draw:name="Imatge1" text:anchor-type="paragraph" svg:width="17cm" style:rel-width="100%" svg:height="4.606cm" style:rel-height="scale" draw:z-index="95"><draw:image xlink:href="Pictures/100000010000050200000152395A43A0.png" xlink:type="simple" xlink:show="embed" xlink:actuate="onLoad" draw:mime-type="image/png"/></draw:frame>fig. <text:sequence text:ref-name="reffig.16" text:name="fig." text:formula="ooow:fig.+1" style:num-format="1">17</text:sequence>: Vista del llistat de continguts amb el seu formulari de filtratge.</text:p></draw:text-box></draw:frame><text:bookmark-end text:name="__RefHeading___Toc2441_1085490558"/></text:p>
      <text:h text:style-name="Heading_20_3" text:outline-level="3"><text:bookmark-start text:name="__RefHeading___Toc2441_10854905581"/>Filtres<text:bookmark-end text:name="__RefHeading___Toc2441_10854905581"/></text:h>
      <text:list text:style-name="L18">
        <text:list-item>
          <text:p text:style-name="P125"><text:span text:style-name="T70">N</text:span>om: <text:span text:style-name="T29">nom del contingut per filtrar.</text:span></text:p>
        </text:list-item>
        <text:list-item>
          <text:p text:style-name="P125">Tipus d'element: <text:span text:style-name="T29">Desplegable per seleccionar el tipus d'element que vols veure en el llistat.</text:span></text:p>
        </text:list-item>
        <text:list-item>
          <text:p text:style-name="P125">Data inici</text:p>
        </text:list-item>
        <text:list-item>
          <text:p text:style-name="P125">Data fi</text:p>
        </text:list-item>
        <text:list-item>
          <text:p text:style-name="P125"><text:soft-page-break/>Desplegable per seleccionar si vols veure tots els continguts, només els esborrats o només els no esborrats.</text:p>
        </text:list-item>
      </text:list>
      <text:h text:style-name="Heading_20_3" text:outline-level="3"><text:bookmark-start text:name="__RefHeading___Toc2443_1085490558"/>Llistat<text:bookmark-end text:name="__RefHeading___Toc2443_1085490558"/></text:h>
      <text:p text:style-name="P126"><text:span text:style-name="T71">A</text:span>quest llistat serà ordenable ascendent i descendent ment per els camps: <text:span text:style-name="T59">Nom</text:span>, <text:span text:style-name="T59">Creat per</text:span> i <text:span text:style-name="T59">creat el.</text:span></text:p>
      <text:p text:style-name="P127">El llistat tindrà les següents columnes:</text:p>
      <text:list text:style-name="L19">
        <text:list-item>
          <text:p text:style-name="P128">Contingut</text:p>
        </text:list-item>
        <text:list-item>
          <text:p text:style-name="P128">Remitent</text:p>
        </text:list-item>
        <text:list-item>
          <text:p text:style-name="P128">Data creació</text:p>
        </text:list-item>
        <text:list-item>
          <text:p text:style-name="P128">Bústia</text:p>
        </text:list-item>
        <text:list-item>
          <text:p text:style-name="P129">Accions</text:p>
        </text:list-item>
      </text:list>
      <text:h text:style-name="Heading_20_3" text:outline-level="3"><text:bookmark-start text:name="__RefHeading___Toc2445_1085490558"/>Accions<text:bookmark-end text:name="__RefHeading___Toc2445_1085490558"/></text:h>
      <text:p text:style-name="P113"><draw:frame draw:style-name="fr29" draw:name="Imagen59" text:anchor-type="as-char" svg:width="5.345cm" svg:height="3.175cm" draw:z-index="64"><draw:image xlink:href="Pictures/10000000000000CA000000787F2D35E3.png" xlink:type="simple" xlink:show="embed" xlink:actuate="onLoad" draw:mime-type="image/png"/></draw:frame></text:p>
      <text:list text:style-name="L20">
        <text:list-item>
          <text:p text:style-name="P130"><text:span text:style-name="T54">D</text:span>etalls: <text:span text:style-name="T29">Obrira una modal per veure'n tots els detalls del contingut.</text:span></text:p>
          <text:p text:style-name="P130"><draw:frame draw:style-name="fr18" draw:name="Marc5" text:anchor-type="as-char" svg:y="0cm" svg:width="17cm" style:rel-width="scale" svg:height="7.327cm" style:rel-height="scale-min" draw:z-index="115"><draw:text-box><text:p text:style-name="fig."><draw:frame draw:style-name="fr24" draw:name="Imagen 164" text:anchor-type="paragraph" svg:width="17cm" style:rel-width="100%" svg:height="7.327cm" style:rel-height="scale" draw:z-index="148"><draw:image xlink:href="Pictures/1000000100000526000002384BAC5624.png" xlink:type="simple" xlink:show="embed" xlink:actuate="onLoad" draw:mime-type="image/png"/><svg:desc>Interfaz de usuario gráfica, Texto, Aplicación, Correo electrónico

Descripción generada automáticamente</svg:desc></draw:frame>fig. <text:sequence text:ref-name="reffig.17" text:name="fig." text:formula="ooow:fig.+1" style:num-format="1">18</text:sequence>: Exemple de modal amb els detalls del contingut. </text:p></draw:text-box></draw:frame></text:p>
          <text:p text:style-name="P131"/>
          <text:list>
            <text:list-item>
              <text:list>
                <text:list-item>
                  <text:p text:style-name="P132"><text:span text:style-name="Fuente_20_de_20_párrafo_20_predeter."><text:span text:style-name="T59">Resum: </text:span></text:span>Apareix un resum de tota la informació del contingut.</text:p>
                </text:list-item>
                <text:list-item>
                  <text:p text:style-name="P132"><text:span text:style-name="Fuente_20_de_20_párrafo_20_predeter."><text:span text:style-name="T59">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132"><text:soft-page-break/><text:span text:style-name="Fuente_20_de_20_párrafo_20_predeter."><text:span text:style-name="T59">Interessats:</text:span></text:span> Ens mostra un llistat de les persones associades al contingut. </text:p>
                </text:list-item>
                <text:list-item>
                  <text:p text:style-name="P132"><text:span text:style-name="Fuente_20_de_20_párrafo_20_predeter."><text:span text:style-name="T59">Annexos:</text:span></text:span> Ens mostra un llistat amb tots els annexes. </text:p>
                </text:list-item>
                <text:list-item>
                  <text:p text:style-name="P133"><text:span text:style-name="Fuente_20_de_20_párrafo_20_predeter.">Arxiu Info: </text:span><text:span text:style-name="T29">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130">Històric d'accions: <text:span text:style-name="T29">S'obrira una modal</text:span> <text:span text:style-name="T29">en la qual podràs veure totes les accions i moviments realitzats per el contingut seleccionat. Aquesta modal tindrà tres pestanyes:</text:span></text:p>
        </text:list-item>
      </text:list>
      <text:p text:style-name="P127"/>
      <text:list text:continue-numbering="true" text:style-name="L20">
        <text:list-item>
          <text:list>
            <text:list-item>
              <text:p text:style-name="P134"><draw:frame draw:style-name="fr30" draw:name="Marc6" text:anchor-type="paragraph" svg:width="16.365cm" draw:z-index="58"><draw:text-box fo:min-height="7.659cm"><text:p text:style-name="fig."><draw:frame draw:style-name="fr7" draw:name="Imagen61" text:anchor-type="paragraph" svg:width="16.365cm" style:rel-width="100%" svg:height="7.659cm" style:rel-height="scale" draw:z-index="59"><draw:image xlink:href="Pictures/100000000000038A000001A8B2B6A107.png" xlink:type="simple" xlink:show="embed" xlink:actuate="onLoad" draw:mime-type="image/png"/></draw:frame>fig. <text:sequence text:ref-name="reffig.18" text:name="fig." text:formula="ooow:fig.+1" style:num-format="1">19</text:sequence>: Modal amb l’històric d’accions de l’element seleccionat. </text:p></draw:text-box></draw:frame>Accions: <text:span text:style-name="T29">Veuràs les accions realitzades pel contingut.</text:span></text:p>
            </text:list-item>
            <text:list-item>
              <text:p text:style-name="P134">Moviments: <text:span text:style-name="T29">Veuràs els moviments realitzats pel contingut.</text:span></text:p>
            </text:list-item>
            <text:list-item>
              <text:p text:style-name="P134">Auditoria: <text:span text:style-name="T29">Aquí veuràs l'usuari i data de creació, i l'usuari i data de la darrera modificació que s'ha realitzat al contingut.</text:span></text:p>
            </text:list-item>
          </text:list>
        </text:list-item>
      </text:list>
      <text:h text:style-name="Heading_20_2" text:outline-level="2"><text:bookmark-start text:name="__RefHeading___Toc2447_1085490558"/>Consultar anotacions de registre<text:bookmark-end text:name="__RefHeading___Toc2447_1085490558"/></text:h>
      <text:p text:style-name="P135"><text:span text:style-name="T72">E</text:span><text:span text:style-name="T73">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22"><text:soft-page-break/><draw:frame draw:style-name="fr18" draw:name="Marc7" text:anchor-type="as-char" svg:y="0cm" svg:width="17cm" style:rel-width="scale" svg:height="6.837cm" style:rel-height="scale-min" draw:z-index="116"><draw:text-box><text:p text:style-name="fig."><draw:frame draw:style-name="fr31" draw:name="Imagen 165" text:anchor-type="paragraph" svg:x="0cm" svg:y="2.566cm" svg:width="17cm" style:rel-width="100%" svg:height="4.043cm" style:rel-height="scale" draw:z-index="117"><draw:image xlink:href="Pictures/10000000000006C5000001987D502792.png" xlink:type="simple" xlink:show="embed" xlink:actuate="onLoad" draw:mime-type="image/png"/><svg:desc>Una captura de pantalla de una computadora

Descripción generada automáticamente</svg:desc></draw:frame><draw:frame draw:style-name="fr32" draw:name="Imagen1" text:anchor-type="char" svg:x="0cm" svg:y="-0.113cm" svg:width="17cm" svg:height="2.681cm" draw:z-index="147"><draw:image xlink:href="Pictures/100000000000073400000123BB8120AB.png" xlink:type="simple" xlink:show="embed" xlink:actuate="onLoad" draw:mime-type="image/png"/></draw:frame>fig. <text:sequence text:ref-name="reffig.19" text:name="fig." text:formula="ooow:fig.+1" style:num-format="1">20</text:sequence>: Vista del llistat d’anotacions amb un formulari de filtratge. </text:p></draw:text-box></draw:frame></text:p>
      <text:h text:style-name="Heading_20_3" text:outline-level="3"><text:bookmark-start text:name="__RefHeading___Toc2449_1085490558"/>Filtres<text:bookmark-end text:name="__RefHeading___Toc2449_1085490558"/></text:h>
      <text:p text:style-name="P136"><text:span text:style-name="T74">E</text:span><text:span text:style-name="T75">ls filtre és el mateix que el dels usuaris ampliat amb l'opció de filtrar per estat específic, amb error i amb una unitat organitzativa. La llista completa de camps pel filtre és la següent:</text:span></text:p>
      <text:p text:style-name="P137">Tal i com es mostra en la imatge, el llistat es podrà filtrar a partir dels següents camps:</text:p>
      <text:p text:style-name="P137"/>
      <text:list text:style-name="WWNum3">
        <text:list-item>
          <text:p text:style-name="P138"><text:span text:style-name="T76">Número: </text:span><text:span text:style-name="T77">Text per filtrar pel número de l'anotació de registre.</text:span></text:p>
        </text:list-item>
        <text:list-item>
          <text:p text:style-name="P139"><text:span text:style-name="T78">T</text:span><text:span text:style-name="T79">ítol</text:span><text:span text:style-name="T80">: </text:span><text:span text:style-name="T81">Text per filtrar </text:span><text:span text:style-name="T82">p</text:span><text:span text:style-name="T83">er l'extracte de l'antoació de registre</text:span><text:span text:style-name="T81">.</text:span></text:p>
        </text:list-item>
        <text:list-item>
          <text:p text:style-name="P140"><text:span text:style-name="T84">Origen núm.:</text:span><text:span text:style-name="T77"> Text per filtrar per la referència al número de registre original. </text:span></text:p>
        </text:list-item>
        <text:list-item>
          <text:p text:style-name="P139"><text:span text:style-name="T76">Remitent:</text:span><text:span text:style-name="T84"> Text lliure per filtrar </text:span><text:span text:style-name="T85">les</text:span><text:span text:style-name="T84"> anotacions de registre pel nom d'un remitent concret.</text:span></text:p>
        </text:list-item>
        <text:list-item>
          <text:p text:style-name="P139"><text:span text:style-name="T86">Interessat: </text:span><text:span text:style-name="T87">Camp lliure per buscar per interessat de l'anotació de registre.</text:span></text:p>
        </text:list-item>
        <text:list-item>
          <text:p text:style-name="P139"><text:span text:style-name="T76">Data recep.</text:span><text:span text:style-name="T84"> </text:span><text:span text:style-name="T76">inicial</text:span><text:span text:style-name="T84">: Camp tipus data per mostrar </text:span><text:span text:style-name="T85">les</text:span><text:span text:style-name="T84"> anotacions de registre rebuts pel </text:span><text:span text:style-name="T88">DISTRIBUCIÓ</text:span><text:span text:style-name="T84"> a partir d'una data concreta.</text:span></text:p>
        </text:list-item>
        <text:list-item>
          <text:p text:style-name="P139"><text:span text:style-name="T89">Data recep.</text:span><text:span text:style-name="T81"> </text:span><text:span text:style-name="T89">final</text:span><text:span text:style-name="T81">: Camp tipus data per mostrar les anotacions de registre rebuts pe</text:span><text:span text:style-name="T90">r</text:span><text:span text:style-name="T81"> </text:span><text:span text:style-name="T90">DISTRIBUCIÓ</text:span><text:span text:style-name="T81"> fins a una data concreta.</text:span></text:p>
        </text:list-item>
        <text:list-item>
          <text:p text:style-name="P141"><text:span text:style-name="T76">Unitat Organitzativa: </text:span><text:span text:style-name="T77">Desplegable per filtrar les anotacions que estiguin en una bústia de la unitat organitzativa escollida.</text:span><text:span text:style-name="T91"> Si se selecciona una unitat organitzativa llavors només es poden escollir bústies en el desplegable de filtre de bústies que pertanyin a la unitat organitzativa escollida.</text:span></text:p>
        </text:list-item>
        <text:list-item>
          <text:p text:style-name="P139"><draw:frame draw:style-name="fr3" draw:name="Imagen6" text:anchor-type="paragraph" svg:x="4.441cm" svg:y="1.411cm" svg:width="0.826cm" svg:height="0.626cm" draw:z-index="149"><draw:image xlink:href="Pictures/100000000000003E0000002F6AE360E0.png" xlink:type="simple" xlink:show="embed" xlink:actuate="onLoad" draw:mime-type="image/png"/></draw:frame><text:span text:style-name="T76">Bústia: </text:span><text:span text:style-name="T84">Desplegable que mostrarà la llista de bústies a les quals l'usuari distribuïdor té permisos. Filtrarà el contingut de la llista mostrant només </text:span><text:span text:style-name="T85">les</text:span><text:span text:style-name="T84"> anotacions de registre distribuïts en aquella bústia.</text:span><text:span text:style-name="T92"> </text:span><text:span text:style-name="T93">Si es prem el botó es mostraran les bústies inactives en la selecció de bústies i es mostrarà el contingut de les bústies inactives en el llistat.</text:span></text:p>
          <text:p text:style-name="P142"/>
        </text:list-item>
        <text:list-item>
          <text:p text:style-name="P139"><text:span text:style-name="T86">Enviament email</text:span><text:span text:style-name="T94">: </text:span><text:span text:style-name="T95">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39"><text:span text:style-name="T96">Documentació</text:span><text:span text:style-name="T97">:</text:span><text:span text:style-name="T98"> Filtre per tipus de documentació.</text:span></text:p>
          <text:list>
            <text:list-item text:start-value="1">
              <text:p text:style-name="P139"><draw:frame draw:style-name="fr10" draw:name="Image70" text:anchor-type="as-char" svg:y="-0.3cm" svg:width="0.318cm" svg:height="0.37cm" draw:z-index="118"><draw:image xlink:href="Pictures/100000000000000C0000000E25855A0E.png" xlink:type="simple" xlink:show="embed" xlink:actuate="onLoad" draw:mime-type="image/png"/></draw:frame><text:span text:style-name="T99"><text:s/></text:span><text:span text:style-name="T100">Documentació adjunta digita</text:span><text:span text:style-name="T99">litzada.</text:span></text:p>
            </text:list-item>
            <text:list-item>
              <text:p text:style-name="P139"><draw:frame draw:style-name="fr29" draw:name="Image71" text:anchor-type="as-char" svg:width="0.714cm" svg:height="0.37cm" draw:z-index="120"><draw:image xlink:href="Pictures/100000000000001B0000000E03D4C585.png" xlink:type="simple" xlink:show="embed" xlink:actuate="onLoad" draw:mime-type="image/png"/></draw:frame><text:span text:style-name="T99"><text:s/>Documentació adjunta digitalitzada i complementàriament en paper.</text:span></text:p>
            </text:list-item>
            <text:list-item>
              <text:p text:style-name="P139"><draw:frame draw:style-name="fr29" draw:name="Image72" text:anchor-type="as-char" svg:width="0.344cm" svg:height="0.291cm" draw:z-index="121"><draw:image xlink:href="Pictures/100000000000000D0000000BC2F71D36.png" xlink:type="simple" xlink:show="embed" xlink:actuate="onLoad" draw:mime-type="image/png"/></draw:frame><text:span text:style-name="T101"><text:s/>Documentació adjunta en suport PAPER (o altres suports)</text:span></text:p>
            </text:list-item>
          </text:list>
        </text:list-item>
        <text:list-item>
          <text:p text:style-name="P143"><text:span text:style-name="T102">Botó </text:span><text:span text:style-name="T102"><draw:frame draw:style-name="fr33" draw:name="Image74 Copia 1" text:anchor-type="as-char" svg:y="-0.612cm" svg:width="1.085cm" svg:height="0.9cm" draw:z-index="146"><draw:image xlink:href="Pictures/1000000000000029000000228D358339.png" xlink:type="simple" xlink:show="embed" xlink:actuate="onLoad" draw:mime-type="image/png"/></draw:frame></text:span><text:span text:style-name="T102"><text:s/>N</text:span><text:span text:style-name="T103">omés amb annexos esborrany:</text:span><text:span text:style-name="T104"> </text:span><text:span text:style-name="T83">Botó per filtrar només les anotacions </text:span><text:span text:style-name="T104">amb annexos en estat esborrany.</text:span></text:p>
        </text:list-item>
        <text:list-item>
          <text:p text:style-name="P140"><text:span text:style-name="T102">Codi Backoffice: </text:span><text:span text:style-name="T83">Text per filtrar pel codi de backoffice al qual ha estat enviada l'anotació.</text:span></text:p>
        </text:list-item>
        <text:list-item>
          <text:p text:style-name="P140"><text:soft-page-break/><text:span text:style-name="T105">Penden</text:span><text:span text:style-name="T84">t: </text:span><text:span text:style-name="T77">Desplegable per seleccionar només les anotacions pendents, processades o totes. Els estats pendents de processar són:</text:span></text:p>
          <text:list>
            <text:list-item>
              <text:p text:style-name="P144">Pendent de guardar annexos</text:p>
            </text:list-item>
            <text:list-item>
              <text:p text:style-name="P144">Pendent de processar regla</text:p>
            </text:list-item>
            <text:list-item>
              <text:p text:style-name="P144">Pendent de l'usuari</text:p>
            </text:list-item>
          </text:list>
          <text:p text:style-name="P144">Els estats processats són:</text:p>
          <text:list text:continue-numbering="true">
            <text:list-item>
              <text:p text:style-name="P144">Processada a la bústia</text:p>
            </text:list-item>
            <text:list-item>
              <text:p text:style-name="P144">Pendent de comunicar backoffice</text:p>
            </text:list-item>
            <text:list-item>
              <text:p text:style-name="P144">Comunicada al backoffice</text:p>
            </text:list-item>
            <text:list-item>
              <text:p text:style-name="P144">Rebuda al backoffice</text:p>
            </text:list-item>
            <text:list-item>
              <text:p text:style-name="P144">Processada pel backoffice</text:p>
            </text:list-item>
            <text:list-item>
              <text:p text:style-name="P144">Rebutjada pel backoffice</text:p>
            </text:list-item>
            <text:list-item>
              <text:p text:style-name="P144">Processada al backoffice amb error</text:p>
            </text:list-item>
          </text:list>
          <text:p text:style-name="P145">Per defecte en el llistat es filtren les anotacions pendents de processar.</text:p>
        </text:list-item>
        <text:list-item>
          <text:p text:style-name="P146">Estat específic:<text:span text:style-name="T29"> Desplegable per seleccionar un dels estats específics en què es pot trobar l'anotació. És independent del desplegable d'estat simple anterior.</text:span></text:p>
        </text:list-item>
        <text:list-item>
          <text:p text:style-name="P139"><text:span text:style-name="T106">Botó </text:span><draw:frame draw:style-name="fr33" draw:name="Image74" text:anchor-type="as-char" svg:y="-0.612cm" svg:width="1.085cm" svg:height="0.9cm" draw:z-index="131"><draw:image xlink:href="Pictures/1000000000000029000000228D358339.png" xlink:type="simple" xlink:show="embed" xlink:actuate="onLoad" draw:mime-type="image/png"/></draw:frame><text:span text:style-name="T107"><text:s/>Només anotacions amb error: </text:span><text:span text:style-name="T83">Botó per filtrar només les anotacions marcades amb error.</text:span></text:p>
        </text:list-item>
        <text:list-item>
          <text:p text:style-name="P147"><text:span text:style-name="T107">S</text:span><text:span text:style-name="T108">obreescriure:</text:span><text:span text:style-name="T104"> </text:span><text:span text:style-name="T83">Desplegable per seleccionar </text:span><text:span text:style-name="T104">si l’anotació està marcada per a sobreescriure</text:span></text:p>
        </text:list-item>
        <text:list-item>
          <text:p text:style-name="P148"><text:span text:style-name="T107">N</text:span><text:span text:style-name="T108">ombre d’annexos:</text:span><text:span text:style-name="T104"> </text:span><text:span text:style-name="T83">Desplegable per seleccionar </text:span><text:span text:style-name="T104">el numero d’annexos de l’anotació</text:span></text:p>
        </text:list-item>
        <text:list-item>
          <text:p text:style-name="P148"><text:span text:style-name="T108">Codi SIA procediment/servei:</text:span><text:span text:style-name="T104"> </text:span><text:span text:style-name="T83">Text per filtrar pel codi </text:span><text:span text:style-name="T104">SIA </text:span><text:span text:style-name="T83">de </text:span><text:span text:style-name="T104">procediment o servei el qual empra</text:span><text:span text:style-name="T83"> l'anotació.</text:span></text:p>
        </text:list-item>
        <text:list-item>
          <text:p text:style-name="P148"><text:span text:style-name="T107">Reintents:</text:span><text:span text:style-name="T83"> Desplegable per seleccionar si l’anotació te reintents pendents.</text:span></text:p>
        </text:list-item>
      </text:list>
      <text:p text:style-name="P137"/>
      <text:p text:style-name="P149">Un cop seleccionats els filtres desitjats es podrà fer clic sobre el botó “Filtrar” per obtenir el llistat filtrat. El botó “Netejar” reinicia els filtres.</text:p>
      <text:p text:style-name="P150"/>
      <text:h text:style-name="Heading_20_3" text:outline-level="3"><text:bookmark-start text:name="__RefHeading___Toc2451_1085490558"/>Llistat<text:bookmark-end text:name="__RefHeading___Toc2451_1085490558"/></text:h>
      <text:p text:style-name="P151"><text:span text:style-name="T109">E</text:span><text:span text:style-name="T110">l llistat pels administradors conté les mateixes columnes que el llistat per usuaris del punt </text:span><text:span text:style-name="T110"><text:bookmark-ref text:reference-format="number-all-superior" text:ref-name="__RefHeading___Toc2743_1726870378">Error: no se encontró el origen de la referencia</text:bookmark-ref></text:span><text:span text:style-name="T110">.</text:span><text:span text:style-name="T111"> </text:span></text:p>
      <text:p text:style-name="P152"><draw:frame draw:style-name="fr13" draw:name="Imatge4" text:anchor-type="char" svg:width="17cm" svg:height="2.962cm" draw:z-index="96"><draw:image xlink:href="Pictures/10000001000004FA000000DEE32CD0E3.png" xlink:type="simple" xlink:show="embed" xlink:actuate="onLoad" draw:mime-type="image/png"/></draw:frame></text:p>
      <text:h text:style-name="Heading_20_2" text:outline-level="2"><text:bookmark-start text:name="__RefHeading___Toc2447_10854905581"/>Consultar anotacions de registre<text:bookmark-end text:name="__RefHeading___Toc2447_10854905581"/></text:h>
      <text:p text:style-name="P153">Aquí tenim tres llistats, tots els camps es poden filtrar de forma ascendent i descendent: </text:p>
      <text:list text:style-name="L21">
        <text:list-item>
          <text:p text:style-name="P154">Dades per unitat organitzativa, amb els camps: Data, Codi UO, UO, Anotacions noves, Anotacions totals, Reenviades, Per email, Justificants, Annexos, Bústies, Usuaris. </text:p>
        </text:list-item>
      </text:list>
      <text:p text:style-name="P155"><text:soft-page-break/><draw:frame draw:style-name="fr18" draw:name="Marc8" text:anchor-type="as-char" svg:y="0cm" svg:width="17cm" style:rel-width="scale" svg:height="5.039cm" style:rel-height="scale-min" draw:z-index="132"><draw:text-box><text:p text:style-name="fig."><draw:frame draw:style-name="fr24" draw:name="Imagen 169" text:anchor-type="paragraph" svg:width="17cm" style:rel-width="100%" svg:height="5.039cm" style:rel-height="scale" draw:z-index="145"><draw:image xlink:href="Pictures/10000001000004E70000017495DE3013.png" xlink:type="simple" xlink:show="embed" xlink:actuate="onLoad" draw:mime-type="image/png"/><svg:desc>Captura de pantalla de computadora

Descripción generada automáticamente con confianza media</svg:desc></draw:frame>fig. <text:sequence text:ref-name="reffig.20" text:name="fig." text:formula="ooow:fig.+1" style:num-format="1">21</text:sequence>: Vista de dades per unitat organitzativa. </text:p></draw:text-box></draw:frame></text:p>
      <text:p text:style-name="P155"/>
      <text:list text:continue-numbering="true" text:style-name="L21">
        <text:list-item>
          <text:p text:style-name="P154">Dades per estat, amb els camps: Data, Estat, Anotacions correctes, Anotacions correctes totals, Anotacions amb error, Anotacions amb error totals, Total d’anotacions. </text:p>
        </text:list-item>
      </text:list>
      <text:p text:style-name="P155"><draw:frame draw:style-name="fr18" draw:name="Marc9" text:anchor-type="as-char" svg:y="0cm" svg:width="17cm" style:rel-width="scale" svg:height="7.061cm" style:rel-height="scale-min" draw:z-index="133"><draw:text-box><text:p text:style-name="fig."><draw:frame draw:style-name="fr24" draw:name="Imagen 170" text:anchor-type="paragraph" svg:width="17cm" style:rel-width="100%" svg:height="7.061cm" style:rel-height="scale" draw:z-index="134"><draw:image xlink:href="Pictures/10000001000004E90000020A106FA5C7.png" xlink:type="simple" xlink:show="embed" xlink:actuate="onLoad" draw:mime-type="image/png"/><svg:desc>Pantalla de computadora

Descripción generada automáticamente con confianza media</svg:desc></draw:frame>fig. <text:sequence text:ref-name="reffig.21" text:name="fig." text:formula="ooow:fig.+1" style:num-format="1">22</text:sequence>: Vista de dades per estat. </text:p></draw:text-box></draw:frame></text:p>
      <text:list text:continue-numbering="true" text:style-name="L21">
        <text:list-item>
          <text:p text:style-name="P156">Usuaris de bústies, amb els camps: Data, Codi UO, UO, Id Bústia, Nom Bústia, Usuaris totals, Usuaris per permís directe, Usuaris per rol. </text:p>
        </text:list-item>
      </text:list>
      <text:p text:style-name="P157"><text:soft-page-break/><draw:frame draw:style-name="fr18" draw:name="Marc10" text:anchor-type="as-char" svg:y="0cm" svg:width="17cm" style:rel-width="scale" svg:height="5.509cm" style:rel-height="scale-min" draw:z-index="135"><draw:text-box><text:p text:style-name="fig."><draw:frame draw:style-name="fr24" draw:name="Imagen 171" text:anchor-type="paragraph" svg:width="17cm" style:rel-width="100%" svg:height="5.509cm" style:rel-height="scale" draw:z-index="144"><draw:image xlink:href="Pictures/10000001000004E5000001969C0E9993.png" xlink:type="simple" xlink:show="embed" xlink:actuate="onLoad" draw:mime-type="image/png"/><svg:desc>Calendario

Descripción generada automáticamente con confianza baja</svg:desc></draw:frame>fig. <text:sequence text:ref-name="reffig.22" text:name="fig." text:formula="ooow:fig.+1" style:num-format="1">23</text:sequence>: Vista d’usuaris de bústies. </text:p></draw:text-box></draw:frame></text:p>
      <text:p text:style-name="P157"/>
      <text:p text:style-name="P157">Amunt trobarem la part per filtrar amb diferents opcions </text:p>
      <text:p text:style-name="P153"><draw:frame draw:style-name="fr18" draw:name="Marc11" text:anchor-type="as-char" svg:y="0cm" svg:width="17cm" style:rel-width="scale" svg:height="3.618cm" style:rel-height="scale-min" draw:z-index="136"><draw:text-box><text:p text:style-name="fig."><draw:frame draw:style-name="fr24" draw:name="Imagen 172" text:anchor-type="paragraph" svg:width="17cm" style:rel-width="100%" svg:height="3.618cm" style:rel-height="scale" draw:z-index="143"><draw:image xlink:href="Pictures/10000001000004FE0000011042B35F79.png" xlink:type="simple" xlink:show="embed" xlink:actuate="onLoad" draw:mime-type="image/png"/><svg:desc>Interfaz de usuario gráfica, Texto, Aplicación

Descripción generada automáticamente</svg:desc></draw:frame>fig. <text:sequence text:ref-name="reffig.23" text:name="fig." text:formula="ooow:fig.+1" style:num-format="1">24</text:sequence>: Formulari de filtratge per l’apartat consultar dades estadístiques.</text:p></draw:text-box></draw:frame></text:p>
      <text:p text:style-name="P153"/>
      <text:p text:style-name="P153"/>
      <text:list text:continue-numbering="true" text:style-name="L21">
        <text:list-item>
          <text:p text:style-name="P158">Data d’inici.</text:p>
        </text:list-item>
        <text:list-item>
          <text:p text:style-name="P158">Data de fi. </text:p>
        </text:list-item>
        <text:list-item>
          <text:p text:style-name="P158">Codi d’unitat superior. </text:p>
        </text:list-item>
        <text:list-item>
          <text:p text:style-name="P158">Unitat organitzativa. </text:p>
        </text:list-item>
        <text:list-item>
          <text:p text:style-name="P158">Un camp on podem indicar quines estadístiques volem veure. Tenim tres opcions: </text:p>
          <text:list>
            <text:list-item>
              <text:p text:style-name="P158">Dades per Unitat Organitzativa. </text:p>
            </text:list-item>
            <text:list-item>
              <text:p text:style-name="P158">Dades per estat. </text:p>
            </text:list-item>
            <text:list-item>
              <text:p text:style-name="P158">Usuaris bústies. </text:p>
            </text:list-item>
          </text:list>
        </text:list-item>
      </text:list>
      <text:p text:style-name="P159">Podem seleccionar una, dues o les tres. </text:p>
      <text:list text:style-name="L22">
        <text:list-item>
          <text:p text:style-name="P160"><text:span text:style-name="Fuente_20_de_20_párrafo_20_predeter."><text:span text:style-name="T59">Tres botons que ens permeten per dades actuals, per un dia en concret i per un mes en concret. </text:span></text:span></text:p>
        </text:list-item>
        <text:list-item>
          <text:p text:style-name="P160"><text:span text:style-name="Fuente_20_de_20_párrafo_20_predeter."><text:span text:style-name="T59">Tenim l’opció de descarregar les estadístiques en diferents formats: </text:span></text:span></text:p>
          <text:list>
            <text:list-item>
              <text:p text:style-name="P160"><text:soft-page-break/><text:span text:style-name="Fuente_20_de_20_párrafo_20_predeter."><text:span text:style-name="T59">JSON</text:span></text:span></text:p>
            </text:list-item>
            <text:list-item>
              <text:p text:style-name="P160"><text:span text:style-name="Fuente_20_de_20_párrafo_20_predeter."><text:span text:style-name="T59">XLSX</text:span></text:span></text:p>
            </text:list-item>
            <text:list-item>
              <text:p text:style-name="P160"><text:span text:style-name="Fuente_20_de_20_párrafo_20_predeter."><text:span text:style-name="T59">ODT</text:span></text:span></text:p>
            </text:list-item>
            <text:list-item>
              <text:p text:style-name="P160"><text:span text:style-name="Fuente_20_de_20_párrafo_20_predeter."><text:span text:style-name="T59">XML</text:span></text:span></text:p>
            </text:list-item>
          </text:list>
        </text:list-item>
      </text:list>
      <text:p text:style-name="P161"/>
      <text:p text:style-name="P157">Tenim dos formes de visualitzar els registres: </text:p>
      <text:list text:style-name="L23">
        <text:list-item>
          <text:p text:style-name="P162"><text:span text:style-name="Fuente_20_de_20_párrafo_20_predeter."><text:span text:style-name="T59">En forma de taula.</text:span></text:span></text:p>
        </text:list-item>
        <text:list-item>
          <text:p text:style-name="P162"><text:span text:style-name="Fuente_20_de_20_párrafo_20_predeter."><text:span text:style-name="T59">Amb gràfics. </text:span></text:span></text:p>
        </text:list-item>
      </text:list>
      <text:p text:style-name="P153"/>
      <text:p text:style-name="P163"><text:span text:style-name="Fuente_20_de_20_párrafo_20_predeter."><text:span text:style-name="T22">Just abans del llistat, a la part dreta, com passava als usuaris amb rol ‘usuari’, tenim un botó d’accions </text:span></text:span><text:span text:style-name="Fuente_20_de_20_párrafo_20_predeter."><text:span text:style-name="T22"><draw:frame draw:style-name="fr23" draw:name="Imagen 188" text:anchor-type="as-char" svg:y="0cm" svg:width="1.931cm" style:rel-width="scale" svg:height="0.503cm" style:rel-height="scale" draw:z-index="137"><draw:image xlink:href="Pictures/10000001000000490000001396689F9A.png" xlink:type="simple" xlink:show="embed" xlink:actuate="onLoad" draw:mime-type="image/png"/></draw:frame></text:span></text:span><text:span text:style-name="Fuente_20_de_20_párrafo_20_predeter."><text:span text:style-name="T22"><text:s/>que ens permet fer diferents accions en grup amb totes les anotacions de registre que tinguin el seu checkbox activat.</text:span></text:span></text:p>
      <text:p text:style-name="P163"><text:span text:style-name="Fuente_20_de_20_párrafo_20_predeter."><text:span text:style-name="T22"><draw:frame draw:style-name="fr18" draw:name="Marc12" text:anchor-type="as-char" svg:y="0cm" svg:width="17cm" style:rel-width="scale" svg:height="3.11cm" style:rel-height="scale-min" draw:z-index="138"><draw:text-box><text:p text:style-name="fig."><draw:frame draw:style-name="fr24" draw:name="Imagen 190" text:anchor-type="paragraph" svg:width="17cm" style:rel-width="100%" svg:height="3.11cm" style:rel-height="scale" draw:z-index="140"><draw:image xlink:href="Pictures/10000001000004F4000000E82E4DCA8D.png" xlink:type="simple" xlink:show="embed" xlink:actuate="onLoad" draw:mime-type="image/png"/><svg:desc>Interfaz de usuario gráfica, Aplicación

Descripción generada automáticamente</svg:desc></draw:frame>fig. <text:sequence text:ref-name="reffig.24" text:name="fig." text:formula="ooow:fig.+1" style:num-format="1">25</text:sequence>: Exemple de com es poden fer accions en grup. </text:p></draw:text-box></draw:frame></text:span></text:span></text:p>
      <text:p text:style-name="P153"/>
      <text:p text:style-name="P153"/>
      <text:p text:style-name="Standard"/>
      <text:p text:style-name="P164"/>
      <text:h text:style-name="Heading_20_1" text:outline-level="1"><text:bookmark-start text:name="__RefHeading___Toc2775_1726870378"/>Superusuari<text:bookmark-end text:name="__RefHeading___Toc2775_1726870378"/></text:h>
      <text:p text:style-name="Standard"/>
      <text:p text:style-name="P165"><text:span text:style-name="T112">E</text:span><text:span text:style-name="T113">ls </text:span><text:span text:style-name="T114">tipus d'usuari Superusuari</text:span><text:span text:style-name="T115"> </text:span><text:span text:style-name="T116">pot accedir a la configuració de les entitats i </text:span><text:span text:style-name="T113">al monitoratge de integracions i excepcions.</text:span></text:p>
      <text:p text:style-name="P166">Com pots veure el boto on amb l'usuari només sortien les bústies ara hi ha dues opcions i en una d'elles (La de monitoratge) tindrà dues opcions incloses:</text:p>
      <text:p text:style-name="P165"><draw:frame draw:style-name="fr1" draw:name="Frame18" text:anchor-type="paragraph" svg:width="9.393cm" draw:z-index="72"><draw:text-box fo:min-height="3.81cm"><text:p text:style-name="fig."><draw:frame draw:style-name="fr25" draw:name="Marc13" text:anchor-type="char" svg:width="9.393cm" draw:z-index="97"><draw:text-box fo:min-height="4.496cm"><text:p text:style-name="fig."><draw:frame draw:style-name="fr7" draw:name="Imatge8" text:anchor-type="paragraph" svg:width="9.393cm" style:rel-width="100%" svg:height="4.496cm" style:rel-height="scale" draw:z-index="98"><draw:image xlink:href="Pictures/1000000100000178000000B45BA1E2CC.png" xlink:type="simple" xlink:show="embed" xlink:actuate="onLoad" draw:mime-type="image/png"/></draw:frame>fig. <text:sequence text:ref-name="reffig.25" text:name="fig." text:formula="ooow:fig.+1" style:num-format="1">26</text:sequence>: Menú d'opcions per l'usuari com a Superusuari.</text:p></draw:text-box></draw:frame></text:p></draw:text-box></draw:frame><text:span text:style-name="T115">E</text:span><text:span text:style-name="T116">n els següents apartats es detallen les diferents opcions</text:span><text:span text:style-name="T113">.</text:span></text:p>
      <text:h text:style-name="Heading_20_2" text:outline-level="2"><text:bookmark-start text:name="__RefHeading___Toc2399_1085490558"/>Entitats<text:bookmark-end text:name="__RefHeading___Toc2399_1085490558"/></text:h>
      <text:p text:style-name="P167"><text:span text:style-name="T117">L</text:span><text:span text:style-name="T73">'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168">L'usuari Superusuari és qui pot administrar les diferents entitats donades d'alta a DISTRIBUCIO i donar permisos als usuaris.</text:p>
      <text:p text:style-name="P168"><draw:frame draw:style-name="fr18" draw:name="Marc14" text:anchor-type="as-char" svg:y="0cm" svg:width="17cm" style:rel-width="scale" svg:height="5.246cm" style:rel-height="scale-min" draw:z-index="139"><draw:text-box><text:p text:style-name="fig."><draw:frame draw:style-name="fr24" draw:name="Imagen 174" text:anchor-type="paragraph" svg:width="17cm" style:rel-width="100%" svg:height="5.246cm" style:rel-height="scale" draw:z-index="142"><draw:image xlink:href="Pictures/10000000000005000000018B94E5A950.png" xlink:type="simple" xlink:show="embed" xlink:actuate="onLoad" draw:mime-type="image/png"/><svg:desc>Interfaz de usuario gráfica

Descripción generada automáticamente</svg:desc></draw:frame>fig. <text:sequence text:ref-name="reffig.26" text:name="fig." text:formula="ooow:fig.+1" style:num-format="1">27</text:sequence>: Pàgina per a la gestió i configuració de les entitats.</text:p></draw:text-box></draw:frame></text:p>
      <text:p text:style-name="P169"/>
      <text:p text:style-name="P166"><text:soft-page-break/><text:span text:style-name="T118">E</text:span>n l'apartat de les entitats tindrem un llistat de aquestes amb les seves columnes mes importants <text:span text:style-name="T119">i un boto per crear-ne de noves.</text:span></text:p>
      <text:h text:style-name="Heading_20_3" text:outline-level="3"><text:bookmark-start text:name="__RefHeading___Toc2401_1085490558"/>Llistat entitats<text:bookmark-end text:name="__RefHeading___Toc2401_1085490558"/></text:h>
      <text:p text:style-name="P170">En aquest llistat hi haurà les següents columnes:</text:p>
      <text:list text:style-name="L24">
        <text:list-item>
          <text:p text:style-name="P171"><text:span text:style-name="Fuente_20_de_20_párrafo_20_predeter.">Codi: </text:span>És el codi de la entitat.</text:p>
        </text:list-item>
        <text:list-item>
          <text:p text:style-name="P172"><text:span text:style-name="Fuente_20_de_20_párrafo_20_predeter."><text:span text:style-name="T59">Nom: </text:span></text:span>Nom de la entitat.</text:p>
        </text:list-item>
        <text:list-item>
          <text:p text:style-name="P172"><text:span text:style-name="Fuente_20_de_20_párrafo_20_predeter."><text:span text:style-name="T59">Codi DIR3: </text:span></text:span>Per cada entitat es posara un codi DIR3 únic.</text:p>
        </text:list-item>
        <text:list-item>
          <text:p text:style-name="P172"><text:span text:style-name="Fuente_20_de_20_párrafo_20_predeter."><text:span text:style-name="T59">Activa: </text:span></text:span>Si la entitat és activa o no.</text:p>
        </text:list-item>
        <text:list-item>
          <text:p text:style-name="P172"><text:span text:style-name="Fuente_20_de_20_párrafo_20_predeter."><text:span text:style-name="T59">Permisos: </text:span></text:span>Botó per entrar a l'edició dels permisos d'aquesta entitat.</text:p>
        </text:list-item>
        <text:list-item>
          <text:p text:style-name="P171"><text:span text:style-name="Fuente_20_de_20_párrafo_20_predeter.">Accions: </text:span><text:span text:style-name="T29">Boto per obrir un desplegable on podràs triar entre les opcions disponibles.</text:span></text:p>
          <text:p text:style-name="P171"><draw:frame draw:style-name="fr23" draw:name="Imagen 175" text:anchor-type="as-char" svg:y="0cm" svg:width="4.524cm" style:rel-width="scale" svg:height="3.812cm" style:rel-height="scale" draw:z-index="141"><draw:image xlink:href="Pictures/10000001000000AB000000906B1FA2B5.png" xlink:type="simple" xlink:show="embed" xlink:actuate="onLoad" draw:mime-type="image/png"/><svg:desc>Interfaz de usuario gráfica, Texto, Aplicación, Chat o mensaje de texto

Descripción generada automáticamente</svg:desc></draw:frame></text:p>
        </text:list-item>
      </text:list>
      <text:h text:style-name="Heading_20_3" text:outline-level="3"><text:bookmark-start text:name="__RefHeading___Toc2403_1085490558"/>Nova entitat<text:bookmark-end text:name="__RefHeading___Toc2403_1085490558"/></text:h>
      <text:p text:style-name="P173"><text:span text:style-name="T114">En prémer sobre el botó "Nova entitat" </text:span><text:span text:style-name="T114"><draw:frame draw:style-name="fr34" draw:name="Imagen15" text:anchor-type="as-char" svg:y="-0.656cm" svg:width="3.149cm" svg:height="0.96cm" draw:z-index="99"><draw:image xlink:href="Pictures/10000000000000EE00000059783CF345.png" xlink:type="simple" xlink:show="embed" xlink:actuate="onLoad" draw:mime-type="image/png"/></draw:frame></text:span><text:span text:style-name="T120">s</text:span><text:span text:style-name="T116">'</text:span><text:span text:style-name="T121">obr</text:span><text:span text:style-name="T114">e</text:span><text:span text:style-name="T121"> una modal on haurem de omplir els següents camps per crear una nova entitat:</text:span></text:p>
      <text:p text:style-name="P170"/>
      <text:p text:style-name="P170"><draw:frame draw:style-name="fr25" draw:name="Marc15" text:anchor-type="char" svg:width="16.274cm" draw:z-index="100"><draw:text-box fo:min-height="9.289cm"><text:p text:style-name="fig."><draw:frame draw:style-name="fr7" draw:name="Imatge11" text:anchor-type="paragraph" svg:width="16.274cm" style:rel-width="100%" svg:height="9.289cm" style:rel-height="scale" draw:z-index="101"><draw:image xlink:href="Pictures/10000001000002670000015FB028ABB5.png" xlink:type="simple" xlink:show="embed" xlink:actuate="onLoad" draw:mime-type="image/png"/></draw:frame>fig. <text:sequence text:ref-name="reffig.27" text:name="fig." text:formula="ooow:fig.+1" style:num-format="1">28</text:sequence>: Modal per crear una nova entitat com a superusuari.</text:p></draw:text-box></draw:frame><text:soft-page-break/></text:p>
      <text:list text:style-name="L25">
        <text:list-item>
          <text:p text:style-name="P174"><text:span text:style-name="Fuente_20_de_20_párrafo_20_predeter."><text:span text:style-name="T59">Codi. </text:span></text:span>(Camp obligatori) Codi lliure per identificar l'entitat.</text:p>
        </text:list-item>
        <text:list-item>
          <text:p text:style-name="P174"><text:span text:style-name="Fuente_20_de_20_párrafo_20_predeter."><text:span text:style-name="T59">Nom. </text:span></text:span>(Camp obligatori) Nom de l'entitat.</text:p>
        </text:list-item>
        <text:list-item>
          <text:p text:style-name="P174"><text:span text:style-name="Fuente_20_de_20_párrafo_20_predeter."><text:span text:style-name="T59">CIF. </text:span></text:span>(Camp obligatori) Es farà servir el CIF de l’entitat.</text:p>
        </text:list-item>
        <text:list-item>
          <text:p text:style-name="P174"><text:span text:style-name="Fuente_20_de_20_párrafo_20_predeter."><text:span text:style-name="T59">Codi Dir3. </text:span></text:span>(Camp obligatori) Codi DIR3 de l'entitat. servirà com a codi DIR3 arrel per crear bústies per unitats organitzatives a l'arbre d'unitats organitzatives de l'entitat.</text:p>
        </text:list-item>
        <text:list-item>
          <text:p text:style-name="P174"><text:span text:style-name="Fuente_20_de_20_párrafo_20_predeter."><text:span text:style-name="T59">Logo capçalera. </text:span></text:span>Es podrà introduir una imatge que farà de logo. Per defecte té assignada una, però es pot llevar o canviar. </text:p>
        </text:list-item>
        <text:list-item>
          <text:p text:style-name="P175">Color de fons. </text:p>
        </text:list-item>
        <text:list-item>
          <text:p text:style-name="P176">Color de la lletra. </text:p>
        </text:list-item>
      </text:list>
      <text:p text:style-name="P177">Una vegada omplerts tots els camps podrem polsar el botó de guardar per crear l'entitat.</text:p>
      <text:h text:style-name="Heading_20_3" text:outline-level="3"><text:bookmark-start text:name="__RefHeading___Toc2405_1085490558"/>Gestió de permisos<text:bookmark-end text:name="__RefHeading___Toc2405_1085490558"/></text:h>
      <text:p text:style-name="P178">Per gestionar els permisos d'una entitat haurem de polsar el boto amb el símbol de la clau assenyalat a la imatge anterior, el botó també ens mostrarà els permisos que té actualment.</text:p>
      <text:p text:style-name="P179"><draw:frame draw:style-name="fr30" draw:name="Marc16" text:anchor-type="paragraph" svg:width="17cm" draw:z-index="44"><draw:text-box fo:min-height="4.163cm"><text:p text:style-name="fig."><draw:frame draw:style-name="fr7" draw:name="Imagen18" text:anchor-type="paragraph" svg:width="17cm" style:rel-width="100%" svg:height="4.163cm" style:rel-height="scale" draw:z-index="45"><draw:image xlink:href="Pictures/10000000000004A000000122948EE0CF.png" xlink:type="simple" xlink:show="embed" xlink:actuate="onLoad" draw:mime-type="image/png"/></draw:frame>fig. <text:sequence text:ref-name="reffig.28" text:name="fig." text:formula="ooow:fig.+1" style:num-format="1">29</text:sequence>: Detall de localització per anar als permisos d’una entitat. </text:p></draw:text-box></draw:frame><text:soft-page-break/></text:p>
      <text:p text:style-name="P179"/>
      <text:p text:style-name="P179">Una vegada polsat el botó apareixerà la següent pantalla amb les següents columnes, i un botó de creació de permisos: </text:p>
      <text:p text:style-name="P179"><draw:frame draw:style-name="fr30" draw:name="Marc17" text:anchor-type="paragraph" svg:width="17cm" draw:z-index="46"><draw:text-box fo:min-height="5.461cm"><text:p text:style-name="fig."><draw:frame draw:style-name="fr7" draw:name="Imagen26" text:anchor-type="paragraph" svg:width="17cm" style:rel-width="100%" svg:height="5.461cm" style:rel-height="scale" draw:z-index="47"><draw:image xlink:href="Pictures/10000000000004A80000017F091EA820.png" xlink:type="simple" xlink:show="embed" xlink:actuate="onLoad" draw:mime-type="image/png"/></draw:frame>fig. <text:sequence text:ref-name="reffig.29" text:name="fig." text:formula="ooow:fig.+1" style:num-format="1">30</text:sequence>: <text:s/>Exemple de llistat dels permisos d’una entitat.</text:p></draw:text-box></draw:frame></text:p>
      <text:list text:style-name="L26">
        <text:list-item>
          <text:p text:style-name="P180">Tipus: <text:span text:style-name="T29">Es el tipus de permís que volem crear.</text:span></text:p>
        </text:list-item>
        <text:list-item>
          <text:p text:style-name="P180">Principal: <text:span text:style-name="T29">Es l'usuari pel qual va destinat el permís.</text:span></text:p>
        </text:list-item>
        <text:list-item>
          <text:p text:style-name="P180">Administració: <text:span text:style-name="T29">Si vols que el permís doni accés a l'espai d'administració.</text:span></text:p>
        </text:list-item>
        <text:list-item>
          <text:p text:style-name="P180">Usuari: <text:span text:style-name="T29">Si vols que el permís doni accés a l'espai d'usuari.</text:span></text:p>
        </text:list-item>
        <text:list-item>
          <text:p text:style-name="P181">Accions: <text:span text:style-name="T29">Els permisos tindran una serie de accions per interactuar amb ells</text:span></text:p>
        </text:list-item>
      </text:list>
      <text:p text:style-name="P182">Aquests mateixos camps sortiran a la modal de creació de permisos:</text:p>
      <text:p text:style-name="P182"><draw:frame draw:style-name="fr30" draw:name="Marc18" text:anchor-type="paragraph" svg:width="17cm" draw:z-index="48"><draw:text-box fo:min-height="5.948cm"><text:p text:style-name="fig."><draw:frame draw:style-name="fr7" draw:name="Imagen29" text:anchor-type="paragraph" svg:width="17cm" style:rel-width="100%" svg:height="5.948cm" style:rel-height="scale" draw:z-index="49"><draw:image xlink:href="Pictures/100000000000037600000136ACCEED93.png" xlink:type="simple" xlink:show="embed" xlink:actuate="onLoad" draw:mime-type="image/png"/></draw:frame>fig. <text:sequence text:ref-name="reffig.30" text:name="fig." text:formula="ooow:fig.+1" style:num-format="1">31</text:sequence>: Formulari per crear un nou permís per una entitat. </text:p></draw:text-box></draw:frame><text:soft-page-break/></text:p>
      <text:p text:style-name="P182">A la qual si els omplim correctament i polsem el botó de guardar li crearem el permís a l'entitat corresponent.</text:p>
      <text:h text:style-name="Heading_20_3" text:outline-level="3"><text:bookmark-start text:name="__RefHeading___Toc2407_1085490558"/>Accions <text:span text:style-name="T122">(Permisos)</text:span><text:bookmark-end text:name="__RefHeading___Toc2407_1085490558"/></text:h>
      <text:p text:style-name="P183"><draw:frame draw:style-name="fr4" draw:name="Imagen30" text:anchor-type="paragraph" svg:x="2.893cm" svg:y="0.196cm" svg:width="9.499cm" svg:height="2.91cm" draw:z-index="50"><draw:image xlink:href="Pictures/10000000000001670000006EB543C092.png" xlink:type="simple" xlink:show="embed" xlink:actuate="onLoad" draw:mime-type="image/png"/></draw:frame></text:p>
      <text:p text:style-name="P183"/>
      <text:p text:style-name="P183"/>
      <text:p text:style-name="P183"/>
      <text:p text:style-name="P183"/>
      <text:p text:style-name="P183"/>
      <text:list text:style-name="L27">
        <text:list-item>
          <text:p text:style-name="P184">Modificar: <text:s/><text:span text:style-name="T29">S'obrirà una modal en la qual podrem modificar tots els camps del permís.</text:span></text:p>
        </text:list-item>
        <text:list-item>
          <text:p text:style-name="P184">Esborrar: <text:span text:style-name="T29">S'obrira un panell de confirmació per saber si realment vols esborrar el permís.</text:span></text:p>
        </text:list-item>
      </text:list>
      <text:h text:style-name="Heading_20_3" text:outline-level="3"><text:bookmark-start text:name="__RefHeading___Toc2409_1085490558"/>Accions (Entitats)<text:bookmark-end text:name="__RefHeading___Toc2409_1085490558"/></text:h>
      <text:p text:style-name="P185"><draw:frame draw:style-name="fr4" draw:name="Imagen31" text:anchor-type="paragraph" svg:x="6.08cm" svg:y="-0.044cm" svg:width="4.842cm" svg:height="3.916cm" draw:z-index="51"><draw:image xlink:href="Pictures/10000000000000B70000009492EFDDEC.png" xlink:type="simple" xlink:show="embed" xlink:actuate="onLoad" draw:mime-type="image/png"/></draw:frame></text:p>
      <text:p text:style-name="P185"/>
      <text:p text:style-name="P185"/>
      <text:p text:style-name="P185"/>
      <text:p text:style-name="P186"/>
      <text:list text:style-name="L28">
        <text:list-item>
          <text:p text:style-name="P187"/>
        </text:list-item>
        <text:list-item>
          <text:p text:style-name="P187">Modificar: <text:s/><text:span text:style-name="T29">S'obrirà una modal en la qual podrem modificar tots els camps </text:span><text:span text:style-name="T123">de l'entitat</text:span><text:span text:style-name="T29">.</text:span></text:p>
        </text:list-item>
        <text:list-item>
          <text:p text:style-name="P188">Desactivar: <text:span text:style-name="T29">Es desactivara la entitat.</text:span></text:p>
        </text:list-item>
        <text:list-item>
          <text:p text:style-name="P189"><text:span text:style-name="T124">Esborrar: </text:span><text:span text:style-name="T125">S'obrira un panell de confirmació per saber si realment vols esborrar el </text:span><text:span text:style-name="T123">l'entitat</text:span><text:span text:style-name="T126">.</text:span></text:p>
        </text:list-item>
      </text:list>
      <text:h text:style-name="Heading_20_2" text:outline-level="2"><text:bookmark-start text:name="__RefHeading___Toc2411_1085490558"/><text:soft-page-break/>M<text:span text:style-name="T127">onitoritzar</text:span><text:bookmark-end text:name="__RefHeading___Toc2411_1085490558"/></text:h>
      <text:p text:style-name="P190">A la funcionalitat per monitorar haurem de seleccionar quins tipus de registres volem supervisar a partir del desplegable que apareixerà quant polsem el botó de monitoritzar.</text:p>
      <text:list text:style-name="L29">
        <text:list-item>
          <text:p text:style-name="P191">Integracions<text:span text:style-name="T128">: </text:span><text:span text:style-name="T129">Peticions amb sistemes integrats amb DISTRIBUCIO com d'Arxiu, el Portafirmes o dades externes.</text:span></text:p>
        </text:list-item>
        <text:list-item>
          <text:p text:style-name="P191">Excepcions<text:span text:style-name="T128">: </text:span><text:span text:style-name="T129">Pàgina on es llisten les darreres excepcions no controlades de DISTRIBUCIO.</text:span></text:p>
        </text:list-item>
        <text:list-item>
          <text:p text:style-name="P192">Mètr<text:span text:style-name="T128">i</text:span>ques<text:span text:style-name="T128">: </text:span><text:span text:style-name="T129">Pàgina per consultar i descarregar mètriques mesurades dins de DISTRIBUCIO.</text:span></text:p>
        </text:list-item>
        <text:list-item>
          <text:p text:style-name="P193"><text:span text:style-name="T130">Anotacions pendents d'Arxiu</text:span><text:span text:style-name="T131">: Pàgina per consultar el número d'anotacions pendents de guardar a l'Arxiu i l'histograma de les darreres 2 hores.</text:span></text:p>
        </text:list-item>
        <text:list-item>
          <text:p text:style-name="P194"><text:span text:style-name="Fuente_20_de_20_párrafo_20_predeter."><text:span text:style-name="T59">Monitor de sistema</text:span></text:span>: S’obre una modal amb dues pipelles: </text:p>
          <text:list>
            <text:list-item>
              <text:p text:style-name="P194">Sistema -&gt; Informació rellevant de l’ordinador. </text:p>
            </text:list-item>
            <text:list-item>
              <text:p text:style-name="P195">Fils d’execució -&gt; On podem veure tots els fils utilitzats per dur a terme la tasca. </text:p>
            </text:list-item>
          </text:list>
        </text:list-item>
      </text:list>
      <text:h text:style-name="Heading_20_3" text:outline-level="3"><text:bookmark-start text:name="__RefHeading___Toc2413_1085490558"/>Monitorar integracions<text:bookmark-end text:name="__RefHeading___Toc2413_1085490558"/></text:h>
      <text:p text:style-name="P196"><text:span text:style-name="T72">E</text:span><text:span text:style-name="T132">n aquesta pantalla tindrem diferents pestanyes dels diferents objectes d'integraci</text:span><text:span text:style-name="T133">ó, com són:</text:span></text:p>
      <text:list text:style-name="L30">
        <text:list-item>
          <text:p text:style-name="P197">Unitats administratives.</text:p>
        </text:list-item>
        <text:list-item>
          <text:p text:style-name="P197">Arxiu digital.</text:p>
        </text:list-item>
        <text:list-item>
          <text:p text:style-name="P197">Dades externes.</text:p>
        </text:list-item>
        <text:list-item>
          <text:p text:style-name="P197">Signatura.</text:p>
        </text:list-item>
        <text:list-item>
          <text:p text:style-name="P197">Valida signatura.</text:p>
        </text:list-item>
        <text:list-item>
          <text:p text:style-name="P197">Gestió documental.</text:p>
        </text:list-item>
        <text:list-item>
          <text:p text:style-name="P197">Bústia WS.</text:p>
        </text:list-item>
        <text:list-item>
          <text:p text:style-name="P197">Procediments.</text:p>
        </text:list-item>
        <text:list-item>
          <text:p text:style-name="P197">Distribució. </text:p>
        </text:list-item>
        <text:list-item>
          <text:p text:style-name="P198">Serveis.</text:p>
        </text:list-item>
        <text:list-item>
          <text:p text:style-name="P199"><text:span text:style-name="Fuente_20_de_20_párrafo_20_predeter.">Backoffice.</text:span></text:p>
        </text:list-item>
      </text:list>
      <text:p text:style-name="P200"/>
      <text:p text:style-name="P200">Aquestes pestanyes, en alguns casos, tenen un número vermell a la dreta que indica els errors que hi ha a l’interior. Aquest tipus d'objectes tenen uns camps en comú que es mostraran al llistat com a columnes.</text:p>
      <text:p text:style-name="P200"><draw:frame draw:style-name="fr1" draw:name="Frame19" text:anchor-type="paragraph" svg:width="17cm" draw:z-index="73"><draw:text-box fo:min-height="3.814cm"><text:p text:style-name="fig."><text:span text:style-name="T17"><text:line-break/></text:span><draw:frame draw:style-name="fr35" draw:name="Imatge12" text:anchor-type="char" svg:width="17cm" svg:height="4.641cm" draw:z-index="102"><draw:image xlink:href="Pictures/1000000100000754000001FB7DC1C372.png" xlink:type="simple" xlink:show="embed" xlink:actuate="onLoad" draw:mime-type="image/png"/></draw:frame>fig. <text:sequence text:ref-name="reffig.31" text:name="fig." text:formula="ooow:fig.+1" style:num-format="1">32</text:sequence>: Exemple de pantalla amb el llistat d'integracions d'usuaris.</text:p></draw:text-box></draw:frame><text:soft-page-break/></text:p>
      <text:p text:style-name="P200">Aquestes columnes son: </text:p>
      <text:list text:style-name="L31">
        <text:list-item>
          <text:p text:style-name="P201">Data: <text:span text:style-name="T29">La data en que es va crear l'objecte.</text:span></text:p>
        </text:list-item>
        <text:list-item>
          <text:p text:style-name="P201">Descripció: <text:span text:style-name="T29">Breu descripció de l'objecte.</text:span></text:p>
        </text:list-item>
        <text:list-item>
          <text:p text:style-name="P201">Tipus: <text:span text:style-name="T29">El tipus d'objecte.</text:span></text:p>
        </text:list-item>
        <text:list-item>
          <text:p text:style-name="P202"><text:span text:style-name="T59">Usuari</text:span>: Usuari de l’objecte.</text:p>
        </text:list-item>
        <text:list-item>
          <text:p text:style-name="P202"><text:span text:style-name="T59">Entitat</text:span>: Entitat de l’objecte.</text:p>
        </text:list-item>
        <text:list-item>
          <text:p text:style-name="P201">Temps resposta: <text:span text:style-name="T29">El temps en que el receptor ha respost a l'enviament de la integració.</text:span></text:p>
        </text:list-item>
        <text:list-item>
          <text:p text:style-name="P201">Estat: <text:span text:style-name="T29"><text:s/></text:span><text:span text:style-name="T134">Estat en el que queda l'objecte després de la integració.</text:span></text:p>
        </text:list-item>
        <text:list-item>
          <text:p text:style-name="P203">Detalls: <text:span text:style-name="T29">Boto que quant el polsem s'obrira una modal en la qual es mostraran tots els detalls de l'objecte sumant-li els camps específics de cada objecte concret.</text:span></text:p>
        </text:list-item>
      </text:list>
      <text:p text:style-name="P204">A part de les columnes, també comparteixen un filtre a la part superior, on es pot filtrar pels camps següents:</text:p>
      <text:list text:style-name="L32">
        <text:list-item>
          <text:p text:style-name="P205">Entitat</text:p>
        </text:list-item>
        <text:list-item>
          <text:p text:style-name="P205">Estat</text:p>
        </text:list-item>
        <text:list-item>
          <text:p text:style-name="P205">Tip<text:span text:style-name="T135">us</text:span></text:p>
        </text:list-item>
        <text:list-item>
          <text:p text:style-name="P205">Descripció</text:p>
        </text:list-item>
        <text:list-item>
          <text:p text:style-name="P205">Data <text:span text:style-name="T135">d’</text:span>inici i <text:span text:style-name="T135">de </text:span>fi</text:p>
        </text:list-item>
        <text:list-item>
          <text:p text:style-name="P205">Usuari</text:p>
        </text:list-item>
      </text:list>
      <text:p text:style-name="P206">Finalment, al costat dels botons per aplicar i netejar el filtre, hi ha un botó de diagnòstic. En prémer-lo, s'obre una finestra modal amb el diagnòstic de les integracions i els errors detectats, si n'hi ha.</text:p>
      <text:p text:style-name="P207"/>
      <text:p text:style-name="P207"><draw:frame draw:style-name="fr36" draw:name="Marco1" text:anchor-type="paragraph" svg:width="17cm" draw:z-index="163"><draw:text-box fo:min-height="3.865cm"><text:p text:style-name="fig."><draw:frame draw:style-name="fr2" draw:name="Image50 Copia 1" text:anchor-type="as-char" svg:width="16.898cm" style:rel-width="100%" svg:height="4.537cm" style:rel-height="scale" draw:z-index="164"><draw:image xlink:href="Pictures/100000010000073C000001C925FE2C38.png" xlink:type="simple" xlink:show="embed" xlink:actuate="onLoad" draw:mime-type="image/png"/></draw:frame><text:span text:style-name="T17"><text:line-break/></text:span>fig. <text:sequence text:ref-name="reffig.40" text:name="fig." text:formula="ooow:fig.+1" style:num-format="1">33</text:sequence>: Exemple de <text:span text:style-name="T136">diagnòstic de les integracions</text:span>.</text:p></draw:text-box></draw:frame><text:soft-page-break/></text:p>
      <text:p text:style-name="P207"/>
      <text:h text:style-name="Heading_20_3" text:outline-level="3"><text:bookmark-start text:name="__RefHeading___Toc2415_1085490558"/>Monitorar excepcions<text:bookmark-end text:name="__RefHeading___Toc2415_1085490558"/></text:h>
      <text:p text:style-name="P208">En aquesta pantalla es mostrarà un llistat de totes les excepcions que s'hauran generat.</text:p>
      <text:p text:style-name="P208">Aquestes excepcions tindran com camps principals les columnes que es veuen en el llistat.</text:p>
      <text:list text:style-name="L33">
        <text:list-item>
          <text:p text:style-name="P209">Data.</text:p>
        </text:list-item>
        <text:list-item>
          <text:p text:style-name="P209">Tipus.</text:p>
        </text:list-item>
        <text:list-item>
          <text:p text:style-name="P209">Objecte id.</text:p>
        </text:list-item>
        <text:list-item>
          <text:p text:style-name="P209">Objecte tipus.</text:p>
        </text:list-item>
        <text:list-item>
          <text:p text:style-name="P209">Missatge.</text:p>
        </text:list-item>
        <text:list-item>
          <text:p text:style-name="P209">Detalls: <text:span text:style-name="T29">Botó per obrir una modal i veure els detalls de la excepció.</text:span></text:p>
        </text:list-item>
      </text:list>
      <text:p text:style-name="P210"/>
      <text:p text:style-name="P210"><draw:frame draw:style-name="fr36" draw:name="Frame20" text:anchor-type="paragraph" svg:width="17cm" draw:z-index="74"><draw:text-box fo:min-height="3.865cm"><text:p text:style-name="fig."><draw:frame draw:style-name="fr2" draw:name="Image50" text:anchor-type="as-char" svg:width="16.898cm" style:rel-width="100%" svg:height="3.84cm" style:rel-height="scale" draw:z-index="94"><draw:image xlink:href="Pictures/10000000000003CC000000DDB923AB86.png" xlink:type="simple" xlink:show="embed" xlink:actuate="onLoad" draw:mime-type="image/png"/></draw:frame><text:span text:style-name="T17"><text:line-break/></text:span>fig. <text:sequence text:ref-name="reffig.32" text:name="fig." text:formula="ooow:fig.+1" style:num-format="1">34</text:sequence>: Exemple de llistat d'excepcions.</text:p></draw:text-box></draw:frame></text:p>
      <text:p text:style-name="P210"/>
      <text:p text:style-name="P211">En prémer sobre el botó "Detall" sobre una modal on es pot visualitzar el missatge i la traça de l'excepció.</text:p>
      <text:p text:style-name="Standard"><draw:frame draw:style-name="fr1" draw:name="Frame21" text:anchor-type="paragraph" svg:width="17cm" draw:z-index="77"><draw:text-box fo:min-height="10.421cm"><text:p text:style-name="fig."><draw:frame draw:style-name="fr37" draw:name="Image51" text:anchor-type="as-char" svg:width="17cm" style:rel-width="100%" svg:height="10.421cm" style:rel-height="scale" draw:z-index="93"><draw:image xlink:href="Pictures/10000000000002BF000001AF010F605E.png" xlink:type="simple" xlink:show="embed" xlink:actuate="onLoad" draw:mime-type="image/png"/></draw:frame><text:span text:style-name="T17"><text:line-break/></text:span>fig. <text:sequence text:ref-name="reffig.33" text:name="fig." text:formula="ooow:fig.+1" style:num-format="1">35</text:sequence>: Exemple de modal amb el detall de l'excepció.</text:p></draw:text-box></draw:frame><text:soft-page-break/></text:p>
      <text:h text:style-name="Heading_20_3" text:outline-level="3"><text:bookmark-start text:name="__RefHeading___Toc37404_3531032951"/>Mètriques<text:bookmark-end text:name="__RefHeading___Toc37404_3531032951"/></text:h>
      <text:p text:style-name="P212"><text:span text:style-name="T137">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213"><draw:frame draw:style-name="fr36" draw:name="Frame24" text:anchor-type="paragraph" svg:width="17cm" draw:z-index="84"><draw:text-box fo:min-height="9.001cm"><text:p text:style-name="fig."><draw:frame draw:style-name="fr2" draw:name="Image56" text:anchor-type="as-char" svg:width="16.898cm" style:rel-width="100%" svg:height="8.946cm" style:rel-height="scale" draw:z-index="119"><draw:image xlink:href="Pictures/100000000000041A0000022CE460ADAC.png" xlink:type="simple" xlink:show="embed" xlink:actuate="onLoad" draw:mime-type="image/png"/></draw:frame><text:span text:style-name="T17"><text:line-break/></text:span>fig. <text:sequence text:ref-name="reffig.34" text:name="fig." text:formula="ooow:fig.+1" style:num-format="1">36</text:sequence>: Modal de mètriques de les operacions a DISTRIBUCIO.</text:p></draw:text-box></draw:frame><text:soft-page-break/></text:p>
      <text:p text:style-name="P213">El format d'exportació i importació de les mètriques és format JSON.</text:p>
      <text:h text:style-name="Heading_20_3" text:outline-level="3"><text:bookmark-start text:name="__RefHeading___Toc258224_83721363"/>Monitor anotacions pendents d'Arxiu<text:bookmark-end text:name="__RefHeading___Toc258224_83721363"/></text:h>
      <text:p text:style-name="P214">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214">Adicionalment es mostra un histograma per mitut de les dues darreres hores amb les següents dades:</text:p>
      <text:list text:style-name="L34">
        <text:list-item>
          <text:p text:style-name="P215"><draw:frame draw:style-name="fr38" draw:name="Image66" text:anchor-type="as-char" svg:width="3.096cm" svg:height="0.476cm" draw:z-index="122"><draw:image xlink:href="Pictures/100000000000007500000012CE62DA0E.png" xlink:type="simple" xlink:show="embed" xlink:actuate="onLoad" draw:mime-type="image/png"/></draw:frame>: Evolució del número d'anotacions pendent de processar-se per la tasca en segon pla en cada minut.</text:p>
        </text:list-item>
        <text:list-item>
          <text:p text:style-name="P215"><draw:frame draw:style-name="fr39" draw:name="Image67" text:anchor-type="as-char" svg:width="3.466cm" svg:height="0.529cm" draw:z-index="123"><draw:image xlink:href="Pictures/100000000000008300000014F23A1794.png" xlink:type="simple" xlink:show="embed" xlink:actuate="onLoad" draw:mime-type="image/png"/></draw:frame>:Evolució del número d'anotacions processades per minut per la tasca en segon pla de processament d'anotacions pendents d'Arxiu.</text:p>
        </text:list-item>
        <text:list-item>
          <text:p text:style-name="P215"><draw:frame draw:style-name="fr39" draw:name="Image68" text:anchor-type="as-char" svg:width="2.805cm" svg:height="0.529cm" draw:z-index="124"><draw:image xlink:href="Pictures/100000000000006A00000014D6DAA008.png" xlink:type="simple" xlink:show="embed" xlink:actuate="onLoad" draw:mime-type="image/png"/></draw:frame>: Evolució del número d'errors capturats per minut en el processament per guardar l'anotació o els seus annexos a l'Arxiu.</text:p>
        </text:list-item>
        <text:list-item>
          <text:p text:style-name="P215"><draw:frame draw:style-name="fr29" draw:name="Image69" text:anchor-type="as-char" svg:width="5.08cm" svg:height="0.582cm" draw:z-index="130"><draw:image xlink:href="Pictures/10000000000000C000000016778A55FD.png" xlink:type="simple" xlink:show="embed" xlink:actuate="onLoad" draw:mime-type="image/png"/></draw:frame>: Evolució del temps mitjà de processament en segons de les anotacions processades per cada minut.</text:p>
        </text:list-item>
      </text:list>
      <text:p text:style-name="P216"/>
      <text:p text:style-name="Standard"><draw:frame draw:style-name="fr40" draw:name="Frame5" text:anchor-type="paragraph" svg:x="-0.236cm" svg:y="0.016cm" svg:width="17.334cm" draw:z-index="87"><draw:text-box fo:min-height="9.137cm"><text:p text:style-name="fig."><draw:frame draw:style-name="fr41" draw:name="Image25" text:anchor-type="as-char" svg:y="-8.719cm" svg:width="17cm" style:rel-width="100%" svg:height="8.961cm" style:rel-height="scale" draw:z-index="125"><draw:image xlink:href="Pictures/10000000000005430000034BD00256D5.png" xlink:type="simple" xlink:show="embed" xlink:actuate="onLoad" draw:mime-type="image/png"/></draw:frame><text:span text:style-name="T17"><text:line-break/></text:span>fig. <text:sequence text:ref-name="reffig.35" text:name="fig." text:formula="ooow:fig.+1" style:num-format="1">37</text:sequence>: Pàgina pel monitor d'anotacions pendents d'Arxiu.</text:p></draw:text-box></draw:frame><text:soft-page-break/></text:p>
      <text:p text:style-name="Standard"/>
      <text:h text:style-name="Heading_20_3" text:outline-level="3" text:is-list-header="true"><text:bookmark-start text:name="__RefHeading___Toc258224_837213631"/><text:span text:style-name="T138">4.1.2.5.</text:span> Monitor <text:span text:style-name="T138">de sistema</text:span><text:bookmark-end text:name="__RefHeading___Toc258224_837213631"/></text:h>
      <text:p text:style-name="P217">Aquí tenim dos pestanyes: </text:p>
      <text:list text:style-name="L35">
        <text:list-item>
          <text:p text:style-name="P218">Sistema. </text:p>
        </text:list-item>
      </text:list>
      <text:p text:style-name="P219"><draw:frame draw:style-name="fr18" draw:name="Marc19" text:anchor-type="as-char" svg:y="0cm" svg:width="17cm" style:rel-width="scale" svg:height="7.345cm" style:rel-height="scale-min" draw:z-index="126"><draw:text-box><text:p text:style-name="fig."><draw:frame draw:style-name="fr24" draw:name="Imagen 178" text:anchor-type="paragraph" svg:width="17cm" style:rel-width="100%" svg:height="7.345cm" style:rel-height="scale" draw:z-index="127"><draw:image xlink:href="Pictures/100000010000051E00000236D198385B.png" xlink:type="simple" xlink:show="embed" xlink:actuate="onLoad" draw:mime-type="image/png"/><svg:desc>Interfaz de usuario gráfica, Texto, Aplicación, Correo electrónico

Descripción generada automáticamente</svg:desc></draw:frame>fig. <text:sequence text:ref-name="reffig.36" text:name="fig." text:formula="ooow:fig.+1" style:num-format="1">38</text:sequence>: <text:s/>Detall pipella sistema</text:p></draw:text-box></draw:frame></text:p>
      <text:p text:style-name="P219"/>
      <text:p text:style-name="P219"/>
      <text:p text:style-name="P219"><text:soft-page-break/></text:p>
      <text:list text:continue-numbering="true" text:style-name="L35">
        <text:list-item>
          <text:p text:style-name="P218">Fils execució. </text:p>
        </text:list-item>
      </text:list>
      <text:p text:style-name="P219"><draw:frame draw:style-name="fr18" draw:name="Marc20" text:anchor-type="as-char" svg:y="0cm" svg:width="17cm" style:rel-width="scale" svg:height="7.318cm" style:rel-height="scale-min" draw:z-index="128"><draw:text-box><text:p text:style-name="fig."><draw:frame draw:style-name="fr24" draw:name="Imagen 180" text:anchor-type="paragraph" svg:width="17cm" style:rel-width="100%" svg:height="7.318cm" style:rel-height="scale" draw:z-index="129"><draw:image xlink:href="Pictures/100000010000051C00000233BBA3E2A9.png" xlink:type="simple" xlink:show="embed" xlink:actuate="onLoad" draw:mime-type="image/png"/><svg:desc>Tabla

Descripción generada automáticamente</svg:desc></draw:frame>fig. <text:sequence text:ref-name="reffig.37" text:name="fig." text:formula="ooow:fig.+1" style:num-format="1">39</text:sequence>: Detall pipella Fils execució.</text:p></draw:text-box></draw:frame></text:p>
      <text:p text:style-name="P219"/>
      <text:p text:style-name="P219"/>
      <text:h text:style-name="Heading_20_2" text:outline-level="2"><text:bookmark-start text:name="__RefHeading___Toc37406_35310329511"/>Configuració<text:bookmark-end text:name="__RefHeading___Toc37406_35310329511"/></text:h>
      <text:p text:style-name="P219">Aquest botó ens mostrarà un desplegable amb els tipus de configuració que tenim per l’aplicació. </text:p>
      <text:h text:style-name="Heading_20_3" text:outline-level="3"><text:bookmark-start text:name="__RefHeading___Toc258224_8372136311 Copia 1"/>P<text:span text:style-name="T139">ropietats de configuració</text:span><text:bookmark-end text:name="__RefHeading___Toc258224_8372136311 Copia 1"/></text:h>
      <text:p text:style-name="P219">A aquesta pàgina tenim 4 apartats: </text:p>
      <text:list text:style-name="L36">
        <text:list-item>
          <text:p text:style-name="P220">Configuracions generals, on es fa referència a les configuracions generals de l’aplicació:</text:p>
          <text:p text:style-name="P221">Aquí ens trobam una pantalla per configurar via web les propietats de configuració de l’aplicació mitjançant un formulari.</text:p>
        </text:list-item>
        <text:list-item>
          <text:p text:style-name="P220">Enviament de correus, on es troba parametritzat: </text:p>
          <text:list>
            <text:list-item>
              <text:p text:style-name="P220">Remitent del correus que s’envien des de l’aplicació. </text:p>
            </text:list-item>
            <text:list-item>
              <text:p text:style-name="P220">JDNI email. </text:p>
            </text:list-item>
          </text:list>
        </text:list-item>
        <text:list-item>
          <text:p text:style-name="P220">Configuració de les tasques periòdiques, on trobem diferents tipus de tasques amb les seves configuracions: </text:p>
          <text:list>
            <text:list-item>
              <text:p text:style-name="P220">Tasca periòdica de guardar annexos a l’arxiu. </text:p>
            </text:list-item>
            <text:list-item>
              <text:p text:style-name="P220">Tasca periòdica d’enviament d’anotacions al backoffice. </text:p>
            </text:list-item>
            <text:list-item>
              <text:p text:style-name="P220">Tasca periòdica d’aplicació de regles del tipus backoffice. </text:p>
            </text:list-item>
            <text:list-item>
              <text:p text:style-name="P220">Tasca periòdica de tancar contenidors pendents. </text:p>
            </text:list-item>
            <text:list-item>
              <text:p text:style-name="P220"><text:soft-page-break/>Tasca periòdica de enviar emails no agrupats.</text:p>
            </text:list-item>
            <text:list-item>
              <text:p text:style-name="P220">Tasca periòdica de enviar emails agrupats. </text:p>
            </text:list-item>
          </text:list>
        </text:list-item>
      </text:list>
      <text:p text:style-name="P222">A totes les tasques tenim un camp on posarem, en milisegons, cada quan volem que s’executi la tasca. </text:p>
      <text:list text:continue-numbering="true" text:style-name="L36">
        <text:list-item>
          <text:p text:style-name="P220">Plugins de l’aplicació. Aquí trobam totes les configuracions que tenen cadascun dels plugins adherits a l’aplicació. A la versió 0.9.41 tenim incorporats els plugins: </text:p>
          <text:list>
            <text:list-item>
              <text:p text:style-name="P220">Configuració de l’arxiu. </text:p>
            </text:list-item>
            <text:list-item>
              <text:p text:style-name="P220">Unitats organitzatives. </text:p>
            </text:list-item>
            <text:list-item>
              <text:p text:style-name="P220">Gestió documental. </text:p>
            </text:list-item>
            <text:list-item>
              <text:p text:style-name="P220">Plugin d’usuaris. </text:p>
            </text:list-item>
            <text:list-item>
              <text:p text:style-name="P220">Distribució. </text:p>
            </text:list-item>
            <text:list-item>
              <text:p text:style-name="P220">Consulta de procediments. </text:p>
            </text:list-item>
            <text:list-item>
              <text:p text:style-name="P220">Dades externes. </text:p>
            </text:list-item>
            <text:list-item>
              <text:p text:style-name="P220">Signatura. </text:p>
            </text:list-item>
          </text:list>
        </text:list-item>
      </text:list>
      <text:p text:style-name="P219">Validació de firmes.</text:p>
      <text:h text:style-name="Heading_20_2" text:outline-level="2"><text:bookmark-start text:name="__RefHeading___Toc37406_3531032951"/>Avisos<text:bookmark-end text:name="__RefHeading___Toc37406_3531032951"/></text:h>
      <text:p text:style-name="P223">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223"><draw:frame draw:style-name="fr30" draw:name="Frame22" text:anchor-type="paragraph" svg:width="17cm" draw:z-index="78"><draw:text-box fo:min-height="5.325cm"><text:p text:style-name="fig."><draw:frame draw:style-name="fr2" draw:name="Image52" text:anchor-type="as-char" svg:width="17cm" style:rel-width="100%" svg:height="5.325cm" style:rel-height="scale" draw:z-index="91"><draw:image xlink:href="Pictures/100000000000050000000191023EBA7A.png" xlink:type="simple" xlink:show="embed" xlink:actuate="onLoad" draw:mime-type="image/png"/></draw:frame><text:span text:style-name="T17"><text:line-break/></text:span>fig. <text:sequence text:ref-name="reffig.38" text:name="fig." text:formula="ooow:fig.+1" style:num-format="1">40</text:sequence>: Pàgina de gestió d'avisos.</text:p></draw:text-box></draw:frame></text:p>
      <text:p text:style-name="P223">El formulari de creació i modificació d'avisos conté els següents camps:</text:p>
      <text:list text:style-name="L37">
        <text:list-item>
          <text:p text:style-name="P224"><draw:frame draw:style-name="fr42" draw:name="Image53" text:anchor-type="paragraph" svg:width="17cm" svg:height="9.502cm" draw:z-index="79"><draw:image xlink:href="Pictures/10000000000002C80000018E3B1FAEAE.png" xlink:type="simple" xlink:show="embed" xlink:actuate="onLoad" draw:mime-type="image/png"/></draw:frame><text:soft-page-break/>Assumpte:<text:span text:style-name="T29"> Títol de l'avís per mostrar als usuaris.</text:span></text:p>
        </text:list-item>
        <text:list-item>
          <text:p text:style-name="P224">Missatge<text:span text:style-name="T29">: Cos de l'avís quan l'usuari expandeixi l'avís.</text:span></text:p>
        </text:list-item>
        <text:list-item>
          <text:p text:style-name="P224">Data inici<text:span text:style-name="T29">: Data a partir del qual es mostra l'avís.</text:span></text:p>
        </text:list-item>
        <text:list-item>
          <text:p text:style-name="P224">Data final<text:span text:style-name="T29">: Data final per mostrar l'avís.</text:span></text:p>
        </text:list-item>
        <text:list-item>
          <text:p text:style-name="P224">Avís nivell<text:span text:style-name="T29">: Pot ser de tipus "Informació", "Advertència" o "Error" i depenent del nivell d'avís es visualitzarà amb un o altre color.</text:span></text:p>
        </text:list-item>
      </text:list>
      <text:p text:style-name="P225">Les opcions en el llistat són les següents:</text:p>
      <text:list text:style-name="L38">
        <text:list-item>
          <text:p text:style-name="P226"><draw:frame draw:style-name="fr15" draw:name="Image54" text:anchor-type="paragraph" svg:width="7.805cm" svg:height="3.995cm" draw:z-index="80"><draw:image xlink:href="Pictures/10000000000001270000009789043152.png" xlink:type="simple" xlink:show="embed" xlink:actuate="onLoad" draw:mime-type="image/png"/></draw:frame>Modificar<text:span text:style-name="T29">: Obre la modal per modificar l'avís.</text:span></text:p>
        </text:list-item>
        <text:list-item>
          <text:p text:style-name="P226">Activar/Desactivar<text:span text:style-name="T29">: Permet activar o desactivar l'avís independentment de les dates.</text:span></text:p>
        </text:list-item>
        <text:list-item>
          <text:p text:style-name="P226">Esborrar<text:span text:style-name="T29">.</text:span></text:p>
        </text:list-item>
      </text:list>
      <text:p text:style-name="P227"><draw:frame draw:style-name="fr1" draw:name="Frame23" text:anchor-type="paragraph" svg:width="17cm" draw:z-index="81"><draw:text-box fo:min-height="3.874cm"><text:p text:style-name="fig."><draw:frame draw:style-name="fr2" draw:name="Image55" text:anchor-type="as-char" svg:width="17cm" style:rel-width="100%" svg:height="3.874cm" style:rel-height="scale" draw:z-index="89"><draw:image xlink:href="Pictures/1000000000000410000000EDC3BF9369.png" xlink:type="simple" xlink:show="embed" xlink:actuate="onLoad" draw:mime-type="image/png"/></draw:frame><text:span text:style-name="T17"><text:line-break/></text:span>fig. <text:sequence text:ref-name="reffig.39" text:name="fig." text:formula="ooow:fig.+1" style:num-format="1">41</text:sequence>: Exemple de visualització de missatges amb el cos del missatge expandit.</text:p></draw:text-box></draw:frame><text:soft-page-break/><text:span text:style-name="T29">A continuació es mostra un exemple de com es visualitzen 3 tipus d'avisos amb el cos del missatge expandit per acció de l'usuari.</text:span><text:span text:style-name="T140"> Si el missatge no s'expandeix per part de l'usuari llavors només apareix el títol del missat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chapter">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chapter"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43"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44</text:page-number></text:span><text:span text:style-name="MT1"><text:s/>/ </text:span><text:span text:style-name="MT1"><text:page-count>44</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5-21T16:12:47.467916314">21/05/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25T15:02:21.392000000</meta:creation-date>
    <dc:date>2026-05-21T16:12:47.345125700</dc:date>
    <meta:editing-duration>PT23H54M57S</meta:editing-duration>
    <meta:editing-cycles>144</meta:editing-cycles>
    <meta:generator>LibreOffice/25.8.6.2$Windows_X86_64 LibreOffice_project/b4b39682cd9868fa725bc664aff94278d315bd04</meta:generator>
    <meta:document-statistic meta:table-count="6" meta:image-count="79" meta:object-count="0" meta:page-count="44" meta:paragraph-count="544" meta:word-count="6004" meta:character-count="36622" meta:non-whitespace-character-count="31312"/>
  </office:meta>
</office:document-meta>
</file>