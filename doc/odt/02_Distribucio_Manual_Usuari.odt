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490000001389FB2EBB2CA75304.png" manifest:media-type="image/png"/>
  <manifest:file-entry manifest:full-path="Pictures/10000000000006A400000104C61E4F84145F3308.png" manifest:media-type="image/png"/>
  <manifest:file-entry manifest:full-path="Pictures/1000000000000371000001FFEBC722AC482328C4.png" manifest:media-type="image/png"/>
  <manifest:file-entry manifest:full-path="Pictures/100000000000001800000013F980777ACAF636E3.png" manifest:media-type="image/png"/>
  <manifest:file-entry manifest:full-path="Pictures/10000000000000FB000000FC59907789B198633D.png" manifest:media-type="image/png"/>
  <manifest:file-entry manifest:full-path="Pictures/20000009000049B20000386FA4571E30B052EF0F.svm" manifest:media-type="image/x-svm"/>
  <manifest:file-entry manifest:full-path="Pictures/10000000000002EF00000117DF071010C820E921.png" manifest:media-type="image/png"/>
  <manifest:file-entry manifest:full-path="Pictures/100000000000000C0000000E4325FA7DF06B1AD3.png" manifest:media-type="image/png"/>
  <manifest:file-entry manifest:full-path="Pictures/10000001000000C0000000C46CEFA0792B306109.png" manifest:media-type="image/png"/>
  <manifest:file-entry manifest:full-path="Pictures/10000000000001F8000000CE2BD49E8A0031067D.png" manifest:media-type="image/png"/>
  <manifest:file-entry manifest:full-path="Pictures/10000001000002E6000002BB18D09AEB46C6E810.png" manifest:media-type="image/png"/>
  <manifest:file-entry manifest:full-path="Pictures/10000000000000290000002265803A4305FF2B9A.png" manifest:media-type="image/png"/>
  <manifest:file-entry manifest:full-path="Pictures/10000001000001AA000000F5FFB2760FC63CE4D2.png" manifest:media-type="image/png"/>
  <manifest:file-entry manifest:full-path="Pictures/10000000000002750000008F6D44407D2226E1CB.png" manifest:media-type="image/png"/>
  <manifest:file-entry manifest:full-path="Pictures/100000000000001A00000017D7A485B58984DCF0.png" manifest:media-type="image/png"/>
  <manifest:file-entry manifest:full-path="Pictures/10000000000001E70000005F730C0A5653D54EFA.png" manifest:media-type="image/png"/>
  <manifest:file-entry manifest:full-path="Pictures/100000000000001500000017403C8B8AAB78D0B7.png" manifest:media-type="image/png"/>
  <manifest:file-entry manifest:full-path="Pictures/100000000000019400000065CAF259CB40210454.png" manifest:media-type="image/png"/>
  <manifest:file-entry manifest:full-path="Pictures/10000001000004F200000193443D448E307A9275.png" manifest:media-type="image/png"/>
  <manifest:file-entry manifest:full-path="Pictures/100000000000006B000000278782AD98F8026AC7.png" manifest:media-type="image/png"/>
  <manifest:file-entry manifest:full-path="Pictures/10000001000004F20000010E9196103641842BF4.png" manifest:media-type="image/png"/>
  <manifest:file-entry manifest:full-path="Pictures/100000000000001B0000000E263D0FD229B62151.png" manifest:media-type="image/png"/>
  <manifest:file-entry manifest:full-path="Pictures/10000000000004E2000000F77F690762537423D2.png" manifest:media-type="image/png"/>
  <manifest:file-entry manifest:full-path="Pictures/100000000000000D0000000BE5EE5A40ED2E3019.png" manifest:media-type="image/png"/>
  <manifest:file-entry manifest:full-path="Pictures/100000000000001500000012917B656F5E257C79.png" manifest:media-type="image/png"/>
  <manifest:file-entry manifest:full-path="Pictures/100000000000001800000013112D2E45211BC912.png" manifest:media-type="image/png"/>
  <manifest:file-entry manifest:full-path="Pictures/100000000000037F0000011AA4E5CA44F22EF4ED.png" manifest:media-type="image/png"/>
  <manifest:file-entry manifest:full-path="Pictures/100000000000021D00000235165D365DEC2EE931.png" manifest:media-type="image/png"/>
  <manifest:file-entry manifest:full-path="Pictures/100000000000037A000002963E98C305822CDEE3.png" manifest:media-type="image/png"/>
  <manifest:file-entry manifest:full-path="Pictures/10000000000002F100000135AEBD1F3ED6294A32.png" manifest:media-type="image/png"/>
  <manifest:file-entry manifest:full-path="Pictures/10000000000002D300000144B3C78F370F17838B.png" manifest:media-type="image/png"/>
  <manifest:file-entry manifest:full-path="Pictures/1000000100000134000000AD26F03C7A04EA9B1D.png" manifest:media-type="image/png"/>
  <manifest:file-entry manifest:full-path="Pictures/10000000000002ED0000015190BBCD9F6E89D442.png" manifest:media-type="image/png"/>
  <manifest:file-entry manifest:full-path="Pictures/10000001000004FA0000011EBD91CE4F040C71C0.png" manifest:media-type="image/png"/>
  <manifest:file-entry manifest:full-path="Pictures/100000000000072D0000012254DB33DE50F05D69.png" manifest:media-type="image/png"/>
  <manifest:file-entry manifest:full-path="Pictures/100000010000053A0000024DAC23E1171FEAA692.png" manifest:media-type="image/png"/>
  <manifest:file-entry manifest:full-path="Pictures/100000000000003E0000002F51C8D6E1850498F5.png" manifest:media-type="image/png"/>
  <manifest:file-entry manifest:full-path="Pictures/10000001000005270000012D341523D6168E4C9B.png" manifest:media-type="image/png"/>
  <manifest:file-entry manifest:full-path="Pictures/100000010000014400000136DAD0375CA454647B.png" manifest:media-type="image/png"/>
  <manifest:file-entry manifest:full-path="Pictures/1000000000000352000000BCF768B22FA3723A20.png" manifest:media-type="image/png"/>
  <manifest:file-entry manifest:full-path="Pictures/100000000000035A00000117AAC943D15907C025.png" manifest:media-type="image/png"/>
  <manifest:file-entry manifest:full-path="Pictures/10000000000002ED00000131149A76C8F58A3EFA.png" manifest:media-type="image/png"/>
  <manifest:file-entry manifest:full-path="Pictures/100000010000052E000000ADEA024AFC4294646B.png" manifest:media-type="image/png"/>
  <manifest:file-entry manifest:full-path="Pictures/10000000000000A9000000B062AEBB39CCE52908.png" manifest:media-type="image/png"/>
  <manifest:file-entry manifest:full-path="Pictures/100000000000063B000002DE95C8BEBC011C323F.png" manifest:media-type="image/png"/>
  <manifest:file-entry manifest:full-path="Pictures/100000010000050100000074B286387CE6A88934.png" manifest:media-type="image/png"/>
  <manifest:file-entry manifest:full-path="Pictures/10000000000001810000007760AE35DDD3F85347.png" manifest:media-type="image/png"/>
  <manifest:file-entry manifest:full-path="Pictures/100000000000019F00000057D5141077DAA40E48.png" manifest:media-type="image/png"/>
  <manifest:file-entry manifest:full-path="Pictures/10000000000002FF0000014D3101A22519805202.png" manifest:media-type="image/png"/>
  <manifest:file-entry manifest:full-path="Pictures/100000010000039B000001338B56493983F70133.png" manifest:media-type="image/png"/>
  <manifest:file-entry manifest:full-path="Pictures/10000000000001650000003D98008BCA2A80CB8E.png" manifest:media-type="image/png"/>
  <manifest:file-entry manifest:full-path="Pictures/10000000000002F000000099D9CA13C746376961.png" manifest:media-type="image/png"/>
  <manifest:file-entry manifest:full-path="Pictures/100000000000006C0000002766FE40B02934202A.png" manifest:media-type="image/png"/>
  <manifest:file-entry manifest:full-path="Pictures/10000000000002E5000000A16BD5E16FE44C4836.png" manifest:media-type="image/png"/>
  <manifest:file-entry manifest:full-path="Pictures/100000010000049500000262A8192AB9420AE077.png" manifest:media-type="image/png"/>
  <manifest:file-entry manifest:full-path="Pictures/100000010000053D000002480D2FAC73930FEDAC.png" manifest:media-type="image/png"/>
  <manifest:file-entry manifest:full-path="Pictures/100000000000008E000000CA2CD635CBBC5CEA6F.png" manifest:media-type="image/png"/>
  <manifest:file-entry manifest:full-path="Pictures/10000000000002C600000173C0947B72061585F3.png" manifest:media-type="image/png"/>
  <manifest:file-entry manifest:full-path="Pictures/100000000000048C00000082E581219E5F3EDAB5.png" manifest:media-type="image/png"/>
  <manifest:file-entry manifest:full-path="Pictures/10000001000002CA00000223ABB09AF008497025.png" manifest:media-type="image/png"/>
  <manifest:file-entry manifest:full-path="Pictures/10000001000002140000010273C63BB79FFC864B.png" manifest:media-type="image/png"/>
  <manifest:file-entry manifest:full-path="Pictures/10000001000003840000024740C0CB5A35203756.png" manifest:media-type="image/png"/>
  <manifest:file-entry manifest:full-path="Pictures/100000010000049700000262BA1331511C02DF70.png" manifest:media-type="image/png"/>
  <manifest:file-entry manifest:full-path="Pictures/10000000000000AA00000085AB232CA801DFDA4E.png" manifest:media-type="image/png"/>
  <manifest:file-entry manifest:full-path="Pictures/1000000000000013000000157E5432C983401ACA.png" manifest:media-type="image/png"/>
  <manifest:file-entry manifest:full-path="Pictures/10000000000000180000001068F0728E06B408F0.png" manifest:media-type="image/png"/>
  <manifest:file-entry manifest:full-path="Pictures/1000000100000523000001A24764904BDAD1911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6" style:family="table-cell">
      <style:table-cell-properties fo:padding-left="0.132cm" fo:padding-right="0.123cm" fo:padding-top="0cm" fo:padding-bottom="0cm" fo:border="0.5pt solid #00000a"/>
    </style:style>
    <style:style style:name="Tabla2.C6" style:family="table-cell">
      <style:table-cell-properties fo:padding-left="0.132cm" fo:padding-right="0.123cm" fo:padding-top="0cm" fo:padding-bottom="0cm" fo:border="0.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7" style:family="table-cell">
      <style:table-cell-properties fo:padding-left="0.132cm" fo:padding-right="0.123cm" fo:padding-top="0cm" fo:padding-bottom="0cm" fo:border-left="1.5pt solid #00000a" fo:border-right="0.5pt solid #00000a" fo:border-top="none" fo:border-bottom="1.5pt solid #00000a"/>
    </style:style>
    <style:style style:name="Tabla2.B7" style:family="table-cell">
      <style:table-cell-properties fo:padding-left="0.132cm" fo:padding-right="0.123cm" fo:padding-top="0cm" fo:padding-bottom="0cm" fo:border-left="0.5pt solid #00000a" fo:border-right="0.5pt solid #00000a" fo:border-top="none" fo:border-bottom="1.5pt solid #00000a"/>
    </style:style>
    <style:style style:name="Tabla2.C7" style:family="table-cell">
      <style:table-cell-properties fo:padding-left="0.132cm" fo:padding-right="0.123cm" fo:padding-top="0cm" fo:padding-bottom="0cm" fo:border-left="0.5pt solid #00000a" fo:border-right="0.5pt solid #00000a" fo:border-top="none" fo:border-bottom="1.5pt solid #00000a"/>
    </style:style>
    <style:style style:name="Tabla2.D7" style:family="table-cell">
      <style:table-cell-properties fo:padding-left="0.132cm" fo:padding-right="0.123cm" fo:padding-top="0cm" fo:padding-bottom="0cm" fo:border-left="0.5pt solid #00000a" fo:border-right="1.5pt solid #00000a" fo:border-top="none"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7" style:family="paragraph" style:parent-style-name="Standard">
      <style:paragraph-properties fo:text-align="start" style:justify-single-word="false"/>
      <style:text-properties fo:language="ca" fo:country="ES" officeooo:paragraph-rsid="0013ba49"/>
    </style:style>
    <style:style style:name="P8" style:family="paragraph" style:parent-style-name="Standard">
      <style:paragraph-properties fo:text-align="end" style:justify-single-word="false"/>
      <style:text-properties fo:language="ca" fo:country="ES" officeooo:paragraph-rsid="000e1972"/>
    </style:style>
    <style:style style:name="P9" style:family="paragraph" style:parent-style-name="western">
      <style:paragraph-properties fo:text-align="end" style:justify-single-word="false"/>
      <style:text-properties fo:language="ca" fo:country="ES" officeooo:paragraph-rsid="000e1972"/>
    </style:style>
    <style:style style:name="P10" style:family="paragraph" style:parent-style-name="Standard">
      <style:text-properties fo:language="ca" fo:country="ES"/>
    </style:style>
    <style:style style:name="P11" style:family="paragraph" style:parent-style-name="Standard">
      <style:text-properties fo:language="ca" fo:country="ES" officeooo:paragraph-rsid="0013ba49"/>
    </style:style>
    <style:style style:name="P12" style:family="paragraph" style:parent-style-name="Standard">
      <style:text-properties fo:language="ca" fo:country="ES" officeooo:paragraph-rsid="0013d81d"/>
    </style:style>
    <style:style style:name="P13" style:family="paragraph" style:parent-style-name="Standard">
      <style:text-properties fo:language="ca" fo:country="ES" officeooo:rsid="000f0c3e" officeooo:paragraph-rsid="000f0c3e"/>
    </style:style>
    <style:style style:name="P14" style:family="paragraph" style:parent-style-name="Standard">
      <style:text-properties fo:language="ca" fo:country="ES" officeooo:paragraph-rsid="000f0c3e"/>
    </style:style>
    <style:style style:name="P15" style:family="paragraph" style:parent-style-name="Standard">
      <style:paragraph-properties fo:text-align="center" style:justify-single-word="false"/>
      <style:text-properties fo:language="ca" fo:country="ES" officeooo:paragraph-rsid="0013ba49"/>
    </style:style>
    <style:style style:name="P16" style:family="paragraph" style:parent-style-name="Standard">
      <style:text-properties fo:language="ca" fo:country="ES" officeooo:paragraph-rsid="00816345"/>
    </style:style>
    <style:style style:name="P17" style:family="paragraph" style:parent-style-name="Standard">
      <style:text-properties fo:language="ca" fo:country="ES" officeooo:paragraph-rsid="005a35d6"/>
    </style:style>
    <style:style style:name="P18" style:family="paragraph" style:parent-style-name="Standard">
      <style:text-properties fo:language="ca" fo:country="ES" officeooo:rsid="0064c74a" officeooo:paragraph-rsid="0064c74a"/>
    </style:style>
    <style:style style:name="P19" style:family="paragraph" style:parent-style-name="Standard">
      <style:text-properties fo:language="ca" fo:country="ES" officeooo:rsid="0082e781" officeooo:paragraph-rsid="0082e781"/>
    </style:style>
    <style:style style:name="P20" style:family="paragraph" style:parent-style-name="Standard">
      <style:text-properties fo:language="ca" fo:country="ES" fo:font-style="italic" officeooo:rsid="0003b015" officeooo:paragraph-rsid="00ca9b30" style:font-style-asian="italic" style:font-style-complex="italic"/>
    </style:style>
    <style:style style:name="P21" style:family="paragraph" style:parent-style-name="Text_20_body">
      <style:text-properties fo:language="ca" fo:country="ES" officeooo:rsid="004ee612" officeooo:paragraph-rsid="004ee612"/>
    </style:style>
    <style:style style:name="P22" style:family="paragraph" style:parent-style-name="Text_20_body">
      <style:text-properties fo:language="ca" fo:country="ES" officeooo:rsid="008003a5" officeooo:paragraph-rsid="008003a5"/>
    </style:style>
    <style:style style:name="P23"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24" style:family="paragraph" style:parent-style-name="List_20_Paragraph">
      <style:paragraph-properties fo:margin-left="0cm" fo:margin-right="0cm" fo:text-indent="0cm" style:auto-text-indent="false"/>
      <style:text-properties fo:language="ca" fo:country="ES" officeooo:rsid="00dea456" officeooo:paragraph-rsid="00dea456"/>
    </style:style>
    <style:style style:name="P25"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P26"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27"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28" style:family="paragraph" style:parent-style-name="Footer">
      <style:text-properties style:font-name="Calibri" fo:font-size="11pt" fo:language="ca" fo:country="ES" officeooo:paragraph-rsid="000e1972" style:font-size-asian="11pt" style:font-size-complex="11pt"/>
    </style:style>
    <style:style style:name="P29"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30" style:family="paragraph" style:parent-style-name="Standard">
      <style:text-properties style:font-name="Calibri" fo:language="ca" fo:country="ES" officeooo:paragraph-rsid="0013ba49"/>
    </style:style>
    <style:style style:name="P31" style:family="paragraph" style:parent-style-name="Text_20_body">
      <style:text-properties style:font-name="Calibri" fo:language="ca" fo:country="ES" officeooo:paragraph-rsid="0013ba49"/>
    </style:style>
    <style:style style:name="P32" style:family="paragraph" style:parent-style-name="List_20_Paragraph">
      <style:text-properties style:font-name="Calibri" fo:language="ca" fo:country="ES" officeooo:paragraph-rsid="0013ba49"/>
    </style:style>
    <style:style style:name="P33" style:family="paragraph" style:parent-style-name="Standard">
      <style:text-properties style:font-name="Calibri" fo:language="ca" fo:country="ES" fo:font-weight="bold" officeooo:paragraph-rsid="0013ba49" style:font-weight-asian="bold"/>
    </style:style>
    <style:style style:name="P34" style:family="paragraph" style:parent-style-name="List_20_Paragraph">
      <style:text-properties style:font-name="Calibri" fo:language="ca" fo:country="ES" fo:font-weight="bold" officeooo:paragraph-rsid="0013ba49" style:font-weight-asian="bold"/>
    </style:style>
    <style:style style:name="P35" style:family="paragraph" style:parent-style-name="Standard">
      <style:paragraph-properties fo:margin-left="0.635cm" fo:margin-right="0cm" fo:text-indent="0cm" style:auto-text-indent="false"/>
      <style:text-properties style:font-name="Calibri" fo:language="ca" fo:country="ES" fo:font-weight="bold" officeooo:paragraph-rsid="0013d81d" style:font-weight-asian="bold"/>
    </style:style>
    <style:style style:name="P36" style:family="paragraph" style:parent-style-name="Standard">
      <style:text-properties style:font-name="Calibri" fo:language="ca" fo:country="ES" fo:font-weight="bold" officeooo:paragraph-rsid="0013d81d" style:font-weight-asian="bold"/>
    </style:style>
    <style:style style:name="P3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38"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39" style:family="paragraph" style:parent-style-name="List_20_Paragraph">
      <style:text-properties style:font-name="Calibri" fo:language="ca" fo:country="ES" fo:font-weight="bold" officeooo:rsid="0079b5ac" officeooo:paragraph-rsid="0079b5ac" style:font-weight-asian="bold"/>
    </style:style>
    <style:style style:name="P40" style:family="paragraph" style:parent-style-name="Standard">
      <style:paragraph-properties fo:text-align="start" style:justify-single-word="false"/>
      <style:text-properties style:font-name="Calibri" fo:language="ca" fo:country="ES" officeooo:paragraph-rsid="0013ba49"/>
    </style:style>
    <style:style style:name="P41" style:family="paragraph" style:parent-style-name="Standard">
      <style:text-properties style:font-name="Calibri" fo:language="ca" fo:country="ES" officeooo:paragraph-rsid="0013d81d"/>
    </style:style>
    <style:style style:name="P42" style:family="paragraph" style:parent-style-name="List_20_Paragraph">
      <style:text-properties style:font-name="Calibri" fo:language="ca" fo:country="ES" officeooo:paragraph-rsid="0013d81d"/>
    </style:style>
    <style:style style:name="P43" style:family="paragraph" style:parent-style-name="List_20_Paragraph">
      <style:paragraph-properties fo:margin-left="0cm" fo:margin-right="0cm" fo:text-indent="0cm" style:auto-text-indent="false"/>
      <style:text-properties style:font-name="Calibri" fo:language="ca" fo:country="ES" officeooo:paragraph-rsid="0013d81d"/>
    </style:style>
    <style:style style:name="P44" style:family="paragraph" style:parent-style-name="Standard">
      <style:text-properties style:font-name="Calibri" fo:language="ca" fo:country="ES" officeooo:paragraph-rsid="0044a5d3"/>
    </style:style>
    <style:style style:name="P45" style:family="paragraph" style:parent-style-name="Standard">
      <style:text-properties style:font-name="Calibri" fo:language="ca" fo:country="ES" officeooo:paragraph-rsid="004acf98"/>
    </style:style>
    <style:style style:name="P46" style:family="paragraph" style:parent-style-name="Standard">
      <style:text-properties style:font-name="Calibri" fo:language="ca" fo:country="ES" officeooo:rsid="004acf98" officeooo:paragraph-rsid="004acf98"/>
    </style:style>
    <style:style style:name="P47" style:family="paragraph" style:parent-style-name="Standard">
      <style:paragraph-properties fo:text-align="center" style:justify-single-word="false"/>
      <style:text-properties style:font-name="Calibri" fo:language="ca" fo:country="ES" officeooo:rsid="004acf98" officeooo:paragraph-rsid="004acf98"/>
    </style:style>
    <style:style style:name="P48" style:family="paragraph" style:parent-style-name="Standard">
      <style:text-properties style:font-name="Calibri" fo:language="ca" fo:country="ES" officeooo:paragraph-rsid="004d4998"/>
    </style:style>
    <style:style style:name="P49" style:family="paragraph" style:parent-style-name="Standard">
      <style:text-properties style:font-name="Calibri" fo:language="ca" fo:country="ES" officeooo:rsid="004d4998" officeooo:paragraph-rsid="004d4998"/>
    </style:style>
    <style:style style:name="P50" style:family="paragraph" style:parent-style-name="Standard">
      <style:text-properties style:font-name="Calibri" fo:language="ca" fo:country="ES" officeooo:rsid="004d4998" officeooo:paragraph-rsid="004f05d5"/>
    </style:style>
    <style:style style:name="P51" style:family="paragraph" style:parent-style-name="Standard">
      <style:text-properties style:font-name="Calibri" fo:language="ca" fo:country="ES" officeooo:rsid="004ee612" officeooo:paragraph-rsid="004ee612"/>
    </style:style>
    <style:style style:name="P52" style:family="paragraph" style:parent-style-name="Text_20_body">
      <style:text-properties style:font-name="Calibri" fo:language="ca" fo:country="ES" officeooo:rsid="004ee612" officeooo:paragraph-rsid="004ee612"/>
    </style:style>
    <style:style style:name="P53" style:family="paragraph" style:parent-style-name="Standard">
      <style:text-properties style:font-name="Calibri" fo:language="ca" fo:country="ES" officeooo:rsid="004f05d5" officeooo:paragraph-rsid="004f05d5"/>
    </style:style>
    <style:style style:name="P54" style:family="paragraph" style:parent-style-name="Standard">
      <style:text-properties style:font-name="Calibri" fo:language="ca" fo:country="ES" officeooo:rsid="001ca2a7" officeooo:paragraph-rsid="0064c74a"/>
    </style:style>
    <style:style style:name="P55" style:family="paragraph" style:parent-style-name="Standard">
      <style:text-properties style:font-name="Calibri" fo:language="ca" fo:country="ES" officeooo:rsid="001ca2a7" officeooo:paragraph-rsid="000f0c3e"/>
    </style:style>
    <style:style style:name="P56" style:family="paragraph" style:parent-style-name="Standard">
      <style:text-properties style:font-name="Calibri" fo:language="ca" fo:country="ES" officeooo:paragraph-rsid="007fabbe"/>
    </style:style>
    <style:style style:name="P57" style:family="paragraph" style:parent-style-name="Standard">
      <style:text-properties style:font-name="Calibri" fo:language="ca" fo:country="ES" officeooo:rsid="007fabbe" officeooo:paragraph-rsid="007fabbe"/>
    </style:style>
    <style:style style:name="P58" style:family="paragraph" style:parent-style-name="Standard">
      <style:text-properties style:font-name="Calibri" fo:language="ca" fo:country="ES" officeooo:paragraph-rsid="00816345"/>
    </style:style>
    <style:style style:name="P59" style:family="paragraph" style:parent-style-name="Standard">
      <style:text-properties style:font-name="Calibri" fo:language="ca" fo:country="ES" officeooo:paragraph-rsid="00761f76"/>
    </style:style>
    <style:style style:name="P60" style:family="paragraph" style:parent-style-name="Standard">
      <style:text-properties style:font-name="Calibri" fo:language="ca" fo:country="ES" officeooo:rsid="006ab4d4" officeooo:paragraph-rsid="006ab4d4"/>
    </style:style>
    <style:style style:name="P61" style:family="paragraph" style:parent-style-name="fig.">
      <style:text-properties style:font-name="Calibri" fo:language="ca" fo:country="ES" officeooo:rsid="006ab4d4" officeooo:paragraph-rsid="00a259c5"/>
    </style:style>
    <style:style style:name="P62" style:family="paragraph" style:parent-style-name="Standard">
      <style:text-properties style:font-name="Calibri" fo:language="ca" fo:country="ES" officeooo:rsid="00a6de51" officeooo:paragraph-rsid="0013ba49"/>
    </style:style>
    <style:style style:name="P63" style:family="paragraph" style:parent-style-name="Standard">
      <style:text-properties style:font-name="Calibri" fo:language="ca" fo:country="ES" officeooo:rsid="00ac4d60" officeooo:paragraph-rsid="00ac4d60"/>
    </style:style>
    <style:style style:name="P64" style:family="paragraph" style:parent-style-name="Standard">
      <style:text-properties style:font-name="Calibri" fo:language="ca" fo:country="ES" officeooo:rsid="00761f76" officeooo:paragraph-rsid="00761f76"/>
    </style:style>
    <style:style style:name="P65"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66" style:family="paragraph" style:parent-style-name="Standard">
      <style:paragraph-properties fo:margin-top="0cm" fo:margin-bottom="0.212cm" style:contextual-spacing="false" fo:text-align="start" style:justify-single-word="false"/>
      <style:text-properties style:font-name="Calibri" fo:language="ca" fo:country="ES" officeooo:paragraph-rsid="00f10c3d" style:font-name-complex="Arial Narrow1"/>
    </style:style>
    <style:style style:name="P67" style:family="paragraph" style:parent-style-name="Standard">
      <style:paragraph-properties fo:margin-top="0cm" fo:margin-bottom="0.212cm" style:contextual-spacing="false" fo:text-align="start" style:justify-single-word="false"/>
      <style:text-properties style:font-name="Calibri" fo:language="ca" fo:country="ES" officeooo:rsid="00f10c3d" officeooo:paragraph-rsid="00f10c3d" style:font-name-complex="Arial Narrow1"/>
    </style:style>
    <style:style style:name="P68" style:family="paragraph" style:parent-style-name="Text_20_body">
      <style:text-properties style:font-name="Calibri" fo:language="ca" fo:country="ES" officeooo:rsid="00db1be8" officeooo:paragraph-rsid="00dc2365"/>
    </style:style>
    <style:style style:name="P69" style:family="paragraph" style:parent-style-name="Text_20_body">
      <style:text-properties style:font-name="Calibri" fo:language="ca" fo:country="ES" officeooo:rsid="00db1be8" officeooo:paragraph-rsid="00db1be8"/>
    </style:style>
    <style:style style:name="P70" style:family="paragraph" style:parent-style-name="List_20_Paragraph">
      <style:text-properties style:font-name="Calibri" fo:language="ca" fo:country="ES" fo:font-weight="normal" officeooo:rsid="0078f164" officeooo:paragraph-rsid="0078f164" style:font-weight-asian="normal" style:font-weight-complex="normal"/>
    </style:style>
    <style:style style:name="P71" style:family="paragraph" style:parent-style-name="List_20_Paragraph">
      <style:text-properties style:font-name="Calibri" fo:language="ca" fo:country="ES" fo:font-weight="normal" officeooo:rsid="0078f164" officeooo:paragraph-rsid="0013ba49" style:font-weight-asian="normal" style:font-weight-complex="normal"/>
    </style:style>
    <style:style style:name="P72" style:family="paragraph" style:parent-style-name="List_20_Paragraph">
      <style:text-properties style:font-name="Calibri" fo:language="ca" fo:country="ES" fo:font-weight="normal" officeooo:rsid="0079b5ac" officeooo:paragraph-rsid="0079b5ac" style:font-weight-asian="normal" style:font-weight-complex="normal"/>
    </style:style>
    <style:style style:name="P73" style:family="paragraph" style:parent-style-name="Standard">
      <style:text-properties style:font-name="Calibri" fo:language="ca" fo:country="ES" officeooo:rsid="007c894a" officeooo:paragraph-rsid="007c894a"/>
    </style:style>
    <style:style style:name="P74" style:family="paragraph" style:parent-style-name="Standard">
      <style:text-properties style:font-name="Calibri" fo:font-size="10pt" fo:language="ca" fo:country="ES" officeooo:rsid="006c9dc2" officeooo:paragraph-rsid="006c9dc2" style:font-size-asian="10.5pt"/>
    </style:style>
    <style:style style:name="P75" style:family="paragraph" style:parent-style-name="Standard">
      <style:text-properties style:font-name="Calibri" fo:font-size="10pt" fo:language="ca" fo:country="ES" officeooo:rsid="00816345" officeooo:paragraph-rsid="00816345" style:font-size-asian="10.5pt"/>
    </style:style>
    <style:style style:name="P76" style:family="paragraph" style:parent-style-name="Standard">
      <style:text-properties style:font-name="Calibri" fo:font-size="10pt" fo:language="ca" fo:country="ES" officeooo:paragraph-rsid="0082e781" style:font-size-asian="10.5pt"/>
    </style:style>
    <style:style style:name="P77"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589ea1" style:font-size-asian="10.5pt" style:font-name-complex="Arial Narrow1"/>
    </style:style>
    <style:style style:name="P78"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9aff6" officeooo:paragraph-rsid="00e9aff6" style:font-size-asian="10.5pt" style:font-name-complex="Arial Narrow1"/>
    </style:style>
    <style:style style:name="P79"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f10c3d" officeooo:paragraph-rsid="00f10c3d" style:font-size-asian="10.5pt" style:font-name-complex="Arial Narrow1"/>
    </style:style>
    <style:style style:name="P80" style:family="paragraph" style:parent-style-name="Standard">
      <style:text-properties style:font-name="Calibri" fo:font-size="10pt" fo:language="ca" fo:country="ES" fo:font-style="normal" officeooo:rsid="006c9dc2" officeooo:paragraph-rsid="006c9dc2" style:font-size-asian="10.5pt" style:font-style-asian="normal" style:font-style-complex="normal"/>
    </style:style>
    <style:style style:name="P81"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82" style:family="paragraph" style:parent-style-name="Standard">
      <style:text-properties officeooo:paragraph-rsid="0064c74a"/>
    </style:style>
    <style:style style:name="P83" style:family="paragraph" style:parent-style-name="Standard">
      <style:text-properties officeooo:paragraph-rsid="000f0c3e"/>
    </style:style>
    <style:style style:name="P84" style:family="paragraph" style:parent-style-name="Standard">
      <style:text-properties style:font-name="Calibri1" officeooo:paragraph-rsid="0064c74a"/>
    </style:style>
    <style:style style:name="P85" style:family="paragraph" style:parent-style-name="Standard">
      <style:text-properties style:font-name="Calibri1" officeooo:rsid="00673e05" officeooo:paragraph-rsid="00673e05"/>
    </style:style>
    <style:style style:name="P86" style:family="paragraph" style:parent-style-name="Standard">
      <style:text-properties style:font-name="Calibri1" fo:language="ca" fo:country="ES" officeooo:paragraph-rsid="00109022"/>
    </style:style>
    <style:style style:name="P87" style:family="paragraph" style:parent-style-name="Standard">
      <style:text-properties style:font-name="Calibri1" fo:language="ca" fo:country="ES" officeooo:rsid="0068a48a" officeooo:paragraph-rsid="00109022"/>
    </style:style>
    <style:style style:name="P88" style:family="paragraph" style:parent-style-name="Standard">
      <style:text-properties style:font-name="Calibri1" fo:language="ca" fo:country="ES" officeooo:rsid="00673e05" officeooo:paragraph-rsid="006c9dc2"/>
    </style:style>
    <style:style style:name="P89" style:family="paragraph" style:parent-style-name="Standard">
      <style:paragraph-properties fo:margin-left="0cm" fo:margin-right="0cm" fo:text-indent="0cm" style:auto-text-indent="false"/>
      <style:text-properties style:font-name="Calibri1" fo:language="ca" fo:country="ES" fo:font-style="italic" officeooo:rsid="0001aa8a" officeooo:paragraph-rsid="00c03633" style:font-style-asian="italic" style:font-style-complex="italic"/>
    </style:style>
    <style:style style:name="P90" style:family="paragraph" style:parent-style-name="Standard">
      <style:text-properties style:font-name="Calibri1" officeooo:paragraph-rsid="00bdf4f3"/>
    </style:style>
    <style:style style:name="P91" style:family="paragraph" style:parent-style-name="Standard">
      <style:text-properties officeooo:paragraph-rsid="00109022"/>
    </style:style>
    <style:style style:name="P92" style:family="paragraph" style:parent-style-name="Standard">
      <style:text-properties officeooo:paragraph-rsid="0013ba49"/>
    </style:style>
    <style:style style:name="P93" style:family="paragraph" style:parent-style-name="Standard">
      <style:text-properties officeooo:paragraph-rsid="006c9dc2"/>
    </style:style>
    <style:style style:name="P94" style:family="paragraph" style:parent-style-name="Standard">
      <style:text-properties officeooo:paragraph-rsid="0013d81d"/>
    </style:style>
    <style:style style:name="P95" style:family="paragraph" style:parent-style-name="Standard">
      <style:text-properties officeooo:paragraph-rsid="0044a5d3"/>
    </style:style>
    <style:style style:name="P96" style:family="paragraph" style:parent-style-name="Standard">
      <style:text-properties officeooo:paragraph-rsid="00805191"/>
    </style:style>
    <style:style style:name="P97"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98" style:family="paragraph" style:parent-style-name="Standard">
      <style:text-properties officeooo:paragraph-rsid="00761f76"/>
    </style:style>
    <style:style style:name="P99" style:family="paragraph" style:parent-style-name="Standard">
      <style:text-properties officeooo:paragraph-rsid="006ab4d4"/>
    </style:style>
    <style:style style:name="P100" style:family="paragraph" style:parent-style-name="fig.">
      <style:text-properties officeooo:paragraph-rsid="00c03633"/>
    </style:style>
    <style:style style:name="P101" style:family="paragraph" style:parent-style-name="Standard">
      <style:text-properties officeooo:paragraph-rsid="00bdf4f3"/>
    </style:style>
    <style:style style:name="P102" style:family="paragraph" style:parent-style-name="Párrafo_20_de_20_lista">
      <style:text-properties officeooo:paragraph-rsid="00bdf4f3"/>
    </style:style>
    <style:style style:name="P10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10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105"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106"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07"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08"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109"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110" style:family="paragraph" style:parent-style-name="western">
      <style:paragraph-properties fo:text-align="end" style:justify-single-word="false"/>
      <style:text-properties officeooo:paragraph-rsid="000e1972"/>
    </style:style>
    <style:style style:name="P111" style:family="paragraph" style:parent-style-name="Text_20_body">
      <style:text-properties officeooo:paragraph-rsid="006a329e"/>
    </style:style>
    <style:style style:name="P112" style:family="paragraph" style:parent-style-name="Text_20_body">
      <style:text-properties officeooo:rsid="00701e12" officeooo:paragraph-rsid="00701e12"/>
    </style:style>
    <style:style style:name="P113" style:family="paragraph" style:parent-style-name="Text_20_body">
      <style:text-properties officeooo:rsid="0071f004" officeooo:paragraph-rsid="0071f004"/>
    </style:style>
    <style:style style:name="P114" style:family="paragraph" style:parent-style-name="Text_20_body">
      <style:text-properties fo:font-weight="bold" officeooo:rsid="00ba10c4" officeooo:paragraph-rsid="00bab267" style:font-weight-asian="bold" style:font-weight-complex="bold"/>
    </style:style>
    <style:style style:name="P115" style:family="paragraph" style:parent-style-name="Text_20_body">
      <style:text-properties fo:font-weight="normal" officeooo:rsid="0071f004" officeooo:paragraph-rsid="0071f004" style:font-weight-asian="normal" style:font-weight-complex="normal"/>
    </style:style>
    <style:style style:name="P116" style:family="paragraph" style:parent-style-name="Text_20_body">
      <style:paragraph-properties fo:break-before="page"/>
      <style:text-properties fo:font-weight="normal" officeooo:rsid="00985b9b" officeooo:paragraph-rsid="00bab267" style:font-weight-asian="normal" style:font-weight-complex="normal"/>
    </style:style>
    <style:style style:name="P117" style:family="paragraph" style:parent-style-name="Text_20_body">
      <style:text-properties officeooo:rsid="00b713ea" officeooo:paragraph-rsid="00b713ea"/>
    </style:style>
    <style:style style:name="P118" style:family="paragraph" style:parent-style-name="Text_20_body">
      <style:text-properties officeooo:rsid="00ba10c4" officeooo:paragraph-rsid="00ba10c4"/>
    </style:style>
    <style:style style:name="P119" style:family="paragraph" style:parent-style-name="Text_20_body">
      <style:text-properties officeooo:rsid="00ba10c4" officeooo:paragraph-rsid="00bab267"/>
    </style:style>
    <style:style style:name="P120" style:family="paragraph" style:parent-style-name="Text_20_body">
      <style:text-properties officeooo:rsid="00bab267" officeooo:paragraph-rsid="00bab267"/>
    </style:style>
    <style:style style:name="P121" style:family="paragraph" style:parent-style-name="fig.">
      <style:text-properties officeooo:paragraph-rsid="00a259c5"/>
    </style:style>
    <style:style style:name="P122" style:family="paragraph" style:parent-style-name="fig.">
      <style:text-properties officeooo:paragraph-rsid="00a617f4"/>
    </style:style>
    <style:style style:name="P123" style:family="paragraph" style:parent-style-name="fig.">
      <style:text-properties officeooo:paragraph-rsid="00d70df8"/>
    </style:style>
    <style:style style:name="P124" style:family="paragraph" style:parent-style-name="fig.">
      <style:text-properties officeooo:paragraph-rsid="00da28b0"/>
    </style:style>
    <style:style style:name="P125" style:family="paragraph" style:parent-style-name="fig.">
      <style:text-properties officeooo:paragraph-rsid="00da28b0" text:display="none"/>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7cm" style:type="right" style:leader-style="dotted" style:leader-text="."/>
        </style:tab-stops>
      </style:paragraph-properties>
    </style:style>
    <style:style style:name="P129" style:family="paragraph" style:parent-style-name="Contents_20_4">
      <style:paragraph-properties>
        <style:tab-stops>
          <style:tab-stop style:position="17cm" style:type="right" style:leader-style="dotted" style:leader-text="."/>
        </style:tab-stops>
      </style:paragraph-properties>
    </style:style>
    <style:style style:name="P130" style:family="paragraph" style:parent-style-name="Contents_20_5">
      <style:paragraph-properties>
        <style:tab-stops>
          <style:tab-stop style:position="17cm" style:type="right" style:leader-style="dotted" style:leader-text="."/>
        </style:tab-stops>
      </style:paragraph-properties>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7cm" style:type="right" style:leader-style="dotted" style:leader-text="."/>
        </style:tab-stops>
      </style:paragraph-properties>
    </style:style>
    <style:style style:name="P133" style:family="paragraph" style:parent-style-name="Contents_20_3">
      <style:paragraph-properties>
        <style:tab-stops>
          <style:tab-stop style:position="17cm" style:type="right" style:leader-style="dotted" style:leader-text="."/>
        </style:tab-stops>
      </style:paragraph-properties>
    </style:style>
    <style:style style:name="P134" style:family="paragraph" style:parent-style-name="Contents_20_4">
      <style:paragraph-properties>
        <style:tab-stops>
          <style:tab-stop style:position="17cm" style:type="right" style:leader-style="dotted" style:leader-text="."/>
        </style:tab-stops>
      </style:paragraph-properties>
    </style:style>
    <style:style style:name="P135" style:family="paragraph" style:parent-style-name="Contents_20_5">
      <style:paragraph-properties>
        <style:tab-stops>
          <style:tab-stop style:position="17cm" style:type="right" style:leader-style="dotted" style:leader-text="."/>
        </style:tab-stops>
      </style:paragraph-properties>
    </style:style>
    <style:style style:name="P136"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37" style:family="paragraph" style:parent-style-name="Heading_20_1">
      <style:paragraph-properties fo:break-before="page"/>
    </style:style>
    <style:style style:name="P138" style:family="paragraph" style:parent-style-name="Heading_20_1">
      <style:text-properties officeooo:rsid="006c9dc2" officeooo:paragraph-rsid="006c9dc2"/>
    </style:style>
    <style:style style:name="P139" style:family="paragraph" style:parent-style-name="Heading_20_2">
      <style:text-properties officeooo:rsid="006c9dc2" officeooo:paragraph-rsid="006c9dc2"/>
    </style:style>
    <style:style style:name="P140" style:family="paragraph" style:parent-style-name="Heading_20_3">
      <style:text-properties fo:language="ca" fo:country="ES"/>
    </style:style>
    <style:style style:name="P141" style:family="paragraph" style:parent-style-name="Heading_20_3">
      <style:text-properties fo:language="ca" fo:country="ES" officeooo:rsid="0049fd87" officeooo:paragraph-rsid="004f6677"/>
    </style:style>
    <style:style style:name="P142" style:family="paragraph" style:parent-style-name="Heading_20_4">
      <style:text-properties fo:language="ca" fo:country="ES" officeooo:rsid="0013d81d" officeooo:paragraph-rsid="0013d81d"/>
    </style:style>
    <style:style style:name="P143" style:family="paragraph" style:parent-style-name="Heading_20_4">
      <style:text-properties fo:language="ca" fo:country="ES" officeooo:rsid="0049fd87" officeooo:paragraph-rsid="0049fd87"/>
    </style:style>
    <style:style style:name="P144" style:family="paragraph" style:parent-style-name="Heading_20_4">
      <style:text-properties style:font-name="Calibri" fo:language="ca" fo:country="ES" officeooo:rsid="0013d81d" officeooo:paragraph-rsid="00db1be8"/>
    </style:style>
    <style:style style:name="P145" style:family="paragraph" style:parent-style-name="Heading_20_4">
      <style:text-properties style:font-name="Calibri" fo:language="ca" fo:country="ES" officeooo:rsid="0049fd87" officeooo:paragraph-rsid="004ee612"/>
    </style:style>
    <style:style style:name="P146" style:family="paragraph" style:parent-style-name="List_20_Paragraph" style:list-style-name="WWNum2">
      <style:text-properties officeooo:paragraph-rsid="0013ba49"/>
    </style:style>
    <style:style style:name="P147" style:family="paragraph" style:parent-style-name="List_20_Paragraph" style:list-style-name="WWNum2">
      <style:text-properties officeooo:paragraph-rsid="00a259c5"/>
    </style:style>
    <style:style style:name="P148" style:family="paragraph" style:parent-style-name="List_20_Paragraph" style:list-style-name="WWNum2">
      <style:text-properties officeooo:paragraph-rsid="00466cd1"/>
    </style:style>
    <style:style style:name="P149" style:family="paragraph" style:parent-style-name="List_20_Paragraph" style:list-style-name="WWNum2">
      <style:text-properties officeooo:rsid="00761f76" officeooo:paragraph-rsid="00761f76"/>
    </style:style>
    <style:style style:name="P150" style:family="paragraph" style:parent-style-name="List_20_Paragraph" style:list-style-name="L1">
      <style:text-properties officeooo:paragraph-rsid="00a259c5"/>
    </style:style>
    <style:style style:name="P151" style:family="paragraph" style:parent-style-name="List_20_Paragraph" style:list-style-name="WWNum2">
      <style:text-properties fo:language="ca" fo:country="ES" officeooo:paragraph-rsid="00466cd1"/>
    </style:style>
    <style:style style:name="P152" style:family="paragraph" style:parent-style-name="List_20_Paragraph" style:list-style-name="WWNum2">
      <style:text-properties fo:language="ca" fo:country="ES" officeooo:paragraph-rsid="0013ba49"/>
    </style:style>
    <style:style style:name="P153" style:family="paragraph" style:parent-style-name="List_20_Paragraph" style:list-style-name="WWNum2">
      <style:text-properties fo:language="ca" fo:country="ES" officeooo:rsid="0079b5ac" officeooo:paragraph-rsid="0079b5ac"/>
    </style:style>
    <style:style style:name="P154" style:family="paragraph" style:parent-style-name="List_20_Paragraph" style:list-style-name="WWNum4">
      <style:text-properties fo:language="ca" fo:country="ES" officeooo:paragraph-rsid="0013ba49"/>
    </style:style>
    <style:style style:name="P155" style:family="paragraph" style:parent-style-name="List_20_Paragraph" style:list-style-name="WWNum4">
      <style:text-properties fo:language="ca" fo:country="ES" officeooo:paragraph-rsid="0044a5d3"/>
    </style:style>
    <style:style style:name="P156"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157" style:family="paragraph" style:parent-style-name="List_20_Paragraph" style:list-style-name="WWNum8">
      <style:text-properties fo:language="ca" fo:country="ES" fo:font-weight="bold" officeooo:rsid="00de9262" officeooo:paragraph-rsid="00de9262" style:font-weight-asian="bold" style:font-weight-complex="bold"/>
    </style:style>
    <style:style style:name="P158"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159" style:family="paragraph" style:parent-style-name="List_20_Paragraph" style:list-style-name="WWNum8">
      <style:text-properties fo:language="ca" fo:country="ES" fo:font-weight="bold" officeooo:rsid="00dea456" officeooo:paragraph-rsid="00de9262" style:font-weight-asian="bold" style:font-weight-complex="bold"/>
    </style:style>
    <style:style style:name="P160" style:family="paragraph" style:parent-style-name="List_20_Paragraph" style:list-style-name="WWNum8">
      <style:text-properties fo:language="ca" fo:country="ES" fo:font-weight="bold" officeooo:rsid="00dea456" officeooo:paragraph-rsid="00dea456" style:font-weight-asian="bold" style:font-weight-complex="bold"/>
    </style:style>
    <style:style style:name="P161" style:family="paragraph" style:parent-style-name="List_20_Paragraph" style:list-style-name="WWNum8">
      <style:text-properties fo:language="ca" fo:country="ES" fo:font-weight="bold" officeooo:rsid="00fa3763" officeooo:paragraph-rsid="00fa3763" style:font-weight-asian="bold" style:font-weight-complex="bold"/>
    </style:style>
    <style:style style:name="P162" style:family="paragraph" style:parent-style-name="List_20_Paragraph" style:list-style-name="WWNum5">
      <style:text-properties fo:language="ca" fo:country="ES" officeooo:rsid="00f6f02a" officeooo:paragraph-rsid="00f9241f"/>
    </style:style>
    <style:style style:name="P163" style:family="paragraph" style:parent-style-name="List_20_Paragraph" style:list-style-name="WWNum5">
      <style:text-properties fo:language="ca" fo:country="ES" officeooo:paragraph-rsid="0013ba49"/>
    </style:style>
    <style:style style:name="P164" style:family="paragraph" style:parent-style-name="List_20_Paragraph" style:list-style-name="WWNum6">
      <style:text-properties fo:language="ca" fo:country="ES" officeooo:rsid="00f49f93" officeooo:paragraph-rsid="00f49f93"/>
    </style:style>
    <style:style style:name="P165" style:family="paragraph" style:parent-style-name="List_20_Paragraph" style:list-style-name="WWNum6">
      <style:text-properties fo:language="ca" fo:country="ES" officeooo:rsid="00f50c7a" officeooo:paragraph-rsid="00f50c7a"/>
    </style:style>
    <style:style style:name="P166" style:family="paragraph" style:parent-style-name="List_20_Paragraph" style:list-style-name="WWNum6">
      <style:text-properties fo:language="ca" fo:country="ES" officeooo:paragraph-rsid="0013ba49"/>
    </style:style>
    <style:style style:name="P167" style:family="paragraph" style:parent-style-name="List_20_Paragraph" style:list-style-name="WWNum6">
      <style:text-properties fo:language="ca" fo:country="ES" officeooo:paragraph-rsid="00f49f93"/>
    </style:style>
    <style:style style:name="P168" style:family="paragraph" style:parent-style-name="List_20_Paragraph" style:list-style-name="WWNum7">
      <style:text-properties fo:language="ca" fo:country="ES" officeooo:paragraph-rsid="0013ba49"/>
    </style:style>
    <style:style style:name="P169" style:family="paragraph" style:parent-style-name="List_20_Paragraph" style:list-style-name="WWNum7">
      <style:text-properties fo:language="ca" fo:country="ES" officeooo:paragraph-rsid="0044a5d3"/>
    </style:style>
    <style:style style:name="P170" style:family="paragraph" style:parent-style-name="List_20_Paragraph" style:list-style-name="WWNum8">
      <style:text-properties fo:language="ca" fo:country="ES" officeooo:paragraph-rsid="0013d81d"/>
    </style:style>
    <style:style style:name="P171" style:family="paragraph" style:parent-style-name="List_20_Paragraph" style:list-style-name="WWNum9">
      <style:text-properties fo:language="ca" fo:country="ES" officeooo:paragraph-rsid="0013d81d"/>
    </style:style>
    <style:style style:name="P172" style:family="paragraph" style:parent-style-name="List_20_Paragraph" style:list-style-name="WWNum2">
      <style:text-properties style:font-name="Calibri" fo:language="ca" fo:country="ES" fo:font-weight="normal" officeooo:rsid="0079b5ac" officeooo:paragraph-rsid="0079b5ac" style:font-weight-asian="normal" style:font-weight-complex="normal"/>
    </style:style>
    <style:style style:name="P173" style:family="paragraph" style:parent-style-name="List_20_Paragraph" style:list-style-name="L3">
      <style:text-properties style:font-name="Calibri" fo:language="ca" fo:country="ES" fo:font-weight="normal" officeooo:rsid="0077d900" officeooo:paragraph-rsid="00edb6ff" style:font-weight-asian="normal" style:font-weight-complex="normal"/>
    </style:style>
    <style:style style:name="P174" style:family="paragraph" style:parent-style-name="List_20_Paragraph" style:list-style-name="L3">
      <style:text-properties style:font-name="Calibri" fo:language="ca" fo:country="ES" fo:font-weight="normal" officeooo:rsid="00780e29" officeooo:paragraph-rsid="00edb6ff" style:font-weight-asian="normal" style:font-weight-complex="normal"/>
    </style:style>
    <style:style style:name="P175" style:family="paragraph" style:parent-style-name="List_20_Paragraph" style:list-style-name="L3">
      <style:text-properties style:font-name="Calibri" fo:language="ca" fo:country="ES" fo:font-weight="bold" officeooo:rsid="00b24c63" officeooo:paragraph-rsid="00edb6ff" style:font-weight-asian="bold" style:font-weight-complex="bold"/>
    </style:style>
    <style:style style:name="P176" style:family="paragraph" style:parent-style-name="List_20_Paragraph" style:list-style-name="WWNum6">
      <style:text-properties style:font-name="Calibri" fo:language="ca" fo:country="ES" fo:font-weight="bold" officeooo:paragraph-rsid="0013ba49" style:font-weight-asian="bold"/>
    </style:style>
    <style:style style:name="P177" style:family="paragraph" style:parent-style-name="List_20_Paragraph" style:list-style-name="WWNum3">
      <style:text-properties style:font-name="Calibri" fo:font-size="10pt" fo:language="ca" fo:country="ES" fo:font-weight="normal" officeooo:rsid="00484b61" officeooo:paragraph-rsid="00edb6ff" style:font-size-asian="10.5pt" style:font-weight-asian="normal" style:font-weight-complex="normal"/>
    </style:style>
    <style:style style:name="P178" style:family="paragraph" style:parent-style-name="List_20_Paragraph" style:list-style-name="L4">
      <style:text-properties style:font-name="Calibri" fo:font-size="10pt" fo:language="ca" fo:country="ES" fo:font-weight="bold" officeooo:rsid="00dea456" officeooo:paragraph-rsid="00dea456" style:font-size-asian="8.75pt" style:font-weight-asian="bold" style:font-size-complex="10pt" style:font-weight-complex="bold"/>
    </style:style>
    <style:style style:name="P179" style:family="paragraph" style:parent-style-name="List_20_Paragraph" style:list-style-name="WWNum3">
      <style:text-properties officeooo:paragraph-rsid="00b24c63"/>
    </style:style>
    <style:style style:name="P180" style:family="paragraph" style:parent-style-name="List_20_Paragraph" style:list-style-name="WWNum3">
      <style:text-properties officeooo:paragraph-rsid="00edb6ff"/>
    </style:style>
    <style:style style:name="P181" style:family="paragraph" style:parent-style-name="List_20_Paragraph" style:list-style-name="WWNum3">
      <style:text-properties officeooo:rsid="0077d900" officeooo:paragraph-rsid="0077d900"/>
    </style:style>
    <style:style style:name="P182" style:family="paragraph" style:parent-style-name="List_20_Paragraph" style:list-style-name="WWNum3">
      <style:text-properties fo:font-weight="bold" officeooo:rsid="0077d900" officeooo:paragraph-rsid="0077d900" style:font-weight-asian="bold" style:font-weight-complex="bold"/>
    </style:style>
    <style:style style:name="P183" style:family="paragraph" style:parent-style-name="List_20_Paragraph" style:list-style-name="L3">
      <style:text-properties fo:font-weight="bold" officeooo:rsid="0077d900" officeooo:paragraph-rsid="00edb6ff" style:font-weight-asian="bold" style:font-weight-complex="bold"/>
    </style:style>
    <style:style style:name="P184" style:family="paragraph" style:parent-style-name="List_20_Paragraph" style:list-style-name="L3">
      <style:text-properties fo:font-weight="bold" officeooo:rsid="00ef392c" officeooo:paragraph-rsid="00ef392c" style:font-weight-asian="bold" style:font-weight-complex="bold"/>
    </style:style>
    <style:style style:name="P185" style:family="paragraph" style:parent-style-name="List_20_Paragraph" style:list-style-name="WWNum3">
      <style:text-properties officeooo:rsid="00b24c63" officeooo:paragraph-rsid="00edb6ff"/>
    </style:style>
    <style:style style:name="P186" style:family="paragraph" style:parent-style-name="List_20_Paragraph" style:list-style-name="L2">
      <style:text-properties officeooo:paragraph-rsid="00edb6ff"/>
    </style:style>
    <style:style style:name="P187" style:family="paragraph" style:parent-style-name="List_20_Paragraph" style:list-style-name="L3">
      <style:text-properties officeooo:paragraph-rsid="00edb6ff"/>
    </style:style>
    <style:style style:name="P188" style:family="paragraph" style:parent-style-name="List_20_Paragraph" style:list-style-name="L3">
      <style:text-properties officeooo:rsid="00ef392c" officeooo:paragraph-rsid="00ef392c"/>
    </style:style>
    <style:style style:name="P189" style:family="paragraph" style:parent-style-name="List_20_Paragraph" style:list-style-name="WWNum4">
      <style:text-properties officeooo:paragraph-rsid="0013ba49"/>
    </style:style>
    <style:style style:name="P190" style:family="paragraph" style:parent-style-name="List_20_Paragraph" style:list-style-name="L4">
      <style:text-properties fo:font-size="10pt" fo:language="ca" fo:country="ES" officeooo:rsid="00dea456" officeooo:paragraph-rsid="00dea456" style:font-size-asian="8.75pt" style:font-size-complex="10pt"/>
    </style:style>
    <style:style style:name="P191" style:family="paragraph" style:parent-style-name="List_20_Paragraph" style:list-style-name="WWNum9">
      <style:text-properties officeooo:paragraph-rsid="007e39e2"/>
    </style:style>
    <style:style style:name="P192" style:family="paragraph" style:parent-style-name="Standard" style:master-page-name="Standard">
      <style:paragraph-properties fo:text-align="center" style:justify-single-word="false" style:page-number="auto"/>
      <style:text-properties fo:language="ca" fo:country="ES" officeooo:paragraph-rsid="000e1972"/>
    </style:style>
    <style:style style:name="P193" style:family="paragraph" style:parent-style-name="Standard">
      <style:text-properties fo:language="ca" fo:country="ES" officeooo:paragraph-rsid="0013d81d"/>
    </style:style>
    <style:style style:name="P194" style:family="paragraph" style:parent-style-name="Standard">
      <style:text-properties style:font-name="Calibri" fo:font-size="10pt" fo:language="ca" fo:country="ES" officeooo:rsid="007c77e2" officeooo:paragraph-rsid="007c77e2" style:font-size-asian="10.5pt"/>
    </style:style>
    <style:style style:name="P195" style:family="paragraph" style:parent-style-name="Standard" style:list-style-name="L5">
      <style:text-properties style:font-name="Calibri" fo:font-size="10pt" fo:language="ca" fo:country="ES" officeooo:rsid="006c9dc2" officeooo:paragraph-rsid="006c9dc2" style:font-size-asian="10.5pt"/>
    </style:style>
    <style:style style:name="P196" style:family="paragraph" style:parent-style-name="Text_20_body">
      <style:text-properties officeooo:rsid="00a6de51" officeooo:paragraph-rsid="00a6de51"/>
    </style:style>
    <style:style style:name="P197" style:family="paragraph" style:parent-style-name="Text_20_body" style:list-style-name="L6">
      <style:text-properties fo:font-weight="bold" officeooo:rsid="0071f004" officeooo:paragraph-rsid="0071f004" style:font-weight-asian="bold" style:font-weight-complex="bold"/>
    </style:style>
    <style:style style:name="P198" style:family="paragraph" style:parent-style-name="Text_20_body" style:list-style-name="L7">
      <style:text-properties fo:font-weight="bold" officeooo:rsid="0071f004" officeooo:paragraph-rsid="0071f004" style:font-weight-asian="bold" style:font-weight-complex="bold"/>
    </style:style>
    <style:style style:name="P199" style:family="paragraph" style:parent-style-name="Text_20_body" style:list-style-name="L7">
      <style:text-properties fo:font-weight="bold" officeooo:rsid="0071f004" officeooo:paragraph-rsid="00d70df8" style:font-weight-asian="bold" style:font-weight-complex="bold"/>
    </style:style>
    <style:style style:name="P200" style:family="paragraph">
      <loext:graphic-properties draw:fill="none"/>
    </style:style>
    <style:style style:name="P201" style:family="paragraph">
      <loext:graphic-properties draw:fill="none"/>
      <style:paragraph-properties fo:text-align="center"/>
    </style:style>
    <style:style style:name="T1" style:family="text">
      <style:text-properties style:font-name="Calibri"/>
    </style:style>
    <style:style style:name="T2" style:family="text">
      <style:text-properties style:font-name="Calibri" fo:font-size="11pt" style:font-size-asian="11pt" style:font-size-complex="11pt"/>
    </style:style>
    <style:style style:name="T3" style:family="text">
      <style:text-properties style:font-name="Calibri" fo:font-weight="bold" style:font-weight-asian="bold"/>
    </style:style>
    <style:style style:name="T4" style:family="text">
      <style:text-properties style:font-name="Calibri" fo:font-weight="bold" officeooo:rsid="0044a5d3" style:font-weight-asian="bold"/>
    </style:style>
    <style:style style:name="T5" style:family="text">
      <style:text-properties style:font-name="Calibri" fo:font-weight="bold" officeooo:rsid="00466cd1" style:font-weight-asian="bold"/>
    </style:style>
    <style:style style:name="T6" style:family="text">
      <style:text-properties style:font-name="Calibri" fo:font-weight="bold" officeooo:rsid="007c894a" style:font-weight-asian="bold"/>
    </style:style>
    <style:style style:name="T7" style:family="text">
      <style:text-properties style:font-name="Calibri" fo:font-weight="bold" style:font-weight-asian="bold" style:font-weight-complex="bold"/>
    </style:style>
    <style:style style:name="T8" style:family="text">
      <style:text-properties style:font-name="Calibri" fo:font-weight="bold" officeooo:rsid="00a259c5" style:font-weight-asian="bold" style:font-weight-complex="bold"/>
    </style:style>
    <style:style style:name="T9" style:family="text">
      <style:text-properties style:font-name="Calibri" fo:font-weight="bold" officeooo:rsid="00da28b0" style:font-weight-asian="bold"/>
    </style:style>
    <style:style style:name="T10" style:family="text">
      <style:text-properties style:font-name="Calibri" officeooo:rsid="001ca2a7"/>
    </style:style>
    <style:style style:name="T11" style:family="text">
      <style:text-properties style:font-name="Calibri" officeooo:rsid="0044a5d3"/>
    </style:style>
    <style:style style:name="T12" style:family="text">
      <style:text-properties style:font-name="Calibri" fo:language="ca" fo:country="ES"/>
    </style:style>
    <style:style style:name="T13" style:family="text">
      <style:text-properties style:font-name="Calibri" fo:language="ca" fo:country="ES" officeooo:rsid="006a329e"/>
    </style:style>
    <style:style style:name="T14" style:family="text">
      <style:text-properties style:font-name="Calibri" fo:language="ca" fo:country="ES" officeooo:rsid="0044a5d3"/>
    </style:style>
    <style:style style:name="T15" style:family="text">
      <style:text-properties style:font-name="Calibri" fo:language="ca" fo:country="ES" officeooo:rsid="006984aa"/>
    </style:style>
    <style:style style:name="T16" style:family="text">
      <style:text-properties style:font-name="Calibri" fo:language="ca" fo:country="ES" fo:font-weight="bold" style:font-weight-asian="bold"/>
    </style:style>
    <style:style style:name="T17" style:family="text">
      <style:text-properties style:font-name="Calibri" fo:language="ca" fo:country="ES" fo:font-weight="bold" officeooo:rsid="00484b61" style:font-weight-asian="bold" style:font-weight-complex="bold"/>
    </style:style>
    <style:style style:name="T18" style:family="text">
      <style:text-properties style:font-name="Calibri" fo:language="ca" fo:country="ES" fo:font-weight="bold" officeooo:rsid="007e39e2" style:font-weight-asian="bold" style:font-weight-complex="bold"/>
    </style:style>
    <style:style style:name="T19" style:family="text">
      <style:text-properties style:font-name="Calibri" fo:language="ca" fo:country="ES" fo:font-weight="bold" officeooo:rsid="00a4c287" style:font-weight-asian="bold" style:font-weight-complex="bold"/>
    </style:style>
    <style:style style:name="T20" style:family="text">
      <style:text-properties style:font-name="Calibri" fo:language="ca" fo:country="ES" fo:font-weight="bold" officeooo:rsid="00b24c63" style:font-weight-asian="bold" style:font-weight-complex="bold"/>
    </style:style>
    <style:style style:name="T21" style:family="text">
      <style:text-properties style:font-name="Calibri" fo:language="ca" fo:country="ES" fo:font-weight="bold" officeooo:rsid="0077d900" style:font-weight-asian="bold" style:font-weight-complex="normal"/>
    </style:style>
    <style:style style:name="T22" style:family="text">
      <style:text-properties style:font-name="Calibri" fo:language="ca" fo:country="ES" fo:font-weight="bold" officeooo:rsid="0077d900" style:font-weight-asian="bold"/>
    </style:style>
    <style:style style:name="T23" style:family="text">
      <style:text-properties style:font-name="Calibri" fo:language="ca" fo:country="ES" fo:font-weight="bold" officeooo:rsid="00780e29" style:font-weight-asian="bold"/>
    </style:style>
    <style:style style:name="T24" style:family="text">
      <style:text-properties style:font-name="Calibri" fo:language="ca" fo:country="ES" officeooo:rsid="00761f76"/>
    </style:style>
    <style:style style:name="T25" style:family="text">
      <style:text-properties style:font-name="Calibri" fo:language="ca" fo:country="ES" fo:font-weight="normal" style:font-weight-asian="normal" style:font-weight-complex="normal"/>
    </style:style>
    <style:style style:name="T26" style:family="text">
      <style:text-properties style:font-name="Calibri" fo:language="ca" fo:country="ES" fo:font-weight="normal" officeooo:rsid="00484b61" style:font-weight-asian="normal" style:font-weight-complex="normal"/>
    </style:style>
    <style:style style:name="T27" style:family="text">
      <style:text-properties style:font-name="Calibri" fo:language="ca" fo:country="ES" fo:font-weight="normal" officeooo:rsid="0077d900" style:font-weight-asian="normal" style:font-weight-complex="normal"/>
    </style:style>
    <style:style style:name="T28" style:family="text">
      <style:text-properties style:font-name="Calibri" fo:language="ca" fo:country="ES" fo:font-weight="normal" officeooo:rsid="0044a5d3" style:font-weight-asian="normal" style:font-weight-complex="normal"/>
    </style:style>
    <style:style style:name="T29" style:family="text">
      <style:text-properties style:font-name="Calibri" fo:language="ca" fo:country="ES" fo:font-weight="normal" officeooo:rsid="007e39e2" style:font-weight-asian="normal" style:font-weight-complex="normal"/>
    </style:style>
    <style:style style:name="T30" style:family="text">
      <style:text-properties style:font-name="Calibri" fo:language="ca" fo:country="ES" fo:font-weight="normal" officeooo:rsid="00a497e2" style:font-weight-asian="normal" style:font-weight-complex="normal"/>
    </style:style>
    <style:style style:name="T31" style:family="text">
      <style:text-properties style:font-name="Calibri" fo:language="ca" fo:country="ES" fo:font-weight="normal" officeooo:rsid="00a4c287" style:font-weight-asian="normal" style:font-weight-complex="normal"/>
    </style:style>
    <style:style style:name="T32" style:family="text">
      <style:text-properties style:font-name="Calibri" fo:language="ca" fo:country="ES" fo:font-weight="normal" officeooo:rsid="00b39b2c" style:font-weight-asian="normal" style:font-weight-complex="normal"/>
    </style:style>
    <style:style style:name="T33" style:family="text">
      <style:text-properties style:font-name="Calibri" fo:language="ca" fo:country="ES" officeooo:rsid="00780e29"/>
    </style:style>
    <style:style style:name="T34" style:family="text">
      <style:text-properties style:font-name="Calibri" fo:language="ca" fo:country="ES" officeooo:rsid="00805191"/>
    </style:style>
    <style:style style:name="T35" style:family="text">
      <style:text-properties style:font-name="Calibri" fo:language="ca" fo:country="ES" officeooo:rsid="0015973d"/>
    </style:style>
    <style:style style:name="T36" style:family="text">
      <style:text-properties style:font-name="Calibri" fo:language="ca" fo:country="ES" officeooo:rsid="00a6de51"/>
    </style:style>
    <style:style style:name="T37" style:family="text">
      <style:text-properties style:font-name="Calibri" fo:language="ca" fo:country="ES" officeooo:rsid="00ac4d60"/>
    </style:style>
    <style:style style:name="T38" style:family="text">
      <style:text-properties style:font-name="Calibri" officeooo:rsid="00466cd1"/>
    </style:style>
    <style:style style:name="T39" style:family="text">
      <style:text-properties style:font-name="Calibri" fo:font-weight="normal" style:font-weight-asian="normal" style:font-weight-complex="normal"/>
    </style:style>
    <style:style style:name="T40" style:family="text">
      <style:text-properties style:font-name="Calibri" fo:font-weight="normal" officeooo:rsid="00a497e2" style:font-weight-asian="normal" style:font-weight-complex="normal"/>
    </style:style>
    <style:style style:name="T41" style:family="text">
      <style:text-properties style:font-name="Calibri" fo:font-weight="normal" officeooo:rsid="00a259c5" style:font-weight-asian="normal" style:font-weight-complex="normal"/>
    </style:style>
    <style:style style:name="T42" style:family="text">
      <style:text-properties style:font-name="Calibri" fo:font-weight="normal" officeooo:rsid="00dea456" style:font-weight-asian="normal" style:font-weight-complex="normal"/>
    </style:style>
    <style:style style:name="T43" style:family="text">
      <style:text-properties style:font-name="Calibri" fo:font-weight="normal" officeooo:rsid="00f50c7a" style:font-weight-asian="normal" style:font-weight-complex="normal"/>
    </style:style>
    <style:style style:name="T44" style:family="text">
      <style:text-properties style:font-name="Calibri" fo:font-weight="normal" officeooo:rsid="00f9241f" style:font-weight-asian="normal" style:font-weight-complex="normal"/>
    </style:style>
    <style:style style:name="T45" style:family="text">
      <style:text-properties style:font-name="Calibri" fo:font-weight="normal" officeooo:rsid="00fa3763" style:font-weight-asian="normal" style:font-weight-complex="normal"/>
    </style:style>
    <style:style style:name="T46" style:family="text">
      <style:text-properties style:font-name="Calibri" fo:font-size="10pt" fo:language="ca" fo:country="ES" style:font-size-asian="10.5pt"/>
    </style:style>
    <style:style style:name="T47" style:family="text">
      <style:text-properties style:font-name="Calibri" fo:font-size="10pt" fo:language="ca" fo:country="ES" officeooo:rsid="006a329e" style:font-size-asian="10.5pt"/>
    </style:style>
    <style:style style:name="T48" style:family="text">
      <style:text-properties style:font-name="Calibri" fo:font-size="10pt" fo:language="ca" fo:country="ES" officeooo:rsid="007361b5" style:font-size-asian="10.5pt"/>
    </style:style>
    <style:style style:name="T49" style:family="text">
      <style:text-properties style:font-name="Calibri" fo:font-size="10pt" fo:language="ca" fo:country="ES" officeooo:rsid="006984aa" style:font-size-asian="10.5pt"/>
    </style:style>
    <style:style style:name="T50" style:family="text">
      <style:text-properties style:font-name="Calibri" fo:font-size="10pt" fo:language="ca" fo:country="ES" officeooo:rsid="00761f76" style:font-size-asian="10.5pt"/>
    </style:style>
    <style:style style:name="T51" style:family="text">
      <style:text-properties style:font-name="Calibri" fo:font-size="10pt" fo:language="ca" fo:country="ES" officeooo:rsid="00780e29" style:font-size-asian="10.5pt"/>
    </style:style>
    <style:style style:name="T52" style:family="text">
      <style:text-properties style:font-name="Calibri" fo:font-size="10pt" fo:language="ca" fo:country="ES" officeooo:rsid="007c894a" style:font-size-asian="10.5pt"/>
    </style:style>
    <style:style style:name="T53" style:family="text">
      <style:text-properties style:font-name="Calibri" fo:font-size="10pt" fo:language="ca" fo:country="ES" officeooo:rsid="008003a5" style:font-size-asian="10.5pt"/>
    </style:style>
    <style:style style:name="T54" style:family="text">
      <style:text-properties style:font-name="Calibri" fo:font-size="10pt" fo:language="ca" fo:country="ES" officeooo:rsid="0015973d" style:font-size-asian="10.5pt"/>
    </style:style>
    <style:style style:name="T55" style:family="text">
      <style:text-properties style:font-name="Calibri" fo:font-size="10pt" fo:language="ca" fo:country="ES" officeooo:rsid="00805191" style:font-size-asian="10.5pt"/>
    </style:style>
    <style:style style:name="T56" style:family="text">
      <style:text-properties style:font-name="Calibri" fo:font-size="10pt" fo:language="ca" fo:country="ES" officeooo:rsid="006ab4d4" style:font-size-asian="10.5pt"/>
    </style:style>
    <style:style style:name="T57" style:family="text">
      <style:text-properties style:font-name="Calibri" fo:font-size="10pt" fo:language="ca" fo:country="ES" officeooo:rsid="00b24c63" style:font-size-asian="10.5pt"/>
    </style:style>
    <style:style style:name="T58" style:family="text">
      <style:text-properties style:font-name="Calibri" fo:font-size="10pt" fo:language="ca" fo:country="ES" officeooo:rsid="00abd58a" style:font-size-asian="10.5pt"/>
    </style:style>
    <style:style style:name="T59" style:family="text">
      <style:text-properties style:font-name="Calibri" fo:font-size="10pt" fo:language="ca" fo:country="ES" fo:font-weight="bold" officeooo:rsid="00761f76" style:font-size-asian="10.5pt" style:font-weight-asian="bold"/>
    </style:style>
    <style:style style:name="T60" style:family="text">
      <style:text-properties style:font-name="Calibri" fo:font-size="10pt" fo:language="ca" fo:country="ES" fo:font-weight="bold" officeooo:rsid="00780e29" style:font-size-asian="10.5pt" style:font-weight-asian="bold"/>
    </style:style>
    <style:style style:name="T61" style:family="text">
      <style:text-properties style:font-name="Calibri" fo:font-size="10pt" fo:language="ca" fo:country="ES" fo:font-weight="bold" officeooo:rsid="007c894a" style:font-size-asian="10.5pt" style:font-weight-asian="bold"/>
    </style:style>
    <style:style style:name="T62" style:family="text">
      <style:text-properties style:font-name="Calibri" fo:font-size="10pt" fo:language="ca" fo:country="ES" fo:font-weight="bold" style:font-size-asian="10.5pt" style:font-weight-asian="bold" style:font-weight-complex="bold"/>
    </style:style>
    <style:style style:name="T63" style:family="text">
      <style:text-properties style:font-name="Calibri" fo:font-size="10pt" fo:language="ca" fo:country="ES" fo:font-weight="bold" officeooo:rsid="00abd58a" style:font-size-asian="10.5pt" style:font-weight-asian="bold" style:font-weight-complex="bold"/>
    </style:style>
    <style:style style:name="T64" style:family="text">
      <style:text-properties style:font-name="Calibri" fo:font-size="10pt" fo:language="ca" fo:country="ES" fo:font-weight="bold" officeooo:rsid="00b24c63" style:font-size-asian="10.5pt" style:font-weight-asian="bold" style:font-weight-complex="bold"/>
    </style:style>
    <style:style style:name="T65" style:family="text">
      <style:text-properties style:font-name="Calibri" fo:font-size="10pt" fo:language="ca" fo:country="ES" fo:font-weight="bold" officeooo:rsid="0077d900" style:font-size-asian="10.5pt" style:font-weight-asian="bold"/>
    </style:style>
    <style:style style:name="T66" style:family="text">
      <style:text-properties style:font-name="Calibri" fo:font-size="10pt" fo:language="ca" fo:country="ES" fo:font-weight="bold" officeooo:rsid="00b24c63" style:font-size-asian="10.5pt" style:font-weight-asian="bold"/>
    </style:style>
    <style:style style:name="T67" style:family="text">
      <style:text-properties style:font-name="Calibri" fo:font-size="10pt" fo:language="ca" fo:country="ES" fo:font-weight="normal" style:font-size-asian="10.5pt" style:font-weight-asian="normal" style:font-weight-complex="normal"/>
    </style:style>
    <style:style style:name="T68" style:family="text">
      <style:text-properties style:font-name="Calibri" fo:font-size="10pt" fo:language="ca" fo:country="ES" fo:font-weight="normal" officeooo:rsid="007e39e2" style:font-size-asian="10.5pt" style:font-weight-asian="normal" style:font-weight-complex="normal"/>
    </style:style>
    <style:style style:name="T69" style:family="text">
      <style:text-properties style:font-name="Calibri" fo:font-size="10pt" fo:language="ca" fo:country="ES" fo:font-weight="normal" officeooo:rsid="007fabbe" style:font-size-asian="10.5pt" style:font-weight-asian="normal" style:font-weight-complex="normal"/>
    </style:style>
    <style:style style:name="T70" style:family="text">
      <style:text-properties style:font-name="Calibri" fo:font-size="10pt" fo:language="ca" fo:country="ES" fo:font-weight="normal" officeooo:rsid="0077d900" style:font-size-asian="10.5pt" style:font-weight-asian="normal" style:font-weight-complex="normal"/>
    </style:style>
    <style:style style:name="T71" style:family="text">
      <style:text-properties style:font-name="Calibri" fo:font-size="10pt" fo:language="ca" fo:country="ES" fo:font-weight="normal" officeooo:rsid="00b24c63" style:font-size-asian="10.5pt" style:font-weight-asian="normal" style:font-weight-complex="normal"/>
    </style:style>
    <style:style style:name="T72" style:family="text">
      <style:text-properties style:font-name="Calibri" fo:font-size="10pt" officeooo:rsid="00589ea1" style:font-size-asian="10.5pt" style:font-name-complex="Arial Narrow1"/>
    </style:style>
    <style:style style:name="T73" style:family="text">
      <style:text-properties style:font-name="Calibri" fo:font-size="10pt" officeooo:rsid="00e52657" style:font-size-asian="10.5pt" style:font-name-complex="Arial Narrow1"/>
    </style:style>
    <style:style style:name="T74" style:family="text">
      <style:text-properties style:font-name="Calibri" fo:font-size="10pt" fo:font-weight="bold" officeooo:rsid="00a259c5" style:font-size-asian="10.5pt" style:font-weight-asian="bold" style:font-weight-complex="bold"/>
    </style:style>
    <style:style style:name="T75" style:family="text">
      <style:text-properties style:font-name="Calibri" fo:font-size="10pt" fo:font-weight="bold" officeooo:rsid="00abd58a" style:font-size-asian="10.5pt" style:font-weight-asian="bold" style:font-weight-complex="bold"/>
    </style:style>
    <style:style style:name="T76" style:family="text">
      <style:text-properties style:font-name="Calibri" fo:font-size="10pt" style:font-size-asian="8.75pt" style:font-size-complex="10pt"/>
    </style:style>
    <style:style style:name="T77" style:family="text">
      <style:text-properties style:font-name="Calibri" style:font-name-complex="Arial Narrow1"/>
    </style:style>
    <style:style style:name="T78" style:family="text">
      <style:text-properties style:font-name="Calibri" officeooo:rsid="00589ea1" style:font-name-complex="Arial Narrow1"/>
    </style:style>
    <style:style style:name="T79" style:family="text">
      <style:text-properties style:font-name="Calibri" officeooo:rsid="00434c2e" style:font-name-complex="Arial Narrow1"/>
    </style:style>
    <style:style style:name="T80" style:family="text">
      <style:text-properties style:font-name="Calibri" officeooo:rsid="00e52657" style:font-name-complex="Arial Narrow1"/>
    </style:style>
    <style:style style:name="T81" style:family="text">
      <style:text-properties style:font-name="Calibri" officeooo:rsid="00e9aff6" style:font-name-complex="Arial Narrow1"/>
    </style:style>
    <style:style style:name="T82" style:family="text">
      <style:text-properties style:font-name="Calibri" fo:font-style="italic" style:font-style-asian="italic" style:font-style-complex="italic"/>
    </style:style>
    <style:style style:name="T83" style:family="text">
      <style:text-properties style:font-name="Calibri" officeooo:rsid="0064c74a"/>
    </style:style>
    <style:style style:name="T84" style:family="text">
      <style:text-properties style:font-name="Calibri" officeooo:rsid="007361b5"/>
    </style:style>
    <style:style style:name="T85" style:family="text">
      <style:text-properties style:font-name="Calibri" officeooo:rsid="00761f76"/>
    </style:style>
    <style:style style:name="T86"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87"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88" style:family="text">
      <style:text-properties fo:language="ca" fo:country="ES" officeooo:rsid="0064c74a"/>
    </style:style>
    <style:style style:name="T89" style:family="text">
      <style:text-properties fo:font-weight="normal" style:font-weight-asian="normal" style:font-weight-complex="normal"/>
    </style:style>
    <style:style style:name="T90" style:family="text">
      <style:text-properties officeooo:rsid="00434c2e"/>
    </style:style>
    <style:style style:name="T91" style:family="text">
      <style:text-properties officeooo:rsid="0044a5d3"/>
    </style:style>
    <style:style style:name="T92" style:family="text">
      <style:text-properties officeooo:rsid="004acf98"/>
    </style:style>
    <style:style style:name="T93" style:family="text">
      <style:text-properties officeooo:rsid="004d4998"/>
    </style:style>
    <style:style style:name="T94" style:family="text">
      <style:text-properties officeooo:rsid="004f05d5"/>
    </style:style>
    <style:style style:name="T95" style:family="text">
      <style:text-properties officeooo:rsid="004f6677"/>
    </style:style>
    <style:style style:name="T96" style:family="text">
      <style:text-properties officeooo:rsid="00589ea1"/>
    </style:style>
    <style:style style:name="T97" style:family="text">
      <style:text-properties fo:color="#007dc3" loext:opacity="100%" fo:font-size="18pt" fo:language="ca" fo:country="ES" style:font-size-asian="18pt" style:font-name-complex="Times New Roman" style:font-size-complex="18pt"/>
    </style:style>
    <style:style style:name="T98" style:family="text">
      <style:text-properties fo:color="#007dc3" loext:opacity="100%" fo:font-size="18pt" fo:language="ca" fo:country="ES" officeooo:rsid="00e7135e" style:font-size-asian="18pt" style:font-name-complex="Times New Roman" style:font-size-complex="18pt"/>
    </style:style>
    <style:style style:name="T99" style:family="text">
      <style:text-properties fo:color="#007dc3" loext:opacity="100%" fo:font-size="18pt" fo:language="ca" fo:country="ES" officeooo:rsid="00e9aff6" style:font-size-asian="18pt" style:font-name-complex="Times New Roman" style:font-size-complex="18pt"/>
    </style:style>
    <style:style style:name="T100" style:family="text">
      <style:text-properties fo:color="#007dc3" loext:opacity="100%" fo:font-size="18pt" fo:language="ca" fo:country="ES" officeooo:rsid="01002177" style:font-size-asian="18pt" style:font-name-complex="Times New Roman" style:font-size-complex="18pt"/>
    </style:style>
    <style:style style:name="T101"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102" style:family="text">
      <style:text-properties fo:color="#007dc3" loext:opacity="100%" style:font-name="Calibri" fo:font-size="18pt" fo:language="ca" fo:country="ES" officeooo:rsid="00e52657" style:font-size-asian="18pt" style:language-asian="en" style:country-asian="US" style:font-name-complex="Times New Roman" style:font-size-complex="18pt"/>
    </style:style>
    <style:style style:name="T103" style:family="text">
      <style:text-properties fo:color="#007dc3" loext:opacity="100%" style:font-name="Calibri" fo:font-size="18pt" fo:language="ca" fo:country="ES" officeooo:rsid="00e9aff6" style:font-size-asian="18pt" style:language-asian="en" style:country-asian="US" style:font-name-complex="Times New Roman" style:font-size-complex="18pt"/>
    </style:style>
    <style:style style:name="T104" style:family="text">
      <style:text-properties fo:color="#007dc3" loext:opacity="100%" style:font-name="Calibri" fo:font-size="18pt" fo:language="ca" fo:country="ES" officeooo:rsid="01002177" style:font-size-asian="18pt" style:language-asian="en" style:country-asian="US" style:font-name-complex="Times New Roman" style:font-size-complex="18pt"/>
    </style:style>
    <style:style style:name="T105" style:family="text">
      <style:text-properties officeooo:rsid="0064c74a"/>
    </style:style>
    <style:style style:name="T106" style:family="text">
      <style:text-properties fo:font-size="10pt" fo:language="ca" fo:country="ES" officeooo:rsid="0064c74a" style:font-size-asian="10.5pt"/>
    </style:style>
    <style:style style:name="T107" style:family="text">
      <style:text-properties fo:font-size="10pt" fo:language="ca" fo:country="ES" fo:font-style="italic" officeooo:rsid="0064c74a" style:font-size-asian="10.5pt" style:font-style-asian="italic" style:font-style-complex="italic"/>
    </style:style>
    <style:style style:name="T108" style:family="text">
      <style:text-properties fo:font-size="10pt" fo:language="ca" fo:country="ES" fo:font-style="normal" officeooo:rsid="0064c74a" style:font-size-asian="10.5pt" style:font-style-asian="normal" style:font-style-complex="normal"/>
    </style:style>
    <style:style style:name="T109" style:family="text">
      <style:text-properties fo:font-size="10pt" officeooo:rsid="00c40662" style:font-size-asian="10.5pt"/>
    </style:style>
    <style:style style:name="T110" style:family="text">
      <style:text-properties fo:font-style="italic" style:font-style-asian="italic" style:font-style-complex="italic"/>
    </style:style>
    <style:style style:name="T111" style:family="text">
      <style:text-properties fo:font-style="normal" style:font-style-asian="normal" style:font-style-complex="normal"/>
    </style:style>
    <style:style style:name="T112" style:family="text">
      <style:text-properties text:display="none"/>
    </style:style>
    <style:style style:name="T113" style:family="text">
      <style:text-properties style:font-name="Calibri1"/>
    </style:style>
    <style:style style:name="T114" style:family="text">
      <style:text-properties style:font-name="Calibri1" officeooo:rsid="0064c74a"/>
    </style:style>
    <style:style style:name="T115" style:family="text">
      <style:text-properties style:font-name="Calibri1" fo:language="ca" fo:country="ES" officeooo:rsid="001ca2a7"/>
    </style:style>
    <style:style style:name="T116" style:family="text">
      <style:text-properties style:font-name="Calibri1" fo:language="ca" fo:country="ES" officeooo:rsid="00673e05"/>
    </style:style>
    <style:style style:name="T117" style:family="text">
      <style:text-properties style:font-name="Calibri1" fo:language="ca" fo:country="ES" officeooo:rsid="0068a48a"/>
    </style:style>
    <style:style style:name="T118" style:family="text">
      <style:text-properties style:font-name="Calibri1" fo:font-size="10pt" fo:language="ca" fo:country="ES" officeooo:rsid="00673e05" style:font-size-asian="10.5pt"/>
    </style:style>
    <style:style style:name="T119" style:family="text">
      <style:text-properties style:font-name="Calibri1" fo:font-size="10pt" fo:language="ca" fo:country="ES" officeooo:rsid="0068a48a" style:font-size-asian="10.5pt"/>
    </style:style>
    <style:style style:name="T120" style:family="text">
      <style:text-properties officeooo:rsid="006a329e"/>
    </style:style>
    <style:style style:name="T121" style:family="text">
      <style:text-properties style:font-name="Calibri4" fo:font-size="10pt" officeooo:rsid="006a329e" style:font-size-asian="10.5pt"/>
    </style:style>
    <style:style style:name="T122" style:family="text">
      <style:text-properties officeooo:rsid="0071f004"/>
    </style:style>
    <style:style style:name="T123" style:family="text">
      <style:text-properties officeooo:rsid="007361b5"/>
    </style:style>
    <style:style style:name="T124" style:family="text">
      <style:text-properties officeooo:rsid="007b59e2"/>
    </style:style>
    <style:style style:name="T125" style:family="text">
      <style:text-properties officeooo:rsid="008003a5"/>
    </style:style>
    <style:style style:name="T126" style:family="text">
      <style:text-properties officeooo:rsid="00805191"/>
    </style:style>
    <style:style style:name="T127" style:family="text">
      <style:text-properties officeooo:rsid="00a8c0d3"/>
    </style:style>
    <style:style style:name="T128" style:family="text">
      <style:text-properties officeooo:rsid="00bab267"/>
    </style:style>
    <style:style style:name="T129" style:family="text">
      <style:text-properties officeooo:rsid="00bbdca6"/>
    </style:style>
    <style:style style:name="T130" style:family="text">
      <style:text-properties officeooo:rsid="00c03633"/>
    </style:style>
    <style:style style:name="T131" style:family="text">
      <style:text-properties officeooo:rsid="00c18c01"/>
    </style:style>
    <style:style style:name="T132" style:family="text">
      <style:text-properties officeooo:rsid="00c40662"/>
    </style:style>
    <style:style style:name="T133" style:family="text">
      <style:text-properties officeooo:rsid="00ca9b30"/>
    </style:style>
    <style:style style:name="T134" style:family="text">
      <style:text-properties officeooo:rsid="0082e781"/>
    </style:style>
    <style:style style:name="T135" style:family="text">
      <style:text-properties officeooo:rsid="00db1be8"/>
    </style:style>
    <style:style style:name="T136" style:family="text">
      <style:text-properties officeooo:rsid="00e52657"/>
    </style:style>
    <style:style style:name="T137" style:family="text">
      <style:text-properties officeooo:rsid="00e9aff6"/>
    </style:style>
    <style:style style:name="T138" style:family="text">
      <style:text-properties officeooo:rsid="00faa0b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19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dddddd"/>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92"><draw:g text:anchor-type="as-char" svg:y="0cm" draw:z-index="0" draw:name="Group 6" draw:style-name="gr3"><draw:frame draw:name="Picture 2" draw:style-name="gr4" draw:text-style-name="P201" svg:width="13.553cm" svg:height="2.514cm" svg:x="3.438cm" svg:y="0cm"><draw:image xlink:href="Pictures/10000000000006A400000104C61E4F84145F3308.png" xlink:type="simple" xlink:show="embed" xlink:actuate="onLoad" draw:mime-type="image/png"><text:p/></draw:image></draw:frame><draw:frame draw:name="Picture 3" draw:style-name="gr5" draw:text-style-name="P201" svg:width="3.211cm" svg:height="2.513cm" svg:x="0cm" svg:y="0cm"><draw:image xlink:href="Pictures/10000001000002E6000002BB18D09AEB46C6E810.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105"/>
      <text:p text:style-name="P105"/>
      <text:p text:style-name="P9"><text:span text:style-name="T87">DISTRIBUCIÓ</text:span><text:span text:style-name="T86">: Manual d'usuari</text:span></text:p>
      <text:p text:style-name="P110"><text:span text:style-name="T104">20</text:span><text:span text:style-name="T97"> d</text:span><text:span text:style-name="T99">'</text:span><text:span text:style-name="T100">abril</text:span><text:span text:style-name="T98"> </text:span><text:span text:style-name="T97">de 20</text:span><text:span text:style-name="T101">2</text:span><text:span text:style-name="T104">6</text:span></text:p>
      <text:p text:style-name="P108">Serveis d'Administració Electrònica en el Govern de les Illes Balears</text:p>
      <text:p text:style-name="P109">Lot 3 (Serveis de tramitació d'expedients electrònics)</text:p>
      <text:p text:style-name="P106"/>
      <text:p text:style-name="P107"/>
      <text:p text:style-name="P106"/>
      <text:p text:style-name="P106"/>
      <text:p text:style-name="P106"/>
      <text:p text:style-name="P106"/>
      <text:p text:style-name="P26">Oficina Tècnica de Direcció de Projecte</text:p>
      <text:h text:style-name="P136" text:outline-level="1" text:is-list-header="true"><text:bookmark-start text:name="_Toc511319541"/><text:bookmark-start text:name="__RefHeading___Toc1440_1726870378"/>Control de versions del document<text:bookmark-end text:name="_Toc511319541"/><text:bookmark-end text:name="__RefHeading___Toc1440_1726870378"/></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04">Control de Canvis</text:p>
          </table:table-cell>
          <table:covered-table-cell/>
          <table:covered-table-cell/>
          <table:covered-table-cell/>
        </table:table-row>
        <table:table-row table:style-name="Tabla2.1">
          <table:table-cell table:style-name="Tabla2.A2" office:value-type="string">
            <text:p text:style-name="P37">Data</text:p>
          </table:table-cell>
          <table:table-cell table:style-name="Tabla2.B2" office:value-type="string">
            <text:p text:style-name="P38">Autor</text:p>
          </table:table-cell>
          <table:table-cell table:style-name="Tabla2.B2" office:value-type="string">
            <text:p text:style-name="P38">Versió</text:p>
          </table:table-cell>
          <table:table-cell table:style-name="Tabla2.D2" office:value-type="string">
            <text:p text:style-name="P38">Canvis</text:p>
          </table:table-cell>
        </table:table-row>
        <table:table-row table:style-name="Tabla2.1">
          <table:table-cell table:style-name="Tabla2.A3" office:value-type="string">
            <text:p text:style-name="P65"><text:span text:style-name="T90">02</text:span>/<text:span text:style-name="T90">1</text:span>0/2018</text:p>
          </table:table-cell>
          <table:table-cell table:style-name="Tabla2.B3" office:value-type="string">
            <text:p text:style-name="P65">Limit Tecnologies</text:p>
          </table:table-cell>
          <table:table-cell table:style-name="Tabla2.C3" office:value-type="string">
            <text:p text:style-name="P65">v1.0</text:p>
          </table:table-cell>
          <table:table-cell table:style-name="Tabla2.D3" office:value-type="string">
            <text:p text:style-name="P65">Versió inicial</text:p>
          </table:table-cell>
        </table:table-row>
        <table:table-row table:style-name="Tabla2.1">
          <table:table-cell table:style-name="Tabla2.A4" office:value-type="string">
            <text:p text:style-name="P6"><text:span text:style-name="T78">27</text:span><text:span text:style-name="T77">/</text:span><text:span text:style-name="T79">1</text:span><text:span text:style-name="T77">0/20</text:span><text:span text:style-name="T72">20</text:span></text:p>
          </table:table-cell>
          <table:table-cell table:style-name="Tabla2.B4" office:value-type="string">
            <text:p text:style-name="P65">Limit Tecnologies</text:p>
          </table:table-cell>
          <table:table-cell table:style-name="Tabla2.C4" office:value-type="string">
            <text:p text:style-name="P65">v1.<text:span text:style-name="T96">1</text:span></text:p>
          </table:table-cell>
          <table:table-cell table:style-name="Tabla2.D4" office:value-type="string">
            <text:p text:style-name="P77">Revisió de canvis respecte a la versió 0.9.31</text:p>
          </table:table-cell>
        </table:table-row>
        <table:table-row table:style-name="Tabla2.1">
          <table:table-cell table:style-name="Tabla2.A5" office:value-type="string">
            <text:p text:style-name="P6"><text:span text:style-name="T78">27</text:span><text:span text:style-name="T77">/</text:span><text:span text:style-name="T80">04</text:span><text:span text:style-name="T77">/20</text:span><text:span text:style-name="T72">2</text:span><text:span text:style-name="T73">2</text:span></text:p>
          </table:table-cell>
          <table:table-cell table:style-name="Tabla2.B5" office:value-type="string">
            <text:p text:style-name="P65">Limit Tecnologies</text:p>
          </table:table-cell>
          <table:table-cell table:style-name="Tabla2.C5" office:value-type="string">
            <text:p text:style-name="P65">v1.<text:span text:style-name="T136">2</text:span></text:p>
          </table:table-cell>
          <table:table-cell table:style-name="Tabla2.D5" office:value-type="string">
            <text:p text:style-name="P77">Revisió de canvis respecte a la versió 0.9.<text:span text:style-name="T136">41</text:span></text:p>
          </table:table-cell>
        </table:table-row>
        <table:table-row table:style-name="Tabla2.1">
          <table:table-cell table:style-name="Tabla2.A6" office:value-type="string">
            <text:p text:style-name="P6"><text:span text:style-name="T81">20</text:span><text:span text:style-name="T77">/</text:span><text:span text:style-name="T81">10</text:span><text:span text:style-name="T77">/20</text:span><text:span text:style-name="T72">2</text:span><text:span text:style-name="T73">2</text:span></text:p>
          </table:table-cell>
          <table:table-cell table:style-name="Tabla2.B6" office:value-type="string">
            <text:p text:style-name="P65">Limit Tecnologies</text:p>
          </table:table-cell>
          <table:table-cell table:style-name="Tabla2.C6" office:value-type="string">
            <text:p text:style-name="P65">v1.<text:span text:style-name="T137">3</text:span></text:p>
          </table:table-cell>
          <table:table-cell table:style-name="Tabla2.D6" office:value-type="string">
            <text:p text:style-name="P78">Separar manuals d'usuari i d'administrador.</text:p>
          </table:table-cell>
        </table:table-row>
        <table:table-row table:style-name="Tabla2.1">
          <table:table-cell table:style-name="Tabla2.A7" office:value-type="string">
            <text:p text:style-name="P79">20/04/2026</text:p>
          </table:table-cell>
          <table:table-cell table:style-name="Tabla2.B7" office:value-type="string">
            <text:p text:style-name="P66">Limit Tecnologies</text:p>
          </table:table-cell>
          <table:table-cell table:style-name="Tabla2.C7" office:value-type="string">
            <text:p text:style-name="P67"><text:span text:style-name="T138">v</text:span>1.0.8</text:p>
          </table:table-cell>
          <table:table-cell table:style-name="Tabla2.D7" office:value-type="string">
            <text:p text:style-name="P79">Canvi a la pagina d’anotacions</text:p>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04">Revisat per</text:p>
          </table:table-cell>
          <table:covered-table-cell/>
          <table:covered-table-cell/>
        </table:table-row>
        <table:table-row table:style-name="Tabla3.1">
          <table:table-cell table:style-name="Tabla3.A2" office:value-type="string">
            <text:p text:style-name="P37">Nom</text:p>
          </table:table-cell>
          <table:table-cell table:style-name="Tabla3.B2" office:value-type="string">
            <text:p text:style-name="P38">Data</text:p>
          </table:table-cell>
          <table:table-cell table:style-name="Tabla3.C2" office:value-type="string">
            <text:p text:style-name="P38">Àrea, departament o empresa</text:p>
          </table:table-cell>
        </table:table-row>
        <table:table-row table:style-name="Tabla3.1">
          <table:table-cell table:style-name="Tabla3.A3" office:value-type="string">
            <text:p text:style-name="P65"/>
          </table:table-cell>
          <table:table-cell table:style-name="Tabla3.B3" office:value-type="string">
            <text:p text:style-name="P65"/>
          </table:table-cell>
          <table:table-cell table:style-name="Tabla3.C3" office:value-type="string">
            <text:p text:style-name="P65"/>
          </table:table-cell>
        </table:table-row>
        <table:table-row table:style-name="Tabla3.1">
          <table:table-cell table:style-name="Tabla3.A4" office:value-type="string">
            <text:p text:style-name="P103"/>
          </table:table-cell>
          <table:table-cell table:style-name="Tabla3.B4" office:value-type="string">
            <text:p text:style-name="P103"/>
          </table:table-cell>
          <table:table-cell table:style-name="Tabla3.C4" office:value-type="string">
            <text:p text:style-name="P103"/>
          </table:table-cell>
        </table:table-row>
        <table:table-row table:style-name="Tabla3.1">
          <table:table-cell table:style-name="Tabla3.A5" office:value-type="string">
            <text:p text:style-name="P103"/>
          </table:table-cell>
          <table:table-cell table:style-name="Tabla3.B5" office:value-type="string">
            <text:p text:style-name="P103"/>
          </table:table-cell>
          <table:table-cell table:style-name="Tabla3.C5" office:value-type="string">
            <text:p text:style-name="P103"/>
          </table:table-cell>
        </table:table-row>
        <table:table-row table:style-name="Tabla3.1">
          <table:table-cell table:style-name="Tabla3.A6" office:value-type="string">
            <text:p text:style-name="P103"/>
          </table:table-cell>
          <table:table-cell table:style-name="Tabla3.B6" office:value-type="string">
            <text:p text:style-name="P103"/>
          </table:table-cell>
          <table:table-cell table:style-name="Tabla3.C6" office:value-type="string">
            <text:p text:style-name="P103"/>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104">Aprovat per</text:p>
          </table:table-cell>
          <table:covered-table-cell/>
          <table:covered-table-cell/>
        </table:table-row>
        <table:table-row table:style-name="Tabla4.1">
          <table:table-cell table:style-name="Tabla4.A2" office:value-type="string">
            <text:p text:style-name="P37">Nom</text:p>
          </table:table-cell>
          <table:table-cell table:style-name="Tabla4.B2" office:value-type="string">
            <text:p text:style-name="P38">Data</text:p>
          </table:table-cell>
          <table:table-cell table:style-name="Tabla4.C2" office:value-type="string">
            <text:p text:style-name="P38">Àrea, departament o empresa</text:p>
          </table:table-cell>
        </table:table-row>
        <table:table-row table:style-name="Tabla4.1">
          <table:table-cell table:style-name="Tabla4.A3" office:value-type="string">
            <text:p text:style-name="P65"/>
          </table:table-cell>
          <table:table-cell table:style-name="Tabla4.B3" office:value-type="string">
            <text:p text:style-name="P65"/>
          </table:table-cell>
          <table:table-cell table:style-name="Tabla4.C3" office:value-type="string">
            <text:p text:style-name="P65"/>
          </table:table-cell>
        </table:table-row>
        <table:table-row table:style-name="Tabla4.1">
          <table:table-cell table:style-name="Tabla4.A4" office:value-type="string">
            <text:p text:style-name="P103"/>
          </table:table-cell>
          <table:table-cell table:style-name="Tabla4.B4" office:value-type="string">
            <text:p text:style-name="P103"/>
          </table:table-cell>
          <table:table-cell table:style-name="Tabla4.C4" office:value-type="string">
            <text:p text:style-name="P103"/>
          </table:table-cell>
        </table:table-row>
        <table:table-row table:style-name="Tabla4.1">
          <table:table-cell table:style-name="Tabla4.A5" office:value-type="string">
            <text:p text:style-name="P103"/>
          </table:table-cell>
          <table:table-cell table:style-name="Tabla4.B5" office:value-type="string">
            <text:p text:style-name="P103"/>
          </table:table-cell>
          <table:table-cell table:style-name="Tabla4.C5" office:value-type="string">
            <text:p text:style-name="P103"/>
          </table:table-cell>
        </table:table-row>
        <table:table-row table:style-name="Tabla4.1">
          <table:table-cell table:style-name="Tabla4.A6" office:value-type="string">
            <text:p text:style-name="P103"/>
          </table:table-cell>
          <table:table-cell table:style-name="Tabla4.B6" office:value-type="string">
            <text:p text:style-name="P103"/>
          </table:table-cell>
          <table:table-cell table:style-name="Tabla4.C6" office:value-type="string">
            <text:p text:style-name="P103"/>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04">Llista de distribució</text:p>
          </table:table-cell>
          <table:covered-table-cell/>
          <table:covered-table-cell/>
        </table:table-row>
        <table:table-row table:style-name="Tabla5.1">
          <table:table-cell table:style-name="Tabla5.A2" office:value-type="string">
            <text:p text:style-name="P37">Nom</text:p>
          </table:table-cell>
          <table:table-cell table:style-name="Tabla5.B2" office:value-type="string">
            <text:p text:style-name="P38">Àrea, departament o empresa</text:p>
          </table:table-cell>
          <table:table-cell table:style-name="Tabla5.C2" office:value-type="string">
            <text:p text:style-name="P38">Correu electrònic</text:p>
          </table:table-cell>
        </table:table-row>
        <table:table-row table:style-name="Tabla5.1">
          <table:table-cell table:style-name="Tabla5.A3" office:value-type="string">
            <text:p text:style-name="P65"/>
          </table:table-cell>
          <table:table-cell table:style-name="Tabla5.B3" office:value-type="string">
            <text:p text:style-name="P65"/>
          </table:table-cell>
          <table:table-cell table:style-name="Tabla5.C3" office:value-type="string">
            <text:p text:style-name="P65"/>
          </table:table-cell>
        </table:table-row>
        <table:table-row table:style-name="Tabla5.1">
          <table:table-cell table:style-name="Tabla5.A4" office:value-type="string">
            <text:p text:style-name="P103"/>
          </table:table-cell>
          <table:table-cell table:style-name="Tabla5.B4" office:value-type="string">
            <text:p text:style-name="P103"/>
          </table:table-cell>
          <table:table-cell table:style-name="Tabla5.C4" office:value-type="string">
            <text:p text:style-name="P103"/>
          </table:table-cell>
        </table:table-row>
      </table:table>
      <text:p text:style-name="P23"/>
      <text:p text:style-name="P13"/>
      <text:p text:style-name="P10"/>
      <text:p text:style-name="P81"/>
      <text:p text:style-name="P81"/>
      <text:p text:style-name="P81"/>
      <text:p text:style-name="P81"/>
      <text:p text:style-name="P81"/>
      <text:p text:style-name="P81"><text:soft-page-break/></text:p>
      <text:p text:style-name="P81"/>
      <text:p text:style-name="P81">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26"><text:a xlink:type="simple" xlink:href="#__RefHeading___Toc1440_1726870378" text:style-name="Index_20_Link" text:visited-style-name="Index_20_Link">Control de versions del document<text:tab/>2</text:a></text:p>
          <text:p text:style-name="P126"><text:a xlink:type="simple" xlink:href="#__RefHeading___Toc32799_3233606579" text:style-name="Index_20_Link" text:visited-style-name="Index_20_Link"><text:s/>1 <text:s/>Introducció<text:tab/>4</text:a></text:p>
          <text:p text:style-name="P126"><text:a xlink:type="simple" xlink:href="#__RefHeading___Toc32801_3233606579" text:style-name="Index_20_Link" text:visited-style-name="Index_20_Link"><text:s/>2 <text:s/>Usuari<text:tab/>5</text:a></text:p>
          <text:p text:style-name="P127"><text:a xlink:type="simple" xlink:href="#__RefHeading___Toc2741_1726870378" text:style-name="Index_20_Link" text:visited-style-name="Index_20_Link">2.1. Contingut de bústies<text:tab/>5</text:a></text:p>
          <text:p text:style-name="P128"><text:a xlink:type="simple" xlink:href="#__RefHeading___Toc2743_1726870378" text:style-name="Index_20_Link" text:visited-style-name="Index_20_Link">2.1.1. Llista d'anotacions de registre<text:tab/>6</text:a></text:p>
          <text:p text:style-name="P128"><text:a xlink:type="simple" xlink:href="#__RefHeading___Toc2745_1726870378" text:style-name="Index_20_Link" text:visited-style-name="Index_20_Link">2.1.2. Filtre del llistat d'anotacions de registre<text:tab/>9</text:a></text:p>
          <text:p text:style-name="P128"><text:a xlink:type="simple" xlink:href="#__RefHeading___Toc2747_1726870378" text:style-name="Index_20_Link" text:visited-style-name="Index_20_Link">2.1.3. Accions sobre les anotacions de registre<text:tab/>10</text:a></text:p>
          <text:p text:style-name="P129"><text:a xlink:type="simple" xlink:href="#__RefHeading___Toc9611_678410495" text:style-name="Index_20_Link" text:visited-style-name="Index_20_Link">2.1.3.1. Detalls<text:tab/>11</text:a></text:p>
          <text:p text:style-name="P130"><text:a xlink:type="simple" xlink:href="#__RefHeading___Toc9613_678410495" text:style-name="Index_20_Link" text:visited-style-name="Index_20_Link"><text:s/>2.1.3.1.1 <text:s/>Resum<text:tab/>11</text:a></text:p>
          <text:p text:style-name="P130"><text:a xlink:type="simple" xlink:href="#__RefHeading___Toc9615_678410495" text:style-name="Index_20_Link" text:visited-style-name="Index_20_Link"><text:s/>2.1.3.1.2 <text:s/>Informació de registre<text:tab/>11</text:a></text:p>
          <text:p text:style-name="P130"><text:a xlink:type="simple" xlink:href="#__RefHeading___Toc9617_678410495" text:style-name="Index_20_Link" text:visited-style-name="Index_20_Link"><text:s/>2.1.3.1.3 <text:s/>Interessats<text:tab/>13</text:a></text:p>
          <text:p text:style-name="P130"><text:a xlink:type="simple" xlink:href="#__RefHeading___Toc9619_678410495" text:style-name="Index_20_Link" text:visited-style-name="Index_20_Link"><text:s/>2.1.3.1.4 <text:s/>Annexos<text:tab/>14</text:a></text:p>
          <text:p text:style-name="P130"><text:a xlink:type="simple" xlink:href="#__RefHeading___Toc9621_678410495" text:style-name="Index_20_Link" text:visited-style-name="Index_20_Link"><text:s/>2.1.3.1.5 <text:s/>Arxiu Info<text:tab/>15</text:a></text:p>
          <text:p text:style-name="P130"><text:a xlink:type="simple" xlink:href="#__RefHeading___Toc9623_678410495" text:style-name="Index_20_Link" text:visited-style-name="Index_20_Link"><text:s/>2.1.3.1.6 <text:s/>Processament automàtic<text:tab/>16</text:a></text:p>
          <text:p text:style-name="P130"><text:a xlink:type="simple" xlink:href="#__RefHeading___Toc9625_678410495" text:style-name="Index_20_Link" text:visited-style-name="Index_20_Link"><text:s/>2.1.3.1.7 <text:s/>Processament backoffice<text:tab/>17</text:a></text:p>
          <text:p text:style-name="P129"><text:a xlink:type="simple" xlink:href="#__RefHeading___Toc2759_1726870378" text:style-name="Index_20_Link" text:visited-style-name="Index_20_Link">2.1.3.2. Històric d'accions<text:tab/>17</text:a></text:p>
          <text:p text:style-name="P130"><text:a xlink:type="simple" xlink:href="#__RefHeading___Toc2761_1726870378" text:style-name="Index_20_Link" text:visited-style-name="Index_20_Link"><text:s/>2.1.3.2.1 <text:s/>Resum<text:tab/>18</text:a></text:p>
          <text:p text:style-name="P130"><text:a xlink:type="simple" xlink:href="#__RefHeading___Toc37402_3531032951" text:style-name="Index_20_Link" text:visited-style-name="Index_20_Link"><text:s/>2.1.3.2.2 <text:s/>Accions<text:tab/>18</text:a></text:p>
          <text:p text:style-name="P130"><text:a xlink:type="simple" xlink:href="#__RefHeading___Toc2763_1726870378" text:style-name="Index_20_Link" text:visited-style-name="Index_20_Link"><text:s/>2.1.3.2.3 <text:s/>Moviments<text:tab/>18</text:a></text:p>
          <text:p text:style-name="P130"><text:a xlink:type="simple" xlink:href="#__RefHeading___Toc2765_1726870378" text:style-name="Index_20_Link" text:visited-style-name="Index_20_Link"><text:s/>2.1.3.2.4 <text:s/>Auditoria<text:tab/>19</text:a></text:p>
          <text:p text:style-name="P129"><text:a xlink:type="simple" xlink:href="#__RefHeading___Toc2767_1726870378" text:style-name="Index_20_Link" text:visited-style-name="Index_20_Link">2.1.3.3. Reenviar<text:tab/>19</text:a></text:p>
          <text:p text:style-name="P130"><text:a xlink:type="simple" xlink:href="#__RefHeading___Toc4026_1810852831" text:style-name="Index_20_Link" text:visited-style-name="Index_20_Link"><text:s/>2.1.3.3.1 <text:s/>Bústies favorits<text:tab/>20</text:a></text:p>
          <text:p text:style-name="P129"><text:a xlink:type="simple" xlink:href="#__RefHeading___Toc2769_1726870378" text:style-name="Index_20_Link" text:visited-style-name="Index_20_Link">2.1.3.4. Marcar com a processat<text:tab/>21</text:a></text:p>
          <text:p text:style-name="P129"><text:a xlink:type="simple" xlink:href="#__RefHeading___Toc2769_17268703781" text:style-name="Index_20_Link" text:visited-style-name="Index_20_Link">2.1.3.5. Marcar com a pendent<text:tab/>21</text:a></text:p>
          <text:p text:style-name="P129"><text:a xlink:type="simple" xlink:href="#__RefHeading___Toc2771_1726870378" text:style-name="Index_20_Link" text:visited-style-name="Index_20_Link">2.1.3.6. Llistat d'alertes<text:tab/>21</text:a></text:p>
          <text:p text:style-name="P128"><text:a xlink:type="simple" xlink:href="#__RefHeading___Toc2773_1726870378" text:style-name="Index_20_Link" text:visited-style-name="Index_20_Link">2.1.4. Comentaris sobre els continguts<text:tab/>22</text:a></text:p>
          <text:p text:style-name="P128"><text:a xlink:type="simple" xlink:href="#__RefHeading___Toc2797_992022433" text:style-name="Index_20_Link" text:visited-style-name="Index_20_Link">2.1.5. Classificació d'anotacions<text:tab/>23</text:a></text:p>
          <text:p text:style-name="P129"><text:a xlink:type="simple" xlink:href="#__RefHeading___Toc2672_992022433" text:style-name="Index_20_Link" text:visited-style-name="Index_20_Link">2.1.5.1. Classificació simple<text:tab/>23</text:a></text:p>
          <text:p text:style-name="P129"><text:a xlink:type="simple" xlink:href="#__RefHeading___Toc2674_992022433" text:style-name="Index_20_Link" text:visited-style-name="Index_20_Link">2.1.5.2. Classificació múltiple<text:tab/>25</text:a></text:p>
          <text:p text:style-name="P128"><text:a xlink:type="simple" xlink:href="#__RefHeading___Toc4232_1810852831" text:style-name="Index_20_Link" text:visited-style-name="Index_20_Link">2.1.6. Reserva/agafar d’anotacions<text:tab/>26</text:a></text:p>
          <text:p text:style-name="P126"><text:a xlink:type="simple" xlink:href="#__RefHeading___Toc32805_3233606579" text:style-name="Index_20_Link" text:visited-style-name="Index_20_Link"><text:s/>3 <text:s/>Opcions d'usuari<text:tab/>28</text:a></text:p>
          <text:p text:style-name="P127"><text:a xlink:type="simple" xlink:href="#__RefHeading___Toc32807_3233606579" text:style-name="Index_20_Link" text:visited-style-name="Index_20_Link">3.1. Configuració usuari<text:tab/>28</text:a></text:p>
        </text:index-body>
      </text:table-of-content>
      <text:p text:style-name="Standard"/>
      <text:h text:style-name="P137" text:outline-level="1"><text:bookmark-start text:name="__RefHeading___Toc32799_3233606579"/>Introducció<text:bookmark-end text:name="__RefHeading___Toc32799_3233606579"/></text:h>
      <text:p text:style-name="P17"/>
      <text:p text:style-name="P82"><text:span text:style-name="T88">L'aplicació de DISTRIBUCIO s'encarrega de rebre altes d'anotacions de registre via WS. </text:span><text:span text:style-name="T106">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07">backoffice </text:span><text:span text:style-name="T108">de DISTRIBUCIO.</text:span></text:p>
      <text:p text:style-name="P97"/>
      <text:p text:style-name="P97"><draw:frame draw:style-name="fr1" draw:name="Frame1" text:anchor-type="paragraph" svg:width="13.404cm" draw:z-index="32"><draw:text-box fo:min-height="3.048cm"><text:p text:style-name="fig."><draw:frame draw:style-name="fr13" draw:name="Image3" text:anchor-type="as-char" svg:width="13.404cm" style:rel-width="100%" svg:height="3.048cm" style:rel-height="scale" draw:z-index="39"><draw:image xlink:href="Pictures/10000000000002750000008F6D44407D2226E1CB.png" xlink:type="simple" xlink:show="embed" xlink:actuate="onLoad" draw:mime-type="image/png"/></draw:frame><text:span text:style-name="T112"><text:line-break/></text:span>fig. <text:sequence text:ref-name="reffig.0" text:name="fig." text:formula="ooow:fig.+1" style:num-format="1">1</text:sequence>: Logotip en la capçalera de l'aplicació de DISTRIBUCIO.</text:p></draw:text-box></draw:frame></text:p>
      <text:p text:style-name="P18">La interfície web de l'aplicació de DISTRIBUCIÓ permet l'accés a un usuari identificat i l'usuari pot ser de 3 tipus:</text:p>
      <text:p text:style-name="P55"/>
      <text:p text:style-name="P14"><text:span text:style-name="T10"><text:tab/>1. </text:span><text:a xlink:type="simple" xlink:href="#2.Usuari|outline" text:style-name="Internet_20_link" text:visited-style-name="Visited_20_Internet_20_Link"><text:span text:style-name="T10">Usuari</text:span></text:a><text:span text:style-name="T83">: Són els usuaris que poden gestionar anotacions de DISTRIBUCIO per a les bústies sobre les quals tinguin permís d'accés per a una entitat específica. El rol que ha de tenir l'usuari per accedir com a tipus usuari és DIS_USER. </text:span></text:p>
      <text:p text:style-name="P55"><text:tab/>2. <text:a xlink:type="simple" xlink:href="#3.Administrador|outline" text:style-name="Internet_20_link" text:visited-style-name="Visited_20_Internet_20_Link">Administrador</text:a><text:span text:style-name="T105">: Els usuaris de tipus administrador d'entitat pot gestionar bústies i permisos per a usuaris d'aquestes bústies per a les diferents unitats organitzatives que depenen de l'entitat arrel de l'entorn. El rol que ha de t</text:span><text:span text:style-name="T114">enir un usuari administrador per poder administrar entitats és DIS_ADMIN i ha de tenir permís d'administrador sobre l'entitat.</text:span></text:p>
      <text:p text:style-name="P54"><text:span text:style-name="T113"><text:tab/>3. </text:span><text:a xlink:type="simple" xlink:href="#4.Superusuari|outline" text:style-name="Internet_20_link" text:visited-style-name="Visited_20_Internet_20_Link"><text:span text:style-name="T114">Superusuari</text:span></text:a><text:span text:style-name="T114">: Els usuaris de tipus Superusuari poden definir entitats arrels i accedir a paràmetres i monitoratge de DISTRIBUCIO a nivell general. Per a que un usuari pugui actuar com a Superusuari ha de tenir el rol assignat de DIS_SUPER.</text:span></text:p>
      <text:p text:style-name="P84"><draw:frame draw:style-name="fr32" draw:name="Image5" text:anchor-type="paragraph" svg:x="14.418cm" svg:y="0.33cm" svg:width="0.688cm" svg:height="0.609cm" draw:z-index="33"><draw:image xlink:href="Pictures/100000000000001A00000017D7A485B58984DCF0.png" xlink:type="simple" xlink:show="embed" xlink:actuate="onLoad" draw:mime-type="image/png"/></draw:frame></text:p>
      <text:p text:style-name="P85">Si un usuari té permís d'accés a més d'una entitat la pot escollir des del desplegable de la capçalera.</text:p>
      <text:p text:style-name="P85"/>
      <text:p text:style-name="P85"><draw:frame draw:style-name="fr1" draw:name="Frame2" text:anchor-type="paragraph" svg:width="12.885cm" draw:z-index="37"><draw:text-box fo:min-height="2.514cm"><text:p text:style-name="fig."><draw:frame draw:style-name="fr13" draw:name="Image6" text:anchor-type="as-char" svg:width="12.885cm" style:rel-width="100%" svg:height="2.514cm" style:rel-height="scale" draw:z-index="42"><draw:image xlink:href="Pictures/10000000000001E70000005F730C0A5653D54EFA.png" xlink:type="simple" xlink:show="embed" xlink:actuate="onLoad" draw:mime-type="image/png"/></draw:frame><text:span text:style-name="T112"><text:line-break/></text:span>fig. <text:sequence text:ref-name="reffig.1" text:name="fig." text:formula="ooow:fig.+1" style:num-format="1">2</text:sequence>: Opció desplegable per seleccionar l'enitat amb què treballar.</text:p></draw:text-box></draw:frame></text:p>
      <text:p text:style-name="P85"/>
      <text:p text:style-name="P85"/>
      <text:p text:style-name="P85"><draw:frame draw:style-name="fr16" draw:name="Image7" text:anchor-type="paragraph" svg:x="2.021cm" svg:y="0.459cm" svg:width="0.635cm" svg:height="0.503cm" draw:z-index="36"><draw:image xlink:href="Pictures/100000000000001800000013F980777ACAF636E3.png" xlink:type="simple" xlink:show="embed" xlink:actuate="onLoad" draw:mime-type="image/png"/></draw:frame>Si un usuari disposa de diferents rols llavors pot pot escollir el rol amb què treballar amb el menú desplegable de la capçalera.</text:p>
      <text:p text:style-name="P85"/>
      <text:p text:style-name="P85"><draw:frame draw:style-name="fr1" draw:name="Frame3" text:anchor-type="paragraph" svg:width="10.689cm" draw:z-index="41"><draw:text-box fo:min-height="2.672cm"><text:p text:style-name="fig."><draw:frame draw:style-name="fr13" draw:name="Image8" text:anchor-type="as-char" svg:width="10.689cm" style:rel-width="100%" svg:height="2.672cm" style:rel-height="scale" draw:z-index="46"><draw:image xlink:href="Pictures/100000000000019400000065CAF259CB40210454.png" xlink:type="simple" xlink:show="embed" xlink:actuate="onLoad" draw:mime-type="image/png"/></draw:frame><text:span text:style-name="T112"><text:line-break/></text:span>fig. <text:sequence text:ref-name="reffig.2" text:name="fig." text:formula="ooow:fig.+1" style:num-format="1">3</text:sequence>: Opció desplegable per seleccionar el tipus d'usuari amb què fer feina.</text:p></draw:text-box></draw:frame><text:soft-page-break/></text:p>
      <text:p text:style-name="P85"/>
      <text:p text:style-name="P83"><draw:frame draw:style-name="fr12" draw:name="Image10" text:anchor-type="paragraph" svg:x="3.122cm" svg:y="0.471cm" svg:width="0.556cm" svg:height="0.609cm" draw:z-index="108"><draw:image xlink:href="Pictures/100000000000001500000017403C8B8AAB78D0B7.png" xlink:type="simple" xlink:show="embed" xlink:actuate="onLoad" draw:mime-type="image/png"/></draw:frame><text:span text:style-name="T115">Segons el tipus d'usuari seleccionat l'usuari tindrà accés a diferents opcions i pantalle</text:span><text:span text:style-name="T116">s</text:span><text:span text:style-name="T115"> que es descriuen en els següents apartats.</text:span><text:span text:style-name="T116"> </text:span></text:p>
      <text:h text:style-name="Heading_20_1" text:outline-level="1"><text:bookmark-start text:name="__RefHeading___Toc32801_3233606579"/>Usuari<text:bookmark-end text:name="__RefHeading___Toc32801_3233606579"/></text:h>
      <text:p text:style-name="P86"/>
      <text:p text:style-name="P87">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91"/>
      <text:p text:style-name="P92"><text:span text:style-name="T12">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4">DISTRIBUCIÓ</text:span><text:span text:style-name="T12"> rebi </text:span><text:span text:style-name="T48">noves</text:span><text:span text:style-name="T12"> anotacions de registre, de manera que es distribuiran aquests assentaments dins les bústies corresponents segons dicti la regla definida.</text:span><text:span text:style-name="T15"> Els usuaris amb rol d'usuari normal podran accedir al contingut de les bústies per veure </text:span><text:span text:style-name="T49"><text:s/></text:span><text:span text:style-name="T48">les anotacions de registre i processar-les</text:span><text:span text:style-name="T15">.</text:span></text:p>
      <text:p text:style-name="P30"/>
      <text:p text:style-name="P30">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11"><text:span text:style-name="T120">La pàgina de contingut de bústies és la única pàgina a la que es pot accedir amb el rol d'usuari normal. També es pot recarregar o accedir amb l'opció </text:span><text:span text:style-name="T121"><text:s/></text:span><text:span text:style-name="T12">del menú principal que es troba la part superior dreta, en la capçalera de l'aplicació.</text:span><text:span text:style-name="T13"> Aquest també botó mostra la quantitat d'anotacions de registre pendents de processar</text:span><text:span text:style-name="T47">.</text:span></text:p>
      <text:p text:style-name="P30"/>
      <text:p text:style-name="P15"><draw:frame draw:style-name="fr5" draw:name="Frame6" text:anchor-type="as-char" svg:width="12.33cm" draw:z-index="117"><draw:text-box fo:min-height="3.556cm"><text:p text:style-name="fig."><draw:frame draw:style-name="fr34" draw:name="Imagen 1" text:anchor-type="as-char" svg:width="12.33cm" style:rel-width="100%" svg:height="3.556cm" style:rel-height="scale" draw:z-index="118"><draw:image xlink:href="Pictures/10000000000001F8000000CE2BD49E8A0031067D.png" xlink:type="simple" xlink:show="embed" xlink:actuate="onLoad" draw:mime-type="image/png"/></draw:frame><text:span text:style-name="T112"><text:line-break/></text:span>fig. <text:sequence text:ref-name="reffig.3" text:name="fig." text:formula="ooow:fig.+1" style:num-format="1">4</text:sequence>: Botó per accedir al contingut de les bústies i amb el número d'anotacions de registre pendents de processar.</text:p></draw:text-box></draw:frame></text:p>
      <text:p text:style-name="P30"/>
      <text:p text:style-name="P60">Quan s'accedeix al contingut de bústies es disposa d'una capçalera amb un formulari de filtre per filtrar el llistat i el llistat amb el resultat de les consultes.</text:p>
      <text:p text:style-name="P61"><text:soft-page-break/><draw:frame draw:style-name="fr27" draw:name="Imagen 182" text:anchor-type="as-char" svg:y="0cm" svg:width="17cm" style:rel-width="scale" svg:height="5.412cm" style:rel-height="scale" draw:z-index="119"><draw:image xlink:href="Pictures/10000001000004F200000193443D448E307A9275.png" xlink:type="simple" xlink:show="embed" xlink:actuate="onLoad" draw:mime-type="image/png"/><svg:desc>Captura de pantalla de computadora

Descripción generada automáticamente</svg:desc></draw:frame>fig. <text:sequence text:ref-name="reffig.4" text:name="fig." text:formula="ooow:fig.+1" style:num-format="1">5</text:sequence>: Pantalla de contingut de bústies per a usuaris amb el filtre i el llistat.</text:p>
      <text:p text:style-name="P99"><text:span text:style-name="T56">En els següents subapartats es descriuen la part del llistat i la del fi</text:span><text:span text:style-name="T48">l</text:span><text:span text:style-name="T56">tre.</text:span></text:p>
      <text:p text:style-name="P30"/>
      <text:h text:style-name="Heading_20_3" text:outline-level="3"><text:bookmark-start text:name="__RefHeading___Toc2743_1726870378"/>Llista d'anotacions de registre<text:bookmark-end text:name="__RefHeading___Toc2743_1726870378"/></text:h>
      <text:p text:style-name="P98"><text:span text:style-name="T12">La llista, per defecte mostra </text:span><text:span text:style-name="T48">les</text:span><text:span text:style-name="T12"> anotacions de registre </text:span><text:span text:style-name="T24">amb un estat pendent de processar</text:span><text:span text:style-name="T50"> </text:span><text:span text:style-name="T12">ordena</text:span><text:span text:style-name="T24">des </text:span><text:span text:style-name="T12">per data descendent</text:span><text:span text:style-name="T24"> d'arribada.</text:span></text:p>
      <text:p text:style-name="P64"><draw:frame draw:style-name="fr24" draw:name="Imatge14" text:anchor-type="char" svg:width="17cm" svg:height="3.625cm" draw:z-index="109"><draw:image xlink:href="Pictures/10000001000004F20000010E9196103641842BF4.png" xlink:type="simple" xlink:show="embed" xlink:actuate="onLoad" draw:mime-type="image/png"/></draw:frame></text:p>
      <text:p text:style-name="P121"><text:span text:style-name="T24">fig. </text:span><text:span text:style-name="T24"><text:sequence text:ref-name="reffig.5" text:name="fig." text:formula="ooow:fig.+1" style:num-format="1">6</text:sequence></text:span><text:span text:style-name="T24">: Exemple de llistat d'anotacions de registre.</text:span></text:p>
      <text:p text:style-name="P59">La informació que es mostra, columna a columna és la següent:</text:p>
      <text:p text:style-name="P30"/>
      <text:list xml:id="list1947137024" text:style-name="WWNum2">
        <text:list-item>
          <text:p text:style-name="P146"><text:span text:style-name="T59">Número</text:span><text:span text:style-name="T16">: </text:span><text:span text:style-name="T50">Número de l'anotació de registre compost pel llibre, número de llibre, número de registre i any</text:span><text:span text:style-name="T12">.</text:span></text:p>
        </text:list-item>
        <text:list-item>
          <text:p text:style-name="P149"><text:span text:style-name="T5">T</text:span><text:span text:style-name="T3">ítol: </text:span><text:span text:style-name="T39">Extracte de l'anotació de registre.</text:span></text:p>
        </text:list-item>
        <text:list-item>
          <text:p text:style-name="P147"><text:span text:style-name="T74">D</text:span><text:span text:style-name="T75">ocumentació</text:span><text:span text:style-name="T8">:</text:span><text:span text:style-name="T41"> Icona per indicar el tipus de documentació de l'anotació.</text:span></text:p>
        </text:list-item>
      </text:list>
      <text:list xml:id="list1689145421" text:style-name="L1">
        <text:list-item>
          <text:list>
            <text:list-item>
              <text:p text:style-name="P150"><text:span text:style-name="T41"><draw:frame draw:style-name="fr31" draw:name="Image15" text:anchor-type="as-char" svg:y="-0.3cm" svg:width="0.318cm" svg:height="0.37cm" draw:z-index="120"><draw:image xlink:href="Pictures/100000000000000C0000000E4325FA7DF06B1AD3.png" xlink:type="simple" xlink:show="embed" xlink:actuate="onLoad" draw:mime-type="image/png"/></draw:frame></text:span><text:span text:style-name="T40"><text:s/></text:span><text:span text:style-name="T41">Documentació adjunta digita</text:span><text:span text:style-name="T40">litzada.</text:span></text:p>
            </text:list-item>
            <text:list-item>
              <text:p text:style-name="P150"><text:span text:style-name="T40"><draw:frame draw:style-name="fr30" draw:name="Image59" text:anchor-type="as-char" svg:width="0.714cm" svg:height="0.37cm" draw:z-index="121"><draw:image xlink:href="Pictures/100000000000001B0000000E263D0FD229B62151.png" xlink:type="simple" xlink:show="embed" xlink:actuate="onLoad" draw:mime-type="image/png"/></draw:frame></text:span><text:span text:style-name="T40"><text:s/>Documentació adjunta digitalitzada i complementàriament en paper.</text:span></text:p>
            </text:list-item>
            <text:list-item>
              <text:p text:style-name="P150"><text:span text:style-name="T40"><draw:frame draw:style-name="fr30" draw:name="Image60" text:anchor-type="as-char" svg:width="0.344cm" svg:height="0.291cm" draw:z-index="64"><draw:image xlink:href="Pictures/100000000000000D0000000BE5EE5A40ED2E3019.png" xlink:type="simple" xlink:show="embed" xlink:actuate="onLoad" draw:mime-type="image/png"/></draw:frame></text:span><text:span text:style-name="T40"><text:s/>Documentació adjunta en suport PAPER (o altres suports)</text:span></text:p>
            </text:list-item>
          </text:list>
        </text:list-item>
      </text:list>
      <text:list xml:id="list125044026999697" text:continue-list="list1947137024" text:style-name="WWNum2">
        <text:list-item>
          <text:p text:style-name="P148"><text:span text:style-name="T5">Origen núm</text:span><text:span text:style-name="T3">:</text:span><text:span text:style-name="T1"> </text:span><text:span text:style-name="T38">Referència al número de registre original.</text:span></text:p>
        </text:list-item>
        <text:list-item>
          <text:p text:style-name="P151"><text:span text:style-name="T3">Remitent:</text:span><text:span text:style-name="T1"> Nom de l'usuari remitent de l'anotació de registre.</text:span></text:p>
        </text:list-item>
        <text:list-item>
          <text:p text:style-name="P152"><text:span text:style-name="T3">Data:</text:span><text:span text:style-name="T1"> Data de la recepció de l'anotació de registre per part de </text:span><text:span text:style-name="T11">DISTRIBUCIÓ</text:span><text:span text:style-name="T1">.</text:span></text:p>
        </text:list-item>
        <text:list-item>
          <text:p text:style-name="P152"><draw:frame draw:style-name="fr32" draw:name="Image16" text:anchor-type="paragraph" svg:x="13.496cm" svg:y="0.45cm" svg:width="0.635cm" svg:height="0.503cm" draw:z-index="47"><draw:image xlink:href="Pictures/100000000000001800000013112D2E45211BC912.png" xlink:type="simple" xlink:show="embed" xlink:actuate="onLoad" draw:mime-type="image/png"/></draw:frame><text:span text:style-name="T3">Estat:</text:span><text:span text:style-name="T1"> </text:span><text:span text:style-name="T85">Estat en què es troba l'anotació de registre. Segons l'estat pot estar pendent de processar o processada. En la columna hi ha un botó per obrir un llistat amb l'explicació dels diferents estats. </text:span></text:p>
        </text:list-item>
      </text:list>
      <text:p text:style-name="P34"/>
      <text:p text:style-name="P71"><draw:frame draw:style-name="fr16" draw:name="Image18" text:anchor-type="paragraph" svg:x="13.536cm" svg:y="0cm" svg:width="0.556cm" svg:height="0.476cm" draw:z-index="105"><draw:image xlink:href="Pictures/100000000000001500000012917B656F5E257C79.png" xlink:type="simple" xlink:show="embed" xlink:actuate="onLoad" draw:mime-type="image/png"/></draw:frame><draw:frame draw:style-name="fr10" draw:name="Frame11" text:anchor-type="char" svg:width="14.314cm" draw:z-index="98"><draw:text-box fo:min-height="14.949cm"><text:p text:style-name="fig."><draw:frame draw:style-name="fr14" draw:name="Image1" text:anchor-type="paragraph" svg:width="14.314cm" style:rel-width="100%" svg:height="14.949cm" style:rel-height="scale" draw:z-index="101"><draw:image xlink:href="Pictures/100000000000021D00000235165D365DEC2EE931.png" xlink:type="simple" xlink:show="embed" xlink:actuate="onLoad" draw:mime-type="image/png"/></draw:frame>fig. <text:sequence text:ref-name="reffig.6" text:name="fig." text:formula="ooow:fig.+1" style:num-format="1">7</text:sequence>: Llegenda amb els diferents estats en què es pot trobar una anotació de registre.</text:p></draw:text-box></draw:frame><text:soft-page-break/></text:p>
      <text:p text:style-name="P70">Si l'anotació ha estat enviada per email a algun destinatari llavors apareixerà la icona <text:s/>davant l'estat i si es posiciona el cursor a sobre es mostra la llista dels diferents enviamen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9" draw:name="Marc21" text:anchor-type="char" svg:width="11.271cm" draw:z-index="51"><draw:text-box fo:min-height="6.482cm"><text:p text:style-name="fig."><draw:frame draw:style-name="fr14" draw:name="Imatge15" text:anchor-type="paragraph" svg:width="11.271cm" style:rel-width="100%" svg:height="6.482cm" style:rel-height="scale" draw:z-index="52"><draw:image xlink:href="Pictures/10000001000001AA000000F5FFB2760FC63CE4D2.png" xlink:type="simple" xlink:show="embed" xlink:actuate="onLoad" draw:mime-type="image/png"/></draw:frame>fig. <text:sequence text:ref-name="reffig.7" text:name="fig." text:formula="ooow:fig.+1" style:num-format="1">8</text:sequence>: Exemple d'icona d'enviat per correu amb la informació dels enviaments i els destinataris.</text:p></draw:text-box></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9"/>
      <text:p text:style-name="P39"/>
      <text:p text:style-name="P39"/>
      <text:list xml:id="list125045378516262" text:continue-numbering="true" text:style-name="WWNum2">
        <text:list-item>
          <text:p text:style-name="P153"><text:span text:style-name="T9">Avisos</text:span><text:span text:style-name="T3">: </text:span><text:span text:style-name="T39">Columna amb una icona d'error si l'anotació de registre conté cap error. Si es posiciona el cursor sobre la icona d'error apareix el detall de l'error.</text:span></text:p>
          <text:p text:style-name="P172"><draw:frame draw:style-name="fr1" draw:name="Frame12" text:anchor-type="paragraph" svg:width="7.488cm" draw:z-index="110"><draw:text-box fo:min-height="3.466cm"><text:p text:style-name="fig."><text:span text:style-name="T112"><text:line-break/></text:span><draw:frame draw:style-name="fr27" draw:name="Imagen 146" text:anchor-type="as-char" svg:y="0cm" svg:width="8.149cm" style:rel-width="scale" svg:height="4.577cm" style:rel-height="scale" draw:z-index="122"><draw:image xlink:href="Pictures/1000000100000134000000AD26F03C7A04EA9B1D.png" xlink:type="simple" xlink:show="embed" xlink:actuate="onLoad" draw:mime-type="image/png"/><svg:desc>Interfaz de usuario gráfica, Aplicación, Tabla

Descripción generada automáticamente</svg:desc></draw:frame>fig. <text:sequence text:ref-name="reffig.8" text:name="fig." text:formula="ooow:fig.+1" style:num-format="1">9</text:sequence>: Exemple d'icona d'error a la columna Error.</text:p></draw:text-box></draw:frame></text:p>
        </text:list-item>
      </text:list>
      <text:p text:style-name="P72"/>
      <text:list xml:id="list125044024872798" text:continue-numbering="true" text:style-name="WWNum2">
        <text:list-item>
          <text:p text:style-name="P152"><text:span text:style-name="T3">Bústia:</text:span><text:span text:style-name="T1"> Bústia on s'ha distribuït l'anotació de registre. Es mostren els nivells de la jerarquia utilitzada per organitzar les bústies. </text:span></text:p>
        </text:list-item>
        <text:list-item>
          <text:p text:style-name="P152"><text:span text:style-name="T3">Comentaris: </text:span><text:span text:style-name="T1">Botó per a mostrar l'intercanvi de comentaris entre diferents usuaris.</text:span></text:p>
        </text:list-item>
        <text:list-item>
          <text:p text:style-name="P152"><text:span text:style-name="T3">Accions:</text:span><text:span text:style-name="T1"> Botó desplegable que mostra les diferents accions que es poden fer sobre una anotació de registre.</text:span></text:p>
        </text:list-item>
      </text:list>
      <text:p text:style-name="P32"/>
      <text:p text:style-name="P102"/>
      <text:p text:style-name="P101"><text:span text:style-name="Fuente_20_de_20_párrafo_20_predeter."><text:span text:style-name="T113"/></text:span></text:p>
      <text:p text:style-name="P101"><text:span text:style-name="Fuente_20_de_20_párrafo_20_predeter."><text:span text:style-name="T113">Just abans del llistat, a la part dreta, tenim un botó d’accions </text:span></text:span><text:span text:style-name="Fuente_20_de_20_párrafo_20_predeter."><text:span text:style-name="T113"><draw:frame draw:style-name="fr27" draw:name="Imagen 184" text:anchor-type="as-char" svg:y="-0.295cm" svg:width="1.931cm" style:rel-width="scale" svg:height="0.503cm" style:rel-height="scale" draw:z-index="123"><draw:image xlink:href="Pictures/10000001000000490000001389FB2EBB2CA75304.png" xlink:type="simple" xlink:show="embed" xlink:actuate="onLoad" draw:mime-type="image/png"/></draw:frame></text:span></text:span><text:span text:style-name="Fuente_20_de_20_párrafo_20_predeter."><text:span text:style-name="T113"><text:s/>que ens permet fer diferents accions en grup amb totes les bústies que tinguin el seu checkbox activat.</text:span></text:span></text:p>
      <text:p text:style-name="P90"/>
      <text:p text:style-name="P101"><text:soft-page-break/><text:span text:style-name="Fuente_20_de_20_párrafo_20_predeter."><text:span text:style-name="T113"><draw:frame draw:style-name="fr27" draw:name="Imagen 186" text:anchor-type="as-char" svg:y="0cm" svg:width="17cm" style:rel-width="scale" svg:height="3.815cm" style:rel-height="scale" draw:z-index="68"><draw:image xlink:href="Pictures/10000001000004FA0000011EBD91CE4F040C71C0.png" xlink:type="simple" xlink:show="embed" xlink:actuate="onLoad" draw:mime-type="image/png"/><svg:desc>Interfaz de usuario gráfica

Descripción generada automáticamente</svg:desc></draw:frame></text:span></text:span></text:p>
      <text:p text:style-name="P89">fig. <text:sequence text:ref-name="reffig.9" text:name="fig." text:formula="ooow:fig.+1" style:num-format="1">10</text:sequence><text:span text:style-name="T131">:</text:span><text:span text:style-name="T130"> </text:span>Detall de com es poden fer accions en grup. </text:p>
      <text:p text:style-name="P30"/>
      <text:h text:style-name="Heading_20_3" text:outline-level="3"><text:bookmark-start text:name="__RefHeading___Toc2745_1726870378"/>Filtre del llistat d'anotacions de registre<text:bookmark-end text:name="__RefHeading___Toc2745_1726870378"/></text:h>
      <text:p text:style-name="P100"><draw:frame draw:style-name="fr33" draw:name="Image61" text:anchor-type="paragraph" svg:width="17cm" svg:height="2.907cm" draw:z-index="113"><draw:image xlink:href="Pictures/100000000000072D0000012254DB33DE50F05D69.png" xlink:type="simple" xlink:show="embed" xlink:actuate="onLoad" draw:mime-type="image/png"/></draw:frame>fig. <text:sequence text:ref-name="reffig.10" text:name="fig." text:formula="ooow:fig.+1" style:num-format="1">11</text:sequence><text:span text:style-name="T131">:</text:span><text:span text:style-name="T130"> </text:span>Filtre pel llistat d'anotacions de registre.</text:p>
      <text:p text:style-name="P30"/>
      <text:p text:style-name="P30">Tal i com es mostra en la imatge, el llistat es podrà filtrar a partir dels següents camps:</text:p>
      <text:p text:style-name="P30"/>
      <text:list xml:id="list2737311075" text:style-name="WWNum3">
        <text:list-item>
          <text:p text:style-name="P181"><text:span text:style-name="T16">Número: </text:span><text:span text:style-name="T25">Text per filtrar pel número de l'anotació de registre.</text:span></text:p>
        </text:list-item>
        <text:list-item>
          <text:p text:style-name="P179"><text:span text:style-name="T65">T</text:span><text:span text:style-name="T66">ítol</text:span><text:span text:style-name="T22">: </text:span><text:span text:style-name="T27">Text per filtrar </text:span><text:span text:style-name="T70">p</text:span><text:span text:style-name="T71">er l'extracte de l'antoació de registre</text:span><text:span text:style-name="T27">.</text:span></text:p>
        </text:list-item>
        <text:list-item>
          <text:p text:style-name="P182"><text:span text:style-name="T12">Origen núm.:</text:span><text:span text:style-name="T25"> Text per filtrar per la referència al número de registre original. </text:span></text:p>
        </text:list-item>
        <text:list-item>
          <text:p text:style-name="P180"><text:span text:style-name="T16">Remitent:</text:span><text:span text:style-name="T12"> Text lliure per filtrar </text:span><text:span text:style-name="T48">les</text:span><text:span text:style-name="T12"> anotacions de registre pel nom d'un remitent concret.</text:span></text:p>
        </text:list-item>
        <text:list-item>
          <text:p text:style-name="P180"><text:span text:style-name="T60">Interessat: </text:span><text:span text:style-name="T51">Camp lliure per buscar per interessat de l'anotació de registre.</text:span></text:p>
        </text:list-item>
        <text:list-item>
          <text:p text:style-name="P180"><text:span text:style-name="T16">Data recep.</text:span><text:span text:style-name="T12"> </text:span><text:span text:style-name="T16">inicial</text:span><text:span text:style-name="T12">: Camp tipus data per mostrar </text:span><text:span text:style-name="T48">les</text:span><text:span text:style-name="T12"> anotacions de registre rebuts pel </text:span><text:span text:style-name="T14">DISTRIBUCIÓ</text:span><text:span text:style-name="T12"> a partir d'una data concreta.</text:span></text:p>
        </text:list-item>
        <text:list-item>
          <text:p text:style-name="P180"><text:span text:style-name="T21">Data recep.</text:span><text:span text:style-name="T27"> </text:span><text:span text:style-name="T21">final</text:span><text:span text:style-name="T27">: Camp tipus data per mostrar les anotacions de registre rebuts pe</text:span><text:span text:style-name="T28">r</text:span><text:span text:style-name="T27"> </text:span><text:span text:style-name="T28">DISTRIBUCIÓ</text:span><text:span text:style-name="T27"> fins a una data concreta.</text:span></text:p>
        </text:list-item>
        <text:list-item>
          <text:p text:style-name="P185"><text:span text:style-name="T16">Unitat Organitzativa: </text:span><text:span text:style-name="T25">Desplegable per filtrar les anotacions que estiguin en una bústia de la unitat organitzativa escollida.</text:span><text:span text:style-name="T32"> Si se selecciona una unitat organitzativa llavors només es poden escollir bústies en el desplegable de filtre de bústies que pertanyin a la unitat organitzativa escollida.</text:span></text:p>
        </text:list-item>
        <text:list-item>
          <text:p text:style-name="P180"><draw:frame draw:style-name="fr32" draw:name="Imagen6" text:anchor-type="paragraph" svg:x="4.441cm" svg:y="1.411cm" svg:width="0.826cm" svg:height="0.626cm" draw:z-index="112"><draw:image xlink:href="Pictures/100000000000003E0000002F51C8D6E1850498F5.png" xlink:type="simple" xlink:show="embed" xlink:actuate="onLoad" draw:mime-type="image/png"/></draw:frame><text:span text:style-name="T16">Bústia: </text:span><text:span text:style-name="T12">Desplegable que mostrarà la llista de bústies a les quals l'usuari distribuïdor té permisos. Filtrarà el contingut de la llista mostrant només </text:span><text:span text:style-name="T48">les</text:span><text:span text:style-name="T12"> anotacions de registre distribuïts en aquella bústia.</text:span><text:span text:style-name="T17"> </text:span><text:span text:style-name="T26">Si es prem el botó es mostraran les bústies inactives en la selecció de bústies i es mostrarà el contingut de les bústies inactives en el llistat.</text:span></text:p>
          <text:p text:style-name="P177"/>
        </text:list-item>
        <text:list-item>
          <text:p text:style-name="P180"><text:span text:style-name="T60">Enviament email</text:span><text:span text:style-name="T23">: </text:span><text:span text:style-name="T33">Camp desplegable que per mostrar les anotacions de registre que s'han enviat per email, les que no s'han enviat o totes. Una anotació s'envia per correu electrònic quan s'ha guardat al registre i l'usuari escull l'opció d'enviar-la per email.</text:span></text:p>
        </text:list-item>
        <text:list-item>
          <text:p text:style-name="P180"><text:span text:style-name="T63">Documentació</text:span><text:span text:style-name="T19">:</text:span><text:span text:style-name="T31"> Filtre per tipus de documentació.</text:span></text:p>
        </text:list-item>
      </text:list>
      <text:list xml:id="list1987765299" text:style-name="L2">
        <text:list-item>
          <text:list>
            <text:list-item text:start-value="1">
              <text:p text:style-name="P186"><draw:frame draw:style-name="fr31" draw:name="Image70" text:anchor-type="as-char" svg:y="-0.3cm" svg:width="0.318cm" svg:height="0.37cm" draw:z-index="125"><draw:image xlink:href="Pictures/100000000000000C0000000E4325FA7DF06B1AD3.png" xlink:type="simple" xlink:show="embed" xlink:actuate="onLoad" draw:mime-type="image/png"/></draw:frame><text:span text:style-name="T40"><text:s/></text:span><text:span text:style-name="T41">Documentació adjunta digita</text:span><text:span text:style-name="T40">litzada.</text:span></text:p>
            </text:list-item>
            <text:list-item>
              <text:p text:style-name="P186"><draw:frame draw:style-name="fr30" draw:name="Image71" text:anchor-type="as-char" svg:width="0.714cm" svg:height="0.37cm" draw:z-index="126"><draw:image xlink:href="Pictures/100000000000001B0000000E263D0FD229B62151.png" xlink:type="simple" xlink:show="embed" xlink:actuate="onLoad" draw:mime-type="image/png"/></draw:frame><text:span text:style-name="T40"><text:s/>Documentació adjunta digitalitzada i complementàriament en paper.</text:span></text:p>
            </text:list-item>
            <text:list-item>
              <text:p text:style-name="P186"><draw:frame draw:style-name="fr30" draw:name="Image72" text:anchor-type="as-char" svg:width="0.344cm" svg:height="0.291cm" draw:z-index="127"><draw:image xlink:href="Pictures/100000000000000D0000000BE5EE5A40ED2E3019.png" xlink:type="simple" xlink:show="embed" xlink:actuate="onLoad" draw:mime-type="image/png"/></draw:frame><text:span text:style-name="T30"><text:s/>Documentació adjunta en suport PAPER (o altres suports)</text:span></text:p>
            </text:list-item>
          </text:list>
        </text:list-item>
      </text:list>
      <text:list xml:id="list2335400115" text:style-name="L3">
        <text:list-item>
          <text:p text:style-name="P184"><text:span text:style-name="T57">Botó </text:span><text:span text:style-name="T57"><draw:frame draw:style-name="fr29" draw:name="Image74 Copia 1" text:anchor-type="as-char" svg:y="-0.612cm" svg:width="1.085cm" svg:height="0.9cm" draw:z-index="128"><draw:image xlink:href="Pictures/10000000000000290000002265803A4305FF2B9A.png" xlink:type="simple" xlink:show="embed" xlink:actuate="onLoad" draw:mime-type="image/png"/></draw:frame></text:span><text:span text:style-name="T57"><text:s/>N</text:span><text:span text:style-name="T46">omés amb annexos esborrany:</text:span><text:span text:style-name="T67"> </text:span><text:span text:style-name="T71">Botó per filtrar només les anotacions </text:span><text:span text:style-name="T67">amb annexos en estat esborrany.</text:span></text:p>
        </text:list-item>
        <text:list-item>
          <text:p text:style-name="P183"><text:span text:style-name="T57">Codi Backoffice: </text:span><text:span text:style-name="T71">Text per filtrar pel codi de backoffice al qual ha estat enviada l'anotació.</text:span></text:p>
        </text:list-item>
        <text:list-item>
          <text:p text:style-name="P183"><text:soft-page-break/><text:span text:style-name="T58">Penden</text:span><text:span text:style-name="T12">t: </text:span><text:span text:style-name="T25">Desplegable per seleccionar només les anotacions pendents, processades o totes. Els estats pendents de processar són:</text:span></text:p>
          <text:list>
            <text:list-item>
              <text:p text:style-name="P173">Pendent de guardar annexos</text:p>
            </text:list-item>
            <text:list-item>
              <text:p text:style-name="P173">Pendent de processar regla</text:p>
            </text:list-item>
            <text:list-item>
              <text:p text:style-name="P173">Pendent de l'usuari</text:p>
            </text:list-item>
          </text:list>
          <text:p text:style-name="P173">Els estats processats són:</text:p>
          <text:list text:continue-numbering="true">
            <text:list-item>
              <text:p text:style-name="P173">Processada a la bústia</text:p>
            </text:list-item>
            <text:list-item>
              <text:p text:style-name="P173">Pendent de comunicar backoffice</text:p>
            </text:list-item>
            <text:list-item>
              <text:p text:style-name="P173">Comunicada al backoffice</text:p>
            </text:list-item>
            <text:list-item>
              <text:p text:style-name="P173">Rebuda al backoffice</text:p>
            </text:list-item>
            <text:list-item>
              <text:p text:style-name="P173">Processada pel backoffice</text:p>
            </text:list-item>
            <text:list-item>
              <text:p text:style-name="P173">Rebutjada pel backoffice</text:p>
            </text:list-item>
            <text:list-item>
              <text:p text:style-name="P173">Processada al backoffice amb error</text:p>
            </text:list-item>
          </text:list>
          <text:p text:style-name="P174">Per defecte en el llistat es filtren les anotacions pendents de processar.</text:p>
        </text:list-item>
        <text:list-item>
          <text:p text:style-name="P175">Estat específic:<text:span text:style-name="T89"> Desplegable per seleccionar un dels estats específics en què es pot trobar l'anotació. És independent del desplegable d'estat simple anterior.</text:span></text:p>
        </text:list-item>
        <text:list-item>
          <text:p text:style-name="P187"><text:span text:style-name="T20">Botó </text:span><text:span text:style-name="T20"><draw:frame draw:style-name="fr29" draw:name="Image74" text:anchor-type="as-char" svg:y="-0.612cm" svg:width="1.085cm" svg:height="0.9cm" draw:z-index="129"><draw:image xlink:href="Pictures/10000000000000290000002265803A4305FF2B9A.png" xlink:type="simple" xlink:show="embed" xlink:actuate="onLoad" draw:mime-type="image/png"/></draw:frame></text:span><text:span text:style-name="T64"><text:s/>Només anotacions amb error: </text:span><text:span text:style-name="T71">Botó per filtrar només les anotacions marcades amb error.</text:span></text:p>
        </text:list-item>
        <text:list-item>
          <text:p text:style-name="P188"><text:span text:style-name="T64">N</text:span><text:span text:style-name="T62">ombre d’annexos:</text:span><text:span text:style-name="T67"> </text:span><text:span text:style-name="T71">Desplegable per seleccionar </text:span><text:span text:style-name="T67">el numero d’annexos de l’anotació</text:span></text:p>
        </text:list-item>
        <text:list-item>
          <text:p text:style-name="P188"><text:span text:style-name="T62">Codi SIA procediment/servei:</text:span><text:span text:style-name="T67"> </text:span><text:span text:style-name="T71">Text per filtrar pel codi </text:span><text:span text:style-name="T67">SIA </text:span><text:span text:style-name="T71">de </text:span><text:span text:style-name="T67">procediment o servei el qual empra</text:span><text:span text:style-name="T71"> l'anotació.</text:span></text:p>
        </text:list-item>
        <text:list-item>
          <text:p text:style-name="P188"><text:span text:style-name="T62">Reintents:</text:span><text:span text:style-name="T67"> </text:span><text:span text:style-name="T71">Desplegable per seleccionar </text:span><text:span text:style-name="T67">si l’anotació te, o no, reintents pendents</text:span><text:span text:style-name="T71">.</text:span></text:p>
        </text:list-item>
      </text:list>
      <text:p text:style-name="P30"/>
      <text:p text:style-name="P30">Un cop seleccionats els filtres desitjats es podrà fer clic sobre el botó “Filtrar” per obtenir el llistat filtrat. El botó “Netejar” reinicia els filtres.</text:p>
      <text:p text:style-name="P30"/>
      <text:h text:style-name="Heading_20_3" text:outline-level="3"><text:bookmark-start text:name="__RefHeading___Toc2747_1726870378"/>Accions sobre les anotacions de registre<text:bookmark-end text:name="__RefHeading___Toc2747_1726870378"/></text:h>
      <text:p text:style-name="P30">Amb el botó d'accions de les anotacions de registre es desplega un menú d'accions disponibles sobre aquests. A continuació s'expliquen les diferents accions.<text:span text:style-name="T124"> Segons l'estat de les anotacions de registre estaran habilitades unes o altres opcions.</text:span></text:p>
      <text:p text:style-name="P30"/>
      <text:p text:style-name="P11"><draw:frame draw:style-name="fr1" draw:name="Frame13" text:anchor-type="paragraph" svg:width="5.662cm" draw:z-index="38"><draw:text-box fo:min-height="5.927cm"><text:p text:style-name="P125"><text:line-break/></text:p><text:p text:style-name="P125"><draw:frame draw:style-name="fr28" draw:name="Imatge16" text:anchor-type="char" svg:width="5.08cm" svg:height="5.186cm" draw:z-index="40"><draw:image xlink:href="Pictures/10000001000000C0000000C46CEFA0792B306109.png" xlink:type="simple" xlink:show="embed" xlink:actuate="onLoad" draw:mime-type="image/png"/></draw:frame></text:p><text:p text:style-name="P124"><draw:frame draw:style-name="fr20" draw:name="Image11" text:anchor-type="paragraph" svg:width="5.662cm" style:rel-width="100%" svg:height="5.417cm" style:rel-height="scale" draw:z-index="116"><draw:image xlink:href="Pictures/100000010000014400000136DAD0375CA454647B.png" xlink:type="simple" xlink:show="embed" xlink:actuate="onLoad" draw:mime-type="image/png"/><svg:desc>Interfaz de usuario gráfica, Texto, Aplicación, Chat o mensaje de texto

Descripción generada automáticamente</svg:desc></draw:frame>fig. <text:sequence text:ref-name="reffig.11" text:name="fig." text:formula="ooow:fig.+1" style:num-format="1">12</text:sequence><text:s/>Accions en el llistat d'anotacions de registre.</text:p></draw:text-box></draw:frame></text:p>
      <text:p text:style-name="P30"/>
      <text:p text:style-name="P194">A continuació es detallen les diferents accions.</text:p>
      <text:h text:style-name="Heading_20_4" text:outline-level="4"><text:bookmark-start text:name="__RefHeading___Toc9611_678410495"/><text:soft-page-break/>Detalls<text:bookmark-end text:name="__RefHeading___Toc9611_678410495"/></text:h>
      <text:p text:style-name="P92"><text:span text:style-name="T12">Amb aquesta opció es mostra el detall de l</text:span><text:span text:style-name="T48">'</text:span><text:span text:style-name="T12">anotació de registre, amb una finestra modal amb diferents apartats organitzats per pipelles</text:span><text:span text:style-name="T36">, un botó amb les accions més usuals</text:span><text:span text:style-name="T37"> o la descàrrega del justificant i dels annexos</text:span><text:span text:style-name="T36"> i botons de navegació segons l'ordenació del llistat</text:span><text:span text:style-name="T37"> al peu de la modal</text:span><text:span text:style-name="T36">.</text:span></text:p>
      <text:p text:style-name="P62"/>
      <text:p text:style-name="P62"><draw:frame draw:style-name="fr27" draw:name="Imagen 157" text:anchor-type="as-char" svg:y="0cm" svg:width="17cm" style:rel-width="scale" svg:height="7.396cm" style:rel-height="scale" draw:z-index="48"><draw:image xlink:href="Pictures/100000010000053A0000024DAC23E1171FEAA692.png" xlink:type="simple" xlink:show="embed" xlink:actuate="onLoad" draw:mime-type="image/png"/><svg:desc>Interfaz de usuario gráfica, Texto, Aplicación, Correo electrónico

Descripción generada automáticamente</svg:desc></draw:frame></text:p>
      <text:p text:style-name="P122"><text:span text:style-name="T12">fig. </text:span><text:span text:style-name="T12"><text:sequence text:ref-name="reffig.12" text:name="fig." text:formula="ooow:fig.+1" style:num-format="1">13</text:sequence></text:span><text:span text:style-name="T12">: Modal amb el detall de l'anotació de registre.</text:span></text:p>
      <text:p text:style-name="P63"/>
      <text:p text:style-name="P73">A continuació es descriu el contingut de les diferents pipelles.</text:p>
      <text:h text:style-name="Heading_20_5" text:outline-level="5"><text:bookmark-start text:name="__RefHeading___Toc9613_678410495"/>Resum<text:bookmark-end text:name="__RefHeading___Toc9613_678410495"/></text:h>
      <text:p text:style-name="P196">En aquesta primera pipella es mostra la informació sintetitzada en forma de taula de l'anotació, els interessats i annexos. La mateixa informació s'amplia per separat en les pipelles següents.</text:p>
      <text:h text:style-name="Heading_20_5" text:outline-level="5"><text:bookmark-start text:name="__RefHeading___Toc9615_678410495"/>Informació de registre<text:bookmark-end text:name="__RefHeading___Toc9615_678410495"/></text:h>
      <text:p text:style-name="P30">Aquesta pipella mostra la informació general de l'anotació de registre, les dades de seguiment i el justificant de registre.</text:p>
      <text:list xml:id="list3818778671" text:style-name="WWNum4">
        <text:list-item>
          <text:p text:style-name="P154"><text:span text:style-name="T3">Tipus: </text:span><text:span text:style-name="T1">Tipus d'anotació de registre (entrada o sortida)</text:span></text:p>
        </text:list-item>
        <text:list-item>
          <text:p text:style-name="P154"><text:span text:style-name="T3">Número: </text:span><text:span text:style-name="T1">Número de l'anotació de registre.</text:span></text:p>
        </text:list-item>
        <text:list-item>
          <text:p text:style-name="P155"><text:span text:style-name="T3">Data: </text:span><text:span text:style-name="T1">Data de recepció de l'anotació de registre per part de </text:span><text:span text:style-name="T11">DISTRIBUCIÓ</text:span><text:span text:style-name="T1">.</text:span></text:p>
        </text:list-item>
        <text:list-item>
          <text:p text:style-name="P156"><text:span text:style-name="T1">Estat:</text:span><text:span text:style-name="T39"> Estat en què es troba a DISTRIBUCIO. Es correspon amb l'estat del llistat d'anotacions de registre.</text:span></text:p>
        </text:list-item>
        <text:list-item>
          <text:p text:style-name="P189"><text:span text:style-name="T61">Presencial</text:span><text:span text:style-name="T16">: </text:span><text:span text:style-name="T52">Valor de si l'anotació és presencial o no</text:span><text:span text:style-name="T12">.</text:span></text:p>
        </text:list-item>
      </text:list>
      <text:p text:style-name="P30"/>
      <text:p text:style-name="P30"/>
      <text:p text:style-name="P11"><text:span text:style-name="T1">Les </text:span><text:span text:style-name="T3">dades obligatòries</text:span><text:span text:style-name="T1"> que es mostren són:</text:span></text:p>
      <text:list xml:id="list871255502" text:style-name="WWNum5">
        <text:list-item>
          <text:p text:style-name="P162"><text:span text:style-name="T3">Oficina:</text:span><text:span text:style-name="T39"> </text:span><text:span text:style-name="T44">Text per indicar l’</text:span><text:span text:style-name="T45">oficina</text:span><text:span text:style-name="T44"> de l’anotació</text:span><text:span text:style-name="T43">.</text:span></text:p>
        </text:list-item>
        <text:list-item>
          <text:p text:style-name="P163"><text:span text:style-name="T3">Llibre: </text:span><text:span text:style-name="T1">Llibre de les entrades de registre de l'organisme.</text:span></text:p>
        </text:list-item>
        <text:list-item>
          <text:p text:style-name="P163"><text:span text:style-name="T3">Extracte:</text:span><text:span text:style-name="T1"> Text descriptiu de l'extracte de l'anotació de registre.</text:span></text:p>
        </text:list-item>
        <text:list-item>
          <text:p text:style-name="P163"><text:span text:style-name="T3">Documentació física:</text:span><text:span text:style-name="T1"> Un codi de documentació física (a escollir entre tres valors a l'hora de crear l'anotació de registre).</text:span></text:p>
        </text:list-item>
        <text:list-item>
          <text:p text:style-name="P163"><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163"><text:span text:style-name="T3">Tipus d'assumpte:</text:span><text:span text:style-name="T1"> Codi del tipus d'assumpte amb que s'ha basat la distribució d'aquest</text:span><text:span text:style-name="T84">a</text:span><text:span text:style-name="T1"> anotació de registre.</text:span></text:p>
        </text:list-item>
        <text:list-item>
          <text:p text:style-name="P163"><text:span text:style-name="T3">Idioma:</text:span><text:span text:style-name="T1"> Nom i codi de l'idioma utilitzat.</text:span></text:p>
        </text:list-item>
      </text:list>
      <text:p text:style-name="P30"/>
      <text:p text:style-name="P11"><text:soft-page-break/><text:span text:style-name="T1">Les </text:span><text:span text:style-name="T3">dades opcionals </text:span><text:span text:style-name="T1">que es mostren són:</text:span></text:p>
      <text:list xml:id="list1258045338" text:style-name="WWNum6">
        <text:list-item>
          <text:p text:style-name="P164"><text:span text:style-name="T3">Procediment/Servei:</text:span><text:span text:style-name="T39"> Codi i nom del procediment o servei classificat de l’anotació.</text:span></text:p>
        </text:list-item>
        <text:list-item>
          <text:p text:style-name="P165"><text:span text:style-name="T7">Tramit:</text:span><text:span text:style-name="T39"> </text:span><text:span text:style-name="T44">Text per indicar el tramit de l’anotació</text:span><text:span text:style-name="T39">.</text:span></text:p>
        </text:list-item>
        <text:list-item>
          <text:p text:style-name="P166"><text:span text:style-name="T3">Ref.</text:span><text:span text:style-name="T1"> </text:span><text:span text:style-name="T3">externa: </text:span><text:span text:style-name="T1">Text per indicar referències externes que el destinatari pugui conèixer.</text:span></text:p>
        </text:list-item>
        <text:list-item>
          <text:p text:style-name="P166"><text:span text:style-name="T6">Núm. e</text:span><text:span text:style-name="T3">xpedient:</text:span><text:span text:style-name="T1"> Número d'expedient de la tramitació administrativa.</text:span></text:p>
        </text:list-item>
        <text:list-item>
          <text:p text:style-name="P166"><text:span text:style-name="T3">Transport:</text:span><text:span text:style-name="T1"> Mitjà de transport amb el que s'ha rebut el registre si aquest prové d'una altre administració.</text:span></text:p>
        </text:list-item>
        <text:list-item>
          <text:p text:style-name="P166"><text:span text:style-name="T3">Transp.</text:span><text:span text:style-name="T1"> </text:span><text:span text:style-name="T3">num: </text:span><text:span text:style-name="T1">Número associat al transport.</text:span></text:p>
        </text:list-item>
        <text:list-item>
          <text:p text:style-name="P167"><text:span text:style-name="T3">Origen oficina: </text:span><text:span text:style-name="T1">Oficina d'origen d'on prové l'anotació de registre si aquest ve d'un altre organisme.</text:span></text:p>
        </text:list-item>
        <text:list-item>
          <text:p text:style-name="P167"><text:span text:style-name="T3">Codi assumpte: </text:span><text:span text:style-name="T1">Codi d'assumpte utilitzat per la regla de distribució que s'ha executat en la recepció d'aquest</text:span><text:span text:style-name="T84">a</text:span><text:span text:style-name="T1"> anotació de registre.</text:span></text:p>
        </text:list-item>
        <text:list-item>
          <text:p text:style-name="P166"><text:span text:style-name="T3">Origen núm: </text:span><text:span text:style-name="T1">Número d'origen de l'anotació de registre.</text:span><text:span text:style-name="T3"> </text:span></text:p>
        </text:list-item>
        <text:list-item>
          <text:p text:style-name="P166"><text:span text:style-name="T3">Origen data: </text:span><text:span text:style-name="T1">Data i hora del registre d'entrada en l'origen. </text:span></text:p>
        </text:list-item>
        <text:list-item>
          <text:p text:style-name="P176">Observacions.</text:p>
        </text:list-item>
      </text:list>
      <text:p text:style-name="P30"/>
      <text:p text:style-name="P30"/>
      <text:p text:style-name="P11"><text:span text:style-name="T1">Les </text:span><text:span text:style-name="T3">Dades de seguiment </text:span><text:span text:style-name="T1">són les següents, i donen informació sobre:</text:span></text:p>
      <text:p text:style-name="P33"/>
      <text:p text:style-name="P11"><draw:frame draw:style-name="fr5" draw:name="Frame10" text:anchor-type="as-char" svg:width="16.986cm" draw:z-index="49"><draw:text-box fo:min-height="3.757cm"><text:p text:style-name="fig."><draw:frame draw:style-name="fr20" draw:name="Imagen 4" text:anchor-type="paragraph" svg:width="16.986cm" style:rel-width="100%" svg:height="3.757cm" style:rel-height="scale" draw:z-index="50"><draw:image xlink:href="Pictures/1000000000000352000000BCF768B22FA3723A20.png" xlink:type="simple" xlink:show="embed" xlink:actuate="onLoad" draw:mime-type="image/png"/></draw:frame>fig. <text:sequence text:ref-name="reffig.13" text:name="fig." text:formula="ooow:fig.+1" style:num-format="1">14</text:sequence>: Detall de la visualització de les dades de seguiment. </text:p></draw:text-box></draw:frame></text:p>
      <text:p text:style-name="P33"/>
      <text:list xml:id="list3906726079" text:style-name="WWNum7">
        <text:list-item>
          <text:p text:style-name="P168"><text:span text:style-name="T3">Entitat: </text:span><text:span text:style-name="T1">Nom i codi de l'entitat per a la que es fa l'anotació de registre.</text:span></text:p>
        </text:list-item>
        <text:list-item>
          <text:p text:style-name="P168"><text:span text:style-name="T3">Aplicació:</text:span><text:span text:style-name="T1"> Aplicació i versió de l'aplicació que envia l'anotació de registre.</text:span></text:p>
        </text:list-item>
        <text:list-item>
          <text:p text:style-name="P168"><text:span text:style-name="T3">Usuari:</text:span><text:span text:style-name="T1"> Nom i codi de l'usuari que realitza l'enviament de l'anotació de registre des de l'aplicació origen.</text:span></text:p>
        </text:list-item>
        <text:list-item>
          <text:p text:style-name="P169"><text:span text:style-name="T3">Data d'alta a </text:span><text:span text:style-name="T4">DISTRIBUCIÓ</text:span><text:span text:style-name="T3">:</text:span><text:span text:style-name="T1"> Data de creació de l'anotació de registre dins </text:span><text:span text:style-name="T11">DISTRIBUCIÓ</text:span><text:span text:style-name="T1">.</text:span></text:p>
        </text:list-item>
      </text:list>
      <text:p text:style-name="P30"/>
      <text:p text:style-name="P30"/>
      <text:p text:style-name="P7"><text:span text:style-name="T1">Les dades del </text:span><text:span text:style-name="T3">Justificant </text:span><text:span text:style-name="T1">són les següents:</text:span></text:p>
      <text:p text:style-name="P40"/>
      <text:p text:style-name="P40"/>
      <text:p text:style-name="P7"><draw:frame draw:style-name="fr5" draw:name="Frame14" text:anchor-type="as-char" svg:width="16.986cm" draw:z-index="59"><draw:text-box fo:min-height="5.521cm"><text:p text:style-name="fig."><draw:frame draw:style-name="fr20" draw:name="Imagen2" text:anchor-type="paragraph" svg:width="16.986cm" style:rel-width="100%" svg:height="5.521cm" style:rel-height="scale" draw:z-index="70"><draw:image xlink:href="Pictures/100000000000035A00000117AAC943D15907C025.png" xlink:type="simple" xlink:show="embed" xlink:actuate="onLoad" draw:mime-type="image/png"/></draw:frame>fig. <text:sequence text:ref-name="reffig.14" text:name="fig." text:formula="ooow:fig.+1" style:num-format="1">15</text:sequence>: Detall de la visualització de les dades de justificant.</text:p></draw:text-box></draw:frame></text:p>
      <text:p text:style-name="P40"/>
      <text:p text:style-name="P31"><text:soft-page-break/></text:p>
      <text:p text:style-name="P31"><text:span text:style-name="T109">L</text:span>'anotació de registre pot venir lliga<text:span text:style-name="T132">da</text:span>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text:bookmark-start text:name="__RefHeading___Toc9617_678410495"/>Interessats<text:bookmark-end text:name="__RefHeading___Toc9617_678410495"/></text:h>
      <text:p text:style-name="P41">En aquest apartat es mostra una taula amb les diferents persones (físiques o jurídiques) que figuren com a interessades en l'anotació de registre.</text:p>
      <text:p text:style-name="P41"><draw:frame draw:style-name="fr26" draw:name="Image23" text:anchor-type="paragraph" svg:width="17cm" svg:height="6.922cm" draw:z-index="102"><draw:image xlink:href="Pictures/10000000000002ED00000131149A76C8F58A3EFA.png" xlink:type="simple" xlink:show="embed" xlink:actuate="onLoad" draw:mime-type="image/png"/></draw:frame></text:p>
      <text:p text:style-name="P41"/>
      <text:p text:style-name="P41">Aquestes files de la taula són desplegables i mostren la informació de l'interessat:</text:p>
      <text:p text:style-name="P41"/>
      <text:p text:style-name="P12"><draw:frame draw:style-name="fr25" draw:name="Image24" text:anchor-type="paragraph" svg:width="17cm" svg:height="7.618cm" draw:z-index="103"><draw:image xlink:href="Pictures/10000000000002D300000144B3C78F370F17838B.png" xlink:type="simple" xlink:show="embed" xlink:actuate="onLoad" draw:mime-type="image/png"/></draw:frame></text:p>
      <text:p text:style-name="P41">Com es pot veure, es mostren dades bàsiques de l'interessat, i s'ha de tenir en compte que aquests valors poden ser de diferent naturalesa depenent de si l'interessat és una persona física o una persona jurídica.</text:p>
      <text:p text:style-name="P41"/>
      <text:p text:style-name="P41"><text:soft-page-break/>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text:bookmark-start text:name="__RefHeading___Toc9619_678410495"/>Annexos<text:bookmark-end text:name="__RefHeading___Toc9619_678410495"/></text:h>
      <text:p text:style-name="P41">En aquesta pipella es mostren diferents elements desplegables, un per cada document annexat a l'anotació de registre<text:span text:style-name="T127">.</text:span></text:p>
      <text:p text:style-name="P41"/>
      <text:p text:style-name="P41"/>
      <text:p text:style-name="P41"><draw:frame draw:style-name="fr24" draw:name="Imatge18" text:anchor-type="char" svg:width="17cm" svg:height="2.217cm" draw:z-index="104"><draw:image xlink:href="Pictures/100000010000052E000000ADEA024AFC4294646B.png" xlink:type="simple" xlink:show="embed" xlink:actuate="onLoad" draw:mime-type="image/png"/></draw:frame>Si despleguem un element podem veure tota la informació del document de l'arxiu i de les seves firmes si n'hi ha.</text:p>
      <text:p text:style-name="P41"><draw:frame draw:style-name="fr11" draw:name="Imatge19" text:anchor-type="char" svg:width="17cm" svg:height="6.768cm" draw:z-index="35"><draw:image xlink:href="Pictures/100000000000063B000002DE95C8BEBC011C323F.png" xlink:type="simple" xlink:show="embed" xlink:actuate="onLoad" draw:mime-type="image/png"/></draw:frame></text:p>
      <text:p text:style-name="P12"/>
      <text:p text:style-name="P41"/>
      <text:p text:style-name="P41">Les dades mostrades de l'annex són les següents:</text:p>
      <text:p text:style-name="P41"/>
      <text:list xml:id="list3494105566" text:style-name="WWNum8">
        <text:list-item>
          <text:p text:style-name="P170"><text:span text:style-name="T3">Data de captura (ENI): </text:span><text:span text:style-name="T1">Data en la que el fitxer de l'annex es rebut per l'arxiu digital.</text:span></text:p>
        </text:list-item>
        <text:list-item>
          <text:p text:style-name="P170"><text:span text:style-name="T3">Origen (ENI): </text:span><text:span text:style-name="T1">Valor que mostra si el document fou creat per un ciutadà o per una administració.</text:span></text:p>
        </text:list-item>
        <text:list-item>
          <text:p text:style-name="P170"><text:span text:style-name="T3">Estat d'elaboració (ENI): </text:span><text:span text:style-name="T1">Es refereix a la categoria d'autenticitat del document.</text:span></text:p>
        </text:list-item>
        <text:list-item>
          <text:p text:style-name="P170"><text:span text:style-name="T3">Tipus documental (ENI): </text:span><text:span text:style-name="T1">Nom del tipus documental del document.</text:span></text:p>
        </text:list-item>
        <text:list-item>
          <text:p text:style-name="P170"><text:span text:style-name="T3">Tipus de document annexat: </text:span><text:span text:style-name="T1">Tipus del document annexat (Formulari, Document adjunt, etc...).</text:span></text:p>
        </text:list-item>
        <text:list-item>
          <text:p text:style-name="P157"><text:span text:style-name="T1">Observacions: </text:span><text:span text:style-name="T39">Mostra les observacions que pot tenir l’annexe. </text:span></text:p>
        </text:list-item>
        <text:list-item>
          <text:p text:style-name="P158"><text:span text:style-name="T1">Identificador dins l'Arxiu:</text:span><text:span text:style-name="T39"> Identificador UUID assignat per l'Arxiu a l'hora de guardar l'annex.</text:span></text:p>
        </text:list-item>
        <text:list-item>
          <text:p text:style-name="P157"><text:span text:style-name="T1">Firma CSV: </text:span><text:span text:style-name="T39">Ens dóna un enllaç on es pot descarregar l’annexe amb un segell de temps.</text:span></text:p>
        </text:list-item>
        <text:list-item>
          <text:p text:style-name="P159"><text:span text:style-name="T1">Resolució:</text:span><text:span text:style-name="T39"> Informació de la resolució amb xifra numèrica. </text:span></text:p>
        </text:list-item>
        <text:list-item>
          <text:p text:style-name="P157"><text:span text:style-name="T1">Idioma:</text:span><text:span text:style-name="T39"> </text:span><text:span text:style-name="T42">Es fa referència a l’idioma empleat a l’annexe. </text:span></text:p>
        </text:list-item>
        <text:list-item>
          <text:p text:style-name="P157"><text:span text:style-name="T1">Descripció: </text:span><text:span text:style-name="T39">Es mostra la descripció de l’annexe. </text:span></text:p>
        </text:list-item>
        <text:list-item>
          <text:p text:style-name="P160"><text:span text:style-name="T1">Profunditat color: </text:span><text:span text:style-name="T39">Informació del color amb xifra numèrica.</text:span></text:p>
        </text:list-item>
        <text:list-item>
          <text:p text:style-name="P160"><text:span text:style-name="T1">Tipus MIME: </text:span><text:span text:style-name="T39">Ens dóna la informació de la extensió que té l’annexe.</text:span></text:p>
        </text:list-item>
        <text:list-item>
          <text:p text:style-name="P161"><text:span text:style-name="T1">Validació de firma:</text:span><text:span text:style-name="T39"> estat de la validació de firma.</text:span></text:p>
        </text:list-item>
        <text:list-item>
          <text:p text:style-name="P161"><text:span text:style-name="T1">Estat a l’Arxiu:</text:span><text:span text:style-name="T39"> estat del document a l’arxiu.</text:span></text:p>
        </text:list-item>
        <text:list-item>
          <text:p text:style-name="P170"><text:span text:style-name="T3">Fitxer: </text:span><text:span text:style-name="T1">Nom del fitxer de l'annex (a la dreta apareix el botó per descarregar-lo des de l'arxiu digital).</text:span></text:p>
        </text:list-item>
      </text:list>
      <text:p text:style-name="P42"/>
      <text:p text:style-name="P43"/>
      <text:p text:style-name="P24"><text:soft-page-break/><text:span text:style-name="T1">Hi ha dos </text:span><text:span text:style-name="T76">botons</text:span><text:span text:style-name="T1"> que ens permeten descarregar l’annexe de forma individual:</text:span></text:p>
      <text:list xml:id="list3119398013" text:style-name="L4">
        <text:list-item>
          <text:p text:style-name="P178">Descàrrega de la versió original. </text:p>
        </text:list-item>
        <text:list-item>
          <text:p text:style-name="P190"><text:span text:style-name="T7">Descàrrega de la versió imprimible.</text:span><text:span text:style-name="T1"> </text:span></text:p>
        </text:list-item>
      </text:list>
      <text:p text:style-name="P41"/>
      <text:p text:style-name="P12"><text:span text:style-name="T1">Si el document està firmat d'alguna manera, quan es desplegui la informació de l'annex es visualitzarà un bloc de </text:span><text:span text:style-name="T3">Firma.</text:span></text:p>
      <text:p text:style-name="P36"/>
      <text:p text:style-name="P12"/>
      <text:p text:style-name="P36"/>
      <text:list xml:id="list3656826137" text:style-name="WWNum9">
        <text:list-item>
          <text:p text:style-name="P171"><text:span text:style-name="T3">Tipus de firma: </text:span><text:span text:style-name="T1">Mostra el codi del tipus de firma.</text:span></text:p>
        </text:list-item>
        <text:list-item>
          <text:p text:style-name="P171"><text:span text:style-name="T3">Perfil firma:</text:span><text:span text:style-name="T1"> Mostra el perfil de firma que s'ha escollit pel document d'aquest annex.</text:span></text:p>
        </text:list-item>
        <text:list-item>
          <text:p text:style-name="P171"><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191"><text:span text:style-name="T18">Detall dels firmants:</text:span><text:span text:style-name="T29"> </text:span><text:span text:style-name="T68">T</text:span><text:span text:style-name="T69">aula amb la llista</text:span><text:span text:style-name="T29"> dels firmants amb la data, NIF, Nom i l'emissor del certificat.</text:span></text:p>
        </text:list-item>
      </text:list>
      <text:p text:style-name="P35"/>
      <text:p text:style-name="P44"><draw:frame draw:style-name="fr24" draw:name="Imatge20" text:anchor-type="char" svg:width="17cm" svg:height="1.538cm" draw:z-index="56"><draw:image xlink:href="Pictures/100000010000050100000074B286387CE6A88934.png" xlink:type="simple" xlink:show="embed" xlink:actuate="onLoad" draw:mime-type="image/png"/></draw:frame>En alguns casos, la pròpia aplicació <text:span text:style-name="T91">DISTRIBUCIÓ</text:span> firmarà els documents que venguin sense firmar amb l'anotació de registre rebut. L'usuari podrà identificar de quins casos es tracta, ja que la capçalera del bloc de firma ho indicarà:</text:p>
      <text:p text:style-name="P41"/>
      <text:p text:style-name="P12"><draw:frame draw:style-name="fr23" draw:name="Imagen 21" text:anchor-type="as-char" svg:width="10.973cm" svg:height="2.297cm" draw:z-index="75"><draw:image xlink:href="Pictures/100000000000019F00000057D5141077DAA40E48.png" xlink:type="simple" xlink:show="embed" xlink:actuate="onLoad" draw:mime-type="image/png"/></draw:frame></text:p>
      <text:h text:style-name="Heading_20_5" text:outline-level="5"><text:bookmark-start text:name="__RefHeading___Toc9621_678410495"/>Arxiu Info<text:bookmark-end text:name="__RefHeading___Toc9621_678410495"/></text:h>
      <text:p text:style-name="P57">Pels usuaris administradors es mostrarà la pipella d' Arxiu Info. amb la informació referent a les dades de l'Arxiu per l'expedient de l'anotació de registre actual.</text:p>
      <text:p text:style-name="P57"/>
      <text:p text:style-name="P57">Aquesta informació és molt específica de la forma com s'ha guardat l'anotació a l'Arxiu per poder-la localitzar i solucionar possibles problemes. </text:p>
      <text:p text:style-name="P57"/>
      <text:p text:style-name="P57">Quan una anotació arriba i està pendent de guardar a l'Arxiu apareixeran missatges d'advertència conforme l'annex o l'anotació encara no s'ha guardat a l'Arxiu.</text:p>
      <text:p text:style-name="P56"><draw:frame draw:style-name="fr4" draw:name="Frame25" text:anchor-type="paragraph" svg:width="17cm" draw:z-index="85"><draw:text-box fo:min-height="7.648cm"><text:p text:style-name="fig."><draw:frame draw:style-name="fr14" draw:name="Image28" text:anchor-type="paragraph" svg:width="16.898cm" style:rel-width="100%" svg:height="7.601cm" style:rel-height="scale" draw:z-index="91"><draw:image xlink:href="Pictures/10000000000002ED0000015190BBCD9F6E89D442.png" xlink:type="simple" xlink:show="embed" xlink:actuate="onLoad" draw:mime-type="image/png"/></draw:frame>fig. <text:sequence text:ref-name="reffig.15" text:name="fig." text:formula="ooow:fig.+1" style:num-format="1">16</text:sequence>: Detall pipella Arxiu Info.</text:p></draw:text-box></draw:frame><text:soft-page-break/></text:p>
      <text:h text:style-name="Heading_20_5" text:outline-level="5"><text:bookmark-start text:name="__RefHeading___Toc9623_678410495"/>Processament automàtic<text:bookmark-end text:name="__RefHeading___Toc9623_678410495"/></text:h>
      <text:p text:style-name="P58">En aquesta pipella es mostra la informació del procés automàtic de distribució que l’aplicació <text:span text:style-name="T91">DISTRIBUCIÓ</text:span> du a terme per a assignar els assentaments registrals que li arriben a les diferents bústies. També mostra si hi ha hagut cap problema amb la distribució i l’error generat:</text:p>
      <text:p text:style-name="P58"/>
      <text:p text:style-name="P58"><draw:frame draw:style-name="fr7" draw:name="Frame26" text:anchor-type="as-char" svg:y="0cm" svg:width="16.967cm" style:rel-width="scale" svg:height="9.835cm" style:rel-height="scale-min" draw:z-index="114"><draw:text-box><text:p text:style-name="fig."><draw:frame draw:style-name="fr20" draw:name="Image65" text:anchor-type="paragraph" svg:width="16.967cm" style:rel-width="100%" svg:height="9.835cm" style:rel-height="scale" draw:z-index="115"><draw:image xlink:href="Pictures/1000000000000371000001FFEBC722AC482328C4.png" xlink:type="simple" xlink:show="embed" xlink:actuate="onLoad" draw:mime-type="image/png"/></draw:frame>fig. <text:sequence text:ref-name="reffig.16" text:name="fig." text:formula="ooow:fig.+1" style:num-format="1">17</text:sequence>: Pipella on es mostra el detall d’un avís. </text:p></draw:text-box></draw:frame></text:p>
      <text:p text:style-name="P16"/>
      <text:p text:style-name="P58"/>
      <text:p text:style-name="P58"><text:soft-page-break/>Quan hi ha hagut un error, aquest es mostra en vermell a la part superior d’aquest apartat, i es dona la possibilitat de tornar a executar la regla de distribució amb el botó “reintentar processament”.</text:p>
      <text:p text:style-name="P58"/>
      <text:h text:style-name="Heading_20_5" text:outline-level="5"><text:bookmark-start text:name="__RefHeading___Toc9625_678410495"/>Processament backoffice<text:bookmark-end text:name="__RefHeading___Toc9625_678410495"/></text:h>
      <text:p text:style-name="P75">Si l'anotació de registre s'ha reenviat a un backoffice de DISTRIBUCIO mitjançant regles apareixerà aquesta pipella amb la informació de l'estat de l'enviament i amb l'error en el cas qui hi hagi error.</text:p>
      <text:p text:style-name="P75"/>
      <text:p text:style-name="P58"><draw:frame draw:style-name="fr4" draw:name="Frame27" text:anchor-type="paragraph" svg:width="17cm" draw:z-index="58"><draw:text-box fo:min-height="7.38cm"><text:p text:style-name="fig."><draw:frame draw:style-name="fr14" draw:name="Image34" text:anchor-type="paragraph" svg:width="16.898cm" style:rel-width="100%" svg:height="7.334cm" style:rel-height="scale" draw:z-index="63"><draw:image xlink:href="Pictures/10000000000002FF0000014D3101A22519805202.png" xlink:type="simple" xlink:show="embed" xlink:actuate="onLoad" draw:mime-type="image/png"/></draw:frame>fig. <text:sequence text:ref-name="reffig.17" text:name="fig." text:formula="ooow:fig.+1" style:num-format="1">18</text:sequence>: Detall pipella processament backoffice. </text:p></draw:text-box></draw:frame><text:s/></text:p>
      <text:p text:style-name="P41"/>
      <text:h text:style-name="Heading_20_4" text:outline-level="4"><text:bookmark-start text:name="__RefHeading___Toc2759_1726870378"/>Històric d'accions<text:bookmark-end text:name="__RefHeading___Toc2759_1726870378"/></text:h>
      <text:p text:style-name="P95"><text:span text:style-name="T12">Aquesta opció del menú d'accions mostra una finestra modal amb </text:span><text:span text:style-name="T53">quatre</text:span><text:span text:style-name="T12"> pipelles amb informació històrica dins l'aplicació </text:span><text:span text:style-name="T14">DISTRIBUCIÓ</text:span><text:span text:style-name="T12"> sobre les accions que s'han fet sobre aquesta anotació de registre. </text:span><text:span text:style-name="T14">DISTRIBUCIÓ</text:span><text:span text:style-name="T12"> registra les accions que es fan sobre molts elements de l'aplicació.</text:span></text:p>
      <text:p text:style-name="P44"/>
      <text:p text:style-name="P44"><draw:frame draw:style-name="fr7" draw:name="Frame28" text:anchor-type="as-char" svg:y="0cm" svg:width="17cm" style:rel-width="scale" svg:height="5.653cm" style:rel-height="scale-min" draw:z-index="76"><draw:text-box><text:p text:style-name="fig."><draw:frame draw:style-name="fr20" draw:name="Imagen 160" text:anchor-type="paragraph" svg:width="17cm" style:rel-width="100%" svg:height="5.653cm" style:rel-height="scale" draw:z-index="79"><draw:image xlink:href="Pictures/100000010000039B000001338B56493983F70133.png" xlink:type="simple" xlink:show="embed" xlink:actuate="onLoad" draw:mime-type="image/png"/><svg:desc>Interfaz de usuario gráfica, Sitio web

Descripción generada automáticamente</svg:desc></draw:frame>fig. <text:sequence text:ref-name="reffig.18" text:name="fig." text:formula="ooow:fig.+1" style:num-format="1">19</text:sequence>: Detall localització d’històric d’accions.</text:p></draw:text-box></draw:frame></text:p>
      <text:h text:style-name="Heading_20_5" text:outline-level="5"><text:bookmark-start text:name="__RefHeading___Toc2761_1726870378"/><text:soft-page-break/>Resum<text:bookmark-end text:name="__RefHeading___Toc2761_1726870378"/></text:h>
      <text:p text:style-name="P22">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22"><draw:frame draw:style-name="fr8" draw:name="Frame29" text:anchor-type="paragraph" svg:width="17cm" draw:z-index="54"><draw:text-box fo:min-height="6.976cm"><text:p text:style-name="fig."><draw:frame draw:style-name="fr14" draw:name="Image29" text:anchor-type="paragraph" svg:width="16.898cm" style:rel-width="100%" svg:height="6.934cm" style:rel-height="scale" draw:z-index="55"><draw:image xlink:href="Pictures/10000000000002F100000135AEBD1F3ED6294A32.png" xlink:type="simple" xlink:show="embed" xlink:actuate="onLoad" draw:mime-type="image/png"/></draw:frame>fig. <text:sequence text:ref-name="reffig.19" text:name="fig." text:formula="ooow:fig.+1" style:num-format="1">20</text:sequence>: Detall pipella resum.</text:p></draw:text-box></draw:frame></text:p>
      <text:h text:style-name="Heading_20_5" text:outline-level="5"><text:bookmark-start text:name="__RefHeading___Toc37402_3531032951"/><text:span text:style-name="T125">A</text:span>ccions<text:bookmark-end text:name="__RefHeading___Toc37402_3531032951"/></text:h>
      <text:p text:style-name="P41">Les accions a nivell general que s'han fet sobre l'anotació de registre:</text:p>
      <text:p text:style-name="P41"><draw:frame draw:style-name="fr4" draw:name="Frame30" text:anchor-type="paragraph" svg:width="17cm" draw:z-index="57"><draw:text-box fo:min-height="6.315cm"><text:p text:style-name="fig."><draw:frame draw:style-name="fr14" draw:name="Image30" text:anchor-type="paragraph" svg:width="16.898cm" style:rel-width="100%" svg:height="6.276cm" style:rel-height="scale" draw:z-index="69"><draw:image xlink:href="Pictures/10000000000002EF00000117DF071010C820E921.png" xlink:type="simple" xlink:show="embed" xlink:actuate="onLoad" draw:mime-type="image/png"/></draw:frame>fig. <text:sequence text:ref-name="reffig.20" text:name="fig." text:formula="ooow:fig.+1" style:num-format="1">21</text:sequence>: Detall pipella accions.</text:p></draw:text-box></draw:frame></text:p>
      <text:p text:style-name="P41">Es mostra la data, l'usuari i quin tipus d'acció s'ha fet. Aquestes elements són desplegables i es mostren els paràmetres que s'han registrat amb aquesta acció i sobre aquest element concret.</text:p>
      <text:p text:style-name="P41"/>
      <text:h text:style-name="Heading_20_5" text:outline-level="5"><text:bookmark-start text:name="__RefHeading___Toc2763_1726870378"/>Moviments<text:bookmark-end text:name="__RefHeading___Toc2763_1726870378"/></text:h>
      <text:p text:style-name="P41">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41"/>
      <text:p text:style-name="P12"><draw:frame draw:style-name="fr8" draw:name="Frame32" text:anchor-type="paragraph" svg:width="17cm" draw:z-index="71"><draw:text-box fo:min-height="3.457cm"><text:p text:style-name="fig."><draw:frame draw:style-name="fr14" draw:name="Image31" text:anchor-type="paragraph" svg:width="16.898cm" style:rel-width="100%" svg:height="3.436cm" style:rel-height="scale" draw:z-index="72"><draw:image xlink:href="Pictures/10000000000002F000000099D9CA13C746376961.png" xlink:type="simple" xlink:show="embed" xlink:actuate="onLoad" draw:mime-type="image/png"/></draw:frame>fig. <text:sequence text:ref-name="reffig.21" text:name="fig." text:formula="ooow:fig.+1" style:num-format="1">22</text:sequence>: Detall pipella moviments.</text:p></draw:text-box></draw:frame><text:soft-page-break/></text:p>
      <text:h text:style-name="Heading_20_5" text:outline-level="5"><text:bookmark-start text:name="__RefHeading___Toc2765_1726870378"/>Auditoria<text:bookmark-end text:name="__RefHeading___Toc2765_1726870378"/></text:h>
      <text:p text:style-name="P41">Auditoria sobre canvis sobre l'element (anotacions de registre) per part de l'usuari. Creació, modificació, etc...</text:p>
      <text:p text:style-name="P41"/>
      <text:p text:style-name="P12"><draw:frame draw:style-name="fr4" draw:name="Frame31" text:anchor-type="paragraph" svg:width="17cm" draw:z-index="106"><draw:text-box fo:min-height="3.694cm"><text:p text:style-name="fig."><draw:frame draw:style-name="fr14" draw:name="Image32" text:anchor-type="paragraph" svg:width="16.898cm" style:rel-width="100%" svg:height="3.671cm" style:rel-height="scale" draw:z-index="111"><draw:image xlink:href="Pictures/10000000000002E5000000A16BD5E16FE44C4836.png" xlink:type="simple" xlink:show="embed" xlink:actuate="onLoad" draw:mime-type="image/png"/></draw:frame>fig. <text:sequence text:ref-name="reffig.22" text:name="fig." text:formula="ooow:fig.+1" style:num-format="1">23</text:sequence>: Detall pipella auditoria.</text:p></draw:text-box></draw:frame></text:p>
      <text:p text:style-name="P41"/>
      <text:h text:style-name="P142" text:outline-level="4"><text:bookmark-start text:name="__RefHeading___Toc2767_1726870378"/>Reenviar<text:bookmark-end text:name="__RefHeading___Toc2767_1726870378"/></text:h>
      <text:p text:style-name="P94"><text:span text:style-name="T12">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54">E</text:span><text:span text:style-name="T55">s pot</text:span><text:span text:style-name="T35"> indicar si </text:span><text:span text:style-name="T54">d</text:span><text:span text:style-name="T55">eixar </text:span><text:span text:style-name="T35">una c</text:span><text:span text:style-name="T54">ò</text:span><text:span text:style-name="T35">pia en la bústia actual.</text:span><text:span text:style-name="T12"> També serà necessari afegir un comentari sobre el moviment que s'està realitzant.</text:span></text:p>
      <text:p text:style-name="P41"/>
      <text:p text:style-name="P12"><text:soft-page-break/><draw:frame draw:style-name="fr6" draw:name="Frame33" text:anchor-type="as-char" svg:width="16.967cm" draw:z-index="60"><draw:text-box fo:min-height="9.53cm"><text:p text:style-name="fig."><draw:frame draw:style-name="fr20" draw:name="Imagen 28" text:anchor-type="paragraph" svg:width="16.967cm" style:rel-width="100%" svg:height="9.53cm" style:rel-height="scale" draw:z-index="67"><draw:image xlink:href="Pictures/100000000000037A000002963E98C305822CDEE3.png" xlink:type="simple" xlink:show="embed" xlink:actuate="onLoad" draw:mime-type="image/png"/></draw:frame>fig. <text:sequence text:ref-name="reffig.23" text:name="fig." text:formula="ooow:fig.+1" style:num-format="1">24</text:sequence>: Formulari a omplir per reenviar una anotació d’una bústia a una altre.</text:p></draw:text-box></draw:frame></text:p>
      <text:p text:style-name="P12"/>
      <text:h text:style-name="Heading_20_5" text:outline-level="5"><text:bookmark-start text:name="__RefHeading___Toc4026_1810852831"/>Bústies favorits<text:bookmark-end text:name="__RefHeading___Toc4026_1810852831"/></text:h>
      <text:p text:style-name="P117">Des de la finestra de reenviaments tenim l’opció de marcar les bústies com a favorits fent clic amb el botó dret sobre la bústia, d’aquesta forma es quedaran guardades en una taula <text:s/>que podem veure a l'esquerra. Aquesta opció s’ha d’habilitar amb la propietat es.caib.distribucio.contingut.reenviar.favorits. En habilitar aquesta opció també s’activa la selecció de tipus checkbox en lloc de mantenir pitjat el CTRL.</text:p>
      <text:p text:style-name="P117"><draw:frame draw:style-name="fr7" draw:name="Frame34" text:anchor-type="as-char" svg:y="0cm" svg:width="17cm" style:rel-width="scale" svg:height="7.403cm" style:rel-height="scale-min" draw:z-index="61"><draw:text-box><text:p text:style-name="fig."><draw:frame draw:style-name="fr20" draw:name="Imagen 162" text:anchor-type="paragraph" svg:width="17cm" style:rel-width="100%" svg:height="7.403cm" style:rel-height="scale" draw:z-index="62"><draw:image xlink:href="Pictures/100000010000053D000002480D2FAC73930FEDAC.png" xlink:type="simple" xlink:show="embed" xlink:actuate="onLoad" draw:mime-type="image/png"/></draw:frame>fig. <text:sequence text:ref-name="reffig.24" text:name="fig." text:formula="ooow:fig.+1" style:num-format="1">25</text:sequence>: Detall on es pot veure una bústia marcada com a favorit.</text:p></draw:text-box></draw:frame></text:p>
      <text:p text:style-name="P12"/>
      <text:p text:style-name="P12"/>
      <text:h text:style-name="P142" text:outline-level="4"><text:bookmark-start text:name="__RefHeading___Toc2769_1726870378"/><text:soft-page-break/>Marcar com a processat<text:bookmark-end text:name="__RefHeading___Toc2769_1726870378"/></text:h>
      <text:p text:style-name="P96"><text:span text:style-name="T48">P</text:span><text:span text:style-name="T55">er defecte el llistat d'anotacions mostra les anotacions pendents de processar. Per les anotacions pendents de processar </text:span><text:span text:style-name="T12">l'usuari distribuïdor pot marcar les anotacions de registre pendents com a processa</text:span><text:span text:style-name="T34">des</text:span><text:span text:style-name="T12">. Ho podrà fer amb la finestra modal que es mostra clicant sobre l'opció del menú d'accions.</text:span></text:p>
      <text:p text:style-name="P41"/>
      <text:p text:style-name="P12"><draw:frame draw:style-name="fr6" draw:name="Frame35" text:anchor-type="as-char" svg:width="16.967cm" draw:z-index="99"><draw:text-box fo:min-height="5.345cm"><text:p text:style-name="fig."><draw:frame draw:style-name="fr20" draw:name="Imagen9" text:anchor-type="paragraph" svg:width="16.967cm" style:rel-width="100%" svg:height="5.345cm" style:rel-height="scale" draw:z-index="100"><draw:image xlink:href="Pictures/100000000000037F0000011AA4E5CA44F22EF4ED.png" xlink:type="simple" xlink:show="embed" xlink:actuate="onLoad" draw:mime-type="image/png"/></draw:frame>fig. <text:sequence text:ref-name="reffig.25" text:name="fig." text:formula="ooow:fig.+1" style:num-format="1">26</text:sequence>: Modal per marcar com a processat una anotació.</text:p></draw:text-box></draw:frame></text:p>
      <text:p text:style-name="P44"/>
      <text:p text:style-name="P44">Quan un<text:span text:style-name="T126">a anotació de distribució </text:span>es marca com a processa<text:span text:style-name="T126">da</text:span>, es tancarà l'expedient vinculat que es va crear a l'arxiu digital en el moment de la recepció de l'assentament per part del <text:span text:style-name="T91">DISTRIBUCIÓ</text:span>, i es canviarà el seu estat a PROCESSAT i a partir d'aquest moment, per consultar aquesta anotació de registre, s'haurà de filtrar el contingut per estat PROCESSAT.</text:p>
      <text:p text:style-name="P44"/>
      <text:h text:style-name="P144" text:outline-level="4"><text:bookmark-start text:name="__RefHeading___Toc2769_17268703781"/>Marcar com a p<text:span text:style-name="T135">endent</text:span><text:bookmark-end text:name="__RefHeading___Toc2769_17268703781"/></text:h>
      <text:p text:style-name="P68">Les anotacions que estan processades es poden posar com a pendents. Ho podrà fer amb la finestra modal que es mostra clicant sobre l'opció del menú d'accions.</text:p>
      <text:p text:style-name="P69"><draw:frame draw:style-name="fr22" draw:name="Imatge17" text:anchor-type="char" svg:width="17cm" svg:height="3.879cm" draw:z-index="107"><draw:image xlink:href="Pictures/10000001000005270000012D341523D6168E4C9B.png" xlink:type="simple" xlink:show="embed" xlink:actuate="onLoad" draw:mime-type="image/png"/></draw:frame></text:p>
      <text:p text:style-name="P41"/>
      <text:h text:style-name="P142" text:outline-level="4"><text:bookmark-start text:name="__RefHeading___Toc2771_1726870378"/>Llistat d'alertes<text:bookmark-end text:name="__RefHeading___Toc2771_1726870378"/></text:h>
      <text:p text:style-name="P41">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41"><draw:frame draw:style-name="fr21" draw:name="Image35" text:anchor-type="paragraph" svg:x="6.853cm" svg:y="0cm" svg:width="3.447cm" svg:height="5.219cm" draw:z-index="82"><draw:image xlink:href="Pictures/100000000000008E000000CA2CD635CBBC5CEA6F.png" xlink:type="simple" xlink:show="embed" xlink:actuate="onLoad" draw:mime-type="image/png"/></draw:frame><text:soft-page-break/></text:p>
      <text:p text:style-name="P41">També cal esmentar que el llistat ja ens avisa de quin<text:span text:style-name="T123">e</text:span>s anotacions de registre tenen alertes, amb els símbols següents:</text:p>
      <text:p text:style-name="P41"/>
      <text:p text:style-name="P12"><draw:frame draw:style-name="fr5" draw:name="Frame36" text:anchor-type="as-char" svg:width="9.44cm" draw:z-index="65"><draw:text-box fo:min-height="1.605cm"><text:p text:style-name="fig."><draw:frame draw:style-name="fr20" draw:name="Imagen10" text:anchor-type="paragraph" svg:width="9.44cm" style:rel-width="100%" svg:height="1.605cm" style:rel-height="scale" draw:z-index="66"><draw:image xlink:href="Pictures/10000000000001650000003D98008BCA2A80CB8E.png" xlink:type="simple" xlink:show="embed" xlink:actuate="onLoad" draw:mime-type="image/png"/></draw:frame>fig. <text:sequence text:ref-name="reffig.26" text:name="fig." text:formula="ooow:fig.+1" style:num-format="1">27</text:sequence>: Icona d'alertes. </text:p></draw:text-box></draw:frame></text:p>
      <text:p text:style-name="P41"/>
      <text:p text:style-name="P41">A més, l'usuari podrà marcar les alertes com a llegides amb el botó “Llegida” que es mostra a la dreta de la taula, i aquestes desapareixeran del llistat esmentat.</text:p>
      <text:p text:style-name="P41"><draw:frame draw:style-name="fr4" draw:name="Frame37" text:anchor-type="paragraph" svg:width="17cm" draw:z-index="53"><draw:text-box fo:min-height="8.883cm"><text:p text:style-name="fig."><draw:frame draw:style-name="fr14" draw:name="Image36" text:anchor-type="paragraph" svg:width="16.898cm" style:rel-width="100%" svg:height="8.828cm" style:rel-height="scale" draw:z-index="92"><draw:image xlink:href="Pictures/10000000000002C600000173C0947B72061585F3.png" xlink:type="simple" xlink:show="embed" xlink:actuate="onLoad" draw:mime-type="image/png"/></draw:frame>fig. <text:sequence text:ref-name="reffig.27" text:name="fig." text:formula="ooow:fig.+1" style:num-format="1">28</text:sequence>: Exemple de com es marca una alerta com a llegida. </text:p></draw:text-box></draw:frame></text:p>
      <text:p text:style-name="P12"/>
      <text:h text:style-name="P140" text:outline-level="3"><text:bookmark-start text:name="__RefHeading___Toc2773_1726870378"/>Comentaris sobre els continguts<text:bookmark-end text:name="__RefHeading___Toc2773_1726870378"/></text:h>
      <text:p text:style-name="P41">Els usuaris amb permisos adequats podran deixar comentaris sobre els continguts de bústia. Per això només hauran de fer clic sobre el botó següent, que a l'hora mostra els comentaris que hi ha sobre aquesta anotació de registre.</text:p>
      <text:p text:style-name="P41"/>
      <text:p text:style-name="P41"><text:soft-page-break/></text:p>
      <text:p text:style-name="P12"><draw:frame draw:style-name="fr19" draw:name="Imagen 9" text:anchor-type="as-char" svg:width="16.96cm" svg:height="1.905cm" draw:z-index="90"><draw:image xlink:href="Pictures/100000000000048C00000082E581219E5F3EDAB5.png" xlink:type="simple" xlink:show="embed" xlink:actuate="onLoad" draw:mime-type="image/png"/></draw:frame></text:p>
      <text:p text:style-name="P20">fig. <text:sequence text:ref-name="reffig.28" text:name="fig." text:formula="ooow:fig.+1" style:num-format="1">29</text:sequence>: Detall de la localització dels comentaris. </text:p>
      <text:p text:style-name="P12"/>
      <text:p text:style-name="P76"><text:span text:style-name="T133">E</text:span><text:span text:style-name="T134">n prémer el botó s'obre una modal a mode de diàleg amb els diferents comentaris.</text:span></text:p>
      <text:p text:style-name="P19"><draw:frame draw:style-name="fr18" draw:name="Image37" text:anchor-type="paragraph" svg:width="17cm" svg:height="13.018cm" draw:z-index="73"><draw:image xlink:href="Pictures/20000009000049B20000386FA4571E30B052EF0F.svm" xlink:type="simple" xlink:show="embed" xlink:actuate="onLoad" draw:mime-type="image/x-svm"/><draw:image xlink:href="Pictures/10000001000002CA00000223ABB09AF008497025.png" xlink:type="simple" xlink:show="embed" xlink:actuate="onLoad" draw:mime-type="image/png"/></draw:frame></text:p>
      <text:h text:style-name="P141" text:outline-level="3"><text:bookmark-start text:name="__RefHeading___Toc2797_992022433"/>Classificació d'anotacions<text:bookmark-end text:name="__RefHeading___Toc2797_992022433"/></text:h>
      <text:h text:style-name="P143" text:outline-level="4"><text:bookmark-start text:name="__RefHeading___Toc2672_992022433"/>Classificació <text:span text:style-name="T95">simple</text:span><text:bookmark-end text:name="__RefHeading___Toc2672_992022433"/></text:h>
      <text:p text:style-name="P45"><text:span text:style-name="T92">Mitjançant aquesta funcionalitat, l</text:span>'usuari distribuïdor pot <text:span text:style-name="T92">canviar la classificació d'una o vàries anotacions de registre. La classificació d'una anotació de registre es pot entendre com la forma que te distribució d'associar una anotació de registre amb un procediment administratiu.</text:span></text:p>
      <text:p text:style-name="P46">Per a canviar la classificació d'una única anotació de registre s'ha d'utilitzar l'opció «Classificar» que està disponible al menú d'accions de cada anotació de registre.</text:p>
      <text:p text:style-name="P47"><draw:custom-shape text:anchor-type="paragraph" draw:z-index="29" draw:name="Forma1" draw:style-name="gr2" draw:text-style-name="P200" svg:width="5.248cm" svg:height="0.918cm" svg:x="9.405cm" svg:y="2.805cm"><text:p/><draw:enhanced-geometry svg:viewBox="0 0 21600 21600" draw:type="rectangle" draw:enhanced-path="M 0 0 L 21600 0 21600 21600 0 21600 0 0 Z N"/></draw:custom-shape><text:soft-page-break/><draw:frame draw:style-name="fr3" draw:name="Frame38" text:anchor-type="as-char" svg:width="12.806cm" draw:z-index="77"><draw:text-box fo:min-height="6.211cm"><text:p text:style-name="fig."><draw:frame draw:style-name="fr14" draw:name="Imatge2" text:anchor-type="paragraph" svg:width="12.806cm" style:rel-width="100%" svg:height="6.211cm" style:rel-height="scale" draw:z-index="78"><draw:image xlink:href="Pictures/10000001000002140000010273C63BB79FFC864B.png" xlink:type="simple" xlink:show="embed" xlink:actuate="onLoad" draw:mime-type="image/png"/></draw:frame>fig. <text:sequence text:ref-name="reffig.29" text:name="fig." text:formula="ooow:fig.+1" style:num-format="1">30</text:sequence>: Localització per classificar l’anotació que volem.</text:p></draw:text-box></draw:frame></text:p>
      <text:p text:style-name="P46"/>
      <text:p text:style-name="P46"/>
      <text:p text:style-name="P49">Al seleccionar aquesta opció apareix una finestra modal a on es mostren els detalls de l'anotació de registre seleccionada i a on es pot seleccionar un dels procediments disponibles per a la classificació.</text:p>
      <text:p text:style-name="P48"><draw:frame draw:style-name="fr3" draw:name="Frame39" text:anchor-type="as-char" svg:width="17cm" draw:z-index="86"><draw:text-box fo:min-height="11.012cm"><text:p text:style-name="fig."><draw:frame draw:style-name="fr14" draw:name="Imatge3" text:anchor-type="paragraph" svg:width="17cm" style:rel-width="100%" svg:height="11.012cm" style:rel-height="scale" draw:z-index="87"><draw:image xlink:href="Pictures/10000001000003840000024740C0CB5A35203756.png" xlink:type="simple" xlink:show="embed" xlink:actuate="onLoad" draw:mime-type="image/png"/></draw:frame>fig. <text:sequence text:ref-name="reffig.30" text:name="fig." text:formula="ooow:fig.+1" style:num-format="1">31</text:sequence>: Modal dels detalls de l’anotació abans de la classificació.</text:p></draw:text-box></draw:frame></text:p>
      <text:p text:style-name="P49"/>
      <text:p text:style-name="P49">Una vegada seleccionat el procediment, es pot fer clic al botó «Classificar» per a fer efectiva la classificació o també es pot utilitzar el botó «Cancel·lar» per a sortir de la pantalla sense fer cap canvi en l'anotació de registre.</text:p>
      <text:h text:style-name="P145" text:outline-level="4"><text:bookmark-start text:name="__RefHeading___Toc2674_992022433"/><text:soft-page-break/>Classificació <text:span text:style-name="T95">múltiple</text:span><text:bookmark-end text:name="__RefHeading___Toc2674_992022433"/></text:h>
      <text:p text:style-name="P52">En la pantalla de consulta d'anotacions es dona l'opció a l'usuari de seleccionar múltiples elements i modificar la seva classificació amb una sola acció.</text:p>
      <text:p text:style-name="P21"><text:span text:style-name="T1">Per a utilitzar aquesta possibilitat s'han de seleccionar una o més anotacions de registre utilitzant el camp de tipus </text:span><text:span text:style-name="T82">checkbox</text:span><text:span text:style-name="T1"> disponible a la columna de l'esquerra.</text:span></text:p>
      <text:p text:style-name="P52"><draw:frame draw:style-name="fr1" draw:name="Frame40" text:anchor-type="paragraph" svg:width="17cm" draw:z-index="74"><draw:text-box fo:min-height="3.358cm"><text:p text:style-name="fig."><draw:frame draw:style-name="fr14" draw:name="Image38" text:anchor-type="paragraph" svg:width="17cm" style:rel-width="100%" svg:height="3.358cm" style:rel-height="scale" draw:z-index="80"><draw:image xlink:href="Pictures/10000000000004E2000000F77F690762537423D2.png" xlink:type="simple" xlink:show="embed" xlink:actuate="onLoad" draw:mime-type="image/png"/></draw:frame>fig. <text:sequence text:ref-name="reffig.31" text:name="fig." text:formula="ooow:fig.+1" style:num-format="1">32</text:sequence>: Exemple de com es poden fer classificacions en grup.</text:p></draw:text-box></draw:frame><draw:custom-shape text:anchor-type="paragraph" draw:z-index="30" draw:name="Forma1" draw:style-name="gr1" draw:text-style-name="P200" svg:width="0.419cm" svg:height="2.223cm" svg:x="0.212cm" svg:y="0.637cm"><text:p/><draw:enhanced-geometry svg:viewBox="0 0 21600 21600" draw:type="rectangle" draw:enhanced-path="M 0 0 L 21600 0 21600 21600 0 21600 0 0 Z N"/></draw:custom-shape></text:p>
      <text:p text:style-name="P51">Una vegada seleccionades les anotacions de registre, s'ha de fer clic al botó «Classificar» situat a la part superior dreta de la taula. <text:span text:style-name="T93">Al </text:span>fer clic a damunt el botó<text:span text:style-name="T93"> aquesta opció apareix</text:span>erà<text:span text:style-name="T93"> una finestra modal a on es mostren els detalls de l</text:span>es <text:span text:style-name="T93">anotaci</text:span>ons<text:span text:style-name="T93"> de registre seleccionad</text:span>es<text:span text:style-name="T93"> i a on es pot seleccionar un dels procediments disponibles per a la classificació.</text:span></text:p>
      <text:p text:style-name="P51"><draw:frame draw:style-name="fr3" draw:name="Frame41" text:anchor-type="as-char" svg:width="17cm" draw:z-index="88"><draw:text-box fo:min-height="8.841cm"><text:p text:style-name="fig."><draw:frame draw:style-name="fr14" draw:name="Imatge5" text:anchor-type="paragraph" svg:width="17cm" style:rel-width="100%" svg:height="8.841cm" style:rel-height="scale" draw:z-index="89"><draw:image xlink:href="Pictures/100000010000049500000262A8192AB9420AE077.png" xlink:type="simple" xlink:show="embed" xlink:actuate="onLoad" draw:mime-type="image/png"/></draw:frame>fig. <text:sequence text:ref-name="reffig.32" text:name="fig." text:formula="ooow:fig.+1" style:num-format="1">33</text:sequence>: Modal on es troba la informació de totes les anotacions seleccionades per a la classificació. </text:p></draw:text-box></draw:frame></text:p>
      <text:p text:style-name="P51"/>
      <text:p text:style-name="P50">Una vegada seleccionat el procediment, es pot fer clic al botó «Classificar» per a fer efectiva la classificació o també es pot utilitzar el botó «Cancel·lar» per a sortir de la pantalla sense fer cap canvi en <text:span text:style-name="T94">les </text:span>anotaci<text:span text:style-name="T94">ons</text:span> de registre.</text:p>
      <text:p text:style-name="P53"><draw:frame draw:style-name="fr17" draw:name="Imatge6" text:anchor-type="paragraph" svg:width="17cm" svg:height="8.022cm" draw:z-index="31"><draw:image xlink:href="Pictures/100000010000049700000262BA1331511C02DF70.png" xlink:type="simple" xlink:show="embed" xlink:actuate="onLoad" draw:mime-type="image/png"/></draw:frame><text:soft-page-break/></text:p>
      <text:p text:style-name="P53">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53">Si una anotació de registre s'ha mogut a una altra bústia o s'ha enviat a un backoffice com a resultat del canvi de procediment, apareixerà un missatge a la dreta de l'anotació de registre indicant aquest fet.</text:p>
      <text:p text:style-name="P53"/>
      <text:h text:style-name="Heading_20_3" text:outline-level="3"><text:bookmark-start text:name="__RefHeading___Toc4232_1810852831"/>Reserva/<text:span text:style-name="T128">agafar</text:span> d’anotacions<text:bookmark-end text:name="__RefHeading___Toc4232_1810852831"/></text:h>
      <text:p text:style-name="P114">Aquesta acció s’ha d’habilitar amb la propietat es.caib.distribucio.anotacions.permetre.reservar.</text:p>
      <text:p text:style-name="P118">El concepte de reservar anotacions és la possibilitat <text:span text:style-name="T128">de reservar</text:span> una anotació i realitzar una sèrie d’accions sobre ella que no estan permeses <text:span text:style-name="T128">si un usuari no té </text:span>l’anotació reservada/agafada.</text:p>
      <text:p text:style-name="P119">Les anotacions <text:span text:style-name="T128">reservades</text:span> es podran diferenciar de les no <text:span text:style-name="T128">reservades</text:span> amb el botó d’accions, en cas de tenir reservada l’anotació aquest botó es veurà amb el color blau i en el cas contrari es veurà amb el color taronja.</text:p>
      <text:p text:style-name="P118"><draw:frame draw:style-name="fr16" draw:name="Imagen5" text:anchor-type="paragraph" svg:x="2.983cm" svg:y="-0.058cm" svg:width="1.459cm" svg:height="0.527cm" draw:z-index="81"><draw:image xlink:href="Pictures/100000000000006C0000002766FE40B02934202A.png" xlink:type="simple" xlink:show="embed" xlink:actuate="onLoad" draw:mime-type="image/png"/></draw:frame>- Reservada/agafada</text:p>
      <text:p text:style-name="P118"><draw:frame draw:style-name="fr16" draw:name="Imagen7" text:anchor-type="paragraph" svg:x="2.155cm" svg:y="-0.079cm" svg:width="1.471cm" svg:height="0.536cm" draw:z-index="83"><draw:image xlink:href="Pictures/100000000000006B000000278782AD98F8026AC7.png" xlink:type="simple" xlink:show="embed" xlink:actuate="onLoad" draw:mime-type="image/png"/></draw:frame>- No reservada </text:p>
      <text:p text:style-name="P119"><draw:frame draw:style-name="fr2" draw:name="Frame42" text:anchor-type="paragraph" svg:x="0.885cm" svg:y="1.332cm" svg:width="4.223cm" draw:z-index="84"><draw:text-box fo:min-height="4.239cm"><text:p text:style-name="fig."><draw:frame draw:style-name="fr14" draw:name="Imagen8" text:anchor-type="paragraph" svg:width="4.223cm" style:rel-width="100%" svg:height="4.239cm" style:rel-height="scale" draw:z-index="93"><draw:image xlink:href="Pictures/10000000000000FB000000FC59907789B198633D.png" xlink:type="simple" xlink:show="embed" xlink:actuate="onLoad" draw:mime-type="image/png"/></draw:frame>fig. <text:sequence text:ref-name="reffig.33" text:name="fig." text:formula="ooow:fig.+1" style:num-format="1">34</text:sequence>: Detall d’opcions d’una anotació reservada.</text:p></draw:text-box></draw:frame>Un usuari que té <text:span text:style-name="T128">reservada</text:span> una anotació pot realitzar les següents accions <text:span text:style-name="T128">(marcades) </text:span>sobre l’anotació. <text:span text:style-name="T128">A més també pot alliberar l’anotació, deixant-la en estat ‘no reservada’.</text:span></text:p>
      <text:p text:style-name="P120"><text:soft-page-break/>En canvi, una anotació que està alliberada (no agafada per cap usuari) només permetrà les següents accions, <text:span text:style-name="T129">entre elles fer la reserva (agafar)</text:span>:</text:p>
      <text:p text:style-name="P120"><draw:frame draw:style-name="fr15" draw:name="Imagen11" text:anchor-type="paragraph" svg:x="0.298cm" svg:y="0.053cm" svg:width="4.498cm" svg:height="3.519cm" draw:z-index="94"><draw:image xlink:href="Pictures/10000000000000AA00000085AB232CA801DFDA4E.png" xlink:type="simple" xlink:show="embed" xlink:actuate="onLoad" draw:mime-type="image/png"/></draw:frame>I finalment, en cas d’estar reservada, la resta d’usuaris veuran l’anotació de la següent forma, on es veurà reflectit l'usuari que té reservada l’anotació.</text:p>
      <text:p text:style-name="P120"><draw:frame draw:style-name="fr2" draw:name="Frame43" text:anchor-type="paragraph" svg:x="0.339cm" svg:y="0.053cm" svg:width="4.471cm" draw:z-index="95"><draw:text-box fo:min-height="4.657cm"><text:p text:style-name="fig."><draw:frame draw:style-name="fr14" draw:name="Imagen12" text:anchor-type="paragraph" svg:width="4.471cm" style:rel-width="100%" svg:height="4.657cm" style:rel-height="scale" draw:z-index="96"><draw:image xlink:href="Pictures/10000000000000A9000000B062AEBB39CCE52908.png" xlink:type="simple" xlink:show="embed" xlink:actuate="onLoad" draw:mime-type="image/png"/></draw:frame>fig. <text:sequence text:ref-name="reffig.34" text:name="fig." text:formula="ooow:fig.+1" style:num-format="1">35</text:sequence>: Detall de com la resta d’usuaris veuen una anotació reservada per altre. </text:p></draw:text-box></draw:frame></text:p>
      <text:p text:style-name="P120">En cas de reservar una anotació que està prèviament reservada per un altre usuari, <text:span text:style-name="T129">l’aplicació</text:span> enviarà un correu d’avís a l’usuari actual que té reservada l’anotació.</text:p>
      <text:p text:style-name="P116"/>
      <text:h text:style-name="P138" text:outline-level="1"><text:bookmark-start text:name="__RefHeading___Toc32805_3233606579"/>Opcions d'usuari<text:bookmark-end text:name="__RefHeading___Toc32805_3233606579"/></text:h>
      <text:p text:style-name="P93"/>
      <text:p text:style-name="P93"><text:span text:style-name="T116">Tots els usuaris disposen d'un menú </text:span><text:span text:style-name="T117">comú </text:span><text:span text:style-name="T118">d</text:span><text:span text:style-name="T119">'usuari </text:span><text:span text:style-name="T116">per a la configuració </text:span><text:span text:style-name="T118">d</text:span><text:span text:style-name="T119">el perfil, la descàrrega d'aquest manual o la desconnexió de la sessió</text:span><text:span text:style-name="T116"> des del desplegable del menú usuari</text:span><text:span text:style-name="T117"> </text:span><text:span text:style-name="T116">:</text:span></text:p>
      <text:p text:style-name="P88"/>
      <text:p text:style-name="P93"><draw:frame draw:style-name="fr1" draw:name="Frame4" text:anchor-type="paragraph" svg:width="10.186cm" draw:z-index="34"><draw:text-box fo:min-height="3.149cm"><text:p text:style-name="fig."><draw:frame draw:style-name="fr13" draw:name="Image9" text:anchor-type="as-char" svg:width="10.186cm" style:rel-width="100%" svg:height="3.149cm" style:rel-height="scale" draw:z-index="124"><draw:image xlink:href="Pictures/10000000000001810000007760AE35DDD3F85347.png" xlink:type="simple" xlink:show="embed" xlink:actuate="onLoad" draw:mime-type="image/png"/></draw:frame><text:span text:style-name="T112"><text:line-break/></text:span>fig. <text:sequence text:ref-name="reffig.35" text:name="fig." text:formula="ooow:fig.+1" style:num-format="1">36</text:sequence>: Menú d'usuari amb accés a la configuració del perfil.</text:p></draw:text-box></draw:frame></text:p>
      <text:p text:style-name="P74">Les opcions del menú per les opcions de l'usuari són les següents:</text:p>
      <text:list xml:id="list731779135" text:style-name="L5">
        <text:list-item>
          <text:p text:style-name="P195">Configuració usuari: Permet configurar opcions del perfil de l'usuari a DISTRIBUCIO.</text:p>
        </text:list-item>
        <text:list-item>
          <text:p text:style-name="P195"><draw:frame draw:style-name="fr12" draw:name="Image12" text:anchor-type="paragraph" svg:x="1.291cm" svg:y="0cm" svg:width="0.503cm" svg:height="0.556cm" draw:z-index="44"><draw:image xlink:href="Pictures/1000000000000013000000157E5432C983401ACA.png" xlink:type="simple" xlink:show="embed" xlink:actuate="onLoad" draw:mime-type="image/png"/></draw:frame><text:s/>Manual d'Usuari: permet la descàrrega d'aquest mateix manual.</text:p>
        </text:list-item>
        <text:list-item>
          <text:p text:style-name="P195"><draw:frame draw:style-name="fr12" draw:name="Image13" text:anchor-type="paragraph" svg:x="1.291cm" svg:y="0cm" svg:width="0.635cm" svg:height="0.423cm" draw:z-index="45"><draw:image xlink:href="Pictures/10000000000000180000001068F0728E06B408F0.png" xlink:type="simple" xlink:show="embed" xlink:actuate="onLoad" draw:mime-type="image/png"/></draw:frame>Desconnectar: esborra les <text:span text:style-name="T110">cookies</text:span><text:span text:style-name="T111"> de sessió i força la desconnexió de l'usuari des del navegador.</text:span></text:p>
        </text:list-item>
      </text:list>
      <text:p text:style-name="P80"/>
      <text:p text:style-name="P80">A continuació es detallen les opcions de la configuració del perfil de l'usuari.</text:p>
      <text:h text:style-name="P139" text:outline-level="2"><text:bookmark-start text:name="__RefHeading___Toc32807_3233606579"/>Configuraci<text:span text:style-name="T122">ó</text:span> usuari<text:bookmark-end text:name="__RefHeading___Toc32807_3233606579"/></text:h>
      <text:p text:style-name="P112">Des de l'opció de configuració de l'usuari és possible comprovar les dades personals, veure els rols assignats i configurar com rebre els correus i l'idioma de l'aplicació de DISTRIBUCIO.</text:p>
      <text:p text:style-name="P113"><draw:frame draw:style-name="fr1" draw:name="Frame7" text:anchor-type="paragraph" svg:width="12.562cm" draw:z-index="43"><draw:text-box fo:min-height="7.567cm"><text:p text:style-name="P123"><text:span text:style-name="T112"><text:line-break/></text:span><draw:frame draw:style-name="fr11" draw:name="Imatge13" text:anchor-type="char" svg:width="13.427cm" svg:height="6.302cm" draw:z-index="97"><draw:image xlink:href="Pictures/1000000100000523000001A24764904BDAD1911D.png" xlink:type="simple" xlink:show="embed" xlink:actuate="onLoad" draw:mime-type="image/png"/></draw:frame>fig. <text:sequence text:ref-name="reffig.36" text:name="fig." text:formula="ooow:fig.+1" style:num-format="1">37</text:sequence>: Modal per la configuració de les opcions de l'usuari.</text:p></draw:text-box></draw:frame>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261159382" text:style-name="L6">
        <text:list-item>
          <text:p text:style-name="P197"><text:soft-page-break/>Nom<text:span text:style-name="T89">: Nom de l'usuari a partir de les dades externes de l'usuari pel codi d'usuari amb què s'ha autenticat.</text:span></text:p>
        </text:list-item>
        <text:list-item>
          <text:p text:style-name="P197">Nif<text:span text:style-name="T89">: Camp del NIF de l'usuari segons les dades externes i el codi d'autenticació.</text:span></text:p>
        </text:list-item>
        <text:list-item>
          <text:p text:style-name="P197">Correu<text:span text:style-name="T89"> electrònic: Adreça de correu electrònic corresponent a l'usuari.</text:span></text:p>
        </text:list-item>
        <text:list-item>
          <text:p text:style-name="P197">Rols<text:span text:style-name="T89">: Llistat de rols assignat a l'usuari autenticat a patir del qual es comprovaran els permisos d'accés a bústies i els tipus de rols per a l'usuari autenticat.</text:span></text:p>
        </text:list-item>
      </text:list>
      <text:p text:style-name="P115">Els 3 darrers camps que sí es poden modificar i guardar són els següents:</text:p>
      <text:list xml:id="list1477075930" text:style-name="L7">
        <text:list-item>
          <text:p text:style-name="P198">Vols rebre correus de la bústia?<text:span text:style-name="T89">: Indica si rebre correus electrònics al correu de l'usuari quan una anotació arribi a alguna bústia de DISTRIBUCIO per la qual l'usuari té permís d'accés.</text:span></text:p>
        </text:list-item>
        <text:list-item>
          <text:p text:style-name="P198">Vols rebre els correus de la bústia agrupats en un únic correu al dia?<text:span text:style-name="T89">: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199">Idioma<text:span text:style-name="T89">: Selecció de l'idioma de l'aplicació de DISTRIBUCIO. L'usuari pot escollir "Català" o "Castellà".</text:span></text:p>
        </text:list-item>
        <text:list-item>
          <text:p text:style-name="P199"><text:span text:style-name="Fuente_20_de_20_párrafo_20_predeter.">Bústia</text:span><text:span text:style-name="T89">: On l’usuari pot seleccionar una de les bústies emmagatzemades a l’aplicació.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1">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text-properties fo:language="ca" fo:country="ES" officeooo:paragraph-rsid="000e1972"/>
    </style:style>
    <style:style style:name="MP3" style:family="paragraph" style:parent-style-name="Footer">
      <style:text-properties fo:language="ca" fo:country="ES" officeooo:paragraph-rsid="000e1972"/>
    </style:style>
    <style:style style:name="MP4" style:family="paragraph" style:parent-style-name="Standard">
      <style:paragraph-properties fo:text-align="start" style:justify-single-word="false"/>
      <style:text-properties fo:language="ca" fo:country="ES" officeooo:paragraph-rsid="000e1972"/>
    </style:style>
    <style:style style:name="MP5" style:family="paragraph">
      <loext:graphic-properties draw:fill="none"/>
      <style:paragraph-properties fo:text-align="center"/>
    </style:style>
    <style:style style:name="MP6"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4"><draw:g text:anchor-type="as-char" svg:y="-0.011cm" draw:z-index="28" draw:name="Group 6" draw:style-name="Mgr1"><draw:frame draw:name="Picture 2" draw:style-name="Mgr2" draw:text-style-name="MP5" svg:width="6.966cm" svg:height="1.281cm" svg:x="1.767cm" svg:y="0cm"><draw:image xlink:href="Pictures/10000000000006A400000104C61E4F84145F3308.png" xlink:type="simple" xlink:show="embed" xlink:actuate="onLoad" draw:mime-type="image/png"><text:p/></draw:image></draw:frame><draw:frame draw:name="Picture 3" draw:style-name="Mgr3" draw:text-style-name="MP5" svg:width="1.65cm" svg:height="1.28cm" svg:x="0cm" svg:y="0cm"><draw:image xlink:href="Pictures/10000001000002E6000002BB18D09AEB46C6E810.png" xlink:type="simple" xlink:show="embed" xlink:actuate="onLoad" draw:mime-type="image/png"><text:p/></draw:image></draw:frame></draw:g></text:p>
            </table:table-cell>
            <table:table-cell table:style-name="Tabla1.B1" office:value-type="string">
              <text:p text:style-name="MP6">Oficina Tècnica de Direcció de Projecte</text:p>
            </table:table-cell>
          </table:table-row>
        </table:table>
        <text:p text:style-name="MP2"/>
      </style:header>
      <style:footer>
        <text:p text:style-name="MP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29</text:page-number></text:span><text:span text:style-name="MT1"><text:s/>/ </text:span><text:span text:style-name="MT1"><text:page-count>29</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6-04-21T12:50:42.768999910">21/04/2026</text:date></text:p>
            </table:table-cell>
            <table:table-cell table:style-name="Tabla6.A2" office:value-type="string">
              <text:p text:style-name="MP10">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25T15:02:21.392000000</meta:creation-date>
    <dc:date>2026-04-21T12:50:41.915000000</dc:date>
    <meta:editing-duration>PT22H32M7S</meta:editing-duration>
    <meta:editing-cycles>147</meta:editing-cycles>
    <meta:generator>LibreOffice/7.3.5.2$Windows_X86_64 LibreOffice_project/184fe81b8c8c30d8b5082578aee2fed2ea847c01</meta:generator>
    <dc:creator>Daniel Moreno Linares</dc:creator>
    <meta:document-statistic meta:table-count="6" meta:image-count="68" meta:object-count="0" meta:page-count="29" meta:paragraph-count="370" meta:word-count="4966" meta:character-count="30892" meta:non-whitespace-character-count="26311"/>
  </office:meta>
</office:document-meta>
</file>