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8C0000008258644CA3.png" manifest:media-type="image/png"/>
  <manifest:file-entry manifest:full-path="Pictures/10000000000006A400000104792F8214.png" manifest:media-type="image/png"/>
  <manifest:file-entry manifest:full-path="Pictures/10000000000001E70000005F3D868FE3.png" manifest:media-type="image/png"/>
  <manifest:file-entry manifest:full-path="Pictures/10000000000001940000006567358005.png" manifest:media-type="image/png"/>
  <manifest:file-entry manifest:full-path="Pictures/10000000000002ED00000151C60CBBB6.png" manifest:media-type="image/png"/>
  <manifest:file-entry manifest:full-path="Pictures/10000001000002E6000002BBD71058E4.png" manifest:media-type="image/png"/>
  <manifest:file-entry manifest:full-path="Pictures/100000000000001800000013C4DED6E2.png" manifest:media-type="image/png"/>
  <manifest:file-entry manifest:full-path="Pictures/10000000000002750000008FD442AA45.png" manifest:media-type="image/png"/>
  <manifest:file-entry manifest:full-path="Pictures/100000000000001A0000001764E3CB42.png" manifest:media-type="image/png"/>
  <manifest:file-entry manifest:full-path="Pictures/10000000000002E5000000A1DCBE3BAF.png" manifest:media-type="image/png"/>
  <manifest:file-entry manifest:full-path="Pictures/100000000000019F00000057FE000A75.png" manifest:media-type="image/png"/>
  <manifest:file-entry manifest:full-path="Pictures/1000000000000015000000172198EC24.png" manifest:media-type="image/png"/>
  <manifest:file-entry manifest:full-path="Pictures/10000000000001F8000000CE745EE705.png" manifest:media-type="image/png"/>
  <manifest:file-entry manifest:full-path="Pictures/1000000100000134000000AD81292649.png" manifest:media-type="image/png"/>
  <manifest:file-entry manifest:full-path="Pictures/10000001000004F200000193BEFC143A.png" manifest:media-type="image/png"/>
  <manifest:file-entry manifest:full-path="Pictures/100000010000053A0000024D84B736E1.png" manifest:media-type="image/png"/>
  <manifest:file-entry manifest:full-path="Pictures/10000001000004F20000010EF49B8E70.png" manifest:media-type="image/png"/>
  <manifest:file-entry manifest:full-path="Pictures/100000000000000C0000000E25855A0E.png" manifest:media-type="image/png"/>
  <manifest:file-entry manifest:full-path="Pictures/10000000000002D300000144CD36C340.png" manifest:media-type="image/png"/>
  <manifest:file-entry manifest:full-path="Pictures/10000000000000A9000000B000CFF4C2.png" manifest:media-type="image/png"/>
  <manifest:file-entry manifest:full-path="Pictures/100000000000006C000000273E1F1C1B.png" manifest:media-type="image/png"/>
  <manifest:file-entry manifest:full-path="Pictures/10000001000001440000013605BF62B9.png" manifest:media-type="image/png"/>
  <manifest:file-entry manifest:full-path="Pictures/10000001000001AA000000F53386F1C7.png" manifest:media-type="image/png"/>
  <manifest:file-entry manifest:full-path="Pictures/100000000000001B0000000E03D4C585.png" manifest:media-type="image/png"/>
  <manifest:file-entry manifest:full-path="Pictures/1000000000000029000000228D358339.png" manifest:media-type="image/png"/>
  <manifest:file-entry manifest:full-path="Pictures/100000000000000D0000000BC2F71D36.png" manifest:media-type="image/png"/>
  <manifest:file-entry manifest:full-path="Pictures/1000000000000018000000130A930745.png" manifest:media-type="image/png"/>
  <manifest:file-entry manifest:full-path="Pictures/1000000000000371000001FFBBE7DAF3.png" manifest:media-type="image/png"/>
  <manifest:file-entry manifest:full-path="Pictures/1000000000000015000000126023418C.png" manifest:media-type="image/png"/>
  <manifest:file-entry manifest:full-path="Pictures/100000000000021D00000235A084615B.png" manifest:media-type="image/png"/>
  <manifest:file-entry manifest:full-path="Pictures/10000001000000490000001396689F9A.png" manifest:media-type="image/png"/>
  <manifest:file-entry manifest:full-path="Pictures/100000010000053D0000024884AE1BD5.png" manifest:media-type="image/png"/>
  <manifest:file-entry manifest:full-path="Pictures/10000001000004FA0000011E50C8F48D.png" manifest:media-type="image/png"/>
  <manifest:file-entry manifest:full-path="Pictures/100000000000072D00000122BB1E4554.png" manifest:media-type="image/png"/>
  <manifest:file-entry manifest:full-path="Pictures/100000000000003E0000002F6AE360E0.png" manifest:media-type="image/png"/>
  <manifest:file-entry manifest:full-path="Pictures/100000010000038400000247B9DB4920.png" manifest:media-type="image/png"/>
  <manifest:file-entry manifest:full-path="Pictures/10000001000000C0000000C489BC8E4C.png" manifest:media-type="image/png"/>
  <manifest:file-entry manifest:full-path="Pictures/1000000000000352000000BC1A7BD7F9.png" manifest:media-type="image/png"/>
  <manifest:file-entry manifest:full-path="Pictures/100000000000035A00000117FC05E829.png" manifest:media-type="image/png"/>
  <manifest:file-entry manifest:full-path="Pictures/10000000000002ED0000013123E5FF5C.png" manifest:media-type="image/png"/>
  <manifest:file-entry manifest:full-path="Pictures/10000000000002F100000135B191ABD9.png" manifest:media-type="image/png"/>
  <manifest:file-entry manifest:full-path="Pictures/100000000000063B000002DECF1C8246.png" manifest:media-type="image/png"/>
  <manifest:file-entry manifest:full-path="Pictures/10000000000002C600000173CF028ECC.png" manifest:media-type="image/png"/>
  <manifest:file-entry manifest:full-path="Pictures/10000000000002EF0000011782CD9228.png" manifest:media-type="image/png"/>
  <manifest:file-entry manifest:full-path="Pictures/100000010000052E000000AD9933D549.png" manifest:media-type="image/png"/>
  <manifest:file-entry manifest:full-path="Pictures/100000010000049500000262E1CE01B6.png" manifest:media-type="image/png"/>
  <manifest:file-entry manifest:full-path="Pictures/100000010000050100000074B868BAEF.png" manifest:media-type="image/png"/>
  <manifest:file-entry manifest:full-path="Pictures/10000001000002CA0000022337227469.png" manifest:media-type="image/png"/>
  <manifest:file-entry manifest:full-path="Pictures/10000000000002FF0000014D68FCE1F4.png" manifest:media-type="image/png"/>
  <manifest:file-entry manifest:full-path="Pictures/100000010000039B0000013307801279.png" manifest:media-type="image/png"/>
  <manifest:file-entry manifest:full-path="Pictures/10000000000002F000000099A00760C2.png" manifest:media-type="image/png"/>
  <manifest:file-entry manifest:full-path="Pictures/100000000000037A000002969CB58240.png" manifest:media-type="image/png"/>
  <manifest:file-entry manifest:full-path="Pictures/100000000000037F0000011AED2B429F.png" manifest:media-type="image/png"/>
  <manifest:file-entry manifest:full-path="Pictures/10000001000005270000012DA7C7F568.png" manifest:media-type="image/png"/>
  <manifest:file-entry manifest:full-path="Pictures/1000000100000497000002624FA18433.png" manifest:media-type="image/png"/>
  <manifest:file-entry manifest:full-path="Pictures/100000000000008E000000CABD6EB5C5.png" manifest:media-type="image/png"/>
  <manifest:file-entry manifest:full-path="Pictures/10000000000001650000003DB63541FE.png" manifest:media-type="image/png"/>
  <manifest:file-entry manifest:full-path="Pictures/20000009000049B20000386F64B83E7D.svm" manifest:media-type="image/x-svm"/>
  <manifest:file-entry manifest:full-path="Pictures/10000000000000AA00000085621A5AE8.png" manifest:media-type="image/png"/>
  <manifest:file-entry manifest:full-path="Pictures/1000000000000018000000104D26F5BE.png" manifest:media-type="image/png"/>
  <manifest:file-entry manifest:full-path="Pictures/100000010000021400000102FE220316.png" manifest:media-type="image/png"/>
  <manifest:file-entry manifest:full-path="Pictures/10000000000004E2000000F7A518086A.png" manifest:media-type="image/png"/>
  <manifest:file-entry manifest:full-path="Pictures/100000000000006B00000027F1CB9633.png" manifest:media-type="image/png"/>
  <manifest:file-entry manifest:full-path="Pictures/10000000000000FB000000FC9CA6EA7B.png" manifest:media-type="image/png"/>
  <manifest:file-entry manifest:full-path="Pictures/100000000000018100000077DA38AD04.png" manifest:media-type="image/png"/>
  <manifest:file-entry manifest:full-path="Pictures/100000000000001300000015B8C51E22.png" manifest:media-type="image/png"/>
  <manifest:file-entry manifest:full-path="Pictures/1000000100000523000001A23F4F38F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6" style:family="table-cell">
      <style:table-cell-properties fo:padding-left="0.132cm" fo:padding-right="0.123cm" fo:padding-top="0cm" fo:padding-bottom="0cm" fo:border="0.5pt solid #00000a"/>
    </style:style>
    <style:style style:name="Tabla2.C6" style:family="table-cell">
      <style:table-cell-properties fo:padding-left="0.132cm" fo:padding-right="0.123cm" fo:padding-top="0cm" fo:padding-bottom="0cm" fo:border="0.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7" style:family="table-cell">
      <style:table-cell-properties fo:padding-left="0.132cm" fo:padding-right="0.123cm" fo:padding-top="0cm" fo:padding-bottom="0cm" fo:border-left="1.5pt solid #00000a" fo:border-right="0.5pt solid #00000a" fo:border-top="none" fo:border-bottom="1.5pt solid #00000a"/>
    </style:style>
    <style:style style:name="Tabla2.B7" style:family="table-cell">
      <style:table-cell-properties fo:padding-left="0.132cm" fo:padding-right="0.123cm" fo:padding-top="0cm" fo:padding-bottom="0cm" fo:border-left="0.5pt solid #00000a" fo:border-right="0.5pt solid #00000a" fo:border-top="none" fo:border-bottom="1.5pt solid #00000a"/>
    </style:style>
    <style:style style:name="Tabla2.C7" style:family="table-cell">
      <style:table-cell-properties fo:padding-left="0.132cm" fo:padding-right="0.123cm" fo:padding-top="0cm" fo:padding-bottom="0cm" fo:border-left="0.5pt solid #00000a" fo:border-right="0.5pt solid #00000a" fo:border-top="none" fo:border-bottom="1.5pt solid #00000a"/>
    </style:style>
    <style:style style:name="Tabla2.D7" style:family="table-cell">
      <style:table-cell-properties fo:padding-left="0.132cm" fo:padding-right="0.123cm" fo:padding-top="0cm" fo:padding-bottom="0cm" fo:border-left="0.5pt solid #00000a" fo:border-right="1.5pt solid #00000a" fo:border-top="none"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officeooo:paragraph-rsid="000e1972"/>
    </style:style>
    <style:style style:name="P3" style:family="paragraph" style:parent-style-name="Footer">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 style:family="paragraph" style:parent-style-name="Standard">
      <style:paragraph-properties fo:margin-top="0cm" fo:margin-bottom="0.212cm" style:contextual-spacing="false" fo:text-align="start" style:justify-single-word="false"/>
      <style:text-properties fo:language="ca" fo:country="ES" officeooo:paragraph-rsid="000e1972"/>
    </style:style>
    <style:style style:name="P7" style:family="paragraph" style:parent-style-name="Standard">
      <style:paragraph-properties fo:text-align="start" style:justify-single-word="false"/>
      <style:text-properties fo:language="ca" fo:country="ES" officeooo:paragraph-rsid="0013ba49"/>
    </style:style>
    <style:style style:name="P8" style:family="paragraph" style:parent-style-name="Standard">
      <style:paragraph-properties fo:text-align="end" style:justify-single-word="false"/>
      <style:text-properties fo:language="ca" fo:country="ES" officeooo:paragraph-rsid="000e1972"/>
    </style:style>
    <style:style style:name="P9" style:family="paragraph" style:parent-style-name="western">
      <style:paragraph-properties fo:text-align="end" style:justify-single-word="false"/>
      <style:text-properties fo:language="ca" fo:country="ES" officeooo:paragraph-rsid="000e1972"/>
    </style:style>
    <style:style style:name="P10" style:family="paragraph" style:parent-style-name="Standard">
      <style:text-properties fo:language="ca" fo:country="ES"/>
    </style:style>
    <style:style style:name="P11" style:family="paragraph" style:parent-style-name="Standard">
      <style:text-properties fo:language="ca" fo:country="ES" officeooo:paragraph-rsid="0013ba49"/>
    </style:style>
    <style:style style:name="P12" style:family="paragraph" style:parent-style-name="Standard">
      <style:text-properties fo:language="ca" fo:country="ES" officeooo:paragraph-rsid="0013d81d"/>
    </style:style>
    <style:style style:name="P13" style:family="paragraph" style:parent-style-name="Standard">
      <style:text-properties fo:language="ca" fo:country="ES" officeooo:rsid="000f0c3e" officeooo:paragraph-rsid="000f0c3e"/>
    </style:style>
    <style:style style:name="P14" style:family="paragraph" style:parent-style-name="Standard">
      <style:text-properties fo:language="ca" fo:country="ES" officeooo:paragraph-rsid="000f0c3e"/>
    </style:style>
    <style:style style:name="P15" style:family="paragraph" style:parent-style-name="Standard">
      <style:paragraph-properties fo:text-align="center" style:justify-single-word="false"/>
      <style:text-properties fo:language="ca" fo:country="ES" officeooo:paragraph-rsid="0013ba49"/>
    </style:style>
    <style:style style:name="P16" style:family="paragraph" style:parent-style-name="Standard">
      <style:text-properties fo:language="ca" fo:country="ES" officeooo:paragraph-rsid="00816345"/>
    </style:style>
    <style:style style:name="P17" style:family="paragraph" style:parent-style-name="Standard">
      <style:text-properties fo:language="ca" fo:country="ES" officeooo:paragraph-rsid="005a35d6"/>
    </style:style>
    <style:style style:name="P18" style:family="paragraph" style:parent-style-name="Standard">
      <style:text-properties fo:language="ca" fo:country="ES" officeooo:rsid="0064c74a" officeooo:paragraph-rsid="0064c74a"/>
    </style:style>
    <style:style style:name="P19" style:family="paragraph" style:parent-style-name="Standard">
      <style:text-properties fo:language="ca" fo:country="ES" officeooo:rsid="0082e781" officeooo:paragraph-rsid="0082e781"/>
    </style:style>
    <style:style style:name="P20" style:family="paragraph" style:parent-style-name="Standard">
      <style:text-properties fo:language="ca" fo:country="ES" fo:font-style="italic" officeooo:rsid="0003b015" officeooo:paragraph-rsid="00ca9b30" style:font-style-asian="italic" style:font-style-complex="italic"/>
    </style:style>
    <style:style style:name="P21" style:family="paragraph" style:parent-style-name="Text_20_body">
      <style:text-properties fo:language="ca" fo:country="ES" officeooo:rsid="004ee612" officeooo:paragraph-rsid="004ee612"/>
    </style:style>
    <style:style style:name="P22" style:family="paragraph" style:parent-style-name="Text_20_body">
      <style:text-properties fo:language="ca" fo:country="ES" officeooo:rsid="008003a5" officeooo:paragraph-rsid="008003a5"/>
    </style:style>
    <style:style style:name="P23"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24" style:family="paragraph" style:parent-style-name="List_20_Paragraph">
      <style:paragraph-properties fo:margin-left="0cm" fo:margin-right="0cm" fo:text-indent="0cm" style:auto-text-indent="false"/>
      <style:text-properties fo:language="ca" fo:country="ES" officeooo:rsid="00dea456" officeooo:paragraph-rsid="00dea456"/>
    </style:style>
    <style:style style:name="P25"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P26" style:family="paragraph" style:parent-style-name="Standard">
      <style:paragraph-properties fo:text-align="center" style:justify-single-word="false" fo:padding="0cm" fo:border="none"/>
      <style:text-properties fo:color="#cc3300" loext:opacity="100%" style:font-name="Calibri" fo:font-size="14pt" fo:language="ca" fo:country="ES" fo:font-weight="bold" officeooo:paragraph-rsid="000e1972" style:font-size-asian="14pt" style:font-weight-asian="bold" style:font-size-complex="14pt" style:font-weight-complex="bold"/>
    </style:style>
    <style:style style:name="P27"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P28" style:family="paragraph" style:parent-style-name="Footer">
      <style:text-properties style:font-name="Calibri" fo:font-size="11pt" fo:language="ca" fo:country="ES" officeooo:paragraph-rsid="000e1972" style:font-size-asian="11pt" style:font-size-complex="11pt"/>
    </style:style>
    <style:style style:name="P29"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P30" style:family="paragraph" style:parent-style-name="Standard">
      <style:text-properties style:font-name="Calibri" fo:language="ca" fo:country="ES" officeooo:paragraph-rsid="0013ba49"/>
    </style:style>
    <style:style style:name="P31" style:family="paragraph" style:parent-style-name="Text_20_body">
      <style:text-properties style:font-name="Calibri" fo:language="ca" fo:country="ES" officeooo:paragraph-rsid="0013ba49"/>
    </style:style>
    <style:style style:name="P32" style:family="paragraph" style:parent-style-name="List_20_Paragraph">
      <style:text-properties style:font-name="Calibri" fo:language="ca" fo:country="ES" officeooo:paragraph-rsid="0013ba49"/>
    </style:style>
    <style:style style:name="P33" style:family="paragraph" style:parent-style-name="Standard">
      <style:text-properties style:font-name="Calibri" fo:language="ca" fo:country="ES" fo:font-weight="bold" officeooo:paragraph-rsid="0013ba49" style:font-weight-asian="bold"/>
    </style:style>
    <style:style style:name="P34" style:family="paragraph" style:parent-style-name="List_20_Paragraph">
      <style:text-properties style:font-name="Calibri" fo:language="ca" fo:country="ES" fo:font-weight="bold" officeooo:paragraph-rsid="0013ba49" style:font-weight-asian="bold"/>
    </style:style>
    <style:style style:name="P35" style:family="paragraph" style:parent-style-name="Standard">
      <style:paragraph-properties fo:margin-left="0.635cm" fo:margin-right="0cm" fo:text-indent="0cm" style:auto-text-indent="false"/>
      <style:text-properties style:font-name="Calibri" fo:language="ca" fo:country="ES" fo:font-weight="bold" officeooo:paragraph-rsid="0013d81d" style:font-weight-asian="bold"/>
    </style:style>
    <style:style style:name="P36"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font-weight-complex="bold"/>
    </style:style>
    <style:style style:name="P37"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style>
    <style:style style:name="P38" style:family="paragraph" style:parent-style-name="List_20_Paragraph">
      <style:text-properties style:font-name="Calibri" fo:language="ca" fo:country="ES" fo:font-weight="bold" officeooo:rsid="0079b5ac" officeooo:paragraph-rsid="0079b5ac" style:font-weight-asian="bold"/>
    </style:style>
    <style:style style:name="P39" style:family="paragraph" style:parent-style-name="Standard">
      <style:paragraph-properties fo:text-align="start" style:justify-single-word="false"/>
      <style:text-properties style:font-name="Calibri" fo:language="ca" fo:country="ES" officeooo:paragraph-rsid="0013ba49"/>
    </style:style>
    <style:style style:name="P40" style:family="paragraph" style:parent-style-name="Standard">
      <style:text-properties style:font-name="Calibri" fo:language="ca" fo:country="ES" officeooo:paragraph-rsid="0013d81d"/>
    </style:style>
    <style:style style:name="P41" style:family="paragraph" style:parent-style-name="List_20_Paragraph">
      <style:text-properties style:font-name="Calibri" fo:language="ca" fo:country="ES" officeooo:paragraph-rsid="0013d81d"/>
    </style:style>
    <style:style style:name="P42" style:family="paragraph" style:parent-style-name="List_20_Paragraph">
      <style:paragraph-properties fo:margin-left="0cm" fo:margin-right="0cm" fo:text-indent="0cm" style:auto-text-indent="false"/>
      <style:text-properties style:font-name="Calibri" fo:language="ca" fo:country="ES" officeooo:paragraph-rsid="0013d81d"/>
    </style:style>
    <style:style style:name="P43" style:family="paragraph" style:parent-style-name="Standard">
      <style:text-properties style:font-name="Calibri" fo:language="ca" fo:country="ES" officeooo:paragraph-rsid="0044a5d3"/>
    </style:style>
    <style:style style:name="P44" style:family="paragraph" style:parent-style-name="Standard">
      <style:text-properties style:font-name="Calibri" fo:language="ca" fo:country="ES" officeooo:paragraph-rsid="004acf98"/>
    </style:style>
    <style:style style:name="P45" style:family="paragraph" style:parent-style-name="Standard">
      <style:text-properties style:font-name="Calibri" fo:language="ca" fo:country="ES" officeooo:rsid="004acf98" officeooo:paragraph-rsid="004acf98"/>
    </style:style>
    <style:style style:name="P46" style:family="paragraph" style:parent-style-name="Standard">
      <style:paragraph-properties fo:text-align="center" style:justify-single-word="false"/>
      <style:text-properties style:font-name="Calibri" fo:language="ca" fo:country="ES" officeooo:rsid="004acf98" officeooo:paragraph-rsid="004acf98"/>
    </style:style>
    <style:style style:name="P47" style:family="paragraph" style:parent-style-name="Standard">
      <style:text-properties style:font-name="Calibri" fo:language="ca" fo:country="ES" officeooo:paragraph-rsid="004d4998"/>
    </style:style>
    <style:style style:name="P48" style:family="paragraph" style:parent-style-name="Standard">
      <style:text-properties style:font-name="Calibri" fo:language="ca" fo:country="ES" officeooo:rsid="004d4998" officeooo:paragraph-rsid="004d4998"/>
    </style:style>
    <style:style style:name="P49" style:family="paragraph" style:parent-style-name="Standard">
      <style:text-properties style:font-name="Calibri" fo:language="ca" fo:country="ES" officeooo:rsid="004d4998" officeooo:paragraph-rsid="004f05d5"/>
    </style:style>
    <style:style style:name="P50" style:family="paragraph" style:parent-style-name="Standard">
      <style:text-properties style:font-name="Calibri" fo:language="ca" fo:country="ES" officeooo:rsid="004ee612" officeooo:paragraph-rsid="004ee612"/>
    </style:style>
    <style:style style:name="P51" style:family="paragraph" style:parent-style-name="Text_20_body">
      <style:text-properties style:font-name="Calibri" fo:language="ca" fo:country="ES" officeooo:rsid="004ee612" officeooo:paragraph-rsid="004ee612"/>
    </style:style>
    <style:style style:name="P52" style:family="paragraph" style:parent-style-name="Standard">
      <style:text-properties style:font-name="Calibri" fo:language="ca" fo:country="ES" officeooo:rsid="004f05d5" officeooo:paragraph-rsid="004f05d5"/>
    </style:style>
    <style:style style:name="P53" style:family="paragraph" style:parent-style-name="Standard">
      <style:text-properties style:font-name="Calibri" fo:language="ca" fo:country="ES" officeooo:rsid="001ca2a7" officeooo:paragraph-rsid="0064c74a"/>
    </style:style>
    <style:style style:name="P54" style:family="paragraph" style:parent-style-name="Standard">
      <style:text-properties style:font-name="Calibri" fo:language="ca" fo:country="ES" officeooo:rsid="001ca2a7" officeooo:paragraph-rsid="000f0c3e"/>
    </style:style>
    <style:style style:name="P55" style:family="paragraph" style:parent-style-name="Standard">
      <style:text-properties style:font-name="Calibri" fo:language="ca" fo:country="ES" officeooo:paragraph-rsid="007fabbe"/>
    </style:style>
    <style:style style:name="P56" style:family="paragraph" style:parent-style-name="Standard">
      <style:text-properties style:font-name="Calibri" fo:language="ca" fo:country="ES" officeooo:rsid="007fabbe" officeooo:paragraph-rsid="007fabbe"/>
    </style:style>
    <style:style style:name="P57" style:family="paragraph" style:parent-style-name="Standard">
      <style:text-properties style:font-name="Calibri" fo:language="ca" fo:country="ES" officeooo:paragraph-rsid="00816345"/>
    </style:style>
    <style:style style:name="P58" style:family="paragraph" style:parent-style-name="Standard">
      <style:text-properties style:font-name="Calibri" fo:language="ca" fo:country="ES" officeooo:paragraph-rsid="00761f76"/>
    </style:style>
    <style:style style:name="P59" style:family="paragraph" style:parent-style-name="Standard">
      <style:text-properties style:font-name="Calibri" fo:language="ca" fo:country="ES" officeooo:rsid="006ab4d4" officeooo:paragraph-rsid="006ab4d4"/>
    </style:style>
    <style:style style:name="P60" style:family="paragraph" style:parent-style-name="fig.">
      <style:text-properties style:font-name="Calibri" fo:language="ca" fo:country="ES" officeooo:rsid="006ab4d4" officeooo:paragraph-rsid="00a259c5"/>
    </style:style>
    <style:style style:name="P61" style:family="paragraph" style:parent-style-name="Standard">
      <style:text-properties style:font-name="Calibri" fo:language="ca" fo:country="ES" officeooo:rsid="00a6de51" officeooo:paragraph-rsid="0013ba49"/>
    </style:style>
    <style:style style:name="P62" style:family="paragraph" style:parent-style-name="Standard">
      <style:text-properties style:font-name="Calibri" fo:language="ca" fo:country="ES" officeooo:rsid="00ac4d60" officeooo:paragraph-rsid="00ac4d60"/>
    </style:style>
    <style:style style:name="P63" style:family="paragraph" style:parent-style-name="Standard">
      <style:text-properties style:font-name="Calibri" fo:language="ca" fo:country="ES" officeooo:rsid="00761f76" officeooo:paragraph-rsid="00761f76"/>
    </style:style>
    <style:style style:name="P64"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65" style:family="paragraph" style:parent-style-name="Text_20_body">
      <style:text-properties style:font-name="Calibri" fo:language="ca" fo:country="ES" officeooo:rsid="00db1be8" officeooo:paragraph-rsid="00dc2365"/>
    </style:style>
    <style:style style:name="P66" style:family="paragraph" style:parent-style-name="Text_20_body">
      <style:text-properties style:font-name="Calibri" fo:language="ca" fo:country="ES" officeooo:rsid="00db1be8" officeooo:paragraph-rsid="00db1be8"/>
    </style:style>
    <style:style style:name="P67" style:family="paragraph" style:parent-style-name="List_20_Paragraph">
      <style:text-properties style:font-name="Calibri" fo:language="ca" fo:country="ES" fo:font-weight="normal" officeooo:rsid="0078f164" officeooo:paragraph-rsid="0078f164" style:font-weight-asian="normal" style:font-weight-complex="normal"/>
    </style:style>
    <style:style style:name="P68" style:family="paragraph" style:parent-style-name="List_20_Paragraph">
      <style:text-properties style:font-name="Calibri" fo:language="ca" fo:country="ES" fo:font-weight="normal" officeooo:rsid="0078f164" officeooo:paragraph-rsid="0013ba49" style:font-weight-asian="normal" style:font-weight-complex="normal"/>
    </style:style>
    <style:style style:name="P69" style:family="paragraph" style:parent-style-name="List_20_Paragraph">
      <style:text-properties style:font-name="Calibri" fo:language="ca" fo:country="ES" fo:font-weight="normal" officeooo:rsid="0079b5ac" officeooo:paragraph-rsid="0079b5ac" style:font-weight-asian="normal" style:font-weight-complex="normal"/>
    </style:style>
    <style:style style:name="P70" style:family="paragraph" style:parent-style-name="Standard">
      <style:text-properties style:font-name="Calibri" fo:font-size="10pt" fo:language="ca" fo:country="ES" officeooo:rsid="006c9dc2" officeooo:paragraph-rsid="006c9dc2" style:font-size-asian="10.5pt"/>
    </style:style>
    <style:style style:name="P71" style:family="paragraph" style:parent-style-name="Standard">
      <style:text-properties style:font-name="Calibri" fo:font-size="10pt" fo:language="ca" fo:country="ES" officeooo:rsid="00816345" officeooo:paragraph-rsid="00816345" style:font-size-asian="10.5pt"/>
    </style:style>
    <style:style style:name="P72" style:family="paragraph" style:parent-style-name="Standard">
      <style:text-properties style:font-name="Calibri" fo:font-size="10pt" fo:language="ca" fo:country="ES" officeooo:paragraph-rsid="0082e781" style:font-size-asian="10.5pt"/>
    </style:style>
    <style:style style:name="P73"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589ea1" officeooo:paragraph-rsid="00589ea1" style:font-size-asian="10.5pt" style:font-name-complex="Arial Narrow1"/>
    </style:style>
    <style:style style:name="P74"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e9aff6" officeooo:paragraph-rsid="00e9aff6" style:font-size-asian="10.5pt" style:font-name-complex="Arial Narrow1"/>
    </style:style>
    <style:style style:name="P75" style:family="paragraph" style:parent-style-name="Standard">
      <style:text-properties style:font-name="Calibri" fo:font-size="10pt" fo:language="ca" fo:country="ES" fo:font-style="normal" officeooo:rsid="006c9dc2" officeooo:paragraph-rsid="006c9dc2" style:font-size-asian="10.5pt" style:font-style-asian="normal" style:font-style-complex="normal"/>
    </style:style>
    <style:style style:name="P76" style:family="paragraph" style:parent-style-name="Standard">
      <style:paragraph-properties fo:text-align="center" style:justify-single-word="false"/>
      <style:text-properties fo:color="#ff7f00" loext:opacity="100%" style:font-name="Calibri1" fo:language="ca" fo:country="ES" fo:font-weight="bold" officeooo:rsid="000f0c3e" officeooo:paragraph-rsid="000f0c3e" style:font-weight-asian="bold" style:font-weight-complex="bold"/>
    </style:style>
    <style:style style:name="P77" style:family="paragraph" style:parent-style-name="Standard">
      <style:text-properties officeooo:paragraph-rsid="0064c74a"/>
    </style:style>
    <style:style style:name="P78" style:family="paragraph" style:parent-style-name="Standard">
      <style:text-properties officeooo:paragraph-rsid="000f0c3e"/>
    </style:style>
    <style:style style:name="P79" style:family="paragraph" style:parent-style-name="Standard">
      <style:text-properties style:font-name="Calibri1" officeooo:paragraph-rsid="0064c74a"/>
    </style:style>
    <style:style style:name="P80" style:family="paragraph" style:parent-style-name="Standard">
      <style:text-properties style:font-name="Calibri1" officeooo:rsid="00673e05" officeooo:paragraph-rsid="00673e05"/>
    </style:style>
    <style:style style:name="P81" style:family="paragraph" style:parent-style-name="Standard">
      <style:text-properties style:font-name="Calibri1" fo:language="ca" fo:country="ES" officeooo:paragraph-rsid="00109022"/>
    </style:style>
    <style:style style:name="P82" style:family="paragraph" style:parent-style-name="Standard">
      <style:text-properties style:font-name="Calibri1" fo:language="ca" fo:country="ES" officeooo:rsid="0068a48a" officeooo:paragraph-rsid="00109022"/>
    </style:style>
    <style:style style:name="P83" style:family="paragraph" style:parent-style-name="Standard">
      <style:text-properties style:font-name="Calibri1" fo:language="ca" fo:country="ES" officeooo:rsid="00673e05" officeooo:paragraph-rsid="006c9dc2"/>
    </style:style>
    <style:style style:name="P84" style:family="paragraph" style:parent-style-name="Standard">
      <style:paragraph-properties fo:margin-left="0cm" fo:margin-right="0cm" fo:text-indent="0cm" style:auto-text-indent="false"/>
      <style:text-properties style:font-name="Calibri1" fo:language="ca" fo:country="ES" fo:font-style="italic" officeooo:rsid="0001aa8a" officeooo:paragraph-rsid="00c03633" style:font-style-asian="italic" style:font-style-complex="italic"/>
    </style:style>
    <style:style style:name="P85" style:family="paragraph" style:parent-style-name="Standard">
      <style:text-properties style:font-name="Calibri1" officeooo:paragraph-rsid="00bdf4f3"/>
    </style:style>
    <style:style style:name="P86" style:family="paragraph" style:parent-style-name="Standard">
      <style:text-properties officeooo:paragraph-rsid="00109022"/>
    </style:style>
    <style:style style:name="P87" style:family="paragraph" style:parent-style-name="Standard">
      <style:text-properties officeooo:paragraph-rsid="0013ba49"/>
    </style:style>
    <style:style style:name="P88" style:family="paragraph" style:parent-style-name="Standard">
      <style:text-properties officeooo:paragraph-rsid="006c9dc2"/>
    </style:style>
    <style:style style:name="P89" style:family="paragraph" style:parent-style-name="Standard">
      <style:text-properties officeooo:paragraph-rsid="0013d81d"/>
    </style:style>
    <style:style style:name="P90" style:family="paragraph" style:parent-style-name="Standard">
      <style:text-properties officeooo:paragraph-rsid="0044a5d3"/>
    </style:style>
    <style:style style:name="P91" style:family="paragraph" style:parent-style-name="Standard">
      <style:text-properties officeooo:paragraph-rsid="00805191"/>
    </style:style>
    <style:style style:name="P92"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93" style:family="paragraph" style:parent-style-name="Standard">
      <style:text-properties officeooo:paragraph-rsid="00761f76"/>
    </style:style>
    <style:style style:name="P94" style:family="paragraph" style:parent-style-name="Standard">
      <style:text-properties officeooo:paragraph-rsid="006ab4d4"/>
    </style:style>
    <style:style style:name="P95" style:family="paragraph" style:parent-style-name="fig.">
      <style:text-properties officeooo:paragraph-rsid="00c03633"/>
    </style:style>
    <style:style style:name="P96" style:family="paragraph" style:parent-style-name="Standard">
      <style:text-properties officeooo:paragraph-rsid="00bdf4f3"/>
    </style:style>
    <style:style style:name="P97" style:family="paragraph" style:parent-style-name="Párrafo_20_de_20_lista">
      <style:text-properties officeooo:paragraph-rsid="00bdf4f3"/>
    </style:style>
    <style:style style:name="P9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9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0e1972" style:font-name-complex="Arial Narrow1"/>
    </style:style>
    <style:style style:name="P100"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101"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102"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103"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104"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105" style:family="paragraph" style:parent-style-name="western">
      <style:paragraph-properties fo:text-align="end" style:justify-single-word="false"/>
      <style:text-properties officeooo:paragraph-rsid="000e1972"/>
    </style:style>
    <style:style style:name="P106" style:family="paragraph" style:parent-style-name="Text_20_body">
      <style:text-properties officeooo:paragraph-rsid="006a329e"/>
    </style:style>
    <style:style style:name="P107" style:family="paragraph" style:parent-style-name="Text_20_body">
      <style:text-properties officeooo:rsid="00701e12" officeooo:paragraph-rsid="00701e12"/>
    </style:style>
    <style:style style:name="P108" style:family="paragraph" style:parent-style-name="Text_20_body">
      <style:text-properties officeooo:rsid="0071f004" officeooo:paragraph-rsid="0071f004"/>
    </style:style>
    <style:style style:name="P109" style:family="paragraph" style:parent-style-name="Text_20_body">
      <style:text-properties fo:font-weight="bold" officeooo:rsid="00ba10c4" officeooo:paragraph-rsid="00bab267" style:font-weight-asian="bold" style:font-weight-complex="bold"/>
    </style:style>
    <style:style style:name="P110" style:family="paragraph" style:parent-style-name="Text_20_body">
      <style:text-properties fo:font-weight="normal" officeooo:rsid="0071f004" officeooo:paragraph-rsid="0071f004" style:font-weight-asian="normal" style:font-weight-complex="normal"/>
    </style:style>
    <style:style style:name="P111" style:family="paragraph" style:parent-style-name="Text_20_body">
      <style:paragraph-properties fo:break-before="page"/>
      <style:text-properties fo:font-weight="normal" officeooo:rsid="00985b9b" officeooo:paragraph-rsid="00bab267" style:font-weight-asian="normal" style:font-weight-complex="normal"/>
    </style:style>
    <style:style style:name="P112" style:family="paragraph" style:parent-style-name="Text_20_body">
      <style:text-properties officeooo:rsid="00b713ea" officeooo:paragraph-rsid="00b713ea"/>
    </style:style>
    <style:style style:name="P113" style:family="paragraph" style:parent-style-name="Text_20_body">
      <style:text-properties officeooo:rsid="00ba10c4" officeooo:paragraph-rsid="00ba10c4"/>
    </style:style>
    <style:style style:name="P114" style:family="paragraph" style:parent-style-name="Text_20_body">
      <style:text-properties officeooo:rsid="00ba10c4" officeooo:paragraph-rsid="00bab267"/>
    </style:style>
    <style:style style:name="P115" style:family="paragraph" style:parent-style-name="Text_20_body">
      <style:text-properties officeooo:rsid="00bab267" officeooo:paragraph-rsid="00bab267"/>
    </style:style>
    <style:style style:name="P116" style:family="paragraph" style:parent-style-name="fig.">
      <style:text-properties officeooo:paragraph-rsid="00a259c5"/>
    </style:style>
    <style:style style:name="P117" style:family="paragraph" style:parent-style-name="fig.">
      <style:text-properties officeooo:paragraph-rsid="00a617f4"/>
    </style:style>
    <style:style style:name="P118" style:family="paragraph" style:parent-style-name="fig.">
      <style:text-properties officeooo:paragraph-rsid="00d70df8"/>
    </style:style>
    <style:style style:name="P119" style:family="paragraph" style:parent-style-name="fig.">
      <style:text-properties officeooo:paragraph-rsid="00da28b0"/>
    </style:style>
    <style:style style:name="P120" style:family="paragraph" style:parent-style-name="fig.">
      <style:text-properties officeooo:paragraph-rsid="00da28b0" text:display="none"/>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7cm" style:type="right" style:leader-style="dotted" style:leader-text="."/>
        </style:tab-stops>
      </style:paragraph-properties>
    </style:style>
    <style:style style:name="P123" style:family="paragraph" style:parent-style-name="Contents_20_3">
      <style:paragraph-properties>
        <style:tab-stops>
          <style:tab-stop style:position="17cm" style:type="right" style:leader-style="dotted" style:leader-text="."/>
        </style:tab-stops>
      </style:paragraph-properties>
    </style:style>
    <style:style style:name="P124" style:family="paragraph" style:parent-style-name="Contents_20_4">
      <style:paragraph-properties>
        <style:tab-stops>
          <style:tab-stop style:position="17cm" style:type="right" style:leader-style="dotted" style:leader-text="."/>
        </style:tab-stops>
      </style:paragraph-properties>
    </style:style>
    <style:style style:name="P125" style:family="paragraph" style:parent-style-name="Contents_20_5">
      <style:paragraph-properties>
        <style:tab-stops>
          <style:tab-stop style:position="17cm" style:type="right" style:leader-style="dotted" style:leader-text="."/>
        </style:tab-stops>
      </style:paragraph-properties>
    </style:style>
    <style:style style:name="P126" style:family="paragraph" style:parent-style-name="Contents_20_6">
      <style:paragraph-properties>
        <style:tab-stops>
          <style:tab-stop style:position="17cm" style:type="right" style:leader-style="dotted" style:leader-text="."/>
        </style:tab-stops>
      </style:paragraph-properties>
    </style:style>
    <style:style style:name="P127"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28" style:family="paragraph" style:parent-style-name="Heading_20_1">
      <style:paragraph-properties fo:break-before="page"/>
    </style:style>
    <style:style style:name="P129" style:family="paragraph" style:parent-style-name="Heading_20_1">
      <style:text-properties officeooo:rsid="006c9dc2" officeooo:paragraph-rsid="006c9dc2"/>
    </style:style>
    <style:style style:name="P130" style:family="paragraph" style:parent-style-name="Heading_20_2">
      <style:text-properties officeooo:rsid="006c9dc2" officeooo:paragraph-rsid="006c9dc2"/>
    </style:style>
    <style:style style:name="P131" style:family="paragraph" style:parent-style-name="Heading_20_3">
      <style:text-properties fo:language="ca" fo:country="ES" officeooo:rsid="0049fd87" officeooo:paragraph-rsid="004f6677"/>
    </style:style>
    <style:style style:name="P132" style:family="paragraph" style:parent-style-name="Heading_20_3">
      <style:text-properties fo:language="ca" fo:country="ES"/>
    </style:style>
    <style:style style:name="P133" style:family="paragraph" style:parent-style-name="Heading_20_4">
      <style:text-properties fo:language="ca" fo:country="ES" officeooo:rsid="0013d81d" officeooo:paragraph-rsid="0013d81d"/>
    </style:style>
    <style:style style:name="P134" style:family="paragraph" style:parent-style-name="Heading_20_4">
      <style:text-properties fo:language="ca" fo:country="ES" officeooo:rsid="0049fd87" officeooo:paragraph-rsid="0049fd87"/>
    </style:style>
    <style:style style:name="P135" style:family="paragraph" style:parent-style-name="Heading_20_4">
      <style:text-properties style:font-name="Calibri" fo:language="ca" fo:country="ES" officeooo:rsid="0013d81d" officeooo:paragraph-rsid="00db1be8"/>
    </style:style>
    <style:style style:name="P136" style:family="paragraph" style:parent-style-name="Heading_20_4">
      <style:text-properties style:font-name="Calibri" fo:language="ca" fo:country="ES" officeooo:rsid="0049fd87" officeooo:paragraph-rsid="004ee612"/>
    </style:style>
    <style:style style:name="P137" style:family="paragraph" style:parent-style-name="List_20_Paragraph" style:list-style-name="WWNum2">
      <style:text-properties officeooo:paragraph-rsid="0013ba49"/>
    </style:style>
    <style:style style:name="P138" style:family="paragraph" style:parent-style-name="List_20_Paragraph" style:list-style-name="WWNum2">
      <style:text-properties officeooo:paragraph-rsid="00a259c5"/>
    </style:style>
    <style:style style:name="P139" style:family="paragraph" style:parent-style-name="List_20_Paragraph" style:list-style-name="WWNum2">
      <style:text-properties officeooo:paragraph-rsid="00466cd1"/>
    </style:style>
    <style:style style:name="P140" style:family="paragraph" style:parent-style-name="List_20_Paragraph" style:list-style-name="WWNum2">
      <style:text-properties officeooo:rsid="00761f76" officeooo:paragraph-rsid="00761f76"/>
    </style:style>
    <style:style style:name="P141" style:family="paragraph" style:parent-style-name="List_20_Paragraph" style:list-style-name="L1">
      <style:text-properties officeooo:paragraph-rsid="00a259c5"/>
    </style:style>
    <style:style style:name="P142" style:family="paragraph" style:parent-style-name="List_20_Paragraph" style:list-style-name="WWNum2">
      <style:text-properties fo:language="ca" fo:country="ES" officeooo:paragraph-rsid="00466cd1"/>
    </style:style>
    <style:style style:name="P143" style:family="paragraph" style:parent-style-name="List_20_Paragraph" style:list-style-name="WWNum2">
      <style:text-properties fo:language="ca" fo:country="ES" officeooo:paragraph-rsid="0013ba49"/>
    </style:style>
    <style:style style:name="P144" style:family="paragraph" style:parent-style-name="List_20_Paragraph" style:list-style-name="WWNum2">
      <style:text-properties fo:language="ca" fo:country="ES" officeooo:rsid="0079b5ac" officeooo:paragraph-rsid="0079b5ac"/>
    </style:style>
    <style:style style:name="P145" style:family="paragraph" style:parent-style-name="List_20_Paragraph" style:list-style-name="WWNum4">
      <style:text-properties fo:language="ca" fo:country="ES" officeooo:paragraph-rsid="0013ba49"/>
    </style:style>
    <style:style style:name="P146" style:family="paragraph" style:parent-style-name="List_20_Paragraph" style:list-style-name="WWNum4">
      <style:text-properties fo:language="ca" fo:country="ES" officeooo:paragraph-rsid="0044a5d3"/>
    </style:style>
    <style:style style:name="P147"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148" style:family="paragraph" style:parent-style-name="List_20_Paragraph" style:list-style-name="WWNum8">
      <style:text-properties fo:language="ca" fo:country="ES" fo:font-weight="bold" officeooo:rsid="00de9262" officeooo:paragraph-rsid="00de9262" style:font-weight-asian="bold" style:font-weight-complex="bold"/>
    </style:style>
    <style:style style:name="P149"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150" style:family="paragraph" style:parent-style-name="List_20_Paragraph" style:list-style-name="WWNum8">
      <style:text-properties fo:language="ca" fo:country="ES" fo:font-weight="bold" officeooo:rsid="00dea456" officeooo:paragraph-rsid="00dea456" style:font-weight-asian="bold" style:font-weight-complex="bold"/>
    </style:style>
    <style:style style:name="P151" style:family="paragraph" style:parent-style-name="List_20_Paragraph" style:list-style-name="WWNum8">
      <style:text-properties fo:language="ca" fo:country="ES" fo:font-weight="bold" officeooo:rsid="00dea456" officeooo:paragraph-rsid="00de9262" style:font-weight-asian="bold" style:font-weight-complex="bold"/>
    </style:style>
    <style:style style:name="P152" style:family="paragraph" style:parent-style-name="List_20_Paragraph" style:list-style-name="WWNum8">
      <style:text-properties fo:language="ca" fo:country="ES" fo:font-weight="bold" officeooo:rsid="00fa3763" officeooo:paragraph-rsid="00fa3763" style:font-weight-asian="bold" style:font-weight-complex="bold"/>
    </style:style>
    <style:style style:name="P153" style:family="paragraph" style:parent-style-name="List_20_Paragraph" style:list-style-name="WWNum5">
      <style:text-properties fo:language="ca" fo:country="ES" officeooo:rsid="00f6f02a" officeooo:paragraph-rsid="00f9241f"/>
    </style:style>
    <style:style style:name="P154" style:family="paragraph" style:parent-style-name="List_20_Paragraph" style:list-style-name="WWNum5">
      <style:text-properties fo:language="ca" fo:country="ES" officeooo:paragraph-rsid="0013ba49"/>
    </style:style>
    <style:style style:name="P155" style:family="paragraph" style:parent-style-name="List_20_Paragraph" style:list-style-name="WWNum6">
      <style:text-properties fo:language="ca" fo:country="ES" officeooo:rsid="00f49f93" officeooo:paragraph-rsid="00f49f93"/>
    </style:style>
    <style:style style:name="P156" style:family="paragraph" style:parent-style-name="List_20_Paragraph" style:list-style-name="WWNum6">
      <style:text-properties fo:language="ca" fo:country="ES" officeooo:rsid="00f50c7a" officeooo:paragraph-rsid="00f50c7a"/>
    </style:style>
    <style:style style:name="P157" style:family="paragraph" style:parent-style-name="List_20_Paragraph" style:list-style-name="WWNum6">
      <style:text-properties fo:language="ca" fo:country="ES" officeooo:paragraph-rsid="0013ba49"/>
    </style:style>
    <style:style style:name="P158" style:family="paragraph" style:parent-style-name="List_20_Paragraph" style:list-style-name="WWNum6">
      <style:text-properties fo:language="ca" fo:country="ES" officeooo:paragraph-rsid="00f49f93"/>
    </style:style>
    <style:style style:name="P159" style:family="paragraph" style:parent-style-name="List_20_Paragraph" style:list-style-name="WWNum7">
      <style:text-properties fo:language="ca" fo:country="ES" officeooo:paragraph-rsid="0013ba49"/>
    </style:style>
    <style:style style:name="P160" style:family="paragraph" style:parent-style-name="List_20_Paragraph" style:list-style-name="WWNum7">
      <style:text-properties fo:language="ca" fo:country="ES" officeooo:paragraph-rsid="0044a5d3"/>
    </style:style>
    <style:style style:name="P161" style:family="paragraph" style:parent-style-name="List_20_Paragraph" style:list-style-name="WWNum8">
      <style:text-properties fo:language="ca" fo:country="ES" officeooo:paragraph-rsid="0013d81d"/>
    </style:style>
    <style:style style:name="P162" style:family="paragraph" style:parent-style-name="List_20_Paragraph" style:list-style-name="WWNum9">
      <style:text-properties fo:language="ca" fo:country="ES" officeooo:paragraph-rsid="0013d81d"/>
    </style:style>
    <style:style style:name="P163" style:family="paragraph" style:parent-style-name="List_20_Paragraph" style:list-style-name="WWNum2">
      <style:text-properties style:font-name="Calibri" fo:language="ca" fo:country="ES" fo:font-weight="normal" officeooo:rsid="0079b5ac" officeooo:paragraph-rsid="0079b5ac" style:font-weight-asian="normal" style:font-weight-complex="normal"/>
    </style:style>
    <style:style style:name="P164" style:family="paragraph" style:parent-style-name="List_20_Paragraph" style:list-style-name="WWNum3">
      <style:text-properties style:font-name="Calibri" fo:language="ca" fo:country="ES" fo:font-weight="normal" officeooo:rsid="00484b61" officeooo:paragraph-rsid="00edb6ff" style:font-weight-asian="normal" style:font-weight-complex="normal"/>
    </style:style>
    <style:style style:name="P165" style:family="paragraph" style:parent-style-name="List_20_Paragraph" style:list-style-name="L3">
      <style:text-properties style:font-name="Calibri" fo:language="ca" fo:country="ES" fo:font-weight="normal" officeooo:rsid="0077d900" officeooo:paragraph-rsid="00edb6ff" style:font-weight-asian="normal" style:font-weight-complex="normal"/>
    </style:style>
    <style:style style:name="P166" style:family="paragraph" style:parent-style-name="List_20_Paragraph" style:list-style-name="L3">
      <style:text-properties style:font-name="Calibri" fo:language="ca" fo:country="ES" fo:font-weight="normal" officeooo:rsid="00780e29" officeooo:paragraph-rsid="00edb6ff" style:font-weight-asian="normal" style:font-weight-complex="normal"/>
    </style:style>
    <style:style style:name="P167" style:family="paragraph" style:parent-style-name="List_20_Paragraph" style:list-style-name="L3">
      <style:text-properties style:font-name="Calibri" fo:language="ca" fo:country="ES" fo:font-weight="bold" officeooo:rsid="00b24c63" officeooo:paragraph-rsid="00edb6ff" style:font-weight-asian="bold" style:font-weight-complex="bold"/>
    </style:style>
    <style:style style:name="P168" style:family="paragraph" style:parent-style-name="List_20_Paragraph" style:list-style-name="WWNum6">
      <style:text-properties style:font-name="Calibri" fo:language="ca" fo:country="ES" fo:font-weight="bold" officeooo:paragraph-rsid="0013ba49" style:font-weight-asian="bold"/>
    </style:style>
    <style:style style:name="P169" style:family="paragraph" style:parent-style-name="List_20_Paragraph" style:list-style-name="L4">
      <style:text-properties style:font-name="Calibri" fo:font-size="10pt" fo:language="ca" fo:country="ES" fo:font-weight="bold" officeooo:rsid="00dea456" officeooo:paragraph-rsid="00dea456" style:font-size-asian="8.75pt" style:font-weight-asian="bold" style:font-size-complex="10pt" style:font-weight-complex="bold"/>
    </style:style>
    <style:style style:name="P170" style:family="paragraph" style:parent-style-name="List_20_Paragraph" style:list-style-name="WWNum3">
      <style:text-properties officeooo:paragraph-rsid="00b24c63"/>
    </style:style>
    <style:style style:name="P171" style:family="paragraph" style:parent-style-name="List_20_Paragraph" style:list-style-name="WWNum3">
      <style:text-properties officeooo:paragraph-rsid="00edb6ff"/>
    </style:style>
    <style:style style:name="P172" style:family="paragraph" style:parent-style-name="List_20_Paragraph" style:list-style-name="WWNum3">
      <style:text-properties officeooo:rsid="0077d900" officeooo:paragraph-rsid="0077d900"/>
    </style:style>
    <style:style style:name="P173" style:family="paragraph" style:parent-style-name="List_20_Paragraph" style:list-style-name="WWNum3">
      <style:text-properties fo:font-weight="bold" officeooo:rsid="0077d900" officeooo:paragraph-rsid="0077d900" style:font-weight-asian="bold" style:font-weight-complex="bold"/>
    </style:style>
    <style:style style:name="P174" style:family="paragraph" style:parent-style-name="List_20_Paragraph" style:list-style-name="L3">
      <style:text-properties fo:font-weight="bold" officeooo:rsid="0077d900" officeooo:paragraph-rsid="00edb6ff" style:font-weight-asian="bold" style:font-weight-complex="bold"/>
    </style:style>
    <style:style style:name="P175" style:family="paragraph" style:parent-style-name="List_20_Paragraph" style:list-style-name="L3">
      <style:text-properties fo:font-weight="bold" officeooo:rsid="00ef392c" officeooo:paragraph-rsid="00ef392c" style:font-weight-asian="bold" style:font-weight-complex="bold"/>
    </style:style>
    <style:style style:name="P176" style:family="paragraph" style:parent-style-name="List_20_Paragraph" style:list-style-name="WWNum3">
      <style:text-properties officeooo:rsid="00b24c63" officeooo:paragraph-rsid="00edb6ff"/>
    </style:style>
    <style:style style:name="P177" style:family="paragraph" style:parent-style-name="List_20_Paragraph" style:list-style-name="L2">
      <style:text-properties officeooo:paragraph-rsid="00edb6ff"/>
    </style:style>
    <style:style style:name="P178" style:family="paragraph" style:parent-style-name="List_20_Paragraph" style:list-style-name="L3">
      <style:text-properties officeooo:paragraph-rsid="00edb6ff"/>
    </style:style>
    <style:style style:name="P179" style:family="paragraph" style:parent-style-name="List_20_Paragraph" style:list-style-name="L3">
      <style:text-properties officeooo:rsid="00ef392c" officeooo:paragraph-rsid="00ef392c"/>
    </style:style>
    <style:style style:name="P180" style:family="paragraph" style:parent-style-name="List_20_Paragraph" style:list-style-name="WWNum4">
      <style:text-properties officeooo:paragraph-rsid="0013ba49"/>
    </style:style>
    <style:style style:name="P181" style:family="paragraph" style:parent-style-name="List_20_Paragraph" style:list-style-name="L4">
      <style:text-properties fo:font-size="10pt" fo:language="ca" fo:country="ES" officeooo:rsid="00dea456" officeooo:paragraph-rsid="00dea456" style:font-size-asian="8.75pt" style:font-size-complex="10pt"/>
    </style:style>
    <style:style style:name="P182" style:family="paragraph" style:parent-style-name="List_20_Paragraph" style:list-style-name="WWNum9">
      <style:text-properties officeooo:paragraph-rsid="007e39e2"/>
    </style:style>
    <style:style style:name="P183" style:family="paragraph" style:parent-style-name="Standard" style:master-page-name="Standard">
      <style:paragraph-properties fo:text-align="center" style:justify-single-word="false" style:page-number="auto"/>
      <style:text-properties fo:language="ca" fo:country="ES" officeooo:paragraph-rsid="000e1972"/>
    </style:style>
    <style:style style:name="P184" style:family="paragraph" style:parent-style-name="Standard">
      <style:text-properties fo:language="ca" fo:country="ES" officeooo:paragraph-rsid="0013d81d"/>
    </style:style>
    <style:style style:name="P185" style:family="paragraph" style:parent-style-name="Standard">
      <style:text-properties style:font-name="Calibri" fo:language="ca" fo:country="ES" officeooo:rsid="007c894a" officeooo:paragraph-rsid="007c894a"/>
    </style:style>
    <style:style style:name="P186" style:family="paragraph" style:parent-style-name="Standard">
      <style:text-properties style:font-name="Calibri" fo:language="ca" fo:country="ES" officeooo:paragraph-rsid="0013ba49"/>
    </style:style>
    <style:style style:name="P187" style:family="paragraph" style:parent-style-name="Standard">
      <style:paragraph-properties fo:margin-top="0cm" fo:margin-bottom="0.212cm" style:contextual-spacing="false" fo:text-align="start" style:justify-single-word="false"/>
      <style:text-properties style:font-name="Calibri" fo:language="ca" fo:country="ES" officeooo:paragraph-rsid="00f10c3d" style:font-name-complex="Arial Narrow1"/>
    </style:style>
    <style:style style:name="P188" style:family="paragraph" style:parent-style-name="Standard">
      <style:paragraph-properties fo:margin-top="0cm" fo:margin-bottom="0.212cm" style:contextual-spacing="false" fo:text-align="start" style:justify-single-word="false"/>
      <style:text-properties style:font-name="Calibri" fo:language="ca" fo:country="ES" officeooo:rsid="00f10c3d" officeooo:paragraph-rsid="00f10c3d" style:font-name-complex="Arial Narrow1"/>
    </style:style>
    <style:style style:name="P189" style:family="paragraph" style:parent-style-name="Standard">
      <style:text-properties style:font-name="Calibri" fo:language="ca" fo:country="ES" officeooo:paragraph-rsid="00816345"/>
    </style:style>
    <style:style style:name="P190" style:family="paragraph" style:parent-style-name="Standard">
      <style:text-properties style:font-name="Calibri" fo:language="ca" fo:country="ES" fo:font-weight="bold" officeooo:paragraph-rsid="0013d81d" style:font-weight-asian="bold"/>
    </style:style>
    <style:style style:name="P191" style:family="paragraph" style:parent-style-name="Standard">
      <style:text-properties style:font-name="Calibri" fo:language="ca" fo:country="ES" officeooo:paragraph-rsid="0013d81d"/>
    </style:style>
    <style:style style:name="P192" style:family="paragraph" style:parent-style-name="Standard" style:list-style-name="L5">
      <style:text-properties style:font-name="Calibri" fo:font-size="10pt" fo:language="ca" fo:country="ES" officeooo:rsid="006c9dc2" officeooo:paragraph-rsid="006c9dc2" style:font-size-asian="10.5pt"/>
    </style:style>
    <style:style style:name="P193"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f10c3d" officeooo:paragraph-rsid="00f10c3d" style:font-size-asian="10.5pt" style:font-name-complex="Arial Narrow1"/>
    </style:style>
    <style:style style:name="P194" style:family="paragraph" style:parent-style-name="Standard">
      <style:text-properties officeooo:paragraph-rsid="0013d81d"/>
    </style:style>
    <style:style style:name="P195" style:family="paragraph" style:parent-style-name="Standard">
      <style:text-properties officeooo:paragraph-rsid="007c77e2"/>
    </style:style>
    <style:style style:name="P196" style:family="paragraph" style:parent-style-name="Text_20_body" style:list-style-name="L6">
      <style:text-properties fo:font-weight="bold" officeooo:rsid="0071f004" officeooo:paragraph-rsid="0071f004" style:font-weight-asian="bold" style:font-weight-complex="bold"/>
    </style:style>
    <style:style style:name="P197" style:family="paragraph" style:parent-style-name="Text_20_body" style:list-style-name="L7">
      <style:text-properties fo:font-weight="bold" officeooo:rsid="0071f004" officeooo:paragraph-rsid="0071f004" style:font-weight-asian="bold" style:font-weight-complex="bold"/>
    </style:style>
    <style:style style:name="P198" style:family="paragraph" style:parent-style-name="Text_20_body" style:list-style-name="L7">
      <style:text-properties fo:font-weight="bold" officeooo:rsid="0071f004" officeooo:paragraph-rsid="00d70df8" style:font-weight-asian="bold" style:font-weight-complex="bold"/>
    </style:style>
    <style:style style:name="P199" style:family="paragraph" style:parent-style-name="Text_20_body">
      <style:text-properties officeooo:paragraph-rsid="00a6de51"/>
    </style:style>
    <style:style style:name="P200" style:family="paragraph" style:parent-style-name="Text_20_body">
      <style:text-properties style:font-name="Calibri" fo:language="ca" fo:country="ES" officeooo:paragraph-rsid="0013ba49"/>
    </style:style>
    <style:style style:name="P201" style:family="paragraph">
      <loext:graphic-properties draw:fill="none"/>
    </style:style>
    <style:style style:name="P202" style:family="paragraph">
      <loext:graphic-properties draw:fill="none"/>
      <style:paragraph-properties fo:text-align="center"/>
    </style:style>
    <style:style style:name="T1" style:family="text">
      <style:text-properties style:font-name="Calibri"/>
    </style:style>
    <style:style style:name="T2" style:family="text">
      <style:text-properties style:font-name="Calibri" fo:font-size="11pt" style:font-size-asian="11pt" style:font-size-complex="11pt"/>
    </style:style>
    <style:style style:name="T3" style:family="text">
      <style:text-properties style:font-name="Calibri" fo:font-weight="bold" style:font-weight-asian="bold"/>
    </style:style>
    <style:style style:name="T4" style:family="text">
      <style:text-properties style:font-name="Calibri" fo:font-weight="bold" officeooo:rsid="0044a5d3" style:font-weight-asian="bold"/>
    </style:style>
    <style:style style:name="T5" style:family="text">
      <style:text-properties style:font-name="Calibri" fo:font-weight="bold" officeooo:rsid="00466cd1" style:font-weight-asian="bold"/>
    </style:style>
    <style:style style:name="T6" style:family="text">
      <style:text-properties style:font-name="Calibri" fo:font-weight="bold" officeooo:rsid="007c894a" style:font-weight-asian="bold"/>
    </style:style>
    <style:style style:name="T7" style:family="text">
      <style:text-properties style:font-name="Calibri" fo:font-weight="bold" style:font-weight-asian="bold" style:font-weight-complex="bold"/>
    </style:style>
    <style:style style:name="T8" style:family="text">
      <style:text-properties style:font-name="Calibri" fo:font-weight="bold" officeooo:rsid="00a259c5" style:font-weight-asian="bold" style:font-weight-complex="bold"/>
    </style:style>
    <style:style style:name="T9" style:family="text">
      <style:text-properties style:font-name="Calibri" fo:font-weight="bold" officeooo:rsid="00da28b0" style:font-weight-asian="bold"/>
    </style:style>
    <style:style style:name="T10" style:family="text">
      <style:text-properties style:font-name="Calibri" officeooo:rsid="001ca2a7"/>
    </style:style>
    <style:style style:name="T11" style:family="text">
      <style:text-properties style:font-name="Calibri" officeooo:rsid="0044a5d3"/>
    </style:style>
    <style:style style:name="T12" style:family="text">
      <style:text-properties style:font-name="Calibri" fo:language="ca" fo:country="ES"/>
    </style:style>
    <style:style style:name="T13" style:family="text">
      <style:text-properties style:font-name="Calibri" fo:language="ca" fo:country="ES" officeooo:rsid="006a329e"/>
    </style:style>
    <style:style style:name="T14" style:family="text">
      <style:text-properties style:font-name="Calibri" fo:language="ca" fo:country="ES" officeooo:rsid="0044a5d3"/>
    </style:style>
    <style:style style:name="T15" style:family="text">
      <style:text-properties style:font-name="Calibri" fo:language="ca" fo:country="ES" officeooo:rsid="006984aa"/>
    </style:style>
    <style:style style:name="T16" style:family="text">
      <style:text-properties style:font-name="Calibri" fo:language="ca" fo:country="ES" fo:font-weight="bold" style:font-weight-asian="bold"/>
    </style:style>
    <style:style style:name="T17" style:family="text">
      <style:text-properties style:font-name="Calibri" fo:language="ca" fo:country="ES" fo:font-weight="bold" officeooo:rsid="00484b61" style:font-weight-asian="bold" style:font-weight-complex="bold"/>
    </style:style>
    <style:style style:name="T18" style:family="text">
      <style:text-properties style:font-name="Calibri" fo:language="ca" fo:country="ES" fo:font-weight="bold" officeooo:rsid="007e39e2" style:font-weight-asian="bold" style:font-weight-complex="bold"/>
    </style:style>
    <style:style style:name="T19" style:family="text">
      <style:text-properties style:font-name="Calibri" fo:language="ca" fo:country="ES" fo:font-weight="bold" officeooo:rsid="00a4c287" style:font-weight-asian="bold" style:font-weight-complex="bold"/>
    </style:style>
    <style:style style:name="T20" style:family="text">
      <style:text-properties style:font-name="Calibri" fo:language="ca" fo:country="ES" fo:font-weight="bold" officeooo:rsid="00b24c63" style:font-weight-asian="bold" style:font-weight-complex="bold"/>
    </style:style>
    <style:style style:name="T21" style:family="text">
      <style:text-properties style:font-name="Calibri" fo:language="ca" fo:country="ES" fo:font-weight="bold" officeooo:rsid="0077d900" style:font-weight-asian="bold" style:font-weight-complex="normal"/>
    </style:style>
    <style:style style:name="T22" style:family="text">
      <style:text-properties style:font-name="Calibri" fo:language="ca" fo:country="ES" fo:font-weight="bold" officeooo:rsid="0077d900" style:font-weight-asian="bold"/>
    </style:style>
    <style:style style:name="T23" style:family="text">
      <style:text-properties style:font-name="Calibri" fo:language="ca" fo:country="ES" fo:font-weight="bold" officeooo:rsid="00780e29" style:font-weight-asian="bold"/>
    </style:style>
    <style:style style:name="T24" style:family="text">
      <style:text-properties style:font-name="Calibri" fo:language="ca" fo:country="ES" officeooo:rsid="00761f76"/>
    </style:style>
    <style:style style:name="T25" style:family="text">
      <style:text-properties style:font-name="Calibri" fo:language="ca" fo:country="ES" fo:font-weight="normal" style:font-weight-asian="normal" style:font-weight-complex="normal"/>
    </style:style>
    <style:style style:name="T26" style:family="text">
      <style:text-properties style:font-name="Calibri" fo:language="ca" fo:country="ES" fo:font-weight="normal" officeooo:rsid="00484b61" style:font-weight-asian="normal" style:font-weight-complex="normal"/>
    </style:style>
    <style:style style:name="T27" style:family="text">
      <style:text-properties style:font-name="Calibri" fo:language="ca" fo:country="ES" fo:font-weight="normal" officeooo:rsid="0077d900" style:font-weight-asian="normal" style:font-weight-complex="normal"/>
    </style:style>
    <style:style style:name="T28" style:family="text">
      <style:text-properties style:font-name="Calibri" fo:language="ca" fo:country="ES" fo:font-weight="normal" officeooo:rsid="0044a5d3" style:font-weight-asian="normal" style:font-weight-complex="normal"/>
    </style:style>
    <style:style style:name="T29" style:family="text">
      <style:text-properties style:font-name="Calibri" fo:language="ca" fo:country="ES" fo:font-weight="normal" officeooo:rsid="007e39e2" style:font-weight-asian="normal" style:font-weight-complex="normal"/>
    </style:style>
    <style:style style:name="T30" style:family="text">
      <style:text-properties style:font-name="Calibri" fo:language="ca" fo:country="ES" fo:font-weight="normal" officeooo:rsid="00a497e2" style:font-weight-asian="normal" style:font-weight-complex="normal"/>
    </style:style>
    <style:style style:name="T31" style:family="text">
      <style:text-properties style:font-name="Calibri" fo:language="ca" fo:country="ES" fo:font-weight="normal" officeooo:rsid="00a4c287" style:font-weight-asian="normal" style:font-weight-complex="normal"/>
    </style:style>
    <style:style style:name="T32" style:family="text">
      <style:text-properties style:font-name="Calibri" fo:language="ca" fo:country="ES" fo:font-weight="normal" officeooo:rsid="00b39b2c" style:font-weight-asian="normal" style:font-weight-complex="normal"/>
    </style:style>
    <style:style style:name="T33" style:family="text">
      <style:text-properties style:font-name="Calibri" fo:language="ca" fo:country="ES" officeooo:rsid="00780e29"/>
    </style:style>
    <style:style style:name="T34" style:family="text">
      <style:text-properties style:font-name="Calibri" fo:language="ca" fo:country="ES" officeooo:rsid="00805191"/>
    </style:style>
    <style:style style:name="T35" style:family="text">
      <style:text-properties style:font-name="Calibri" fo:language="ca" fo:country="ES" officeooo:rsid="0015973d"/>
    </style:style>
    <style:style style:name="T36" style:family="text">
      <style:text-properties style:font-name="Calibri" fo:language="ca" fo:country="ES" officeooo:rsid="00a6de51"/>
    </style:style>
    <style:style style:name="T37" style:family="text">
      <style:text-properties style:font-name="Calibri" fo:language="ca" fo:country="ES" officeooo:rsid="00ac4d60"/>
    </style:style>
    <style:style style:name="T38" style:family="text">
      <style:text-properties style:font-name="Calibri" officeooo:rsid="00466cd1"/>
    </style:style>
    <style:style style:name="T39" style:family="text">
      <style:text-properties style:font-name="Calibri" fo:font-weight="normal" style:font-weight-asian="normal" style:font-weight-complex="normal"/>
    </style:style>
    <style:style style:name="T40" style:family="text">
      <style:text-properties style:font-name="Calibri" fo:font-weight="normal" officeooo:rsid="00a497e2" style:font-weight-asian="normal" style:font-weight-complex="normal"/>
    </style:style>
    <style:style style:name="T41" style:family="text">
      <style:text-properties style:font-name="Calibri" fo:font-weight="normal" officeooo:rsid="00a259c5" style:font-weight-asian="normal" style:font-weight-complex="normal"/>
    </style:style>
    <style:style style:name="T42" style:family="text">
      <style:text-properties style:font-name="Calibri" fo:font-weight="normal" officeooo:rsid="00dea456" style:font-weight-asian="normal" style:font-weight-complex="normal"/>
    </style:style>
    <style:style style:name="T43" style:family="text">
      <style:text-properties style:font-name="Calibri" fo:font-weight="normal" officeooo:rsid="00f50c7a" style:font-weight-asian="normal" style:font-weight-complex="normal"/>
    </style:style>
    <style:style style:name="T44" style:family="text">
      <style:text-properties style:font-name="Calibri" fo:font-weight="normal" officeooo:rsid="00f9241f" style:font-weight-asian="normal" style:font-weight-complex="normal"/>
    </style:style>
    <style:style style:name="T45" style:family="text">
      <style:text-properties style:font-name="Calibri" fo:font-weight="normal" officeooo:rsid="00fa3763" style:font-weight-asian="normal" style:font-weight-complex="normal"/>
    </style:style>
    <style:style style:name="T46" style:family="text">
      <style:text-properties style:font-name="Calibri" fo:font-size="10pt" fo:language="ca" fo:country="ES" style:font-size-asian="10.5pt"/>
    </style:style>
    <style:style style:name="T47" style:family="text">
      <style:text-properties style:font-name="Calibri" fo:font-size="10pt" fo:language="ca" fo:country="ES" officeooo:rsid="006a329e" style:font-size-asian="10.5pt"/>
    </style:style>
    <style:style style:name="T48" style:family="text">
      <style:text-properties style:font-name="Calibri" fo:font-size="10pt" fo:language="ca" fo:country="ES" officeooo:rsid="007361b5" style:font-size-asian="10.5pt"/>
    </style:style>
    <style:style style:name="T49" style:family="text">
      <style:text-properties style:font-name="Calibri" fo:font-size="10pt" fo:language="ca" fo:country="ES" officeooo:rsid="006984aa" style:font-size-asian="10.5pt"/>
    </style:style>
    <style:style style:name="T50" style:family="text">
      <style:text-properties style:font-name="Calibri" fo:font-size="10pt" fo:language="ca" fo:country="ES" officeooo:rsid="00761f76" style:font-size-asian="10.5pt"/>
    </style:style>
    <style:style style:name="T51" style:family="text">
      <style:text-properties style:font-name="Calibri" fo:font-size="10pt" fo:language="ca" fo:country="ES" officeooo:rsid="00780e29" style:font-size-asian="10.5pt"/>
    </style:style>
    <style:style style:name="T52" style:family="text">
      <style:text-properties style:font-name="Calibri" fo:font-size="10pt" fo:language="ca" fo:country="ES" officeooo:rsid="007c894a" style:font-size-asian="10.5pt"/>
    </style:style>
    <style:style style:name="T53" style:family="text">
      <style:text-properties style:font-name="Calibri" fo:font-size="10pt" fo:language="ca" fo:country="ES" officeooo:rsid="008003a5" style:font-size-asian="10.5pt"/>
    </style:style>
    <style:style style:name="T54" style:family="text">
      <style:text-properties style:font-name="Calibri" fo:font-size="10pt" fo:language="ca" fo:country="ES" officeooo:rsid="0015973d" style:font-size-asian="10.5pt"/>
    </style:style>
    <style:style style:name="T55" style:family="text">
      <style:text-properties style:font-name="Calibri" fo:font-size="10pt" fo:language="ca" fo:country="ES" officeooo:rsid="00805191" style:font-size-asian="10.5pt"/>
    </style:style>
    <style:style style:name="T56" style:family="text">
      <style:text-properties style:font-name="Calibri" fo:font-size="10pt" fo:language="ca" fo:country="ES" officeooo:rsid="006ab4d4" style:font-size-asian="10.5pt"/>
    </style:style>
    <style:style style:name="T57" style:family="text">
      <style:text-properties style:font-name="Calibri" fo:font-size="10pt" fo:language="ca" fo:country="ES" officeooo:rsid="00b24c63" style:font-size-asian="10.5pt"/>
    </style:style>
    <style:style style:name="T58" style:family="text">
      <style:text-properties style:font-name="Calibri" fo:font-size="10pt" fo:language="ca" fo:country="ES" officeooo:rsid="00abd58a" style:font-size-asian="10.5pt"/>
    </style:style>
    <style:style style:name="T59" style:family="text">
      <style:text-properties style:font-name="Calibri" fo:font-size="10pt" fo:language="ca" fo:country="ES" officeooo:rsid="007c77e2" style:font-size-asian="10.5pt"/>
    </style:style>
    <style:style style:name="T60" style:family="text">
      <style:text-properties style:font-name="Calibri" fo:font-size="10pt" fo:language="ca" fo:country="ES" fo:font-weight="bold" officeooo:rsid="00761f76" style:font-size-asian="10.5pt" style:font-weight-asian="bold"/>
    </style:style>
    <style:style style:name="T61" style:family="text">
      <style:text-properties style:font-name="Calibri" fo:font-size="10pt" fo:language="ca" fo:country="ES" fo:font-weight="bold" officeooo:rsid="00780e29" style:font-size-asian="10.5pt" style:font-weight-asian="bold"/>
    </style:style>
    <style:style style:name="T62" style:family="text">
      <style:text-properties style:font-name="Calibri" fo:font-size="10pt" fo:language="ca" fo:country="ES" fo:font-weight="bold" officeooo:rsid="007c894a" style:font-size-asian="10.5pt" style:font-weight-asian="bold"/>
    </style:style>
    <style:style style:name="T63" style:family="text">
      <style:text-properties style:font-name="Calibri" fo:font-size="10pt" fo:language="ca" fo:country="ES" fo:font-weight="bold" style:font-size-asian="10.5pt" style:font-weight-asian="bold" style:font-weight-complex="bold"/>
    </style:style>
    <style:style style:name="T64" style:family="text">
      <style:text-properties style:font-name="Calibri" fo:font-size="10pt" fo:language="ca" fo:country="ES" fo:font-weight="bold" officeooo:rsid="00abd58a" style:font-size-asian="10.5pt" style:font-weight-asian="bold" style:font-weight-complex="bold"/>
    </style:style>
    <style:style style:name="T65" style:family="text">
      <style:text-properties style:font-name="Calibri" fo:font-size="10pt" fo:language="ca" fo:country="ES" fo:font-weight="bold" officeooo:rsid="00b24c63" style:font-size-asian="10.5pt" style:font-weight-asian="bold" style:font-weight-complex="bold"/>
    </style:style>
    <style:style style:name="T66" style:family="text">
      <style:text-properties style:font-name="Calibri" fo:font-size="10pt" fo:language="ca" fo:country="ES" fo:font-weight="bold" officeooo:rsid="0077d900" style:font-size-asian="10.5pt" style:font-weight-asian="bold"/>
    </style:style>
    <style:style style:name="T67" style:family="text">
      <style:text-properties style:font-name="Calibri" fo:font-size="10pt" fo:language="ca" fo:country="ES" fo:font-weight="bold" officeooo:rsid="00b24c63" style:font-size-asian="10.5pt" style:font-weight-asian="bold"/>
    </style:style>
    <style:style style:name="T68" style:family="text">
      <style:text-properties style:font-name="Calibri" fo:font-size="10pt" fo:language="ca" fo:country="ES" fo:font-weight="normal" style:font-size-asian="10.5pt" style:font-weight-asian="normal" style:font-weight-complex="normal"/>
    </style:style>
    <style:style style:name="T69" style:family="text">
      <style:text-properties style:font-name="Calibri" fo:font-size="10pt" fo:language="ca" fo:country="ES" fo:font-weight="normal" officeooo:rsid="007e39e2" style:font-size-asian="10.5pt" style:font-weight-asian="normal" style:font-weight-complex="normal"/>
    </style:style>
    <style:style style:name="T70" style:family="text">
      <style:text-properties style:font-name="Calibri" fo:font-size="10pt" fo:language="ca" fo:country="ES" fo:font-weight="normal" officeooo:rsid="007fabbe" style:font-size-asian="10.5pt" style:font-weight-asian="normal" style:font-weight-complex="normal"/>
    </style:style>
    <style:style style:name="T71" style:family="text">
      <style:text-properties style:font-name="Calibri" fo:font-size="10pt" fo:language="ca" fo:country="ES" fo:font-weight="normal" officeooo:rsid="0077d900" style:font-size-asian="10.5pt" style:font-weight-asian="normal" style:font-weight-complex="normal"/>
    </style:style>
    <style:style style:name="T72" style:family="text">
      <style:text-properties style:font-name="Calibri" fo:font-size="10pt" fo:language="ca" fo:country="ES" fo:font-weight="normal" officeooo:rsid="00b24c63" style:font-size-asian="10.5pt" style:font-weight-asian="normal" style:font-weight-complex="normal"/>
    </style:style>
    <style:style style:name="T73" style:family="text">
      <style:text-properties style:font-name="Calibri" fo:font-size="10pt" fo:language="ca" fo:country="ES" fo:font-weight="normal" officeooo:rsid="00484b61" style:font-size-asian="10.5pt" style:font-weight-asian="normal" style:font-weight-complex="normal"/>
    </style:style>
    <style:style style:name="T74" style:family="text">
      <style:text-properties style:font-name="Calibri" fo:font-size="10pt" officeooo:rsid="00589ea1" style:font-size-asian="10.5pt" style:font-name-complex="Arial Narrow1"/>
    </style:style>
    <style:style style:name="T75" style:family="text">
      <style:text-properties style:font-name="Calibri" fo:font-size="10pt" officeooo:rsid="00e52657" style:font-size-asian="10.5pt" style:font-name-complex="Arial Narrow1"/>
    </style:style>
    <style:style style:name="T76" style:family="text">
      <style:text-properties style:font-name="Calibri" fo:font-size="10pt" fo:font-weight="bold" officeooo:rsid="00a259c5" style:font-size-asian="10.5pt" style:font-weight-asian="bold" style:font-weight-complex="bold"/>
    </style:style>
    <style:style style:name="T77" style:family="text">
      <style:text-properties style:font-name="Calibri" fo:font-size="10pt" fo:font-weight="bold" officeooo:rsid="00abd58a" style:font-size-asian="10.5pt" style:font-weight-asian="bold" style:font-weight-complex="bold"/>
    </style:style>
    <style:style style:name="T78" style:family="text">
      <style:text-properties style:font-name="Calibri" fo:font-size="10pt" style:font-size-asian="8.75pt" style:font-size-complex="10pt"/>
    </style:style>
    <style:style style:name="T79" style:family="text">
      <style:text-properties style:font-name="Calibri" style:font-name-complex="Arial Narrow1"/>
    </style:style>
    <style:style style:name="T80" style:family="text">
      <style:text-properties style:font-name="Calibri" officeooo:rsid="00589ea1" style:font-name-complex="Arial Narrow1"/>
    </style:style>
    <style:style style:name="T81" style:family="text">
      <style:text-properties style:font-name="Calibri" officeooo:rsid="00434c2e" style:font-name-complex="Arial Narrow1"/>
    </style:style>
    <style:style style:name="T82" style:family="text">
      <style:text-properties style:font-name="Calibri" officeooo:rsid="00e52657" style:font-name-complex="Arial Narrow1"/>
    </style:style>
    <style:style style:name="T83" style:family="text">
      <style:text-properties style:font-name="Calibri" officeooo:rsid="00e9aff6" style:font-name-complex="Arial Narrow1"/>
    </style:style>
    <style:style style:name="T84" style:family="text">
      <style:text-properties style:font-name="Calibri" fo:font-style="italic" style:font-style-asian="italic" style:font-style-complex="italic"/>
    </style:style>
    <style:style style:name="T85" style:family="text">
      <style:text-properties style:font-name="Calibri" officeooo:rsid="0064c74a"/>
    </style:style>
    <style:style style:name="T86" style:family="text">
      <style:text-properties style:font-name="Calibri" officeooo:rsid="007361b5"/>
    </style:style>
    <style:style style:name="T87" style:family="text">
      <style:text-properties style:font-name="Calibri" officeooo:rsid="00761f76"/>
    </style:style>
    <style:style style:name="T88"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89"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90" style:family="text">
      <style:text-properties fo:language="ca" fo:country="ES"/>
    </style:style>
    <style:style style:name="T91" style:family="text">
      <style:text-properties fo:language="ca" fo:country="ES" officeooo:rsid="0064c74a"/>
    </style:style>
    <style:style style:name="T92" style:family="text">
      <style:text-properties fo:font-weight="normal" style:font-weight-asian="normal" style:font-weight-complex="normal"/>
    </style:style>
    <style:style style:name="T93" style:family="text">
      <style:text-properties officeooo:rsid="00434c2e"/>
    </style:style>
    <style:style style:name="T94" style:family="text">
      <style:text-properties officeooo:rsid="0044a5d3"/>
    </style:style>
    <style:style style:name="T95" style:family="text">
      <style:text-properties officeooo:rsid="004acf98"/>
    </style:style>
    <style:style style:name="T96" style:family="text">
      <style:text-properties officeooo:rsid="004d4998"/>
    </style:style>
    <style:style style:name="T97" style:family="text">
      <style:text-properties officeooo:rsid="004f05d5"/>
    </style:style>
    <style:style style:name="T98" style:family="text">
      <style:text-properties officeooo:rsid="004f6677"/>
    </style:style>
    <style:style style:name="T99" style:family="text">
      <style:text-properties officeooo:rsid="00589ea1"/>
    </style:style>
    <style:style style:name="T100" style:family="text">
      <style:text-properties fo:color="#007dc3" loext:opacity="100%" fo:font-size="18pt" fo:language="ca" fo:country="ES" style:font-size-asian="18pt" style:font-name-complex="Times New Roman" style:font-size-complex="18pt"/>
    </style:style>
    <style:style style:name="T101" style:family="text">
      <style:text-properties fo:color="#007dc3" loext:opacity="100%" fo:font-size="18pt" fo:language="ca" fo:country="ES" officeooo:rsid="00e7135e" style:font-size-asian="18pt" style:font-name-complex="Times New Roman" style:font-size-complex="18pt"/>
    </style:style>
    <style:style style:name="T102" style:family="text">
      <style:text-properties fo:color="#007dc3" loext:opacity="100%" fo:font-size="18pt" fo:language="ca" fo:country="ES" officeooo:rsid="00e9aff6" style:font-size-asian="18pt" style:font-name-complex="Times New Roman" style:font-size-complex="18pt"/>
    </style:style>
    <style:style style:name="T103" style:family="text">
      <style:text-properties fo:color="#007dc3" loext:opacity="100%" style:font-name="Calibri" fo:font-size="18pt" fo:language="ca" fo:country="ES" officeooo:rsid="00589ea1" style:font-size-asian="18pt" style:language-asian="en" style:country-asian="US" style:font-name-complex="Times New Roman" style:font-size-complex="18pt"/>
    </style:style>
    <style:style style:name="T104" style:family="text">
      <style:text-properties fo:color="#007dc3" loext:opacity="100%" style:font-name="Calibri" fo:font-size="18pt" fo:language="ca" fo:country="ES" officeooo:rsid="00e52657" style:font-size-asian="18pt" style:language-asian="en" style:country-asian="US" style:font-name-complex="Times New Roman" style:font-size-complex="18pt"/>
    </style:style>
    <style:style style:name="T105" style:family="text">
      <style:text-properties fo:color="#007dc3" loext:opacity="100%" style:font-name="Calibri" fo:font-size="18pt" fo:language="ca" fo:country="ES" officeooo:rsid="00e9aff6" style:font-size-asian="18pt" style:language-asian="en" style:country-asian="US" style:font-name-complex="Times New Roman" style:font-size-complex="18pt"/>
    </style:style>
    <style:style style:name="T106" style:family="text">
      <style:text-properties officeooo:rsid="0064c74a"/>
    </style:style>
    <style:style style:name="T107" style:family="text">
      <style:text-properties fo:font-size="10pt" fo:language="ca" fo:country="ES" officeooo:rsid="0064c74a" style:font-size-asian="10.5pt"/>
    </style:style>
    <style:style style:name="T108" style:family="text">
      <style:text-properties fo:font-size="10pt" fo:language="ca" fo:country="ES" fo:font-style="italic" officeooo:rsid="0064c74a" style:font-size-asian="10.5pt" style:font-style-asian="italic" style:font-style-complex="italic"/>
    </style:style>
    <style:style style:name="T109" style:family="text">
      <style:text-properties fo:font-size="10pt" fo:language="ca" fo:country="ES" fo:font-style="normal" officeooo:rsid="0064c74a" style:font-size-asian="10.5pt" style:font-style-asian="normal" style:font-style-complex="normal"/>
    </style:style>
    <style:style style:name="T110" style:family="text">
      <style:text-properties fo:font-size="10pt" officeooo:rsid="00c40662" style:font-size-asian="10.5pt"/>
    </style:style>
    <style:style style:name="T111" style:family="text">
      <style:text-properties fo:font-style="italic" style:font-style-asian="italic" style:font-style-complex="italic"/>
    </style:style>
    <style:style style:name="T112" style:family="text">
      <style:text-properties fo:font-style="normal" style:font-style-asian="normal" style:font-style-complex="normal"/>
    </style:style>
    <style:style style:name="T113" style:family="text">
      <style:text-properties text:display="none"/>
    </style:style>
    <style:style style:name="T114" style:family="text">
      <style:text-properties style:font-name="Calibri1"/>
    </style:style>
    <style:style style:name="T115" style:family="text">
      <style:text-properties style:font-name="Calibri1" officeooo:rsid="0064c74a"/>
    </style:style>
    <style:style style:name="T116" style:family="text">
      <style:text-properties style:font-name="Calibri1" fo:language="ca" fo:country="ES" officeooo:rsid="001ca2a7"/>
    </style:style>
    <style:style style:name="T117" style:family="text">
      <style:text-properties style:font-name="Calibri1" fo:language="ca" fo:country="ES" officeooo:rsid="00673e05"/>
    </style:style>
    <style:style style:name="T118" style:family="text">
      <style:text-properties style:font-name="Calibri1" fo:language="ca" fo:country="ES" officeooo:rsid="0068a48a"/>
    </style:style>
    <style:style style:name="T119" style:family="text">
      <style:text-properties style:font-name="Calibri1" fo:font-size="10pt" fo:language="ca" fo:country="ES" officeooo:rsid="00673e05" style:font-size-asian="10.5pt"/>
    </style:style>
    <style:style style:name="T120" style:family="text">
      <style:text-properties style:font-name="Calibri1" fo:font-size="10pt" fo:language="ca" fo:country="ES" officeooo:rsid="0068a48a" style:font-size-asian="10.5pt"/>
    </style:style>
    <style:style style:name="T121" style:family="text">
      <style:text-properties officeooo:rsid="006a329e"/>
    </style:style>
    <style:style style:name="T122" style:family="text">
      <style:text-properties style:font-name="Calibri4" fo:font-size="10pt" officeooo:rsid="006a329e" style:font-size-asian="10.5pt"/>
    </style:style>
    <style:style style:name="T123" style:family="text">
      <style:text-properties officeooo:rsid="0071f004"/>
    </style:style>
    <style:style style:name="T124" style:family="text">
      <style:text-properties officeooo:rsid="007361b5"/>
    </style:style>
    <style:style style:name="T125" style:family="text">
      <style:text-properties officeooo:rsid="007b59e2"/>
    </style:style>
    <style:style style:name="T126" style:family="text">
      <style:text-properties officeooo:rsid="008003a5"/>
    </style:style>
    <style:style style:name="T127" style:family="text">
      <style:text-properties officeooo:rsid="00805191"/>
    </style:style>
    <style:style style:name="T128" style:family="text">
      <style:text-properties fo:color="#4f81bd" loext:opacity="100%" style:font-name="Calibri3" fo:font-size="7.69999980926514pt" fo:language="ca" fo:country="ES" fo:font-style="italic" fo:font-weight="bold" officeooo:rsid="00816345" style:font-name-asian="Microsoft YaHei" style:font-size-asian="11.8999996185303pt" style:font-style-asian="italic" style:font-weight-asian="bold" style:font-name-complex="Arial1" style:font-size-complex="11.8999996185303pt" style:font-style-complex="italic" style:font-weight-complex="bold"/>
    </style:style>
    <style:style style:name="T129" style:family="text">
      <style:text-properties officeooo:rsid="00a617f4"/>
    </style:style>
    <style:style style:name="T130" style:family="text">
      <style:text-properties officeooo:rsid="00a8c0d3"/>
    </style:style>
    <style:style style:name="T131" style:family="text">
      <style:text-properties officeooo:rsid="00bab267"/>
    </style:style>
    <style:style style:name="T132" style:family="text">
      <style:text-properties officeooo:rsid="00bbdca6"/>
    </style:style>
    <style:style style:name="T133" style:family="text">
      <style:text-properties officeooo:rsid="00c03633"/>
    </style:style>
    <style:style style:name="T134" style:family="text">
      <style:text-properties officeooo:rsid="00c18c01"/>
    </style:style>
    <style:style style:name="T135" style:family="text">
      <style:text-properties officeooo:rsid="00c40662"/>
    </style:style>
    <style:style style:name="T136" style:family="text">
      <style:text-properties officeooo:rsid="00ca9b30"/>
    </style:style>
    <style:style style:name="T137" style:family="text">
      <style:text-properties officeooo:rsid="0082e781"/>
    </style:style>
    <style:style style:name="T138" style:family="text">
      <style:text-properties officeooo:rsid="00db1be8"/>
    </style:style>
    <style:style style:name="T139" style:family="text">
      <style:text-properties officeooo:rsid="00e52657"/>
    </style:style>
    <style:style style:name="T140" style:family="text">
      <style:text-properties officeooo:rsid="00e9aff6"/>
    </style:style>
    <style:style style:name="T141" style:family="text">
      <style:text-properties officeooo:rsid="00faa0b5"/>
    </style:style>
    <style:style style:name="T142" style:family="text">
      <style:text-properties officeooo:rsid="00a6de5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5"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053cm" fo:margin-right="0.019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dddddd"/>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4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83"><draw:g text:anchor-type="as-char" svg:y="0cm" draw:z-index="0" draw:name="Group 6" draw:style-name="gr3"><draw:frame draw:name="Picture 2" draw:style-name="gr4" draw:text-style-name="P202" svg:width="13.553cm" svg:height="2.514cm" svg:x="3.438cm" svg:y="0cm"><draw:image xlink:href="Pictures/10000000000006A400000104792F8214.png" xlink:type="simple" xlink:show="embed" xlink:actuate="onLoad" draw:mime-type="image/png"><text:p/></draw:image></draw:frame><draw:frame draw:name="Picture 3" draw:style-name="gr5" draw:text-style-name="P202" svg:width="3.211cm" svg:height="2.513cm" svg:x="0cm" svg:y="0cm"><draw:image xlink:href="Pictures/10000001000002E6000002BBD71058E4.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100"/>
      <text:p text:style-name="P100"/>
      <text:p text:style-name="P9"><text:span text:style-name="T89">DISTRIBUCIÓ</text:span><text:span text:style-name="T88">: Manual d'usuari</text:span></text:p>
      <text:p text:style-name="P105"><text:span text:style-name="T105">20</text:span><text:span text:style-name="T100"> d</text:span><text:span text:style-name="T102">'octubre</text:span><text:span text:style-name="T101"> </text:span><text:span text:style-name="T100">de 20</text:span><text:span text:style-name="T103">2</text:span><text:span text:style-name="T104">2</text:span></text:p>
      <text:p text:style-name="P103">Serveis d'Administració Electrònica en el Govern de les Illes Balears</text:p>
      <text:p text:style-name="P104">Lot 3 (Serveis de tramitació d'expedients electrònics)</text:p>
      <text:p text:style-name="P101"/>
      <text:p text:style-name="P102"/>
      <text:p text:style-name="P101"/>
      <text:p text:style-name="P101"/>
      <text:p text:style-name="P101"/>
      <text:p text:style-name="P101"/>
      <text:p text:style-name="P26">Oficina Tècnica de Direcció de Projecte</text:p>
      <text:h text:style-name="P127" text:outline-level="1" text:is-list-header="true"><text:bookmark-start text:name="__RefHeading___Toc1440_1726870378"/><text:bookmark-start text:name="_Toc511319541"/>Control de versions del document<text:bookmark-end text:name="__RefHeading___Toc1440_1726870378"/><text:bookmark-end text:name="_Toc511319541"/></text:h>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99">Control de Canvis</text:p>
          </table:table-cell>
          <table:covered-table-cell/>
          <table:covered-table-cell/>
          <table:covered-table-cell/>
        </table:table-row>
        <table:table-row table:style-name="Tabla2.1">
          <table:table-cell table:style-name="Tabla2.A2" office:value-type="string">
            <text:p text:style-name="P36">Data</text:p>
          </table:table-cell>
          <table:table-cell table:style-name="Tabla2.B2" office:value-type="string">
            <text:p text:style-name="P37">Autor</text:p>
          </table:table-cell>
          <table:table-cell table:style-name="Tabla2.B2" office:value-type="string">
            <text:p text:style-name="P37">Versió</text:p>
          </table:table-cell>
          <table:table-cell table:style-name="Tabla2.D2" office:value-type="string">
            <text:p text:style-name="P37">Canvis</text:p>
          </table:table-cell>
        </table:table-row>
        <table:table-row table:style-name="Tabla2.1">
          <table:table-cell table:style-name="Tabla2.A3" office:value-type="string">
            <text:p text:style-name="P64"><text:span text:style-name="T93">02</text:span>/<text:span text:style-name="T93">1</text:span>0/2018</text:p>
          </table:table-cell>
          <table:table-cell table:style-name="Tabla2.B3" office:value-type="string">
            <text:p text:style-name="P64">Limit Tecnologies</text:p>
          </table:table-cell>
          <table:table-cell table:style-name="Tabla2.C3" office:value-type="string">
            <text:p text:style-name="P64">v1.0</text:p>
          </table:table-cell>
          <table:table-cell table:style-name="Tabla2.D3" office:value-type="string">
            <text:p text:style-name="P64">Versió inicial</text:p>
          </table:table-cell>
        </table:table-row>
        <table:table-row table:style-name="Tabla2.1">
          <table:table-cell table:style-name="Tabla2.A4" office:value-type="string">
            <text:p text:style-name="P6"><text:span text:style-name="T80">27</text:span><text:span text:style-name="T79">/</text:span><text:span text:style-name="T81">1</text:span><text:span text:style-name="T79">0/20</text:span><text:span text:style-name="T74">20</text:span></text:p>
          </table:table-cell>
          <table:table-cell table:style-name="Tabla2.B4" office:value-type="string">
            <text:p text:style-name="P64">Limit Tecnologies</text:p>
          </table:table-cell>
          <table:table-cell table:style-name="Tabla2.C4" office:value-type="string">
            <text:p text:style-name="P64">v1.<text:span text:style-name="T99">1</text:span></text:p>
          </table:table-cell>
          <table:table-cell table:style-name="Tabla2.D4" office:value-type="string">
            <text:p text:style-name="P73">Revisió de canvis respecte a la versió 0.9.31</text:p>
          </table:table-cell>
        </table:table-row>
        <table:table-row table:style-name="Tabla2.1">
          <table:table-cell table:style-name="Tabla2.A5" office:value-type="string">
            <text:p text:style-name="P6"><text:span text:style-name="T80">27</text:span><text:span text:style-name="T79">/</text:span><text:span text:style-name="T82">04</text:span><text:span text:style-name="T79">/20</text:span><text:span text:style-name="T74">2</text:span><text:span text:style-name="T75">2</text:span></text:p>
          </table:table-cell>
          <table:table-cell table:style-name="Tabla2.B5" office:value-type="string">
            <text:p text:style-name="P64">Limit Tecnologies</text:p>
          </table:table-cell>
          <table:table-cell table:style-name="Tabla2.C5" office:value-type="string">
            <text:p text:style-name="P64">v1.<text:span text:style-name="T139">2</text:span></text:p>
          </table:table-cell>
          <table:table-cell table:style-name="Tabla2.D5" office:value-type="string">
            <text:p text:style-name="P73">Revisió de canvis respecte a la versió 0.9.<text:span text:style-name="T139">41</text:span></text:p>
          </table:table-cell>
        </table:table-row>
        <table:table-row table:style-name="Tabla2.1">
          <table:table-cell table:style-name="Tabla2.A6" office:value-type="string">
            <text:p text:style-name="P6"><text:span text:style-name="T83">20</text:span><text:span text:style-name="T79">/</text:span><text:span text:style-name="T83">10</text:span><text:span text:style-name="T79">/20</text:span><text:span text:style-name="T74">2</text:span><text:span text:style-name="T75">2</text:span></text:p>
          </table:table-cell>
          <table:table-cell table:style-name="Tabla2.B6" office:value-type="string">
            <text:p text:style-name="P64">Limit Tecnologies</text:p>
          </table:table-cell>
          <table:table-cell table:style-name="Tabla2.C6" office:value-type="string">
            <text:p text:style-name="P64">v1.<text:span text:style-name="T140">3</text:span></text:p>
          </table:table-cell>
          <table:table-cell table:style-name="Tabla2.D6" office:value-type="string">
            <text:p text:style-name="P74">Separar manuals d'usuari i d'administrador.</text:p>
          </table:table-cell>
        </table:table-row>
        <table:table-row table:style-name="Tabla2.1">
          <table:table-cell table:style-name="Tabla2.A7" office:value-type="string">
            <text:p text:style-name="P193">20/04/2026</text:p>
          </table:table-cell>
          <table:table-cell table:style-name="Tabla2.B7" office:value-type="string">
            <text:p text:style-name="P187">Limit Tecnologies</text:p>
          </table:table-cell>
          <table:table-cell table:style-name="Tabla2.C7" office:value-type="string">
            <text:p text:style-name="P188"><text:span text:style-name="T141">v</text:span>1.0.8</text:p>
          </table:table-cell>
          <table:table-cell table:style-name="Tabla2.D7" office:value-type="string">
            <text:p text:style-name="P193">Canvi a la pagina d’anotacions</text:p>
          </table:table-cell>
        </table:table-row>
      </table:table>
      <text:p text:style-name="P2"/>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99">Revisat per</text:p>
          </table:table-cell>
          <table:covered-table-cell/>
          <table:covered-table-cell/>
        </table:table-row>
        <table:table-row table:style-name="Tabla3.1">
          <table:table-cell table:style-name="Tabla3.A2" office:value-type="string">
            <text:p text:style-name="P36">Nom</text:p>
          </table:table-cell>
          <table:table-cell table:style-name="Tabla3.B2" office:value-type="string">
            <text:p text:style-name="P37">Data</text:p>
          </table:table-cell>
          <table:table-cell table:style-name="Tabla3.C2" office:value-type="string">
            <text:p text:style-name="P37">Àrea, departament o empresa</text:p>
          </table:table-cell>
        </table:table-row>
        <table:table-row table:style-name="Tabla3.1">
          <table:table-cell table:style-name="Tabla3.A3" office:value-type="string">
            <text:p text:style-name="P64"/>
          </table:table-cell>
          <table:table-cell table:style-name="Tabla3.B3" office:value-type="string">
            <text:p text:style-name="P64"/>
          </table:table-cell>
          <table:table-cell table:style-name="Tabla3.C3" office:value-type="string">
            <text:p text:style-name="P64"/>
          </table:table-cell>
        </table:table-row>
        <table:table-row table:style-name="Tabla3.1">
          <table:table-cell table:style-name="Tabla3.A4" office:value-type="string">
            <text:p text:style-name="P98"/>
          </table:table-cell>
          <table:table-cell table:style-name="Tabla3.B4" office:value-type="string">
            <text:p text:style-name="P98"/>
          </table:table-cell>
          <table:table-cell table:style-name="Tabla3.C4" office:value-type="string">
            <text:p text:style-name="P98"/>
          </table:table-cell>
        </table:table-row>
        <table:table-row table:style-name="Tabla3.1">
          <table:table-cell table:style-name="Tabla3.A5" office:value-type="string">
            <text:p text:style-name="P98"/>
          </table:table-cell>
          <table:table-cell table:style-name="Tabla3.B5" office:value-type="string">
            <text:p text:style-name="P98"/>
          </table:table-cell>
          <table:table-cell table:style-name="Tabla3.C5" office:value-type="string">
            <text:p text:style-name="P98"/>
          </table:table-cell>
        </table:table-row>
        <table:table-row table:style-name="Tabla3.1">
          <table:table-cell table:style-name="Tabla3.A6" office:value-type="string">
            <text:p text:style-name="P98"/>
          </table:table-cell>
          <table:table-cell table:style-name="Tabla3.B6" office:value-type="string">
            <text:p text:style-name="P98"/>
          </table:table-cell>
          <table:table-cell table:style-name="Tabla3.C6" office:value-type="string">
            <text:p text:style-name="P98"/>
          </table:table-cell>
        </table:table-row>
      </table:table>
      <text:p text:style-name="P2"/>
      <text:p text:style-name="P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99">Aprovat per</text:p>
          </table:table-cell>
          <table:covered-table-cell/>
          <table:covered-table-cell/>
        </table:table-row>
        <table:table-row table:style-name="Tabla4.1">
          <table:table-cell table:style-name="Tabla4.A2" office:value-type="string">
            <text:p text:style-name="P36">Nom</text:p>
          </table:table-cell>
          <table:table-cell table:style-name="Tabla4.B2" office:value-type="string">
            <text:p text:style-name="P37">Data</text:p>
          </table:table-cell>
          <table:table-cell table:style-name="Tabla4.C2" office:value-type="string">
            <text:p text:style-name="P37">Àrea, departament o empresa</text:p>
          </table:table-cell>
        </table:table-row>
        <table:table-row table:style-name="Tabla4.1">
          <table:table-cell table:style-name="Tabla4.A3" office:value-type="string">
            <text:p text:style-name="P64"/>
          </table:table-cell>
          <table:table-cell table:style-name="Tabla4.B3" office:value-type="string">
            <text:p text:style-name="P64"/>
          </table:table-cell>
          <table:table-cell table:style-name="Tabla4.C3" office:value-type="string">
            <text:p text:style-name="P64"/>
          </table:table-cell>
        </table:table-row>
        <table:table-row table:style-name="Tabla4.1">
          <table:table-cell table:style-name="Tabla4.A4" office:value-type="string">
            <text:p text:style-name="P98"/>
          </table:table-cell>
          <table:table-cell table:style-name="Tabla4.B4" office:value-type="string">
            <text:p text:style-name="P98"/>
          </table:table-cell>
          <table:table-cell table:style-name="Tabla4.C4" office:value-type="string">
            <text:p text:style-name="P98"/>
          </table:table-cell>
        </table:table-row>
        <table:table-row table:style-name="Tabla4.1">
          <table:table-cell table:style-name="Tabla4.A5" office:value-type="string">
            <text:p text:style-name="P98"/>
          </table:table-cell>
          <table:table-cell table:style-name="Tabla4.B5" office:value-type="string">
            <text:p text:style-name="P98"/>
          </table:table-cell>
          <table:table-cell table:style-name="Tabla4.C5" office:value-type="string">
            <text:p text:style-name="P98"/>
          </table:table-cell>
        </table:table-row>
        <table:table-row table:style-name="Tabla4.1">
          <table:table-cell table:style-name="Tabla4.A6" office:value-type="string">
            <text:p text:style-name="P98"/>
          </table:table-cell>
          <table:table-cell table:style-name="Tabla4.B6" office:value-type="string">
            <text:p text:style-name="P98"/>
          </table:table-cell>
          <table:table-cell table:style-name="Tabla4.C6" office:value-type="string">
            <text:p text:style-name="P98"/>
          </table:table-cell>
        </table:table-row>
      </table:table>
      <text:p text:style-name="P2"/>
      <text:p text:style-name="P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99">Llista de distribució</text:p>
          </table:table-cell>
          <table:covered-table-cell/>
          <table:covered-table-cell/>
        </table:table-row>
        <table:table-row table:style-name="Tabla5.1">
          <table:table-cell table:style-name="Tabla5.A2" office:value-type="string">
            <text:p text:style-name="P36">Nom</text:p>
          </table:table-cell>
          <table:table-cell table:style-name="Tabla5.B2" office:value-type="string">
            <text:p text:style-name="P37">Àrea, departament o empresa</text:p>
          </table:table-cell>
          <table:table-cell table:style-name="Tabla5.C2" office:value-type="string">
            <text:p text:style-name="P37">Correu electrònic</text:p>
          </table:table-cell>
        </table:table-row>
        <table:table-row table:style-name="Tabla5.1">
          <table:table-cell table:style-name="Tabla5.A3" office:value-type="string">
            <text:p text:style-name="P64"/>
          </table:table-cell>
          <table:table-cell table:style-name="Tabla5.B3" office:value-type="string">
            <text:p text:style-name="P64"/>
          </table:table-cell>
          <table:table-cell table:style-name="Tabla5.C3" office:value-type="string">
            <text:p text:style-name="P64"/>
          </table:table-cell>
        </table:table-row>
        <table:table-row table:style-name="Tabla5.1">
          <table:table-cell table:style-name="Tabla5.A4" office:value-type="string">
            <text:p text:style-name="P98"/>
          </table:table-cell>
          <table:table-cell table:style-name="Tabla5.B4" office:value-type="string">
            <text:p text:style-name="P98"/>
          </table:table-cell>
          <table:table-cell table:style-name="Tabla5.C4" office:value-type="string">
            <text:p text:style-name="P98"/>
          </table:table-cell>
        </table:table-row>
      </table:table>
      <text:p text:style-name="P23"/>
      <text:p text:style-name="P13"/>
      <text:p text:style-name="P10"/>
      <text:p text:style-name="P76"/>
      <text:p text:style-name="P76"/>
      <text:p text:style-name="P76"/>
      <text:p text:style-name="P76"/>
      <text:p text:style-name="P76"/>
      <text:p text:style-name="P76"><text:soft-page-break/></text:p>
      <text:p text:style-name="P76"/>
      <text:p text:style-name="P76">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21"><text:a xlink:type="simple" xlink:href="#__RefHeading___Toc1440_1726870378" text:style-name="Index_20_Link" text:visited-style-name="Index_20_Link">Control de versions del document<text:tab/>2</text:a></text:p>
          <text:p text:style-name="P121"><text:a xlink:type="simple" xlink:href="#__RefHeading___Toc32799_3233606579" text:style-name="Index_20_Link" text:visited-style-name="Index_20_Link"><text:s/>1 Introducció<text:tab/>4</text:a></text:p>
          <text:p text:style-name="P121"><text:a xlink:type="simple" xlink:href="#__RefHeading___Toc32801_3233606579" text:style-name="Index_20_Link" text:visited-style-name="Index_20_Link"><text:s/>2 Usuari<text:tab/>5</text:a></text:p>
          <text:p text:style-name="P122"><text:a xlink:type="simple" xlink:href="#__RefHeading___Toc2741_1726870378" text:style-name="Index_20_Link" text:visited-style-name="Index_20_Link">2.1. Contingut de bústies<text:tab/>5</text:a></text:p>
          <text:p text:style-name="P123"><text:a xlink:type="simple" xlink:href="#__RefHeading___Toc2743_1726870378" text:style-name="Index_20_Link" text:visited-style-name="Index_20_Link">2.1.1. Llista d'anotacions de registre<text:tab/>6</text:a></text:p>
          <text:p text:style-name="P123"><text:a xlink:type="simple" xlink:href="#__RefHeading___Toc2745_1726870378" text:style-name="Index_20_Link" text:visited-style-name="Index_20_Link">2.1.2. Filtre del llistat d'anotacions de registre<text:tab/>9</text:a></text:p>
          <text:p text:style-name="P123"><text:a xlink:type="simple" xlink:href="#__RefHeading___Toc2747_1726870378" text:style-name="Index_20_Link" text:visited-style-name="Index_20_Link">2.1.3. Accions sobre les anotacions de registre<text:tab/>10</text:a></text:p>
          <text:p text:style-name="P124"><text:a xlink:type="simple" xlink:href="#__RefHeading___Toc9611_678410495" text:style-name="Index_20_Link" text:visited-style-name="Index_20_Link">2.1.3.1. Detalls<text:tab/>11</text:a></text:p>
          <text:p text:style-name="P125"><text:a xlink:type="simple" xlink:href="#__RefHeading___Toc9613_678410495" text:style-name="Index_20_Link" text:visited-style-name="Index_20_Link"><text:s/>2.1.3.1.1 Resum<text:tab/>11</text:a></text:p>
          <text:p text:style-name="P125"><text:a xlink:type="simple" xlink:href="#__RefHeading___Toc9615_678410495" text:style-name="Index_20_Link" text:visited-style-name="Index_20_Link"><text:s/>2.1.3.1.2 Informació de registre<text:tab/>11</text:a></text:p>
          <text:p text:style-name="P125"><text:a xlink:type="simple" xlink:href="#__RefHeading___Toc9617_678410495" text:style-name="Index_20_Link" text:visited-style-name="Index_20_Link"><text:s/>2.1.3.1.3 Interessats<text:tab/>13</text:a></text:p>
          <text:p text:style-name="P125"><text:a xlink:type="simple" xlink:href="#__RefHeading___Toc9619_678410495" text:style-name="Index_20_Link" text:visited-style-name="Index_20_Link"><text:s/>2.1.3.1.4 Annexos<text:tab/>14</text:a></text:p>
          <text:p text:style-name="P125"><text:a xlink:type="simple" xlink:href="#__RefHeading___Toc9621_678410495" text:style-name="Index_20_Link" text:visited-style-name="Index_20_Link"><text:s/>2.1.3.1.5 Arxiu Info<text:tab/>15</text:a></text:p>
          <text:p text:style-name="P125"><text:a xlink:type="simple" xlink:href="#__RefHeading___Toc9623_678410495" text:style-name="Index_20_Link" text:visited-style-name="Index_20_Link"><text:s/>2.1.3.1.6 Processament automàtic<text:tab/>16</text:a></text:p>
          <text:p text:style-name="P125"><text:a xlink:type="simple" xlink:href="#__RefHeading___Toc9625_678410495" text:style-name="Index_20_Link" text:visited-style-name="Index_20_Link"><text:s/>2.1.3.1.7 Processament backoffice<text:tab/>17</text:a></text:p>
          <text:p text:style-name="P124"><text:a xlink:type="simple" xlink:href="#__RefHeading___Toc2759_1726870378" text:style-name="Index_20_Link" text:visited-style-name="Index_20_Link">2.1.3.2. Històric d'accions<text:tab/>17</text:a></text:p>
          <text:p text:style-name="P125"><text:a xlink:type="simple" xlink:href="#__RefHeading___Toc2761_1726870378" text:style-name="Index_20_Link" text:visited-style-name="Index_20_Link"><text:s/>2.1.3.2.1 Resum<text:tab/>18</text:a></text:p>
          <text:p text:style-name="P125"><text:a xlink:type="simple" xlink:href="#__RefHeading___Toc37402_3531032951" text:style-name="Index_20_Link" text:visited-style-name="Index_20_Link"><text:s/>2.1.3.2.2 Accions<text:tab/>18</text:a></text:p>
          <text:p text:style-name="P125"><text:a xlink:type="simple" xlink:href="#__RefHeading___Toc2763_1726870378" text:style-name="Index_20_Link" text:visited-style-name="Index_20_Link"><text:s/>2.1.3.2.3 Moviments<text:tab/>18</text:a></text:p>
          <text:p text:style-name="P125"><text:a xlink:type="simple" xlink:href="#__RefHeading___Toc2765_1726870378" text:style-name="Index_20_Link" text:visited-style-name="Index_20_Link"><text:s/>2.1.3.2.4 Auditoria<text:tab/>19</text:a></text:p>
          <text:p text:style-name="P124"><text:a xlink:type="simple" xlink:href="#__RefHeading___Toc2767_1726870378" text:style-name="Index_20_Link" text:visited-style-name="Index_20_Link">2.1.3.3. Reenviar<text:tab/>19</text:a></text:p>
          <text:p text:style-name="P125"><text:a xlink:type="simple" xlink:href="#__RefHeading___Toc4026_1810852831" text:style-name="Index_20_Link" text:visited-style-name="Index_20_Link"><text:s/>2.1.3.3.1 Bústies favorits<text:tab/>20</text:a></text:p>
          <text:p text:style-name="P124"><text:a xlink:type="simple" xlink:href="#__RefHeading___Toc2769_1726870378" text:style-name="Index_20_Link" text:visited-style-name="Index_20_Link">2.1.3.4. Marcar com a processat<text:tab/>21</text:a></text:p>
          <text:p text:style-name="P124"><text:a xlink:type="simple" xlink:href="#__RefHeading___Toc2769_17268703781" text:style-name="Index_20_Link" text:visited-style-name="Index_20_Link">2.1.3.5. Marcar com a pendent<text:tab/>21</text:a></text:p>
          <text:p text:style-name="P124"><text:a xlink:type="simple" xlink:href="#__RefHeading___Toc2771_1726870378" text:style-name="Index_20_Link" text:visited-style-name="Index_20_Link">2.1.3.6. Llistat d'alertes<text:tab/>21</text:a></text:p>
          <text:p text:style-name="P123"><text:a xlink:type="simple" xlink:href="#__RefHeading___Toc2773_1726870378" text:style-name="Index_20_Link" text:visited-style-name="Index_20_Link">2.1.4. Comentaris sobre els continguts<text:tab/>22</text:a></text:p>
          <text:p text:style-name="P123"><text:a xlink:type="simple" xlink:href="#__RefHeading___Toc2797_992022433" text:style-name="Index_20_Link" text:visited-style-name="Index_20_Link">2.1.5. Classificació d'anotacions<text:tab/>23</text:a></text:p>
          <text:p text:style-name="P124"><text:a xlink:type="simple" xlink:href="#__RefHeading___Toc2672_992022433" text:style-name="Index_20_Link" text:visited-style-name="Index_20_Link">2.1.5.1. Classificació simple<text:tab/>23</text:a></text:p>
          <text:p text:style-name="P124"><text:a xlink:type="simple" xlink:href="#__RefHeading___Toc2674_992022433" text:style-name="Index_20_Link" text:visited-style-name="Index_20_Link">2.1.5.2. Classificació múltiple<text:tab/>25</text:a></text:p>
          <text:p text:style-name="P123"><text:a xlink:type="simple" xlink:href="#__RefHeading___Toc4232_1810852831" text:style-name="Index_20_Link" text:visited-style-name="Index_20_Link">2.1.6. Reserva/agafar d’anotacions<text:tab/>26</text:a></text:p>
          <text:p text:style-name="P121"><text:a xlink:type="simple" xlink:href="#__RefHeading___Toc32805_3233606579" text:style-name="Index_20_Link" text:visited-style-name="Index_20_Link"><text:s/>3 Opcions d'usuari<text:tab/>28</text:a></text:p>
          <text:p text:style-name="P122"><text:a xlink:type="simple" xlink:href="#__RefHeading___Toc32807_3233606579" text:style-name="Index_20_Link" text:visited-style-name="Index_20_Link">3.1. Configuració usuari<text:tab/>28</text:a></text:p>
        </text:index-body>
      </text:table-of-content>
      <text:p text:style-name="Standard"/>
      <text:h text:style-name="P128" text:outline-level="1"><text:bookmark-start text:name="__RefHeading___Toc32799_3233606579"/>Introducció<text:bookmark-end text:name="__RefHeading___Toc32799_3233606579"/></text:h>
      <text:p text:style-name="P17"/>
      <text:p text:style-name="P77"><text:span text:style-name="T91">L'aplicació de DISTRIBUCIO s'encarrega de rebre altes d'anotacions de registre via WS. </text:span><text:span text:style-name="T107">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08">backoffice </text:span><text:span text:style-name="T109">de DISTRIBUCIO.</text:span></text:p>
      <text:p text:style-name="P92"/>
      <text:p text:style-name="P92"><draw:frame draw:style-name="fr1" draw:name="Frame1" text:anchor-type="paragraph" svg:width="13.404cm" draw:z-index="32"><draw:text-box fo:min-height="3.048cm"><text:p text:style-name="fig."><draw:frame draw:style-name="fr14" draw:name="Image3" text:anchor-type="as-char" svg:width="13.404cm" style:rel-width="100%" svg:height="3.048cm" style:rel-height="scale" draw:z-index="36"><draw:image xlink:href="Pictures/10000000000002750000008FD442AA45.png" xlink:type="simple" xlink:show="embed" xlink:actuate="onLoad" draw:mime-type="image/png"/></draw:frame><text:span text:style-name="T113"><text:line-break/></text:span>fig. <text:sequence text:ref-name="reffig.0" text:name="fig." text:formula="ooow:fig.+1" style:num-format="1">1</text:sequence>: Logotip en la capçalera de l'aplicació de DISTRIBUCIO.</text:p></draw:text-box></draw:frame></text:p>
      <text:p text:style-name="P18">La interfície web de l'aplicació de DISTRIBUCIÓ permet l'accés a un usuari identificat i l'usuari pot ser de 3 tipus:</text:p>
      <text:p text:style-name="P54"/>
      <text:p text:style-name="P14"><text:span text:style-name="T10"><text:tab/>1. </text:span><text:a xlink:type="simple" xlink:href="#2.Usuari|outline" text:style-name="Internet_20_link" text:visited-style-name="Visited_20_Internet_20_Link"><text:span text:style-name="T10">Usuari</text:span></text:a><text:span text:style-name="T85">: Són els usuaris que poden gestionar anotacions de DISTRIBUCIO per a les bústies sobre les quals tinguin permís d'accés per a una entitat específica. El rol que ha de tenir l'usuari per accedir com a tipus usuari és DIS_USER. </text:span></text:p>
      <text:p text:style-name="P54"><text:tab/>2. <text:a xlink:type="simple" xlink:href="#3.Administrador|outline" text:style-name="Internet_20_link" text:visited-style-name="Visited_20_Internet_20_Link">Administrador</text:a><text:span text:style-name="T106">: Els usuaris de tipus administrador d'entitat pot gestionar bústies i permisos per a usuaris d'aquestes bústies per a les diferents unitats organitzatives que depenen de l'entitat arrel de l'entorn. El rol que ha de t</text:span><text:span text:style-name="T115">enir un usuari administrador per poder administrar entitats és DIS_ADMIN i ha de tenir permís d'administrador sobre l'entitat.</text:span></text:p>
      <text:p text:style-name="P53"><text:span text:style-name="T114"><text:tab/>3. </text:span><text:a xlink:type="simple" xlink:href="#4.Superusuari|outline" text:style-name="Internet_20_link" text:visited-style-name="Visited_20_Internet_20_Link"><text:span text:style-name="T115">Superusuari</text:span></text:a><text:span text:style-name="T115">: Els usuaris de tipus Superusuari poden definir entitats arrels i accedir a paràmetres i monitoratge de DISTRIBUCIO a nivell general. Per a que un usuari pugui actuar com a Superusuari ha de tenir el rol assignat de DIS_SUPER.</text:span></text:p>
      <text:p text:style-name="P79"><draw:frame draw:style-name="fr32" draw:name="Image5" text:anchor-type="paragraph" svg:x="14.418cm" svg:y="0.33cm" svg:width="0.688cm" svg:height="0.609cm" draw:z-index="33"><draw:image xlink:href="Pictures/100000000000001A0000001764E3CB42.png" xlink:type="simple" xlink:show="embed" xlink:actuate="onLoad" draw:mime-type="image/png"/></draw:frame></text:p>
      <text:p text:style-name="P80">Si un usuari té permís d'accés a més d'una entitat la pot escollir des del desplegable de la capçalera.</text:p>
      <text:p text:style-name="P80"/>
      <text:p text:style-name="P80"><draw:frame draw:style-name="fr1" draw:name="Frame2" text:anchor-type="paragraph" svg:width="12.885cm" draw:z-index="38"><draw:text-box fo:min-height="2.514cm"><text:p text:style-name="fig."><draw:frame draw:style-name="fr14" draw:name="Image6" text:anchor-type="as-char" svg:width="12.885cm" style:rel-width="100%" svg:height="2.514cm" style:rel-height="scale" draw:z-index="39"><draw:image xlink:href="Pictures/10000000000001E70000005F3D868FE3.png" xlink:type="simple" xlink:show="embed" xlink:actuate="onLoad" draw:mime-type="image/png"/></draw:frame><text:span text:style-name="T113"><text:line-break/></text:span>fig. <text:sequence text:ref-name="reffig.1" text:name="fig." text:formula="ooow:fig.+1" style:num-format="1">2</text:sequence>: Opció desplegable per seleccionar l'enitat amb què treballar.</text:p></draw:text-box></draw:frame></text:p>
      <text:p text:style-name="P80"/>
      <text:p text:style-name="P80"/>
      <text:p text:style-name="P80"><draw:frame draw:style-name="fr17" draw:name="Image7" text:anchor-type="paragraph" svg:x="2.021cm" svg:y="0.459cm" svg:width="0.635cm" svg:height="0.503cm" draw:z-index="37"><draw:image xlink:href="Pictures/100000000000001800000013C4DED6E2.png" xlink:type="simple" xlink:show="embed" xlink:actuate="onLoad" draw:mime-type="image/png"/></draw:frame>Si un usuari disposa de diferents rols llavors pot pot escollir el rol amb què treballar amb el menú desplegable de la capçalera.</text:p>
      <text:p text:style-name="P80"/>
      <text:p text:style-name="P80"><draw:frame draw:style-name="fr1" draw:name="Frame3" text:anchor-type="paragraph" svg:width="10.689cm" draw:z-index="42"><draw:text-box fo:min-height="2.672cm"><text:p text:style-name="fig."><draw:frame draw:style-name="fr14" draw:name="Image8" text:anchor-type="as-char" svg:width="10.689cm" style:rel-width="100%" svg:height="2.672cm" style:rel-height="scale" draw:z-index="43"><draw:image xlink:href="Pictures/10000000000001940000006567358005.png" xlink:type="simple" xlink:show="embed" xlink:actuate="onLoad" draw:mime-type="image/png"/></draw:frame><text:span text:style-name="T113"><text:line-break/></text:span>fig. <text:sequence text:ref-name="reffig.2" text:name="fig." text:formula="ooow:fig.+1" style:num-format="1">3</text:sequence>: Opció desplegable per seleccionar el tipus d'usuari amb què fer feina.</text:p></draw:text-box></draw:frame><text:soft-page-break/></text:p>
      <text:p text:style-name="P80"/>
      <text:p text:style-name="P78"><draw:frame draw:style-name="fr13" draw:name="Image10" text:anchor-type="paragraph" svg:x="3.122cm" svg:y="0.471cm" svg:width="0.556cm" svg:height="0.609cm" draw:z-index="110"><draw:image xlink:href="Pictures/1000000000000015000000172198EC24.png" xlink:type="simple" xlink:show="embed" xlink:actuate="onLoad" draw:mime-type="image/png"/></draw:frame><text:span text:style-name="T116">Segons el tipus d'usuari seleccionat l'usuari tindrà accés a diferents opcions i pantalle</text:span><text:span text:style-name="T117">s</text:span><text:span text:style-name="T116"> que es descriuen en els següents apartats.</text:span><text:span text:style-name="T117"> </text:span></text:p>
      <text:h text:style-name="Heading_20_1" text:outline-level="1"><text:bookmark-start text:name="__RefHeading___Toc32801_3233606579"/>Usuari<text:bookmark-end text:name="__RefHeading___Toc32801_3233606579"/></text:h>
      <text:p text:style-name="P81"/>
      <text:p text:style-name="P82">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86"/>
      <text:p text:style-name="P87"><text:span text:style-name="T12">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14">DISTRIBUCIÓ</text:span><text:span text:style-name="T12"> rebi </text:span><text:span text:style-name="T48">noves</text:span><text:span text:style-name="T12"> anotacions de registre, de manera que es distribuiran aquests assentaments dins les bústies corresponents segons dicti la regla definida.</text:span><text:span text:style-name="T15"> Els usuaris amb rol d'usuari normal podran accedir al contingut de les bústies per veure </text:span><text:span text:style-name="T49"><text:s/></text:span><text:span text:style-name="T48">les anotacions de registre i processar-les</text:span><text:span text:style-name="T15">.</text:span></text:p>
      <text:p text:style-name="P30"/>
      <text:p text:style-name="P30">D'aquesta manera, els usuaris distribuïdors, tindran accés al contingut de les bústies a les quals tinguin permís.</text:p>
      <text:h text:style-name="Heading_20_2" text:outline-level="2"><text:bookmark-start text:name="__RefHeading___Toc2741_1726870378"/>Contingut de bústies<text:bookmark-end text:name="__RefHeading___Toc2741_1726870378"/></text:h>
      <text:p text:style-name="P106"><text:span text:style-name="T121">La pàgina de contingut de bústies és la única pàgina a la que es pot accedir amb el rol d'usuari normal. També es pot recarregar o accedir amb l'opció </text:span><text:span text:style-name="T122"><text:s/></text:span><text:span text:style-name="T12">del menú principal que es troba la part superior dreta, en la capçalera de l'aplicació.</text:span><text:span text:style-name="T13"> Aquest també botó mostra la quantitat d'anotacions de registre pendents de processar</text:span><text:span text:style-name="T47">.</text:span></text:p>
      <text:p text:style-name="P30"/>
      <text:p text:style-name="P15"><draw:frame draw:style-name="fr5" draw:name="Frame6" text:anchor-type="as-char" svg:width="12.33cm" draw:z-index="117"><draw:text-box fo:min-height="3.556cm"><text:p text:style-name="fig."><draw:frame draw:style-name="fr34" draw:name="Imagen 1" text:anchor-type="as-char" svg:width="12.33cm" style:rel-width="100%" svg:height="3.556cm" style:rel-height="scale" draw:z-index="118"><draw:image xlink:href="Pictures/10000000000001F8000000CE745EE705.png" xlink:type="simple" xlink:show="embed" xlink:actuate="onLoad" draw:mime-type="image/png"/></draw:frame><text:span text:style-name="T113"><text:line-break/></text:span>fig. <text:sequence text:ref-name="reffig.3" text:name="fig." text:formula="ooow:fig.+1" style:num-format="1">4</text:sequence>: Botó per accedir al contingut de les bústies i amb el número d'anotacions de registre pendents de processar.</text:p></draw:text-box></draw:frame></text:p>
      <text:p text:style-name="P30"/>
      <text:p text:style-name="P59">Quan s'accedeix al contingut de bústies es disposa d'una capçalera amb un formulari de filtre per filtrar el llistat i el llistat amb el resultat de les consultes.</text:p>
      <text:p text:style-name="P60"><text:soft-page-break/><draw:frame draw:style-name="fr27" draw:name="Imagen 182" text:anchor-type="as-char" svg:y="0cm" svg:width="17cm" style:rel-width="scale" svg:height="5.412cm" style:rel-height="scale" draw:z-index="119"><draw:image xlink:href="Pictures/10000001000004F200000193BEFC143A.png" xlink:type="simple" xlink:show="embed" xlink:actuate="onLoad" draw:mime-type="image/png"/><svg:desc>Captura de pantalla de computadora

Descripción generada automáticamente</svg:desc></draw:frame>fig. <text:sequence text:ref-name="reffig.4" text:name="fig." text:formula="ooow:fig.+1" style:num-format="1">5</text:sequence>: Pantalla de contingut de bústies per a usuaris amb el filtre i el llistat.</text:p>
      <text:p text:style-name="P94"><text:span text:style-name="T56">En els següents subapartats es descriuen la part del llistat i la del fi</text:span><text:span text:style-name="T48">l</text:span><text:span text:style-name="T56">tre.</text:span></text:p>
      <text:p text:style-name="P30"/>
      <text:h text:style-name="Heading_20_3" text:outline-level="3"><text:bookmark-start text:name="__RefHeading___Toc2743_1726870378"/>Llista d'anotacions de registre<text:bookmark-end text:name="__RefHeading___Toc2743_1726870378"/></text:h>
      <text:p text:style-name="P93"><text:span text:style-name="T12">La llista, per defecte mostra </text:span><text:span text:style-name="T48">les</text:span><text:span text:style-name="T12"> anotacions de registre </text:span><text:span text:style-name="T24">amb un estat pendent de processar</text:span><text:span text:style-name="T50"> </text:span><text:span text:style-name="T12">ordena</text:span><text:span text:style-name="T24">des </text:span><text:span text:style-name="T12">per data descendent</text:span><text:span text:style-name="T24"> d'arribada.</text:span></text:p>
      <text:p text:style-name="P63"><draw:frame draw:style-name="fr24" draw:name="Imatge14" text:anchor-type="char" svg:width="17cm" svg:height="3.625cm" draw:z-index="111"><draw:image xlink:href="Pictures/10000001000004F20000010EF49B8E70.png" xlink:type="simple" xlink:show="embed" xlink:actuate="onLoad" draw:mime-type="image/png"/></draw:frame></text:p>
      <text:p text:style-name="P116"><text:span text:style-name="T24">fig. </text:span><text:span text:style-name="T24"><text:sequence text:ref-name="reffig.5" text:name="fig." text:formula="ooow:fig.+1" style:num-format="1">6</text:sequence></text:span><text:span text:style-name="T24">: Exemple de llistat d'anotacions de registre.</text:span></text:p>
      <text:p text:style-name="P58">La informació que es mostra, columna a columna és la següent:</text:p>
      <text:p text:style-name="P30"/>
      <text:list xml:id="list4294728416" text:style-name="WWNum2">
        <text:list-item>
          <text:p text:style-name="P137"><text:span text:style-name="T60">Número</text:span><text:span text:style-name="T16">: </text:span><text:span text:style-name="T50">Número de l'anotació de registre compost pel llibre, número de llibre, número de registre i any</text:span><text:span text:style-name="T12">.</text:span></text:p>
        </text:list-item>
        <text:list-item>
          <text:p text:style-name="P140"><text:span text:style-name="T5">T</text:span><text:span text:style-name="T3">ítol: </text:span><text:span text:style-name="T39">Extracte de l'anotació de registre.</text:span></text:p>
        </text:list-item>
        <text:list-item>
          <text:p text:style-name="P138"><text:span text:style-name="T76">D</text:span><text:span text:style-name="T77">ocumentació</text:span><text:span text:style-name="T8">:</text:span><text:span text:style-name="T41"> Icona per indicar el tipus de documentació de l'anotació.</text:span></text:p>
        </text:list-item>
      </text:list>
      <text:list text:style-name="L1">
        <text:list-item>
          <text:list>
            <text:list-item>
              <text:p text:style-name="P141"><text:span text:style-name="T41"><draw:frame draw:style-name="fr31" draw:name="Image15" text:anchor-type="as-char" svg:y="-0.3cm" svg:width="0.318cm" svg:height="0.37cm" draw:z-index="120"><draw:image xlink:href="Pictures/100000000000000C0000000E25855A0E.png" xlink:type="simple" xlink:show="embed" xlink:actuate="onLoad" draw:mime-type="image/png"/></draw:frame></text:span><text:span text:style-name="T40"><text:s/></text:span><text:span text:style-name="T41">Documentació adjunta digita</text:span><text:span text:style-name="T40">litzada.</text:span></text:p>
            </text:list-item>
            <text:list-item>
              <text:p text:style-name="P141"><text:span text:style-name="T40"><draw:frame draw:style-name="fr30" draw:name="Image59" text:anchor-type="as-char" svg:width="0.714cm" svg:height="0.37cm" draw:z-index="121"><draw:image xlink:href="Pictures/100000000000001B0000000E03D4C585.png" xlink:type="simple" xlink:show="embed" xlink:actuate="onLoad" draw:mime-type="image/png"/></draw:frame></text:span><text:span text:style-name="T40"><text:s/>Documentació adjunta digitalitzada i complementàriament en paper.</text:span></text:p>
            </text:list-item>
            <text:list-item>
              <text:p text:style-name="P141"><text:span text:style-name="T40"><draw:frame draw:style-name="fr30" draw:name="Image60" text:anchor-type="as-char" svg:width="0.344cm" svg:height="0.291cm" draw:z-index="54"><draw:image xlink:href="Pictures/100000000000000D0000000BC2F71D36.png" xlink:type="simple" xlink:show="embed" xlink:actuate="onLoad" draw:mime-type="image/png"/></draw:frame></text:span><text:span text:style-name="T40"><text:s/>Documentació adjunta en suport PAPER (o altres suports)</text:span></text:p>
            </text:list-item>
          </text:list>
        </text:list-item>
      </text:list>
      <text:list text:continue-list="list4294728416" text:style-name="WWNum2">
        <text:list-item>
          <text:p text:style-name="P139"><text:span text:style-name="T5">Origen núm</text:span><text:span text:style-name="T3">:</text:span><text:span text:style-name="T1"> </text:span><text:span text:style-name="T38">Referència al número de registre original.</text:span></text:p>
        </text:list-item>
        <text:list-item>
          <text:p text:style-name="P142"><text:span text:style-name="T3">Remitent:</text:span><text:span text:style-name="T1"> Nom de l'usuari remitent de l'anotació de registre.</text:span></text:p>
        </text:list-item>
        <text:list-item>
          <text:p text:style-name="P143"><text:span text:style-name="T3">Data:</text:span><text:span text:style-name="T1"> Data de la recepció de l'anotació de registre per part de </text:span><text:span text:style-name="T11">DISTRIBUCIÓ</text:span><text:span text:style-name="T1">.</text:span></text:p>
        </text:list-item>
        <text:list-item>
          <text:p text:style-name="P143"><draw:frame draw:style-name="fr32" draw:name="Image16" text:anchor-type="paragraph" svg:x="13.496cm" svg:y="0.45cm" svg:width="0.635cm" svg:height="0.503cm" draw:z-index="50"><draw:image xlink:href="Pictures/1000000000000018000000130A930745.png" xlink:type="simple" xlink:show="embed" xlink:actuate="onLoad" draw:mime-type="image/png"/></draw:frame><text:span text:style-name="T3">Estat:</text:span><text:span text:style-name="T1"> </text:span><text:span text:style-name="T87">Estat en què es troba l'anotació de registre. Segons l'estat pot estar pendent de processar o processada. En la columna hi ha un botó per obrir un llistat amb l'explicació dels diferents estats. </text:span></text:p>
        </text:list-item>
      </text:list>
      <text:p text:style-name="P34"/>
      <text:p text:style-name="P68"><draw:frame draw:style-name="fr17" draw:name="Image18" text:anchor-type="paragraph" svg:x="13.536cm" svg:y="0cm" svg:width="0.556cm" svg:height="0.476cm" draw:z-index="107"><draw:image xlink:href="Pictures/1000000000000015000000126023418C.png" xlink:type="simple" xlink:show="embed" xlink:actuate="onLoad" draw:mime-type="image/png"/></draw:frame><draw:frame draw:style-name="fr10" draw:name="Frame11" text:anchor-type="char" svg:width="14.314cm" draw:z-index="102"><draw:text-box fo:min-height="14.949cm"><text:p text:style-name="fig."><draw:frame draw:style-name="fr15" draw:name="Image1" text:anchor-type="paragraph" svg:width="14.314cm" style:rel-width="100%" svg:height="14.949cm" style:rel-height="scale" draw:z-index="103"><draw:image xlink:href="Pictures/100000000000021D00000235A084615B.png" xlink:type="simple" xlink:show="embed" xlink:actuate="onLoad" draw:mime-type="image/png"/></draw:frame>fig. <text:sequence text:ref-name="reffig.6" text:name="fig." text:formula="ooow:fig.+1" style:num-format="1">7</text:sequence>: Llegenda amb els diferents estats en què es pot trobar una anotació de registre.</text:p></draw:text-box></draw:frame><text:soft-page-break/></text:p>
      <text:p text:style-name="P67">Si l'anotació ha estat enviada per email a algun destinatari llavors apareixerà la icona <text:s/>davant l'estat i si es posiciona el cursor a sobre es mostra la llista dels diferents enviaments.</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9" draw:name="Marc21" text:anchor-type="char" svg:width="11.271cm" draw:z-index="51"><draw:text-box fo:min-height="6.482cm"><text:p text:style-name="fig."><draw:frame draw:style-name="fr15" draw:name="Imatge15" text:anchor-type="paragraph" svg:width="11.271cm" style:rel-width="100%" svg:height="6.482cm" style:rel-height="scale" draw:z-index="52"><draw:image xlink:href="Pictures/10000001000001AA000000F53386F1C7.png" xlink:type="simple" xlink:show="embed" xlink:actuate="onLoad" draw:mime-type="image/png"/></draw:frame>fig. <text:sequence text:ref-name="reffig.7" text:name="fig." text:formula="ooow:fig.+1" style:num-format="1">8</text:sequence>: Exemple d'icona d'enviat per correu amb la informació dels enviaments i els destinataris.</text:p></draw:text-box></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38"/>
      <text:p text:style-name="P38"/>
      <text:p text:style-name="P38"/>
      <text:list text:continue-numbering="true" text:style-name="WWNum2">
        <text:list-item>
          <text:p text:style-name="P144"><text:span text:style-name="T9">Avisos</text:span><text:span text:style-name="T3">: </text:span><text:span text:style-name="T39">Columna amb una icona d'error si l'anotació de registre conté cap error. Si es posiciona el cursor sobre la icona d'error apareix el detall de l'error.</text:span></text:p>
          <text:p text:style-name="P163"><draw:frame draw:style-name="fr1" draw:name="Frame12" text:anchor-type="paragraph" svg:width="7.488cm" draw:z-index="112"><draw:text-box fo:min-height="3.466cm"><text:p text:style-name="fig."><text:span text:style-name="T113"><text:line-break/></text:span><draw:frame draw:style-name="fr27" draw:name="Imagen 146" text:anchor-type="as-char" svg:y="0cm" svg:width="8.149cm" style:rel-width="scale" svg:height="4.577cm" style:rel-height="scale" draw:z-index="122"><draw:image xlink:href="Pictures/1000000100000134000000AD81292649.png" xlink:type="simple" xlink:show="embed" xlink:actuate="onLoad" draw:mime-type="image/png"/><svg:desc>Interfaz de usuario gráfica, Aplicación, Tabla

Descripción generada automáticamente</svg:desc></draw:frame>fig. <text:sequence text:ref-name="reffig.8" text:name="fig." text:formula="ooow:fig.+1" style:num-format="1">9</text:sequence>: Exemple d'icona d'error a la columna Error.</text:p></draw:text-box></draw:frame></text:p>
        </text:list-item>
      </text:list>
      <text:p text:style-name="P69"/>
      <text:list text:continue-numbering="true" text:style-name="WWNum2">
        <text:list-item>
          <text:p text:style-name="P143"><text:span text:style-name="T3">Bústia:</text:span><text:span text:style-name="T1"> Bústia on s'ha distribuït l'anotació de registre. Es mostren els nivells de la jerarquia utilitzada per organitzar les bústies. </text:span></text:p>
        </text:list-item>
        <text:list-item>
          <text:p text:style-name="P143"><text:span text:style-name="T3">Comentaris: </text:span><text:span text:style-name="T1">Botó per a mostrar l'intercanvi de comentaris entre diferents usuaris.</text:span></text:p>
        </text:list-item>
        <text:list-item>
          <text:p text:style-name="P143"><text:span text:style-name="T3">Accions:</text:span><text:span text:style-name="T1"> Botó desplegable que mostra les diferents accions que es poden fer sobre una anotació de registre.</text:span></text:p>
        </text:list-item>
      </text:list>
      <text:p text:style-name="P32"/>
      <text:p text:style-name="P97"/>
      <text:p text:style-name="P96"><text:span text:style-name="Fuente_20_de_20_párrafo_20_predeter."><text:span text:style-name="T114"/></text:span></text:p>
      <text:p text:style-name="P96"><text:span text:style-name="Fuente_20_de_20_párrafo_20_predeter."><text:span text:style-name="T114">Just abans del llistat, a la part dreta, tenim un botó d’accions </text:span></text:span><text:span text:style-name="Fuente_20_de_20_párrafo_20_predeter."><text:span text:style-name="T114"><draw:frame draw:style-name="fr27" draw:name="Imagen 184" text:anchor-type="as-char" svg:y="-0.295cm" svg:width="1.931cm" style:rel-width="scale" svg:height="0.503cm" style:rel-height="scale" draw:z-index="123"><draw:image xlink:href="Pictures/10000001000000490000001396689F9A.png" xlink:type="simple" xlink:show="embed" xlink:actuate="onLoad" draw:mime-type="image/png"/></draw:frame></text:span></text:span><text:span text:style-name="Fuente_20_de_20_párrafo_20_predeter."><text:span text:style-name="T114"><text:s/>que ens permet fer diferents accions en grup amb totes les bústies que tinguin el seu checkbox activat.</text:span></text:span></text:p>
      <text:p text:style-name="P85"/>
      <text:p text:style-name="P96"><text:soft-page-break/><text:span text:style-name="Fuente_20_de_20_párrafo_20_predeter."><text:span text:style-name="T114"><draw:frame draw:style-name="fr27" draw:name="Imagen 186" text:anchor-type="as-char" svg:y="0cm" svg:width="17cm" style:rel-width="scale" svg:height="3.815cm" style:rel-height="scale" draw:z-index="55"><draw:image xlink:href="Pictures/10000001000004FA0000011E50C8F48D.png" xlink:type="simple" xlink:show="embed" xlink:actuate="onLoad" draw:mime-type="image/png"/><svg:desc>Interfaz de usuario gráfica

Descripción generada automáticamente</svg:desc></draw:frame></text:span></text:span></text:p>
      <text:p text:style-name="P84">fig. <text:sequence text:ref-name="reffig.10" text:name="fig." text:formula="ooow:fig.+1" style:num-format="1">10</text:sequence><text:span text:style-name="T134">:</text:span><text:span text:style-name="T133"> </text:span>Detall de com es poden fer accions en grup. </text:p>
      <text:p text:style-name="P30"/>
      <text:h text:style-name="Heading_20_3" text:outline-level="3"><text:bookmark-start text:name="__RefHeading___Toc2745_1726870378"/>Filtre del llistat d'anotacions de registre<text:bookmark-end text:name="__RefHeading___Toc2745_1726870378"/></text:h>
      <text:p text:style-name="P95"><draw:frame draw:style-name="fr33" draw:name="Image61" text:anchor-type="paragraph" svg:width="17cm" svg:height="2.907cm" draw:z-index="116"><draw:image xlink:href="Pictures/100000000000072D00000122BB1E4554.png" xlink:type="simple" xlink:show="embed" xlink:actuate="onLoad" draw:mime-type="image/png"/></draw:frame>fig. <text:sequence text:ref-name="reffig.11" text:name="fig." text:formula="ooow:fig.+1" style:num-format="1">11</text:sequence><text:span text:style-name="T134">:</text:span><text:span text:style-name="T133"> </text:span>Filtre pel llistat d'anotacions de registre.</text:p>
      <text:p text:style-name="P30"/>
      <text:p text:style-name="P30">Tal i com es mostra en la imatge, el llistat es podrà filtrar a partir dels següents camps:</text:p>
      <text:p text:style-name="P30"/>
      <text:list text:style-name="WWNum3">
        <text:list-item>
          <text:p text:style-name="P172"><text:span text:style-name="T16">Número: </text:span><text:span text:style-name="T25">Text per filtrar pel número de l'anotació de registre.</text:span></text:p>
        </text:list-item>
        <text:list-item>
          <text:p text:style-name="P170"><text:span text:style-name="T66">T</text:span><text:span text:style-name="T67">ítol</text:span><text:span text:style-name="T22">: </text:span><text:span text:style-name="T27">Text per filtrar </text:span><text:span text:style-name="T71">p</text:span><text:span text:style-name="T72">er l'extracte de l'antoació de registre</text:span><text:span text:style-name="T27">.</text:span></text:p>
        </text:list-item>
        <text:list-item>
          <text:p text:style-name="P173"><text:span text:style-name="T12">Origen núm.:</text:span><text:span text:style-name="T25"> Text per filtrar per la referència al número de registre original. </text:span></text:p>
        </text:list-item>
        <text:list-item>
          <text:p text:style-name="P171"><text:span text:style-name="T16">Remitent:</text:span><text:span text:style-name="T12"> Text lliure per filtrar </text:span><text:span text:style-name="T48">les</text:span><text:span text:style-name="T12"> anotacions de registre pel nom d'un remitent concret.</text:span></text:p>
        </text:list-item>
        <text:list-item>
          <text:p text:style-name="P171"><text:span text:style-name="T61">Interessat: </text:span><text:span text:style-name="T51">Camp lliure per buscar per interessat de l'anotació de registre.</text:span></text:p>
        </text:list-item>
        <text:list-item>
          <text:p text:style-name="P171"><text:span text:style-name="T16">Data recep.</text:span><text:span text:style-name="T12"> </text:span><text:span text:style-name="T16">inicial</text:span><text:span text:style-name="T12">: Camp tipus data per mostrar </text:span><text:span text:style-name="T48">les</text:span><text:span text:style-name="T12"> anotacions de registre rebuts pel </text:span><text:span text:style-name="T14">DISTRIBUCIÓ</text:span><text:span text:style-name="T12"> a partir d'una data concreta.</text:span></text:p>
        </text:list-item>
        <text:list-item>
          <text:p text:style-name="P171"><text:span text:style-name="T21">Data recep.</text:span><text:span text:style-name="T27"> </text:span><text:span text:style-name="T21">final</text:span><text:span text:style-name="T27">: Camp tipus data per mostrar les anotacions de registre rebuts pe</text:span><text:span text:style-name="T28">r</text:span><text:span text:style-name="T27"> </text:span><text:span text:style-name="T28">DISTRIBUCIÓ</text:span><text:span text:style-name="T27"> fins a una data concreta.</text:span></text:p>
        </text:list-item>
        <text:list-item>
          <text:p text:style-name="P176"><text:span text:style-name="T16">Unitat Organitzativa: </text:span><text:span text:style-name="T25">Desplegable per filtrar les anotacions que estiguin en una bústia de la unitat organitzativa escollida.</text:span><text:span text:style-name="T32"> Si se selecciona una unitat organitzativa llavors només es poden escollir bústies en el desplegable de filtre de bústies que pertanyin a la unitat organitzativa escollida.</text:span></text:p>
        </text:list-item>
        <text:list-item>
          <text:p text:style-name="P171"><draw:frame draw:style-name="fr32" draw:name="Imagen6" text:anchor-type="paragraph" svg:x="4.441cm" svg:y="1.411cm" svg:width="0.826cm" svg:height="0.626cm" draw:z-index="114"><draw:image xlink:href="Pictures/100000000000003E0000002F6AE360E0.png" xlink:type="simple" xlink:show="embed" xlink:actuate="onLoad" draw:mime-type="image/png"/></draw:frame><text:span text:style-name="T16">Bústia: </text:span><text:span text:style-name="T12">Desplegable que mostrarà la llista de bústies a les quals l'usuari distribuïdor té permisos. Filtrarà el contingut de la llista mostrant només </text:span><text:span text:style-name="T48">les</text:span><text:span text:style-name="T12"> anotacions de registre distribuïts en aquella bústia.</text:span><text:span text:style-name="T17"> </text:span><text:span text:style-name="T26">Si es prem el botó es mostraran les bústies inactives en la selecció de bústies i es mostrarà el contingut de les bústies inactives en el llistat.</text:span></text:p>
          <text:p text:style-name="P164"><text:span text:style-name="T73"/></text:p>
        </text:list-item>
        <text:list-item>
          <text:p text:style-name="P171"><text:span text:style-name="T61">Enviament email</text:span><text:span text:style-name="T23">: </text:span><text:span text:style-name="T33">Camp desplegable que per mostrar les anotacions de registre que s'han enviat per email, les que no s'han enviat o totes. Una anotació s'envia per correu electrònic quan s'ha guardat al registre i l'usuari escull l'opció d'enviar-la per email.</text:span></text:p>
        </text:list-item>
        <text:list-item>
          <text:p text:style-name="P171"><text:span text:style-name="T64">Documentació</text:span><text:span text:style-name="T19">:</text:span><text:span text:style-name="T31"> Filtre per tipus de documentació.</text:span></text:p>
        </text:list-item>
      </text:list>
      <text:list text:style-name="L2">
        <text:list-item>
          <text:list>
            <text:list-item text:start-value="1">
              <text:p text:style-name="P177"><draw:frame draw:style-name="fr31" draw:name="Image70" text:anchor-type="as-char" svg:y="-0.3cm" svg:width="0.318cm" svg:height="0.37cm" draw:z-index="124"><draw:image xlink:href="Pictures/100000000000000C0000000E25855A0E.png" xlink:type="simple" xlink:show="embed" xlink:actuate="onLoad" draw:mime-type="image/png"/></draw:frame><text:span text:style-name="T40"><text:s/></text:span><text:span text:style-name="T41">Documentació adjunta digita</text:span><text:span text:style-name="T40">litzada.</text:span></text:p>
            </text:list-item>
            <text:list-item>
              <text:p text:style-name="P177"><draw:frame draw:style-name="fr30" draw:name="Image71" text:anchor-type="as-char" svg:width="0.714cm" svg:height="0.37cm" draw:z-index="125"><draw:image xlink:href="Pictures/100000000000001B0000000E03D4C585.png" xlink:type="simple" xlink:show="embed" xlink:actuate="onLoad" draw:mime-type="image/png"/></draw:frame><text:span text:style-name="T40"><text:s/>Documentació adjunta digitalitzada i complementàriament en paper.</text:span></text:p>
            </text:list-item>
            <text:list-item>
              <text:p text:style-name="P177"><draw:frame draw:style-name="fr30" draw:name="Image72" text:anchor-type="as-char" svg:width="0.344cm" svg:height="0.291cm" draw:z-index="126"><draw:image xlink:href="Pictures/100000000000000D0000000BC2F71D36.png" xlink:type="simple" xlink:show="embed" xlink:actuate="onLoad" draw:mime-type="image/png"/></draw:frame><text:span text:style-name="T30"><text:s/>Documentació adjunta en suport PAPER (o altres suports)</text:span></text:p>
            </text:list-item>
          </text:list>
        </text:list-item>
      </text:list>
      <text:list text:style-name="L3">
        <text:list-item>
          <text:p text:style-name="P175"><text:span text:style-name="T57">Botó </text:span><text:span text:style-name="T57"><draw:frame draw:style-name="fr29" draw:name="Image74 Copia 1" text:anchor-type="as-char" svg:y="-0.612cm" svg:width="1.085cm" svg:height="0.9cm" draw:z-index="127"><draw:image xlink:href="Pictures/1000000000000029000000228D358339.png" xlink:type="simple" xlink:show="embed" xlink:actuate="onLoad" draw:mime-type="image/png"/></draw:frame></text:span><text:span text:style-name="T57"><text:s/>N</text:span><text:span text:style-name="T46">omés amb annexos esborrany:</text:span><text:span text:style-name="T68"> </text:span><text:span text:style-name="T72">Botó per filtrar només les anotacions </text:span><text:span text:style-name="T68">amb annexos en estat esborrany.</text:span></text:p>
        </text:list-item>
        <text:list-item>
          <text:p text:style-name="P174"><text:span text:style-name="T57">Codi Backoffice: </text:span><text:span text:style-name="T72">Text per filtrar pel codi de backoffice al qual ha estat enviada l'anotació.</text:span></text:p>
        </text:list-item>
        <text:list-item>
          <text:p text:style-name="P174"><text:soft-page-break/><text:span text:style-name="T58">Penden</text:span><text:span text:style-name="T12">t: </text:span><text:span text:style-name="T25">Desplegable per seleccionar només les anotacions pendents, processades o totes. Els estats pendents de processar són:</text:span></text:p>
          <text:list>
            <text:list-item>
              <text:p text:style-name="P165">Pendent de guardar annexos</text:p>
            </text:list-item>
            <text:list-item>
              <text:p text:style-name="P165">Pendent de processar regla</text:p>
            </text:list-item>
            <text:list-item>
              <text:p text:style-name="P165">Pendent de l'usuari</text:p>
            </text:list-item>
          </text:list>
          <text:p text:style-name="P165">Els estats processats són:</text:p>
          <text:list text:continue-numbering="true">
            <text:list-item>
              <text:p text:style-name="P165">Processada a la bústia</text:p>
            </text:list-item>
            <text:list-item>
              <text:p text:style-name="P165">Pendent de comunicar backoffice</text:p>
            </text:list-item>
            <text:list-item>
              <text:p text:style-name="P165">Comunicada al backoffice</text:p>
            </text:list-item>
            <text:list-item>
              <text:p text:style-name="P165">Rebuda al backoffice</text:p>
            </text:list-item>
            <text:list-item>
              <text:p text:style-name="P165">Processada pel backoffice</text:p>
            </text:list-item>
            <text:list-item>
              <text:p text:style-name="P165">Rebutjada pel backoffice</text:p>
            </text:list-item>
            <text:list-item>
              <text:p text:style-name="P165">Processada al backoffice amb error</text:p>
            </text:list-item>
          </text:list>
          <text:p text:style-name="P166">Per defecte en el llistat es filtren les anotacions pendents de processar.</text:p>
        </text:list-item>
        <text:list-item>
          <text:p text:style-name="P167">Estat específic:<text:span text:style-name="T92"> Desplegable per seleccionar un dels estats específics en què es pot trobar l'anotació. És independent del desplegable d'estat simple anterior.</text:span></text:p>
        </text:list-item>
        <text:list-item>
          <text:p text:style-name="P178"><text:span text:style-name="T20">Botó </text:span><text:span text:style-name="T20"><draw:frame draw:style-name="fr29" draw:name="Image74" text:anchor-type="as-char" svg:y="-0.612cm" svg:width="1.085cm" svg:height="0.9cm" draw:z-index="128"><draw:image xlink:href="Pictures/1000000000000029000000228D358339.png" xlink:type="simple" xlink:show="embed" xlink:actuate="onLoad" draw:mime-type="image/png"/></draw:frame></text:span><text:span text:style-name="T65"><text:s/>Només anotacions amb error: </text:span><text:span text:style-name="T72">Botó per filtrar només les anotacions marcades amb error.</text:span></text:p>
        </text:list-item>
        <text:list-item>
          <text:p text:style-name="P179"><text:span text:style-name="T65">N</text:span><text:span text:style-name="T63">ombre d’annexos:</text:span><text:span text:style-name="T68"> </text:span><text:span text:style-name="T72">Desplegable per seleccionar </text:span><text:span text:style-name="T68">el numero d’annexos de l’anotació</text:span></text:p>
        </text:list-item>
        <text:list-item>
          <text:p text:style-name="P179"><text:span text:style-name="T63">Codi SIA procediment/servei:</text:span><text:span text:style-name="T68"> </text:span><text:span text:style-name="T72">Text per filtrar pel codi </text:span><text:span text:style-name="T68">SIA </text:span><text:span text:style-name="T72">de </text:span><text:span text:style-name="T68">procediment o servei el qual empra</text:span><text:span text:style-name="T72"> l'anotació.</text:span></text:p>
        </text:list-item>
        <text:list-item>
          <text:p text:style-name="P179"><text:span text:style-name="T63">Reintents:</text:span><text:span text:style-name="T68"> </text:span><text:span text:style-name="T72">Desplegable per seleccionar </text:span><text:span text:style-name="T68">si l’anotació te, o no, reintents pendents</text:span><text:span text:style-name="T72">.</text:span></text:p>
        </text:list-item>
      </text:list>
      <text:p text:style-name="P30"/>
      <text:p text:style-name="P30">Un cop seleccionats els filtres desitjats es podrà fer clic sobre el botó “Filtrar” per obtenir el llistat filtrat. El botó “Netejar” reinicia els filtres.</text:p>
      <text:p text:style-name="P30"/>
      <text:h text:style-name="Heading_20_3" text:outline-level="3"><text:bookmark-start text:name="__RefHeading___Toc2747_1726870378"/>Accions sobre les anotacions de registre<text:bookmark-end text:name="__RefHeading___Toc2747_1726870378"/></text:h>
      <text:p text:style-name="P30">Amb el botó d'accions de les anotacions de registre es desplega un menú d'accions disponibles sobre aquests. A continuació s'expliquen les diferents accions.<text:span text:style-name="T125"> Segons l'estat de les anotacions de registre estaran habilitades unes o altres opcions.</text:span></text:p>
      <text:p text:style-name="P30"/>
      <text:p text:style-name="P11"><draw:frame draw:style-name="fr1" draw:name="Frame13" text:anchor-type="paragraph" svg:width="5.662cm" draw:z-index="40"><draw:text-box fo:min-height="5.927cm"><text:p text:style-name="P120"><text:line-break/></text:p><text:p text:style-name="P120"><draw:frame draw:style-name="fr28" draw:name="Imatge16" text:anchor-type="char" svg:width="5.08cm" svg:height="5.186cm" draw:z-index="41"><draw:image xlink:href="Pictures/10000001000000C0000000C489BC8E4C.png" xlink:type="simple" xlink:show="embed" xlink:actuate="onLoad" draw:mime-type="image/png"/></draw:frame></text:p><text:p text:style-name="P119"><draw:frame draw:style-name="fr11" draw:name="Image11" text:anchor-type="paragraph" svg:width="5.662cm" style:rel-width="100%" svg:height="5.417cm" style:rel-height="scale" draw:z-index="129"><draw:image xlink:href="Pictures/10000001000001440000013605BF62B9.png" xlink:type="simple" xlink:show="embed" xlink:actuate="onLoad" draw:mime-type="image/png"/><svg:desc>Interfaz de usuario gráfica, Texto, Aplicación, Chat o mensaje de texto

Descripción generada automáticamente</svg:desc></draw:frame>fig. <text:sequence text:ref-name="reffig.12" text:name="fig." text:formula="ooow:fig.+1" style:num-format="1">12</text:sequence><text:s/>Accions en el llistat d'anotacions de registre.</text:p></draw:text-box></draw:frame></text:p>
      <text:p text:style-name="P30"/>
      <text:p text:style-name="P195"><text:span text:style-name="T59">A continuació es detallen les diferents accions.</text:span></text:p>
      <text:h text:style-name="Heading_20_4" text:outline-level="4"><text:bookmark-start text:name="__RefHeading___Toc9611_678410495"/><text:soft-page-break/>Detalls<text:bookmark-end text:name="__RefHeading___Toc9611_678410495"/></text:h>
      <text:p text:style-name="P87"><text:span text:style-name="T12">Amb aquesta opció es mostra el detall de l</text:span><text:span text:style-name="T48">'</text:span><text:span text:style-name="T12">anotació de registre, amb una finestra modal amb diferents apartats organitzats per pipelles</text:span><text:span text:style-name="T36">, un botó amb les accions més usuals</text:span><text:span text:style-name="T37"> o la descàrrega del justificant i dels annexos</text:span><text:span text:style-name="T36"> i botons de navegació segons l'ordenació del llistat</text:span><text:span text:style-name="T37"> al peu de la modal</text:span><text:span text:style-name="T36">.</text:span></text:p>
      <text:p text:style-name="P61"/>
      <text:p text:style-name="P61"><draw:frame draw:style-name="fr27" draw:name="Imagen 157" text:anchor-type="as-char" svg:y="0cm" svg:width="17cm" style:rel-width="scale" svg:height="7.396cm" style:rel-height="scale" draw:z-index="45"><draw:image xlink:href="Pictures/100000010000053A0000024D84B736E1.png" xlink:type="simple" xlink:show="embed" xlink:actuate="onLoad" draw:mime-type="image/png"/><svg:desc>Interfaz de usuario gráfica, Texto, Aplicación, Correo electrónico

Descripción generada automáticamente</svg:desc></draw:frame></text:p>
      <text:p text:style-name="P117"><text:span text:style-name="T12">fig. </text:span><text:span text:style-name="T12"><text:sequence text:ref-name="reffig.13" text:name="fig." text:formula="ooow:fig.+1" style:num-format="1">13</text:sequence></text:span><text:span text:style-name="T12">: Modal amb el detall de l'anotació de registre.</text:span></text:p>
      <text:p text:style-name="P62"/>
      <text:p text:style-name="P185">A continuació es descriu el contingut de les diferents pipelles.</text:p>
      <text:h text:style-name="Heading_20_5" text:outline-level="5"><text:bookmark-start text:name="__RefHeading___Toc9613_678410495"/>Resum<text:bookmark-end text:name="__RefHeading___Toc9613_678410495"/></text:h>
      <text:p text:style-name="P199"><text:span text:style-name="T142">En aquesta primera pipella es mostra la informació sintetitzada en forma de taula de l'anotació, els interessats i annexos. La mateixa informació s'amplia per separat en les pipelles següents.</text:span></text:p>
      <text:h text:style-name="Heading_20_5" text:outline-level="5"><text:bookmark-start text:name="__RefHeading___Toc9615_678410495"/>Informació de registre<text:bookmark-end text:name="__RefHeading___Toc9615_678410495"/></text:h>
      <text:p text:style-name="P30">Aquesta pipella mostra la informació general de l'anotació de registre, les dades de seguiment i el justificant de registre.</text:p>
      <text:list text:style-name="WWNum4">
        <text:list-item>
          <text:p text:style-name="P145"><text:span text:style-name="T3">Tipus: </text:span><text:span text:style-name="T1">Tipus d'anotació de registre (entrada o sortida)</text:span></text:p>
        </text:list-item>
        <text:list-item>
          <text:p text:style-name="P145"><text:span text:style-name="T3">Número: </text:span><text:span text:style-name="T1">Número de l'anotació de registre.</text:span></text:p>
        </text:list-item>
        <text:list-item>
          <text:p text:style-name="P146"><text:span text:style-name="T3">Data: </text:span><text:span text:style-name="T1">Data de recepció de l'anotació de registre per part de </text:span><text:span text:style-name="T11">DISTRIBUCIÓ</text:span><text:span text:style-name="T1">.</text:span></text:p>
        </text:list-item>
        <text:list-item>
          <text:p text:style-name="P147"><text:span text:style-name="T1">Estat:</text:span><text:span text:style-name="T39"> Estat en què es troba a DISTRIBUCIO. Es correspon amb l'estat del llistat d'anotacions de registre.</text:span></text:p>
        </text:list-item>
        <text:list-item>
          <text:p text:style-name="P180"><text:span text:style-name="T62">Presencial</text:span><text:span text:style-name="T16">: </text:span><text:span text:style-name="T52">Valor de si l'anotació és presencial o no</text:span><text:span text:style-name="T12">.</text:span></text:p>
        </text:list-item>
      </text:list>
      <text:p text:style-name="P30"/>
      <text:p text:style-name="P30"/>
      <text:p text:style-name="P11"><text:span text:style-name="T1">Les </text:span><text:span text:style-name="T3">dades obligatòries</text:span><text:span text:style-name="T1"> que es mostren són:</text:span></text:p>
      <text:list text:style-name="WWNum5">
        <text:list-item>
          <text:p text:style-name="P153"><text:span text:style-name="T3">Oficina:</text:span><text:span text:style-name="T39"> </text:span><text:span text:style-name="T44">Text per indicar l’</text:span><text:span text:style-name="T45">oficina</text:span><text:span text:style-name="T44"> de l’anotació</text:span><text:span text:style-name="T43">.</text:span></text:p>
        </text:list-item>
        <text:list-item>
          <text:p text:style-name="P154"><text:span text:style-name="T3">Llibre: </text:span><text:span text:style-name="T1">Llibre de les entrades de registre de l'organisme.</text:span></text:p>
        </text:list-item>
        <text:list-item>
          <text:p text:style-name="P154"><text:span text:style-name="T3">Extracte:</text:span><text:span text:style-name="T1"> Text descriptiu de l'extracte de l'anotació de registre.</text:span></text:p>
        </text:list-item>
        <text:list-item>
          <text:p text:style-name="P154"><text:span text:style-name="T3">Documentació física:</text:span><text:span text:style-name="T1"> Un codi de documentació física (a escollir entre tres valors a l'hora de crear l'anotació de registre).</text:span></text:p>
        </text:list-item>
        <text:list-item>
          <text:p text:style-name="P154"><text:span text:style-name="T3">Òrgan destí:</text:span><text:span text:style-name="T1"> Nom i codi de la unitat organitzativa destí per l'anotació de registre relacionat amb el llibre. Les regles de distribució es basen en aquest codi per a poder distribuir el contingut.</text:span></text:p>
        </text:list-item>
        <text:list-item>
          <text:p text:style-name="P154"><text:span text:style-name="T3">Tipus d'assumpte:</text:span><text:span text:style-name="T1"> Codi del tipus d'assumpte amb que s'ha basat la distribució d'aquest</text:span><text:span text:style-name="T86">a</text:span><text:span text:style-name="T1"> anotació de registre.</text:span></text:p>
        </text:list-item>
        <text:list-item>
          <text:p text:style-name="P154"><text:span text:style-name="T3">Idioma:</text:span><text:span text:style-name="T1"> Nom i codi de l'idioma utilitzat.</text:span></text:p>
        </text:list-item>
      </text:list>
      <text:p text:style-name="P30"/>
      <text:p text:style-name="P11"><text:soft-page-break/><text:span text:style-name="T1">Les </text:span><text:span text:style-name="T3">dades opcionals </text:span><text:span text:style-name="T1">que es mostren són:</text:span></text:p>
      <text:list text:style-name="WWNum6">
        <text:list-item>
          <text:p text:style-name="P155"><text:span text:style-name="T3">Procediment/Servei:</text:span><text:span text:style-name="T39"> Codi i nom del procediment o servei classificat de l’anotació.</text:span></text:p>
        </text:list-item>
        <text:list-item>
          <text:p text:style-name="P156"><text:span text:style-name="T7">Tramit:</text:span><text:span text:style-name="T39"> </text:span><text:span text:style-name="T44">Text per indicar el tramit de l’anotació</text:span><text:span text:style-name="T39">.</text:span></text:p>
        </text:list-item>
        <text:list-item>
          <text:p text:style-name="P157"><text:span text:style-name="T3">Ref.</text:span><text:span text:style-name="T1"> </text:span><text:span text:style-name="T3">externa: </text:span><text:span text:style-name="T1">Text per indicar referències externes que el destinatari pugui conèixer.</text:span></text:p>
        </text:list-item>
        <text:list-item>
          <text:p text:style-name="P157"><text:span text:style-name="T6">Núm. e</text:span><text:span text:style-name="T3">xpedient:</text:span><text:span text:style-name="T1"> Número d'expedient de la tramitació administrativa.</text:span></text:p>
        </text:list-item>
        <text:list-item>
          <text:p text:style-name="P157"><text:span text:style-name="T3">Transport:</text:span><text:span text:style-name="T1"> Mitjà de transport amb el que s'ha rebut el registre si aquest prové d'una altre administració.</text:span></text:p>
        </text:list-item>
        <text:list-item>
          <text:p text:style-name="P157"><text:span text:style-name="T3">Transp.</text:span><text:span text:style-name="T1"> </text:span><text:span text:style-name="T3">num: </text:span><text:span text:style-name="T1">Número associat al transport.</text:span></text:p>
        </text:list-item>
        <text:list-item>
          <text:p text:style-name="P158"><text:span text:style-name="T3">Origen oficina: </text:span><text:span text:style-name="T1">Oficina d'origen d'on prové l'anotació de registre si aquest ve d'un altre organisme.</text:span></text:p>
        </text:list-item>
        <text:list-item>
          <text:p text:style-name="P158"><text:span text:style-name="T3">Codi assumpte: </text:span><text:span text:style-name="T1">Codi d'assumpte utilitzat per la regla de distribució que s'ha executat en la recepció d'aquest</text:span><text:span text:style-name="T86">a</text:span><text:span text:style-name="T1"> anotació de registre.</text:span></text:p>
        </text:list-item>
        <text:list-item>
          <text:p text:style-name="P157"><text:span text:style-name="T3">Origen núm: </text:span><text:span text:style-name="T1">Número d'origen de l'anotació de registre.</text:span><text:span text:style-name="T3"> </text:span></text:p>
        </text:list-item>
        <text:list-item>
          <text:p text:style-name="P157"><text:span text:style-name="T3">Origen data: </text:span><text:span text:style-name="T1">Data i hora del registre d'entrada en l'origen. </text:span></text:p>
        </text:list-item>
        <text:list-item>
          <text:p text:style-name="P168">Observacions.</text:p>
        </text:list-item>
      </text:list>
      <text:p text:style-name="P30"/>
      <text:p text:style-name="P30"/>
      <text:p text:style-name="P11"><text:span text:style-name="T1">Les </text:span><text:span text:style-name="T3">Dades de seguiment </text:span><text:span text:style-name="T1">són les següents, i donen informació sobre:</text:span></text:p>
      <text:p text:style-name="P33"/>
      <text:p text:style-name="P11"><draw:frame draw:style-name="fr5" draw:name="Frame10" text:anchor-type="as-char" svg:width="16.986cm" draw:z-index="46"><draw:text-box fo:min-height="3.757cm"><text:p text:style-name="fig."><draw:frame draw:style-name="fr11" draw:name="Imagen 4" text:anchor-type="paragraph" svg:width="16.986cm" style:rel-width="100%" svg:height="3.757cm" style:rel-height="scale" draw:z-index="47"><draw:image xlink:href="Pictures/1000000000000352000000BC1A7BD7F9.png" xlink:type="simple" xlink:show="embed" xlink:actuate="onLoad" draw:mime-type="image/png"/></draw:frame>fig. <text:sequence text:ref-name="reffig.14" text:name="fig." text:formula="ooow:fig.+1" style:num-format="1">14</text:sequence>: Detall de la visualització de les dades de seguiment. </text:p></draw:text-box></draw:frame></text:p>
      <text:p text:style-name="P33"/>
      <text:list text:style-name="WWNum7">
        <text:list-item>
          <text:p text:style-name="P159"><text:span text:style-name="T3">Entitat: </text:span><text:span text:style-name="T1">Nom i codi de l'entitat per a la que es fa l'anotació de registre.</text:span></text:p>
        </text:list-item>
        <text:list-item>
          <text:p text:style-name="P159"><text:span text:style-name="T3">Aplicació:</text:span><text:span text:style-name="T1"> Aplicació i versió de l'aplicació que envia l'anotació de registre.</text:span></text:p>
        </text:list-item>
        <text:list-item>
          <text:p text:style-name="P159"><text:span text:style-name="T3">Usuari:</text:span><text:span text:style-name="T1"> Nom i codi de l'usuari que realitza l'enviament de l'anotació de registre des de l'aplicació origen.</text:span></text:p>
        </text:list-item>
        <text:list-item>
          <text:p text:style-name="P160"><text:span text:style-name="T3">Data d'alta a </text:span><text:span text:style-name="T4">DISTRIBUCIÓ</text:span><text:span text:style-name="T3">:</text:span><text:span text:style-name="T1"> Data de creació de l'anotació de registre dins </text:span><text:span text:style-name="T11">DISTRIBUCIÓ</text:span><text:span text:style-name="T1">.</text:span></text:p>
        </text:list-item>
      </text:list>
      <text:p text:style-name="P30"/>
      <text:p text:style-name="P30"/>
      <text:p text:style-name="P7"><text:span text:style-name="T1">Les dades del </text:span><text:span text:style-name="T3">Justificant </text:span><text:span text:style-name="T1">són les següents:</text:span></text:p>
      <text:p text:style-name="P39"/>
      <text:p text:style-name="P39"/>
      <text:p text:style-name="P7"><draw:frame draw:style-name="fr5" draw:name="Frame14" text:anchor-type="as-char" svg:width="16.986cm" draw:z-index="56"><draw:text-box fo:min-height="5.521cm"><text:p text:style-name="fig."><draw:frame draw:style-name="fr11" draw:name="Imagen2" text:anchor-type="paragraph" svg:width="16.986cm" style:rel-width="100%" svg:height="5.521cm" style:rel-height="scale" draw:z-index="61"><draw:image xlink:href="Pictures/100000000000035A00000117FC05E829.png" xlink:type="simple" xlink:show="embed" xlink:actuate="onLoad" draw:mime-type="image/png"/></draw:frame>fig. <text:sequence text:ref-name="reffig.15" text:name="fig." text:formula="ooow:fig.+1" style:num-format="1">15</text:sequence>: Detall de la visualització de les dades de justificant.</text:p></draw:text-box></draw:frame></text:p>
      <text:p text:style-name="P39"/>
      <text:p text:style-name="P31"><text:soft-page-break/></text:p>
      <text:p text:style-name="P31"><text:span text:style-name="T110">L</text:span>'anotació de registre pot venir lliga<text:span text:style-name="T135">da</text:span>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Heading_20_5" text:outline-level="5"><text:bookmark-start text:name="__RefHeading___Toc9617_678410495"/>Interessats<text:bookmark-end text:name="__RefHeading___Toc9617_678410495"/></text:h>
      <text:p text:style-name="P40">En aquest apartat es mostra una taula amb les diferents persones (físiques o jurídiques) que figuren com a interessades en l'anotació de registre.</text:p>
      <text:p text:style-name="P40"><draw:frame draw:style-name="fr26" draw:name="Image23" text:anchor-type="paragraph" svg:width="17cm" svg:height="6.922cm" draw:z-index="104"><draw:image xlink:href="Pictures/10000000000002ED0000013123E5FF5C.png" xlink:type="simple" xlink:show="embed" xlink:actuate="onLoad" draw:mime-type="image/png"/></draw:frame></text:p>
      <text:p text:style-name="P40"/>
      <text:p text:style-name="P40">Aquestes files de la taula són desplegables i mostren la informació de l'interessat:</text:p>
      <text:p text:style-name="P40"/>
      <text:p text:style-name="P12"><draw:frame draw:style-name="fr25" draw:name="Image24" text:anchor-type="paragraph" svg:width="17cm" svg:height="7.618cm" draw:z-index="105"><draw:image xlink:href="Pictures/10000000000002D300000144CD36C340.png" xlink:type="simple" xlink:show="embed" xlink:actuate="onLoad" draw:mime-type="image/png"/></draw:frame></text:p>
      <text:p text:style-name="P40">Com es pot veure, es mostren dades bàsiques de l'interessat, i s'ha de tenir en compte que aquests valors poden ser de diferent naturalesa depenent de si l'interessat és una persona física o una persona jurídica.</text:p>
      <text:p text:style-name="P40"/>
      <text:p text:style-name="P40"><text:soft-page-break/>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Heading_20_5" text:outline-level="5"><text:bookmark-start text:name="__RefHeading___Toc9619_678410495"/>Annexos<text:bookmark-end text:name="__RefHeading___Toc9619_678410495"/></text:h>
      <text:p text:style-name="P40">En aquesta pipella es mostren diferents elements desplegables, un per cada document annexat a l'anotació de registre<text:span text:style-name="T130">.</text:span></text:p>
      <text:p text:style-name="P40"/>
      <text:p text:style-name="P40"/>
      <text:p text:style-name="P40"><draw:frame draw:style-name="fr24" draw:name="Imatge18" text:anchor-type="char" svg:width="17cm" svg:height="2.217cm" draw:z-index="106"><draw:image xlink:href="Pictures/100000010000052E000000AD9933D549.png" xlink:type="simple" xlink:show="embed" xlink:actuate="onLoad" draw:mime-type="image/png"/></draw:frame>Si despleguem un element podem veure tota la informació del document de l'arxiu i de les seves firmes si n'hi ha.</text:p>
      <text:p text:style-name="P40"><draw:frame draw:style-name="fr12" draw:name="Imatge19" text:anchor-type="char" svg:width="17cm" svg:height="6.768cm" draw:z-index="35"><draw:image xlink:href="Pictures/100000000000063B000002DECF1C8246.png" xlink:type="simple" xlink:show="embed" xlink:actuate="onLoad" draw:mime-type="image/png"/></draw:frame></text:p>
      <text:p text:style-name="P12"/>
      <text:p text:style-name="P40"/>
      <text:p text:style-name="P40">Les dades mostrades de l'annex són les següents:</text:p>
      <text:p text:style-name="P40"/>
      <text:list text:style-name="WWNum8">
        <text:list-item>
          <text:p text:style-name="P161"><text:span text:style-name="T3">Data de captura (ENI): </text:span><text:span text:style-name="T1">Data en la que el fitxer de l'annex es rebut per l'arxiu digital.</text:span></text:p>
        </text:list-item>
        <text:list-item>
          <text:p text:style-name="P161"><text:span text:style-name="T3">Origen (ENI): </text:span><text:span text:style-name="T1">Valor que mostra si el document fou creat per un ciutadà o per una administració.</text:span></text:p>
        </text:list-item>
        <text:list-item>
          <text:p text:style-name="P161"><text:span text:style-name="T3">Estat d'elaboració (ENI): </text:span><text:span text:style-name="T1">Es refereix a la categoria d'autenticitat del document.</text:span></text:p>
        </text:list-item>
        <text:list-item>
          <text:p text:style-name="P161"><text:span text:style-name="T3">Tipus documental (ENI): </text:span><text:span text:style-name="T1">Nom del tipus documental del document.</text:span></text:p>
        </text:list-item>
        <text:list-item>
          <text:p text:style-name="P161"><text:span text:style-name="T3">Tipus de document annexat: </text:span><text:span text:style-name="T1">Tipus del document annexat (Formulari, Document adjunt, etc...).</text:span></text:p>
        </text:list-item>
        <text:list-item>
          <text:p text:style-name="P148"><text:span text:style-name="T1">Observacions: </text:span><text:span text:style-name="T39">Mostra les observacions que pot tenir l’annexe. </text:span></text:p>
        </text:list-item>
        <text:list-item>
          <text:p text:style-name="P149"><text:span text:style-name="T1">Identificador dins l'Arxiu:</text:span><text:span text:style-name="T39"> Identificador UUID assignat per l'Arxiu a l'hora de guardar l'annex.</text:span></text:p>
        </text:list-item>
        <text:list-item>
          <text:p text:style-name="P148"><text:span text:style-name="T1">Firma CSV: </text:span><text:span text:style-name="T39">Ens dóna un enllaç on es pot descarregar l’annexe amb un segell de temps.</text:span></text:p>
        </text:list-item>
        <text:list-item>
          <text:p text:style-name="P151"><text:span text:style-name="T1">Resolució:</text:span><text:span text:style-name="T39"> Informació de la resolució amb xifra numèrica. </text:span></text:p>
        </text:list-item>
        <text:list-item>
          <text:p text:style-name="P148"><text:span text:style-name="T1">Idioma:</text:span><text:span text:style-name="T39"> </text:span><text:span text:style-name="T42">Es fa referència a l’idioma empleat a l’annexe. </text:span></text:p>
        </text:list-item>
        <text:list-item>
          <text:p text:style-name="P148"><text:span text:style-name="T1">Descripció: </text:span><text:span text:style-name="T39">Es mostra la descripció de l’annexe. </text:span></text:p>
        </text:list-item>
        <text:list-item>
          <text:p text:style-name="P150"><text:span text:style-name="T1">Profunditat color: </text:span><text:span text:style-name="T39">Informació del color amb xifra numèrica.</text:span></text:p>
        </text:list-item>
        <text:list-item>
          <text:p text:style-name="P150"><text:span text:style-name="T1">Tipus MIME: </text:span><text:span text:style-name="T39">Ens dóna la informació de la extensió que té l’annexe.</text:span></text:p>
        </text:list-item>
        <text:list-item>
          <text:p text:style-name="P152"><text:span text:style-name="T1">Validació de firma:</text:span><text:span text:style-name="T39"> estat de la validació de firma.</text:span></text:p>
        </text:list-item>
        <text:list-item>
          <text:p text:style-name="P152"><text:span text:style-name="T1">Estat a l’Arxiu:</text:span><text:span text:style-name="T39"> estat del document a l’arxiu.</text:span></text:p>
        </text:list-item>
        <text:list-item>
          <text:p text:style-name="P161"><text:span text:style-name="T3">Fitxer: </text:span><text:span text:style-name="T1">Nom del fitxer de l'annex (a la dreta apareix el botó per descarregar-lo des de l'arxiu digital).</text:span></text:p>
        </text:list-item>
      </text:list>
      <text:p text:style-name="P41"/>
      <text:p text:style-name="P42"/>
      <text:p text:style-name="P24"><text:soft-page-break/><text:span text:style-name="T1">Hi ha dos </text:span><text:span text:style-name="T78">botons</text:span><text:span text:style-name="T1"> que ens permeten descarregar l’annexe de forma individual:</text:span></text:p>
      <text:list text:style-name="L4">
        <text:list-item>
          <text:p text:style-name="P169">Descàrrega de la versió original. </text:p>
        </text:list-item>
        <text:list-item>
          <text:p text:style-name="P181"><text:span text:style-name="T7">Descàrrega de la versió imprimible.</text:span><text:span text:style-name="T1"> </text:span></text:p>
        </text:list-item>
      </text:list>
      <text:p text:style-name="P40"/>
      <text:p text:style-name="P12"><text:span text:style-name="T1">Si el document està firmat d'alguna manera, quan es desplegui la informació de l'annex es visualitzarà un bloc de </text:span><text:span text:style-name="T3">Firma.</text:span></text:p>
      <text:p text:style-name="P190"/>
      <text:p text:style-name="P12"/>
      <text:p text:style-name="P190"/>
      <text:list text:style-name="WWNum9">
        <text:list-item>
          <text:p text:style-name="P162"><text:span text:style-name="T3">Tipus de firma: </text:span><text:span text:style-name="T1">Mostra el codi del tipus de firma.</text:span></text:p>
        </text:list-item>
        <text:list-item>
          <text:p text:style-name="P162"><text:span text:style-name="T3">Perfil firma:</text:span><text:span text:style-name="T1"> Mostra el perfil de firma que s'ha escollit pel document d'aquest annex.</text:span></text:p>
        </text:list-item>
        <text:list-item>
          <text:p text:style-name="P162"><text:span text:style-name="T3">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182"><text:span text:style-name="T18">Detall dels firmants:</text:span><text:span text:style-name="T29"> </text:span><text:span text:style-name="T69">T</text:span><text:span text:style-name="T70">aula amb la llista</text:span><text:span text:style-name="T29"> dels firmants amb la data, NIF, Nom i l'emissor del certificat.</text:span></text:p>
        </text:list-item>
      </text:list>
      <text:p text:style-name="P35"/>
      <text:p text:style-name="P43"><draw:frame draw:style-name="fr24" draw:name="Imatge20" text:anchor-type="char" svg:width="17cm" svg:height="1.538cm" draw:z-index="69"><draw:image xlink:href="Pictures/100000010000050100000074B868BAEF.png" xlink:type="simple" xlink:show="embed" xlink:actuate="onLoad" draw:mime-type="image/png"/></draw:frame>En alguns casos, la pròpia aplicació <text:span text:style-name="T94">DISTRIBUCIÓ</text:span> firmarà els documents que venguin sense firmar amb l'anotació de registre rebut. L'usuari podrà identificar de quins casos es tracta, ja que la capçalera del bloc de firma ho indicarà:</text:p>
      <text:p text:style-name="P40"/>
      <text:p text:style-name="P89"><text:span text:style-name="T90"><draw:frame draw:style-name="fr23" draw:name="Imagen 21" text:anchor-type="as-char" svg:width="10.973cm" svg:height="2.297cm" draw:z-index="66"><draw:image xlink:href="Pictures/100000000000019F00000057FE000A75.png" xlink:type="simple" xlink:show="embed" xlink:actuate="onLoad" draw:mime-type="image/png"/></draw:frame></text:span></text:p>
      <text:h text:style-name="Heading_20_5" text:outline-level="5"><text:bookmark-start text:name="__RefHeading___Toc9621_678410495"/>Arxiu Info<text:bookmark-end text:name="__RefHeading___Toc9621_678410495"/></text:h>
      <text:p text:style-name="P56">Pels usuaris administradors es mostrarà la pipella d' Arxiu Info. amb la informació referent a les dades de l'Arxiu per l'expedient de l'anotació de registre actual.</text:p>
      <text:p text:style-name="P56"/>
      <text:p text:style-name="P56">Aquesta informació és molt específica de la forma com s'ha guardat l'anotació a l'Arxiu per poder-la localitzar i solucionar possibles problemes. </text:p>
      <text:p text:style-name="P56"/>
      <text:p text:style-name="P56">Quan una anotació arriba i està pendent de guardar a l'Arxiu apareixeran missatges d'advertència conforme l'annex o l'anotació encara no s'ha guardat a l'Arxiu.</text:p>
      <text:p text:style-name="P55"><draw:frame draw:style-name="fr4" draw:name="Frame25" text:anchor-type="paragraph" svg:width="17cm" draw:z-index="92"><draw:text-box fo:min-height="7.648cm"><text:p text:style-name="fig."><draw:frame draw:style-name="fr15" draw:name="Image28" text:anchor-type="paragraph" svg:width="16.898cm" style:rel-width="100%" svg:height="7.601cm" style:rel-height="scale" draw:z-index="93"><draw:image xlink:href="Pictures/10000000000002ED00000151C60CBBB6.png" xlink:type="simple" xlink:show="embed" xlink:actuate="onLoad" draw:mime-type="image/png"/></draw:frame>fig. <text:sequence text:ref-name="reffig.16" text:name="fig." text:formula="ooow:fig.+1" style:num-format="1">16</text:sequence>: Detall pipella Arxiu Info.</text:p></draw:text-box></draw:frame><text:soft-page-break/></text:p>
      <text:h text:style-name="Heading_20_5" text:outline-level="5"><text:bookmark-start text:name="__RefHeading___Toc9623_678410495"/>Processament automàtic<text:bookmark-end text:name="__RefHeading___Toc9623_678410495"/></text:h>
      <text:p text:style-name="P57">En aquesta pipella es mostra la informació del procés automàtic de distribució que l’aplicació <text:span text:style-name="T94">DISTRIBUCIÓ</text:span> du a terme per a assignar els assentaments registrals que li arriben a les diferents bústies. També mostra si hi ha hagut cap problema amb la distribució i l’error generat:</text:p>
      <text:p text:style-name="P57"/>
      <text:p text:style-name="P57"><draw:frame draw:style-name="fr7" draw:name="Frame26" text:anchor-type="as-char" svg:y="0cm" svg:width="16.967cm" style:rel-width="scale" svg:height="9.835cm" style:rel-height="scale-min" draw:z-index="94"><draw:text-box><text:p text:style-name="fig."><draw:frame draw:style-name="fr11" draw:name="Image65" text:anchor-type="paragraph" svg:width="16.967cm" style:rel-width="100%" svg:height="9.835cm" style:rel-height="scale" draw:z-index="95"><draw:image xlink:href="Pictures/1000000000000371000001FFBBE7DAF3.png" xlink:type="simple" xlink:show="embed" xlink:actuate="onLoad" draw:mime-type="image/png"/></draw:frame>fig. <text:sequence text:ref-name="reffig.17" text:name="fig." text:formula="ooow:fig.+1" style:num-format="1">17</text:sequence>: Pipella on es mostra el detall d’un avís. </text:p></draw:text-box></draw:frame></text:p>
      <text:p text:style-name="P16"/>
      <text:p text:style-name="P57"/>
      <text:p text:style-name="P57"><text:soft-page-break/>Quan hi ha hagut un error, aquest es mostra en vermell a la part superior d’aquest apartat, i es dona la possibilitat de tornar a executar la regla de distribució amb el botó “reintentar processament”.</text:p>
      <text:p text:style-name="P57"/>
      <text:h text:style-name="Heading_20_5" text:outline-level="5"><text:bookmark-start text:name="__RefHeading___Toc9625_678410495"/>Processament backoffice<text:bookmark-end text:name="__RefHeading___Toc9625_678410495"/></text:h>
      <text:p text:style-name="P71">Si l'anotació de registre s'ha reenviat a un backoffice de DISTRIBUCIO mitjançant regles apareixerà aquesta pipella amb la informació de l'estat de l'enviament i amb l'error en el cas qui hi hagi error.</text:p>
      <text:p text:style-name="P71"/>
      <text:p text:style-name="P57"><draw:frame draw:style-name="fr4" draw:name="Frame27" text:anchor-type="paragraph" svg:width="17cm" draw:z-index="71"><draw:text-box fo:min-height="7.38cm"><text:p text:style-name="fig."><draw:frame draw:style-name="fr15" draw:name="Image34" text:anchor-type="paragraph" svg:width="16.898cm" style:rel-width="100%" svg:height="7.334cm" style:rel-height="scale" draw:z-index="72"><draw:image xlink:href="Pictures/10000000000002FF0000014D68FCE1F4.png" xlink:type="simple" xlink:show="embed" xlink:actuate="onLoad" draw:mime-type="image/png"/></draw:frame>fig. <text:sequence text:ref-name="reffig.18" text:name="fig." text:formula="ooow:fig.+1" style:num-format="1">18</text:sequence>: Detall pipella processament backoffice. </text:p></draw:text-box></draw:frame><text:s/></text:p>
      <text:p text:style-name="P40"/>
      <text:h text:style-name="Heading_20_4" text:outline-level="4"><text:bookmark-start text:name="__RefHeading___Toc2759_1726870378"/>Històric d'accions<text:bookmark-end text:name="__RefHeading___Toc2759_1726870378"/></text:h>
      <text:p text:style-name="P90"><text:span text:style-name="T12">Aquesta opció del menú d'accions mostra una finestra modal amb </text:span><text:span text:style-name="T53">quatre</text:span><text:span text:style-name="T12"> pipelles amb informació històrica dins l'aplicació </text:span><text:span text:style-name="T14">DISTRIBUCIÓ</text:span><text:span text:style-name="T12"> sobre les accions que s'han fet sobre aquesta anotació de registre. </text:span><text:span text:style-name="T14">DISTRIBUCIÓ</text:span><text:span text:style-name="T12"> registra les accions que es fan sobre molts elements de l'aplicació.</text:span></text:p>
      <text:p text:style-name="P43"/>
      <text:p text:style-name="P43"><draw:frame draw:style-name="fr7" draw:name="Frame28" text:anchor-type="as-char" svg:y="0cm" svg:width="17cm" style:rel-width="scale" svg:height="5.653cm" style:rel-height="scale-min" draw:z-index="67"><draw:text-box><text:p text:style-name="fig."><draw:frame draw:style-name="fr11" draw:name="Imagen 160" text:anchor-type="paragraph" svg:width="17cm" style:rel-width="100%" svg:height="5.653cm" style:rel-height="scale" draw:z-index="68"><draw:image xlink:href="Pictures/100000010000039B0000013307801279.png" xlink:type="simple" xlink:show="embed" xlink:actuate="onLoad" draw:mime-type="image/png"/><svg:desc>Interfaz de usuario gráfica, Sitio web

Descripción generada automáticamente</svg:desc></draw:frame>fig. <text:sequence text:ref-name="reffig.19" text:name="fig." text:formula="ooow:fig.+1" style:num-format="1">19</text:sequence>: Detall localització d’històric d’accions.</text:p></draw:text-box></draw:frame></text:p>
      <text:h text:style-name="Heading_20_5" text:outline-level="5"><text:bookmark-start text:name="__RefHeading___Toc2761_1726870378"/><text:soft-page-break/>Resum<text:bookmark-end text:name="__RefHeading___Toc2761_1726870378"/></text:h>
      <text:p text:style-name="P22">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22"><draw:frame draw:style-name="fr8" draw:name="Frame29" text:anchor-type="paragraph" svg:width="17cm" draw:z-index="64"><draw:text-box fo:min-height="6.976cm"><text:p text:style-name="fig."><draw:frame draw:style-name="fr15" draw:name="Image29" text:anchor-type="paragraph" svg:width="16.898cm" style:rel-width="100%" svg:height="6.934cm" style:rel-height="scale" draw:z-index="65"><draw:image xlink:href="Pictures/10000000000002F100000135B191ABD9.png" xlink:type="simple" xlink:show="embed" xlink:actuate="onLoad" draw:mime-type="image/png"/></draw:frame>fig. <text:sequence text:ref-name="reffig.20" text:name="fig." text:formula="ooow:fig.+1" style:num-format="1">20</text:sequence>: Detall pipella resum.</text:p></draw:text-box></draw:frame></text:p>
      <text:h text:style-name="Heading_20_5" text:outline-level="5"><text:bookmark-start text:name="__RefHeading___Toc37402_3531032951"/><text:span text:style-name="T126">A</text:span>ccions<text:bookmark-end text:name="__RefHeading___Toc37402_3531032951"/></text:h>
      <text:p text:style-name="P40">Les accions a nivell general que s'han fet sobre l'anotació de registre:</text:p>
      <text:p text:style-name="P40"><draw:frame draw:style-name="fr4" draw:name="Frame30" text:anchor-type="paragraph" svg:width="17cm" draw:z-index="70"><draw:text-box fo:min-height="6.315cm"><text:p text:style-name="fig."><draw:frame draw:style-name="fr15" draw:name="Image30" text:anchor-type="paragraph" svg:width="16.898cm" style:rel-width="100%" svg:height="6.276cm" style:rel-height="scale" draw:z-index="73"><draw:image xlink:href="Pictures/10000000000002EF0000011782CD9228.png" xlink:type="simple" xlink:show="embed" xlink:actuate="onLoad" draw:mime-type="image/png"/></draw:frame>fig. <text:sequence text:ref-name="reffig.21" text:name="fig." text:formula="ooow:fig.+1" style:num-format="1">21</text:sequence>: Detall pipella accions.</text:p></draw:text-box></draw:frame></text:p>
      <text:p text:style-name="P40">Es mostra la data, l'usuari i quin tipus d'acció s'ha fet. Aquestes elements són desplegables i es mostren els paràmetres que s'han registrat amb aquesta acció i sobre aquest element concret.</text:p>
      <text:p text:style-name="P40"/>
      <text:h text:style-name="Heading_20_5" text:outline-level="5"><text:bookmark-start text:name="__RefHeading___Toc2763_1726870378"/>Moviments<text:bookmark-end text:name="__RefHeading___Toc2763_1726870378"/></text:h>
      <text:p text:style-name="P40">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40"/>
      <text:p text:style-name="P12"><draw:frame draw:style-name="fr8" draw:name="Frame32" text:anchor-type="paragraph" svg:width="17cm" draw:z-index="76"><draw:text-box fo:min-height="3.457cm"><text:p text:style-name="fig."><draw:frame draw:style-name="fr15" draw:name="Image31" text:anchor-type="paragraph" svg:width="16.898cm" style:rel-width="100%" svg:height="3.436cm" style:rel-height="scale" draw:z-index="77"><draw:image xlink:href="Pictures/10000000000002F000000099A00760C2.png" xlink:type="simple" xlink:show="embed" xlink:actuate="onLoad" draw:mime-type="image/png"/></draw:frame>fig. <text:sequence text:ref-name="reffig.22" text:name="fig." text:formula="ooow:fig.+1" style:num-format="1">22</text:sequence>: Detall pipella moviments.</text:p></draw:text-box></draw:frame><text:soft-page-break/></text:p>
      <text:h text:style-name="Heading_20_5" text:outline-level="5"><text:bookmark-start text:name="__RefHeading___Toc2765_1726870378"/>Auditoria<text:bookmark-end text:name="__RefHeading___Toc2765_1726870378"/></text:h>
      <text:p text:style-name="P40">Auditoria sobre canvis sobre l'element (anotacions de registre) per part de l'usuari. Creació, modificació, etc...</text:p>
      <text:p text:style-name="P40"/>
      <text:p text:style-name="P12"><draw:frame draw:style-name="fr4" draw:name="Frame31" text:anchor-type="paragraph" svg:width="17cm" draw:z-index="108"><draw:text-box fo:min-height="3.694cm"><text:p text:style-name="fig."><draw:frame draw:style-name="fr15" draw:name="Image32" text:anchor-type="paragraph" svg:width="16.898cm" style:rel-width="100%" svg:height="3.671cm" style:rel-height="scale" draw:z-index="113"><draw:image xlink:href="Pictures/10000000000002E5000000A1DCBE3BAF.png" xlink:type="simple" xlink:show="embed" xlink:actuate="onLoad" draw:mime-type="image/png"/></draw:frame>fig. <text:sequence text:ref-name="reffig.23" text:name="fig." text:formula="ooow:fig.+1" style:num-format="1">23</text:sequence>: Detall pipella auditoria.</text:p></draw:text-box></draw:frame></text:p>
      <text:p text:style-name="P40"/>
      <text:h text:style-name="P133" text:outline-level="4"><text:bookmark-start text:name="__RefHeading___Toc2767_1726870378"/>Reenviar<text:bookmark-end text:name="__RefHeading___Toc2767_1726870378"/></text:h>
      <text:p text:style-name="P89"><text:span text:style-name="T12">Aquesta opció serveix per moure una anotació de registre d'una bústia a una altre. En la finestra modal que es presenta es mostra un arbre amb la jerarquia de bústies, en el que es podrà seleccionar la bústia destí. En negreta vora el nom de la bústia, s'indica si aquesta és una bústia per defecte. </text:span><text:span text:style-name="T54">E</text:span><text:span text:style-name="T55">s pot</text:span><text:span text:style-name="T35"> indicar si </text:span><text:span text:style-name="T54">d</text:span><text:span text:style-name="T55">eixar </text:span><text:span text:style-name="T35">una c</text:span><text:span text:style-name="T54">ò</text:span><text:span text:style-name="T35">pia en la bústia actual.</text:span><text:span text:style-name="T12"> També serà necessari afegir un comentari sobre el moviment que s'està realitzant.</text:span></text:p>
      <text:p text:style-name="P40"/>
      <text:p text:style-name="P12"><text:soft-page-break/><draw:frame draw:style-name="fr6" draw:name="Frame33" text:anchor-type="as-char" svg:width="16.967cm" draw:z-index="57"><draw:text-box fo:min-height="9.53cm"><text:p text:style-name="fig."><draw:frame draw:style-name="fr11" draw:name="Imagen 28" text:anchor-type="paragraph" svg:width="16.967cm" style:rel-width="100%" svg:height="9.53cm" style:rel-height="scale" draw:z-index="60"><draw:image xlink:href="Pictures/100000000000037A000002969CB58240.png" xlink:type="simple" xlink:show="embed" xlink:actuate="onLoad" draw:mime-type="image/png"/></draw:frame>fig. <text:sequence text:ref-name="reffig.24" text:name="fig." text:formula="ooow:fig.+1" style:num-format="1">24</text:sequence>: Formulari a omplir per reenviar una anotació d’una bústia a una altre.</text:p></draw:text-box></draw:frame></text:p>
      <text:p text:style-name="P12"/>
      <text:h text:style-name="Heading_20_5" text:outline-level="5"><text:bookmark-start text:name="__RefHeading___Toc4026_1810852831"/>Bústies favorits<text:bookmark-end text:name="__RefHeading___Toc4026_1810852831"/></text:h>
      <text:p text:style-name="P112">Des de la finestra de reenviaments tenim l’opció de marcar les bústies com a favorits fent clic amb el botó dret sobre la bústia, d’aquesta forma es quedaran guardades en una taula <text:s/>que podem veure a l'esquerra. Aquesta opció s’ha d’habilitar amb la propietat es.caib.distribucio.contingut.reenviar.favorits. En habilitar aquesta opció també s’activa la selecció de tipus checkbox en lloc de mantenir pitjat el CTRL.</text:p>
      <text:p text:style-name="P112"><draw:frame draw:style-name="fr7" draw:name="Frame34" text:anchor-type="as-char" svg:y="0cm" svg:width="17cm" style:rel-width="scale" svg:height="7.403cm" style:rel-height="scale-min" draw:z-index="58"><draw:text-box><text:p text:style-name="fig."><draw:frame draw:style-name="fr11" draw:name="Imagen 162" text:anchor-type="paragraph" svg:width="17cm" style:rel-width="100%" svg:height="7.403cm" style:rel-height="scale" draw:z-index="59"><draw:image xlink:href="Pictures/100000010000053D0000024884AE1BD5.png" xlink:type="simple" xlink:show="embed" xlink:actuate="onLoad" draw:mime-type="image/png"/></draw:frame>fig. <text:sequence text:ref-name="reffig.25" text:name="fig." text:formula="ooow:fig.+1" style:num-format="1">25</text:sequence>: Detall on es pot veure una bústia marcada com a favorit.</text:p></draw:text-box></draw:frame></text:p>
      <text:p text:style-name="P12"/>
      <text:p text:style-name="P12"/>
      <text:h text:style-name="P133" text:outline-level="4"><text:bookmark-start text:name="__RefHeading___Toc2769_1726870378"/><text:soft-page-break/>Marcar com a processat<text:bookmark-end text:name="__RefHeading___Toc2769_1726870378"/></text:h>
      <text:p text:style-name="P91"><text:span text:style-name="T48">P</text:span><text:span text:style-name="T55">er defecte el llistat d'anotacions mostra les anotacions pendents de processar. Per les anotacions pendents de processar </text:span><text:span text:style-name="T12">l'usuari distribuïdor pot marcar les anotacions de registre pendents com a processa</text:span><text:span text:style-name="T34">des</text:span><text:span text:style-name="T12">. Ho podrà fer amb la finestra modal que es mostra clicant sobre l'opció del menú d'accions.</text:span></text:p>
      <text:p text:style-name="P40"/>
      <text:p text:style-name="P12"><draw:frame draw:style-name="fr6" draw:name="Frame35" text:anchor-type="as-char" svg:width="16.967cm" draw:z-index="87"><draw:text-box fo:min-height="5.345cm"><text:p text:style-name="fig."><draw:frame draw:style-name="fr11" draw:name="Imagen9" text:anchor-type="paragraph" svg:width="16.967cm" style:rel-width="100%" svg:height="5.345cm" style:rel-height="scale" draw:z-index="88"><draw:image xlink:href="Pictures/100000000000037F0000011AED2B429F.png" xlink:type="simple" xlink:show="embed" xlink:actuate="onLoad" draw:mime-type="image/png"/></draw:frame>fig. <text:sequence text:ref-name="reffig.26" text:name="fig." text:formula="ooow:fig.+1" style:num-format="1">26</text:sequence>: Modal per marcar com a processat una anotació.</text:p></draw:text-box></draw:frame></text:p>
      <text:p text:style-name="P43"/>
      <text:p text:style-name="P43">Quan un<text:span text:style-name="T127">a anotació de distribució </text:span>es marca com a processa<text:span text:style-name="T127">da</text:span>, es tancarà l'expedient vinculat que es va crear a l'arxiu digital en el moment de la recepció de l'assentament per part del <text:span text:style-name="T94">DISTRIBUCIÓ</text:span>, i es canviarà el seu estat a PROCESSAT i a partir d'aquest moment, per consultar aquesta anotació de registre, s'haurà de filtrar el contingut per estat PROCESSAT.</text:p>
      <text:p text:style-name="P43"/>
      <text:h text:style-name="P135" text:outline-level="4"><text:bookmark-start text:name="__RefHeading___Toc2769_17268703781"/>Marcar com a p<text:span text:style-name="T138">endent</text:span><text:bookmark-end text:name="__RefHeading___Toc2769_17268703781"/></text:h>
      <text:p text:style-name="P65">Les anotacions que estan processades es poden posar com a pendents. Ho podrà fer amb la finestra modal que es mostra clicant sobre l'opció del menú d'accions.</text:p>
      <text:p text:style-name="P66"><draw:frame draw:style-name="fr22" draw:name="Imatge17" text:anchor-type="char" svg:width="17cm" svg:height="3.879cm" draw:z-index="109"><draw:image xlink:href="Pictures/10000001000005270000012DA7C7F568.png" xlink:type="simple" xlink:show="embed" xlink:actuate="onLoad" draw:mime-type="image/png"/></draw:frame></text:p>
      <text:p text:style-name="P40"/>
      <text:h text:style-name="P133" text:outline-level="4"><text:bookmark-start text:name="__RefHeading___Toc2771_1726870378"/>Llistat d'alertes<text:bookmark-end text:name="__RefHeading___Toc2771_1726870378"/></text:h>
      <text:p text:style-name="P40">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40"><draw:frame draw:style-name="fr21" draw:name="Image35" text:anchor-type="paragraph" svg:x="6.853cm" svg:y="0cm" svg:width="3.447cm" svg:height="5.219cm" draw:z-index="89"><draw:image xlink:href="Pictures/100000000000008E000000CABD6EB5C5.png" xlink:type="simple" xlink:show="embed" xlink:actuate="onLoad" draw:mime-type="image/png"/></draw:frame><text:soft-page-break/></text:p>
      <text:p text:style-name="P40">També cal esmentar que el llistat ja ens avisa de quin<text:span text:style-name="T124">e</text:span>s anotacions de registre tenen alertes, amb els símbols següents:</text:p>
      <text:p text:style-name="P40"/>
      <text:p text:style-name="P12"><draw:frame draw:style-name="fr5" draw:name="Frame36" text:anchor-type="as-char" svg:width="9.44cm" draw:z-index="62"><draw:text-box fo:min-height="1.605cm"><text:p text:style-name="fig."><draw:frame draw:style-name="fr11" draw:name="Imagen10" text:anchor-type="paragraph" svg:width="9.44cm" style:rel-width="100%" svg:height="1.605cm" style:rel-height="scale" draw:z-index="63"><draw:image xlink:href="Pictures/10000000000001650000003DB63541FE.png" xlink:type="simple" xlink:show="embed" xlink:actuate="onLoad" draw:mime-type="image/png"/></draw:frame>fig. <text:sequence text:ref-name="reffig.27" text:name="fig." text:formula="ooow:fig.+1" style:num-format="1">27</text:sequence>: Icona d'alertes. </text:p></draw:text-box></draw:frame></text:p>
      <text:p text:style-name="P40"/>
      <text:p text:style-name="P40">A més, l'usuari podrà marcar les alertes com a llegides amb el botó “Llegida” que es mostra a la dreta de la taula, i aquestes desapareixeran del llistat esmentat.</text:p>
      <text:p text:style-name="P40"><draw:frame draw:style-name="fr4" draw:name="Frame37" text:anchor-type="paragraph" svg:width="17cm" draw:z-index="53"><draw:text-box fo:min-height="8.883cm"><text:p text:style-name="fig."><draw:frame draw:style-name="fr15" draw:name="Image36" text:anchor-type="paragraph" svg:width="16.898cm" style:rel-width="100%" svg:height="8.828cm" style:rel-height="scale" draw:z-index="96"><draw:image xlink:href="Pictures/10000000000002C600000173CF028ECC.png" xlink:type="simple" xlink:show="embed" xlink:actuate="onLoad" draw:mime-type="image/png"/></draw:frame>fig. <text:sequence text:ref-name="reffig.28" text:name="fig." text:formula="ooow:fig.+1" style:num-format="1">28</text:sequence>: Exemple de com es marca una alerta com a llegida. </text:p></draw:text-box></draw:frame></text:p>
      <text:p text:style-name="P12"/>
      <text:h text:style-name="P132" text:outline-level="3"><text:bookmark-start text:name="__RefHeading___Toc2773_1726870378"/>Comentaris sobre els continguts<text:bookmark-end text:name="__RefHeading___Toc2773_1726870378"/></text:h>
      <text:p text:style-name="P40">Els usuaris amb permisos adequats podran deixar comentaris sobre els continguts de bústia. Per això només hauran de fer clic sobre el botó següent, que a l'hora mostra els comentaris que hi ha sobre aquesta anotació de registre.</text:p>
      <text:p text:style-name="P40"/>
      <text:p text:style-name="P40"><text:soft-page-break/></text:p>
      <text:p text:style-name="P12"><draw:frame draw:style-name="fr20" draw:name="Imagen 9" text:anchor-type="as-char" svg:width="16.96cm" svg:height="1.905cm" draw:z-index="81"><draw:image xlink:href="Pictures/100000000000048C0000008258644CA3.png" xlink:type="simple" xlink:show="embed" xlink:actuate="onLoad" draw:mime-type="image/png"/></draw:frame></text:p>
      <text:p text:style-name="P20">fig. <text:sequence text:ref-name="reffig.29" text:name="fig." text:formula="ooow:fig.+1" style:num-format="1">29</text:sequence>: Detall de la localització dels comentaris. </text:p>
      <text:p text:style-name="P12"/>
      <text:p text:style-name="P72"><text:span text:style-name="T136">E</text:span><text:span text:style-name="T137">n prémer el botó s'obre una modal a mode de diàleg amb els diferents comentaris.</text:span></text:p>
      <text:p text:style-name="P19"><draw:frame draw:style-name="fr19" draw:name="Image37" text:anchor-type="paragraph" svg:width="17cm" svg:height="13.018cm" draw:z-index="78"><draw:image xlink:href="Pictures/20000009000049B20000386F64B83E7D.svm" xlink:type="simple" xlink:show="embed" xlink:actuate="onLoad" draw:mime-type="image/x-svm"/><draw:image xlink:href="Pictures/10000001000002CA0000022337227469.png" xlink:type="simple" xlink:show="embed" xlink:actuate="onLoad" draw:mime-type="image/png"/></draw:frame></text:p>
      <text:h text:style-name="P131" text:outline-level="3"><text:bookmark-start text:name="__RefHeading___Toc2797_992022433"/>Classificació d'anotacions<text:bookmark-end text:name="__RefHeading___Toc2797_992022433"/></text:h>
      <text:h text:style-name="P134" text:outline-level="4"><text:bookmark-start text:name="__RefHeading___Toc2672_992022433"/>Classificació <text:span text:style-name="T98">simple</text:span><text:bookmark-end text:name="__RefHeading___Toc2672_992022433"/></text:h>
      <text:p text:style-name="P44"><text:span text:style-name="T95">Mitjançant aquesta funcionalitat, l</text:span>'usuari distribuïdor pot <text:span text:style-name="T95">canviar la classificació d'una o vàries anotacions de registre. La classificació d'una anotació de registre es pot entendre com la forma que te distribució d'associar una anotació de registre amb un procediment administratiu.</text:span></text:p>
      <text:p text:style-name="P45">Per a canviar la classificació d'una única anotació de registre s'ha d'utilitzar l'opció «Classificar» que està disponible al menú d'accions de cada anotació de registre.</text:p>
      <text:p text:style-name="P46"><draw:custom-shape text:anchor-type="paragraph" draw:z-index="29" draw:name="Forma1" draw:style-name="gr2" draw:text-style-name="P201" svg:width="5.248cm" svg:height="0.918cm" svg:x="9.405cm" svg:y="2.805cm"><text:p/><draw:enhanced-geometry svg:viewBox="0 0 21600 21600" draw:type="rectangle" draw:enhanced-path="M 0 0 L 21600 0 21600 21600 0 21600 0 0 Z N"/></draw:custom-shape><text:soft-page-break/><draw:frame draw:style-name="fr3" draw:name="Frame38" text:anchor-type="as-char" svg:width="12.806cm" draw:z-index="74"><draw:text-box fo:min-height="6.211cm"><text:p text:style-name="fig."><draw:frame draw:style-name="fr15" draw:name="Imatge2" text:anchor-type="paragraph" svg:width="12.806cm" style:rel-width="100%" svg:height="6.211cm" style:rel-height="scale" draw:z-index="75"><draw:image xlink:href="Pictures/100000010000021400000102FE220316.png" xlink:type="simple" xlink:show="embed" xlink:actuate="onLoad" draw:mime-type="image/png"/></draw:frame>fig. <text:sequence text:ref-name="reffig.30" text:name="fig." text:formula="ooow:fig.+1" style:num-format="1">30</text:sequence>: Localització per classificar l’anotació que volem.</text:p></draw:text-box></draw:frame></text:p>
      <text:p text:style-name="P45"/>
      <text:p text:style-name="P45"/>
      <text:p text:style-name="P48">Al seleccionar aquesta opció apareix una finestra modal a on es mostren els detalls de l'anotació de registre seleccionada i a on es pot seleccionar un dels procediments disponibles per a la classificació.</text:p>
      <text:p text:style-name="P47"><draw:frame draw:style-name="fr3" draw:name="Frame39" text:anchor-type="as-char" svg:width="17cm" draw:z-index="83"><draw:text-box fo:min-height="11.012cm"><text:p text:style-name="fig."><draw:frame draw:style-name="fr15" draw:name="Imatge3" text:anchor-type="paragraph" svg:width="17cm" style:rel-width="100%" svg:height="11.012cm" style:rel-height="scale" draw:z-index="84"><draw:image xlink:href="Pictures/100000010000038400000247B9DB4920.png" xlink:type="simple" xlink:show="embed" xlink:actuate="onLoad" draw:mime-type="image/png"/></draw:frame>fig. <text:sequence text:ref-name="reffig.31" text:name="fig." text:formula="ooow:fig.+1" style:num-format="1">31</text:sequence>: Modal dels detalls de l’anotació abans de la classificació.</text:p></draw:text-box></draw:frame></text:p>
      <text:p text:style-name="P48"/>
      <text:p text:style-name="P48">Una vegada seleccionat el procediment, es pot fer clic al botó «Classificar» per a fer efectiva la classificació o també es pot utilitzar el botó «Cancel·lar» per a sortir de la pantalla sense fer cap canvi en l'anotació de registre.</text:p>
      <text:h text:style-name="P136" text:outline-level="4"><text:bookmark-start text:name="__RefHeading___Toc2674_992022433"/><text:soft-page-break/>Classificació <text:span text:style-name="T98">múltiple</text:span><text:bookmark-end text:name="__RefHeading___Toc2674_992022433"/></text:h>
      <text:p text:style-name="P51">En la pantalla de consulta d'anotacions es dona l'opció a l'usuari de seleccionar múltiples elements i modificar la seva classificació amb una sola acció.</text:p>
      <text:p text:style-name="P21"><text:span text:style-name="T1">Per a utilitzar aquesta possibilitat s'han de seleccionar una o més anotacions de registre utilitzant el camp de tipus </text:span><text:span text:style-name="T84">checkbox</text:span><text:span text:style-name="T1"> disponible a la columna de l'esquerra.</text:span></text:p>
      <text:p text:style-name="P51"><draw:frame draw:style-name="fr1" draw:name="Frame40" text:anchor-type="paragraph" svg:width="17cm" draw:z-index="79"><draw:text-box fo:min-height="3.358cm"><text:p text:style-name="fig."><draw:frame draw:style-name="fr15" draw:name="Image38" text:anchor-type="paragraph" svg:width="17cm" style:rel-width="100%" svg:height="3.358cm" style:rel-height="scale" draw:z-index="80"><draw:image xlink:href="Pictures/10000000000004E2000000F7A518086A.png" xlink:type="simple" xlink:show="embed" xlink:actuate="onLoad" draw:mime-type="image/png"/></draw:frame>fig. <text:sequence text:ref-name="reffig.32" text:name="fig." text:formula="ooow:fig.+1" style:num-format="1">32</text:sequence>: Exemple de com es poden fer classificacions en grup.</text:p></draw:text-box></draw:frame><draw:custom-shape text:anchor-type="paragraph" draw:z-index="30" draw:name="Forma1" draw:style-name="gr1" draw:text-style-name="P201" svg:width="0.419cm" svg:height="2.223cm" svg:x="0.212cm" svg:y="0.637cm"><text:p/><draw:enhanced-geometry svg:viewBox="0 0 21600 21600" draw:type="rectangle" draw:enhanced-path="M 0 0 L 21600 0 21600 21600 0 21600 0 0 Z N"/></draw:custom-shape></text:p>
      <text:p text:style-name="P50">Una vegada seleccionades les anotacions de registre, s'ha de fer clic al botó «Classificar» situat a la part superior dreta de la taula. <text:span text:style-name="T96">Al </text:span>fer clic a damunt el botó<text:span text:style-name="T96"> aquesta opció apareix</text:span>erà<text:span text:style-name="T96"> una finestra modal a on es mostren els detalls de l</text:span>es <text:span text:style-name="T96">anotaci</text:span>ons<text:span text:style-name="T96"> de registre seleccionad</text:span>es<text:span text:style-name="T96"> i a on es pot seleccionar un dels procediments disponibles per a la classificació.</text:span></text:p>
      <text:p text:style-name="P50"><draw:frame draw:style-name="fr3" draw:name="Frame41" text:anchor-type="as-char" svg:width="17cm" draw:z-index="85"><draw:text-box fo:min-height="8.841cm"><text:p text:style-name="fig."><draw:frame draw:style-name="fr15" draw:name="Imatge5" text:anchor-type="paragraph" svg:width="17cm" style:rel-width="100%" svg:height="8.841cm" style:rel-height="scale" draw:z-index="86"><draw:image xlink:href="Pictures/100000010000049500000262E1CE01B6.png" xlink:type="simple" xlink:show="embed" xlink:actuate="onLoad" draw:mime-type="image/png"/></draw:frame>fig. <text:sequence text:ref-name="reffig.33" text:name="fig." text:formula="ooow:fig.+1" style:num-format="1">33</text:sequence>: Modal on es troba la informació de totes les anotacions seleccionades per a la classificació. </text:p></draw:text-box></draw:frame></text:p>
      <text:p text:style-name="P50"/>
      <text:p text:style-name="P49">Una vegada seleccionat el procediment, es pot fer clic al botó «Classificar» per a fer efectiva la classificació o també es pot utilitzar el botó «Cancel·lar» per a sortir de la pantalla sense fer cap canvi en <text:span text:style-name="T97">les </text:span>anotaci<text:span text:style-name="T97">ons</text:span> de registre.</text:p>
      <text:p text:style-name="P52"><draw:frame draw:style-name="fr18" draw:name="Imatge6" text:anchor-type="paragraph" svg:width="17cm" svg:height="8.022cm" draw:z-index="31"><draw:image xlink:href="Pictures/1000000100000497000002624FA18433.png" xlink:type="simple" xlink:show="embed" xlink:actuate="onLoad" draw:mime-type="image/png"/></draw:frame><text:soft-page-break/></text:p>
      <text:p text:style-name="P52">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52">Si una anotació de registre s'ha mogut a una altra bústia o s'ha enviat a un backoffice com a resultat del canvi de procediment, apareixerà un missatge a la dreta de l'anotació de registre indicant aquest fet.</text:p>
      <text:p text:style-name="P52"/>
      <text:h text:style-name="Heading_20_3" text:outline-level="3"><text:bookmark-start text:name="__RefHeading___Toc4232_1810852831"/>Reserva/<text:span text:style-name="T131">agafar</text:span> d’anotacions<text:bookmark-end text:name="__RefHeading___Toc4232_1810852831"/></text:h>
      <text:p text:style-name="P109">Aquesta acció s’ha d’habilitar amb la propietat es.caib.distribucio.anotacions.permetre.reservar.</text:p>
      <text:p text:style-name="P113">El concepte de reservar anotacions és la possibilitat <text:span text:style-name="T131">de reservar</text:span> una anotació i realitzar una sèrie d’accions sobre ella que no estan permeses <text:span text:style-name="T131">si un usuari no té </text:span>l’anotació reservada/agafada.</text:p>
      <text:p text:style-name="P114">Les anotacions <text:span text:style-name="T131">reservades</text:span> es podran diferenciar de les no <text:span text:style-name="T131">reservades</text:span> amb el botó d’accions, en cas de tenir reservada l’anotació aquest botó es veurà amb el color blau i en el cas contrari es veurà amb el color taronja.</text:p>
      <text:p text:style-name="P113"><draw:frame draw:style-name="fr17" draw:name="Imagen5" text:anchor-type="paragraph" svg:x="2.983cm" svg:y="-0.058cm" svg:width="1.459cm" svg:height="0.527cm" draw:z-index="82"><draw:image xlink:href="Pictures/100000000000006C000000273E1F1C1B.png" xlink:type="simple" xlink:show="embed" xlink:actuate="onLoad" draw:mime-type="image/png"/></draw:frame>- Reservada/agafada</text:p>
      <text:p text:style-name="P113"><draw:frame draw:style-name="fr17" draw:name="Imagen7" text:anchor-type="paragraph" svg:x="2.155cm" svg:y="-0.079cm" svg:width="1.471cm" svg:height="0.536cm" draw:z-index="90"><draw:image xlink:href="Pictures/100000000000006B00000027F1CB9633.png" xlink:type="simple" xlink:show="embed" xlink:actuate="onLoad" draw:mime-type="image/png"/></draw:frame>- No reservada </text:p>
      <text:p text:style-name="P114"><draw:frame draw:style-name="fr2" draw:name="Frame42" text:anchor-type="paragraph" svg:x="0.885cm" svg:y="1.332cm" svg:width="4.223cm" draw:z-index="91"><draw:text-box fo:min-height="4.239cm"><text:p text:style-name="fig."><draw:frame draw:style-name="fr15" draw:name="Imagen8" text:anchor-type="paragraph" svg:width="4.223cm" style:rel-width="100%" svg:height="4.239cm" style:rel-height="scale" draw:z-index="97"><draw:image xlink:href="Pictures/10000000000000FB000000FC9CA6EA7B.png" xlink:type="simple" xlink:show="embed" xlink:actuate="onLoad" draw:mime-type="image/png"/></draw:frame>fig. <text:sequence text:ref-name="reffig.34" text:name="fig." text:formula="ooow:fig.+1" style:num-format="1">34</text:sequence>: Detall d’opcions d’una anotació reservada.</text:p></draw:text-box></draw:frame>Un usuari que té <text:span text:style-name="T131">reservada</text:span> una anotació pot realitzar les següents accions <text:span text:style-name="T131">(marcades) </text:span>sobre l’anotació. <text:span text:style-name="T131">A més també pot alliberar l’anotació, deixant-la en estat ‘no reservada’.</text:span></text:p>
      <text:p text:style-name="P115"><text:soft-page-break/>En canvi, una anotació que està alliberada (no agafada per cap usuari) només permetrà les següents accions, <text:span text:style-name="T132">entre elles fer la reserva (agafar)</text:span>:</text:p>
      <text:p text:style-name="P115"><draw:frame draw:style-name="fr16" draw:name="Imagen11" text:anchor-type="paragraph" svg:x="0.298cm" svg:y="0.053cm" svg:width="4.498cm" svg:height="3.519cm" draw:z-index="98"><draw:image xlink:href="Pictures/10000000000000AA00000085621A5AE8.png" xlink:type="simple" xlink:show="embed" xlink:actuate="onLoad" draw:mime-type="image/png"/></draw:frame>I finalment, en cas d’estar reservada, la resta d’usuaris veuran l’anotació de la següent forma, on es veurà reflectit l'usuari que té reservada l’anotació.</text:p>
      <text:p text:style-name="P115"><draw:frame draw:style-name="fr2" draw:name="Frame43" text:anchor-type="paragraph" svg:x="0.339cm" svg:y="0.053cm" svg:width="4.471cm" draw:z-index="99"><draw:text-box fo:min-height="4.657cm"><text:p text:style-name="fig."><draw:frame draw:style-name="fr15" draw:name="Imagen12" text:anchor-type="paragraph" svg:width="4.471cm" style:rel-width="100%" svg:height="4.657cm" style:rel-height="scale" draw:z-index="100"><draw:image xlink:href="Pictures/10000000000000A9000000B000CFF4C2.png" xlink:type="simple" xlink:show="embed" xlink:actuate="onLoad" draw:mime-type="image/png"/></draw:frame>fig. <text:sequence text:ref-name="reffig.35" text:name="fig." text:formula="ooow:fig.+1" style:num-format="1">35</text:sequence>: Detall de com la resta d’usuaris veuen una anotació reservada per altre. </text:p></draw:text-box></draw:frame></text:p>
      <text:p text:style-name="P115">En cas de reservar una anotació que està prèviament reservada per un altre usuari, <text:span text:style-name="T132">l’aplicació</text:span> enviarà un correu d’avís a l’usuari actual que té reservada l’anotació.</text:p>
      <text:p text:style-name="P111"/>
      <text:h text:style-name="P129" text:outline-level="1"><text:bookmark-start text:name="__RefHeading___Toc32805_3233606579"/>Opcions d'usuari<text:bookmark-end text:name="__RefHeading___Toc32805_3233606579"/></text:h>
      <text:p text:style-name="P88"/>
      <text:p text:style-name="P88"><text:span text:style-name="T117">Tots els usuaris disposen d'un menú </text:span><text:span text:style-name="T118">comú </text:span><text:span text:style-name="T119">d</text:span><text:span text:style-name="T120">'usuari </text:span><text:span text:style-name="T117">per a la configuració </text:span><text:span text:style-name="T119">d</text:span><text:span text:style-name="T120">el perfil, la descàrrega d'aquest manual o la desconnexió de la sessió</text:span><text:span text:style-name="T117"> des del desplegable del menú usuari</text:span><text:span text:style-name="T118"> </text:span><text:span text:style-name="T117">:</text:span></text:p>
      <text:p text:style-name="P83"/>
      <text:p text:style-name="P88"><draw:frame draw:style-name="fr1" draw:name="Frame4" text:anchor-type="paragraph" svg:width="10.186cm" draw:z-index="34"><draw:text-box fo:min-height="3.149cm"><text:p text:style-name="fig."><draw:frame draw:style-name="fr14" draw:name="Image9" text:anchor-type="as-char" svg:width="10.186cm" style:rel-width="100%" svg:height="3.149cm" style:rel-height="scale" draw:z-index="115"><draw:image xlink:href="Pictures/100000000000018100000077DA38AD04.png" xlink:type="simple" xlink:show="embed" xlink:actuate="onLoad" draw:mime-type="image/png"/></draw:frame><text:span text:style-name="T113"><text:line-break/></text:span>fig. <text:sequence text:ref-name="reffig.36" text:name="fig." text:formula="ooow:fig.+1" style:num-format="1">36</text:sequence>: Menú d'usuari amb accés a la configuració del perfil.</text:p></draw:text-box></draw:frame></text:p>
      <text:p text:style-name="P70">Les opcions del menú per les opcions de l'usuari són les següents:</text:p>
      <text:list text:style-name="L5">
        <text:list-item>
          <text:p text:style-name="P192">Configuració usuari: Permet configurar opcions del perfil de l'usuari a DISTRIBUCIO.</text:p>
        </text:list-item>
        <text:list-item>
          <text:p text:style-name="P192"><draw:frame draw:style-name="fr13" draw:name="Image12" text:anchor-type="paragraph" svg:x="1.291cm" svg:y="0cm" svg:width="0.503cm" svg:height="0.556cm" draw:z-index="48"><draw:image xlink:href="Pictures/100000000000001300000015B8C51E22.png" xlink:type="simple" xlink:show="embed" xlink:actuate="onLoad" draw:mime-type="image/png"/></draw:frame><text:s/>Manual d'Usuari: permet la descàrrega d'aquest mateix manual.</text:p>
        </text:list-item>
        <text:list-item>
          <text:p text:style-name="P192"><draw:frame draw:style-name="fr13" draw:name="Image13" text:anchor-type="paragraph" svg:x="1.291cm" svg:y="0cm" svg:width="0.635cm" svg:height="0.423cm" draw:z-index="49"><draw:image xlink:href="Pictures/1000000000000018000000104D26F5BE.png" xlink:type="simple" xlink:show="embed" xlink:actuate="onLoad" draw:mime-type="image/png"/></draw:frame>Desconnectar: esborra les <text:span text:style-name="T111">cookies</text:span><text:span text:style-name="T112"> de sessió i força la desconnexió de l'usuari des del navegador.</text:span></text:p>
        </text:list-item>
      </text:list>
      <text:p text:style-name="P75"/>
      <text:p text:style-name="P75">A continuació es detallen les opcions de la configuració del perfil de l'usuari.</text:p>
      <text:h text:style-name="P130" text:outline-level="2"><text:bookmark-start text:name="__RefHeading___Toc32807_3233606579"/>Configuraci<text:span text:style-name="T123">ó</text:span> usuari<text:bookmark-end text:name="__RefHeading___Toc32807_3233606579"/></text:h>
      <text:p text:style-name="P107">Des de l'opció de configuració de l'usuari és possible comprovar les dades personals, veure els rols assignats i configurar com rebre els correus i l'idioma de l'aplicació de DISTRIBUCIO.</text:p>
      <text:p text:style-name="P108"><draw:frame draw:style-name="fr1" draw:name="Frame7" text:anchor-type="paragraph" svg:width="12.562cm" draw:z-index="44"><draw:text-box fo:min-height="7.567cm"><text:p text:style-name="P118"><text:span text:style-name="T113"><text:line-break/></text:span><draw:frame draw:style-name="fr12" draw:name="Imatge13" text:anchor-type="char" svg:width="13.427cm" svg:height="6.302cm" draw:z-index="101"><draw:image xlink:href="Pictures/1000000100000523000001A23F4F38FB.png" xlink:type="simple" xlink:show="embed" xlink:actuate="onLoad" draw:mime-type="image/png"/></draw:frame>fig. <text:sequence text:ref-name="reffig.37" text:name="fig." text:formula="ooow:fig.+1" style:num-format="1">37</text:sequence>: Modal per la configuració de les opcions de l'usuari.</text:p></draw:text-box></draw:frame>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text:style-name="L6">
        <text:list-item>
          <text:p text:style-name="P196"><text:soft-page-break/>Nom<text:span text:style-name="T92">: Nom de l'usuari a partir de les dades externes de l'usuari pel codi d'usuari amb què s'ha autenticat.</text:span></text:p>
        </text:list-item>
        <text:list-item>
          <text:p text:style-name="P196">Nif<text:span text:style-name="T92">: Camp del NIF de l'usuari segons les dades externes i el codi d'autenticació.</text:span></text:p>
        </text:list-item>
        <text:list-item>
          <text:p text:style-name="P196">Correu<text:span text:style-name="T92"> electrònic: Adreça de correu electrònic corresponent a l'usuari.</text:span></text:p>
        </text:list-item>
        <text:list-item>
          <text:p text:style-name="P196">Rols<text:span text:style-name="T92">: Llistat de rols assignat a l'usuari autenticat a patir del qual es comprovaran els permisos d'accés a bústies i els tipus de rols per a l'usuari autenticat.</text:span></text:p>
        </text:list-item>
      </text:list>
      <text:p text:style-name="P110">Els 3 darrers camps que sí es poden modificar i guardar són els següents:</text:p>
      <text:list text:style-name="L7">
        <text:list-item>
          <text:p text:style-name="P197">Vols rebre correus de la bústia?<text:span text:style-name="T92">: Indica si rebre correus electrònics al correu de l'usuari quan una anotació arribi a alguna bústia de DISTRIBUCIO per la qual l'usuari té permís d'accés.</text:span></text:p>
        </text:list-item>
        <text:list-item>
          <text:p text:style-name="P197">Vols rebre els correus de la bústia agrupats en un únic correu al dia?<text:span text:style-name="T92">: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198">Idioma<text:span text:style-name="T92">: Selecció de l'idioma de l'aplicació de DISTRIBUCIO. L'usuari pot escollir "Català" o "Castellà".</text:span></text:p>
        </text:list-item>
        <text:list-item>
          <text:p text:style-name="P198"><text:span text:style-name="Fuente_20_de_20_párrafo_20_predeter.">Bústia</text:span><text:span text:style-name="T92">: On l’usuari pot seleccionar una de les bústies emmagatzemades a l’aplicació.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4"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color="#4f81bd" loext:opacity="100%"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5"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StarSymbol" fo:font-family="StarSymbol" style:font-family-generic="system" style:font-charset="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StarSymbol" fo:font-family="StarSymbol" style:font-family-generic="system" style:font-charset="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StarSymbol" fo:font-family="StarSymbol" style:font-family-generic="system" style:font-charset="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StarSymbol" fo:font-family="StarSymbol" style:font-family-generic="system" style:font-charset="x-symbol"/>
    </style:style>
    <style:style style:name="WW_5f_CharLFO50LVL3" style:display-name="WW_CharLFO50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style:style>
    <style:style style:name="WW_5f_CharLFO59LVL2" style:display-name="WW_CharLFO59LVL2" style:family="text">
      <style:text-properties style:font-name="StarSymbol" fo:font-family="StarSymbol" style:font-family-generic="system" style:font-charset="x-symbol"/>
    </style:style>
    <style:style style:name="WW_5f_CharLFO59LVL3" style:display-name="WW_CharLFO5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9LVL4" style:display-name="WW_CharLFO5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5" style:display-name="WW_CharLFO5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6" style:display-name="WW_CharLFO5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7" style:display-name="WW_CharLFO5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8" style:display-name="WW_CharLFO5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9" style:display-name="WW_CharLFO5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tarSymbol" fo:font-family="StarSymbol" style:font-family-generic="system" style:font-charset="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3" style:display-name="WW_CharLFO6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4" style:display-name="WW_CharLFO6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5" style:display-name="WW_CharLFO6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6" style:display-name="WW_CharLFO6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7" style:display-name="WW_CharLFO6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8" style:display-name="WW_CharLFO6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9" style:display-name="WW_CharLFO6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3" style:display-name="WW_CharLFO7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4" style:display-name="WW_CharLFO7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5" style:display-name="WW_CharLFO7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6" style:display-name="WW_CharLFO7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7" style:display-name="WW_CharLFO7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8" style:display-name="WW_CharLFO7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9" style:display-name="WW_CharLFO7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1" style:display-name="WW_CharLFO7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4" style:display-name="WW_CharLFO7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5" style:display-name="WW_CharLFO7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6" style:display-name="WW_CharLFO7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7" style:display-name="WW_CharLFO7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8" style:display-name="WW_CharLFO7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9" style:display-name="WW_CharLFO7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4" style:display-name="WW_CharLFO7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5" style:display-name="WW_CharLFO7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6" style:display-name="WW_CharLFO7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7" style:display-name="WW_CharLFO7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8" style:display-name="WW_CharLFO7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9" style:display-name="WW_CharLFO7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1">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paragraph-properties fo:text-align="start" style:justify-single-word="false"/>
      <style:text-properties fo:language="ca" fo:country="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MP5" style:family="paragraph" style:parent-style-name="Standard">
      <style:text-properties fo:language="ca" fo:country="ES" officeooo:paragraph-rsid="000e1972"/>
    </style:style>
    <style:style style:name="MP6" style:family="paragraph" style:parent-style-name="Footer">
      <style:text-properties fo:language="ca" fo:country="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MP11" style:family="paragraph" style:parent-style-name="Footer">
      <style:text-properties style:font-name="Calibri" fo:font-size="11pt" fo:language="ca" fo:country="ES" officeooo:paragraph-rsid="000e1972"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28" draw:name="Group 6" draw:style-name="Mgr1"><draw:frame draw:name="Picture 2" draw:style-name="Mgr2" draw:text-style-name="MP3" svg:width="6.966cm" svg:height="1.281cm" svg:x="1.767cm" svg:y="0cm"><draw:image xlink:href="Pictures/10000000000006A400000104792F8214.png" xlink:type="simple" xlink:show="embed" xlink:actuate="onLoad" draw:mime-type="image/png"><text:p/></draw:image></draw:frame><draw:frame draw:name="Picture 3" draw:style-name="Mgr3" draw:text-style-name="MP3" svg:width="1.65cm" svg:height="1.28cm" svg:x="0cm" svg:y="0cm"><draw:image xlink:href="Pictures/10000001000002E6000002BBD71058E4.png" xlink:type="simple" xlink:show="embed" xlink:actuate="onLoad" draw:mime-type="image/png"><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29</text:page-number></text:span><text:span text:style-name="MT1"><text:s/>/ </text:span><text:span text:style-name="MT1"><text:page-count>29</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6-04-20T10:43:04.702000021">20/04/2026</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25T15:02:21.392000000</meta:creation-date>
    <dc:date>2026-04-20T10:43:04.608000000</dc:date>
    <meta:editing-duration>PT22H31M6S</meta:editing-duration>
    <meta:editing-cycles>146</meta:editing-cycles>
    <meta:generator>LibreOffice/24.2.1.2$Windows_X86_64 LibreOffice_project/db4def46b0453cc22e2d0305797cf981b68ef5ac</meta:generator>
    <meta:document-statistic meta:table-count="6" meta:image-count="68" meta:object-count="0" meta:page-count="29" meta:paragraph-count="370" meta:word-count="4966" meta:character-count="30879" meta:non-whitespace-character-count="26313"/>
  </office:meta>
</office:document-meta>
</file>