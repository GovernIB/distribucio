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79999"/>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4" style:family="paragraph" style:parent-style-name="Standard">
      <style:text-properties fo:font-style="normal" officeooo:rsid="00d63ec8" officeooo:paragraph-rsid="00d673d7" style:font-style-asian="normal" style:font-style-complex="normal"/>
    </style:style>
    <style:style style:name="P65" style:family="paragraph" style:parent-style-name="Standard">
      <style:text-properties fo:font-style="normal" officeooo:rsid="00db5ce5" officeooo:paragraph-rsid="00d673d7" style:font-style-asian="normal" style:font-style-complex="normal"/>
    </style:style>
    <style:style style:name="P66" style:family="paragraph" style:parent-style-name="Standard">
      <style:text-properties fo:font-style="normal" officeooo:rsid="00db5ce5" officeooo:paragraph-rsid="00e8f23e" style:font-style-asian="normal" style:font-style-complex="normal"/>
    </style:style>
    <style:style style:name="P67" style:family="paragraph" style:parent-style-name="Standard">
      <style:text-properties fo:font-style="normal" officeooo:rsid="00e8f23e" officeooo:paragraph-rsid="00e8f23e" style:font-style-asian="normal" style:font-style-complex="normal"/>
    </style:style>
    <style:style style:name="P68" style:family="paragraph" style:parent-style-name="Text_20_body">
      <style:text-properties fo:font-style="normal" officeooo:rsid="00d81a0e" officeooo:paragraph-rsid="00d673d7"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8"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9"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0"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3"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4" style:family="paragraph" style:parent-style-name="Standard">
      <style:paragraph-properties style:line-height-at-least="0.476cm"/>
      <style:text-properties fo:color="#000000" loext:opacity="100%" officeooo:paragraph-rsid="019cebf9" fo:background-color="#fffffe"/>
    </style:style>
    <style:style style:name="P105" style:family="paragraph" style:parent-style-name="Standard">
      <style:paragraph-properties style:line-height-at-least="0.476cm"/>
      <style:text-properties fo:color="#000000" loext:opacity="100%" officeooo:paragraph-rsid="01b8b77e" fo:background-color="#fffffe"/>
    </style:style>
    <style:style style:name="P106" style:family="paragraph" style:parent-style-name="Standard">
      <style:paragraph-properties style:line-height-at-least="0.476cm"/>
      <style:text-properties fo:color="#000000" loext:opacity="100%" officeooo:paragraph-rsid="019cebf9" fo:background-color="#dddddd"/>
    </style:style>
    <style:style style:name="P107" style:family="paragraph" style:parent-style-name="Standard">
      <style:paragraph-properties style:line-height-at-least="0.476cm"/>
      <style:text-properties fo:color="#000000" loext:opacity="100%" officeooo:paragraph-rsid="01b5544c" fo:background-color="#dddddd"/>
    </style:style>
    <style:style style:name="P108" style:family="paragraph" style:parent-style-name="Standard">
      <style:paragraph-properties style:line-height-at-least="0.476cm"/>
      <style:text-properties fo:color="#000000" loext:opacity="100%" officeooo:paragraph-rsid="01b71c80" fo:background-color="#dddddd"/>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2"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4"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5"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7" style:family="paragraph" style:parent-style-name="Standard">
      <style:paragraph-properties fo:text-align="justify" style:justify-single-word="false"/>
      <style:text-properties fo:font-size="8pt" officeooo:paragraph-rsid="00d673d7" style:font-size-asian="8pt" style:font-size-complex="8pt"/>
    </style:style>
    <style:style style:name="P118" style:family="paragraph" style:parent-style-name="Standard">
      <style:paragraph-properties fo:text-align="start"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9"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3" style:family="paragraph" style:parent-style-name="Standard">
      <style:text-properties officeooo:paragraph-rsid="00d673d7"/>
    </style:style>
    <style:style style:name="P134" style:family="paragraph" style:parent-style-name="Text_20_body">
      <style:text-properties officeooo:paragraph-rsid="00d673d7"/>
    </style:style>
    <style:style style:name="P135" style:family="paragraph" style:parent-style-name="Standard">
      <style:text-properties officeooo:rsid="00d4e88a" officeooo:paragraph-rsid="00d8ffe0"/>
    </style:style>
    <style:style style:name="P136" style:family="paragraph" style:parent-style-name="Standard">
      <style:text-properties officeooo:paragraph-rsid="00e8f23e"/>
    </style:style>
    <style:style style:name="P137" style:family="paragraph" style:parent-style-name="Text_20_body">
      <style:text-properties officeooo:paragraph-rsid="00e8f23e"/>
    </style:style>
    <style:style style:name="P138" style:family="paragraph" style:parent-style-name="Fig.">
      <style:text-properties officeooo:paragraph-rsid="00e8f23e"/>
    </style:style>
    <style:style style:name="P139" style:family="paragraph" style:parent-style-name="Standard">
      <style:paragraph-properties fo:text-align="justify" style:justify-single-word="false"/>
      <style:text-properties officeooo:rsid="00931a7c" officeooo:paragraph-rsid="019c96f9"/>
    </style:style>
    <style:style style:name="P140" style:family="paragraph" style:parent-style-name="Text_20_body">
      <style:paragraph-properties fo:text-align="justify" style:justify-single-word="false"/>
      <style:text-properties officeooo:rsid="00931a7c" officeooo:paragraph-rsid="018c7b7a"/>
    </style:style>
    <style:style style:name="P141"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2"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9" style:family="paragraph" style:parent-style-name="Text_20_body">
      <style:paragraph-properties fo:text-align="justify" style:justify-single-word="false"/>
      <style:text-properties officeooo:rsid="0052b05f" officeooo:paragraph-rsid="0074fa21"/>
    </style:style>
    <style:style style:name="P150" style:family="paragraph" style:parent-style-name="Text_20_body">
      <style:paragraph-properties fo:text-align="justify" style:justify-single-word="false"/>
      <style:text-properties officeooo:rsid="00771bf9" officeooo:paragraph-rsid="00771bf9"/>
    </style:style>
    <style:style style:name="P151" style:family="paragraph" style:parent-style-name="Text_20_body">
      <style:paragraph-properties fo:text-align="center" style:justify-single-word="false"/>
      <style:text-properties officeooo:rsid="00771bf9" officeooo:paragraph-rsid="00771bf9"/>
    </style:style>
    <style:style style:name="P152" style:family="paragraph" style:parent-style-name="Text_20_body">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8ce69e"/>
    </style:style>
    <style:style style:name="P154" style:family="paragraph" style:parent-style-name="Text_20_body">
      <style:paragraph-properties fo:text-align="justify" style:justify-single-word="false"/>
      <style:text-properties officeooo:rsid="008ce69e" officeooo:paragraph-rsid="00771bf9"/>
    </style:style>
    <style:style style:name="P155" style:family="paragraph" style:parent-style-name="Text_20_body">
      <style:paragraph-properties fo:text-align="justify" style:justify-single-word="false"/>
      <style:text-properties officeooo:rsid="008ce69e" officeooo:paragraph-rsid="018c7b7a"/>
    </style:style>
    <style:style style:name="P156" style:family="paragraph" style:parent-style-name="Text_20_body">
      <style:paragraph-properties fo:text-align="justify" style:justify-single-word="false"/>
      <style:text-properties officeooo:rsid="008ce69e" officeooo:paragraph-rsid="01a9cdd2"/>
    </style:style>
    <style:style style:name="P157" style:family="paragraph" style:parent-style-name="Text_20_body">
      <style:text-properties officeooo:rsid="00a9a467" officeooo:paragraph-rsid="00a9a467"/>
    </style:style>
    <style:style style:name="P158" style:family="paragraph" style:parent-style-name="Text_20_body">
      <style:text-properties officeooo:rsid="00a9a467" officeooo:paragraph-rsid="019b515e"/>
    </style:style>
    <style:style style:name="P159" style:family="paragraph" style:parent-style-name="Text_20_body">
      <style:text-properties officeooo:rsid="00a9a467" officeooo:paragraph-rsid="019b5d65"/>
    </style:style>
    <style:style style:name="P160" style:family="paragraph" style:parent-style-name="Text_20_body">
      <style:text-properties officeooo:rsid="00aeb4b4" officeooo:paragraph-rsid="0195481e"/>
    </style:style>
    <style:style style:name="P161" style:family="paragraph" style:parent-style-name="Text_20_body">
      <style:paragraph-properties fo:text-align="center" style:justify-single-word="false"/>
      <style:text-properties officeooo:rsid="007af11d" officeooo:paragraph-rsid="01949037"/>
    </style:style>
    <style:style style:name="P162" style:family="paragraph" style:parent-style-name="Text_20_body">
      <style:paragraph-properties fo:text-align="center" style:justify-single-word="false"/>
      <style:text-properties officeooo:rsid="007af11d" officeooo:paragraph-rsid="019c96f9"/>
    </style:style>
    <style:style style:name="P163"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4" style:family="paragraph" style:parent-style-name="Text_20_body">
      <style:text-properties officeooo:rsid="00d81a0e" officeooo:paragraph-rsid="00d673d7"/>
    </style:style>
    <style:style style:name="P165" style:family="paragraph" style:parent-style-name="Text_20_body">
      <style:text-properties officeooo:rsid="00de9e71" officeooo:paragraph-rsid="00d673d7"/>
    </style:style>
    <style:style style:name="P166" style:family="paragraph" style:parent-style-name="Text_20_body">
      <style:text-properties officeooo:rsid="00e2fa38" officeooo:paragraph-rsid="00d673d7"/>
    </style:style>
    <style:style style:name="P167" style:family="paragraph" style:parent-style-name="Text_20_body">
      <style:text-properties officeooo:rsid="00e440cb" officeooo:paragraph-rsid="00d673d7"/>
    </style:style>
    <style:style style:name="P168" style:family="paragraph" style:parent-style-name="Text_20_body">
      <style:text-properties officeooo:rsid="00e59aa6" officeooo:paragraph-rsid="00d673d7"/>
    </style:style>
    <style:style style:name="P169" style:family="paragraph" style:parent-style-name="Text_20_body">
      <style:text-properties officeooo:rsid="00ea10cf" officeooo:paragraph-rsid="00d673d7"/>
    </style:style>
    <style:style style:name="P170" style:family="paragraph" style:parent-style-name="Text_20_body">
      <style:text-properties officeooo:rsid="00ea10cf" officeooo:paragraph-rsid="00e54ccf"/>
    </style:style>
    <style:style style:name="P171" style:family="paragraph" style:parent-style-name="Text_20_body">
      <style:text-properties officeooo:rsid="00ea866e" officeooo:paragraph-rsid="00d673d7"/>
    </style:style>
    <style:style style:name="P172" style:family="paragraph" style:parent-style-name="Text_20_body">
      <style:text-properties officeooo:rsid="00ebb296" officeooo:paragraph-rsid="00d673d7"/>
    </style:style>
    <style:style style:name="P173" style:family="paragraph" style:parent-style-name="Text_20_body">
      <style:text-properties officeooo:rsid="00ecdaee" officeooo:paragraph-rsid="00d673d7"/>
    </style:style>
    <style:style style:name="P174" style:family="paragraph" style:parent-style-name="Text_20_body">
      <style:text-properties officeooo:rsid="00d8ffe0" officeooo:paragraph-rsid="00d8ffe0"/>
    </style:style>
    <style:style style:name="P175" style:family="paragraph" style:parent-style-name="Text_20_body">
      <style:text-properties officeooo:paragraph-rsid="00e16f63"/>
    </style:style>
    <style:style style:name="P176" style:family="paragraph" style:parent-style-name="Text_20_body">
      <style:text-properties officeooo:rsid="00e54ccf" officeooo:paragraph-rsid="00e54ccf"/>
    </style:style>
    <style:style style:name="P177" style:family="paragraph" style:parent-style-name="Text_20_body">
      <style:text-properties officeooo:paragraph-rsid="00e54ccf"/>
    </style:style>
    <style:style style:name="P178" style:family="paragraph" style:parent-style-name="Text_20_body">
      <style:text-properties officeooo:rsid="00e5f97a" officeooo:paragraph-rsid="00e5f97a"/>
    </style:style>
    <style:style style:name="P179" style:family="paragraph" style:parent-style-name="Text_20_body">
      <style:text-properties officeooo:paragraph-rsid="00e5f97a"/>
    </style:style>
    <style:style style:name="P180" style:family="paragraph" style:parent-style-name="Text_20_body">
      <style:text-properties officeooo:rsid="00e54ccf" officeooo:paragraph-rsid="00e54ccf" fo:background-color="transparent"/>
    </style:style>
    <style:style style:name="P181" style:family="paragraph" style:parent-style-name="Text_20_body">
      <style:text-properties officeooo:paragraph-rsid="00dda4cb"/>
    </style:style>
    <style:style style:name="P18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4" style:family="paragraph" style:parent-style-name="Fig.">
      <style:text-properties officeooo:rsid="00ccb8e2" officeooo:paragraph-rsid="00e8f23e"/>
    </style:style>
    <style:style style:name="P195"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6"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7"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8" style:family="paragraph" style:parent-style-name="Table_20_Contents">
      <style:paragraph-properties fo:text-align="justify" style:justify-single-word="false"/>
      <style:text-properties officeooo:rsid="014c5388" officeooo:paragraph-rsid="01a1cb29"/>
    </style:style>
    <style:style style:name="P199" style:family="paragraph" style:parent-style-name="Table_20_Contents">
      <style:paragraph-properties fo:text-align="justify" style:justify-single-word="false"/>
      <style:text-properties officeooo:rsid="014c5388" officeooo:paragraph-rsid="01a9cdd2"/>
    </style:style>
    <style:style style:name="P200" style:family="paragraph" style:parent-style-name="Standard">
      <style:text-properties officeooo:rsid="014c5388" officeooo:paragraph-rsid="01a9cdd2"/>
    </style:style>
    <style:style style:name="P201" style:family="paragraph" style:parent-style-name="Text_20_body">
      <style:text-properties officeooo:rsid="014c5388" officeooo:paragraph-rsid="01a9cdd2"/>
    </style:style>
    <style:style style:name="P202" style:family="paragraph" style:parent-style-name="Text_20_body">
      <style:text-properties officeooo:rsid="014c5388" officeooo:paragraph-rsid="019cebf9"/>
    </style:style>
    <style:style style:name="P203" style:family="paragraph" style:parent-style-name="Text_20_body">
      <style:text-properties officeooo:rsid="014c5388" officeooo:paragraph-rsid="01a1cb29"/>
    </style:style>
    <style:style style:name="P204" style:family="paragraph" style:parent-style-name="Text_20_body">
      <style:text-properties officeooo:rsid="014c5388" officeooo:paragraph-rsid="01b79797"/>
    </style:style>
    <style:style style:name="P205" style:family="paragraph" style:parent-style-name="Table_20_Contents">
      <style:paragraph-properties fo:text-align="justify" style:justify-single-word="false"/>
      <style:text-properties style:font-name="Consolas" officeooo:paragraph-rsid="019cebf9"/>
    </style:style>
    <style:style style:name="P206"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7" style:family="paragraph" style:parent-style-name="Table_20_Contents">
      <style:paragraph-properties fo:text-align="justify" style:justify-single-word="false"/>
      <style:text-properties style:font-name="Consolas" officeooo:rsid="015e4779" officeooo:paragraph-rsid="019cebf9"/>
    </style:style>
    <style:style style:name="P208" style:family="paragraph" style:parent-style-name="Table_20_Contents">
      <style:paragraph-properties fo:text-align="justify" style:justify-single-word="false"/>
      <style:text-properties style:font-name="Consolas" officeooo:rsid="01622317" officeooo:paragraph-rsid="019cebf9"/>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10"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1" style:family="paragraph" style:parent-style-name="Text_20_body">
      <style:text-properties officeooo:rsid="0149cec3" officeooo:paragraph-rsid="01a9cdd2"/>
    </style:style>
    <style:style style:name="P212" style:family="paragraph" style:parent-style-name="Table_20_Contents">
      <style:paragraph-properties fo:text-align="justify" style:justify-single-word="false"/>
      <style:text-properties officeooo:rsid="015c0e13" officeooo:paragraph-rsid="019cebf9"/>
    </style:style>
    <style:style style:name="P213" style:family="paragraph" style:parent-style-name="Table_20_Contents">
      <style:paragraph-properties fo:text-align="justify" style:justify-single-word="false"/>
      <style:text-properties officeooo:rsid="015fa555" officeooo:paragraph-rsid="019cebf9"/>
    </style:style>
    <style:style style:name="P214" style:family="paragraph" style:parent-style-name="Text_20_body">
      <style:text-properties officeooo:rsid="015fa555" officeooo:paragraph-rsid="019cebf9"/>
    </style:style>
    <style:style style:name="P215" style:family="paragraph" style:parent-style-name="Table_20_Contents">
      <style:paragraph-properties fo:text-align="justify" style:justify-single-word="false"/>
      <style:text-properties officeooo:rsid="0160d5f3" officeooo:paragraph-rsid="019cebf9"/>
    </style:style>
    <style:style style:name="P216" style:family="paragraph" style:parent-style-name="Table_20_Contents">
      <style:paragraph-properties fo:text-align="justify" style:justify-single-word="false"/>
      <style:text-properties officeooo:rsid="0160d5f3" officeooo:paragraph-rsid="01a9cdd2"/>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8"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9" style:family="paragraph" style:parent-style-name="Standard">
      <style:text-properties officeooo:rsid="007f55bb" officeooo:paragraph-rsid="01a9cdd2"/>
    </style:style>
    <style:style style:name="P220" style:family="paragraph" style:parent-style-name="Text_20_body">
      <style:text-properties officeooo:rsid="007f55bb" officeooo:paragraph-rsid="01915c4c"/>
    </style:style>
    <style:style style:name="P221" style:family="paragraph" style:parent-style-name="Text_20_body">
      <style:paragraph-properties fo:text-align="center" style:justify-single-word="false"/>
      <style:text-properties officeooo:rsid="007f55bb" officeooo:paragraph-rsid="01915c4c"/>
    </style:style>
    <style:style style:name="P222" style:family="paragraph" style:parent-style-name="Table_20_Contents">
      <style:paragraph-properties fo:text-align="justify" style:justify-single-word="false"/>
      <style:text-properties officeooo:rsid="01546630" officeooo:paragraph-rsid="01a9cdd2"/>
    </style:style>
    <style:style style:name="P223" style:family="paragraph" style:parent-style-name="Text_20_body">
      <style:paragraph-properties fo:text-align="center" style:justify-single-word="false"/>
      <style:text-properties officeooo:rsid="007ddc84" officeooo:paragraph-rsid="01915c4c"/>
    </style:style>
    <style:style style:name="P224" style:family="paragraph" style:parent-style-name="Text_20_body">
      <style:text-properties officeooo:rsid="007ddc84" officeooo:paragraph-rsid="01915c4c"/>
    </style:style>
    <style:style style:name="P225" style:family="paragraph" style:parent-style-name="Text_20_body">
      <style:text-properties officeooo:rsid="007ddc84" officeooo:paragraph-rsid="019c96f9"/>
    </style:style>
    <style:style style:name="P226" style:family="paragraph" style:parent-style-name="Text_20_body">
      <style:text-properties officeooo:rsid="01836b49" officeooo:paragraph-rsid="01915c4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Figure">
      <style:text-properties officeooo:paragraph-rsid="018d9a1e"/>
    </style:style>
    <style:style style:name="P231" style:family="paragraph" style:parent-style-name="Figure">
      <style:text-properties officeooo:paragraph-rsid="01a9cdd2"/>
    </style:style>
    <style:style style:name="P232" style:family="paragraph" style:parent-style-name="Text_20_body">
      <style:text-properties officeooo:paragraph-rsid="01a9cdd2"/>
    </style:style>
    <style:style style:name="P233" style:family="paragraph" style:parent-style-name="Text_20_body">
      <style:text-properties officeooo:rsid="01915c4c" officeooo:paragraph-rsid="01915c4c"/>
    </style:style>
    <style:style style:name="P234" style:family="paragraph" style:parent-style-name="Text_20_body">
      <style:paragraph-properties fo:margin-left="0cm" fo:margin-right="0cm" fo:text-indent="0cm" style:auto-text-indent="false"/>
      <style:text-properties officeooo:rsid="01915c4c" officeooo:paragraph-rsid="01949037"/>
    </style:style>
    <style:style style:name="P235" style:family="paragraph" style:parent-style-name="Text_20_body">
      <style:text-properties officeooo:rsid="018c7b7a" officeooo:paragraph-rsid="018c7b7a"/>
    </style:style>
    <style:style style:name="P236" style:family="paragraph" style:parent-style-name="Text_20_body">
      <style:text-properties officeooo:rsid="018c7b7a" officeooo:paragraph-rsid="01a9cdd2"/>
    </style:style>
    <style:style style:name="P237" style:family="paragraph" style:parent-style-name="Table_20_Contents">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8c7b7a"/>
    </style:style>
    <style:style style:name="P239" style:family="paragraph" style:parent-style-name="Text_20_body">
      <style:paragraph-properties fo:text-align="justify" style:justify-single-word="false"/>
      <style:text-properties officeooo:rsid="018c7b7a" officeooo:paragraph-rsid="01a3408a"/>
    </style:style>
    <style:style style:name="P240" style:family="paragraph" style:parent-style-name="Text_20_body">
      <style:paragraph-properties fo:text-align="justify" style:justify-single-word="false"/>
      <style:text-properties officeooo:rsid="018c7b7a" officeooo:paragraph-rsid="01a9cdd2"/>
    </style:style>
    <style:style style:name="P241" style:family="paragraph" style:parent-style-name="Text_20_body">
      <style:paragraph-properties fo:text-align="justify" style:justify-single-word="false"/>
      <style:text-properties officeooo:rsid="018c7b7a" officeooo:paragraph-rsid="01aba0a4"/>
    </style:style>
    <style:style style:name="P242" style:family="paragraph" style:parent-style-name="Text_20_body">
      <style:paragraph-properties fo:text-align="justify" style:justify-single-word="false"/>
      <style:text-properties officeooo:rsid="018c7b7a" officeooo:paragraph-rsid="01b79999"/>
    </style:style>
    <style:style style:name="P243" style:family="paragraph" style:parent-style-name="Text_20_body">
      <style:paragraph-properties fo:text-align="center" style:justify-single-word="false"/>
      <style:text-properties officeooo:rsid="018c7b7a" officeooo:paragraph-rsid="018c7b7a"/>
    </style:style>
    <style:style style:name="P244" style:family="paragraph" style:parent-style-name="Text_20_body">
      <style:paragraph-properties fo:text-align="center" style:justify-single-word="false"/>
      <style:text-properties officeooo:rsid="018c7b7a" officeooo:paragraph-rsid="018f92fd"/>
    </style:style>
    <style:style style:name="P245" style:family="paragraph" style:parent-style-name="Text_20_body">
      <style:text-properties officeooo:rsid="018c7b7a" officeooo:paragraph-rsid="018f92fd"/>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7"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1"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2" style:family="paragraph" style:parent-style-name="Standard">
      <style:text-properties fo:language="ca" fo:country="ES" officeooo:rsid="003dd471" officeooo:paragraph-rsid="018c7b7a"/>
    </style:style>
    <style:style style:name="P253"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4" style:family="paragraph" style:parent-style-name="Standard">
      <style:text-properties style:font-name="Calibri" fo:language="ca" fo:country="ES" officeooo:paragraph-rsid="018c7b7a"/>
    </style:style>
    <style:style style:name="P255" style:family="paragraph" style:parent-style-name="Standard">
      <style:paragraph-properties fo:padding="0.049cm" fo:border="0.06pt solid #000000" style:shadow="#000000 0cm 0cm"/>
      <style:text-properties officeooo:paragraph-rsid="0195481e"/>
    </style:style>
    <style:style style:name="P256" style:family="paragraph" style:parent-style-name="Text_20_body">
      <style:text-properties officeooo:rsid="0195481e" officeooo:paragraph-rsid="0195481e"/>
    </style:style>
    <style:style style:name="P257"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8"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9"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60"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1"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4"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6"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3"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4"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5" style:family="paragraph" style:parent-style-name="Table_20_Contents">
      <style:paragraph-properties fo:text-align="justify" style:justify-single-word="false"/>
      <style:text-properties officeooo:rsid="01a00707" officeooo:paragraph-rsid="01a00707"/>
    </style:style>
    <style:style style:name="P376" style:family="paragraph" style:parent-style-name="Table_20_Contents">
      <style:paragraph-properties fo:text-align="justify" style:justify-single-word="false"/>
      <style:text-properties officeooo:rsid="01a00707" officeooo:paragraph-rsid="01a9cdd2"/>
    </style:style>
    <style:style style:name="P37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80"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1"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2" style:family="paragraph" style:parent-style-name="Text_20_body">
      <style:paragraph-properties fo:text-align="justify" style:justify-single-word="false"/>
      <style:text-properties officeooo:rsid="009dea99" officeooo:paragraph-rsid="018c7b7a"/>
    </style:style>
    <style:style style:name="P383" style:family="paragraph" style:parent-style-name="Text_20_body">
      <style:paragraph-properties fo:text-align="justify" style:justify-single-word="false"/>
      <style:text-properties officeooo:rsid="007e0567" officeooo:paragraph-rsid="018c7b7a"/>
    </style:style>
    <style:style style:name="P384" style:family="paragraph" style:parent-style-name="Text_20_body">
      <style:paragraph-properties fo:text-align="justify" style:justify-single-word="false"/>
      <style:text-properties officeooo:rsid="009edb4e" officeooo:paragraph-rsid="018c7b7a"/>
    </style:style>
    <style:style style:name="P385" style:family="paragraph" style:parent-style-name="Text_20_body">
      <style:text-properties officeooo:rsid="00675fb3" officeooo:paragraph-rsid="00a8be7c"/>
    </style:style>
    <style:style style:name="P386" style:family="paragraph" style:parent-style-name="Text_20_body">
      <style:paragraph-properties fo:margin-left="0cm" fo:margin-right="0cm" fo:text-indent="0cm" style:auto-text-indent="false"/>
      <style:text-properties officeooo:rsid="01949037" officeooo:paragraph-rsid="01949037"/>
    </style:style>
    <style:style style:name="P387" style:family="paragraph" style:parent-style-name="Text_20_body">
      <style:text-properties officeooo:rsid="017c0014" officeooo:paragraph-rsid="019b515e"/>
    </style:style>
    <style:style style:name="P388" style:family="paragraph" style:parent-style-name="Fig.">
      <style:paragraph-properties fo:text-align="center" style:justify-single-word="false"/>
      <style:text-properties officeooo:rsid="017e73c9" officeooo:paragraph-rsid="01794cf9"/>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4"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6" style:family="paragraph" style:parent-style-name="Text_20_body">
      <style:paragraph-properties fo:text-align="justify" style:justify-single-word="false"/>
      <style:text-properties officeooo:rsid="002cbdf3" officeooo:paragraph-rsid="01b79999"/>
    </style:style>
    <style:style style:name="P397" style:family="paragraph" style:parent-style-name="Fig." style:list-style-name="L16">
      <style:text-properties officeooo:rsid="00ccb8e2" officeooo:paragraph-rsid="00e8f23e"/>
    </style:style>
    <style:style style:name="P398" style:family="paragraph" style:parent-style-name="Fig." style:list-style-name="L16">
      <style:text-properties fo:font-style="normal" officeooo:rsid="00ccb8e2" officeooo:paragraph-rsid="00e8f23e" style:font-style-asian="normal" style:font-style-complex="normal"/>
    </style:style>
    <style:style style:name="P399" style:family="paragraph" style:parent-style-name="Heading_20_1" style:master-page-name="Cos">
      <style:paragraph-properties fo:margin-left="0cm" fo:margin-right="0cm" fo:text-align="center" style:justify-single-word="false" fo:text-indent="0cm" style:auto-text-indent="false" style:page-number="auto"/>
    </style:style>
    <style:style style:name="P400" style:family="paragraph" style:parent-style-name="Heading_20_1">
      <style:paragraph-properties fo:margin-left="0cm" fo:margin-right="0cm" fo:text-indent="0cm" style:auto-text-indent="false" fo:break-before="page"/>
      <style:text-properties officeooo:rsid="0065d6d8" officeooo:paragraph-rsid="0065d6d8"/>
    </style:style>
    <style:style style:name="P401" style:family="paragraph" style:parent-style-name="Heading_20_1">
      <style:paragraph-properties fo:margin-left="0cm" fo:margin-right="0cm" fo:text-indent="0cm" style:auto-text-indent="false" fo:break-before="page"/>
      <style:text-properties officeooo:rsid="00a8be7c" officeooo:paragraph-rsid="00a9a467"/>
    </style:style>
    <style:style style:name="P402" style:family="paragraph" style:parent-style-name="Heading_20_1">
      <style:paragraph-properties fo:margin-left="0cm" fo:margin-right="0cm" fo:text-indent="0cm" style:auto-text-indent="false" fo:break-before="page"/>
      <style:text-properties officeooo:rsid="01915c4c" officeooo:paragraph-rsid="01915c4c"/>
    </style:style>
    <style:style style:name="P403" style:family="paragraph" style:parent-style-name="Heading_20_1">
      <style:paragraph-properties fo:margin-left="0cm" fo:margin-right="0cm" fo:text-indent="0cm" style:auto-text-indent="false" fo:break-before="page"/>
      <style:text-properties officeooo:rsid="018d9a1e" officeooo:paragraph-rsid="018d9a1e"/>
    </style:style>
    <style:style style:name="P404" style:family="paragraph" style:parent-style-name="Heading_20_1">
      <style:paragraph-properties fo:margin-left="0cm" fo:margin-right="0cm" fo:text-indent="0cm" style:auto-text-indent="false" fo:break-before="page"/>
      <style:text-properties officeooo:rsid="018d9a1e" officeooo:paragraph-rsid="01a3c4fd"/>
    </style:style>
    <style:style style:name="P405"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8" style:family="paragraph" style:parent-style-name="Heading_20_2">
      <style:paragraph-properties fo:margin-left="1.9cm" fo:margin-right="0cm" fo:text-indent="-1.3cm" style:auto-text-indent="false"/>
      <style:text-properties officeooo:rsid="018f92fd" officeooo:paragraph-rsid="018f92fd"/>
    </style:style>
    <style:style style:name="P409" style:family="paragraph" style:parent-style-name="Heading_20_2">
      <style:paragraph-properties fo:margin-left="1.9cm" fo:margin-right="0cm" fo:text-indent="-1.3cm" style:auto-text-indent="false"/>
      <style:text-properties officeooo:rsid="018c7b7a" officeooo:paragraph-rsid="018c7b7a"/>
    </style:style>
    <style:style style:name="P410" style:family="paragraph" style:parent-style-name="Heading_20_2">
      <style:paragraph-properties fo:margin-left="1.9cm" fo:margin-right="0cm" fo:text-indent="-1.3cm" style:auto-text-indent="false"/>
      <style:text-properties officeooo:rsid="018c7b7a" officeooo:paragraph-rsid="019c96f9"/>
    </style:style>
    <style:style style:name="P411" style:family="paragraph" style:parent-style-name="Heading_20_2">
      <style:paragraph-properties fo:margin-left="1.9cm" fo:margin-right="0cm" fo:text-indent="-1.3cm" style:auto-text-indent="false"/>
      <style:text-properties officeooo:rsid="018c7b7a" officeooo:paragraph-rsid="01a3408a"/>
    </style:style>
    <style:style style:name="P412" style:family="paragraph" style:parent-style-name="Heading_20_2">
      <style:paragraph-properties fo:margin-left="1.9cm" fo:margin-right="0cm" fo:text-indent="-1.3cm" style:auto-text-indent="false"/>
      <style:text-properties officeooo:rsid="018c7b7a" officeooo:paragraph-rsid="01a9cdd2"/>
    </style:style>
    <style:style style:name="P413" style:family="paragraph" style:parent-style-name="Heading_20_2">
      <style:paragraph-properties fo:margin-left="1.9cm" fo:margin-right="0cm" fo:text-indent="-1.3cm" style:auto-text-indent="false"/>
      <style:text-properties officeooo:paragraph-rsid="018c7b7a"/>
    </style:style>
    <style:style style:name="P414" style:family="paragraph" style:parent-style-name="Heading_20_2">
      <style:paragraph-properties fo:margin-left="1.9cm" fo:margin-right="0cm" fo:text-indent="-1.3cm" style:auto-text-indent="false"/>
      <style:text-properties officeooo:paragraph-rsid="01915c4c"/>
    </style:style>
    <style:style style:name="P415" style:family="paragraph" style:parent-style-name="Heading_20_2">
      <style:paragraph-properties fo:margin-left="1.9cm" fo:margin-right="0cm" fo:text-indent="-1.3cm" style:auto-text-indent="false"/>
      <style:text-properties officeooo:rsid="019c96f9" officeooo:paragraph-rsid="019c96f9"/>
    </style:style>
    <style:style style:name="P416"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7"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8"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9" style:family="paragraph" style:parent-style-name="Heading_20_2">
      <style:paragraph-properties fo:margin-left="1.9cm" fo:margin-right="0cm" fo:text-indent="-1.3cm" style:auto-text-indent="false"/>
      <style:text-properties officeooo:rsid="00d8ffe0" officeooo:paragraph-rsid="00d8ffe0"/>
    </style:style>
    <style:style style:name="P420" style:family="paragraph" style:parent-style-name="Heading_20_2">
      <style:paragraph-properties fo:margin-left="1.9cm" fo:margin-right="0cm" fo:text-indent="-1.3cm" style:auto-text-indent="false"/>
      <style:text-properties officeooo:rsid="00dbb531" officeooo:paragraph-rsid="00dbb531"/>
    </style:style>
    <style:style style:name="P421" style:family="paragraph" style:parent-style-name="Heading_20_3">
      <style:paragraph-properties fo:margin-left="1.9cm" fo:margin-right="0cm" fo:text-indent="-1.3cm" style:auto-text-indent="false"/>
      <style:text-properties officeooo:rsid="018c7b7a" officeooo:paragraph-rsid="018c7b7a"/>
    </style:style>
    <style:style style:name="P422" style:family="paragraph" style:parent-style-name="Heading_20_3">
      <style:text-properties officeooo:rsid="01a9cdd2" officeooo:paragraph-rsid="01a9cdd2"/>
    </style:style>
    <style:style style:name="P423"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4" style:family="paragraph" style:parent-style-name="Heading_20_3">
      <style:paragraph-properties fo:margin-left="1.9cm" fo:margin-right="0cm" fo:text-indent="-1.3cm" style:auto-text-indent="false"/>
      <style:text-properties officeooo:paragraph-rsid="00d673d7"/>
    </style:style>
    <style:style style:name="P425" style:family="paragraph" style:parent-style-name="Heading_20_3">
      <style:paragraph-properties fo:margin-left="1.9cm" fo:margin-right="0cm" fo:text-indent="-1.3cm" style:auto-text-indent="false"/>
      <style:text-properties officeooo:paragraph-rsid="00dda4cb"/>
    </style:style>
    <style:style style:name="P426" style:family="paragraph" style:parent-style-name="Heading_20_3">
      <style:paragraph-properties fo:margin-left="1.9cm" fo:margin-right="0cm" fo:text-indent="-1.3cm" style:auto-text-indent="false"/>
      <style:text-properties officeooo:rsid="00dda4cb" officeooo:paragraph-rsid="00dda4cb"/>
    </style:style>
    <style:style style:name="P427" style:family="paragraph" style:parent-style-name="Standard" style:list-style-name="L14">
      <style:text-properties officeooo:paragraph-rsid="00e8f23e"/>
    </style:style>
    <style:style style:name="P428" style:family="paragraph" style:parent-style-name="Standard" style:list-style-name="L14">
      <style:text-properties fo:font-style="italic" officeooo:rsid="00e8f23e" officeooo:paragraph-rsid="00e8f23e" style:font-style-asian="italic" style:font-style-complex="italic"/>
    </style:style>
    <style:style style:name="P429" style:family="paragraph" style:parent-style-name="Table_20_Contents" style:list-style-name="L2">
      <style:paragraph-properties fo:text-align="justify" style:justify-single-word="false"/>
      <style:text-properties officeooo:rsid="01bb17a7" officeooo:paragraph-rsid="01b79999"/>
    </style:style>
    <style:style style:name="P430" style:family="paragraph" style:parent-style-name="Table_20_Contents" style:list-style-name="L2">
      <style:paragraph-properties fo:text-align="justify" style:justify-single-word="false"/>
      <style:text-properties officeooo:paragraph-rsid="01b79999"/>
    </style:style>
    <style:style style:name="P431" style:family="paragraph" style:parent-style-name="Table_20_Contents" style:list-style-name="L5">
      <style:paragraph-properties fo:text-align="justify" style:justify-single-word="false"/>
      <style:text-properties officeooo:paragraph-rsid="019cebf9"/>
    </style:style>
    <style:style style:name="P432" style:family="paragraph" style:parent-style-name="Table_20_Contents" style:list-style-name="L9">
      <style:paragraph-properties fo:text-align="justify" style:justify-single-word="false"/>
      <style:text-properties officeooo:paragraph-rsid="01a9cdd2"/>
    </style:style>
    <style:style style:name="P433" style:family="paragraph" style:parent-style-name="Table_20_Contents" style:list-style-name="L12">
      <style:paragraph-properties fo:text-align="justify" style:justify-single-word="false"/>
      <style:text-properties officeooo:paragraph-rsid="01a9cdd2"/>
    </style:style>
    <style:style style:name="P434" style:family="paragraph" style:parent-style-name="Table_20_Contents" style:list-style-name="L6">
      <style:paragraph-properties fo:text-align="justify" style:justify-single-word="false"/>
      <style:text-properties officeooo:rsid="015fa555" officeooo:paragraph-rsid="019cebf9"/>
    </style:style>
    <style:style style:name="P435" style:family="paragraph" style:parent-style-name="Table_20_Contents" style:list-style-name="L7">
      <style:paragraph-properties fo:text-align="justify" style:justify-single-word="false"/>
      <style:text-properties officeooo:rsid="015fa555" officeooo:paragraph-rsid="019cebf9"/>
    </style:style>
    <style:style style:name="P436" style:family="paragraph" style:parent-style-name="Table_20_Contents" style:list-style-name="L6">
      <style:paragraph-properties fo:text-align="justify" style:justify-single-word="false"/>
      <style:text-properties officeooo:rsid="014f9ade" officeooo:paragraph-rsid="019cebf9"/>
    </style:style>
    <style:style style:name="P437" style:family="paragraph" style:parent-style-name="Table_20_Contents" style:list-style-name="L10">
      <style:paragraph-properties fo:text-align="justify" style:justify-single-word="false"/>
      <style:text-properties officeooo:rsid="014f9ade" officeooo:paragraph-rsid="01a9cdd2"/>
    </style:style>
    <style:style style:name="P438" style:family="paragraph" style:parent-style-name="Table_20_Contents" style:list-style-name="L11">
      <style:paragraph-properties fo:text-align="justify" style:justify-single-word="false"/>
      <style:text-properties officeooo:rsid="014f9ade" officeooo:paragraph-rsid="01a9cdd2"/>
    </style:style>
    <style:style style:name="P439" style:family="paragraph" style:parent-style-name="Table_20_Contents" style:list-style-name="L6">
      <style:paragraph-properties fo:text-align="justify" style:justify-single-word="false"/>
      <style:text-properties officeooo:rsid="0151259d" officeooo:paragraph-rsid="019cebf9"/>
    </style:style>
    <style:style style:name="P440" style:family="paragraph" style:parent-style-name="Table_20_Contents" style:list-style-name="L7">
      <style:paragraph-properties fo:text-align="justify" style:justify-single-word="false"/>
      <style:text-properties officeooo:rsid="0151259d" officeooo:paragraph-rsid="019cebf9"/>
    </style:style>
    <style:style style:name="P441" style:family="paragraph" style:parent-style-name="Table_20_Contents" style:list-style-name="L10">
      <style:paragraph-properties fo:text-align="justify" style:justify-single-word="false"/>
      <style:text-properties officeooo:rsid="0151259d" officeooo:paragraph-rsid="01a9cdd2"/>
    </style:style>
    <style:style style:name="P442" style:family="paragraph" style:parent-style-name="Table_20_Contents" style:list-style-name="L11">
      <style:paragraph-properties fo:text-align="justify" style:justify-single-word="false"/>
      <style:text-properties officeooo:rsid="0151259d" officeooo:paragraph-rsid="01a9cdd2"/>
    </style:style>
    <style:style style:name="P443" style:family="paragraph" style:parent-style-name="Table_20_Contents" style:list-style-name="L13">
      <style:paragraph-properties fo:text-align="justify" style:justify-single-word="false"/>
      <style:text-properties officeooo:rsid="0151259d" officeooo:paragraph-rsid="01a9cdd2"/>
    </style:style>
    <style:style style:name="P444"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5"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46"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47" style:family="paragraph" style:parent-style-name="Table_20_Contents" style:list-style-name="L12">
      <style:paragraph-properties fo:text-align="justify" style:justify-single-word="false"/>
      <style:text-properties officeooo:rsid="0156bbc2" officeooo:paragraph-rsid="01a9cdd2"/>
    </style:style>
    <style:style style:name="P448" style:family="paragraph" style:parent-style-name="Table_20_Contents" style:list-style-name="L13">
      <style:paragraph-properties fo:text-align="justify" style:justify-single-word="false"/>
      <style:text-properties officeooo:rsid="015ba97b" officeooo:paragraph-rsid="01a9cdd2"/>
    </style:style>
    <style:style style:name="P449" style:family="paragraph" style:parent-style-name="Text_20_body" style:list-style-name="L1">
      <style:text-properties officeooo:rsid="01915c4c" officeooo:paragraph-rsid="01915c4c"/>
    </style:style>
    <style:style style:name="P450" style:family="paragraph" style:parent-style-name="Text_20_body" style:list-style-name="L3">
      <style:text-properties officeooo:rsid="007ddc84" officeooo:paragraph-rsid="01915c4c"/>
    </style:style>
    <style:style style:name="P451" style:family="paragraph" style:parent-style-name="Text_20_body" style:list-style-name="L3">
      <style:text-properties officeooo:rsid="007f55bb" officeooo:paragraph-rsid="01915c4c"/>
    </style:style>
    <style:style style:name="P452" style:family="paragraph" style:parent-style-name="Text_20_body" style:list-style-name="L4">
      <style:text-properties officeooo:rsid="007f55bb" officeooo:paragraph-rsid="01915c4c"/>
    </style:style>
    <style:style style:name="P453" style:family="paragraph" style:parent-style-name="Text_20_body" style:list-style-name="L3">
      <style:text-properties officeooo:rsid="0084ae02" officeooo:paragraph-rsid="01915c4c"/>
    </style:style>
    <style:style style:name="P454" style:family="paragraph" style:parent-style-name="Text_20_body" style:list-style-name="L4">
      <style:text-properties officeooo:rsid="01836b49" officeooo:paragraph-rsid="01915c4c"/>
    </style:style>
    <style:style style:name="P455" style:family="paragraph" style:parent-style-name="Text_20_body" style:list-style-name="L8">
      <style:text-properties officeooo:rsid="0149cec3" officeooo:paragraph-rsid="01a9cdd2"/>
    </style:style>
    <style:style style:name="P456" style:family="paragraph" style:parent-style-name="Text_20_body" style:list-style-name="L8">
      <style:text-properties officeooo:rsid="014adc01" officeooo:paragraph-rsid="01a9cdd2"/>
    </style:style>
    <style:style style:name="P457" style:family="paragraph" style:parent-style-name="Text_20_body" style:list-style-name="L15">
      <style:text-properties officeooo:paragraph-rsid="00d8ffe0"/>
    </style:style>
    <style:style style:name="P458" style:family="paragraph" style:parent-style-name="Text_20_body" style:list-style-name="L15">
      <style:text-properties officeooo:paragraph-rsid="01875821"/>
    </style:style>
    <style:style style:name="P459" style:family="paragraph" style:parent-style-name="Text_20_body" style:list-style-name="L15">
      <style:text-properties officeooo:rsid="00d8ffe0" officeooo:paragraph-rsid="00d8ffe0"/>
    </style:style>
    <style:style style:name="P460" style:family="paragraph" style:parent-style-name="Text_20_body" style:list-style-name="L17">
      <style:text-properties fo:font-style="normal" officeooo:rsid="00de9e71" officeooo:paragraph-rsid="00d673d7" style:font-style-asian="normal" style:font-style-complex="normal"/>
    </style:style>
    <style:style style:name="P461" style:family="paragraph" style:parent-style-name="Text_20_body" style:list-style-name="L17">
      <style:text-properties officeooo:rsid="00de9e71" officeooo:paragraph-rsid="00d673d7"/>
    </style:style>
    <style:style style:name="P462" style:family="paragraph" style:parent-style-name="Text_20_body" style:list-style-name="L18">
      <style:text-properties officeooo:paragraph-rsid="00e16f63"/>
    </style:style>
    <style:style style:name="P463" style:family="paragraph">
      <style:paragraph-properties fo:text-align="center" style:writing-mode="lr-tb"/>
      <style:text-properties fo:color="#ffffff" loext:opacity="100%"/>
    </style:style>
    <style:style style:name="P464" style:family="paragraph">
      <loext:graphic-properties draw:fill="solid" draw:fill-color="#ed1c24"/>
      <style:paragraph-properties fo:text-align="center" style:writing-mode="lr-tb"/>
      <style:text-properties fo:color="#ffffff" loext:opacity="100%"/>
    </style:style>
    <style:style style:name="P465" style:family="paragraph">
      <loext:graphic-properties draw:fill="none" draw:fill-color="#ffffff"/>
    </style:style>
    <style:style style:name="P466"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71c80" style:font-size-asian="10pt"/>
    </style:style>
    <style:style style:name="T32" style:family="text">
      <style:text-properties fo:color="#3c3c3c" loext:opacity="100%" style:font-name="Monospace1" fo:font-size="10pt" officeooo:rsid="01bbecb4" style:font-size-asian="10pt"/>
    </style:style>
    <style:style style:name="T33" style:family="text">
      <style:text-properties fo:color="#3c3c3c" loext:opacity="100%" style:font-name="Monospace1" fo:font-size="10pt" officeooo:rsid="01b902f5" style:font-size-asian="10pt"/>
    </style:style>
    <style:style style:name="T34" style:family="text">
      <style:text-properties fo:color="#2a00ff" loext:opacity="100%" style:font-name="Monospace1" fo:font-size="10pt" style:font-size-asian="10pt"/>
    </style:style>
    <style:style style:name="T35" style:family="text">
      <style:text-properties fo:color="#2a00ff" loext:opacity="100%" style:font-name="Monospace1" fo:font-size="10pt" officeooo:rsid="01aba0a4" style:font-size-asian="10pt"/>
    </style:style>
    <style:style style:name="T36" style:family="text">
      <style:text-properties fo:color="#2a00ff" loext:opacity="100%" style:font-name="Consolas1"/>
    </style:style>
    <style:style style:name="T37" style:family="text">
      <style:text-properties fo:color="#2a00ff" loext:opacity="100%" style:font-name="Consolas1" fo:font-size="10pt" fo:font-style="italic" style:font-size-asian="10pt" style:font-style-asian="italic"/>
    </style:style>
    <style:style style:name="T38" style:family="text">
      <style:text-properties fo:color="#2a00ff" loext:opacity="100%" style:font-name="Consolas1" officeooo:rsid="00ee64c9"/>
    </style:style>
    <style:style style:name="T39" style:family="text">
      <style:text-properties fo:color="#2a00ff" loext:opacity="100%" style:font-name="Consolas1" fo:font-style="italic" style:font-style-asian="italic"/>
    </style:style>
    <style:style style:name="T40" style:family="text">
      <style:text-properties fo:color="#2a00ff" loext:opacity="100%" style:font-name="Consolas1" fo:font-size="8pt" style:text-underline-style="none" style:font-size-asian="8pt" style:font-size-complex="8pt"/>
    </style:style>
    <style:style style:name="T41" style:family="text">
      <style:text-properties fo:color="#2a00ff" loext:opacity="100%" fo:font-style="italic" style:font-style-asian="italic"/>
    </style:style>
    <style:style style:name="T42" style:family="text">
      <style:text-properties fo:font-weight="bold" style:font-weight-asian="bold" style:font-weight-complex="bold"/>
    </style:style>
    <style:style style:name="T43" style:family="text">
      <style:text-properties fo:font-weight="bold" officeooo:rsid="009bb1cd" style:font-weight-asian="bold" style:font-weight-complex="bold"/>
    </style:style>
    <style:style style:name="T44" style:family="text">
      <style:text-properties fo:font-weight="bold" officeooo:rsid="00ea866e" style:font-weight-asian="bold" style:font-weight-complex="bold"/>
    </style:style>
    <style:style style:name="T45" style:family="text">
      <style:text-properties fo:font-weight="bold" officeooo:rsid="014f9ade" style:font-weight-asian="bold" style:font-weight-complex="bold"/>
    </style:style>
    <style:style style:name="T46" style:family="text">
      <style:text-properties fo:font-weight="bold" officeooo:rsid="015c4085" style:font-weight-asian="bold" style:font-weight-complex="bold"/>
    </style:style>
    <style:style style:name="T47" style:family="text">
      <style:text-properties fo:font-weight="bold" officeooo:rsid="01546630" style:font-weight-asian="bold" style:font-weight-complex="bold"/>
    </style:style>
    <style:style style:name="T48" style:family="text">
      <style:text-properties fo:color="#7f0055" loext:opacity="100%" style:font-name="Monospace1" fo:font-size="10pt" fo:font-weight="bold" style:font-size-asian="10pt" style:font-weight-asian="bold"/>
    </style:style>
    <style:style style:name="T49" style:family="text">
      <style:text-properties fo:color="#7f0055" loext:opacity="100%" style:font-name="Consolas1"/>
    </style:style>
    <style:style style:name="T50" style:family="text">
      <style:text-properties fo:color="#7f0055" loext:opacity="100%" style:font-name="Consolas1" fo:font-size="10pt" fo:font-weight="bold" style:font-size-asian="10pt" style:font-weight-asian="bold"/>
    </style:style>
    <style:style style:name="T51" style:family="text">
      <style:text-properties fo:color="#7f0055" loext:opacity="100%" style:font-name="Consolas1" fo:font-weight="bold" style:font-weight-asian="bold"/>
    </style:style>
    <style:style style:name="T52" style:family="text">
      <style:text-properties fo:color="#7f0055" loext:opacity="100%" style:font-name="Consolas1" fo:font-size="8pt" style:text-underline-style="none" fo:font-weight="bold" style:font-size-asian="8pt" style:font-weight-asian="bold" style:font-size-complex="8pt"/>
    </style:style>
    <style:style style:name="T53" style:family="text">
      <style:text-properties fo:color="#7f0055" loext:opacity="100%" style:font-name="Consolas1" style:text-underline-style="none" fo:font-weight="bold" style:font-weight-asian="bold"/>
    </style:style>
    <style:style style:name="T54" style:family="text">
      <style:text-properties fo:color="#000000" loext:opacity="100%"/>
    </style:style>
    <style:style style:name="T55" style:family="text">
      <style:text-properties fo:color="#000000" loext:opacity="100%" style:font-name="Monospace1" fo:font-size="10pt" style:font-size-asian="10pt"/>
    </style:style>
    <style:style style:name="T56" style:family="text">
      <style:text-properties fo:color="#000000" loext:opacity="100%" style:font-name="Monospace1" fo:font-size="10pt" officeooo:rsid="018c7b7a" style:font-size-asian="10pt"/>
    </style:style>
    <style:style style:name="T57" style:family="text">
      <style:text-properties fo:color="#000000" loext:opacity="100%" style:font-name="Monospace1" fo:font-size="10pt" officeooo:rsid="01aba0a4" style:font-size-asian="10pt"/>
    </style:style>
    <style:style style:name="T58" style:family="text">
      <style:text-properties fo:color="#000000" loext:opacity="100%" style:font-name="Monospace1" fo:font-size="10pt" fo:font-style="italic" style:font-size-asian="10pt" style:font-style-asian="italic"/>
    </style:style>
    <style:style style:name="T59" style:family="text">
      <style:text-properties fo:color="#000000" loext:opacity="100%" style:font-name="Consolas1"/>
    </style:style>
    <style:style style:name="T60" style:family="text">
      <style:text-properties fo:color="#000000" loext:opacity="100%" style:font-name="Consolas1" fo:font-size="10pt" style:font-size-asian="10pt"/>
    </style:style>
    <style:style style:name="T61" style:family="text">
      <style:text-properties fo:color="#000000" loext:opacity="100%" style:font-name="Consolas1" fo:font-size="10pt" fo:background-color="#d4d4d4" loext:char-shading-value="0" style:font-size-asian="10pt"/>
    </style:style>
    <style:style style:name="T62"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3" style:family="text">
      <style:text-properties fo:color="#000000" loext:opacity="100%" style:font-name="Consolas1" fo:background-color="#d4d4d4" loext:char-shading-value="0"/>
    </style:style>
    <style:style style:name="T64" style:family="text">
      <style:text-properties fo:color="#000000" loext:opacity="100%" style:font-name="Consolas1" officeooo:rsid="00ea866e"/>
    </style:style>
    <style:style style:name="T65" style:family="text">
      <style:text-properties fo:color="#000000" loext:opacity="100%" style:font-name="Consolas1" fo:font-weight="bold" style:font-weight-asian="bold" style:font-weight-complex="bold"/>
    </style:style>
    <style:style style:name="T66" style:family="text">
      <style:text-properties fo:color="#000000" loext:opacity="100%" style:font-name="Consolas1" fo:font-style="italic" style:font-style-asian="italic"/>
    </style:style>
    <style:style style:name="T67" style:family="text">
      <style:text-properties fo:color="#000000" loext:opacity="100%" style:font-name="Consolas1" fo:font-size="8pt" style:text-underline-style="none" style:font-size-asian="8pt" style:font-size-complex="8pt"/>
    </style:style>
    <style:style style:name="T68" style:family="text">
      <style:text-properties fo:color="#000000" loext:opacity="100%" style:font-name="Consolas1" fo:font-size="8pt" style:text-underline-style="none" fo:background-color="transparent" loext:char-shading-value="0" style:font-size-asian="8pt" style:font-size-complex="8pt"/>
    </style:style>
    <style:style style:name="T69" style:family="text">
      <style:text-properties fo:color="#000000" loext:opacity="100%" style:font-name="Consolas1" fo:font-size="8pt" fo:background-color="transparent" loext:char-shading-value="0" style:font-size-asian="8pt" style:font-size-complex="8pt"/>
    </style:style>
    <style:style style:name="T70" style:family="text">
      <style:text-properties fo:color="#000000" loext:opacity="100%" style:font-name="Consolas1" fo:font-size="8pt" style:font-size-asian="8pt" style:font-size-complex="8pt"/>
    </style:style>
    <style:style style:name="T71" style:family="text">
      <style:text-properties fo:color="#000000" loext:opacity="100%" style:font-name="Consolas1" fo:font-size="8pt" fo:font-style="italic" style:text-underline-style="none" style:font-size-asian="8pt" style:font-style-asian="italic" style:font-size-complex="8pt"/>
    </style:style>
    <style:style style:name="T72" style:family="text">
      <style:text-properties fo:color="#000000" loext:opacity="100%" style:font-name="Consolas1" officeooo:rsid="00ee64c9"/>
    </style:style>
    <style:style style:name="T73" style:family="text">
      <style:text-properties fo:color="#000000" loext:opacity="100%" style:font-name="Consolas1" fo:background-color="transparent" loext:char-shading-value="0"/>
    </style:style>
    <style:style style:name="T74" style:family="text">
      <style:text-properties fo:color="#000000" loext:opacity="100%" style:font-name="Consolas1" style:text-underline-style="none"/>
    </style:style>
    <style:style style:name="T75" style:family="text">
      <style:text-properties fo:color="#000000" loext:opacity="100%" style:font-name="Consolas1" fo:font-size="9pt" style:font-size-asian="9pt"/>
    </style:style>
    <style:style style:name="T76" style:family="text">
      <style:text-properties fo:color="#000000" loext:opacity="100%" style:font-name="Consolas1" officeooo:rsid="01b902f5"/>
    </style:style>
    <style:style style:name="T77" style:family="text">
      <style:text-properties fo:color="#000000" loext:opacity="100%" style:font-name="Monospace" fo:font-size="10pt" style:font-size-asian="10pt" style:font-size-complex="10pt"/>
    </style:style>
    <style:style style:name="T78" style:family="text">
      <style:text-properties fo:color="#0000c0" loext:opacity="100%" style:font-name="Monospace1" fo:font-size="10pt" fo:font-style="italic" fo:font-weight="bold" style:font-size-asian="10pt" style:font-style-asian="italic" style:font-weight-asian="bold"/>
    </style:style>
    <style:style style:name="T79" style:family="text">
      <style:text-properties fo:color="#0000c0" loext:opacity="100%" style:font-name="Consolas1"/>
    </style:style>
    <style:style style:name="T80" style:family="text">
      <style:text-properties fo:color="#0000c0" loext:opacity="100%" style:font-name="Consolas1" fo:font-style="italic" fo:font-weight="bold" style:font-style-asian="italic" style:font-weight-asian="bold"/>
    </style:style>
    <style:style style:name="T81" style:family="text">
      <style:text-properties fo:color="#0000c0" loext:opacity="100%" style:font-name="Consolas1" fo:font-style="italic" fo:font-weight="bold" fo:background-color="transparent" loext:char-shading-value="0" style:font-style-asian="italic" style:font-weight-asian="bold"/>
    </style:style>
    <style:style style:name="T82"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3" style:family="text">
      <style:text-properties fo:color="#6a3e3e" loext:opacity="100%" style:font-name="Monospace1" fo:font-size="10pt" style:font-size-asian="10pt"/>
    </style:style>
    <style:style style:name="T84" style:family="text">
      <style:text-properties fo:color="#6a3e3e" loext:opacity="100%" style:font-name="Monospace1" fo:font-size="10pt" officeooo:rsid="01aba0a4" style:font-size-asian="10pt"/>
    </style:style>
    <style:style style:name="T85" style:family="text">
      <style:text-properties fo:color="#6a3e3e" loext:opacity="100%" style:font-name="Consolas1"/>
    </style:style>
    <style:style style:name="T86" style:family="text">
      <style:text-properties fo:color="#6a3e3e" loext:opacity="100%" style:font-name="Consolas1" fo:font-size="10pt" style:font-size-asian="10pt"/>
    </style:style>
    <style:style style:name="T87" style:family="text">
      <style:text-properties fo:color="#6a3e3e" loext:opacity="100%" style:font-name="Consolas1" fo:background-color="#d4d4d4" loext:char-shading-value="0"/>
    </style:style>
    <style:style style:name="T88" style:family="text">
      <style:text-properties fo:color="#6a3e3e" loext:opacity="100%" style:font-name="Consolas1" fo:font-size="8pt" style:text-underline-style="none" style:font-size-asian="8pt" style:font-size-complex="8pt"/>
    </style:style>
    <style:style style:name="T89"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90" style:family="text">
      <style:text-properties fo:color="#6a3e3e" loext:opacity="100%" style:font-name="Consolas1" fo:font-size="8pt" fo:background-color="transparent" loext:char-shading-value="0" style:font-size-asian="8pt" style:font-size-complex="8pt"/>
    </style:style>
    <style:style style:name="T91" style:family="text">
      <style:text-properties fo:color="#6a3e3e" loext:opacity="100%" style:font-name="Consolas1" fo:font-size="8pt" style:font-size-asian="8pt" style:font-size-complex="8pt"/>
    </style:style>
    <style:style style:name="T92" style:family="text">
      <style:text-properties fo:color="#6a3e3e" loext:opacity="100%" style:font-name="Consolas1" officeooo:rsid="00dbb531"/>
    </style:style>
    <style:style style:name="T93" style:family="text">
      <style:text-properties fo:color="#6a3e3e" loext:opacity="100%" style:font-name="Consolas1" officeooo:rsid="00f0f9b1" fo:background-color="transparent" loext:char-shading-value="0"/>
    </style:style>
    <style:style style:name="T94" style:family="text">
      <style:text-properties fo:color="#6a3e3e" loext:opacity="100%" style:font-name="Consolas1" style:text-underline-style="none"/>
    </style:style>
    <style:style style:name="T95" style:family="text">
      <style:text-properties officeooo:rsid="0086959c"/>
    </style:style>
    <style:style style:name="T96" style:family="text">
      <style:text-properties officeooo:rsid="008b673d"/>
    </style:style>
    <style:style style:name="T97" style:family="text">
      <style:text-properties officeooo:rsid="0090deb7"/>
    </style:style>
    <style:style style:name="T98" style:family="text">
      <style:text-properties officeooo:rsid="0090e737"/>
    </style:style>
    <style:style style:name="T99" style:family="text">
      <style:text-properties officeooo:rsid="00523cb7"/>
    </style:style>
    <style:style style:name="T100" style:family="text">
      <style:text-properties officeooo:rsid="005032ec"/>
    </style:style>
    <style:style style:name="T101" style:family="text">
      <style:text-properties officeooo:rsid="005362e2"/>
    </style:style>
    <style:style style:name="T102" style:family="text">
      <style:text-properties officeooo:rsid="005608e4"/>
    </style:style>
    <style:style style:name="T103" style:family="text">
      <style:text-properties officeooo:rsid="0051440a"/>
    </style:style>
    <style:style style:name="T104" style:family="text">
      <style:text-properties officeooo:rsid="005bb6f5"/>
    </style:style>
    <style:style style:name="T105" style:family="text">
      <style:text-properties officeooo:rsid="00600629"/>
    </style:style>
    <style:style style:name="T106" style:family="text">
      <style:text-properties officeooo:rsid="0062c50e"/>
    </style:style>
    <style:style style:name="T107" style:family="text">
      <style:text-properties officeooo:rsid="009569da"/>
    </style:style>
    <style:style style:name="T108" style:family="text">
      <style:text-properties officeooo:rsid="009bb1cd"/>
    </style:style>
    <style:style style:name="T109" style:family="text">
      <style:text-properties fo:color="#646464" loext:opacity="100%" style:font-name="Consolas1"/>
    </style:style>
    <style:style style:name="T110" style:family="text">
      <style:text-properties officeooo:rsid="00a8be7c"/>
    </style:style>
    <style:style style:name="T111" style:family="text">
      <style:text-properties officeooo:rsid="00a9a467"/>
    </style:style>
    <style:style style:name="T112" style:family="text">
      <style:text-properties officeooo:rsid="003e02b8"/>
    </style:style>
    <style:style style:name="T113" style:family="text">
      <style:text-properties officeooo:rsid="0084ae02"/>
    </style:style>
    <style:style style:name="T114" style:family="text">
      <style:text-properties officeooo:rsid="007ddc84"/>
    </style:style>
    <style:style style:name="T115" style:family="text">
      <style:text-properties officeooo:rsid="00b5a0a7"/>
    </style:style>
    <style:style style:name="T116" style:family="text">
      <style:text-properties officeooo:rsid="00a824e0"/>
    </style:style>
    <style:style style:name="T117" style:family="text">
      <style:text-properties style:font-name="Consolas1"/>
    </style:style>
    <style:style style:name="T118" style:family="text">
      <style:text-properties style:font-name="Consolas1" fo:font-size="9pt" style:font-size-asian="9pt"/>
    </style:style>
    <style:style style:name="T119" style:family="text">
      <style:text-properties officeooo:rsid="00cc0058"/>
    </style:style>
    <style:style style:name="T120" style:family="text">
      <style:text-properties fo:color="#007dc3" loext:opacity="100%" style:font-name="Calibri2" fo:font-size="18pt" officeooo:rsid="00285050" fo:background-color="transparent" loext:char-shading-value="0" style:font-size-asian="18pt" style:font-size-complex="18pt"/>
    </style:style>
    <style:style style:name="T121" style:family="text">
      <style:text-properties fo:color="#007dc3" loext:opacity="100%" style:font-name="Calibri2" fo:font-size="18pt" officeooo:rsid="01bbecb4" fo:background-color="transparent" loext:char-shading-value="0" style:font-size-asian="18pt" style:font-size-complex="18pt"/>
    </style:style>
    <style:style style:name="T122" style:family="text">
      <style:text-properties fo:color="#007dc3" loext:opacity="100%" style:font-name="Calibri2" fo:font-size="18pt" officeooo:rsid="00cd0e15" fo:background-color="transparent" loext:char-shading-value="0" style:font-size-asian="18pt" style:font-size-complex="18pt"/>
    </style:style>
    <style:style style:name="T123" style:family="text">
      <style:text-properties fo:color="#007dc3" loext:opacity="100%" style:font-name="Calibri2" fo:font-size="18pt" officeooo:rsid="01b368bb" fo:background-color="transparent" loext:char-shading-value="0" style:font-size-asian="18pt" style:font-size-complex="18pt"/>
    </style:style>
    <style:style style:name="T124" style:family="text">
      <style:text-properties officeooo:rsid="00d338c0"/>
    </style:style>
    <style:style style:name="T125" style:family="text">
      <style:text-properties officeooo:rsid="00d63ec8"/>
    </style:style>
    <style:style style:name="T126" style:family="text">
      <style:text-properties fo:font-style="italic" style:font-style-asian="italic" style:font-style-complex="italic"/>
    </style:style>
    <style:style style:name="T127" style:family="text">
      <style:text-properties fo:font-style="italic" officeooo:rsid="00d63ec8" style:font-style-asian="italic" style:font-style-complex="italic"/>
    </style:style>
    <style:style style:name="T128" style:family="text">
      <style:text-properties fo:font-style="italic" officeooo:rsid="00db5ce5" style:font-style-asian="italic" style:font-style-complex="italic"/>
    </style:style>
    <style:style style:name="T129" style:family="text">
      <style:text-properties fo:font-style="italic" officeooo:rsid="00e38553" style:font-style-asian="italic" style:font-style-complex="italic"/>
    </style:style>
    <style:style style:name="T130" style:family="text">
      <style:text-properties fo:font-style="italic" officeooo:rsid="00df575f" style:font-style-asian="italic" style:font-style-complex="italic"/>
    </style:style>
    <style:style style:name="T131" style:family="text">
      <style:text-properties fo:font-style="italic" officeooo:rsid="00e07efa" style:font-style-asian="italic" style:font-style-complex="italic"/>
    </style:style>
    <style:style style:name="T132" style:family="text">
      <style:text-properties fo:font-style="italic" officeooo:rsid="00df017d" style:font-style-asian="italic" style:font-style-complex="italic"/>
    </style:style>
    <style:style style:name="T133" style:family="text">
      <style:text-properties fo:font-style="italic" officeooo:rsid="00e16f63" style:font-style-asian="italic" style:font-style-complex="italic"/>
    </style:style>
    <style:style style:name="T134" style:family="text">
      <style:text-properties fo:font-style="italic" officeooo:rsid="00e33a20" style:font-style-asian="italic" style:font-style-complex="italic"/>
    </style:style>
    <style:style style:name="T135" style:family="text">
      <style:text-properties fo:font-style="italic" officeooo:rsid="00e8f23e" style:font-style-asian="italic" style:font-style-complex="italic"/>
    </style:style>
    <style:style style:name="T136" style:family="text">
      <style:text-properties fo:font-style="italic" officeooo:rsid="00d8ffe0" style:font-style-asian="italic" style:font-style-complex="italic"/>
    </style:style>
    <style:style style:name="T137" style:family="text">
      <style:text-properties fo:font-style="italic" officeooo:rsid="01546630" style:font-style-asian="italic" style:font-style-complex="italic"/>
    </style:style>
    <style:style style:name="T138" style:family="text">
      <style:text-properties fo:font-style="italic" fo:font-weight="bold" officeooo:rsid="00db5ce5" style:font-style-asian="italic" style:font-weight-asian="bold" style:font-style-complex="italic" style:font-weight-complex="bold"/>
    </style:style>
    <style:style style:name="T139" style:family="text">
      <style:text-properties fo:font-style="italic" fo:background-color="transparent" loext:char-shading-value="0" style:font-style-asian="italic" style:font-style-complex="italic"/>
    </style:style>
    <style:style style:name="T140" style:family="text">
      <style:text-properties fo:font-style="italic" officeooo:rsid="00e440cb" fo:background-color="transparent" loext:char-shading-value="0" style:font-style-asian="italic" style:font-style-complex="italic"/>
    </style:style>
    <style:style style:name="T141" style:family="text">
      <style:text-properties fo:font-style="italic" officeooo:rsid="00df017d" fo:background-color="transparent" loext:char-shading-value="0" style:font-style-asian="italic" style:font-style-complex="italic"/>
    </style:style>
    <style:style style:name="T142" style:family="text">
      <style:text-properties fo:font-style="italic" officeooo:rsid="00e16f63" fo:background-color="transparent" loext:char-shading-value="0" style:font-style-asian="italic" style:font-style-complex="italic"/>
    </style:style>
    <style:style style:name="T143" style:family="text">
      <style:text-properties fo:font-style="italic" officeooo:rsid="00e07efa" fo:background-color="transparent" loext:char-shading-value="0" style:font-style-asian="italic" style:font-style-complex="italic"/>
    </style:style>
    <style:style style:name="T144" style:family="text">
      <style:text-properties fo:font-style="italic" officeooo:rsid="00e33a20" fo:background-color="transparent" loext:char-shading-value="0" style:font-style-asian="italic" style:font-style-complex="italic"/>
    </style:style>
    <style:style style:name="T145" style:family="text">
      <style:text-properties fo:font-style="italic" officeooo:rsid="00dd25a6" fo:background-color="transparent" loext:char-shading-value="0" style:font-style-asian="italic" style:font-style-complex="italic"/>
    </style:style>
    <style:style style:name="T146" style:family="text">
      <style:text-properties fo:font-style="italic" officeooo:rsid="00ee103b" fo:background-color="transparent" loext:char-shading-value="0" style:font-style-asian="italic" style:font-style-complex="italic"/>
    </style:style>
    <style:style style:name="T147" style:family="text">
      <style:text-properties fo:font-style="italic" officeooo:rsid="00dda4cb" fo:background-color="transparent" loext:char-shading-value="0" style:font-style-asian="italic" style:font-style-complex="italic"/>
    </style:style>
    <style:style style:name="T148" style:family="text">
      <style:text-properties fo:font-style="italic" officeooo:rsid="00f0f9b1" fo:background-color="transparent" loext:char-shading-value="0"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ea866e" style:font-style-asian="italic" style:font-weight-asian="normal" style:font-style-complex="italic" style:font-weight-complex="normal"/>
    </style:style>
    <style:style style:name="T151" style:family="text">
      <style:text-properties fo:font-style="italic" fo:font-weight="normal"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3"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4" style:family="text">
      <style:text-properties fo:font-style="normal" style:font-style-asian="normal" style:font-style-complex="normal"/>
    </style:style>
    <style:style style:name="T155" style:family="text">
      <style:text-properties fo:font-style="normal" officeooo:rsid="00d63ec8" style:font-style-asian="normal" style:font-style-complex="normal"/>
    </style:style>
    <style:style style:name="T156" style:family="text">
      <style:text-properties fo:font-style="normal" officeooo:rsid="00db5ce5" style:font-style-asian="normal" style:font-style-complex="normal"/>
    </style:style>
    <style:style style:name="T157" style:family="text">
      <style:text-properties fo:font-style="normal" officeooo:rsid="00cb38e8" style:font-style-asian="normal" style:font-style-complex="normal"/>
    </style:style>
    <style:style style:name="T158" style:family="text">
      <style:text-properties fo:font-style="normal" officeooo:rsid="00e38553" style:font-style-asian="normal" style:font-style-complex="normal"/>
    </style:style>
    <style:style style:name="T159" style:family="text">
      <style:text-properties fo:font-style="normal" officeooo:rsid="00d87f80" style:font-style-asian="normal" style:font-style-complex="normal"/>
    </style:style>
    <style:style style:name="T160" style:family="text">
      <style:text-properties fo:font-style="normal" officeooo:rsid="00df575f" style:font-style-asian="normal" style:font-style-complex="normal"/>
    </style:style>
    <style:style style:name="T161" style:family="text">
      <style:text-properties fo:font-style="normal" officeooo:rsid="00e07efa" style:font-style-asian="normal" style:font-style-complex="normal"/>
    </style:style>
    <style:style style:name="T162" style:family="text">
      <style:text-properties fo:font-style="normal" officeooo:rsid="00e1e7f8" style:font-style-asian="normal" style:font-style-complex="normal"/>
    </style:style>
    <style:style style:name="T163" style:family="text">
      <style:text-properties fo:font-style="normal" officeooo:rsid="00e2fa38" style:font-style-asian="normal" style:font-style-complex="normal"/>
    </style:style>
    <style:style style:name="T164" style:family="text">
      <style:text-properties fo:font-style="normal" officeooo:rsid="00d8ffe0" style:font-style-asian="normal" style:font-style-complex="normal"/>
    </style:style>
    <style:style style:name="T165" style:family="text">
      <style:text-properties fo:font-style="normal" officeooo:rsid="00e0368e" style:font-style-asian="normal" style:font-style-complex="normal"/>
    </style:style>
    <style:style style:name="T166" style:family="text">
      <style:text-properties fo:font-style="normal" officeooo:rsid="00e16f63" style:font-style-asian="normal" style:font-style-complex="normal"/>
    </style:style>
    <style:style style:name="T167" style:family="text">
      <style:text-properties fo:font-style="normal" officeooo:rsid="00e8f23e" style:font-style-asian="normal" style:font-style-complex="normal"/>
    </style:style>
    <style:style style:name="T168" style:family="text">
      <style:text-properties fo:font-style="normal" officeooo:rsid="00ee103b" style:font-style-asian="normal" style:font-style-complex="normal"/>
    </style:style>
    <style:style style:name="T169" style:family="text">
      <style:text-properties fo:font-style="normal" officeooo:rsid="01546630" style:font-style-asian="normal" style:font-style-complex="normal"/>
    </style:style>
    <style:style style:name="T170" style:family="text">
      <style:text-properties fo:font-style="normal" officeooo:rsid="014f9ade" style:font-style-asian="normal" style:font-style-complex="normal"/>
    </style:style>
    <style:style style:name="T171" style:family="text">
      <style:text-properties fo:font-style="normal" officeooo:rsid="01b4bedd" style:font-style-asian="normal" style:font-style-complex="normal"/>
    </style:style>
    <style:style style:name="T172" style:family="text">
      <style:text-properties fo:font-style="normal" fo:background-color="transparent" loext:char-shading-value="0" style:font-style-asian="normal" style:font-style-complex="normal"/>
    </style:style>
    <style:style style:name="T173" style:family="text">
      <style:text-properties fo:font-style="normal" officeooo:rsid="00d63ec8" fo:background-color="transparent" loext:char-shading-value="0" style:font-style-asian="normal" style:font-style-complex="normal"/>
    </style:style>
    <style:style style:name="T174" style:family="text">
      <style:text-properties fo:font-style="normal" officeooo:rsid="00d81a0e" fo:background-color="transparent" loext:char-shading-value="0" style:font-style-asian="normal" style:font-style-complex="normal"/>
    </style:style>
    <style:style style:name="T175" style:family="text">
      <style:text-properties fo:font-style="normal" officeooo:rsid="00e2fa38" fo:background-color="transparent" loext:char-shading-value="0" style:font-style-asian="normal" style:font-style-complex="normal"/>
    </style:style>
    <style:style style:name="T176" style:family="text">
      <style:text-properties fo:font-style="normal" officeooo:rsid="00e1e7f8" fo:background-color="transparent" loext:char-shading-value="0" style:font-style-asian="normal" style:font-style-complex="normal"/>
    </style:style>
    <style:style style:name="T177" style:family="text">
      <style:text-properties fo:font-style="normal" officeooo:rsid="00e440cb" fo:background-color="transparent" loext:char-shading-value="0" style:font-style-asian="normal" style:font-style-complex="normal"/>
    </style:style>
    <style:style style:name="T178" style:family="text">
      <style:text-properties fo:font-style="normal" officeooo:rsid="00df017d" fo:background-color="transparent" loext:char-shading-value="0" style:font-style-asian="normal" style:font-style-complex="normal"/>
    </style:style>
    <style:style style:name="T179" style:family="text">
      <style:text-properties fo:font-style="normal" officeooo:rsid="00dfc741" fo:background-color="transparent" loext:char-shading-value="0" style:font-style-asian="normal" style:font-style-complex="normal"/>
    </style:style>
    <style:style style:name="T180" style:family="text">
      <style:text-properties fo:font-style="normal" officeooo:rsid="00e0368e" fo:background-color="transparent" loext:char-shading-value="0" style:font-style-asian="normal" style:font-style-complex="normal"/>
    </style:style>
    <style:style style:name="T181" style:family="text">
      <style:text-properties fo:font-style="normal" officeooo:rsid="00dda4cb" fo:background-color="transparent" loext:char-shading-value="0" style:font-style-asian="normal" style:font-style-complex="normal"/>
    </style:style>
    <style:style style:name="T182" style:family="text">
      <style:text-properties fo:font-style="normal" officeooo:rsid="00e16f63" fo:background-color="transparent" loext:char-shading-value="0" style:font-style-asian="normal" style:font-style-complex="normal"/>
    </style:style>
    <style:style style:name="T183" style:family="text">
      <style:text-properties fo:font-style="normal" officeooo:rsid="00e33a20" fo:background-color="transparent" loext:char-shading-value="0" style:font-style-asian="normal" style:font-style-complex="normal"/>
    </style:style>
    <style:style style:name="T184" style:family="text">
      <style:text-properties fo:font-style="normal" officeooo:rsid="00db5ce5" fo:background-color="transparent" loext:char-shading-value="0" style:font-style-asian="normal" style:font-style-complex="normal"/>
    </style:style>
    <style:style style:name="T185" style:family="text">
      <style:text-properties fo:font-style="normal" officeooo:rsid="00e8f23e" fo:background-color="transparent" loext:char-shading-value="0" style:font-style-asian="normal" style:font-style-complex="normal"/>
    </style:style>
    <style:style style:name="T186" style:family="text">
      <style:text-properties fo:font-style="normal" officeooo:rsid="00d87f80" fo:background-color="transparent" loext:char-shading-value="0" style:font-style-asian="normal" style:font-style-complex="normal"/>
    </style:style>
    <style:style style:name="T187" style:family="text">
      <style:text-properties fo:font-style="normal" officeooo:rsid="00dd25a6" fo:background-color="transparent" loext:char-shading-value="0" style:font-style-asian="normal" style:font-style-complex="normal"/>
    </style:style>
    <style:style style:name="T188" style:family="text">
      <style:text-properties fo:font-style="normal" officeooo:rsid="00f0f9b1" fo:background-color="transparent" loext:char-shading-value="0" style:font-style-asian="normal" style:font-style-complex="normal"/>
    </style:style>
    <style:style style:name="T189" style:family="text">
      <style:text-properties fo:font-style="normal" officeooo:rsid="00d8ffe0" fo:background-color="transparent" loext:char-shading-value="0" style:font-style-asian="normal" style:font-style-complex="normal"/>
    </style:style>
    <style:style style:name="T190" style:family="text">
      <style:text-properties fo:font-style="normal" fo:font-weight="normal" officeooo:rsid="00ea866e" style:font-style-asian="normal" style:font-weight-asian="normal" style:font-style-complex="normal" style:font-weight-complex="normal"/>
    </style:style>
    <style:style style:name="T191" style:family="text">
      <style:text-properties fo:font-style="normal" fo:font-weight="normal"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3"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4"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5" style:family="text">
      <style:text-properties fo:font-style="normal" fo:font-weight="bold" officeooo:rsid="01546630" style:font-style-asian="normal" style:font-weight-asian="bold" style:font-style-complex="normal" style:font-weight-complex="bold"/>
    </style:style>
    <style:style style:name="T196" style:family="text">
      <style:text-properties officeooo:rsid="00db5ce5"/>
    </style:style>
    <style:style style:name="T197" style:family="text">
      <style:text-properties officeooo:rsid="00d87f80"/>
    </style:style>
    <style:style style:name="T198" style:family="text">
      <style:text-properties officeooo:rsid="00dac55c"/>
    </style:style>
    <style:style style:name="T199" style:family="text">
      <style:text-properties fo:color="#3f5fbf" loext:opacity="100%" style:font-name="Consolas1"/>
    </style:style>
    <style:style style:name="T200" style:family="text">
      <style:text-properties fo:color="#3f5fbf" loext:opacity="100%" style:font-name="Consolas1" fo:font-size="10pt" style:font-size-asian="10pt"/>
    </style:style>
    <style:style style:name="T201" style:family="text">
      <style:text-properties fo:color="#3f5fbf" loext:opacity="100%" style:font-name="Consolas1" fo:font-size="10pt" style:text-underline-style="solid" style:text-underline-width="auto" style:text-underline-color="font-color" style:font-size-asian="10pt"/>
    </style:style>
    <style:style style:name="T202" style:family="text">
      <style:text-properties fo:color="#3f5fbf" loext:opacity="100%" style:font-name="Consolas1" style:text-underline-style="solid" style:text-underline-width="auto" style:text-underline-color="font-color"/>
    </style:style>
    <style:style style:name="T203" style:family="text">
      <style:text-properties fo:color="#7f9fbf" loext:opacity="100%" style:font-name="Consolas1" fo:font-size="10pt" fo:font-weight="bold" style:font-size-asian="10pt" style:font-weight-asian="bold"/>
    </style:style>
    <style:style style:name="T204" style:family="text">
      <style:text-properties fo:color="#7f9fbf" loext:opacity="100%" style:font-name="Consolas1" fo:font-weight="bold" style:font-weight-asian="bold"/>
    </style:style>
    <style:style style:name="T205" style:family="text">
      <style:text-properties fo:color="#7f7f9f" loext:opacity="100%" style:font-name="Consolas1" fo:font-size="10pt" style:font-size-asian="10pt"/>
    </style:style>
    <style:style style:name="T206" style:family="text">
      <style:text-properties officeooo:rsid="00e07efa"/>
    </style:style>
    <style:style style:name="T207" style:family="text">
      <style:text-properties officeooo:rsid="00e85af2"/>
    </style:style>
    <style:style style:name="T208" style:family="text">
      <style:text-properties officeooo:rsid="00ea866e"/>
    </style:style>
    <style:style style:name="T209" style:family="text">
      <style:text-properties fo:font-weight="normal" style:font-weight-asian="normal" style:font-weight-complex="normal"/>
    </style:style>
    <style:style style:name="T210" style:family="text">
      <style:text-properties fo:font-weight="normal" officeooo:rsid="00ea866e" style:font-weight-asian="normal" style:font-weight-complex="normal"/>
    </style:style>
    <style:style style:name="T211" style:family="text">
      <style:text-properties fo:font-weight="normal" officeooo:rsid="0163fbf5" style:font-weight-asian="normal" style:font-weight-complex="normal"/>
    </style:style>
    <style:style style:name="T212" style:family="text">
      <style:text-properties fo:font-weight="normal" officeooo:rsid="016f0584" style:font-weight-asian="normal" style:font-weight-complex="normal"/>
    </style:style>
    <style:style style:name="T213" style:family="text">
      <style:text-properties fo:font-weight="normal" officeooo:rsid="01b0c851" style:font-weight-asian="normal" style:font-weight-complex="normal"/>
    </style:style>
    <style:style style:name="T214" style:family="text">
      <style:text-properties fo:font-weight="normal" officeooo:rsid="00ea866e" fo:background-color="transparent" loext:char-shading-value="0" style:font-weight-asian="normal" style:font-weight-complex="normal"/>
    </style:style>
    <style:style style:name="T215" style:family="text">
      <style:text-properties fo:font-weight="normal" officeooo:rsid="00e54ccf" fo:background-color="transparent" loext:char-shading-value="0" style:font-weight-asian="normal" style:font-weight-complex="normal"/>
    </style:style>
    <style:style style:name="T216" style:family="text">
      <style:text-properties fo:font-weight="normal" officeooo:rsid="00e5f97a" fo:background-color="transparent" loext:char-shading-value="0" style:font-weight-asian="normal" style:font-weight-complex="normal"/>
    </style:style>
    <style:style style:name="T217" style:family="text">
      <style:text-properties fo:color="#3f7f5f" loext:opacity="100%" style:font-name="Consolas1"/>
    </style:style>
    <style:style style:name="T218" style:family="text">
      <style:text-properties fo:color="#3f7f5f" loext:opacity="100%" style:font-name="Consolas1" style:text-underline-style="solid" style:text-underline-width="auto" style:text-underline-color="font-color"/>
    </style:style>
    <style:style style:name="T219" style:family="text">
      <style:text-properties fo:color="#3f7f5f" loext:opacity="100%" style:font-name="Consolas1" style:text-underline-style="none"/>
    </style:style>
    <style:style style:name="T220" style:family="text">
      <style:text-properties fo:color="#3f7f5f" loext:opacity="100%" style:text-underline-style="none"/>
    </style:style>
    <style:style style:name="T221" style:family="text">
      <style:text-properties fo:color="#3f7f5f" loext:opacity="100%" style:font-name="Monospace1" fo:font-size="10pt" style:font-size-asian="10pt"/>
    </style:style>
    <style:style style:name="T222" style:family="text">
      <style:text-properties fo:color="#3f7f5f" loext:opacity="100%" style:font-name="Monospace1" fo:font-size="10pt" officeooo:rsid="018c7b7a" style:font-size-asian="10pt"/>
    </style:style>
    <style:style style:name="T223" style:family="text">
      <style:text-properties fo:color="#3f3fbf" loext:opacity="100%" style:font-name="Consolas1"/>
    </style:style>
    <style:style style:name="T224" style:family="text">
      <style:text-properties officeooo:rsid="00ee64c9"/>
    </style:style>
    <style:style style:name="T225" style:family="text">
      <style:text-properties text:display="none"/>
    </style:style>
    <style:style style:name="T226" style:family="text">
      <style:text-properties officeooo:rsid="00ebb296"/>
    </style:style>
    <style:style style:name="T227"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0"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1" style:family="text">
      <style:text-properties officeooo:rsid="00dda4cb"/>
    </style:style>
    <style:style style:name="T232"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4" style:family="text">
      <style:text-properties officeooo:rsid="00df017d" fo:background-color="transparent" loext:char-shading-value="0"/>
    </style:style>
    <style:style style:name="T235" style:family="text">
      <style:text-properties officeooo:rsid="00e59aa6" fo:background-color="transparent" loext:char-shading-value="0"/>
    </style:style>
    <style:style style:name="T236" style:family="text">
      <style:text-properties officeooo:rsid="00dda4cb" fo:background-color="transparent" loext:char-shading-value="0"/>
    </style:style>
    <style:style style:name="T237" style:family="text">
      <style:text-properties officeooo:rsid="00ee103b" fo:background-color="transparent" loext:char-shading-value="0"/>
    </style:style>
    <style:style style:name="T238" style:family="text">
      <style:text-properties officeooo:rsid="00e16f63"/>
    </style:style>
    <style:style style:name="T239" style:family="text">
      <style:text-properties officeooo:rsid="00e8f23e"/>
    </style:style>
    <style:style style:name="T240" style:family="text">
      <style:text-properties officeooo:rsid="00ec4c44"/>
    </style:style>
    <style:style style:name="T241" style:family="text">
      <style:text-properties officeooo:rsid="00f7036b"/>
    </style:style>
    <style:style style:name="T242" style:family="text">
      <style:text-properties officeooo:rsid="00f8fa7f"/>
    </style:style>
    <style:style style:name="T243" style:family="text">
      <style:text-properties officeooo:rsid="00f9eb5c"/>
    </style:style>
    <style:style style:name="T244" style:family="text">
      <style:text-properties officeooo:rsid="00fa2108"/>
    </style:style>
    <style:style style:name="T245" style:family="text">
      <style:text-properties officeooo:rsid="00fadb7a"/>
    </style:style>
    <style:style style:name="T246" style:family="text">
      <style:text-properties officeooo:rsid="00fb0ac1"/>
    </style:style>
    <style:style style:name="T247" style:family="text">
      <style:text-properties officeooo:rsid="00fc5e61"/>
    </style:style>
    <style:style style:name="T248" style:family="text">
      <style:text-properties officeooo:rsid="00fdedbb"/>
    </style:style>
    <style:style style:name="T249" style:family="text">
      <style:text-properties officeooo:rsid="00ff2832"/>
    </style:style>
    <style:style style:name="T250" style:family="text">
      <style:text-properties officeooo:rsid="010136dd"/>
    </style:style>
    <style:style style:name="T251" style:family="text">
      <style:text-properties officeooo:rsid="0104c9b6"/>
    </style:style>
    <style:style style:name="T252" style:family="text">
      <style:text-properties officeooo:rsid="0105b899"/>
    </style:style>
    <style:style style:name="T253" style:family="text">
      <style:text-properties officeooo:rsid="0106886f"/>
    </style:style>
    <style:style style:name="T254" style:family="text">
      <style:text-properties officeooo:rsid="01073b25"/>
    </style:style>
    <style:style style:name="T255" style:family="text">
      <style:text-properties officeooo:rsid="0108f91b"/>
    </style:style>
    <style:style style:name="T256" style:family="text">
      <style:text-properties officeooo:rsid="010af096"/>
    </style:style>
    <style:style style:name="T257" style:family="text">
      <style:text-properties officeooo:rsid="010e1f55"/>
    </style:style>
    <style:style style:name="T258" style:family="text">
      <style:text-properties officeooo:rsid="010fbae5"/>
    </style:style>
    <style:style style:name="T259" style:family="text">
      <style:text-properties officeooo:rsid="0110d1f4"/>
    </style:style>
    <style:style style:name="T260" style:family="text">
      <style:text-properties officeooo:rsid="011208a6"/>
    </style:style>
    <style:style style:name="T261" style:family="text">
      <style:text-properties officeooo:rsid="011355b4"/>
    </style:style>
    <style:style style:name="T262" style:family="text">
      <style:text-properties officeooo:rsid="0113da63"/>
    </style:style>
    <style:style style:name="T263" style:family="text">
      <style:text-properties style:text-underline-style="none"/>
    </style:style>
    <style:style style:name="T264" style:family="text">
      <style:text-properties officeooo:rsid="01212e12"/>
    </style:style>
    <style:style style:name="T265" style:family="text">
      <style:text-properties officeooo:rsid="0121d8ec"/>
    </style:style>
    <style:style style:name="T266" style:family="text">
      <style:text-properties officeooo:rsid="0124bd62"/>
    </style:style>
    <style:style style:name="T267" style:family="text">
      <style:text-properties officeooo:rsid="01258e96"/>
    </style:style>
    <style:style style:name="T268" style:family="text">
      <style:text-properties officeooo:rsid="0127de30"/>
    </style:style>
    <style:style style:name="T269" style:family="text">
      <style:text-properties officeooo:rsid="01286d0a"/>
    </style:style>
    <style:style style:name="T270" style:family="text">
      <style:text-properties officeooo:rsid="012ada2e"/>
    </style:style>
    <style:style style:name="T271" style:family="text">
      <style:text-properties officeooo:rsid="012ec9b6"/>
    </style:style>
    <style:style style:name="T272" style:family="text">
      <style:text-properties officeooo:rsid="005eebc7"/>
    </style:style>
    <style:style style:name="T273" style:family="text">
      <style:text-properties officeooo:rsid="012ef337"/>
    </style:style>
    <style:style style:name="T274" style:family="text">
      <style:text-properties fo:color="#a41515" loext:opacity="100%" style:font-name="Consolas1" fo:font-size="9pt" style:font-size-asian="9pt"/>
    </style:style>
    <style:style style:name="T275" style:family="text">
      <style:text-properties fo:color="#a41515" loext:opacity="100%" style:font-name="Consolas1" fo:font-size="9pt" officeooo:rsid="01b902f5" style:font-size-asian="9pt"/>
    </style:style>
    <style:style style:name="T276" style:family="text">
      <style:text-properties fo:color="#0451a6" loext:opacity="100%" style:font-name="Consolas1" fo:font-size="9pt" style:font-size-asian="9pt"/>
    </style:style>
    <style:style style:name="T277" style:family="text">
      <style:text-properties officeooo:rsid="0149cec3"/>
    </style:style>
    <style:style style:name="T278" style:family="text">
      <style:text-properties officeooo:rsid="014adc01"/>
    </style:style>
    <style:style style:name="T279" style:family="text">
      <style:text-properties officeooo:rsid="014f9ade"/>
    </style:style>
    <style:style style:name="T280" style:family="text">
      <style:text-properties officeooo:rsid="0151259d"/>
    </style:style>
    <style:style style:name="T281" style:family="text">
      <style:text-properties officeooo:rsid="0151fd2e"/>
    </style:style>
    <style:style style:name="T282" style:family="text">
      <style:text-properties officeooo:rsid="01546630"/>
    </style:style>
    <style:style style:name="T283" style:family="text">
      <style:text-properties officeooo:rsid="01554eb3"/>
    </style:style>
    <style:style style:name="T284" style:family="text">
      <style:text-properties officeooo:rsid="0155bc3d"/>
    </style:style>
    <style:style style:name="T285" style:family="text">
      <style:text-properties officeooo:rsid="015c0e13"/>
    </style:style>
    <style:style style:name="T286" style:family="text">
      <style:text-properties officeooo:rsid="015c4085"/>
    </style:style>
    <style:style style:name="T287" style:family="text">
      <style:text-properties officeooo:rsid="015e4779"/>
    </style:style>
    <style:style style:name="T288" style:family="text">
      <style:text-properties fo:color="#0451a5" loext:opacity="100%" style:font-name="Consolas2" fo:font-size="9pt" fo:font-weight="normal"/>
    </style:style>
    <style:style style:name="T289" style:family="text">
      <style:text-properties fo:color="#0451a5" loext:opacity="100%" style:font-name="Consolas2" fo:font-size="9pt" fo:font-weight="normal" fo:background-color="#fffffe" loext:char-shading-value="0"/>
    </style:style>
    <style:style style:name="T290" style:family="text">
      <style:text-properties fo:color="#0451a5" loext:opacity="100%" style:font-name="Consolas2" fo:font-size="9pt" fo:font-weight="normal" officeooo:rsid="01b5544c"/>
    </style:style>
    <style:style style:name="T291" style:family="text">
      <style:text-properties fo:color="#0451a5" loext:opacity="100%" style:font-name="Consolas2" fo:font-size="9pt" fo:font-weight="normal" officeooo:rsid="01b71c80"/>
    </style:style>
    <style:style style:name="T292" style:family="text">
      <style:text-properties fo:color="#0451a5" loext:opacity="100%" style:font-name="Consolas2" fo:font-size="9pt" fo:font-weight="bold"/>
    </style:style>
    <style:style style:name="T293" style:family="text">
      <style:text-properties officeooo:rsid="015fa555"/>
    </style:style>
    <style:style style:name="T294" style:family="text">
      <style:text-properties style:font-name="Consolas2" fo:font-size="9pt" fo:font-weight="normal"/>
    </style:style>
    <style:style style:name="T295" style:family="text">
      <style:text-properties style:font-name="Consolas2" fo:font-size="9pt" fo:font-weight="normal" officeooo:rsid="015fa555"/>
    </style:style>
    <style:style style:name="T296" style:family="text">
      <style:text-properties fo:color="#a31515" loext:opacity="100%" style:font-name="Consolas2" fo:font-size="9pt" fo:font-weight="normal"/>
    </style:style>
    <style:style style:name="T297" style:family="text">
      <style:text-properties fo:color="#a31515" loext:opacity="100%" style:font-name="Consolas2" fo:font-size="9pt" fo:font-weight="normal" officeooo:rsid="01b5544c"/>
    </style:style>
    <style:style style:name="T298" style:family="text">
      <style:text-properties fo:color="#a31515" loext:opacity="100%" style:font-name="Consolas2" fo:font-size="9pt" fo:font-weight="normal" officeooo:rsid="01b71c80"/>
    </style:style>
    <style:style style:name="T299" style:family="text">
      <style:text-properties fo:color="#098658" loext:opacity="100%" style:font-name="Consolas2" fo:font-size="9pt" fo:font-weight="normal"/>
    </style:style>
    <style:style style:name="T300" style:family="text">
      <style:text-properties officeooo:rsid="0160d5f3"/>
    </style:style>
    <style:style style:name="T301" style:family="text">
      <style:text-properties officeooo:rsid="01622317"/>
    </style:style>
    <style:style style:name="T302" style:family="text">
      <style:text-properties officeooo:rsid="0163fbf5"/>
    </style:style>
    <style:style style:name="T303" style:family="text">
      <style:text-properties officeooo:rsid="016529da"/>
    </style:style>
    <style:style style:name="T304" style:family="text">
      <style:text-properties officeooo:rsid="016cca63"/>
    </style:style>
    <style:style style:name="T305" style:family="text">
      <style:text-properties officeooo:rsid="016e9a6e"/>
    </style:style>
    <style:style style:name="T306" style:family="text">
      <style:text-properties officeooo:rsid="016f0584"/>
    </style:style>
    <style:style style:name="T307" style:family="text">
      <style:text-properties officeooo:rsid="017087d4"/>
    </style:style>
    <style:style style:name="T308" style:family="text">
      <style:text-properties officeooo:rsid="01723150"/>
    </style:style>
    <style:style style:name="T309" style:family="text">
      <style:text-properties officeooo:rsid="0176c9fd"/>
    </style:style>
    <style:style style:name="T310" style:family="text">
      <style:text-properties officeooo:rsid="0177982d"/>
    </style:style>
    <style:style style:name="T311" style:family="text">
      <style:text-properties officeooo:rsid="01794cf9"/>
    </style:style>
    <style:style style:name="T312" style:family="text">
      <style:text-properties officeooo:rsid="017a98da"/>
    </style:style>
    <style:style style:name="T313" style:family="text">
      <style:text-properties officeooo:rsid="017c0014"/>
    </style:style>
    <style:style style:name="T314" style:family="text">
      <style:text-properties officeooo:rsid="01836b49"/>
    </style:style>
    <style:style style:name="T315" style:family="text">
      <style:text-properties officeooo:rsid="007f55bb"/>
    </style:style>
    <style:style style:name="T316" style:family="text">
      <style:text-properties style:rfc-language-tag="es-ES-u-co-trad" fo:language="es" fo:country="ES" fo:font-style="normal" officeooo:rsid="01875821" style:font-style-asian="normal" style:font-style-complex="normal"/>
    </style:style>
    <style:style style:name="T317" style:family="text">
      <style:text-properties style:rfc-language-tag="es-ES-u-co-trad" fo:language="es" fo:country="ES" fo:font-style="normal" officeooo:rsid="01875821" fo:background-color="transparent" loext:char-shading-value="0" style:font-style-asian="normal" style:font-style-complex="normal"/>
    </style:style>
    <style:style style:name="T318" style:family="text">
      <style:text-properties officeooo:rsid="018c7b7a"/>
    </style:style>
    <style:style style:name="T319" style:family="text">
      <style:text-properties officeooo:rsid="018f92fd"/>
    </style:style>
    <style:style style:name="T320" style:family="text">
      <style:text-properties officeooo:rsid="019009d8"/>
    </style:style>
    <style:style style:name="T321" style:family="text">
      <style:text-properties officeooo:rsid="01915c4c"/>
    </style:style>
    <style:style style:name="T322" style:family="text">
      <style:text-properties officeooo:rsid="007af11d"/>
    </style:style>
    <style:style style:name="T323" style:family="text">
      <style:text-properties officeooo:rsid="01949037"/>
    </style:style>
    <style:style style:name="T324" style:family="text">
      <style:text-properties officeooo:rsid="00b37226"/>
    </style:style>
    <style:style style:name="T325" style:family="text">
      <style:text-properties officeooo:rsid="01974b8c"/>
    </style:style>
    <style:style style:name="T326" style:family="text">
      <style:text-properties officeooo:rsid="01985e2b"/>
    </style:style>
    <style:style style:name="T327" style:family="text">
      <style:text-properties officeooo:rsid="01997fee"/>
    </style:style>
    <style:style style:name="T328" style:family="text">
      <style:text-properties officeooo:rsid="019b515e"/>
    </style:style>
    <style:style style:name="T329" style:family="text">
      <style:text-properties officeooo:rsid="019b5d65"/>
    </style:style>
    <style:style style:name="T330" style:family="text">
      <style:text-properties officeooo:rsid="01a00707"/>
    </style:style>
    <style:style style:name="T331" style:family="text">
      <style:text-properties officeooo:rsid="01a3c4fd"/>
    </style:style>
    <style:style style:name="T332" style:family="text">
      <style:text-properties officeooo:rsid="01a794fe"/>
    </style:style>
    <style:style style:name="T333" style:family="text">
      <style:text-properties officeooo:rsid="01a9cdd2"/>
    </style:style>
    <style:style style:name="T334" style:family="text">
      <style:text-properties officeooo:rsid="01aba0a4"/>
    </style:style>
    <style:style style:name="T335" style:family="text">
      <style:text-properties officeooo:rsid="01af45bb"/>
    </style:style>
    <style:style style:name="T336" style:family="text">
      <style:text-properties officeooo:rsid="01b1a3a8"/>
    </style:style>
    <style:style style:name="T337" style:family="text">
      <style:text-properties officeooo:rsid="01b368bb"/>
    </style:style>
    <style:style style:name="T338" style:family="text">
      <style:text-properties officeooo:rsid="01b46b41"/>
    </style:style>
    <style:style style:name="T339" style:family="text">
      <style:text-properties officeooo:rsid="01b4bedd"/>
    </style:style>
    <style:style style:name="T340" style:family="text">
      <style:text-properties officeooo:rsid="01b5e40b"/>
    </style:style>
    <style:style style:name="T341" style:family="text">
      <style:text-properties officeooo:rsid="01b71c80"/>
    </style:style>
    <style:style style:name="T342" style:family="text">
      <style:text-properties officeooo:rsid="01bbecb4"/>
    </style:style>
    <style:style style:name="T343" style:family="text">
      <style:text-properties officeooo:rsid="01b77b84"/>
    </style:style>
    <style:style style:name="T344" style:family="text">
      <style:text-properties officeooo:rsid="01b8b2cf"/>
    </style:style>
    <style:style style:name="T345" style:family="text">
      <style:text-properties officeooo:rsid="01bb17a7"/>
    </style:style>
    <style:style style:name="T346" style:family="text">
      <style:text-properties officeooo:rsid="01b902f5"/>
    </style:style>
    <style:style style:name="T34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66"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6"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6">DISTRIBUCIO</text:span>: Manual d’integració </text:p>
      <text:p text:style-name="P22"><text:span text:style-name="T121">04</text:span><text:span text:style-name="T122"> d</text:span><text:span text:style-name="T123">e </text:span><text:span text:style-name="T121">març </text:span><text:span text:style-name="T120">de 202</text:span><text:span text:style-name="T121">6</text:span></text:p>
      <text:p text:style-name="P147">Serveis d’Administració Electrònica en el Govern de les Illes Balears</text:p>
      <text:p text:style-name="P146">Lot 3 (Serveis de tramitació d’expedients electrònics)</text:p>
      <text:p text:style-name="P146"/>
      <text:p text:style-name="P146"/>
      <text:p text:style-name="P146"/>
      <text:p text:style-name="P146"/>
      <text:p text:style-name="P4">Oficina Tècnica de Direcció de Projecte</text:p>
      <text:list xml:id="list411355432" text:style-name="Outline">
        <text:list-header>
          <text:h text:style-name="P39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5">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4">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0">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7">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7">Afegir punts per explicar les APIs REST d'integració per backoffices i per crear regles de distribucio de forma remota. </text:p>
          </table:table-cell>
        </table:table-row>
        <table:table-row table:style-name="Taula1.1">
          <table:table-cell table:style-name="Taula1.A8" office:value-type="string">
            <text:p text:style-name="P217"><text:span text:style-name="T309">05</text:span>/0<text:span text:style-name="T309">7</text:span>/23</text:p>
          </table:table-cell>
          <table:table-cell table:style-name="Taula1.B8" office:value-type="string">
            <text:p text:style-name="P15">Límit Tecnologies</text:p>
          </table:table-cell>
          <table:table-cell table:style-name="Taula1.C8" office:value-type="string">
            <text:p text:style-name="P15">1.<text:span text:style-name="T309">5</text:span></text:p>
          </table:table-cell>
          <table:table-cell table:style-name="Taula1.D8" office:value-type="string">
            <text:p text:style-name="P217"><text:span text:style-name="T309">Revisar documentació i exemples.</text:span> </text:p>
          </table:table-cell>
        </table:table-row>
        <table:table-row table:style-name="Taula1.1">
          <table:table-cell table:style-name="Taula1.A11" office:value-type="string">
            <text:p text:style-name="P218"><text:span text:style-name="T334">12</text:span>/0<text:span text:style-name="T334">4/</text:span>2<text:span text:style-name="T334">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9">Revisió per a la versió 1.0<text:span text:style-name="T335">.1</text:span> de l’aplicació.</text:p>
          </table:table-cell>
        </table:table-row>
        <table:table-row table:style-name="Taula1.1">
          <table:table-cell table:style-name="Taula1.A11" office:value-type="string">
            <text:p text:style-name="P218"><text:span text:style-name="T339">09</text:span>/<text:span text:style-name="T337">1</text:span><text:span text:style-name="T339">2</text:span><text:span text:style-name="T334">/</text:span><text:span text:style-name="T337">25</text:span></text:p>
          </table:table-cell>
          <table:table-cell table:style-name="Taula1.B11" office:value-type="string">
            <text:p text:style-name="P16">Límit Tecnologies</text:p>
          </table:table-cell>
          <table:table-cell table:style-name="Taula1.C11" office:value-type="string">
            <text:p text:style-name="P17">1.<text:span text:style-name="T337">7</text:span></text:p>
          </table:table-cell>
          <table:table-cell table:style-name="Taula1.D11" office:value-type="string">
            <text:p text:style-name="P394">Nou paràmetre <text:span text:style-name="T126">tipusSia</text:span><text:span text:style-name="T154"> a l'API de regles.<text:line-break/></text:span><text:span text:style-name="T171">Informació del codi de servei i codi i nom del tràmit en la consulta d'anotacions.</text:span></text:p>
          </table:table-cell>
        </table:table-row>
        <table:table-row table:style-name="Taula1.1">
          <table:table-cell table:style-name="Taula1.A11" office:value-type="string">
            <text:p text:style-name="P395"><text:span text:style-name="T342">04</text:span>/<text:span text:style-name="T342">03</text:span>/2<text:span text:style-name="T342">6</text:span></text:p>
          </table:table-cell>
          <table:table-cell table:style-name="Taula1.B11" office:value-type="string">
            <text:p text:style-name="P18">Límit Tecnologies</text:p>
          </table:table-cell>
          <table:table-cell table:style-name="Taula1.C11" office:value-type="string">
            <text:p text:style-name="P19">1.<text:span text:style-name="T343">8</text:span></text:p>
          </table:table-cell>
          <table:table-cell table:style-name="Taula1.D11" office:value-type="string">
            <text:p text:style-name="P395"><text:span text:style-name="T342">Actualització versions llibreries client. </text:span>Revisió del Servei de gestió d<text:span text:style-name="T344">'</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8"/>
          </table:table-cell>
          <table:table-cell table:style-name="Taula2.B4" office:value-type="string">
            <text:p text:style-name="P148"/>
          </table:table-cell>
          <table:table-cell table:style-name="Taula2.C4" office:value-type="string">
            <text:p text:style-name="P148"/>
          </table:table-cell>
        </table:table-row>
        <table:table-row table:style-name="Taula2.1">
          <table:table-cell table:style-name="Taula2.A5" office:value-type="string">
            <text:p text:style-name="P148"/>
          </table:table-cell>
          <table:table-cell table:style-name="Taula2.B5" office:value-type="string">
            <text:p text:style-name="P148"/>
          </table:table-cell>
          <table:table-cell table:style-name="Taula2.C5" office:value-type="string">
            <text:p text:style-name="P148"/>
          </table:table-cell>
        </table:table-row>
        <table:table-row table:style-name="Taula2.1">
          <table:table-cell table:style-name="Taula2.A6" office:value-type="string">
            <text:p text:style-name="P148"/>
          </table:table-cell>
          <table:table-cell table:style-name="Taula2.B6" office:value-type="string">
            <text:p text:style-name="P148"/>
          </table:table-cell>
          <table:table-cell table:style-name="Taula2.C6" office:value-type="string">
            <text:p text:style-name="P14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8"/>
          </table:table-cell>
          <table:table-cell table:style-name="Taula3.B4" office:value-type="string">
            <text:p text:style-name="P148"/>
          </table:table-cell>
          <table:table-cell table:style-name="Taula3.C4" office:value-type="string">
            <text:p text:style-name="P148"/>
          </table:table-cell>
        </table:table-row>
        <text:soft-page-break/>
        <table:table-row table:style-name="Taula3.1">
          <table:table-cell table:style-name="Taula3.A5" office:value-type="string">
            <text:p text:style-name="P148"/>
          </table:table-cell>
          <table:table-cell table:style-name="Taula3.B5" office:value-type="string">
            <text:p text:style-name="P148"/>
          </table:table-cell>
          <table:table-cell table:style-name="Taula3.C5" office:value-type="string">
            <text:p text:style-name="P148"/>
          </table:table-cell>
        </table:table-row>
        <table:table-row table:style-name="Taula3.1">
          <table:table-cell table:style-name="Taula3.A6" office:value-type="string">
            <text:p text:style-name="P148"/>
          </table:table-cell>
          <table:table-cell table:style-name="Taula3.B6" office:value-type="string">
            <text:p text:style-name="P148"/>
          </table:table-cell>
          <table:table-cell table:style-name="Taula3.C6" office:value-type="string">
            <text:p text:style-name="P148"/>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8"/>
          </table:table-cell>
          <table:table-cell table:style-name="Taula6.B4" office:value-type="string">
            <text:p text:style-name="P148"/>
          </table:table-cell>
          <table:table-cell table:style-name="Taula6.C4" office:value-type="string">
            <text:p text:style-name="P148"/>
          </table:table-cell>
        </table:table-row>
        <table:table-row table:style-name="Taula6.1">
          <table:table-cell table:style-name="Taula6.A5" office:value-type="string">
            <text:p text:style-name="P148"/>
          </table:table-cell>
          <table:table-cell table:style-name="Taula6.B5" office:value-type="string">
            <text:p text:style-name="P148"/>
          </table:table-cell>
          <table:table-cell table:style-name="Taula6.C5" office:value-type="string">
            <text:p text:style-name="P148"/>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7"><text:a xlink:type="simple" xlink:href="#__RefHeading___Toc21421_3940995463" text:style-name="Index_20_Link" text:visited-style-name="Index_20_Link">Control de versions del document<text:tab/>2</text:a></text:p>
          <text:p text:style-name="P227"><text:a xlink:type="simple" xlink:href="#__RefHeading___Toc16768_2313926538" text:style-name="Index_20_Link" text:visited-style-name="Index_20_Link">1. Objecte<text:tab/>5</text:a></text:p>
          <text:p text:style-name="P227"><text:a xlink:type="simple" xlink:href="#__RefHeading___Toc160468_1680181998" text:style-name="Index_20_Link" text:visited-style-name="Index_20_Link">2. Servei d’enviament d'anotacions<text:tab/>6</text:a></text:p>
          <text:p text:style-name="P228"><text:a xlink:type="simple" xlink:href="#__RefHeading___Toc16770_2313926538" text:style-name="Index_20_Link" text:visited-style-name="Index_20_Link">2.1. Diagrames de seqüència<text:tab/>6</text:a></text:p>
          <text:p text:style-name="P229"><text:a xlink:type="simple" xlink:href="#__RefHeading___Toc8043_1716379843" text:style-name="Index_20_Link" text:visited-style-name="Index_20_Link">2.1.1. Processament síncron<text:tab/>6</text:a></text:p>
          <text:p text:style-name="P229"><text:a xlink:type="simple" xlink:href="#__RefHeading___Toc15562_3365326968" text:style-name="Index_20_Link" text:visited-style-name="Index_20_Link">2.1.2. Processament asíncron<text:tab/>7</text:a></text:p>
          <text:p text:style-name="P228"><text:a xlink:type="simple" xlink:href="#__RefHeading___Toc227353_390838441" text:style-name="Index_20_Link" text:visited-style-name="Index_20_Link">2.2. Descripció del servei<text:tab/>8</text:a></text:p>
          <text:p text:style-name="P228"><text:a xlink:type="simple" xlink:href="#__RefHeading___Toc16772_2313926538" text:style-name="Index_20_Link" text:visited-style-name="Index_20_Link">2.3. Model de dades<text:tab/>8</text:a></text:p>
          <text:p text:style-name="P228"><text:a xlink:type="simple" xlink:href="#__RefHeading___Toc227355_390838441" text:style-name="Index_20_Link" text:visited-style-name="Index_20_Link">2.4. Utilització del servei<text:tab/>14</text:a></text:p>
          <text:p text:style-name="P227"><text:a xlink:type="simple" xlink:href="#__RefHeading___Toc52041_2521683781" text:style-name="Index_20_Link" text:visited-style-name="Index_20_Link">3. Servei de backoffice de distribució<text:tab/>16</text:a></text:p>
          <text:p text:style-name="P227"><text:a xlink:type="simple" xlink:href="#__RefHeading___Toc160470_1680181998" text:style-name="Index_20_Link" text:visited-style-name="Index_20_Link">4. Servei de gestió d’anotacions pels backoffices<text:tab/>17</text:a></text:p>
          <text:p text:style-name="P228"><text:a xlink:type="simple" xlink:href="#__RefHeading___Toc227357_390838441" text:style-name="Index_20_Link" text:visited-style-name="Index_20_Link">4.1. Diagrama de seqüència<text:tab/>17</text:a></text:p>
          <text:p text:style-name="P228"><text:a xlink:type="simple" xlink:href="#__RefHeading___Toc227359_390838441" text:style-name="Index_20_Link" text:visited-style-name="Index_20_Link">4.2. Descripció del servei<text:tab/>19</text:a></text:p>
          <text:p text:style-name="P229"><text:a xlink:type="simple" xlink:href="#__RefHeading___Toc53751_2521683781" text:style-name="Index_20_Link" text:visited-style-name="Index_20_Link">4.2.1. Consulta d'una anotació de registre<text:tab/>19</text:a></text:p>
          <text:p text:style-name="P229"><text:a xlink:type="simple" xlink:href="#__RefHeading___Toc53753_2521683781" text:style-name="Index_20_Link" text:visited-style-name="Index_20_Link">4.2.2. Canvi d'estat d'una anotació<text:tab/>21</text:a></text:p>
          <text:p text:style-name="P228"><text:a xlink:type="simple" xlink:href="#__RefHeading___Toc227361_390838441" text:style-name="Index_20_Link" text:visited-style-name="Index_20_Link">4.3. Model de dades<text:tab/>22</text:a></text:p>
          <text:p text:style-name="P228"><text:a xlink:type="simple" xlink:href="#__RefHeading___Toc227363_390838441" text:style-name="Index_20_Link" text:visited-style-name="Index_20_Link">4.4. Utilització del servei<text:tab/>27</text:a></text:p>
          <text:p text:style-name="P227"><text:a xlink:type="simple" xlink:href="#__RefHeading___Toc227365_390838441" text:style-name="Index_20_Link" text:visited-style-name="Index_20_Link">5. Servei de gestió de regles<text:tab/>28</text:a></text:p>
          <text:p text:style-name="P228"><text:a xlink:type="simple" xlink:href="#__RefHeading___Toc227367_390838441" text:style-name="Index_20_Link" text:visited-style-name="Index_20_Link">5.1. Descripció del servei<text:tab/>28</text:a></text:p>
          <text:p text:style-name="P229"><text:a xlink:type="simple" xlink:href="#__RefHeading___Toc227369_390838441" text:style-name="Index_20_Link" text:visited-style-name="Index_20_Link">5.1.1. Crear una regla<text:tab/>29</text:a></text:p>
          <text:p text:style-name="P229"><text:a xlink:type="simple" xlink:href="#__RefHeading___Toc227371_390838441" text:style-name="Index_20_Link" text:visited-style-name="Index_20_Link">5.1.2. Canviar estat d’una regla<text:tab/>29</text:a></text:p>
          <text:p text:style-name="P229"><text:a xlink:type="simple" xlink:href="#__RefHeading___Toc227373_390838441" text:style-name="Index_20_Link" text:visited-style-name="Index_20_Link">5.1.3. Consultar informació d’una regla<text:tab/>30</text:a></text:p>
          <text:p text:style-name="P228"><text:a xlink:type="simple" xlink:href="#__RefHeading___Toc227375_390838441" text:style-name="Index_20_Link" text:visited-style-name="Index_20_Link">5.2. Utilització del servei<text:tab/>31</text:a></text:p>
          <text:p text:style-name="P227"><text:a xlink:type="simple" xlink:href="#__RefHeading___Toc60794_1326387233" text:style-name="Index_20_Link" text:visited-style-name="Index_20_Link">6. Llibreria d'utilitats pels backoffices de DISTRIBUCIO<text:tab/>33</text:a></text:p>
          <text:p text:style-name="P228"><text:a xlink:type="simple" xlink:href="#__RefHeading___Toc50902_2907556958" text:style-name="Index_20_Link" text:visited-style-name="Index_20_Link">6.1. Informació de la llibreria<text:tab/>33</text:a></text:p>
          <text:p text:style-name="P228"><text:a xlink:type="simple" xlink:href="#__RefHeading___Toc50904_2907556958" text:style-name="Index_20_Link" text:visited-style-name="Index_20_Link">6.2. Com incloure la llibreria<text:tab/>34</text:a></text:p>
          <text:p text:style-name="P228"><text:a xlink:type="simple" xlink:href="#__RefHeading___Toc366105_93553639" text:style-name="Index_20_Link" text:visited-style-name="Index_20_Link">6.3. Històric<text:tab/>34</text:a></text:p>
          <text:p text:style-name="P228"><text:a xlink:type="simple" xlink:href="#__RefHeading___Toc366107_93553639" text:style-name="Index_20_Link" text:visited-style-name="Index_20_Link">6.4. Utilitats per l'Arxiu<text:tab/>35</text:a></text:p>
          <text:p text:style-name="P229"><text:a xlink:type="simple" xlink:href="#__RefHeading___Toc50906_2907556958" text:style-name="Index_20_Link" text:visited-style-name="Index_20_Link">6.4.1. Paràmetres<text:tab/>36</text:a></text:p>
          <text:p text:style-name="P229"><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6">B</text:span></text:a><text:a xlink:type="simple" xlink:href="#__RefHeading___Toc50908_2907556958" text:style-name="Index_20_Link" text:visited-style-name="Index_20_Link"><text:span text:style-name="T126">ackofficeArxiuUtils</text:span></text:a><text:a xlink:type="simple" xlink:href="#__RefHeading___Toc50908_2907556958" text:style-name="Index_20_Link" text:visited-style-name="Index_20_Link"><text:tab/>37</text:a></text:p>
          <text:p text:style-name="P229"><text:a xlink:type="simple" xlink:href="#__RefHeading___Toc50910_2907556958" text:style-name="Index_20_Link" text:visited-style-name="Index_20_Link">6.4.3. Exemple Java<text:tab/>38</text:a></text:p>
          <text:p text:style-name="P228"><text:a xlink:type="simple" xlink:href="#__RefHeading___Toc50910_29075569581" text:style-name="Index_20_Link" text:visited-style-name="Index_20_Link">6.5. Utilitats per Sistra2<text:tab/>42</text:a></text:p>
          <text:p text:style-name="P229"><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6">BackofficeSistra2Utils</text:span></text:a><text:a xlink:type="simple" xlink:href="#__RefHeading___Toc366109_93553639" text:style-name="Index_20_Link" text:visited-style-name="Index_20_Link"><text:tab/>43</text:a></text:p>
          <text:p text:style-name="P229"><text:a xlink:type="simple" xlink:href="#__RefHeading___Toc366111_93553639" text:style-name="Index_20_Link" text:visited-style-name="Index_20_Link">6.5.2. Exemple Java<text:tab/>44</text:a></text:p>
          <text:p text:style-name="P227"><text:a xlink:type="simple" xlink:href="#__RefHeading___Toc117515_1680181998" text:style-name="Index_20_Link" text:visited-style-name="Index_20_Link">Annex I: WSDL del backoffice<text:tab/>45</text:a></text:p>
          <text:p text:style-name="P227"><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6">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94023409972458" text:continue-numbering="true" text:style-name="Outline">
        <text:list-item>
          <text:h text:style-name="P400" text:outline-level="1"><text:bookmark-start text:name="__RefHeading___Toc16768_2313926538"/>Objecte <text:bookmark-end text:name="__RefHeading___Toc16768_2313926538"/></text:h>
        </text:list-item>
      </text:list>
      <text:p text:style-name="P385"><text:span text:style-name="T310">L'objectiu d'aquest document és proporcionar </text:span>la informació necessària per a la integració amb el<text:span text:style-name="T110">s</text:span> <text:span text:style-name="T321">diferents </text:span>servei<text:span text:style-name="T110">s </text:span><text:span text:style-name="T321">que proporciona l’aplicació</text:span><text:span text:style-name="T110"> DISTRIBUCIÓ.</text:span></text:p>
      <text:p text:style-name="P233">Les aplicacions que s’integren amb distribució pertanyen a un dels següents grups:</text:p>
      <text:list xml:id="list595361976" text:style-name="L1">
        <text:list-item>
          <text:p text:style-name="P449">Aplicacions de registre: aquestes aplicacions recullen les anotacions del registre d’entrada i les donen d’alta a distribució.</text:p>
        </text:list-item>
        <text:list-item>
          <text:p text:style-name="P449">Backoffices: aquestes aplicacions son les encarregades de processar les anotacions de registre.</text:p>
        </text:list-item>
      </text:list>
      <text:p text:style-name="P233">Les aplicacions de registre fan us del servei d’enviament d’anotacions de registre per a donar-les d’alta a DISTRIBUCIÓ i que comenci el seu processament.</text:p>
      <text:p text:style-name="P233">Per a cada anotació de registre, DISTRIBUCIÓ s’encarrega de calcular el backoffice encarregat del seu processament (mitjançant l’aplicació de regles) i d’informar a aquests backoffices de les anotacions pendents de processar.</text:p>
      <text:p text:style-name="P233">Els backoffices consulten les anotacions de registre a DISTRIBUCIÓ i canvien el seu estat una vegada les han processat.</text:p>
      <text:p text:style-name="P388"><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7"/>
      <text:p text:style-name="P158">A l'apartat <text:bookmark-ref text:reference-format="number" text:ref-name="__RefNumPara__81015_1680181998">2</text:bookmark-ref><text:span text:style-name="T311"><text:s/></text:span>es <text:span text:style-name="T326">descriu el servei d’enviament d’anotacions</text:span> de registre a DISTRIBUCIÓ.</text:p>
      <text:p text:style-name="P159">A l'apartat <text:bookmark-ref text:reference-format="number" text:ref-name="__RefNumPara__52044_2521683781">3</text:bookmark-ref><text:span text:style-name="T311"><text:s/></text:span>es <text:span text:style-name="T326">mostra</text:span> com <text:span text:style-name="T325">implementar el servei dels backoffices que rep la llista d’anotacions pendents de processar de</text:span> DISTRIBUCIÓ.</text:p>
      <text:p text:style-name="P159">A l'apartat <text:bookmark-ref text:reference-format="number" text:ref-name="__RefNumPara__81017_1680181998">4</text:bookmark-ref><text:span text:style-name="T311"><text:s/></text:span>es <text:span text:style-name="T328">descriu el servei </text:span><text:span text:style-name="T327">que permet </text:span><text:span text:style-name="T329">als backoffices </text:span><text:span text:style-name="T328">consultar i </text:span><text:span text:style-name="T327">canviar l’estat de les anotacions</text:span><text:span text:style-name="T328"> </text:span><text:span text:style-name="T329">informades des </text:span><text:span text:style-name="T328">de </text:span>DISTRIBUCIÓ<text:span text:style-name="T312">.</text:span></text:p>
      <text:p text:style-name="P158">A l'apartat <text:bookmark-ref text:reference-format="number" text:ref-name="__RefNumPara__52573_2521683781">5</text:bookmark-ref><text:span text:style-name="T311"><text:s/></text:span>es <text:span text:style-name="T328">descriu el servei que permet gestionar les regles de </text:span>DISTRIBUCIÓ<text:span text:style-name="T312">.</text:span></text:p>
      <text:p text:style-name="P387">A l'apartat <text:bookmark-ref text:reference-format="number-all-superior" text:ref-name="__RefHeading___Toc60794_1326387233">6</text:bookmark-ref><text:s/>es detalla la llibreria d'utilitats comunes de <text:span text:style-name="T111">DISTRIBUCIÓ</text:span> per a backoffices per moure els documents annexos dins de l'Arxiu o per interpretar la informació XML de formularis i pagaments provinents de SISTRA2.</text:p>
      <text:list xml:id="list94024937827791" text:continue-list="list94023409972458" text:style-name="Outline">
        <text:list-item>
          <text:h text:style-name="P401" text:outline-level="1"><text:bookmark-start text:name="__RefNumPara__81015_1680181998"/><text:bookmark-start text:name="__RefHeading___Toc160468_1680181998"/><text:span text:style-name="T318">Servei d’e</text:span>nviament d'anotacions <text:bookmark-end text:name="__RefNumPara__81015_1680181998"/><text:bookmark-end text:name="__RefHeading___Toc160468_1680181998"/></text:h>
        </text:list-item>
      </text:list>
      <text:p text:style-name="P235">Aquest servei permet l’enviament d’anotacions de registre a una de les bústies de distribució. Aquest enviament es pot fer de forma síncrona o de forma asíncrona.</text:p>
      <text:p text:style-name="P235"><text:span text:style-name="T313">En aquest apartat es descriu</text:span>en<text:span text:style-name="T313"> e</text:span>ls casos d’ús<text:span text:style-name="T313">, el model de dades i els detalls i el client per a la seva integració.</text:span></text:p>
      <text:p text:style-name="P243"><draw:frame draw:style-name="fr3" draw:name="Marc2" text:anchor-type="as-char" svg:width="9.895cm" draw:z-index="68"><draw:text-box fo:min-height="6.932cm"><text:p text:style-name="P230"><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1"><text:sequence text:ref-name="refFig.0" text:name="Fig." text:formula="ooow:Fig.+1" style:num-format="1">1</text:sequence></text:span>: <text:s/><text:span text:style-name="T311">Casos d'ús </text:span><text:span text:style-name="T320">de l’enviament</text:span><text:span text:style-name="T313"> d'anotacions a </text:span><text:span text:style-name="T311">DISTRIBUCIO</text:span></text:p></draw:text-box></draw:frame></text:p>
      <text:list xml:id="list94024552474075" text:continue-numbering="true" text:style-name="Outline">
        <text:list-item>
          <text:list>
            <text:list-item>
              <text:h text:style-name="P408" text:outline-level="2"><text:bookmark-start text:name="__RefHeading___Toc16770_2313926538"/>Diagrames d<text:span text:style-name="T320">e seqüència</text:span><text:bookmark-end text:name="__RefHeading___Toc16770_2313926538"/></text:h>
            </text:list-item>
          </text:list>
        </text:list-item>
      </text:list>
      <text:p text:style-name="P152">Segons la configuració de l’aplicació, el processament de l’anotació de registre es <text:span text:style-name="T98">pot dur</text:span> a terme de forma síncrona o de forma asíncrona.</text:p>
      <text:list xml:id="list94025127619257" text:continue-numbering="true" text:style-name="Outline">
        <text:list-item>
          <text:list>
            <text:list-item>
              <text:list>
                <text:list-item>
                  <text:h text:style-name="P421" text:outline-level="3"><text:bookmark-start text:name="__RefHeading___Toc8043_1716379843"/><text:span text:style-name="T319">Processament</text:span> síncron<text:bookmark-end text:name="__RefHeading___Toc8043_1716379843"/></text:h>
                </text:list-item>
              </text:list>
            </text:list-item>
          </text:list>
        </text:list-item>
      </text:list>
      <text:p text:style-name="P154">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0"/>
      <text:p text:style-name="P151"><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1"/>
      <text:p text:style-name="P153">La resposta retornada al client podrà retornar un error si alguna de les passes efectuades no s’ha pogut completar correctament.</text:p>
      <text:list xml:id="list94023800136705" text:continue-numbering="true" text:style-name="Outline">
        <text:list-item>
          <text:list>
            <text:list-item>
              <text:list>
                <text:list-item>
                  <text:h text:style-name="P421" text:outline-level="3"><text:bookmark-start text:name="__RefHeading___Toc15562_3365326968"/><text:span text:style-name="T319">Processament</text:span> asíncron<text:bookmark-end text:name="__RefHeading___Toc15562_3365326968"/></text:h>
                </text:list-item>
              </text:list>
            </text:list-item>
          </text:list>
        </text:list-item>
      </text:list>
      <text:p text:style-name="P153">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3"/>
      <text:p text:style-name="P149"><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94023707194933" text:continue-numbering="true" text:style-name="Outline">
        <text:list-item>
          <text:list>
            <text:list-item>
              <text:h text:style-name="P409"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96"><text:span text:style-name="T318">Aquest servei</text:span> <text:span text:style-name="T318">disposa d’un únic mètode</text:span><text:span text:style-name="T108"> </text:span><text:span text:style-name="T43">enviarAnotacioRegistreEntrada</text:span> <text:span text:style-name="T108">que </text:span><text:span text:style-name="T318">permet l’enviament d’</text:span><text:span text:style-name="T108">anotacions provinents del registre d’entrada.</text:span><text:span text:style-name="T345">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8">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list xml:id="list3596751206" text:style-name="L2">
              <text:list-item>
                <text:p text:style-name="P429">SOAP:</text:p>
                <text:list>
                  <text:list-item>
                    <text:p text:style-name="P430">http<text:span text:style-name="T318">s</text:span>://<text:span text:style-name="T318">DISTRIB_HOST</text:span>/distribucio/ws/v1/bustia</text:p>
                  </text:list-item>
                </text:list>
              </text:list-item>
              <text:list-item>
                <text:p text:style-name="P429">REST: </text:p>
                <text:list>
                  <text:list-item>
                    <text:p text:style-name="P430">http<text:span text:style-name="T318">s</text:span>://<text:span text:style-name="T318">DISTRIB_HOST</text:span>/distribucio<text:span text:style-name="T345">api</text:span>/<text:span text:style-name="T345">interna/</text:span>bustia<text:span text:style-name="T345">/alta</text:span></text:p>
                  </text:list-item>
                </text:list>
              </text:list-item>
            </text:list>
          </table:table-cell>
        </table:table-row>
        <table:table-row table:style-name="Taula12.1">
          <table:table-cell table:style-name="Taula12.A2" office:value-type="string">
            <text:p text:style-name="P40">Autenticació</text:p>
          </table:table-cell>
          <table:table-cell table:style-name="Taula12.B3" office:value-type="string">
            <text:p text:style-name="P237">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81">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7">Nom</text:p>
                </table:table-cell>
                <table:table-cell table:style-name="Taula13.A1" office:value-type="string">
                  <text:p text:style-name="P237">Tipus</text:p>
                </table:table-cell>
                <table:table-cell table:style-name="Taula13.C1" office:value-type="string">
                  <text:p text:style-name="P237">Descripció</text:p>
                </table:table-cell>
              </table:table-row>
              <table:table-row table:style-name="TableLine1144325312">
                <table:table-cell table:style-name="Taula13.A2" office:value-type="string">
                  <text:p text:style-name="P46">entitat</text:p>
                </table:table-cell>
                <table:table-cell table:style-name="Taula13.B2" office:value-type="string">
                  <text:p text:style-name="P237">String</text:p>
                </table:table-cell>
                <table:table-cell table:style-name="Taula13.C2" office:value-type="string">
                  <text:p text:style-name="P46">El codi de l’entitat de DISTRIBUCIO a on es vol donar d’alta l’anotació.</text:p>
                </table:table-cell>
              </table:table-row>
              <table:table-row table:style-name="TableLine1144326464">
                <table:table-cell table:style-name="Taula13.A3" office:value-type="string">
                  <text:p text:style-name="P46">unitatAdministrativa</text:p>
                </table:table-cell>
                <table:table-cell table:style-name="Taula13.B3" office:value-type="string">
                  <text:p text:style-name="P237">String</text:p>
                </table:table-cell>
                <table:table-cell table:style-name="Taula13.C3" office:value-type="string">
                  <text:p text:style-name="P46">El codi DIR3 de la unitat administrativa destinatària de l’anotació de registre.</text:p>
                </table:table-cell>
              </table:table-row>
              <table:table-row table:style-name="TableLine1144327616">
                <table:table-cell table:style-name="Taula13.A4" office:value-type="string">
                  <text:p text:style-name="P46">registreEntrada</text:p>
                </table:table-cell>
                <table:table-cell table:style-name="Taula13.B4" office:value-type="string">
                  <text:p text:style-name="P237">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7">(no retorna cap valor)</text:p>
          </table:table-cell>
        </table:table-row>
      </table:table>
      <text:p text:style-name="P382"/>
      <text:p text:style-name="P384">Per a més informació sobre com emplenar correctament l’objecte de tipus RegistreEntrada es pot consultar el punt <text:bookmark-ref text:reference-format="number" text:ref-name="__RefNumPara__80988_1680181998">2.3</text:bookmark-ref><text:s/>d’aquest mateix document.</text:p>
      <text:p text:style-name="P384">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94025266850463" text:continue-list="list94023707194933" text:style-name="Outline">
        <text:list-item>
          <text:list>
            <text:list-item>
              <text:h text:style-name="P413" text:outline-level="2"><text:bookmark-start text:name="__RefNumPara__80988_1680181998"/><text:bookmark-start text:name="__RefHeading___Toc16772_2313926538"/>Model de <text:span text:style-name="T318">dades</text:span> <text:bookmark-end text:name="__RefNumPara__80988_1680181998"/><text:bookmark-end text:name="__RefHeading___Toc16772_2313926538"/></text:h>
            </text:list-item>
          </text:list>
        </text:list-item>
      </text:list>
      <text:p text:style-name="P383">Aquest és el model de <text:span text:style-name="T318">dades</text:span> del servei d’<text:span text:style-name="T97">enviament d’anotacions de registre</text:span>.</text:p>
      <text:p text:style-name="P383"><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40"><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1144333088">
          <table:table-cell table:style-name="Taula17.A1" table:number-columns-spanned="5" office:value-type="string">
            <text:p text:style-name="P142">RegistreAnotacio</text:p>
          </table:table-cell>
          <table:covered-table-cell/>
          <table:covered-table-cell/>
          <table:covered-table-cell/>
          <table:covered-table-cell/>
        </table:table-row>
        <table:table-row table:style-name="TableLine1144334240">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1144335968">
          <table:table-cell table:style-name="Taula17.A3" office:value-type="string">
            <text:p text:style-name="P260">tipusES</text:p>
          </table:table-cell>
          <table:table-cell table:style-name="Taula17.A3" office:value-type="string">
            <text:p text:style-name="P260">Cadena</text:p>
          </table:table-cell>
          <table:table-cell table:style-name="Taula17.A3" office:value-type="string">
            <text:p text:style-name="P261">0..1</text:p>
          </table:table-cell>
          <table:table-cell table:style-name="Taula17.D3" office:value-type="float" office:value="1">
            <text:p text:style-name="P261">1</text:p>
          </table:table-cell>
          <table:table-cell table:style-name="Taula17.E4" office:value-type="string">
            <text:p text:style-name="P260">Tipus d'assentament registral:<text:line-break/>- "E": entrada<text:line-break/>- "S": sortida<text:line-break/>El camp no és obligatori i si no s'informa es prendrà "E" per defecte.</text:p>
          </table:table-cell>
        </table:table-row>
        <table:table-row table:style-name="TableLine1144337696">
          <table:table-cell table:style-name="Taula17.A3" office:value-type="string">
            <text:p text:style-name="P263">numero</text:p>
          </table:table-cell>
          <table:table-cell table:style-name="Taula17.A3" office:value-type="string">
            <text:p text:style-name="P264">Cadena</text:p>
          </table:table-cell>
          <table:table-cell table:style-name="Taula17.D3" office:value-type="float" office:value="1">
            <text:p text:style-name="P265">1</text:p>
          </table:table-cell>
          <table:table-cell table:style-name="Taula17.D3" office:value-type="float" office:value="255">
            <text:p text:style-name="P360"><text:span text:style-name="T242">2</text:span>5<text:span text:style-name="T242">5</text:span></text:p>
          </table:table-cell>
          <table:table-cell table:style-name="Taula17.E4" office:value-type="string">
            <text:p text:style-name="P267">Número identificador de l’assentament registral. És únic.</text:p>
          </table:table-cell>
        </table:table-row>
        <table:table-row table:style-name="TableLine1144338560">
          <table:table-cell table:style-name="Taula17.A3" office:value-type="string">
            <text:p text:style-name="P263">data</text:p>
          </table:table-cell>
          <table:table-cell table:style-name="Taula17.A3" office:value-type="string">
            <text:p text:style-name="P269">Data</text:p>
          </table:table-cell>
          <table:table-cell table:style-name="Taula17.A3" office:value-type="string">
            <text:p text:style-name="P265">1</text:p>
          </table:table-cell>
          <table:table-cell table:style-name="Taula17.A3" office:value-type="string">
            <text:p text:style-name="P271">14</text:p>
          </table:table-cell>
          <table:table-cell table:style-name="Taula17.E5" office:value-type="string">
            <text:p text:style-name="P269">Data de <text:span text:style-name="T99">l’assentament.</text:span> </text:p>
          </table:table-cell>
        </table:table-row>
        <table:table-row table:style-name="TableLine1144339424">
          <table:table-cell table:style-name="Taula17.A3" office:value-type="string">
            <text:p text:style-name="P263"><text:span text:style-name="T100">d</text:span>ataOrigen</text:p>
          </table:table-cell>
          <table:table-cell table:style-name="Taula17.A3" office:value-type="string">
            <text:p text:style-name="P269">Data</text:p>
          </table:table-cell>
          <table:table-cell table:style-name="Taula17.A3" office:value-type="string">
            <text:p text:style-name="P265">0..1</text:p>
          </table:table-cell>
          <table:table-cell table:style-name="Taula17.A3" office:value-type="string">
            <text:p text:style-name="P272">14</text:p>
          </table:table-cell>
          <table:table-cell table:style-name="Taula17.E6" office:value-type="string">
            <text:p text:style-name="P269">Data <text:span text:style-name="T99">origen </text:span>de l’assentament.</text:p>
          </table:table-cell>
        </table:table-row>
        <table:table-row table:style-name="TableLine1144340000">
          <table:table-cell table:style-name="Taula17.A3" office:value-type="string">
            <text:p text:style-name="P274">identificador</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360">1<text:span text:style-name="T244">00</text:span></text:p>
          </table:table-cell>
          <table:table-cell table:style-name="Taula17.E7" office:value-type="string">
            <text:p text:style-name="P267">Codi identificador de l’assentament registral.</text:p>
          </table:table-cell>
        </table:table-row>
        <table:table-row table:style-name="TableLine1144340576">
          <table:table-cell table:style-name="Taula17.A3" office:value-type="string">
            <text:p text:style-name="P274">entitat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2<text:span text:style-name="T242">55</text:span></text:p>
          </table:table-cell>
          <table:table-cell table:style-name="Taula17.E8" office:value-type="string">
            <text:p text:style-name="P267">Codi <text:span text:style-name="T101">DIR3 </text:span>de l’entitat governamental a la que va dirigit l’assentament registral.</text:p>
          </table:table-cell>
        </table:table-row>
        <table:table-row table:style-name="TableLine1144341152">
          <table:table-cell table:style-name="Taula17.A3" office:value-type="string">
            <text:p text:style-name="P274">entitat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3">2<text:span text:style-name="T242">55</text:span></text:p>
          </table:table-cell>
          <table:table-cell table:style-name="Taula17.E9" office:value-type="string">
            <text:p text:style-name="P267"><text:span text:style-name="T101">Descripció DIR3</text:span> de l’entitat governamental a la que va dirigit l’assentament registral.</text:p>
          </table:table-cell>
        </table:table-row>
        <table:table-row table:style-name="TableLine1144341728">
          <table:table-cell table:style-name="Taula17.A3" office:value-type="string">
            <text:p text:style-name="P274">oficin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1</text:p>
          </table:table-cell>
          <table:table-cell table:style-name="Taula17.E10" office:value-type="string">
            <text:p text:style-name="P279">Codi DIR3 de l’oficina on es registre.</text:p>
          </table:table-cell>
        </table:table-row>
        <table:table-row table:style-name="TableLine1144342304">
          <table:table-cell table:style-name="Taula17.A3" office:value-type="string">
            <text:p text:style-name="P274">oficin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text:span text:style-name="T243">3</text:span>00</text:p>
          </table:table-cell>
          <table:table-cell table:style-name="Taula17.E11" office:value-type="string">
            <text:p text:style-name="P269">Denominació DIR3 de l'entitat registral on es registre l'assentament.</text:p>
          </table:table-cell>
        </table:table-row>
        <table:table-row table:style-name="TableLine1144342880">
          <table:table-cell table:style-name="Taula17.A3" office:value-type="string">
            <text:p text:style-name="P274">oficinaOrige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1</text:p>
          </table:table-cell>
          <table:table-cell table:style-name="Taula17.E12" office:value-type="string">
            <text:p text:style-name="P269"/>
          </table:table-cell>
        </table:table-row>
        <table:table-row table:style-name="TableLine1144343456">
          <table:table-cell table:style-name="Taula17.A3" office:value-type="string">
            <text:p text:style-name="P274">oficinaOrigen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3" office:value-type="string">
            <text:p text:style-name="P269"/>
          </table:table-cell>
        </table:table-row>
        <table:table-row table:style-name="TableLine1144344032">
          <table:table-cell table:style-name="Taula17.A3" office:value-type="string">
            <text:p text:style-name="P274">llibre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4</text:p>
          </table:table-cell>
          <table:table-cell table:style-name="Taula17.E14" office:value-type="string">
            <text:p text:style-name="P279">Codi del llibre al qual s’ha fet l’assentament registral rebut.</text:p>
          </table:table-cell>
        </table:table-row>
        <table:table-row table:style-name="TableLine1144344608">
          <table:table-cell table:style-name="Taula17.A3" office:value-type="string">
            <text:p text:style-name="P274">llibr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84">255</text:p>
          </table:table-cell>
          <table:table-cell table:style-name="Taula17.E15" office:value-type="string">
            <text:p text:style-name="P279">Denominació del llibre al qual s’ha fet l’assentament registral rebut.</text:p>
          </table:table-cell>
        </table:table-row>
        <table:table-row table:style-name="TableLine1144345184">
          <table:table-cell table:style-name="Taula17.A3" office:value-type="string">
            <text:p text:style-name="P274">extracte</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81">240</text:p>
          </table:table-cell>
          <table:table-cell table:style-name="Taula17.E16" office:value-type="string">
            <text:p text:style-name="P269">Extracte o resum de l'assentament.</text:p>
          </table:table-cell>
        </table:table-row>
        <table:table-row table:style-name="TableLine1144345760">
          <table:table-cell table:style-name="Taula17.A3" office:value-type="string">
            <text:p text:style-name="P274">assumpteTipusCodi</text:p>
          </table:table-cell>
          <table:table-cell table:style-name="Taula17.A3" office:value-type="string">
            <text:p text:style-name="P275">Cadena</text:p>
          </table:table-cell>
          <table:table-cell table:style-name="Taula17.A3" office:value-type="string">
            <text:p text:style-name="P276"><text:span text:style-name="T119">0..</text:span>1</text:p>
          </table:table-cell>
          <table:table-cell table:style-name="Taula17.A3" office:value-type="string">
            <text:p text:style-name="P272">16</text:p>
          </table:table-cell>
          <table:table-cell table:style-name="Taula17.E17" office:value-type="string">
            <text:p text:style-name="P279">Codi del tipus d’assumpte de l’assentament registral.</text:p>
          </table:table-cell>
        </table:table-row>
        <table:table-row table:style-name="TableLine1144346336">
          <table:table-cell table:style-name="Taula17.A3" office:value-type="string">
            <text:p text:style-name="P274">assumpte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8" office:value-type="string">
            <text:p text:style-name="P279">Denominació del tipus d’assumpte de l’assentament registral.</text:p>
          </table:table-cell>
        </table:table-row>
        <table:table-row table:style-name="TableLine1144346912">
          <table:table-cell table:style-name="Taula17.A3" office:value-type="string">
            <text:p text:style-name="P274">assumpte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19" office:value-type="string">
            <text:p text:style-name="P279">Codi de l’assumpte.</text:p>
          </table:table-cell>
        </table:table-row>
        <table:table-row table:style-name="TableLine1144347488">
          <table:table-cell table:style-name="Taula17.A3" office:value-type="string">
            <text:p text:style-name="P274"><text:span text:style-name="T101">a</text:span>ssumpt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5">55</text:span></text:p>
          </table:table-cell>
          <table:table-cell table:style-name="Taula17.E20" office:value-type="string">
            <text:p text:style-name="P279">Denominació de l’assumpte.</text:p>
          </table:table-cell>
        </table:table-row>
        <table:table-row table:style-name="TableLine1144348064">
          <table:table-cell table:style-name="Taula17.A3" office:value-type="string">
            <text:p text:style-name="P274">referenci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21" office:value-type="string">
            <text:p text:style-name="P269">Referència externa a qualque element de l'assentament.</text:p>
          </table:table-cell>
        </table:table-row>
        <table:table-row table:style-name="TableLine1144348640">
          <table:table-cell table:style-name="Taula17.A3" office:value-type="string">
            <text:p text:style-name="P274">expedien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2" office:value-type="string">
            <text:p text:style-name="P269">Referència al nombre d'expedient de l'assentament.</text:p>
          </table:table-cell>
        </table:table-row>
        <table:table-row table:style-name="TableLine1144349216">
          <table:table-cell table:style-name="Taula17.A3" office:value-type="string">
            <text:p text:style-name="P274">numeroOrigen</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3" office:value-type="string">
            <text:p text:style-name="P269"/>
          </table:table-cell>
        </table:table-row>
        <table:table-row table:style-name="TableLine1144349792">
          <table:table-cell table:style-name="Taula17.A3" office:value-type="string">
            <text:p text:style-name="P274">idiom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text:p>
          </table:table-cell>
          <table:table-cell table:style-name="Taula17.E24" office:value-type="string">
            <text:p text:style-name="P283">Codi d’idioma amb el que s’ha fet l’assentament.</text:p>
          </table:table-cell>
        </table:table-row>
        <text:soft-page-break/>
        <table:table-row table:style-name="TableLine1144350368">
          <table:table-cell table:style-name="Taula17.A3" office:value-type="string">
            <text:p text:style-name="P274">idiom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5" office:value-type="string">
            <text:p text:style-name="P283">Descripció d’idioma amb el que s’ha fet l’assentament.</text:p>
          </table:table-cell>
        </table:table-row>
        <table:table-row table:style-name="TableLine1144350944">
          <table:table-cell table:style-name="Taula17.A3" office:value-type="string">
            <text:p text:style-name="P275">transportTipus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text:span text:style-name="T246">0</text:span></text:p>
          </table:table-cell>
          <table:table-cell table:style-name="Taula17.E26" office:value-type="string">
            <text:p text:style-name="P269">Codi SICRES3 del segment internos – tipo transporte.</text:p>
          </table:table-cell>
        </table:table-row>
        <table:table-row table:style-name="TableLine1144351520">
          <table:table-cell table:style-name="Taula17.A3" office:value-type="string">
            <text:p text:style-name="P275">transport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7" office:value-type="string">
            <text:p text:style-name="P269">Descripció SICRES3 del segment internos – tipo transporte.</text:p>
          </table:table-cell>
        </table:table-row>
        <table:table-row table:style-name="TableLine1144352096">
          <table:table-cell table:style-name="Taula17.A3" office:value-type="string">
            <text:p text:style-name="P275">transpor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8" office:value-type="string">
            <text:p text:style-name="P269">Número del transport.</text:p>
          </table:table-cell>
        </table:table-row>
        <table:table-row table:style-name="TableLine1144352672">
          <table:table-cell table:style-name="Taula17.A3" office:value-type="string">
            <text:p text:style-name="P275">usuari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9" office:value-type="string">
            <text:p text:style-name="P269">Codi de l'usuari que vol realitzar l'operació.</text:p>
          </table:table-cell>
        </table:table-row>
        <table:table-row table:style-name="TableLine1144353248">
          <table:table-cell table:style-name="Taula17.A3" office:value-type="string">
            <text:p text:style-name="P275">usuariNom</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7<text:span text:style-name="T247">67</text:span></text:p>
          </table:table-cell>
          <table:table-cell table:style-name="Taula17.E30" office:value-type="string">
            <text:p text:style-name="P269"><text:span text:style-name="T102">Nom</text:span> de l'usuari que vol realitzar l'operació.</text:p>
          </table:table-cell>
        </table:table-row>
        <table:table-row table:style-name="TableLine1144353824">
          <table:table-cell table:style-name="Taula17.A3" office:value-type="string">
            <text:p text:style-name="P275">usuariContacte</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1" office:value-type="string">
            <text:p text:style-name="P269">Contacte de l'usuari que fa l'assentament. Si és un registre electrònic el responsable del tràmit.</text:p>
          </table:table-cell>
        </table:table-row>
        <table:table-row table:style-name="TableLine1144354400">
          <table:table-cell table:style-name="Taula17.A3" office:value-type="string">
            <text:p text:style-name="P275">aplicacio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9">55</text:span></text:p>
          </table:table-cell>
          <table:table-cell table:style-name="Taula17.E32" office:value-type="string">
            <text:p text:style-name="P283">Codi de l’aplicació que fa l’enviament de l’assentament registral.</text:p>
          </table:table-cell>
        </table:table-row>
        <table:table-row table:style-name="TableLine1144354976">
          <table:table-cell table:style-name="Taula17.A3" office:value-type="string">
            <text:p text:style-name="P275">aplicacioVers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9">55</text:span></text:p>
          </table:table-cell>
          <table:table-cell table:style-name="Taula17.E33" office:value-type="string">
            <text:p text:style-name="P283">Versió de l’aplicació que fa l’enviament de l’assentament registral.</text:p>
          </table:table-cell>
        </table:table-row>
        <table:table-row table:style-name="TableLine1144355552">
          <table:table-cell table:style-name="Taula17.A3" office:value-type="string">
            <text:p text:style-name="P275">documentacioFisica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5">19</text:p>
          </table:table-cell>
          <table:table-cell table:style-name="Taula17.E34" office:value-type="string">
            <text:p text:style-name="P269">Codi SICRES del segment internos – Documentación física y/o soportes.</text:p>
          </table:table-cell>
        </table:table-row>
        <table:table-row table:style-name="TableLine1144356128">
          <table:table-cell table:style-name="Taula17.A3" office:value-type="string">
            <text:p text:style-name="P275">documentacioFisic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35" office:value-type="string">
            <text:p text:style-name="P283">Descripció del segment internos – Documentación física y/o soportes</text:p>
          </table:table-cell>
        </table:table-row>
        <table:table-row table:style-name="TableLine1144356704">
          <table:table-cell table:style-name="Taula17.A3" office:value-type="string">
            <text:p text:style-name="P275">observacions</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50</text:p>
          </table:table-cell>
          <table:table-cell table:style-name="Taula17.E36" office:value-type="string">
            <text:p text:style-name="P283">Observacions de l’assentament.</text:p>
          </table:table-cell>
        </table:table-row>
        <table:table-row table:style-name="TableLine1144357280">
          <table:table-cell table:style-name="Taula17.A3" office:value-type="string">
            <text:p text:style-name="P275">expos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7" office:value-type="string">
            <text:p text:style-name="P283">Exposició de fets.</text:p>
          </table:table-cell>
        </table:table-row>
        <table:table-row table:style-name="TableLine1144357856">
          <table:table-cell table:style-name="Taula17.A3" office:value-type="string">
            <text:p text:style-name="P275">solicit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8" office:value-type="string">
            <text:p text:style-name="P283">Objecte de la sol·licitud si escau.</text:p>
          </table:table-cell>
        </table:table-row>
        <table:table-row table:style-name="TableLine1144358432">
          <table:table-cell table:style-name="Taula17.A3" office:value-type="string">
            <text:p text:style-name="P275">interessats</text:p>
          </table:table-cell>
          <table:table-cell table:style-name="Taula17.A3" office:value-type="string">
            <text:p text:style-name="P275">RegistreInteressat</text:p>
          </table:table-cell>
          <table:table-cell table:style-name="Taula17.A3" office:value-type="string">
            <text:p text:style-name="P265">0..<text:span text:style-name="T103">n</text:span> </text:p>
          </table:table-cell>
          <table:table-cell table:style-name="Taula17.A3" office:value-type="string">
            <text:p text:style-name="P281"/>
          </table:table-cell>
          <table:table-cell table:style-name="Taula17.E39" office:value-type="string">
            <text:p text:style-name="P287">Dades que componen els interessats de l’assentament registral si n’hi ha.</text:p>
          </table:table-cell>
        </table:table-row>
        <table:table-row table:style-name="TableLine1144359008">
          <table:table-cell table:style-name="Taula17.A3" office:value-type="string">
            <text:p text:style-name="P275">annexos</text:p>
          </table:table-cell>
          <table:table-cell table:style-name="Taula17.A3" office:value-type="string">
            <text:p text:style-name="P275">RegistreAnnex</text:p>
          </table:table-cell>
          <table:table-cell table:style-name="Taula17.A3" office:value-type="string">
            <text:p text:style-name="P265">0..<text:span text:style-name="T103">n</text:span> </text:p>
          </table:table-cell>
          <table:table-cell table:style-name="Taula17.A3" office:value-type="string">
            <text:p text:style-name="P281"/>
          </table:table-cell>
          <table:table-cell table:style-name="Taula17.E40" office:value-type="string">
            <text:p text:style-name="P287">Dades que componen els annexos dels assentaments registrals si n’hi ha.</text:p>
          </table:table-cell>
        </table:table-row>
        <table:table-row table:style-name="TableLine1144359584">
          <table:table-cell table:style-name="Taula17.A3" office:value-type="string">
            <text:p text:style-name="P275">justificant</text:p>
          </table:table-cell>
          <table:table-cell table:style-name="Taula17.A3" office:value-type="string">
            <text:p text:style-name="P275">RegistreAnnex</text:p>
          </table:table-cell>
          <table:table-cell table:style-name="Taula17.A3" office:value-type="string">
            <text:p text:style-name="P276">0..1</text:p>
          </table:table-cell>
          <table:table-cell table:style-name="Taula17.A3" office:value-type="string">
            <text:p text:style-name="P289"/>
          </table:table-cell>
          <table:table-cell table:style-name="Taula17.E41" office:value-type="string">
            <text:p text:style-name="P287">Dades que componen el justificant de l’assentament registral si n’hi ha. Es compon de les mateixes dades que un annex.</text:p>
          </table:table-cell>
        </table:table-row>
        <table:table-row table:style-name="TableLine1144360160">
          <table:table-cell table:style-name="Taula17.A3" office:value-type="string">
            <text:p text:style-name="P274"><text:span text:style-name="T116">procediment</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50">4</text:span></text:p>
          </table:table-cell>
          <table:table-cell table:style-name="Taula17.E43" office:value-type="string">
            <text:p text:style-name="P279">Codi <text:span text:style-name="T338">SIA </text:span>de<text:span text:style-name="T338">l</text:span> <text:span text:style-name="T116">procediment</text:span>.</text:p>
          </table:table-cell>
        </table:table-row>
        <table:table-row table:style-name="TableLine1144360736">
          <table:table-cell table:style-name="Taula17.A3" office:value-type="string">
            <text:p text:style-name="P274"><text:span text:style-name="T338">servei</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50">4</text:span></text:p>
          </table:table-cell>
          <table:table-cell table:style-name="Taula17.E43" office:value-type="string">
            <text:p text:style-name="P279">Codi <text:span text:style-name="T338">SIA </text:span>de<text:span text:style-name="T338">l servei</text:span>.</text:p>
          </table:table-cell>
        </table:table-row>
        <table:table-row table:style-name="TableLine1144361024">
          <table:table-cell table:style-name="Taula17.A3" office:value-type="string">
            <text:p text:style-name="P260">presencial</text:p>
          </table:table-cell>
          <table:table-cell table:style-name="Taula17.A3" office:value-type="string">
            <text:p text:style-name="P260">Boolea</text:p>
          </table:table-cell>
          <table:table-cell table:style-name="Taula17.A3" office:value-type="string">
            <text:p text:style-name="P261">0..1</text:p>
          </table:table-cell>
          <table:table-cell table:style-name="Taula17.A3" office:value-type="string">
            <text:p text:style-name="P290"/>
          </table:table-cell>
          <table:table-cell table:style-name="Taula17.E44" office:value-type="string">
            <text:p text:style-name="P260">Paràmetre booleà per indicar si el registre és prensencial</text:p>
          </table:table-cell>
        </table:table-row>
      </table:table>
      <text:p text:style-name="P254"/>
      <text:p text:style-name="P252"/>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1144361600">
          <table:table-cell table:style-name="Taula18.A1" table:number-columns-spanned="5" office:value-type="string">
            <text:p text:style-name="P142">Registre<text:span text:style-name="T107">Annex</text:span> </text:p>
          </table:table-cell>
          <table:covered-table-cell/>
          <table:covered-table-cell/>
          <table:covered-table-cell/>
          <table:covered-table-cell/>
        </table:table-row>
        <table:table-row table:style-name="TableLine1144362464">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1144364192">
          <table:table-cell table:style-name="Taula18.A3" office:value-type="string">
            <text:p text:style-name="P291">tito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00">
            <text:p text:style-name="P292">200</text:p>
          </table:table-cell>
          <table:table-cell table:style-name="Taula18.E3" office:value-type="string">
            <text:p text:style-name="P296">Títol del document</text:p>
          </table:table-cell>
        </table:table-row>
        <text:soft-page-break/>
        <table:table-row table:style-name="TableLine1144365920">
          <table:table-cell table:style-name="Taula18.A3" office:value-type="string">
            <text:p text:style-name="P291">fitxerNom</text:p>
          </table:table-cell>
          <table:table-cell table:style-name="Taula18.A3" office:value-type="string">
            <text:p text:style-name="P294">Cadena</text:p>
          </table:table-cell>
          <table:table-cell table:style-name="Taula18.D3" office:value-type="float" office:value="1">
            <text:p text:style-name="P295">1</text:p>
          </table:table-cell>
          <table:table-cell table:style-name="Taula18.D3" office:value-type="float" office:value="256">
            <text:p text:style-name="P364">2<text:span text:style-name="T251">56</text:span></text:p>
          </table:table-cell>
          <table:table-cell table:style-name="Taula18.E4" office:value-type="string">
            <text:p text:style-name="P296">Nom del fitxer annexat</text:p>
          </table:table-cell>
        </table:table-row>
        <table:table-row table:style-name="TableLine1144367072">
          <table:table-cell table:style-name="Taula18.A3" office:value-type="string">
            <text:p text:style-name="P291">fitxerTamany</text:p>
          </table:table-cell>
          <table:table-cell table:style-name="Taula18.A3" office:value-type="string">
            <text:p text:style-name="P292">Numèric</text:p>
          </table:table-cell>
          <table:table-cell table:style-name="Taula18.A3" office:value-type="string">
            <text:p text:style-name="P295">0..1</text:p>
          </table:table-cell>
          <table:table-cell table:style-name="Taula18.A3" office:value-type="string">
            <text:p text:style-name="P292"/>
          </table:table-cell>
          <table:table-cell table:style-name="Taula18.E5" office:value-type="string">
            <text:p text:style-name="P296">Tamany en <text:span text:style-name="T263">bytes</text:span> del fitxer annexat</text:p>
          </table:table-cell>
        </table:table-row>
        <table:table-row table:style-name="TableLine1144367936">
          <table:table-cell table:style-name="Taula18.A3" office:value-type="string">
            <text:p text:style-name="P291">fitxerTipusMime</text:p>
          </table:table-cell>
          <table:table-cell table:style-name="Taula18.A3" office:value-type="string">
            <text:p text:style-name="P294">Cadena</text:p>
          </table:table-cell>
          <table:table-cell table:style-name="Taula18.A3" office:value-type="string">
            <text:p text:style-name="P295">1</text:p>
          </table:table-cell>
          <table:table-cell table:style-name="Taula18.A3" office:value-type="string">
            <text:p text:style-name="P364">3<text:span text:style-name="T251">0</text:span></text:p>
          </table:table-cell>
          <table:table-cell table:style-name="Taula18.E6" office:value-type="string">
            <text:p text:style-name="P296">Tipus MIME del fitxer annexat</text:p>
          </table:table-cell>
        </table:table-row>
        <table:table-row table:style-name="TableLine1144368512">
          <table:table-cell table:style-name="Taula18.A3" office:value-type="string">
            <text:p text:style-name="P291">fitxerArxiuUuid</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6">
            <text:p text:style-name="P364">2<text:span text:style-name="T252">56</text:span></text:p>
          </table:table-cell>
          <table:table-cell table:style-name="Taula18.E7" office:value-type="string">
            <text:p text:style-name="P296">Uuid de l’arxiu digital si s’escau</text:p>
          </table:table-cell>
        </table:table-row>
        <table:table-row table:style-name="TableLine1144369376">
          <table:table-cell table:style-name="Taula18.A3" office:value-type="string">
            <text:p text:style-name="P291">fitxerContingut</text:p>
          </table:table-cell>
          <table:table-cell table:style-name="Taula18.A3" office:value-type="string">
            <text:p text:style-name="P292">Byte[]</text:p>
          </table:table-cell>
          <table:table-cell table:style-name="Taula18.A3" office:value-type="string">
            <text:p text:style-name="P295">0..1</text:p>
          </table:table-cell>
          <table:table-cell table:style-name="Taula18.A3" office:value-type="string">
            <text:p text:style-name="P292"/>
          </table:table-cell>
          <table:table-cell table:style-name="Taula18.E18" office:value-type="string">
            <text:p text:style-name="P296">Cadena de bytes que compon el contingut del fitxer annexat</text:p>
          </table:table-cell>
        </table:table-row>
        <table:table-row table:style-name="TableLine1144369952">
          <table:table-cell table:style-name="Taula18.A3" office:value-type="string">
            <text:p text:style-name="P291">eniDataCaptura</text:p>
          </table:table-cell>
          <table:table-cell table:style-name="Taula18.A3" office:value-type="string">
            <text:p text:style-name="P292">Data</text:p>
          </table:table-cell>
          <table:table-cell table:style-name="Taula18.A3" office:value-type="string">
            <text:p text:style-name="P295">1</text:p>
          </table:table-cell>
          <table:table-cell table:style-name="Taula18.D3" office:value-type="float" office:value="14">
            <text:p text:style-name="P292">14</text:p>
          </table:table-cell>
          <table:table-cell table:style-name="Taula18.E18" office:value-type="string">
            <text:p text:style-name="P296">Data de captura del document</text:p>
          </table:table-cell>
        </table:table-row>
        <table:table-row table:style-name="TableLine1144370528">
          <table:table-cell table:style-name="Taula18.A3" office:value-type="string">
            <text:p text:style-name="P291">eniOrigen</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10">
            <text:p text:style-name="P295">1<text:span text:style-name="T252">0</text:span></text:p>
          </table:table-cell>
          <table:table-cell table:style-name="Taula18.E18" office:value-type="string">
            <text:p text:style-name="P267">Codi de la metadada origen de la NTI de document electrònic</text:p>
          </table:table-cell>
        </table:table-row>
        <table:table-row table:style-name="TableLine1144371104">
          <table:table-cell table:style-name="Taula18.A3" office:value-type="string">
            <text:p text:style-name="P291">eniEstatElaboracio</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4">
            <text:p text:style-name="P295">4</text:p>
          </table:table-cell>
          <table:table-cell table:style-name="Taula18.E18" office:value-type="string">
            <text:p text:style-name="P267">Codi de la metadada <text:span text:style-name="T104">estat elaboració</text:span> de la NTI de document electrònic.</text:p>
          </table:table-cell>
        </table:table-row>
        <table:table-row table:style-name="TableLine1144371680">
          <table:table-cell table:style-name="Taula18.A3" office:value-type="string">
            <text:p text:style-name="P291">eniTipusDocumenta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55">
            <text:p text:style-name="P365">2<text:span text:style-name="T253">55</text:span></text:p>
          </table:table-cell>
          <table:table-cell table:style-name="Taula18.E18" office:value-type="string">
            <text:p text:style-name="P267">Codi de la metadada tipus documental de la NTI de document electrònic.</text:p>
          </table:table-cell>
        </table:table-row>
        <table:table-row table:style-name="TableLine1144372256">
          <table:table-cell table:style-name="Taula18.A3" office:value-type="string">
            <text:p text:style-name="P291">sicresTipusDocument</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
            <text:p text:style-name="P295">2</text:p>
          </table:table-cell>
          <table:table-cell table:style-name="Taula18.E18" office:value-type="string">
            <text:p text:style-name="P267">Codi SICRES del segment Anexo – tipo de documento</text:p>
          </table:table-cell>
        </table:table-row>
        <table:table-row table:style-name="TableLine1144372832">
          <table:table-cell table:style-name="Taula18.A3" office:value-type="string">
            <text:p text:style-name="P291">localitzacio</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80">
            <text:p text:style-name="P295">80</text:p>
          </table:table-cell>
          <table:table-cell table:style-name="Taula18.E18" office:value-type="string">
            <text:p text:style-name="P267"/>
          </table:table-cell>
        </table:table-row>
        <table:table-row table:style-name="TableLine1144373408">
          <table:table-cell table:style-name="Taula18.A3" office:value-type="string">
            <text:p text:style-name="P298">metaDades</text:p>
          </table:table-cell>
          <table:table-cell table:style-name="Taula18.A3" office:value-type="string">
            <text:p text:style-name="P299">MetaDades</text:p>
          </table:table-cell>
          <table:table-cell table:style-name="Taula18.A3" office:value-type="string">
            <text:p text:style-name="P299">0..1</text:p>
          </table:table-cell>
          <table:table-cell table:style-name="Taula18.D3">
            <text:p text:style-name="P295"/>
          </table:table-cell>
          <table:table-cell table:style-name="Taula18.E18" office:value-type="string">
            <text:p text:style-name="P298">Camp MetaDada amb entrades de tipus codi i valor per metadades addicionals.</text:p>
          </table:table-cell>
        </table:table-row>
        <table:table-row table:style-name="TableLine1144373984">
          <table:table-cell table:style-name="Taula18.A3" office:value-type="string">
            <text:p text:style-name="P291">observacions</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50">
            <text:p text:style-name="P295">50</text:p>
          </table:table-cell>
          <table:table-cell table:style-name="Taula18.E18" office:value-type="string">
            <text:p text:style-name="P300">Observacions a destacar sobre la informació annexada</text:p>
          </table:table-cell>
        </table:table-row>
        <table:table-row table:style-name="TableLine1144374560">
          <table:table-cell table:style-name="Taula18.A3" office:value-type="string">
            <text:p text:style-name="P291">firmes</text:p>
          </table:table-cell>
          <table:table-cell table:style-name="Taula18.A3" office:value-type="string">
            <text:p text:style-name="P292">Firma</text:p>
          </table:table-cell>
          <table:table-cell table:style-name="Taula18.A3" office:value-type="string">
            <text:p text:style-name="P295">0..1</text:p>
          </table:table-cell>
          <table:table-cell table:style-name="Taula18.A3" office:value-type="string">
            <text:p text:style-name="P302"/>
          </table:table-cell>
          <table:table-cell table:style-name="Taula18.E18" office:value-type="string">
            <text:p text:style-name="P300">Llista de firmes del fitxer </text:p>
          </table:table-cell>
        </table:table-row>
        <table:table-row table:style-name="TableLine1144374848">
          <table:table-cell table:style-name="Taula18.A3" office:value-type="string">
            <text:p text:style-name="P291">timestam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100">
            <text:p text:style-name="P295">100</text:p>
          </table:table-cell>
          <table:table-cell table:style-name="Taula18.E18" office:value-type="string">
            <text:p text:style-name="P267">Segell de temps del fitxer annex en base64.</text:p>
          </table:table-cell>
        </table:table-row>
        <table:table-row table:style-name="TableLine1144375424">
          <table:table-cell table:style-name="Taula18.A3" office:value-type="string">
            <text:p text:style-name="P291">validacioOCS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5">
            <text:p text:style-name="P365">2<text:span text:style-name="T254">55</text:span></text:p>
          </table:table-cell>
          <table:table-cell table:style-name="Taula18.E19" office:value-type="string">
            <text:p text:style-name="P267">Validació OCSP del certificat emprat per signar en base64.</text:p>
          </table:table-cell>
        </table:table-row>
      </table:table>
      <text:p text:style-name="P251"/>
      <text:p text:style-name="P254"/>
      <text:p text:style-name="P25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1144376288">
          <table:table-cell table:style-name="Taula19.A1" table:number-columns-spanned="5" office:value-type="string">
            <text:p text:style-name="P142">Registre<text:span text:style-name="T107">Firma</text:span> </text:p>
          </table:table-cell>
          <table:covered-table-cell/>
          <table:covered-table-cell/>
          <table:covered-table-cell/>
          <table:covered-table-cell/>
        </table:table-row>
        <table:table-row table:style-name="TableLine1144377152">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1144378880">
          <table:table-cell table:style-name="Taula19.A3" office:value-type="string">
            <text:p text:style-name="P300">tipus</text:p>
          </table:table-cell>
          <table:table-cell table:style-name="Taula19.A3" office:value-type="string">
            <text:p text:style-name="P294">Cadena</text:p>
          </table:table-cell>
          <table:table-cell table:style-name="Taula19.A3" office:value-type="string">
            <text:p text:style-name="P304">1</text:p>
          </table:table-cell>
          <table:table-cell table:style-name="Taula19.D3" office:value-type="float" office:value="30">
            <text:p text:style-name="P304">30</text:p>
          </table:table-cell>
          <table:table-cell table:style-name="Taula19.E3" office:value-type="string">
            <text:p text:style-name="P307">Codi del tipus de firma</text:p>
          </table:table-cell>
        </table:table-row>
        <table:table-row table:style-name="TableLine1144380608">
          <table:table-cell table:style-name="Taula19.A3" office:value-type="string">
            <text:p text:style-name="P300">perfil</text:p>
          </table:table-cell>
          <table:table-cell table:style-name="Taula19.A3" office:value-type="string">
            <text:p text:style-name="P294">Cadena</text:p>
          </table:table-cell>
          <table:table-cell table:style-name="Taula19.A3" office:value-type="string">
            <text:p text:style-name="P304">0..1</text:p>
          </table:table-cell>
          <table:table-cell table:style-name="Taula19.D3" office:value-type="float" office:value="30">
            <text:p text:style-name="P304">30</text:p>
          </table:table-cell>
          <table:table-cell table:style-name="Taula19.E4" office:value-type="string">
            <text:p text:style-name="P307">Codi de perfil de la firma.</text:p>
          </table:table-cell>
        </table:table-row>
        <table:table-row table:style-name="TableLine1144381472">
          <table:table-cell table:style-name="Taula19.A3" office:value-type="string">
            <text:p text:style-name="P300">fitxerNom</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366">2<text:span text:style-name="T255">56</text:span></text:p>
          </table:table-cell>
          <table:table-cell table:style-name="Taula19.E5" office:value-type="string">
            <text:p text:style-name="P305">Nom del fitxer de firma de l’annex si n’hi ha. <text:span text:style-name="T105">És obligatori si el tipus de firma és TF04.</text:span> </text:p>
          </table:table-cell>
        </table:table-row>
        <table:table-row table:style-name="TableLine1144382336">
          <table:table-cell table:style-name="Taula19.A3" office:value-type="string">
            <text:p text:style-name="P300">contingut</text:p>
          </table:table-cell>
          <table:table-cell table:style-name="Taula19.A3" office:value-type="string">
            <text:p text:style-name="P302">Byte[]</text:p>
          </table:table-cell>
          <table:table-cell table:style-name="Taula19.A3" office:value-type="string">
            <text:p text:style-name="P304">0..1</text:p>
          </table:table-cell>
          <table:table-cell table:style-name="Taula19.A3" office:value-type="string">
            <text:p text:style-name="P304">var</text:p>
          </table:table-cell>
          <table:table-cell table:style-name="Taula19.E6" office:value-type="string">
            <text:p text:style-name="P305">Cadena de bytes que componen el contingut del fitxer de firma annex si n’hi ha. <text:span text:style-name="T105">És obligatori si el tipus de firma és TF04.</text:span> </text:p>
          </table:table-cell>
        </table:table-row>
        <table:table-row table:style-name="TableLine1144382912">
          <table:table-cell table:style-name="Taula19.A3" office:value-type="string">
            <text:p text:style-name="P300">tipusMime</text:p>
          </table:table-cell>
          <table:table-cell table:style-name="Taula19.A3" office:value-type="string">
            <text:p text:style-name="P294">Cadena</text:p>
          </table:table-cell>
          <table:table-cell table:style-name="Taula19.A3" office:value-type="string">
            <text:p text:style-name="P295">0..1</text:p>
          </table:table-cell>
          <table:table-cell table:style-name="Taula19.D3" office:value-type="float" office:value="30">
            <text:p text:style-name="P364">3<text:span text:style-name="T255">0</text:span></text:p>
          </table:table-cell>
          <table:table-cell table:style-name="Taula19.E7" office:value-type="string">
            <text:p text:style-name="P305">Tipus MIME del fitxer de firma annexat si n’hi ha. <text:span text:style-name="T105">És obligatori si el tipus de firma és TF04.</text:span> </text:p>
          </table:table-cell>
        </table:table-row>
        <text:soft-page-break/>
        <table:table-row table:style-name="TableLine1144383776">
          <table:table-cell table:style-name="Taula19.A3" office:value-type="string">
            <text:p text:style-name="P300">csv</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292"/>
          </table:table-cell>
          <table:table-cell table:style-name="Taula19.E8" office:value-type="string">
            <text:p text:style-name="P296">En cas de que el fitxer es signi amb CSV, contingut del CSV en base64.</text:p>
          </table:table-cell>
        </table:table-row>
        <table:table-row table:style-name="TableLine1144384352">
          <table:table-cell table:style-name="Taula19.A3" office:value-type="string">
            <text:p text:style-name="P300">csvRegulacio</text:p>
          </table:table-cell>
          <table:table-cell table:style-name="Taula19.A3" office:value-type="string">
            <text:p text:style-name="P294">Cadena</text:p>
          </table:table-cell>
          <table:table-cell table:style-name="Taula19.A3" office:value-type="string">
            <text:p text:style-name="P295">1</text:p>
          </table:table-cell>
          <table:table-cell table:style-name="Taula19.D3" office:value-type="float" office:value="640">
            <text:p text:style-name="P304">640</text:p>
          </table:table-cell>
          <table:table-cell table:style-name="Taula19.E9" office:value-type="string">
            <text:p text:style-name="P305">Text de regulació CSV.</text:p>
          </table:table-cell>
        </table:table-row>
      </table:table>
      <text:p text:style-name="P251"/>
      <text:p text:style-name="P253"/>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1144385216">
          <table:table-cell table:style-name="Taula20.A1" table:number-columns-spanned="5" office:value-type="string">
            <text:p text:style-name="P142">Registre<text:span text:style-name="T107">Interessat</text:span> </text:p>
          </table:table-cell>
          <table:covered-table-cell/>
          <table:covered-table-cell/>
          <table:covered-table-cell/>
          <table:covered-table-cell/>
        </table:table-row>
        <table:table-row table:style-name="TableLine1144386944">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1144388672">
          <table:table-cell table:style-name="Taula20.A3" office:value-type="string">
            <text:p text:style-name="P300">tipus</text:p>
          </table:table-cell>
          <table:table-cell table:style-name="Taula20.A3" office:value-type="string">
            <text:p text:style-name="P294">Cadena</text:p>
          </table:table-cell>
          <table:table-cell table:style-name="Taula20.A3" office:value-type="string">
            <text:p text:style-name="P304">1</text:p>
          </table:table-cell>
          <table:table-cell table:style-name="Taula20.D3" office:value-type="float" office:value="19">
            <text:p text:style-name="P366">1<text:span text:style-name="T256">9</text:span></text:p>
          </table:table-cell>
          <table:table-cell table:style-name="Taula20.E3" office:value-type="string">
            <text:p text:style-name="P307">Figura jurídica de la persona <text:line-break/>'1' = Administració.</text:p>
            <text:p text:style-name="P307">'2' = Persona física.</text:p>
            <text:p text:style-name="P307">'3' = Persona jurídica.</text:p>
          </table:table-cell>
        </table:table-row>
        <table:table-row table:style-name="TableLine1144390400">
          <table:table-cell table:style-name="Taula20.A3" office:value-type="string">
            <text:p text:style-name="P309">documentTipu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
            <text:p text:style-name="P367">1</text:p>
          </table:table-cell>
          <table:table-cell table:style-name="Taula20.E4" office:value-type="string">
            <text:p text:style-name="P307">Codi SICRES del segment interesado –</text:p>
            <text:p text:style-name="P307">documento de identificacion de interesado tipo.</text:p>
          </table:table-cell>
        </table:table-row>
        <table:table-row table:style-name="TableLine1144391264">
          <table:table-cell table:style-name="Taula20.A3" office:value-type="string">
            <text:p text:style-name="P309">documentNum</text:p>
          </table:table-cell>
          <table:table-cell table:style-name="Taula20.A3" office:value-type="string">
            <text:p text:style-name="P294">Cadena</text:p>
          </table:table-cell>
          <table:table-cell table:style-name="Taula20.A3" office:value-type="string">
            <text:p text:style-name="P314"><text:span text:style-name="T106">0..</text:span>1</text:p>
          </table:table-cell>
          <table:table-cell table:style-name="Taula20.A3" office:value-type="string">
            <text:p text:style-name="P367">1<text:span text:style-name="T257">7</text:span></text:p>
          </table:table-cell>
          <table:table-cell table:style-name="Taula20.E5" office:value-type="string">
            <text:p text:style-name="P312">Número de document identificatiu.</text:p>
          </table:table-cell>
        </table:table-row>
        <table:table-row table:style-name="TableLine1144392128">
          <table:table-cell table:style-name="Taula20.A3" office:value-type="string">
            <text:p text:style-name="P309">nom</text:p>
          </table:table-cell>
          <table:table-cell table:style-name="Taula20.A3" office:value-type="string">
            <text:p text:style-name="P302">Cadena</text:p>
          </table:table-cell>
          <table:table-cell table:style-name="Taula20.A3" office:value-type="string">
            <text:p text:style-name="P311">C</text:p>
          </table:table-cell>
          <table:table-cell table:style-name="Taula20.A3" office:value-type="string">
            <text:p text:style-name="P367">2<text:span text:style-name="T257">55</text:span></text:p>
          </table:table-cell>
          <table:table-cell table:style-name="Taula20.E6" office:value-type="string">
            <text:p text:style-name="P315">Nom de l’interessat. Obligatori si és una persona física.</text:p>
          </table:table-cell>
        </table:table-row>
        <table:table-row table:style-name="TableLine1144392704">
          <table:table-cell table:style-name="Taula20.A3" office:value-type="string">
            <text:p text:style-name="P309">llinatge1</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55">
            <text:p text:style-name="P367">2<text:span text:style-name="T257">55</text:span></text:p>
          </table:table-cell>
          <table:table-cell table:style-name="Taula20.E7" office:value-type="string">
            <text:p text:style-name="P315">Primer llinatge de l’interessat. Obligatori si és una persona física.</text:p>
          </table:table-cell>
        </table:table-row>
        <table:table-row table:style-name="TableLine1144393568">
          <table:table-cell table:style-name="Taula20.A3" office:value-type="string">
            <text:p text:style-name="P309">llinatge2</text:p>
          </table:table-cell>
          <table:table-cell table:style-name="Taula20.A3" office:value-type="string">
            <text:p text:style-name="P294">Cadena</text:p>
          </table:table-cell>
          <table:table-cell table:style-name="Taula20.A3" office:value-type="string">
            <text:p text:style-name="P311">0..1</text:p>
          </table:table-cell>
          <table:table-cell table:style-name="Taula20.A3" office:value-type="string">
            <text:p text:style-name="P367">2<text:span text:style-name="T257">55</text:span></text:p>
          </table:table-cell>
          <table:table-cell table:style-name="Taula20.E8" office:value-type="string">
            <text:p text:style-name="P315">Segon llinatge de l’interessat</text:p>
          </table:table-cell>
        </table:table-row>
        <table:table-row table:style-name="TableLine1144394144">
          <table:table-cell table:style-name="Taula20.A3" office:value-type="string">
            <text:p text:style-name="P309">raoSoci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000">
            <text:p text:style-name="P367">2<text:span text:style-name="T258">000</text:span></text:p>
          </table:table-cell>
          <table:table-cell table:style-name="Taula20.E21" office:value-type="string">
            <text:p text:style-name="P315">Raó social de l’interessat. Obligatori si és una persona jurídica.</text:p>
          </table:table-cell>
        </table:table-row>
        <table:table-row table:style-name="TableLine1144395008">
          <table:table-cell table:style-name="Taula20.A3" office:value-type="string">
            <text:p text:style-name="P309">pais</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9">00</text:span></text:p>
          </table:table-cell>
          <table:table-cell table:style-name="Taula20.E21" office:value-type="string">
            <text:p text:style-name="P305">Codi ISO numèric del País de la persona.</text:p>
          </table:table-cell>
        </table:table-row>
        <table:table-row table:style-name="TableLine1144395584">
          <table:table-cell table:style-name="Taula20.A3" office:value-type="string">
            <text:p text:style-name="P309">provinci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60">00</text:span></text:p>
          </table:table-cell>
          <table:table-cell table:style-name="Taula20.E21" office:value-type="string">
            <text:p text:style-name="P305">Codi INE de la província de la persona.</text:p>
          </table:table-cell>
        </table:table-row>
        <table:table-row table:style-name="TableLine1144396160">
          <table:table-cell table:style-name="Taula20.A3" office:value-type="string">
            <text:p text:style-name="P309">municipi</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11">100</text:p>
          </table:table-cell>
          <table:table-cell table:style-name="Taula20.E21" office:value-type="string">
            <text:p text:style-name="P305">Codi del Municipi de la persona.</text:p>
          </table:table-cell>
        </table:table-row>
        <table:table-row table:style-name="TableLine1144396736">
          <table:table-cell table:style-name="Taula20.A3" office:value-type="string">
            <text:p text:style-name="P309">adres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60">
            <text:p text:style-name="P367">1<text:span text:style-name="T261">60</text:span></text:p>
          </table:table-cell>
          <table:table-cell table:style-name="Taula20.E21" office:value-type="string">
            <text:p text:style-name="P315">Adreça postal de l’interessat.</text:p>
          </table:table-cell>
        </table:table-row>
        <table:table-row table:style-name="TableLine1144397312">
          <table:table-cell table:style-name="Taula20.A3" office:value-type="string">
            <text:p text:style-name="P309">codiPost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5">
            <text:p text:style-name="P367">5</text:p>
          </table:table-cell>
          <table:table-cell table:style-name="Taula20.E21" office:value-type="string">
            <text:p text:style-name="P305"/>
          </table:table-cell>
        </table:table-row>
        <table:table-row table:style-name="TableLine1144397888">
          <table:table-cell table:style-name="Taula20.A3" office:value-type="string">
            <text:p text:style-name="P309">email</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2">60</text:span></text:p>
          </table:table-cell>
          <table:table-cell table:style-name="Taula20.E21" office:value-type="string">
            <text:p text:style-name="P305"/>
          </table:table-cell>
        </table:table-row>
        <table:table-row table:style-name="TableLine1144398464">
          <table:table-cell table:style-name="Taula20.A3" office:value-type="string">
            <text:p text:style-name="P309">telefon</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0">
            <text:p text:style-name="P367">2<text:span text:style-name="T262">0</text:span></text:p>
          </table:table-cell>
          <table:table-cell table:style-name="Taula20.E21" office:value-type="string">
            <text:p text:style-name="P305"/>
          </table:table-cell>
        </table:table-row>
        <table:table-row table:style-name="TableLine1144399040">
          <table:table-cell table:style-name="Taula20.A3" office:value-type="string">
            <text:p text:style-name="P309">emailHabilita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2">60</text:span></text:p>
          </table:table-cell>
          <table:table-cell table:style-name="Taula20.E21" office:value-type="string">
            <text:p text:style-name="P305">En cas de disposar d'adreça electrònica habilitada.</text:p>
          </table:table-cell>
        </table:table-row>
        <table:table-row table:style-name="TableLine1144399616">
          <table:table-cell table:style-name="Taula20.A3" office:value-type="string">
            <text:p text:style-name="P309">canalPreferen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
            <text:p text:style-name="P367">2</text:p>
          </table:table-cell>
          <table:table-cell table:style-name="Taula20.E21" office:value-type="string">
            <text:p text:style-name="P305">Codi SICRES del segment interesado – canal</text:p>
            <text:p text:style-name="P305">preferente de notificación del interesado.</text:p>
          </table:table-cell>
        </table:table-row>
        <table:table-row table:style-name="TableLine1144400192">
          <table:table-cell table:style-name="Taula20.A3" office:value-type="string">
            <text:p text:style-name="P317">codiDire</text:p>
          </table:table-cell>
          <table:table-cell table:style-name="Taula20.A3" office:value-type="string">
            <text:p text:style-name="P318">cadena</text:p>
          </table:table-cell>
          <table:table-cell table:style-name="Taula20.A3" office:value-type="string">
            <text:p text:style-name="P318">0..1</text:p>
          </table:table-cell>
          <table:table-cell table:style-name="Taula20.D3" office:value-type="float" office:value="20">
            <text:p text:style-name="P318">20</text:p>
          </table:table-cell>
          <table:table-cell table:style-name="Taula20.E21" office:value-type="string">
            <text:p text:style-name="P317">Codi DIRe de l'interessat.</text:p>
          </table:table-cell>
        </table:table-row>
        <table:table-row table:style-name="TableLine1144400768">
          <table:table-cell table:style-name="Taula20.A3" office:value-type="string">
            <text:p text:style-name="P309">observacion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2">60</text:span></text:p>
          </table:table-cell>
          <table:table-cell table:style-name="Taula20.E21" office:value-type="string">
            <text:p text:style-name="P305"/>
          </table:table-cell>
        </table:table-row>
        <table:table-row table:style-name="TableLine1144401344">
          <table:table-cell table:style-name="Taula20.A3" office:value-type="string">
            <text:p text:style-name="P309">representan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1" office:value-type="string">
            <text:p text:style-name="P319">Interessat que actua de representant de l’actual.</text:p>
          </table:table-cell>
        </table:table-row>
        <table:table-row table:style-name="TableLine1144401632">
          <table:table-cell table:style-name="Taula20.A3" office:value-type="string">
            <text:p text:style-name="P309">representa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2" office:value-type="string">
            <text:p text:style-name="P319">Interessat que actua com a representat per l’actual.</text:p>
          </table:table-cell>
        </table:table-row>
      </table:table>
      <text:p text:style-name="P251"><text:soft-page-break/></text:p>
      <text:list xml:id="list94024622335338" text:continue-numbering="true" text:style-name="Outline">
        <text:list-item>
          <text:list>
            <text:list-item>
              <text:h text:style-name="P409"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42"><text:span text:style-name="T345">Per donar d'alta anotacions de a Distribucio des del Registre es disposa </text:span>d’un client<text:span text:style-name="T345"> pel WS SOAP i un altre client per l'API REST </text:span><text:s/>que facilit<text:span text:style-name="T345">en</text:span> la seva utilització.</text:p>
      <text:p text:style-name="P242">Per a fer ús <text:span text:style-name="T345">del client WS SOAP per Java 7 </text:span>es pot utilitzar la següent dependència Maven:</text:p>
      <text:p text:style-name="P389"/>
      <text:p text:style-name="P248"><text:span text:style-name="T28"><text:s/><text:tab/> </text:span><text:span text:style-name="T15">&lt;</text:span> <text:span text:style-name="T21">dependency</text:span> <text:span text:style-name="T15">&gt;</text:span> </text:p>
      <text:p text:style-name="P56"><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6"><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6"><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8"><text:span text:style-name="T28"><text:s/><text:tab/> </text:span><text:span text:style-name="T15">&lt;/</text:span> <text:span text:style-name="T21">dependency</text:span> <text:span text:style-name="T15">&gt;</text:span> </text:p>
      <text:p text:style-name="P248"/>
      <text:p text:style-name="P238"/>
      <text:p text:style-name="P242">Per a fer ús <text:span text:style-name="T345">del client </text:span><text:span text:style-name="T342">API REST </text:span><text:span text:style-name="T345">per Java 7 </text:span>es pot utilitzar la següent dependència Maven:</text:p>
      <text:p text:style-name="P391"/>
      <text:p text:style-name="P250"><text:span text:style-name="T28"><text:s/><text:tab/> </text:span><text:span text:style-name="T15">&lt;</text:span> <text:span text:style-name="T21">dependency</text:span> <text:span text:style-name="T15">&gt;</text:span> </text:p>
      <text:p text:style-name="P63"><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63"><text:span text:style-name="T28"><text:s/><text:tab/> <text:tab/> </text:span><text:span text:style-name="T15">&lt;</text:span> <text:span text:style-name="T21">artifactId</text:span> <text:span text:style-name="T15">&gt;</text:span> <text:span text:style-name="T28">distribucio-</text:span><text:span text:style-name="T32">rest</text:span><text:span text:style-name="T28">-client</text:span> <text:span text:style-name="T15">&lt;/</text:span> <text:span text:style-name="T21">artifactId</text:span> <text:span text:style-name="T15">&gt;</text:span> </text:p>
      <text:p text:style-name="P63"><text:span text:style-name="T28"><text:s/><text:tab/> <text:tab/> </text:span><text:span text:style-name="T15">&lt;</text:span> <text:span text:style-name="T21">version</text:span> <text:span text:style-name="T15">&gt;</text:span> <text:span text:style-name="T29">1.0.</text:span><text:span text:style-name="T33">7</text:span> <text:span text:style-name="T15">&lt;/</text:span> <text:span text:style-name="T21">version</text:span> <text:span text:style-name="T15">&gt;</text:span> </text:p>
      <text:p text:style-name="P250"><text:span text:style-name="T28"><text:s/><text:tab/> </text:span><text:span text:style-name="T15">&lt;/</text:span> <text:span text:style-name="T21">dependency</text:span> <text:span text:style-name="T15">&gt;</text:span> </text:p>
      <text:p text:style-name="P250"/>
      <text:p text:style-name="P242"/>
      <text:p text:style-name="P242">Per a utilitzar aquesta dependència és necessari tenir configurat el següent repository:</text:p>
      <text:p text:style-name="P392"/>
      <text:p text:style-name="P246"><text:span text:style-name="T28"><text:s/><text:tab/> </text:span><text:span text:style-name="T15">&lt;</text:span> <text:span text:style-name="T21">repository</text:span> <text:span text:style-name="T15">&gt;</text:span> </text:p>
      <text:p text:style-name="P56"><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6"><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6"><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6"><text:span text:style-name="T28"><text:s/><text:tab/> </text:span><text:span text:style-name="T15">&lt;/</text:span> <text:span text:style-name="T21">repository</text:span> <text:span text:style-name="T15">&gt;</text:span> </text:p>
      <text:p text:style-name="P246"/>
      <text:p text:style-name="P155"/>
      <text:p text:style-name="P238">Aquesta dependència ens dona accés a la classe BustiaV1WsClientFactory que ens permet fer cridades al servei. En el següent fragment de codi es pot veure un exemple de com utilitzar aquesta classe per a fer cridades al servei:</text:p>
      <text:p text:style-name="P109"/>
      <text:p text:style-name="P57"><text:span text:style-name="T55"><text:tab/><text:tab/>BustiaV1 </text:span><text:span text:style-name="T83">bustiaService</text:span><text:span text:style-name="T55"> = BustiaV1WsClientFactory.</text:span><text:span text:style-name="T58">getWsClient</text:span><text:span text:style-name="T55">(</text:span></text:p>
      <text:p text:style-name="P53"><text:span text:style-name="T55"><text:tab/><text:tab/><text:tab/><text:tab/></text:span><text:span text:style-name="T34">"http://DISTRIB_HOST/distribucio/ws/v1/bustia"</text:span><text:span text:style-name="T55">,</text:span></text:p>
      <text:p text:style-name="P53"><text:span text:style-name="T55"><text:tab/><text:tab/><text:tab/><text:tab/></text:span><text:span text:style-name="T34">"USERNAME"</text:span><text:span text:style-name="T55">,</text:span></text:p>
      <text:p text:style-name="P53"><text:span text:style-name="T55"><text:tab/><text:tab/><text:tab/><text:tab/></text:span><text:span text:style-name="T34">"PASSWORD"</text:span><text:span text:style-name="T55">);</text:span></text:p>
      <text:p text:style-name="P53"><text:span text:style-name="T55"><text:tab/><text:tab/>RegistreAnotacio </text:span><text:span text:style-name="T83">registreAnotacio</text:span><text:span text:style-name="T55"> = </text:span><text:span text:style-name="T48">new</text:span><text:span text:style-name="T55"> RegistreAnotacio();</text:span></text:p>
      <text:p text:style-name="P53"><text:soft-page-break/><text:span text:style-name="T55"><text:tab/><text:tab/></text:span><text:span text:style-name="T221">// </text:span><text:span text:style-name="T222">TODO e</text:span><text:span text:style-name="T221">mplenar dades de l'anotació de registre</text:span></text:p>
      <text:p text:style-name="P53"><text:span text:style-name="T55"><text:tab/><text:tab/></text:span><text:span text:style-name="T48">try</text:span><text:span text:style-name="T55"> {</text:span></text:p>
      <text:p text:style-name="P53"><text:span text:style-name="T55"><text:tab/><text:tab/><text:tab/></text:span><text:span text:style-name="T83">bustiaService</text:span><text:span text:style-name="T55">.enviarAnotacioRegistreEntrada(</text:span></text:p>
      <text:p text:style-name="P53"><text:span text:style-name="T55"><text:tab/><text:tab/><text:tab/><text:tab/><text:tab/></text:span><text:span text:style-name="T78">ENTITAT_CODI</text:span><text:span text:style-name="T55">,</text:span></text:p>
      <text:p text:style-name="P53"><text:span text:style-name="T55"><text:tab/><text:tab/><text:tab/><text:tab/><text:tab/></text:span><text:span text:style-name="T78">DIR3_CODI</text:span><text:span text:style-name="T55">,</text:span></text:p>
      <text:p text:style-name="P53"><text:span text:style-name="T55"><text:tab/><text:tab/><text:tab/><text:tab/><text:tab/></text:span><text:span text:style-name="T83">registreAnotacio</text:span><text:span text:style-name="T55">);</text:span></text:p>
      <text:p text:style-name="P53"><text:span text:style-name="T55"><text:tab/><text:tab/>} </text:span><text:span text:style-name="T48">catch</text:span><text:span text:style-name="T55"> (Exception </text:span><text:span text:style-name="T83">ex</text:span><text:span text:style-name="T55">) {</text:span></text:p>
      <text:p text:style-name="P53"><text:span text:style-name="T55"><text:tab/><text:tab/><text:tab/></text:span><text:span text:style-name="T221">// </text:span><text:span text:style-name="T222">TODO tractar e</text:span><text:span text:style-name="T221">rrors en l'enviament</text:span></text:p>
      <text:p text:style-name="P53"><text:span text:style-name="T55"><text:tab/><text:tab/><text:tab/></text:span><text:span text:style-name="T83">ex</text:span><text:span text:style-name="T55">.printStackTrace();</text:span></text:p>
      <text:p text:style-name="P112"><text:tab/><text:tab/>}</text:p>
      <text:p text:style-name="P112"/>
      <text:p text:style-name="P47"/>
      <text:list xml:id="list94023967961756" text:continue-numbering="true" text:style-name="Outline">
        <text:list-item>
          <text:h text:style-name="P402" text:outline-level="1"><text:bookmark-start text:name="__RefHeading___Toc52041_2521683781"/><text:bookmark-start text:name="__RefNumPara__52044_2521683781"/><text:span text:style-name="T325">Servei</text:span> d<text:span text:style-name="T325">e</text:span> backoffice de distribució<text:bookmark-end text:name="__RefHeading___Toc52041_2521683781"/><text:bookmark-end text:name="__RefNumPara__52044_2521683781"/></text:h>
        </text:list-item>
      </text:list>
      <text:p text:style-name="P234">Els backoffices son els encarregats de processar les anotacions de registre <text:span text:style-name="T323">que son notificades des de</text:span> <text:span text:style-name="T323">l</text:span>’aplicació <text:span text:style-name="T322">DISTRIBUCIÓ.</text:span></text:p>
      <text:p text:style-name="P386">Aquesta notificació es du a terme mitjançant una cridada un servei que han d’implementar de forma obligatòria tots els backoffices. <text:span text:style-name="T322">La interfície d’aquest servei és la següent:</text:span></text:p>
      <text:p text:style-name="P161"><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56">Aquest servei es pot implementar com un servei web REST o com un servei web SOAP.</text:p>
      <text:p text:style-name="P256">Per a la implementació REST s’ha d’habilitar una URL que rebi peticions POST a on s’informi d’una llista de les anotacions pendents. Aquesta llista es rebrà en format JSON i tendrà una estructura anàloga a la del següent exemple:</text:p>
      <text:p text:style-name="P98"/>
      <text:p text:style-name="P98">[ {</text:p>
      <text:p text:style-name="P58"><text:span text:style-name="T274">"ide</text:span><text:span text:style-name="T275">n</text:span><text:span text:style-name="T274">tificador" </text:span><text:span text:style-name="T75">: </text:span><text:span text:style-name="T276">"GOIBE1111/2022"</text:span><text:span text:style-name="T75">,</text:span></text:p>
      <text:p text:style-name="P58"><text:span text:style-name="T274">"clauAcces" </text:span><text:span text:style-name="T75">: </text:span><text:span text:style-name="T276">"hv/8hXYRSFYtVEjZyDfEE8KdOIiX3N1UEXGiltl3rbw="</text:span></text:p>
      <text:p text:style-name="P98">}, {</text:p>
      <text:p text:style-name="P58"><text:span text:style-name="T274">"ide</text:span><text:span text:style-name="T275">n</text:span><text:span text:style-name="T274">tificador" </text:span><text:span text:style-name="T75">: </text:span><text:span text:style-name="T276">"GOIBE2222/2022"</text:span><text:span text:style-name="T75">,</text:span></text:p>
      <text:p text:style-name="P255"><text:span text:style-name="T274">"clauAcces" </text:span><text:span text:style-name="T75">: </text:span><text:span text:style-name="T276">"AzRwN0QQV70RR4IxXFZsPj2FYJ2VA7LDiKap19MmA/U="</text:span></text:p>
      <text:p text:style-name="P255"><text:span text:style-name="T276">}</text:span><text:span text:style-name="T118"> ]</text:span></text:p>
      <text:p text:style-name="P255"/>
      <text:p text:style-name="P160"/>
      <text:p text:style-name="P256">Per a <text:s/>la implementació SOAP s’ha de crear un servei que compleixi amb l’estructura descrita a l’<text:span text:style-name="T324"><text:bookmark-ref text:reference-format="text" text:ref-name="__RefHeading___Toc117515_1680181998">Annex I: WSDL del backoffice </text:bookmark-ref></text:span><text:span text:style-name="T324">.</text:span></text:p>
      <text:p text:style-name="P20">En qualsevol d’aquestes implementacions l’autenticació haurà de ser de tipus HTTP Basic.</text:p>
      <text:p text:style-name="P20"/>
      <text:p text:style-name="P257"><text:span text:style-name="T12">Important:</text:span><text:span text:style-name="T11"> Les implementacions REST han de permetre una cridada amb un JSON que representa una llista buida («[]») sense produir cap error.</text:span></text:p>
      <text:p text:style-name="P20"/>
      <text:list xml:id="list94025072659399" text:continue-numbering="true" text:style-name="Outline">
        <text:list-item>
          <text:h text:style-name="P403"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45">Aquest servei permet <text:span text:style-name="T319">als backoffices consultar la informació d’una anotació de registre i canviar el seu estat.</text:span></text:p>
      <text:p text:style-name="P244"><draw:frame draw:style-name="fr3" draw:name="Marc1" text:anchor-type="as-char" svg:width="10.109cm" draw:z-index="73"><draw:text-box fo:min-height="8.481cm"><text:p text:style-name="P230"><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1"><text:sequence text:ref-name="refFig.1" text:name="Fig." text:formula="ooow:Fig.+1" style:num-format="1">2</text:sequence></text:span>: <text:s/><text:span text:style-name="T311">Casos d'ús </text:span><text:span text:style-name="T332">de gestió </text:span><text:span text:style-name="T313">d'anotacions a </text:span><text:span text:style-name="T311">DISTRIBUCIÓ</text:span></text:p></draw:text-box></draw:frame></text:p>
      <text:list xml:id="list94024917921761" text:continue-numbering="true" text:style-name="Outline">
        <text:list-item>
          <text:list>
            <text:list-item>
              <text:h text:style-name="P414" text:outline-level="2"><text:bookmark-start text:name="__RefHeading___Toc227357_390838441"/><text:bookmark-start text:name="Còpia de __RefHeading___Toc16770_2313926538 1"/><text:span text:style-name="T319">Diagram</text:span><text:span text:style-name="T321">a</text:span><text:span text:style-name="T319"> d</text:span><text:span text:style-name="T320">e seqüència</text:span><text:bookmark-end text:name="__RefHeading___Toc227357_390838441"/><text:bookmark-end text:name="Còpia de __RefHeading___Toc16770_2313926538 1"/></text:h>
            </text:list-item>
          </text:list>
        </text:list-item>
      </text:list>
      <text:p text:style-name="P224">El <text:span text:style-name="T113">detall</text:span> de la comunicació <text:span text:style-name="T113">entre</text:span> l’aplicació DISTRIBUCIÓ <text:span text:style-name="T333">i</text:span><text:span text:style-name="T113"> el backoffice </text:span><text:span text:style-name="T333">per a la gestió de les anotacions </text:span><text:span text:style-name="T113">es pot veure en el següent diagrama.</text:span></text:p>
      <text:p text:style-name="P223"><draw:custom-shape text:anchor-type="paragraph" draw:z-index="61" draw:name="Forma 6" draw:style-name="gr1" draw:text-style-name="P464" svg:width="0.556cm" svg:height="0.454cm" svg:x="8.474cm" svg:y="2.879cm"><text:p text:style-name="P463"><text:span text:style-name="T34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64" svg:width="0.556cm" svg:height="0.454cm" svg:x="7.601cm" svg:y="3.487cm"><text:p text:style-name="P463"><text:span text:style-name="T34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64" svg:width="0.556cm" svg:height="0.454cm" svg:x="1.251cm" svg:y="1.873cm"><text:p text:style-name="P463"><text:span text:style-name="T34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64" svg:width="0.556cm" svg:height="0.454cm" svg:x="7.442cm" svg:y="5.048cm"><text:p text:style-name="P463"><text:span text:style-name="T34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64" svg:width="0.556cm" svg:height="0.454cm" svg:x="7.468cm" svg:y="7.165cm"><text:p text:style-name="P463"><text:span text:style-name="T34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2586741628" text:style-name="L3">
        <text:list-item>
          <text:p text:style-name="P450">L’aplicació de distribució comunica al backoffice <text:span text:style-name="T115">l'existència</text:span> d’anotacions de registre pendents de processar mitjançant el mètode comunicarAnotacionsPendents del servei DistribucioBackoffice.</text:p>
        </text:list-item>
        <text:list-item>
          <text:p text:style-name="P451">El backoffice <text:span text:style-name="T115">ha de </text:span>guardar en una coa la llista d’anotacions a processar i finalitzar la comunicació.</text:p>
        </text:list-item>
        <text:list-item>
          <text:p text:style-name="P453">El backoffice <text:span text:style-name="T115">ha de processar les anotacions pendents que se li han comunicat.</text:span></text:p>
        </text:list-item>
      </text:list>
      <text:p text:style-name="P220">A mesura que el backoffice vagi processant les anotacions de registre, es requer<text:span text:style-name="T115">eix</text:span> la següent comunicació amb l’aplicació de DISTRIBUCIO:</text:p>
      <text:list xml:id="list94023933493504" text:continue-numbering="true" text:style-name="L3">
        <text:list-item>
          <text:p text:style-name="P451">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1"><text:bookmark-start text:name="__RefNumPara__52573_2521683781"/>Una vegada processada l’anotació, el backoffice haurà de comunicar a l’aplicació de DISTRIBUCIO l’estat d’aquest processament mitjançant el mètode canviEstat<text:span text:style-name="T114"> del servei DistribucioBackoffice.</text:span> Els possibles estats son:<text:bookmark-end text:name="__RefNumPara__52573_2521683781"/></text:p>
        </text:list-item>
      </text:list>
      <text:list xml:id="list543985910" text:style-name="L4">
        <text:list-item>
          <text:list>
            <text:list-item>
              <text:p text:style-name="P454">REBUDA: S'ha rebut la petició al backoffice.</text:p>
            </text:list-item>
            <text:list-item>
              <text:p text:style-name="P452">PENDENT<text:span text:style-name="T314">: L'anotació s'ha rebut i consultat correctament i està pendent de processament.</text:span></text:p>
            </text:list-item>
            <text:list-item>
              <text:p text:style-name="P454">REBUTJADA: Es comunica l'estat i el motiu a DISTRIBUCIO conforme l'anotació es rebutja des del backoffice i per a que quedi com a rebutjada i pendent de processament a DISTRIBUCIO</text:p>
            </text:list-item>
            <text:list-item>
              <text:p text:style-name="P452"><text:soft-page-break/>PROCESSADA<text:span text:style-name="T314">: L'anotació s'ha processat correctament al backoffice.</text:span></text:p>
            </text:list-item>
            <text:list-item>
              <text:p text:style-name="P452">ERROR<text:span text:style-name="T314">: El processament de l'anotació o la consulta ha resultat amb error i es comunica a DISTRIBUCIO per a que reintenti l'enviament o la marqui amb un error.</text:span></text:p>
            </text:list-item>
          </text:list>
        </text:list-item>
      </text:list>
      <text:p text:style-name="P226">Quan el backoffice rep la comunicació d'anotació pendent pot marcar l'estat <text:span text:style-name="T315">«</text:span>REBUDA<text:span text:style-name="T315">»</text:span> conforme ha rebut la petició i si no processa immediatament l'anotació pot posar que està pendent de processament amb l'estat <text:span text:style-name="T315">«</text:span>PENDENT<text:span text:style-name="T315">»</text:span>.</text:p>
      <text:p text:style-name="P220">Si el backoffice ha processat correctament l’anotació de registre l’estat indicat haurà de ser «PROCESSADA». En canvi, si l’anotació ha produït algun tipus d’error de processament, l’estat indicat haurà de ser «ERROR».<text:span text:style-name="T314"> També hi ha la possibilitat de rebutjar les anotacions amb l'estat </text:span>«<text:span text:style-name="T314">REBUTJADA</text:span>»<text:span text:style-name="T314">.</text:span></text:p>
      <text:list xml:id="list94024854830493" text:continue-list="list94024917921761" text:style-name="Outline">
        <text:list-item>
          <text:list>
            <text:list-item>
              <text:h text:style-name="P410"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30">de registre</text:span><text:bookmark-end text:name="__RefHeading___Toc53751_2521683781"/></text:h>
                </text:list-item>
              </text:list>
            </text:list-item>
          </text:list>
        </text:list-item>
      </text:list>
      <text:p text:style-name="P197"/>
      <text:p text:style-name="P203">Aquest mètode és el que permet <text:span text:style-name="T285">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4">Els backoffices d’integració hauran de sol·licitar la creació d’un usuari d’integració específic que disposi del rol <text:span text:style-name="Strong_20_Emphasis"><text:span text:style-name="T126">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7">Consulta d’una anotació de registre</text:p>
          </table:table-cell>
          <table:covered-table-cell/>
        </table:table-row>
        <table:table-row table:style-name="TableLine930168752">
          <table:table-cell table:style-name="Taula14.A8" office:value-type="string">
            <text:p text:style-name="P37">Mètode</text:p>
          </table:table-cell>
          <table:table-cell table:style-name="Taula14.B8" office:value-type="string">
            <text:p text:style-name="P212">GET</text:p>
          </table:table-cell>
        </table:table-row>
        <table:table-row table:style-name="TableLine930169616">
          <table:table-cell table:style-name="Taula14.A8" office:value-type="string">
            <text:p text:style-name="P31">URL</text:p>
          </table:table-cell>
          <table:table-cell table:style-name="Taula14.B8" office:value-type="string">
            <text:p text:style-name="P198">http<text:span text:style-name="T318">s</text:span>://<text:span text:style-name="T318">DISTRIB_HOST/distribucioapi/interna</text:span>/<text:span text:style-name="T285">backoffice</text:span>/<text:span text:style-name="T285">consulta</text:span></text:p>
          </table:table-cell>
        </table:table-row>
        <table:table-row table:style-name="TableLine930169904">
          <table:table-cell table:style-name="Taula14.A8" office:value-type="string">
            <text:p text:style-name="P30">Descripció</text:p>
          </table:table-cell>
          <table:table-cell table:style-name="Taula14.B8" office:value-type="string">
            <text:p text:style-name="P45"><text:span text:style-name="T285">Consulta les dades d'una anotació i dels seus interessats i annexos a partir de l'identificador i clau comunicada per DISTRIBUCIO</text:span>.<text:span text:style-name="T286"> </text:span></text:p>
          </table:table-cell>
        </table:table-row>
        <table:table-row table:style-name="TableLine930170192">
          <table:table-cell table:style-name="Taula14.A8" office:value-type="string">
            <text:p text:style-name="P37">Autenticació</text:p>
          </table:table-cell>
          <table:table-cell table:style-name="Taula14.B8" office:value-type="string">
            <text:p text:style-name="P375">HTTP Basic</text:p>
          </table:table-cell>
        </table:table-row>
        <table:table-row table:style-name="TableLine930170480">
          <table:table-cell table:style-name="Taula14.A8" office:value-type="string">
            <text:p text:style-name="P37">Rols requerits</text:p>
          </table:table-cell>
          <table:table-cell table:style-name="Taula14.B8" office:value-type="string">
            <text:p text:style-name="P375">DIS_BACKWS</text:p>
          </table:table-cell>
        </table:table-row>
        <table:table-row table:style-name="TableLine930170768">
          <table:table-cell table:style-name="Taula14.A8" office:value-type="string">
            <text:p text:style-name="P30">Paràmetres</text:p>
          </table:table-cell>
          <table:table-cell table:style-name="Taula14.B8" office:value-type="string">
            <text:list xml:id="list3848000515" text:style-name="L5">
              <text:list-item>
                <text:p text:style-name="P431"><text:span text:style-name="T46">identificador</text:span><text:span text:style-name="T279">:</text:span><text:span text:style-name="T286"> És l'identificador de l'anotació comunicada per DISTRIBUCIO. </text:span><text:span text:style-name="T305">Sol coincidir amb </text:span><text:span text:style-name="T286">el número de registre de l'anotació.</text:span></text:p>
              </text:list-item>
              <text:list-item>
                <text:p text:style-name="P431"><text:span text:style-name="T45">clauAcces</text:span><text:span text:style-name="T279">: </text:span><text:span text:style-name="T286">És una clau proporcionada per DISTRIBUCIO en el moment de notificar al backoffice l'anotació de registre que s'ha d'emprar per consultar o canviar l'estat </text:span><text:span text:style-name="T305">de</text:span><text:span text:style-name="T286"> l'anotació.</text:span></text:p>
              </text:list-item>
            </text:list>
            <text:p text:style-name="P45"><text:span text:style-name="T300">Com que és una petició de consulta els paràmetres s'informen en la </text:span><text:span text:style-name="T305">pròpia </text:span><text:span text:style-name="T300">URL. </text:span><text:soft-page-break/><text:span text:style-name="T286">Un exemple de petició seria el següent. </text:span><text:span text:style-name="T287">Pels paràmetres identificador: </text:span><text:span text:style-name="T289">"GOIBE715-DEV/2023"</text:span><text:span text:style-name="T287"> i clau d'accés </text:span><text:span text:style-name="T289">"JRwLmCaMES6JKAAnzhd5K9Qi4ppjudiLwd+2b5LNsVo="</text:span><text:span text:style-name="T287"> la petició amb els paràmetres codif</text:span><text:span text:style-name="T305">i</text:span><text:span text:style-name="T287">cats </text:span><text:span text:style-name="T305">és</text:span><text:span text:style-name="T287">:</text:span></text:p>
            <text:p text:style-name="P207">GET https://<text:span text:style-name="T305">se</text:span>.caib.es/distribucioapi/interna/backoffice/consulta?ide<text:span text:style-name="T346">n</text:span>tificador=GOIBE715-DEV%2F2023&amp;clauAcces=JRwLmCaMES6JKAAnzhd5K9Qi4ppjudiLwd%2B2b5LNsVo%3D</text:p>
          </table:table-cell>
        </table:table-row>
        <table:table-row table:style-name="TableLine930171056">
          <table:table-cell table:style-name="Taula14.A8" office:value-type="string">
            <text:p text:style-name="P30">Resultat</text:p>
          </table:table-cell>
          <table:table-cell table:style-name="Taula14.B8" office:value-type="string">
            <text:list xml:id="list225953499" text:style-name="L6">
              <text:list-item>
                <text:p text:style-name="P434">HTTP 200 i el JSON del detall de l'anotació com a cos de la resposta.</text:p>
              </text:list-item>
              <text:list-item>
                <text:p text:style-name="P436">HTTP <text:span text:style-name="T293">401</text:span> <text:span text:style-name="T293">si l'usuari no té el rol DIS_BACKWS amb un missatge d'error com a cos de la resposta.</text:span></text:p>
              </text:list-item>
              <text:list-item>
                <text:p text:style-name="P439">HTTP 500 si es produe<text:span text:style-name="T305">i</text:span>x un error intern no controlat <text:span text:style-name="T293">consultant l'anotació</text:span>.</text:p>
              </text:list-item>
            </text:list>
            <text:p text:style-name="P213"><text:s/>Un exemple de JSON de resposta, de forma abreujada, seria el següent:</text:p>
            <text:p text:style-name="P213"/>
            <text:p text:style-name="P101">{</text:p>
            <text:p text:style-name="P106">    <text:span text:style-name="T296">"identificador"</text:span><text:span text:style-name="T294">: </text:span><text:span text:style-name="T288">"GOIBE715-DEV/2023"</text:span><text:span text:style-name="T294">,</text:span></text:p>
            <text:p text:style-name="P108">    <text:span text:style-name="T296">"procedimentCodi"</text:span><text:span text:style-name="T294">: </text:span><text:span text:style-name="T288">"703381"</text:span><text:span text:style-name="T294">,</text:span></text:p>
            <text:p text:style-name="P108">    <text:span text:style-name="T296">"</text:span><text:span text:style-name="T298">servei</text:span><text:span text:style-name="T296">Codi"</text:span><text:span text:style-name="T294">: </text:span><text:span text:style-name="T291">null</text:span><text:span text:style-name="T294">,</text:span></text:p>
            <text:p text:style-name="P108">    <text:span text:style-name="T296">"extracte"</text:span><text:span text:style-name="T294">: </text:span><text:span text:style-name="T288">"Solicitud de equivalencia - Equivalencia con los títulos de Graduado en Educación Secundaria Obligatoria y de Bachiller"</text:span><text:span text:style-name="T294">,</text:span></text:p>
            <text:p text:style-name="P106">    <text:span text:style-name="T296">"data"</text:span><text:span text:style-name="T294">: </text:span><text:span text:style-name="T299">1683181017253</text:span><text:span text:style-name="T294">,</text:span></text:p>
            <text:p text:style-name="P102"><text:s text:c="2"/>...</text:p>
            <text:p text:style-name="P106">    <text:span text:style-name="T296">"interessats"</text:span><text:span text:style-name="T294">: [</text:span></text:p>
            <text:p text:style-name="P106">        <text:span text:style-name="T294">{</text:span></text:p>
            <text:p text:style-name="P106">            <text:span text:style-name="T296">"tipus"</text:span><text:span text:style-name="T294">: </text:span><text:span text:style-name="T288">"PERSONA_FISICA"</text:span><text:span text:style-name="T294">,</text:span></text:p>
            <text:p text:style-name="P106">            <text:span text:style-name="T296">"documentTipus"</text:span><text:span text:style-name="T294">: </text:span><text:span text:style-name="T288">"NIF"</text:span><text:span text:style-name="T294">,</text:span></text:p>
            <text:p text:style-name="P106">            <text:span text:style-name="T293">...</text:span></text:p>
            <text:p text:style-name="P106">        <text:span text:style-name="T294">}</text:span></text:p>
            <text:p text:style-name="P106">    <text:span text:style-name="T294">],</text:span></text:p>
            <text:p text:style-name="P106">    <text:span text:style-name="T296">"annexos"</text:span><text:span text:style-name="T294">: [</text:span></text:p>
            <text:p text:style-name="P106">        <text:span text:style-name="T294">{</text:span></text:p>
            <text:p text:style-name="P106">            <text:span text:style-name="T296">"titol"</text:span><text:span text:style-name="T294">: </text:span><text:span text:style-name="T288">"Formulario de identificación del firmante"</text:span><text:span text:style-name="T294">,</text:span></text:p>
            <text:p text:style-name="P106">            <text:span text:style-name="T296">"nom"</text:span><text:span text:style-name="T294">: </text:span><text:span text:style-name="T288">"FORM-1-1.pdf"</text:span><text:span text:style-name="T294">,</text:span></text:p>
            <text:p text:style-name="P106">            <text:span text:style-name="T296">"contingut"</text:span><text:span text:style-name="T294">: </text:span><text:span text:style-name="T292">null</text:span><text:span text:style-name="T294">,</text:span></text:p>
            <text:p text:style-name="P106">            <text:span text:style-name="T296">"uuid"</text:span><text:span text:style-name="T294">: </text:span><text:span text:style-name="T288">"0276698a-d0f9-44f7-84be-841a98881e4a"</text:span><text:span text:style-name="T294">,</text:span></text:p>
            <text:p text:style-name="P106">            <text:span text:style-name="T295">...</text:span></text:p>
            <text:p text:style-name="P106">            <text:span text:style-name="T296">"documentValid"</text:span><text:span text:style-name="T294">: </text:span><text:span text:style-name="T292">true</text:span><text:span text:style-name="T294">,</text:span></text:p>
            <text:p text:style-name="P106">            <text:span text:style-name="T296">"documentError"</text:span><text:span text:style-name="T294">: </text:span><text:span text:style-name="T292">null</text:span><text:span text:style-name="T294">,</text:span></text:p>
            <text:p text:style-name="P106">            <text:span text:style-name="T296">"estat"</text:span><text:span text:style-name="T294">: </text:span><text:span text:style-name="T288">"DEFINITIU"</text:span></text:p>
            <text:p text:style-name="P106">        <text:span text:style-name="T294">}</text:span></text:p>
            <text:p text:style-name="P106">    <text:span text:style-name="T294">],</text:span></text:p>
            <text:p text:style-name="P106">    <text:span text:style-name="T296">"justificantFitxerArxiuUuid"</text:span><text:span text:style-name="T294">: </text:span><text:span text:style-name="T288">"0cd70aa5-77aa-4d2e-8032-d84cad38669b"</text:span><text:span text:style-name="T294">,</text:span></text:p>
            <text:p text:style-name="P106">    <text:span text:style-name="T296">"destiCodi"</text:span><text:span text:style-name="T294">: </text:span><text:span text:style-name="T288">"A04013522"</text:span><text:span text:style-name="T294">,</text:span></text:p>
            <text:p text:style-name="P106">    <text:span text:style-name="T296">"destiDescripcio"</text:span><text:span text:style-name="T294">: </text:span><text:span text:style-name="T288">"Direcció General de Planificació, Ordenació i Centres"</text:span></text:p>
            <text:p text:style-name="P107">    <text:span text:style-name="T296">"</text:span><text:span text:style-name="T297">tramitCodi</text:span><text:span text:style-name="T296">"</text:span><text:span text:style-name="T294">: </text:span><text:span text:style-name="T288">"</text:span><text:span text:style-name="T290">1234</text:span><text:span text:style-name="T288">"</text:span></text:p>
            <text:p text:style-name="P107"><text:soft-page-break/>    <text:span text:style-name="T296">"</text:span><text:span text:style-name="T297">tramitNom</text:span><text:span text:style-name="T296">"</text:span><text:span text:style-name="T294">: </text:span><text:span text:style-name="T288">"</text:span><text:span text:style-name="T290">Nom del tràmit</text:span><text:span text:style-name="T288">"</text:span></text:p>
            <text:p text:style-name="P103">}</text:p>
            <text:p text:style-name="P206"/>
          </table:table-cell>
        </table:table-row>
      </table:table>
      <text:p text:style-name="P202"/>
      <text:p text:style-name="P214">El JSON de la resposta conté les dades de l'anotació, els interessats i dels annexos. És el mapeig a JSON de les classes descrites en el punt anterior del WS d'integració. </text:p>
      <text:list xml:id="list94025273037694" text:continue-list="list94024854830493"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2"><text:span text:style-name="T300">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7">Canvi d'estat d'una anotació</text:p>
          </table:table-cell>
          <table:covered-table-cell/>
        </table:table-row>
        <table:table-row table:style-name="TableLine930172496">
          <table:table-cell table:style-name="Taula15.A2" office:value-type="string">
            <text:p text:style-name="P30">URL</text:p>
          </table:table-cell>
          <table:table-cell table:style-name="Taula15.B2" office:value-type="string">
            <text:p text:style-name="P198">http<text:span text:style-name="T318">s</text:span>://<text:span text:style-name="T318">DISTRIB_HOST/distribucioapi/interna</text:span>/<text:span text:style-name="T285">backoffice</text:span>/<text:span text:style-name="T300">canviEstat</text:span></text:p>
          </table:table-cell>
        </table:table-row>
        <table:table-row table:style-name="TableLine930173360">
          <table:table-cell table:style-name="Taula15.A7" office:value-type="string">
            <text:p text:style-name="P39">Mètode</text:p>
          </table:table-cell>
          <table:table-cell table:style-name="Taula15.B7" office:value-type="string">
            <text:p text:style-name="P215">POST</text:p>
          </table:table-cell>
        </table:table-row>
        <table:table-row table:style-name="TableLine930174224">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86"> </text:span></text:p>
          </table:table-cell>
        </table:table-row>
        <table:table-row table:style-name="TableLine930174512">
          <table:table-cell table:style-name="Taula15.A7" office:value-type="string">
            <text:p text:style-name="P37">Autenticació</text:p>
          </table:table-cell>
          <table:table-cell table:style-name="Taula15.B7" office:value-type="string">
            <text:p text:style-name="P375">HTTP Basic</text:p>
          </table:table-cell>
        </table:table-row>
        <table:table-row table:style-name="TableLine930174800">
          <table:table-cell table:style-name="Taula15.A7" office:value-type="string">
            <text:p text:style-name="P37">Rols requerits</text:p>
          </table:table-cell>
          <table:table-cell table:style-name="Taula15.B7" office:value-type="string">
            <text:p text:style-name="P375">DIS_BACKWS</text:p>
          </table:table-cell>
        </table:table-row>
        <table:table-row table:style-name="TableLine930175088">
          <table:table-cell table:style-name="Taula15.A7" office:value-type="string">
            <text:p text:style-name="P30">Paràmetres</text:p>
          </table:table-cell>
          <table:table-cell table:style-name="Taula15.B7" office:value-type="string">
            <text:p text:style-name="P195"><text:s/>En aquest cas <text:span text:style-name="T301">la petició es passa com a un objecte JSON en el cos de la petició POST on s'ha d</text:span><text:span text:style-name="T306">'</text:span><text:span text:style-name="T301">especificar l'identificador amb la clau, l'estat i les observacions. Els paràmetres serien els següents:</text:span></text:p>
            <text:p text:style-name="P195"/>
            <text:list xml:id="list94025497658884" text:continue-list="list3848000515" text:style-name="L5">
              <text:list-item>
                <text:p text:style-name="P444">id:</text:p>
                <text:list>
                  <text:list-item>
                    <text:p text:style-name="P431"><text:span text:style-name="T46">identificador</text:span><text:span text:style-name="T279">:</text:span><text:span text:style-name="T286"> És l'identificador de l'anotació comunicada per DISTRIBUCIO. Típicament sol ser el número de registre de l'anotació.</text:span><text:span text:style-name="T302"> Format String, dada obligatòria.</text:span></text:p>
                  </text:list-item>
                  <text:list-item>
                    <text:p text:style-name="P431"><text:span text:style-name="T45">clauAcces</text:span><text:span text:style-name="T279">: </text:span><text:span text:style-name="T286">És una clau proporcionada per DISTRIBUCIO en el moment de notificar al backoffice l'anotació de registre que s'ha d'emprar per consultar o canviar l'estat a l'anotació</text:span><text:span text:style-name="T302">. Format String, dada o</text:span><text:span text:style-name="T306">b</text:span><text:span text:style-name="T302">li</text:span><text:span text:style-name="T306">g</text:span><text:span text:style-name="T302">atòria</text:span><text:span text:style-name="T286">.</text:span></text:p>
                  </text:list-item>
                </text:list>
              </text:list-item>
              <text:list-item>
                <text:p text:style-name="P444">estat:<text:span text:style-name="T302"> </text:span><text:span text:style-name="T211">Codi del nou estat a comunicar a DISTRIBUCIO per l'anotació. S'ha d'informar en fo</text:span><text:span text:style-name="T212">r</text:span><text:span text:style-name="T211">mat String i és una dada obligatòria. Els possibles estats són:</text:span></text:p>
                <text:list>
                  <text:list-item>
                    <text:p text:style-name="P446">REBUDA: Indica a DISTRIBUCIO que pot marcar l'anotació com a rebuda al backoffice.</text:p>
                  </text:list-item>
                  <text:list-item>
                    <text:p text:style-name="P446">PROCESSADA: <text:span text:style-name="T306">Marca l'anotació </text:span>l'anotació <text:span text:style-name="T306">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6">n</text:span>t de l'Arxiu de l'expedient del backoffice.</text:p>
                  </text:list-item>
                  <text:list-item>
                    <text:p text:style-name="P446">REBUTJADA: Marca l'anotació com a rebutjada pel backoffice. <text:soft-page-break/>Aquesta apareixerà com a<text:span text:style-name="T306"> rebutjada pel backoffice </text:span>a DISTRIBUCIO <text:span text:style-name="T306">amb el comentari que s'hagi informat</text:span>.<text:span text:style-name="T306"> </text:span></text:p>
                  </text:list-item>
                  <text:list-item>
                    <text:p text:style-name="P446">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4">observacions:<text:span text:style-name="T302"> </text:span><text:span text:style-name="T211">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86"><text:s/>Un exemple de petició seria el següent. </text:span><text:span text:style-name="T287">Pels paràmetres identificador: </text:span><text:span text:style-name="T289">"GOIBE1682590959780/2023"</text:span><text:span text:style-name="T287"> i clau d'accés </text:span><text:span text:style-name="T289">"RfG3stK7Bc7JmuOk+riod/uOnBNGUEPqZt6+1/HiTlc="</text:span><text:span text:style-name="T287"> la petició amb els paràmetres</text:span><text:span text:style-name="T301"> en el cos de la petició POST com a JSON</text:span><text:span text:style-name="T287"> seria:</text:span></text:p>
            <text:p text:style-name="P208">POST</text:p>
            <text:p text:style-name="P100">{</text:p>
            <text:p text:style-name="P104">  <text:span text:style-name="T296">"id"</text:span><text:span text:style-name="T294">: {</text:span></text:p>
            <text:p text:style-name="P105">    <text:span text:style-name="T296">"identificador"</text:span><text:span text:style-name="T294">: </text:span><text:span text:style-name="T288">"GOIBE1682590959780/2023"</text:span><text:span text:style-name="T294">,</text:span></text:p>
            <text:p text:style-name="P104">    <text:span text:style-name="T296">"clauAcces"</text:span><text:span text:style-name="T294">: </text:span><text:span text:style-name="T288">"RfG3stK7Bc7JmuOk+riod/uOnBNGUEPqZt6+1/HiTlc="</text:span></text:p>
            <text:p text:style-name="P104">  <text:span text:style-name="T294">},</text:span></text:p>
            <text:p text:style-name="P104">  <text:span text:style-name="T296">"estat"</text:span><text:span text:style-name="T294">: </text:span><text:span text:style-name="T288">"PROCESSADA"</text:span><text:span text:style-name="T294">,</text:span></text:p>
            <text:p text:style-name="P104">  <text:span text:style-name="T296">"observacions"</text:span><text:span text:style-name="T294">: </text:span><text:span text:style-name="T288">"S'ha creat l'expedient 123/2023"</text:span></text:p>
            <text:p text:style-name="P99">}</text:p>
            <text:p text:style-name="P205"/>
          </table:table-cell>
        </table:table-row>
        <table:table-row table:style-name="TableLine930175376">
          <table:table-cell table:style-name="Taula15.A8" office:value-type="string">
            <text:p text:style-name="P30">Resultat</text:p>
          </table:table-cell>
          <table:table-cell table:style-name="Taula15.B8" office:value-type="string">
            <text:list xml:id="list1717280795" text:style-name="L7">
              <text:list-item>
                <text:p text:style-name="P435">HTTP 200 <text:span text:style-name="T303">si la petició s'ha processat correctament.</text:span></text:p>
              </text:list-item>
              <text:list-item>
                <text:p text:style-name="P440">HTTP 500 si es produeix un error intern no controlat <text:span text:style-name="T293">consultant l'anotació</text:span>.<text:span text:style-name="T303"> Com a cos de la resposta es retorna el missatge de confirmació.</text:span></text:p>
              </text:list-item>
            </text:list>
          </table:table-cell>
        </table:table-row>
      </table:table>
      <text:p text:style-name="P214"/>
      <text:list xml:id="list94024325327839" text:continue-list="list94025273037694" text:style-name="Outline">
        <text:list-item>
          <text:list>
            <text:list-item>
              <text:h text:style-name="P415"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25">A continuació es mostra el diagrama de classes amb els detalls de l’objecte AnotacioRegistreEntrada:</text:p>
      <text:p text:style-name="P162"><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9"/>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930177104">
          <table:table-cell table:style-name="Taula4.A1" table:number-columns-spanned="5" office:value-type="string">
            <text:p text:style-name="P143">annex</text:p>
          </table:table-cell>
          <table:covered-table-cell/>
          <table:covered-table-cell/>
          <table:covered-table-cell/>
          <table:covered-table-cell/>
        </table:table-row>
        <table:table-row table:style-name="TableLine930177968">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930179696">
          <table:table-cell table:style-name="Taula4.A3" office:value-type="string">
            <text:p text:style-name="P320">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21">var</text:p>
          </table:table-cell>
          <table:table-cell table:style-name="Taula4.E3" office:value-type="string">
            <text:p text:style-name="P306">Cadena de bytes que componen el contingut del fitxer de firma annex si n’hi ha. <text:span text:style-name="T105">És obligatori si el tipus de firma és TF04.</text:span></text:p>
          </table:table-cell>
        </table:table-row>
        <table:table-row table:style-name="TableLine930181424">
          <table:table-cell table:style-name="Taula4.A3" office:value-type="string">
            <text:p text:style-name="P323">firma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68">var</text:p>
          </table:table-cell>
          <table:table-cell table:style-name="Taula4.E3" office:value-type="string">
            <text:p text:style-name="P306">Cadena de bytes que componen el contingut del fitxer de firma annex si n’hi ha. <text:span text:style-name="T105">És obligatori si el tipus de firma és TF04.</text:span> </text:p>
          </table:table-cell>
        </table:table-row>
        <table:table-row table:style-name="TableLine930181712">
          <table:table-cell table:style-name="Taula4.A3" office:value-type="string">
            <text:p text:style-name="P323">firmaNom</text:p>
          </table:table-cell>
          <table:table-cell table:style-name="Taula4.A3" office:value-type="string">
            <text:p text:style-name="P324">Cadena</text:p>
          </table:table-cell>
          <table:table-cell table:style-name="Taula4.A3" office:value-type="string">
            <text:p text:style-name="P262">0..1</text:p>
          </table:table-cell>
          <table:table-cell table:style-name="Taula4.A3" office:value-type="string">
            <text:p text:style-name="P321">256</text:p>
          </table:table-cell>
          <table:table-cell table:style-name="Taula4.E3" office:value-type="string">
            <text:p text:style-name="P270"><text:s/><text:span text:style-name="T269">Nom del fitxer de la firma de l’annex si n’hi ha. És obligatori si el tipus de firma és TF04.</text:span></text:p>
          </table:table-cell>
        </table:table-row>
        <table:table-row table:style-name="TableLine930182000">
          <table:table-cell table:style-name="Taula4.A3" office:value-type="string">
            <text:p text:style-name="P323">firmaPerfil</text:p>
          </table:table-cell>
          <table:table-cell table:style-name="Taula4.A3" office:value-type="string">
            <text:p text:style-name="P324">firmaPerfil</text:p>
          </table:table-cell>
          <table:table-cell table:style-name="Taula4.A3" office:value-type="string">
            <text:p text:style-name="P266">0..1</text:p>
          </table:table-cell>
          <table:table-cell table:style-name="Taula4.A3" office:value-type="string">
            <text:p text:style-name="P321">30</text:p>
          </table:table-cell>
          <table:table-cell table:style-name="Taula4.E3" office:value-type="string">
            <text:p text:style-name="P322">Codi de perfil de la firma. </text:p>
          </table:table-cell>
        </table:table-row>
        <table:table-row table:style-name="TableLine930182288">
          <table:table-cell table:style-name="Taula4.A3" office:value-type="string">
            <text:p text:style-name="P323">firmaTamany</text:p>
          </table:table-cell>
          <table:table-cell table:style-name="Taula4.A3" office:value-type="string">
            <text:p text:style-name="P293">Numèric</text:p>
          </table:table-cell>
          <table:table-cell table:style-name="Taula4.A3" office:value-type="string">
            <text:p text:style-name="P277"/>
          </table:table-cell>
          <table:table-cell table:style-name="Taula4.A3" office:value-type="string">
            <text:p text:style-name="P361"/>
          </table:table-cell>
          <table:table-cell table:style-name="Taula4.E3" office:value-type="string">
            <text:p text:style-name="P268"/>
          </table:table-cell>
        </table:table-row>
        <table:table-row table:style-name="TableLine930182576">
          <table:table-cell table:style-name="Taula4.A3" office:value-type="string">
            <text:p text:style-name="P323">firmaTipus</text:p>
          </table:table-cell>
          <table:table-cell table:style-name="Taula4.A3" office:value-type="string">
            <text:p text:style-name="P324">firmaTipus</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Codi del tipus de firma. </text:p>
          </table:table-cell>
        </table:table-row>
        <table:table-row table:style-name="TableLine930182864">
          <table:table-cell table:style-name="Taula4.A3" office:value-type="string">
            <text:p text:style-name="P323">firma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Tipus MIME del fitxer de firma annexat si n’hi ha. És obligatori si el tipus de firma és TF04.</text:p>
          </table:table-cell>
        </table:table-row>
        <table:table-row table:style-name="TableLine930183152">
          <table:table-cell table:style-name="Taula4.A3" office:value-type="string">
            <text:p text:style-name="P323">nom</text:p>
          </table:table-cell>
          <table:table-cell table:style-name="Taula4.A3" office:value-type="string">
            <text:p text:style-name="P278">Cadena</text:p>
          </table:table-cell>
          <table:table-cell table:style-name="Taula4.A3" office:value-type="string">
            <text:p text:style-name="P277"><text:span text:style-name="T264">0..</text:span>1</text:p>
          </table:table-cell>
          <table:table-cell table:style-name="Taula4.A3" office:value-type="string">
            <text:p text:style-name="P326">256</text:p>
          </table:table-cell>
          <table:table-cell table:style-name="Taula4.E3" office:value-type="string">
            <text:p text:style-name="P325">Nom del fitxer annexat. </text:p>
          </table:table-cell>
        </table:table-row>
        <table:table-row table:style-name="TableLine930183440">
          <table:table-cell table:style-name="Taula4.A3" office:value-type="string">
            <text:p text:style-name="P323">ntiEstadoElaboracion</text:p>
          </table:table-cell>
          <table:table-cell table:style-name="Taula4.A3" office:value-type="string">
            <text:p text:style-name="P324">ntiEstadoElaboracion</text:p>
          </table:table-cell>
          <table:table-cell table:style-name="Taula4.A3" office:value-type="string">
            <text:p text:style-name="P266">0..1</text:p>
          </table:table-cell>
          <table:table-cell table:style-name="Taula4.A3" office:value-type="string">
            <text:p text:style-name="P326">4</text:p>
          </table:table-cell>
          <table:table-cell table:style-name="Taula4.E3" office:value-type="string">
            <text:p text:style-name="P325">Codi de la metadata estat elaboració de la NTI de document electrònic. </text:p>
          </table:table-cell>
        </table:table-row>
        <table:table-row table:style-name="TableLine930183728">
          <table:table-cell table:style-name="Taula4.A3" office:value-type="string">
            <text:p text:style-name="P323">ntiFechaCaptura</text:p>
          </table:table-cell>
          <table:table-cell table:style-name="Taula4.A3" office:value-type="string">
            <text:p text:style-name="P324">dateTime</text:p>
          </table:table-cell>
          <table:table-cell table:style-name="Taula4.A3" office:value-type="string">
            <text:p text:style-name="P266">0..1</text:p>
          </table:table-cell>
          <table:table-cell table:style-name="Taula4.A3" office:value-type="string">
            <text:p text:style-name="P326">14</text:p>
          </table:table-cell>
          <table:table-cell table:style-name="Taula4.E3" office:value-type="string">
            <text:p text:style-name="P297">Data de captura del document.</text:p>
          </table:table-cell>
        </table:table-row>
        <table:table-row table:style-name="TableLine930184016">
          <table:table-cell table:style-name="Taula4.A3" office:value-type="string">
            <text:p text:style-name="P327">ntiOrigen</text:p>
          </table:table-cell>
          <table:table-cell table:style-name="Taula4.A3" office:value-type="string">
            <text:p text:style-name="P328">ntiOrigen</text:p>
          </table:table-cell>
          <table:table-cell table:style-name="Taula4.A3" office:value-type="string">
            <text:p text:style-name="P266">0..1</text:p>
          </table:table-cell>
          <table:table-cell table:style-name="Taula4.A3" office:value-type="string">
            <text:p text:style-name="P326">10</text:p>
          </table:table-cell>
          <table:table-cell table:style-name="Taula4.E3" office:value-type="string">
            <text:p text:style-name="P268">Codi de la metadada origen de la NTI de document electrònic.</text:p>
          </table:table-cell>
        </table:table-row>
        <table:table-row table:style-name="TableLine930184304">
          <table:table-cell table:style-name="Taula4.A3" office:value-type="string">
            <text:p text:style-name="P327">ntiTipoDocumental</text:p>
          </table:table-cell>
          <table:table-cell table:style-name="Taula4.A3" office:value-type="string">
            <text:p text:style-name="P328">ntiTipoDocumento</text:p>
          </table:table-cell>
          <table:table-cell table:style-name="Taula4.A3" office:value-type="string">
            <text:p text:style-name="P277"><text:span text:style-name="T265">0..</text:span>1</text:p>
          </table:table-cell>
          <table:table-cell table:style-name="Taula4.A3" office:value-type="string">
            <text:p text:style-name="P326">255</text:p>
          </table:table-cell>
          <table:table-cell table:style-name="Taula4.E3" office:value-type="string">
            <text:p text:style-name="P268">Codi de la metadada tipus <text:soft-page-break/>documental de la NTI de document electrònic.</text:p>
          </table:table-cell>
        </table:table-row>
        <table:table-row table:style-name="TableLine930184592">
          <table:table-cell table:style-name="Taula4.A3" office:value-type="string">
            <text:p text:style-name="P327">observacions</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85">50</text:p>
          </table:table-cell>
          <table:table-cell table:style-name="Taula4.E3" office:value-type="string">
            <text:p text:style-name="P301">Observacions a destacar sobre la informació annexada.</text:p>
          </table:table-cell>
        </table:table-row>
        <table:table-row table:style-name="TableLine930184880">
          <table:table-cell table:style-name="Taula4.A3" office:value-type="string">
            <text:p text:style-name="P327">sicresTipoDocumento</text:p>
          </table:table-cell>
          <table:table-cell table:style-name="Taula4.A3" office:value-type="string">
            <text:p text:style-name="P328">sicresTipoDocumento</text:p>
          </table:table-cell>
          <table:table-cell table:style-name="Taula4.A3" office:value-type="string">
            <text:p text:style-name="P277"><text:span text:style-name="T265">0..</text:span>1</text:p>
          </table:table-cell>
          <table:table-cell table:style-name="Taula4.A3" office:value-type="string">
            <text:p text:style-name="P326">2</text:p>
          </table:table-cell>
          <table:table-cell table:style-name="Taula4.E3" office:value-type="string">
            <text:p text:style-name="P268">Codi SICRES del segment Anexo – tipo de documento.</text:p>
          </table:table-cell>
        </table:table-row>
        <table:table-row table:style-name="TableLine930185168">
          <table:table-cell table:style-name="Taula4.A3" office:value-type="string">
            <text:p text:style-name="P327">sicresValidezDocumento</text:p>
          </table:table-cell>
          <table:table-cell table:style-name="Taula4.A3" office:value-type="string">
            <text:p text:style-name="P328">sicresValidezDocumento</text:p>
          </table:table-cell>
          <table:table-cell table:style-name="Taula4.A3" office:value-type="string">
            <text:p text:style-name="P277"><text:span text:style-name="T119">0..</text:span>1</text:p>
          </table:table-cell>
          <table:table-cell table:style-name="Taula4.A3" office:value-type="string">
            <text:p text:style-name="P273"/>
          </table:table-cell>
          <table:table-cell table:style-name="Taula4.E3" office:value-type="string">
            <text:p text:style-name="P280"/>
          </table:table-cell>
        </table:table-row>
        <table:table-row table:style-name="TableLine930185456">
          <table:table-cell table:style-name="Taula4.A3" office:value-type="string">
            <text:p text:style-name="P327">tamany</text:p>
          </table:table-cell>
          <table:table-cell table:style-name="Taula4.A3" office:value-type="string">
            <text:p text:style-name="P328">numèric</text:p>
          </table:table-cell>
          <table:table-cell table:style-name="Taula4.A3" office:value-type="string">
            <text:p text:style-name="P266"/>
          </table:table-cell>
          <table:table-cell table:style-name="Taula4.A3" office:value-type="string">
            <text:p text:style-name="P282"/>
          </table:table-cell>
          <table:table-cell table:style-name="Taula4.E3" office:value-type="string">
            <text:p text:style-name="P325">Tamany en bytes del fitxer annexat. </text:p>
          </table:table-cell>
        </table:table-row>
        <table:table-row table:style-name="TableLine930185744">
          <table:table-cell table:style-name="Taula4.A3" office:value-type="string">
            <text:p text:style-name="P327">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30</text:p>
          </table:table-cell>
          <table:table-cell table:style-name="Taula4.E3" office:value-type="string">
            <text:p text:style-name="P297">Tipus MIME del fitxer annexat.</text:p>
          </table:table-cell>
        </table:table-row>
        <table:table-row table:style-name="TableLine930186032">
          <table:table-cell table:style-name="Taula4.A3" office:value-type="string">
            <text:p text:style-name="P327">titol</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200</text:p>
          </table:table-cell>
          <table:table-cell table:style-name="Taula4.E3" office:value-type="string">
            <text:p text:style-name="P325">Títol del document. </text:p>
          </table:table-cell>
        </table:table-row>
        <table:table-row table:style-name="TableLine930186320">
          <table:table-cell table:style-name="Taula4.A3" office:value-type="string">
            <text:p text:style-name="P327">uuid</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256</text:p>
          </table:table-cell>
          <table:table-cell table:style-name="Taula4.E3" office:value-type="string">
            <text:p text:style-name="P325">Uuid de l’arxiu digital si s’escau. </text:p>
          </table:table-cell>
        </table:table-row>
      </table:table>
      <text:p text:style-name="P139"/>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930186608">
          <table:table-cell table:style-name="Taula7.A1" table:number-columns-spanned="5" office:value-type="string">
            <text:p text:style-name="P144">anotacioRegistreBase</text:p>
          </table:table-cell>
          <table:covered-table-cell/>
          <table:covered-table-cell/>
          <table:covered-table-cell/>
          <table:covered-table-cell/>
        </table:table-row>
        <table:table-row table:style-name="TableLine930187472">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930189200">
          <table:table-cell table:style-name="Taula7.A3" office:value-type="string">
            <text:p text:style-name="P327">annexos</text:p>
          </table:table-cell>
          <table:table-cell table:style-name="Taula7.A3" office:value-type="string">
            <text:p text:style-name="P328">annex</text:p>
          </table:table-cell>
          <table:table-cell table:style-name="Taula7.A3" office:value-type="string">
            <text:p text:style-name="P262">0..*</text:p>
          </table:table-cell>
          <table:table-cell table:style-name="Taula7.D3">
            <text:p text:style-name="P262"/>
          </table:table-cell>
          <table:table-cell table:style-name="Taula7.E4" office:value-type="string">
            <text:p text:style-name="P330">Annex al que fa referència amb les seves propietats. </text:p>
          </table:table-cell>
        </table:table-row>
        <table:table-row table:style-name="TableLine930190928">
          <table:table-cell table:style-name="Taula7.A3" office:value-type="string">
            <text:p text:style-name="P327">aplicacioCodi</text:p>
          </table:table-cell>
          <table:table-cell table:style-name="Taula7.A3" office:value-type="string">
            <text:p text:style-name="P328">Cadena</text:p>
          </table:table-cell>
          <table:table-cell table:style-name="Taula7.A3" office:value-type="string">
            <text:p text:style-name="P262">0..1</text:p>
          </table:table-cell>
          <table:table-cell table:style-name="Taula7.D3" office:value-type="float" office:value="255">
            <text:p text:style-name="P370">255</text:p>
          </table:table-cell>
          <table:table-cell table:style-name="Taula7.E4" office:value-type="string">
            <text:p text:style-name="P330">Codi de l’aplicació que fa l’enviament de l’assentament registral. </text:p>
          </table:table-cell>
        </table:table-row>
        <table:table-row table:style-name="TableLine930191504">
          <table:table-cell table:style-name="Taula7.A3" office:value-type="string">
            <text:p text:style-name="P327">aplicacioVersio</text:p>
          </table:table-cell>
          <table:table-cell table:style-name="Taula7.A3" office:value-type="string">
            <text:p text:style-name="P324">Cadena</text:p>
          </table:table-cell>
          <table:table-cell table:style-name="Taula7.A3" office:value-type="string">
            <text:p text:style-name="P262">0..1</text:p>
          </table:table-cell>
          <table:table-cell table:style-name="Taula7.A3" office:value-type="string">
            <text:p text:style-name="P331">255</text:p>
          </table:table-cell>
          <table:table-cell table:style-name="Taula7.E5" office:value-type="string">
            <text:p text:style-name="P270"><text:s/><text:span text:style-name="T102">Versió de l’aplicació que fa l’enviament de l’assentament registral.</text:span></text:p>
          </table:table-cell>
        </table:table-row>
        <table:table-row table:style-name="TableLine930192368">
          <table:table-cell table:style-name="Taula7.A3" office:value-type="string">
            <text:p text:style-name="P327">assumpteCodiCodi</text:p>
          </table:table-cell>
          <table:table-cell table:style-name="Taula7.A3" office:value-type="string">
            <text:p text:style-name="P328">Cadena</text:p>
          </table:table-cell>
          <table:table-cell table:style-name="Taula7.A3" office:value-type="string">
            <text:p text:style-name="P266">0..1</text:p>
          </table:table-cell>
          <table:table-cell table:style-name="Taula7.A3" office:value-type="string">
            <text:p text:style-name="P331">16</text:p>
          </table:table-cell>
          <table:table-cell table:style-name="Taula7.E6" office:value-type="string">
            <text:p text:style-name="P280">Codi de l’ass<text:span text:style-name="T270">umpte</text:span>.</text:p>
          </table:table-cell>
        </table:table-row>
        <table:table-row table:style-name="TableLine930192944">
          <table:table-cell table:style-name="Taula7.A3" office:value-type="string">
            <text:p text:style-name="P327">assumpteCodiDescripcio</text:p>
          </table:table-cell>
          <table:table-cell table:style-name="Taula7.A3" office:value-type="string">
            <text:p text:style-name="P328">Cadena</text:p>
          </table:table-cell>
          <table:table-cell table:style-name="Taula7.A3" office:value-type="string">
            <text:p text:style-name="P329">0..1</text:p>
          </table:table-cell>
          <table:table-cell table:style-name="Taula7.A3" office:value-type="string">
            <text:p text:style-name="P370">255</text:p>
          </table:table-cell>
          <table:table-cell table:style-name="Taula7.E7" office:value-type="string">
            <text:p text:style-name="P280">Denominació de l’assumpte.</text:p>
          </table:table-cell>
        </table:table-row>
        <table:table-row table:style-name="TableLine930193520">
          <table:table-cell table:style-name="Taula7.A3" office:value-type="string">
            <text:p text:style-name="P332">assumpteTipus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70">16</text:p>
          </table:table-cell>
          <table:table-cell table:style-name="Taula7.E8" office:value-type="string">
            <text:p text:style-name="P330">Codi de l’assumpte. </text:p>
          </table:table-cell>
        </table:table-row>
        <table:table-row table:style-name="TableLine930194096">
          <table:table-cell table:style-name="Taula7.A3" office:value-type="string">
            <text:p text:style-name="P332">assumpteTipus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0">100</text:p>
          </table:table-cell>
          <table:table-cell table:style-name="Taula7.E9" office:value-type="string">
            <text:p text:style-name="P280">Denominació del tipus d’assumpte de l’assentament registral.</text:p>
          </table:table-cell>
        </table:table-row>
        <table:table-row table:style-name="TableLine930194672">
          <table:table-cell table:style-name="Taula7.A3" office:value-type="string">
            <text:p text:style-name="P332">data</text:p>
          </table:table-cell>
          <table:table-cell table:style-name="Taula7.A3" office:value-type="string">
            <text:p text:style-name="P333">dateTime</text:p>
          </table:table-cell>
          <table:table-cell table:style-name="Taula7.A3" office:value-type="string">
            <text:p text:style-name="P277"><text:span text:style-name="T264">0..</text:span>1</text:p>
          </table:table-cell>
          <table:table-cell table:style-name="Taula7.A3" office:value-type="string">
            <text:p text:style-name="P331">14</text:p>
          </table:table-cell>
          <table:table-cell table:style-name="Taula7.E10" office:value-type="string">
            <text:p text:style-name="P330">Data de l’assentament. </text:p>
          </table:table-cell>
        </table:table-row>
        <table:table-row table:style-name="TableLine930195248">
          <table:table-cell table:style-name="Taula7.A3" office:value-type="string">
            <text:p text:style-name="P332">docFisica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9</text:p>
          </table:table-cell>
          <table:table-cell table:style-name="Taula7.E11" office:value-type="string">
            <text:p text:style-name="P270">Codi SICRES del segment internos – Documentación física y/o soportes.</text:p>
          </table:table-cell>
        </table:table-row>
        <table:table-row table:style-name="TableLine930195824">
          <table:table-cell table:style-name="Taula7.A3" office:value-type="string">
            <text:p text:style-name="P332">docFisicaDescripcio</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00</text:p>
          </table:table-cell>
          <table:table-cell table:style-name="Taula7.E12" office:value-type="string">
            <text:p text:style-name="P284">Descripció del segment internos – Documentación física y/o soportes.</text:p>
          </table:table-cell>
        </table:table-row>
        <table:table-row table:style-name="TableLine930196400">
          <table:table-cell table:style-name="Taula7.A3" office:value-type="string">
            <text:p text:style-name="P332">entitat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255</text:p>
          </table:table-cell>
          <table:table-cell table:style-name="Taula7.E13" office:value-type="string">
            <text:p text:style-name="P268">Codi <text:span text:style-name="T101">DIR3 </text:span>de l’entitat governamental a la que va dirigit l’assentament registral.</text:p>
          </table:table-cell>
        </table:table-row>
        <table:table-row table:style-name="TableLine930196976">
          <table:table-cell table:style-name="Taula7.A3" office:value-type="string">
            <text:p text:style-name="P332">entitatDescripcio</text:p>
          </table:table-cell>
          <table:table-cell table:style-name="Taula7.A3" office:value-type="string">
            <text:p text:style-name="P333">Cadena</text:p>
          </table:table-cell>
          <table:table-cell table:style-name="Taula7.A3" office:value-type="string">
            <text:p text:style-name="P277"><text:span text:style-name="T265">0..</text:span>1</text:p>
          </table:table-cell>
          <table:table-cell table:style-name="Taula7.A3" office:value-type="string">
            <text:p text:style-name="P335">255</text:p>
          </table:table-cell>
          <table:table-cell table:style-name="Taula7.E14" office:value-type="string">
            <text:p text:style-name="P268"><text:span text:style-name="T101">Descripció</text:span> de l’entitat governamental a la que va dirigit l’assentament registral.</text:p>
          </table:table-cell>
        </table:table-row>
        <table:table-row table:style-name="TableLine930197552">
          <table:table-cell table:style-name="Taula7.A3" office:value-type="string">
            <text:p text:style-name="P332">expedientNumer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86">255</text:p>
          </table:table-cell>
          <table:table-cell table:style-name="Taula7.E15" office:value-type="string">
            <text:p text:style-name="P336">Número identificador de l’assentament registral. És únic. </text:p>
          </table:table-cell>
        </table:table-row>
        <table:table-row table:style-name="TableLine930198128">
          <table:table-cell table:style-name="Taula7.A3" office:value-type="string">
            <text:p text:style-name="P332">exposa</text:p>
          </table:table-cell>
          <table:table-cell table:style-name="Taula7.A3" office:value-type="string">
            <text:p text:style-name="P333">Cadena</text:p>
          </table:table-cell>
          <table:table-cell table:style-name="Taula7.A3" office:value-type="string">
            <text:p text:style-name="P277"><text:span text:style-name="T265">0..</text:span>1</text:p>
          </table:table-cell>
          <table:table-cell table:style-name="Taula7.A3" office:value-type="string">
            <text:p text:style-name="P335">lob</text:p>
          </table:table-cell>
          <table:table-cell table:style-name="Taula7.E16" office:value-type="string">
            <text:p text:style-name="P336">Exposició de fets. </text:p>
          </table:table-cell>
        </table:table-row>
        <table:table-row table:style-name="TableLine930198704">
          <table:table-cell table:style-name="Taula7.A3" office:value-type="string">
            <text:p text:style-name="P332">extracte</text:p>
          </table:table-cell>
          <table:table-cell table:style-name="Taula7.A3" office:value-type="string">
            <text:p text:style-name="P333">Cadena</text:p>
          </table:table-cell>
          <table:table-cell table:style-name="Taula7.A3" office:value-type="string">
            <text:p text:style-name="P277"><text:span text:style-name="T119">0..</text:span>1</text:p>
          </table:table-cell>
          <table:table-cell table:style-name="Taula7.A3" office:value-type="string">
            <text:p text:style-name="P335">240</text:p>
          </table:table-cell>
          <table:table-cell table:style-name="Taula7.E17" office:value-type="string">
            <text:p text:style-name="P336">Extracte o resum de l’assentament. </text:p>
          </table:table-cell>
        </table:table-row>
        <table:table-row table:style-name="TableLine930199280">
          <table:table-cell table:style-name="Taula7.A3" office:value-type="string">
            <text:p text:style-name="P332">identificador</text:p>
          </table:table-cell>
          <table:table-cell table:style-name="Taula7.A3" office:value-type="string">
            <text:p text:style-name="P333">Cadena</text:p>
          </table:table-cell>
          <table:table-cell table:style-name="Taula7.A3" office:value-type="string">
            <text:p text:style-name="P334">0..1</text:p>
          </table:table-cell>
          <table:table-cell table:style-name="Taula7.A3" office:value-type="string">
            <text:p text:style-name="P335">100</text:p>
          </table:table-cell>
          <table:table-cell table:style-name="Taula7.E18" office:value-type="string">
            <text:p text:style-name="P336">Codi identificador de l’assentament registral. </text:p>
          </table:table-cell>
        </table:table-row>
        <text:soft-page-break/>
        <table:table-row table:style-name="TableLine930199856">
          <table:table-cell table:style-name="Taula7.A3" office:value-type="string">
            <text:p text:style-name="P332">idiomaCodi</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35">2</text:p>
          </table:table-cell>
          <table:table-cell table:style-name="Taula7.E19" office:value-type="string">
            <text:p text:style-name="P284">Codi d’idioma amb el que s’ha fet l’assentament.</text:p>
          </table:table-cell>
        </table:table-row>
        <table:table-row table:style-name="TableLine930200432">
          <table:table-cell table:style-name="Taula7.A3" office:value-type="string">
            <text:p text:style-name="P332">idioma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1">100</text:p>
          </table:table-cell>
          <table:table-cell table:style-name="Taula7.E20" office:value-type="string">
            <text:p text:style-name="P284">Descripció d’idioma amb el que s’ha fet l’assentament.</text:p>
          </table:table-cell>
        </table:table-row>
        <table:table-row table:style-name="Taula7.21">
          <table:table-cell table:style-name="Taula7.A3" office:value-type="string">
            <text:p text:style-name="P332">interessats</text:p>
          </table:table-cell>
          <table:table-cell table:style-name="Taula7.A3" office:value-type="string">
            <text:p text:style-name="P333">interessat</text:p>
          </table:table-cell>
          <table:table-cell table:style-name="Taula7.A3" office:value-type="string">
            <text:p text:style-name="P266">0..*</text:p>
          </table:table-cell>
          <table:table-cell table:style-name="Taula7.A3" office:value-type="string">
            <text:p text:style-name="P273"/>
          </table:table-cell>
          <table:table-cell table:style-name="Taula7.E21" office:value-type="string">
            <text:p text:style-name="P288">Dades que componen els interessats de l’assentament registral si n’hi ha.</text:p>
          </table:table-cell>
        </table:table-row>
        <table:table-row table:style-name="Taula7.21">
          <table:table-cell table:style-name="Taula7.A3" office:value-type="string">
            <text:p text:style-name="P337">llibre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4</text:p>
          </table:table-cell>
          <table:table-cell table:style-name="Taula7.E22" office:value-type="string">
            <text:p text:style-name="P280">Codi del llibre al qual s’ha fet l’assentament registral rebut.</text:p>
          </table:table-cell>
        </table:table-row>
        <table:table-row table:style-name="Taula7.21">
          <table:table-cell table:style-name="Taula7.A3" office:value-type="string">
            <text:p text:style-name="P337">llibre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55</text:p>
          </table:table-cell>
          <table:table-cell table:style-name="Taula7.E37" office:value-type="string">
            <text:p text:style-name="P280">Denominació del llibre al qual s’ha fet l’assentament registral rebut.</text:p>
          </table:table-cell>
        </table:table-row>
        <table:table-row table:style-name="Taula7.21">
          <table:table-cell table:style-name="Taula7.A3" office:value-type="string">
            <text:p text:style-name="P337">observacions</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50</text:p>
          </table:table-cell>
          <table:table-cell table:style-name="Taula7.E37" office:value-type="string">
            <text:p text:style-name="P284">Observacions de l’assentament.</text:p>
          </table:table-cell>
        </table:table-row>
        <table:table-row table:style-name="Taula7.21">
          <table:table-cell table:style-name="Taula7.A3" office:value-type="string">
            <text:p text:style-name="P337">oficina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1</text:p>
          </table:table-cell>
          <table:table-cell table:style-name="Taula7.E37" office:value-type="string">
            <text:p text:style-name="P280">Codi DIR3 de l’oficina on es registre.</text:p>
          </table:table-cell>
        </table:table-row>
        <table:table-row table:style-name="Taula7.21">
          <table:table-cell table:style-name="Taula7.A3" office:value-type="string">
            <text:p text:style-name="P337">oficina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300</text:p>
          </table:table-cell>
          <table:table-cell table:style-name="Taula7.E37" office:value-type="string">
            <text:p text:style-name="P270">Denominació DIR3 de l'entitat registral on es registre l'assentament.</text:p>
          </table:table-cell>
        </table:table-row>
        <table:table-row table:style-name="Taula7.21">
          <table:table-cell table:style-name="Taula7.A3" office:value-type="string">
            <text:p text:style-name="P337">origenData</text:p>
          </table:table-cell>
          <table:table-cell table:style-name="Taula7.A3" office:value-type="string">
            <text:p text:style-name="P338">dateTime</text:p>
          </table:table-cell>
          <table:table-cell table:style-name="Taula7.A3" office:value-type="string">
            <text:p text:style-name="P266">0..1</text:p>
          </table:table-cell>
          <table:table-cell table:style-name="Taula7.A3" office:value-type="string">
            <text:p text:style-name="P339">14</text:p>
          </table:table-cell>
          <table:table-cell table:style-name="Taula7.E37" office:value-type="string">
            <text:p text:style-name="P270">Data <text:span text:style-name="T99">origen </text:span>de l’assentament.</text:p>
          </table:table-cell>
        </table:table-row>
        <table:table-row table:style-name="Taula7.21">
          <table:table-cell table:style-name="Taula7.A3" office:value-type="string">
            <text:p text:style-name="P337">origenRegistre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80</text:p>
          </table:table-cell>
          <table:table-cell table:style-name="Taula7.E37" office:value-type="string">
            <text:p text:style-name="P270"/>
          </table:table-cell>
        </table:table-row>
        <table:table-row table:style-name="Taula7.21">
          <table:table-cell table:style-name="Taula7.A3" office:value-type="string">
            <text:p text:style-name="P337">procediment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40">SIA </text:span>de procediment. </text:p>
          </table:table-cell>
        </table:table-row>
        <table:table-row table:style-name="Taula7.21">
          <table:table-cell table:style-name="Taula7.A3" office:value-type="string">
            <text:p text:style-name="P337"><text:span text:style-name="T340">servei</text:span>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40">SIA </text:span>de<text:span text:style-name="T340">l servei</text:span>. </text:p>
          </table:table-cell>
        </table:table-row>
        <table:table-row table:style-name="Taula7.21">
          <table:table-cell table:style-name="Taula7.A3" office:value-type="string">
            <text:p text:style-name="P337">refExtern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273"/>
          </table:table-cell>
          <table:table-cell table:style-name="Taula7.E37" office:value-type="string">
            <text:p text:style-name="P270"/>
          </table:table-cell>
        </table:table-row>
        <table:table-row table:style-name="Taula7.21">
          <table:table-cell table:style-name="Taula7.A3" office:value-type="string">
            <text:p text:style-name="P337">solicit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lob</text:p>
          </table:table-cell>
          <table:table-cell table:style-name="Taula7.E37" office:value-type="string">
            <text:p text:style-name="P284">Objecte de la sol·licitud si escau.</text:p>
          </table:table-cell>
        </table:table-row>
        <table:table-row table:style-name="Taula7.21">
          <table:table-cell table:style-name="Taula7.A3" office:value-type="string">
            <text:p text:style-name="P337">transport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342">Número de transport. </text:p>
          </table:table-cell>
        </table:table-row>
        <table:table-row table:style-name="Taula7.21">
          <table:table-cell table:style-name="Taula7.A3" office:value-type="string">
            <text:p text:style-name="P337">transportTipus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SICRES3 del segment internos – tipo transporte.</text:p>
          </table:table-cell>
        </table:table-row>
        <table:table-row table:style-name="Taula7.21">
          <table:table-cell table:style-name="Taula7.A3" office:value-type="string">
            <text:p text:style-name="P337">transportTipus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100</text:p>
          </table:table-cell>
          <table:table-cell table:style-name="Taula7.E37" office:value-type="string">
            <text:p text:style-name="P270">Descripció del segment internos – tipo transporte.</text:p>
          </table:table-cell>
        </table:table-row>
        <table:table-row table:style-name="Taula7.21">
          <table:table-cell table:style-name="Taula7.A3" office:value-type="string">
            <text:p text:style-name="P337">usuari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de l'usuari que vol realitzar l'operació.</text:p>
          </table:table-cell>
        </table:table-row>
        <table:table-row table:style-name="Taula7.21">
          <table:table-cell table:style-name="Taula7.A3" office:value-type="string">
            <text:p text:style-name="P337">usuariNom</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767</text:p>
          </table:table-cell>
          <table:table-cell table:style-name="Taula7.E37" office:value-type="string">
            <text:p text:style-name="P270"><text:span text:style-name="T102">Nom</text:span> de l'usuari que vol realitzar l'operació.</text:p>
          </table:table-cell>
        </table:table-row>
        <table:table-row table:style-name="Taula7.21">
          <table:table-cell table:style-name="Taula7.A3" office:value-type="string">
            <text:p text:style-name="P337">justificantFitxerArxiuUuid</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56</text:p>
          </table:table-cell>
          <table:table-cell table:style-name="Taula7.E40" office:value-type="string">
            <text:p text:style-name="P343">Paràmetre que emmagatzema el uuid del justificant. Serveix per recuperar el justificant des del backoffice.</text:p>
          </table:table-cell>
        </table:table-row>
        <table:table-row table:style-name="Taula7.21">
          <table:table-cell table:style-name="Taula7.A3" office:value-type="string">
            <text:p text:style-name="P356">tramitCodi</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64</text:p>
          </table:table-cell>
          <table:table-cell table:style-name="Taula7.E40" office:value-type="string">
            <text:p text:style-name="P356">Codi del tràmit.</text:p>
          </table:table-cell>
        </table:table-row>
        <table:table-row table:style-name="Taula7.21">
          <table:table-cell table:style-name="Taula7.A3" office:value-type="string">
            <text:p text:style-name="P356">tramitNom</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256</text:p>
          </table:table-cell>
          <table:table-cell table:style-name="Taula7.E40" office:value-type="string">
            <text:p text:style-name="P356">Nom del tràmit.</text:p>
          </table:table-cell>
        </table:table-row>
      </table:table>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930207920">
          <table:table-cell table:style-name="Taula9.A1" table:number-columns-spanned="5" office:value-type="string">
            <text:p text:style-name="P144">AnotacioRegistre<text:span text:style-name="T267">Entrada =&gt; tns:anotacioRegistreBase</text:span></text:p>
          </table:table-cell>
          <table:covered-table-cell/>
          <table:covered-table-cell/>
          <table:covered-table-cell/>
          <table:covered-table-cell/>
        </table:table-row>
        <table:table-row table:style-name="TableLine930208784">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930210512">
          <table:table-cell table:style-name="Taula9.A3" office:value-type="string">
            <text:p text:style-name="P344">destiCodi</text:p>
          </table:table-cell>
          <table:table-cell table:style-name="Taula9.A3" office:value-type="string">
            <text:p text:style-name="P338">Cadena</text:p>
          </table:table-cell>
          <table:table-cell table:style-name="Taula9.A3" office:value-type="string">
            <text:p text:style-name="P262">0..<text:span text:style-name="T266">1</text:span></text:p>
          </table:table-cell>
          <table:table-cell table:style-name="Taula9.D3" office:value-type="float" office:value="21">
            <text:p text:style-name="P341">21</text:p>
          </table:table-cell>
          <table:table-cell table:style-name="Taula9.E4" office:value-type="string">
            <text:p text:style-name="P342">Codi DIR3 de la oficina destí. </text:p>
          </table:table-cell>
        </table:table-row>
        <table:table-row table:style-name="TableLine930212240">
          <table:table-cell table:style-name="Taula9.A3" office:value-type="string">
            <text:p text:style-name="P344">destiDescripcio</text:p>
          </table:table-cell>
          <table:table-cell table:style-name="Taula9.A3" office:value-type="string">
            <text:p text:style-name="P328">Cadena</text:p>
          </table:table-cell>
          <table:table-cell table:style-name="Taula9.A3" office:value-type="string">
            <text:p text:style-name="P262">0..1</text:p>
          </table:table-cell>
          <table:table-cell table:style-name="Taula9.D3" office:value-type="float" office:value="300">
            <text:p text:style-name="P372">300</text:p>
          </table:table-cell>
          <table:table-cell table:style-name="Taula9.E4" office:value-type="string">
            <text:p text:style-name="P342">Descripció de la oficina destí. </text:p>
          </table:table-cell>
        </table:table-row>
      </table:table>
      <text:p text:style-name="P139"/>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930212816">
          <table:table-cell table:style-name="Taula8.A1" table:number-columns-spanned="5" office:value-type="string">
            <text:p text:style-name="P144">anotacioRegistre<text:span text:style-name="T266">Id</text:span></text:p>
          </table:table-cell>
          <table:covered-table-cell/>
          <table:covered-table-cell/>
          <table:covered-table-cell/>
          <table:covered-table-cell/>
        </table:table-row>
        <table:table-row table:style-name="TableLine1144166624">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930214832">
          <table:table-cell table:style-name="Taula8.A3" office:value-type="string">
            <text:p text:style-name="P337">clauAcces</text:p>
          </table:table-cell>
          <table:table-cell table:style-name="Taula8.A3" office:value-type="string">
            <text:p text:style-name="P338">Cadena</text:p>
          </table:table-cell>
          <table:table-cell table:style-name="Taula8.A3" office:value-type="string">
            <text:p text:style-name="P262">0..<text:span text:style-name="T266">1</text:span></text:p>
          </table:table-cell>
          <table:table-cell table:style-name="Taula8.D3">
            <text:p text:style-name="P262"/>
          </table:table-cell>
          <table:table-cell table:style-name="Taula8.E4" office:value-type="string">
            <text:p text:style-name="P347">Clau d’accés per accedir a l’informació. </text:p>
          </table:table-cell>
        </table:table-row>
        <table:table-row table:style-name="Taula8.4">
          <table:table-cell table:style-name="Taula8.A3" office:value-type="string">
            <text:p text:style-name="P337">identificador</text:p>
          </table:table-cell>
          <table:table-cell table:style-name="Taula8.A3" office:value-type="string">
            <text:p text:style-name="P328">Cadena</text:p>
          </table:table-cell>
          <table:table-cell table:style-name="Taula8.A3" office:value-type="string">
            <text:p text:style-name="P262">0..1</text:p>
          </table:table-cell>
          <table:table-cell table:style-name="Taula8.D3">
            <text:p text:style-name="P361"/>
          </table:table-cell>
          <table:table-cell table:style-name="Taula8.E4" office:value-type="string">
            <text:p text:style-name="P347">Identificador de l’usuari per poder accedir a l’informació. </text:p>
          </table:table-cell>
        </table:table-row>
      </table:table>
      <text:p text:style-name="P139"/>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930216848">
          <table:table-cell table:style-name="Taula10.A1" table:number-columns-spanned="5" office:value-type="string">
            <text:p text:style-name="P145">interessatBase</text:p>
          </table:table-cell>
          <table:covered-table-cell/>
          <table:covered-table-cell/>
          <table:covered-table-cell/>
          <table:covered-table-cell/>
        </table:table-row>
        <table:table-row table:style-name="TableLine930217712">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930219440">
          <table:table-cell table:style-name="Taula10.A3" office:value-type="string">
            <text:p text:style-name="P344">adres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49">160</text:p>
          </table:table-cell>
          <table:table-cell table:style-name="Taula10.E4" office:value-type="string">
            <text:p text:style-name="P316">Adreça postal de l’interessat.</text:p>
          </table:table-cell>
        </table:table-row>
        <table:table-row table:style-name="TableLine930221168">
          <table:table-cell table:style-name="Taula10.A3" office:value-type="string">
            <text:p text:style-name="P344">adresaElectronic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73">160</text:p>
          </table:table-cell>
          <table:table-cell table:style-name="Taula10.E4" office:value-type="string">
            <text:p text:style-name="P316">Adreça <text:span text:style-name="T271">electrònica</text:span> de l’interessat.</text:p>
          </table:table-cell>
        </table:table-row>
        <table:table-row table:style-name="TableLine930221744">
          <table:table-cell table:style-name="Taula10.A3" office:value-type="string">
            <text:p text:style-name="P344">canal</text:p>
          </table:table-cell>
          <table:table-cell table:style-name="Taula10.A3" office:value-type="string">
            <text:p text:style-name="P324">Cadena</text:p>
          </table:table-cell>
          <table:table-cell table:style-name="Taula10.A3" office:value-type="string">
            <text:p text:style-name="P262">0..1</text:p>
          </table:table-cell>
          <table:table-cell table:style-name="Taula10.A3" office:value-type="string">
            <text:p text:style-name="P349">2</text:p>
          </table:table-cell>
          <table:table-cell table:style-name="Taula10.E5" office:value-type="string">
            <text:p text:style-name="P270"><text:s/><text:span text:style-name="T272">Codi SICRES del segment interesado – canal</text:span></text:p>
            <text:p text:style-name="P306">preferente de notificación del interesado.</text:p>
          </table:table-cell>
        </table:table-row>
        <table:table-row table:style-name="TableLine930222608">
          <table:table-cell table:style-name="Taula10.A3" office:value-type="string">
            <text:p text:style-name="P344">cp</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5</text:p>
          </table:table-cell>
          <table:table-cell table:style-name="Taula10.E6" office:value-type="string">
            <text:p text:style-name="P350">Codi postal del l’interessat. </text:p>
          </table:table-cell>
        </table:table-row>
        <table:table-row table:style-name="TableLine930223184">
          <table:table-cell table:style-name="Taula10.A3" office:value-type="string">
            <text:p text:style-name="P344">documentNumero</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73">17</text:p>
          </table:table-cell>
          <table:table-cell table:style-name="Taula10.E7" office:value-type="string">
            <text:p text:style-name="P313">Número de document identificatiu.</text:p>
          </table:table-cell>
        </table:table-row>
        <table:table-row table:style-name="TableLine930223760">
          <table:table-cell table:style-name="Taula10.A3" office:value-type="string">
            <text:p text:style-name="P344">documentTipus</text:p>
          </table:table-cell>
          <table:table-cell table:style-name="Taula10.A3" office:value-type="string">
            <text:p text:style-name="P345">documentTipus</text:p>
          </table:table-cell>
          <table:table-cell table:style-name="Taula10.A3" office:value-type="string">
            <text:p text:style-name="P266">0..1</text:p>
          </table:table-cell>
          <table:table-cell table:style-name="Taula10.A3" office:value-type="string">
            <text:p text:style-name="P373">1</text:p>
          </table:table-cell>
          <table:table-cell table:style-name="Taula10.E8" office:value-type="string">
            <text:p text:style-name="P308">Codi SICRES del segment interesado –</text:p>
            <text:p text:style-name="P308">documento de identificacion de interesado tipo.</text:p>
          </table:table-cell>
        </table:table-row>
        <table:table-row table:style-name="TableLine930224336">
          <table:table-cell table:style-name="Taula10.A3" office:value-type="string">
            <text:p text:style-name="P344">emai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3">160</text:p>
          </table:table-cell>
          <table:table-cell table:style-name="Taula10.E9" office:value-type="string">
            <text:p text:style-name="P350">Correu electrònic de l’interessat. </text:p>
          </table:table-cell>
        </table:table-row>
        <table:table-row table:style-name="TableLine930224912">
          <table:table-cell table:style-name="Taula10.A3" office:value-type="string">
            <text:p text:style-name="P344">llinatge1</text:p>
          </table:table-cell>
          <table:table-cell table:style-name="Taula10.A3" office:value-type="string">
            <text:p text:style-name="P278">Cadena</text:p>
          </table:table-cell>
          <table:table-cell table:style-name="Taula10.A3" office:value-type="string">
            <text:p text:style-name="P277"><text:span text:style-name="T264">0..</text:span>1</text:p>
          </table:table-cell>
          <table:table-cell table:style-name="Taula10.A3" office:value-type="string">
            <text:p text:style-name="P349">255</text:p>
          </table:table-cell>
          <table:table-cell table:style-name="Taula10.E10" office:value-type="string">
            <text:p text:style-name="P316">Primer llinatge de l’interessat. Obligatori si és una persona física.</text:p>
          </table:table-cell>
        </table:table-row>
        <table:table-row table:style-name="TableLine930225488">
          <table:table-cell table:style-name="Taula10.A3" office:value-type="string">
            <text:p text:style-name="P344">llinatge2</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255</text:p>
          </table:table-cell>
          <table:table-cell table:style-name="Taula10.E11" office:value-type="string">
            <text:p text:style-name="P316">Segon llinatge de l’interessat.</text:p>
          </table:table-cell>
        </table:table-row>
        <table:table-row table:style-name="TableLine930226064">
          <table:table-cell table:style-name="Taula10.A3" office:value-type="string">
            <text:p text:style-name="P344">municip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2" office:value-type="string">
            <text:p text:style-name="P350">Nom del municipi de la persona. </text:p>
          </table:table-cell>
        </table:table-row>
        <table:table-row table:style-name="TableLine930226640">
          <table:table-cell table:style-name="Taula10.A3" office:value-type="string">
            <text:p text:style-name="P344">municipiCod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3" office:value-type="string">
            <text:p text:style-name="P350">Codi del municipi de la persona. </text:p>
          </table:table-cell>
        </table:table-row>
        <table:table-row table:style-name="TableLine930227216">
          <table:table-cell table:style-name="Taula10.A3" office:value-type="string">
            <text:p text:style-name="P344">nom</text:p>
          </table:table-cell>
          <table:table-cell table:style-name="Taula10.A3" office:value-type="string">
            <text:p text:style-name="P345">Cadena</text:p>
          </table:table-cell>
          <table:table-cell table:style-name="Taula10.A3" office:value-type="string">
            <text:p text:style-name="P277"><text:span text:style-name="T265">0..</text:span>1</text:p>
          </table:table-cell>
          <table:table-cell table:style-name="Taula10.A3" office:value-type="string">
            <text:p text:style-name="P349">255</text:p>
          </table:table-cell>
          <table:table-cell table:style-name="Taula10.E14" office:value-type="string">
            <text:p text:style-name="P316">Nom de l’interessat. Obligatori si és una persona física.</text:p>
          </table:table-cell>
        </table:table-row>
        <table:table-row table:style-name="TableLine930227792">
          <table:table-cell table:style-name="Taula10.A3" office:value-type="string">
            <text:p text:style-name="P327">observacions</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87">160</text:p>
          </table:table-cell>
          <table:table-cell table:style-name="Taula10.E15" office:value-type="string">
            <text:p text:style-name="P350">Observacions a destacar sobre la persona interessada. </text:p>
          </table:table-cell>
        </table:table-row>
        <table:table-row table:style-name="TableLine930228368">
          <table:table-cell table:style-name="Taula10.A3" office:value-type="string">
            <text:p text:style-name="P344">organCodi</text:p>
          </table:table-cell>
          <table:table-cell table:style-name="Taula10.A3" office:value-type="string">
            <text:p text:style-name="P345">Cadena</text:p>
          </table:table-cell>
          <table:table-cell table:style-name="Taula10.A3" office:value-type="string">
            <text:p text:style-name="P277"><text:span text:style-name="T265">0..</text:span>1</text:p>
          </table:table-cell>
          <table:table-cell table:style-name="Taula10.A3" office:value-type="string">
            <text:p text:style-name="P282"/>
          </table:table-cell>
          <table:table-cell table:style-name="Taula10.E16" office:value-type="string">
            <text:p text:style-name="P270"/>
          </table:table-cell>
        </table:table-row>
        <table:table-row table:style-name="TableLine930228944">
          <table:table-cell table:style-name="Taula10.A3" office:value-type="string">
            <text:p text:style-name="P344">pais</text:p>
          </table:table-cell>
          <table:table-cell table:style-name="Taula10.A3" office:value-type="string">
            <text:p text:style-name="P345">Cadena</text:p>
          </table:table-cell>
          <table:table-cell table:style-name="Taula10.A3" office:value-type="string">
            <text:p text:style-name="P277"><text:span text:style-name="T119">0..</text:span>1</text:p>
          </table:table-cell>
          <table:table-cell table:style-name="Taula10.A3" office:value-type="string">
            <text:p text:style-name="P348">100</text:p>
          </table:table-cell>
          <table:table-cell table:style-name="Taula10.E17" office:value-type="string">
            <text:p text:style-name="P306"><text:span text:style-name="T273">Nom</text:span> del País de la persona.</text:p>
          </table:table-cell>
        </table:table-row>
        <table:table-row table:style-name="TableLine930229520">
          <table:table-cell table:style-name="Taula10.A3" office:value-type="string">
            <text:p text:style-name="P344">paisCodi</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48">100</text:p>
          </table:table-cell>
          <table:table-cell table:style-name="Taula10.E18" office:value-type="string">
            <text:p text:style-name="P306">Codi ISO numèric del País de la persona.</text:p>
          </table:table-cell>
        </table:table-row>
        <table:table-row table:style-name="TableLine930230096">
          <table:table-cell table:style-name="Taula10.A3" office:value-type="string">
            <text:p text:style-name="P344">provincia</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100</text:p>
          </table:table-cell>
          <table:table-cell table:style-name="Taula10.E19" office:value-type="string">
            <text:p text:style-name="P306"><text:span text:style-name="T273">Nom</text:span> de la província de la persona.</text:p>
          </table:table-cell>
        </table:table-row>
        <table:table-row table:style-name="TableLine930230672">
          <table:table-cell table:style-name="Taula10.A3" office:value-type="string">
            <text:p text:style-name="P344">provinciaCodi</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4">100</text:p>
          </table:table-cell>
          <table:table-cell table:style-name="Taula10.E20" office:value-type="string">
            <text:p text:style-name="P306">Codi INE de la província de la persona.</text:p>
          </table:table-cell>
        </table:table-row>
        <table:table-row table:style-name="TableLine930231248">
          <table:table-cell table:style-name="Taula10.A3" office:value-type="string">
            <text:p text:style-name="P351">raoSocia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2000</text:p>
          </table:table-cell>
          <table:table-cell table:style-name="Taula10.E22" office:value-type="string">
            <text:p text:style-name="P316">Raó social de l’interessat. Obligatori si és una persona jurídica.</text:p>
          </table:table-cell>
        </table:table-row>
        <table:table-row table:style-name="TableLine930231824">
          <table:table-cell table:style-name="Taula10.A3" office:value-type="string">
            <text:p text:style-name="P351">telefon</text:p>
          </table:table-cell>
          <table:table-cell table:style-name="Taula10.A3" office:value-type="string">
            <text:p text:style-name="P352">Cadena</text:p>
          </table:table-cell>
          <table:table-cell table:style-name="Taula10.A3" office:value-type="string">
            <text:p text:style-name="P353">0..1</text:p>
          </table:table-cell>
          <table:table-cell table:style-name="Taula10.A3" office:value-type="string">
            <text:p text:style-name="P348">20</text:p>
          </table:table-cell>
          <table:table-cell table:style-name="Taula10.E22" office:value-type="string">
            <text:p text:style-name="P347">Telèfon de l’interessat. </text:p>
          </table:table-cell>
        </table:table-row>
        <table:table-row table:style-name="TableLine930232112">
          <table:table-cell table:style-name="Taula10.A3" office:value-type="string">
            <text:p text:style-name="P351">tipus</text:p>
          </table:table-cell>
          <table:table-cell table:style-name="Taula10.A3" office:value-type="string">
            <text:p text:style-name="P352">interessatTipus</text:p>
          </table:table-cell>
          <table:table-cell table:style-name="Taula10.A3" office:value-type="string">
            <text:p text:style-name="P353">0..1</text:p>
          </table:table-cell>
          <table:table-cell table:style-name="Taula10.A3" office:value-type="string">
            <text:p text:style-name="P348">19</text:p>
          </table:table-cell>
          <table:table-cell table:style-name="Taula10.E23" office:value-type="string">
            <text:p text:style-name="P308">Figura jurídica de la persona <text:line-break/>'1' = Administració.</text:p>
            <text:p text:style-name="P308"><text:soft-page-break/>'2' = Persona física.</text:p>
            <text:p text:style-name="P308">'3' = Persona jurídica.</text:p>
          </table:table-cell>
        </table:table-row>
      </table:table>
      <text:p text:style-name="P139"/>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930232688">
          <table:table-cell table:style-name="Taula11.A1" table:number-columns-spanned="5" office:value-type="string">
            <text:p text:style-name="P145">Interessa<text:span text:style-name="T268">t =&gt; tns:interessatBase</text:span></text:p>
          </table:table-cell>
          <table:covered-table-cell/>
          <table:covered-table-cell/>
          <table:covered-table-cell/>
          <table:covered-table-cell/>
        </table:table-row>
        <table:table-row table:style-name="TableLine930233552">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930235280">
          <table:table-cell table:style-name="Taula11.A3" office:value-type="string">
            <text:p text:style-name="P354">representant</text:p>
          </table:table-cell>
          <table:table-cell table:style-name="Taula11.A3" office:value-type="string">
            <text:p text:style-name="P355">representant</text:p>
          </table:table-cell>
          <table:table-cell table:style-name="Taula11.A3" office:value-type="string">
            <text:p text:style-name="P262">0..1</text:p>
          </table:table-cell>
          <table:table-cell table:style-name="Taula11.D3">
            <text:p text:style-name="P262"/>
          </table:table-cell>
          <table:table-cell table:style-name="Taula11.E3" office:value-type="string">
            <text:p text:style-name="P347">Dades de la persona representant descrites amb les mateixes propietats que els interessats. </text:p>
          </table:table-cell>
        </table:table-row>
      </table:table>
      <text:p text:style-name="P258"/>
      <text:list xml:id="list94025981776837" text:continue-numbering="true" text:style-name="Outline">
        <text:list-item>
          <text:list>
            <text:list-item>
              <text:h text:style-name="P411"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9">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3">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239"/>
      <text:p text:style-name="P239">Aquesta dependència ens dona accés a la classe BackofficeIntegracioRestClient que ens permet fer cridades al servei. En el següent fragment de codi es pot veure un exemple de com utilitzar aquesta classe per a fer cridades al servei:</text:p>
      <text:p text:style-name="P110"/>
      <text:p text:style-name="P59"><text:span text:style-name="T55"><text:tab/><text:tab/></text:span><text:span text:style-name="T56">BackofficeIntegracioRestClient </text:span><text:span text:style-name="T83">restClient</text:span><text:span text:style-name="T55"> = BackofficeIntegracioRestClientFactory.</text:span><text:span text:style-name="T58">getRestClient</text:span><text:span text:style-name="T55">(</text:span></text:p>
      <text:p text:style-name="P54"><text:span text:style-name="T55"><text:tab/><text:tab/><text:tab/><text:tab/></text:span><text:span text:style-name="T34">"http://DISTRIB_HOST/distribucioapi/interna"</text:span><text:span text:style-name="T55">,</text:span></text:p>
      <text:p text:style-name="P54"><text:span text:style-name="T55"><text:tab/><text:tab/><text:tab/><text:tab/></text:span><text:span text:style-name="T34">"USERNAME"</text:span><text:span text:style-name="T55">,</text:span></text:p>
      <text:p text:style-name="P54"><text:span text:style-name="T55"><text:tab/><text:tab/><text:tab/><text:tab/></text:span><text:span text:style-name="T34">"PASSWORD"</text:span><text:span text:style-name="T55">);</text:span></text:p>
      <text:p text:style-name="P54"><text:span text:style-name="T55"><text:tab/><text:tab/>AnotacioRegistreId </text:span><text:span text:style-name="T83">id</text:span><text:span text:style-name="T55"> = </text:span><text:span text:style-name="T48">new</text:span><text:span text:style-name="T55"> AnotacioRegistreId(</text:span></text:p>
      <text:p text:style-name="P54"><text:span text:style-name="T55"><text:tab/><text:tab/><text:tab/><text:tab/></text:span><text:span text:style-name="T34">"GOIBE1708001141307/2024"</text:span><text:span text:style-name="T55">,</text:span></text:p>
      <text:p text:style-name="P54"><text:span text:style-name="T55"><text:tab/><text:tab/><text:tab/><text:tab/></text:span><text:span text:style-name="T34">"BYlMBmFPLGJSytavAH325Yjbwqo9xfXhM+wM0vzHxL4="</text:span><text:span text:style-name="T55">);</text:span></text:p>
      <text:p text:style-name="P59"><text:span text:style-name="T55"><text:tab/><text:tab/>AnotacioRegistreEntrada </text:span><text:span text:style-name="T83">anotacio</text:span><text:span text:style-name="T55"> = </text:span><text:span text:style-name="T83">restClient</text:span><text:span text:style-name="T55">.consulta(</text:span><text:span text:style-name="T83">id</text:span><text:span text:style-name="T55">);</text:span></text:p>
      <text:p text:style-name="P113"/>
      <text:p text:style-name="P48"/>
      <text:list xml:id="list94025555194723" text:continue-numbering="true" text:style-name="Outline">
        <text:list-item>
          <text:h text:style-name="P404" text:outline-level="1"><text:bookmark-start text:name="Còpia de __RefNumPara__81017_1680181998 1"/><text:bookmark-start text:name="__RefHeading___Toc227365_390838441"/><text:bookmark-start text:name="Còpia de __RefHeading___Toc160470_1680181998 1"/>Servei de gestió <text:span text:style-name="T331">de regles</text:span><text:bookmark-end text:name="Còpia de __RefNumPara__81017_1680181998 1"/><text:bookmark-end text:name="__RefHeading___Toc227365_390838441"/><text:bookmark-end text:name="Còpia de __RefHeading___Toc160470_1680181998 1"/></text:h>
        </text:list-item>
      </text:list>
      <text:p text:style-name="P236">Aquest servei permet <text:span text:style-name="T319">als backoffices </text:span><text:span text:style-name="T333">gestionar les regles per a la distribució automàtica de les anotacions de registre.</text:span></text:p>
      <text:p text:style-name="P221"><draw:frame draw:style-name="fr3" draw:name="Marc4" text:anchor-type="as-char" svg:width="9.763cm" draw:z-index="77"><draw:text-box fo:min-height="10.636cm"><text:p text:style-name="P231"><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3">C</text:span><text:span text:style-name="T311">asos d'ús </text:span><text:span text:style-name="T332">de gestió </text:span><text:span text:style-name="T313">d</text:span><text:span text:style-name="T333">e regles</text:span><text:span text:style-name="T313"> a </text:span><text:span text:style-name="T311">DISTRIBUCIÓ</text:span></text:p></draw:text-box></draw:frame></text:p>
      <text:p text:style-name="P219"/>
      <text:list xml:id="list94025704420261" text:continue-numbering="true" text:style-name="Outline">
        <text:list-item>
          <text:list>
            <text:list-item>
              <text:h text:style-name="P412"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11">Per tal de facilitar la creació automàtica de regles de tipus enviar a backoffice segons un codi SIA de procediment <text:span text:style-name="T307">DISTRIBUCIO</text:span> ofereix una API REST de creació, <text:s/>consulta i modificació de regles. Les dades bàsiques d'aquesta API REST de regles són les següents:</text:p>
      <text:list xml:id="list73404889" text:style-name="L8">
        <text:list-item>
          <text:p text:style-name="P455">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4">se</text:span></text:a><text:a xlink:type="simple" xlink:href="https://se.caib.es/distribucioapi/interna/regla" text:style-name="Internet_20_link" text:visited-style-name="Visited_20_Internet_20_Link"><text:span text:style-name="T278">.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8">egla</text:span></text:a></text:p>
        </text:list-item>
        <text:list-item>
          <text:p text:style-name="P456">Documentació Swagger: <text:a xlink:type="simple" xlink:href="https://se.caib.es/distribucioapi/interna/api/rest" text:style-name="Internet_20_link" text:visited-style-name="Visited_20_Internet_20_Link"><text:span text:style-name="T277">https://</text:span></text:a><text:a xlink:type="simple" xlink:href="https://se.caib.es/distribucioapi/interna/api/rest" text:style-name="Internet_20_link" text:visited-style-name="Visited_20_Internet_20_Link"><text:span text:style-name="T304">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7">/distribucioapi/interna</text:span></text:a></text:p>
        </text:list-item>
        <text:list-item>
          <text:p text:style-name="P456">Autenticació: WSBASIC</text:p>
        </text:list-item>
        <text:list-item>
          <text:p text:style-name="P456">Rol necessari: DIS_REGLA</text:p>
        </text:list-item>
      </text:list>
      <text:list xml:id="list94024496251154" text:continue-list="list94025704420261" text:style-name="Outline">
        <text:list-item>
          <text:list>
            <text:list-item>
              <text:list>
                <text:list-item>
                  <text:h text:style-name="P422"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201">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9">Crear una regla</text:p>
          </table:table-cell>
          <table:covered-table-cell/>
        </table:table-row>
        <table:table-row table:style-name="TableLine930240752">
          <table:table-cell table:style-name="Taula26.A2" office:value-type="string">
            <text:p text:style-name="P32">URL</text:p>
          </table:table-cell>
          <table:table-cell table:style-name="Taula26.B2" office:value-type="string">
            <text:p text:style-name="P199">http<text:span text:style-name="T318">s</text:span>://<text:span text:style-name="T318">DISTRIB_HOST/distribucioapi/interna</text:span>/regla/add</text:p>
          </table:table-cell>
        </table:table-row>
        <table:table-row table:style-name="TableLine930241616">
          <table:table-cell table:style-name="Taula26.A7" office:value-type="string">
            <text:p text:style-name="P38">Mètode</text:p>
          </table:table-cell>
          <table:table-cell table:style-name="Taula26.B7" office:value-type="string">
            <text:p text:style-name="P216">POST</text:p>
          </table:table-cell>
        </table:table-row>
        <table:table-row table:style-name="TableLine930242480">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930242768">
          <table:table-cell table:style-name="Taula26.A7" office:value-type="string">
            <text:p text:style-name="P38">Autenticació</text:p>
          </table:table-cell>
          <table:table-cell table:style-name="Taula26.B7" office:value-type="string">
            <text:p text:style-name="P376">HTTP Basic</text:p>
          </table:table-cell>
        </table:table-row>
        <table:table-row table:style-name="TableLine930243056">
          <table:table-cell table:style-name="Taula26.A7" office:value-type="string">
            <text:p text:style-name="P38">Rols requerits</text:p>
          </table:table-cell>
          <table:table-cell table:style-name="Taula26.B7" office:value-type="string">
            <text:p text:style-name="P376">DIS_REGLA</text:p>
          </table:table-cell>
        </table:table-row>
        <table:table-row table:style-name="TableLine930243344">
          <table:table-cell table:style-name="Taula26.A7" office:value-type="string">
            <text:p text:style-name="P32">Paràmetres</text:p>
          </table:table-cell>
          <table:table-cell table:style-name="Taula26.B7" office:value-type="string">
            <text:list xml:id="list3285072722" text:style-name="L9">
              <text:list-item>
                <text:p text:style-name="P432"><text:span text:style-name="T42">entitat</text:span><text:span text:style-name="T279">: Codi de l'entitat de DISTRIBUCIO on crear la regla. Típicament per l'entorn del Govern el codi d'entitat és "A04003003".</text:span><text:span text:style-name="T281"> Aquest paràmetre és obligatori.</text:span></text:p>
              </text:list-item>
              <text:list-item>
                <text:p text:style-name="P432"><text:span text:style-name="T42">sia</text:span><text:span text:style-name="T279">: Codi de procediment SIA per crear la regla i aplicar-la a les anotacions que es donin d'alta amb aquest codi</text:span><text:span text:style-name="T308"> </text:span><text:span text:style-name="T279">de procediment.</text:span><text:span text:style-name="T281"> Aquest paràmetre és obligatori.</text:span></text:p>
              </text:list-item>
              <text:list-item>
                <text:p text:style-name="P445">tipusSia<text:span text:style-name="T213">: Codi per indicar si la regla aplica al codi SIA del procediment o del servei. Els possibles valors són 'PROCEDIMENT' i 'SERVEI'. És un paràmetre opcional i per defecte es creen les regles pel SIA del procediment.</text:span></text:p>
              </text:list-item>
              <text:list-item>
                <text:p text:style-name="P432"><text:span text:style-name="T42">backoffice</text:span><text:span text:style-name="T279">: Codi del backoffice pel qual donar d'alta la regla. El backoffice ha d'estar donat d'alta en el manteniment de backoffices a DISTRIBUCIO per l'entitat indicada.</text:span><text:span text:style-name="T281"> Aquest paràmetre és obligatori.</text:span></text:p>
              </text:list-item>
            </text:list>
          </table:table-cell>
        </table:table-row>
        <table:table-row table:style-name="TableLine930243632">
          <table:table-cell table:style-name="Taula26.A8" office:value-type="string">
            <text:p text:style-name="P32">Resultat</text:p>
          </table:table-cell>
          <table:table-cell table:style-name="Taula26.B8" office:value-type="string">
            <text:list xml:id="list3622240812" text:style-name="L10">
              <text:list-item>
                <text:p text:style-name="P437">HTTP 200 <text:span text:style-name="T280">si la regla s'ha creat correctament o ja existia pel mateix backoffice i com a cos <text:s/>de la resposta es retorna el text de missatge de confirmació</text:span>.</text:p>
              </text:list-item>
              <text:list-item>
                <text:p text:style-name="P441">HTTP 404 si l'entitat o el backoffice no es troba per codi.</text:p>
              </text:list-item>
              <text:list-item>
                <text:p text:style-name="P441">HTTP 406 si ja existeix una regla pel mateix codi de procediment però per un altre backoffice.</text:p>
              </text:list-item>
              <text:list-item>
                <text:p text:style-name="P441">HTTP 500 si es produe<text:span text:style-name="T308">i</text:span>x un error intern no controlat creant la regla.</text:p>
              </text:list-item>
            </text:list>
          </table:table-cell>
        </table:table-row>
      </table:table>
      <text:p text:style-name="P200"/>
      <text:list xml:id="list94025571993983" text:continue-list="list94024496251154" text:style-name="Outline">
        <text:list-item>
          <text:list>
            <text:list-item>
              <text:list>
                <text:list-item>
                  <text:h text:style-name="P423"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201">Aquest mètode permet <text:span text:style-name="T333">activar o desactivar una </text:span><text:span text:style-name="T282">regla de tipus enviament a backoffice a partir del codi SIA del procedi</text:span><text:span text:style-name="T308">m</text:span><text:span text:style-name="T282">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9">Canviar estat d’una regla</text:p>
          </table:table-cell>
          <table:covered-table-cell/>
        </table:table-row>
        <table:table-row table:style-name="TableLine930245936">
          <table:table-cell table:style-name="Taula16.A2" office:value-type="string">
            <text:p text:style-name="P32">URL</text:p>
          </table:table-cell>
          <table:table-cell table:style-name="Taula16.B2" office:value-type="string">
            <text:p text:style-name="P199">http<text:span text:style-name="T318">s</text:span>://<text:span text:style-name="T318">DISTRIB_HOST/distribucioapi/interna</text:span>/regla/<text:span text:style-name="T278">canviEstat</text:span></text:p>
          </table:table-cell>
        </table:table-row>
        <table:table-row table:style-name="TableLine930246800">
          <table:table-cell table:style-name="Taula16.A7" office:value-type="string">
            <text:p text:style-name="P38">Mètode</text:p>
          </table:table-cell>
          <table:table-cell table:style-name="Taula16.B7" office:value-type="string">
            <text:p text:style-name="P216">POST</text:p>
          </table:table-cell>
        </table:table-row>
        <table:table-row table:style-name="TableLine930247664">
          <table:table-cell table:style-name="Taula16.A7" office:value-type="string">
            <text:p text:style-name="P32">Descripció</text:p>
          </table:table-cell>
          <table:table-cell table:style-name="Taula16.B7" office:value-type="string">
            <text:p text:style-name="P44"><text:span text:style-name="T333">Canvia l’estat d’una regla donat el codi SIA del procediment</text:span>.</text:p>
          </table:table-cell>
        </table:table-row>
        <table:table-row table:style-name="TableLine930247952">
          <table:table-cell table:style-name="Taula16.A7" office:value-type="string">
            <text:p text:style-name="P38">Autenticació</text:p>
          </table:table-cell>
          <table:table-cell table:style-name="Taula16.B7" office:value-type="string">
            <text:p text:style-name="P376">HTTP Basic</text:p>
          </table:table-cell>
        </table:table-row>
        <text:soft-page-break/>
        <table:table-row table:style-name="TableLine930248240">
          <table:table-cell table:style-name="Taula16.A7" office:value-type="string">
            <text:p text:style-name="P38">Rols requerits</text:p>
          </table:table-cell>
          <table:table-cell table:style-name="Taula16.B7" office:value-type="string">
            <text:p text:style-name="P376">DIS_REGLA</text:p>
          </table:table-cell>
        </table:table-row>
        <table:table-row table:style-name="TableLine930248528">
          <table:table-cell table:style-name="Taula16.A7" office:value-type="string">
            <text:p text:style-name="P32">Paràmetres</text:p>
          </table:table-cell>
          <table:table-cell table:style-name="Taula16.B7" office:value-type="string">
            <text:list xml:id="list94025777632356" text:continue-list="list3285072722" text:style-name="L9">
              <text:list-item>
                <text:p text:style-name="P432"><text:span text:style-name="T42">sia</text:span><text:span text:style-name="T279">: Codi de procediment SIA per </text:span><text:span text:style-name="T282">trobar la regla associada</text:span><text:span text:style-name="T279">.</text:span><text:span text:style-name="T281"> Aquest paràmetre és obligatori.</text:span></text:p>
              </text:list-item>
              <text:list-item>
                <text:p text:style-name="P432"><text:span text:style-name="T47">activa</text:span><text:span text:style-name="T279">: </text:span>Paràmetre opcional <text:span text:style-name="T282">de tipus booleà </text:span>per activar o desactivar la regla. Si on s'especifica es canvia segons el valor que tingui actualment.<text:span text:style-name="T282"> Per exemple </text:span><text:span text:style-name="T137">activa=true</text:span><text:span text:style-name="T169">.</text:span></text:p>
              </text:list-item>
            </text:list>
          </table:table-cell>
        </table:table-row>
        <table:table-row table:style-name="TableLine930248816">
          <table:table-cell table:style-name="Taula16.A8" office:value-type="string">
            <text:p text:style-name="P32">Resultat</text:p>
          </table:table-cell>
          <table:table-cell table:style-name="Taula16.B8" office:value-type="string">
            <text:list xml:id="list3057789024" text:style-name="L11">
              <text:list-item>
                <text:p text:style-name="P438">HTTP 200 <text:span text:style-name="T280">si </text:span><text:span text:style-name="T282">la regla s'ha pogut modificar correctament</text:span>.<text:span text:style-name="T284"> Com a cos del missatge de resposta es retorna el text de confirmació conforme si la regla s'ha activat o desactivat correctament. Per exemple "La regla amb codi 12354 s'ha desactivat correctament.".</text:span></text:p>
              </text:list-item>
              <text:list-item>
                <text:p text:style-name="P442">HTTP <text:span text:style-name="T282">409</text:span> si <text:span text:style-name="T282">no s'ha trobat cap regla el codi de procediment SIA.</text:span></text:p>
              </text:list-item>
              <text:list-item>
                <text:p text:style-name="P442">HTTP 500 si es produe<text:span text:style-name="T308">i</text:span>x un error intern no controlat <text:span text:style-name="T282">modificant</text:span> la regla.</text:p>
              </text:list-item>
            </text:list>
          </table:table-cell>
        </table:table-row>
      </table:table>
      <text:p text:style-name="P201"/>
      <text:list xml:id="list94025867002495" text:continue-list="list94025571993983" text:style-name="Outline">
        <text:list-item>
          <text:list>
            <text:list-item>
              <text:list>
                <text:list-item>
                  <text:h text:style-name="P423"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32">Aquest mètode <text:span text:style-name="T282">permet consultar els detalls d'una regla a partir del codi SIA del procediment. En el cos de la respo</text:span><text:span text:style-name="T308">s</text:span><text:span text:style-name="T282">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80"><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930251696">
          <table:table-cell table:style-name="Taula21.A2" office:value-type="string">
            <text:p text:style-name="P32">URL</text:p>
          </table:table-cell>
          <table:table-cell table:style-name="Taula21.B2" office:value-type="string">
            <text:p text:style-name="P199">http<text:span text:style-name="T318">s</text:span>://<text:span text:style-name="T318">DISTRIB_HOST/distribucioapi/interna</text:span>/regla/consultarRegla</text:p>
          </table:table-cell>
        </table:table-row>
        <table:table-row table:style-name="TableLine930252560">
          <table:table-cell table:style-name="Taula21.A7" office:value-type="string">
            <text:p text:style-name="P38">Mètode</text:p>
          </table:table-cell>
          <table:table-cell table:style-name="Taula21.B7" office:value-type="string">
            <text:p text:style-name="P216">POST</text:p>
          </table:table-cell>
        </table:table-row>
        <table:table-row table:style-name="TableLine930253424">
          <table:table-cell table:style-name="Taula21.A7" office:value-type="string">
            <text:p text:style-name="P32">Descripció</text:p>
          </table:table-cell>
          <table:table-cell table:style-name="Taula21.B7" office:value-type="string">
            <text:p text:style-name="P222">Consulta les regles <text:span text:style-name="T333">que coincideixin amb el codi SIA especificat</text:span>. En principi només hi pot haver una regla de tipus backoffice per codi SIA<text:span text:style-name="T284"> però per compatibilitat es retorna una llista de regles que podrien estar creades pel mateix codi SIA de procediment anteriorment.</text:span></text:p>
          </table:table-cell>
        </table:table-row>
        <table:table-row table:style-name="TableLine930253712">
          <table:table-cell table:style-name="Taula21.A7" office:value-type="string">
            <text:p text:style-name="P38">Autenticació</text:p>
          </table:table-cell>
          <table:table-cell table:style-name="Taula21.B7" office:value-type="string">
            <text:p text:style-name="P376">HTTP Basic</text:p>
          </table:table-cell>
        </table:table-row>
        <table:table-row table:style-name="TableLine930254000">
          <table:table-cell table:style-name="Taula21.A7" office:value-type="string">
            <text:p text:style-name="P38">Rols requerits</text:p>
          </table:table-cell>
          <table:table-cell table:style-name="Taula21.B7" office:value-type="string">
            <text:p text:style-name="P376">DIS_REGLA</text:p>
          </table:table-cell>
        </table:table-row>
        <table:table-row table:style-name="TableLine930254288">
          <table:table-cell table:style-name="Taula21.A7" office:value-type="string">
            <text:p text:style-name="P32">Paràmetres</text:p>
          </table:table-cell>
          <table:table-cell table:style-name="Taula21.B7" office:value-type="string">
            <text:list xml:id="list94024424768462" text:continue-list="list94025777632356" text:style-name="L9">
              <text:list-item>
                <text:p text:style-name="P432"><text:span text:style-name="T195">sia</text:span><text:span text:style-name="T170">: </text:span><text:span text:style-name="T169">Codi SIA de la regla que identifica la regla de tipus backoffice.</text:span></text:p>
              </text:list-item>
            </text:list>
          </table:table-cell>
        </table:table-row>
        <table:table-row table:style-name="TableLine930254576">
          <table:table-cell table:style-name="Taula21.A8" office:value-type="string">
            <text:p text:style-name="P32">Resultat</text:p>
          </table:table-cell>
          <table:table-cell table:style-name="Taula21.B8" office:value-type="string">
            <text:list xml:id="list3873070954" text:style-name="L12">
              <text:list-item>
                <text:p text:style-name="P433"><text:span text:style-name="T279">HTTP 200 </text:span><text:span text:style-name="T280">si </text:span><text:span text:style-name="T282">la regla s'ha pogut </text:span><text:span text:style-name="T283">consultar</text:span><text:span text:style-name="T282"> correctament</text:span><text:span text:style-name="T279">.</text:span><text:span text:style-name="T284"> En el cos del missatge hi ha el JSON amb la llista de regles i els seus detalls, per exemple:</text:span></text:p>
                <text:list>
                  <text:list-item>
                    <text:p text:style-name="P447">Petició:</text:p>
                    <text:list>
                      <text:list-item>
                        <text:p text:style-name="P447">GET https://<text:span text:style-name="T304">se</text:span>.caib.es/distribucioapi/interna/regla/consultarRegla?sia=20220429</text:p>
                      </text:list-item>
                    </text:list>
                  </text:list-item>
                  <text:list-item>
                    <text:p text:style-name="P447">Cos de la resposta</text:p>
                  </text:list-item>
                </text:list>
              </text:list-item>
            </text:list>
            <text:p text:style-name="P209">[</text:p>
            <text:p text:style-name="P209"><text:s text:c="4"/>{</text:p>
            <text:p text:style-name="P209"><text:s text:c="8"/>"id": 1485186,</text:p>
            <text:p text:style-name="P209"><text:s text:c="8"/>"entitat": "Govern de les Illes Balears",</text:p>
            <text:p text:style-name="P209"><text:s text:c="8"/>"data": "13/05/2022 16:51:55",</text:p>
            <text:p text:style-name="P209"><text:s text:c="8"/>"activa": true,</text:p>
            <text:p text:style-name="P209"><text:soft-page-break/><text:s text:c="8"/>"nom": "helium 20220429",</text:p>
            <text:p text:style-name="P210"><text:s text:c="8"/>"tipusSia": "PROCEDIMENT",</text:p>
            <text:p text:style-name="P209"><text:s text:c="8"/>"backofficeDesti": "HELIUM DEV"</text:p>
            <text:p text:style-name="P209"><text:s text:c="4"/>}</text:p>
            <text:p text:style-name="P209">]</text:p>
            <text:list xml:id="list59154713" text:style-name="L13">
              <text:list-item>
                <text:p text:style-name="P448">Els camps de la resposta són els següents:</text:p>
                <text:list>
                  <text:list-item>
                    <text:p text:style-name="P448">id: identificador intern de la regla de tipus long.</text:p>
                  </text:list-item>
                  <text:list-item>
                    <text:p text:style-name="P448">entitat: Descripció de l'entitat de DISTRIBUCIO a la qual pertany la regla. Tipus String.</text:p>
                  </text:list-item>
                  <text:list-item>
                    <text:p text:style-name="P448">data: Data de creació de la regla. String amb format "dd/MM/yyyy HH:mm:ss".</text:p>
                  </text:list-item>
                  <text:list-item>
                    <text:p text:style-name="P448">nom: Nom posat a la regla.</text:p>
                  </text:list-item>
                  <text:list-item>
                    <text:p text:style-name="P448">tipusSia<text:span text:style-name="T336">: Indica si la regla s'aplica pel codi SIA del procediment assignat a l'anotació o pel codi SIA del servei assignat a l'anotació.</text:span><text:span text:style-name="T341"> Els possibles valors són "PROCEDIMENT" o "SERVEI".</text:span></text:p>
                  </text:list-item>
                  <text:list-item>
                    <text:p text:style-name="P448">backofficeDesti: Codi del backoffice al qual es notifiquen les anotacions afectades per la regla.</text:p>
                  </text:list-item>
                </text:list>
              </text:list-item>
              <text:list-item>
                <text:p text:style-name="P443">HTTP <text:span text:style-name="T283">404</text:span> si <text:span text:style-name="T282">no s'ha trobat cap regla el codi de procediment SIA.</text:span></text:p>
              </text:list-item>
            </text:list>
          </table:table-cell>
        </table:table-row>
      </table:table>
      <text:p text:style-name="P201"/>
      <text:list xml:id="list94024864945898" text:continue-list="list94025867002495" text:style-name="Outline">
        <text:list-item>
          <text:list>
            <text:list-item>
              <text:h text:style-name="P412"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40">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3">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156"/>
      <text:p text:style-name="P241">Aquesta dependència ens dona accés a la classe ReglesRestClient que ens permet fer cridades al servei. En el següent fragment de codi es pot veure un exemple de com utilitzar aquesta classe per a fer cridades al servei:</text:p>
      <text:p text:style-name="P111"/>
      <text:p text:style-name="P61"><text:span text:style-name="T55"><text:tab/><text:tab/>ReglesRestClient</text:span><text:span text:style-name="T56"> </text:span><text:span text:style-name="T83">restClient</text:span><text:span text:style-name="T55"> = ReglesRestClientFactory.</text:span><text:span text:style-name="T58">getRestClient</text:span><text:span text:style-name="T55">(</text:span></text:p>
      <text:p text:style-name="P61"><text:soft-page-break/><text:span text:style-name="T55"><text:tab/><text:tab/><text:tab/><text:tab/></text:span><text:span text:style-name="T34">"http://DISTRIB_HOST/distribucioapi/interna"</text:span><text:span text:style-name="T55">,</text:span></text:p>
      <text:p text:style-name="P61"><text:span text:style-name="T55"><text:tab/><text:tab/><text:tab/><text:tab/></text:span><text:span text:style-name="T34">"USERNAME"</text:span><text:span text:style-name="T55">,</text:span></text:p>
      <text:p text:style-name="P61"><text:span text:style-name="T55"><text:tab/><text:tab/><text:tab/><text:tab/></text:span><text:span text:style-name="T34">"PASSWORD"</text:span><text:span text:style-name="T55">);</text:span></text:p>
      <text:p text:style-name="P62"><text:span text:style-name="T55"><text:tab/><text:tab/></text:span><text:span text:style-name="T57">Regla</text:span><text:span text:style-name="T55"> </text:span><text:span text:style-name="T84">regla</text:span><text:span text:style-name="T55"> = </text:span><text:span text:style-name="T83">restClient</text:span><text:span text:style-name="T55">.consulta</text:span><text:span text:style-name="T57">Regla</text:span><text:span text:style-name="T55">(</text:span><text:span text:style-name="T34">"</text:span><text:span text:style-name="T35">CODI_SIA</text:span><text:span text:style-name="T34">"</text:span><text:span text:style-name="T55">);</text:span></text:p>
      <text:p text:style-name="P114"/>
      <text:p text:style-name="P196"/>
      <text:list xml:id="list94024492846872" text:continue-numbering="true" text:style-name="Outline">
        <text:list-item>
          <text:h text:style-name="P405" text:outline-level="1"><text:bookmark-start text:name="__RefHeading___Toc60794_1326387233"/>Llibreria d'utilitats pels backoffices de DISTRIBUCIO<text:bookmark-end text:name="__RefHeading___Toc60794_1326387233"/></text:h>
        </text:list-item>
      </text:list>
      <text:p text:style-name="P135"><text:span text:style-name="T125"><text:s/></text:span>Amb l'objectiu de facilitar la integració dels backoffices amb DISTRIBUCIO <text:span text:style-name="T125">s'ha creat la llibreria </text:span><text:span text:style-name="T127">distribucio-backoffice-utils</text:span><text:span text:style-name="T155"> amb mètodes per facilitar </text:span><text:span text:style-name="T164">tasques comunes dels backoffices per a que s'hagi de fer una implementació específica per cada backoffice com, per exemple, </text:span><text:span text:style-name="T155">traspassar la informació des dels expedients de l'Arxiu de Distribució cap als expedients dins l'Arxiu dels backoffices</text:span><text:span text:style-name="T164"> o extreure dades de documents tècnics de Sistra2.</text:span></text:p>
      <text:p text:style-name="P64"/>
      <text:p text:style-name="P133"><text:span text:style-name="T155"><text:s/>La motivació d'aquesta llibreria és unificar la forma en què els backoffices </text:span><text:span text:style-name="T173">mo</text:span><text:span text:style-name="T178">u</text:span><text:span text:style-name="T173">en la informació des dels expedients de DISTRIBUCIO cap als seus propis expedients dins l'Arxiu. </text:span><text:span text:style-name="T174">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94024755685369" text:continue-numbering="true" text:style-name="Outline">
        <text:list-item>
          <text:list>
            <text:list-item>
              <text:h text:style-name="P416"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39">classes </text:span>interfície<text:span text:style-name="T239">s</text:span> <text:span text:style-name="T154">amb els mètodes de suport pels </text:span><text:span text:style-name="T126">backoffices</text:span><text:span text:style-name="T154"> i classe</text:span><text:span text:style-name="T167">s</text:span><text:span text:style-name="T154"> amb la implementació</text:span><text:span text:style-name="T167">. La llista de classes d'utilitats són les següents:</text:span></text:p>
      <text:p text:style-name="P67"/>
      <text:list xml:id="list237387341" text:style-name="L14">
        <text:list-item>
          <text:p text:style-name="P427"><text:span text:style-name="T135">BackofficeArxiuUtils</text:span><text:span text:style-name="T167">: Aquesta classe d'uilitats conté mètodes per tractar les anotacions i crear un expedient a l'Arxiu del backoffice. </text:span><text:span text:style-name="T184"><text:s/></text:span><text:span text:style-name="T185">C</text:span><text:span text:style-name="T156">onté una referència a la instància del plugin de l'Arxiu </text:span><text:span text:style-name="T128">IArxiuPlugin</text:span><text:span text:style-name="T156"> que emprarà per fer les diferents crides i moure la informació dels expedients de DISTRIBUCIO</text:span><text:span text:style-name="T128"> </text:span><text:span text:style-name="T156">cap a un expedient propi. Així mateix, la llibreria </text:span><text:span text:style-name="T128">distribucio-backoffice-utils.jar</text:span><text:span text:style-name="T156"> utilitza les classes definides en la llibreria client de WS de DISTRIBUCIO</text:span><text:span text:style-name="T128"> distribucio-ws-client.jar.</text:span><text:span text:style-name="T156"> </text:span></text:p>
        </text:list-item>
        <text:list-item>
          <text:p text:style-name="P428">BackofficeSistra2Utils<text:span text:style-name="T154">: Aquesta classe d'utilitats té mètodes per tractar els annexos corresponents a documents tècnics de Sistra2 i extreure'n la informació dels formularis o pagaments.</text:span></text:p>
        </text:list-item>
      </text:list>
      <text:p text:style-name="P67"/>
      <text:p text:style-name="P136"><text:span text:style-name="T154">Com que les utilitats de l'Arxiu empren el plugin d'Arxiu la llibreria té dependències del plugin d'Arxiu </text:span>plugin-arxiu-api.jar<text:span text:style-name="T154"> i de la llibreria de Distribució </text:span><text:span text:style-name="T135">distribucio-ws-client.jar</text:span><text:span text:style-name="T167">. A continuació es mostra el diagrama de blocs de les llibreries relacionades i el </text:span><text:span text:style-name="T135">backoffice</text:span><text:span text:style-name="T167"> que empra la llibreria d'utilitats.</text:span></text:p>
      <text:p text:style-name="P65"/>
      <text:p text:style-name="P163"><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5"><text:line-break/></text:span>Fig. <text:sequence text:ref-name="refFig.2" text:name="Fig." text:formula="ooow:Fig.+1" style:num-format="1">3</text:sequence>: Diagrama de blocks de la llibreria</text:p></draw:text-box></draw:frame><text:soft-page-break/></text:p>
      <text:list xml:id="list94024394438286" text:continue-list="list94024755685369" text:style-name="Outline">
        <text:list-item>
          <text:list>
            <text:list-item>
              <text:h text:style-name="P418" text:outline-level="2"><text:bookmark-start text:name="__RefHeading___Toc50904_2907556958"/>Com incloure la llibreria<text:bookmark-end text:name="__RefHeading___Toc50904_2907556958"/></text:h>
            </text:list-item>
          </text:list>
        </text:list-item>
      </text:list>
      <text:p text:style-name="P68">La llibreria es pot incloure com una dependència maven dins del codi del backoffice de la mateixa forma que s'inclouen les dependències del client del WS de DISTRIBUCIO o de l' API de l'Arxiu.</text:p>
      <text:p text:style-name="P164"><text:span text:style-name="T154">S'ha de tenir en compte la versió específica de la llibreria </text:span><text:span text:style-name="T126">distribucio-backoffice-utils</text:span><text:span text:style-name="T154">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6">maven</text:span><text:span text:style-name="T154">:</text:span></text:p>
      <table:table table:name="Table2" table:style-name="Table2">
        <table:table-column table:style-name="Table2.A"/>
        <table:table-row table:style-name="TableLine930257168">
          <table:table-cell table:style-name="Table2.A1" office:value-type="string">
            <text:p text:style-name="P42"><text:span text:style-name="T18">&lt;</text:span><text:span text:style-name="T23">dependency</text:span><text:span text:style-name="T18">&gt;</text:span></text:p>
            <text:p text:style-name="P55"><text:span text:style-name="T60"><text:tab/></text:span><text:span text:style-name="T18">&lt;</text:span><text:span text:style-name="T23">groupId</text:span><text:span text:style-name="T18">&gt;</text:span><text:span text:style-name="T60">es.caib.distribucio</text:span><text:span text:style-name="T18">&lt;/</text:span><text:span text:style-name="T23">groupId</text:span><text:span text:style-name="T18">&gt;</text:span></text:p>
            <text:p text:style-name="P55"><text:span text:style-name="T60"><text:tab/></text:span><text:span text:style-name="T18">&lt;</text:span><text:span text:style-name="T23">artifactId</text:span><text:span text:style-name="T18">&gt;</text:span><text:span text:style-name="T60">distribucio-backoffice-utils</text:span><text:span text:style-name="T18">&lt;/</text:span><text:span text:style-name="T23">artifactId</text:span><text:span text:style-name="T18">&gt;</text:span></text:p>
            <text:p text:style-name="P55"><text:span text:style-name="T60"><text:tab/></text:span><text:span text:style-name="T18">&lt;</text:span><text:span text:style-name="T23">version</text:span><text:span text:style-name="T18">&gt;</text:span><text:span text:style-name="T60">0.9.</text:span><text:span text:style-name="T62">50</text:span><text:span text:style-name="T18">&lt;/</text:span><text:span text:style-name="T23">version</text:span><text:span text:style-name="T18">&gt;</text:span></text:p>
            <text:p text:style-name="P42"><text:span text:style-name="T18">&lt;/</text:span><text:span text:style-name="T23">dependency</text:span><text:span text:style-name="T18">&gt;</text:span></text:p>
          </table:table-cell>
        </table:table-row>
      </table:table>
      <text:p text:style-name="P68"/>
      <text:p text:style-name="P69">Aquesta llibreria depèn de la llibreria client del WS de DISTRIBUCIO per tractar la informació de DISTRIBUCIO i del plugin d'Arxiu per fer les diferents crides a l'Arxiu.</text:p>
      <text:list xml:id="list94024489935062" text:continue-numbering="true" text:style-name="Outline">
        <text:list-item>
          <text:list>
            <text:list-item>
              <text:h text:style-name="P419" text:outline-level="2"><text:bookmark-start text:name="__RefHeading___Toc366105_93553639"/>Històric<text:bookmark-end text:name="__RefHeading___Toc366105_93553639"/></text:h>
            </text:list-item>
          </text:list>
        </text:list-item>
      </text:list>
      <text:p text:style-name="P174">La llibreria està pensada per anar incorporant noves utilitats i en principi se cercarà la compatibilitat cap a versions anteriors. <text:span text:style-name="T241">La versió de la llibreria coincideix amb la versió de Distribucio en la que es van introduir els canvis. </text:span>L'històric de versions actual és el següent:</text:p>
      <text:list xml:id="list3538926191" text:style-name="L15">
        <text:list-item>
          <text:p text:style-name="P459">0.9.26 Versió inicial de la llibreria amb la classe <text:span text:style-name="T126">BackofficeUtils</text:span><text:span text:style-name="T154"> per traspassar arxius.</text:span></text:p>
        </text:list-item>
        <text:list-item>
          <text:p text:style-name="P457"><text:span text:style-name="T164">0.9.2</text:span><text:span text:style-name="T189">8</text:span><text:span text:style-name="T164"> S'afegeix la classe </text:span><text:span text:style-name="T136">BackofficeSistra2Utils</text:span><text:span text:style-name="T164"> per extreure dades de documents tècnics i es reanomena la classe anterior </text:span><text:span text:style-name="T136">BackofficeUtils </text:span><text:span text:style-name="T164">a</text:span><text:span text:style-name="T136"> BackofficeArxiuUtils</text:span><text:span text:style-name="T164">.</text:span></text:p>
        </text:list-item>
        <text:list-item>
          <text:p text:style-name="P458"><text:soft-page-break/><text:span text:style-name="T164">0.9.</text:span><text:span text:style-name="T317">50</text:span><text:span text:style-name="T164"> </text:span><text:span text:style-name="T316">Modificació per llegir els valors de tipus llista de l'XML de formularis de Sistra2.</text:span><text:span text:style-name="T164">a</text:span><text:span text:style-name="T136"> BackofficeArxiuUtils</text:span><text:span text:style-name="T164">.</text:span></text:p>
        </text:list-item>
      </text:list>
      <text:list xml:id="list94024448151739" text:continue-list="list94024489935062" text:style-name="Outline">
        <text:list-item>
          <text:list>
            <text:list-item>
              <text:h text:style-name="P420" text:outline-level="2"><text:bookmark-start text:name="__RefHeading___Toc366107_93553639"/>Utilitats per l'Arxiu<text:bookmark-end text:name="__RefHeading___Toc366107_93553639"/></text:h>
            </text:list-item>
          </text:list>
        </text:list-item>
      </text:list>
      <text:p text:style-name="P137">La llibreria d'utilitats inclou la classe <text:span text:style-name="T126">BackofficeArxiuUtils</text:span><text:span text:style-name="T154"> amb els mètodes per fer les tasques de crear un expedient a l'Arxiu i </text:span><text:span text:style-name="T179">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6"><text:span text:style-name="T196"><text:s/>La idea és poder crear i moure la informació de l'expedient a l'Arxiu de DISTRIBUCIO cap a l'expedient a l'Arxiu del </text:span><text:span text:style-name="T128">backoffice</text:span><text:span text:style-name="T156"> a partir de la informació consultada amb el client del WS de DISTRIBUCIO quan el </text:span><text:span text:style-name="T128">backoffice</text:span><text:span text:style-name="T156"> rebi una petició d'anotació pendent. D'aquesta forma la interfície </text:span><text:span text:style-name="T128">BackofficeArxiuUtils</text:span><text:span text:style-name="T156"> defineix el mètode </text:span><text:span text:style-name="T138">crearExpedientAmbAnotacioDeRegistre</text:span><text:span text:style-name="T156"> per a fer el seguit de crides necessàries i retornar un resultat que permeti saber com ha anat el resultat. </text:span></text:p>
      <text:p text:style-name="P66"/>
      <text:p text:style-name="P194"><text:span text:style-name="T157">E</text:span><text:span text:style-name="T154">l mètode </text:span><text:span text:style-name="T126">crearExpedientAmbAnotacioRegistre</text:span><text:span text:style-name="T154"> s'encarrergarà, mitjançant la informació proporcionada, de realitzar les següents crides a l'Arxiu:</text:span></text:p>
      <text:list xml:id="list3809823548" text:style-name="L16">
        <text:list-item>
          <text:p text:style-name="P397"><text:span text:style-name="T158">Si no s'informa la propietat o paràmetre </text:span><text:span text:style-name="T129">identificador </text:span><text:span text:style-name="T158">llavors es c</text:span><text:span text:style-name="T154">rear</text:span><text:span text:style-name="T158">à</text:span><text:span text:style-name="T154"> el nou expedient a l'arxiu fent una cridada al mètode </text:span><text:span text:style-name="T126">expedientCrear</text:span><text:span text:style-name="T129"> </text:span><text:span text:style-name="T158">amb la infomració de l'expedient passada com a paràmetre</text:span><text:span text:style-name="T154">.</text:span><text:span text:style-name="T159"> Si es detecta que ja està creat llavors continua.</text:span></text:p>
        </text:list-item>
        <text:list-item>
          <text:p text:style-name="P398">Crear els interessats en l'expedient de l'arxiu fent una cridada al mètode <text:span text:style-name="T126">expedientModificar</text:span>.<text:span text:style-name="T197"> Es comprovarà si l'expedient ja conté els interessats.</text:span></text:p>
        </text:list-item>
        <text:list-item>
          <text:p text:style-name="P398">Crear una nova carpeta a dins l'expedient de destí que contendrà tots els annexos de l'anotació de registre (aquesta passa és opcional i només es fa si hi ha un paràmetre activat).<text:span text:style-name="T197"> Primer es comprova si la carpeta ja està creada.</text:span></text:p>
        </text:list-item>
        <text:list-item>
          <text:p text:style-name="P397"><text:span text:style-name="T154">Moure el document annex des de l'expedient de l'anotació de registre cap al nou expedient creat emprant el mètode </text:span><text:span text:style-name="T126">documentMoure</text:span><text:span text:style-name="T154">. Com que l'expedient d'origen i el de destí pertanyen a sèries documentals diferents això provocarà una cridada al servei dispatchDocument de l'API REST de l'arxiu.</text:span><text:span text:style-name="T159"> S'ha de comprovar si l'annex s'ha mogut prèviament.</text:span></text:p>
        </text:list-item>
      </text:list>
      <text:p text:style-name="P138"><text:span text:style-name="T184">Com que el mètode pot haver produït un error en el transcurs de les crides anteriors </text:span><text:span text:style-name="T186">internament </text:span><text:span text:style-name="T184">es faran les comprovacions necessàries en cada pas per rependre l'execució del mètode.</text:span><text:span text:style-name="T186"> Així doncs, el backoffice integrador podrà reintentar el processament de l'anotació tornant a invocar el mètode amb els mateixos paràmetres amb l'excepció de la creació de l'expedient, ja que el </text:span><text:span text:style-name="T145">backoffice </text:span><text:span text:style-name="T187">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94024419876514" text:continue-list="list94024448151739" text:style-name="Outline">
        <text:list-item>
          <text:list>
            <text:list-item>
              <text:list>
                <text:list-item>
                  <text:h text:style-name="P424" text:outline-level="3"><text:bookmark-start text:name="__RefHeading___Toc50906_2907556958"/><text:soft-page-break/><text:span text:style-name="T198">P</text:span>aràmetres<text:bookmark-end text:name="__RefHeading___Toc50906_2907556958"/></text:h>
                </text:list-item>
              </text:list>
            </text:list-item>
          </text:list>
        </text:list-item>
      </text:list>
      <text:p text:style-name="P165">La classe <text:span text:style-name="T126">BackofficeArxiuUtils</text:span><text:span text:style-name="T154"> es pot configurar a través dels seus mètodes. Els paràmetres són els següents:</text:span></text:p>
      <text:list xml:id="list3785941412" text:style-name="L17">
        <text:list-item>
          <text:p text:style-name="P460">iArxiuPlugin: </text:p>
          <text:p text:style-name="P461"><text:span text:style-name="T154">És un paràmetre obligatori que s'ha d'especificar a través del constructor </text:span><text:span text:style-name="T126">BackofficeArxiuUtilsImpl(IArxiuPlugin)</text:span><text:span text:style-name="T154"> o a través del métode </text:span><text:span text:style-name="T126">setIArxiuPlugin(IArxiuPlugin)</text:span><text:span text:style-name="T154">. Serveix per tenir referència a la instància de l'API de l'Arxiu i poder fer les crides necessàries per a la creació, modificació i consulta de la informació de l'Arxiu.</text:span></text:p>
        </text:list-item>
        <text:list-item>
          <text:p text:style-name="P460">carpeta:</text:p>
          <text:p text:style-name="P461"><text:span text:style-name="T154">La definició de la carpeta és opcional. Si es fixa un valor per a la carpeta llavors durant les crides es crearà una carpeta on guardar els annexos de l'anotació de registre. És útil quan l'expedient del </text:span><text:span text:style-name="T126">backoffice</text:span><text:span text:style-name="T154"> pot estar relacionat amb diferents anotacions de registre i es vol separar els annexos de les diferents anotacions. Per fixar el nom de la carpeta es pot fer mitjançant el métode </text:span><text:span text:style-name="T126">setCarpeta(String)</text:span><text:span text:style-name="T154">.</text:span></text:p>
        </text:list-item>
        <text:list-item>
          <text:p text:style-name="P460">arxiuPluginListener:</text:p>
          <text:p text:style-name="P461"><text:span text:style-name="T154">A fi de poder controlar les diferents crides que es fan a l'Arxiu la interfície </text:span><text:span text:style-name="T126">BackofficeArxiuUtils</text:span><text:span text:style-name="T154"> permet</text:span><text:span text:style-name="T165"> opcionament</text:span><text:span text:style-name="T154"> fixar una instància que implementi la interfície </text:span><text:span text:style-name="T126">ArxiuPluginListener</text:span><text:span text:style-name="T154">. Cada cop que es cridi a l'Arxiu s'invocarà al mètode </text:span><text:span text:style-name="T126">event</text:span><text:span text:style-name="T154"> de la instància per a que l'aplicació del </text:span><text:span text:style-name="T126">backoffice </text:span><text:span text:style-name="T154">pugui monitoritzar la integració amb l'Arxiu amb la informació dels mètodes invocats, els paràmetres més descriptius, si hi ha hagut error i el temps total de processament en ms. El métode per fixar la instància és </text:span><text:span text:style-name="T130">setArxiuPluginListener(ArxiuPluginListener) </text:span><text:span text:style-name="T160">i l</text:span><text:span text:style-name="T154">a interfície que ha d'implementar la instància és la següent:</text:span></text:p>
        </text:list-item>
      </text:list>
      <table:table table:name="Table3" table:style-name="Table3">
        <table:table-column table:style-name="Table3.A"/>
        <table:table-row table:style-name="TableLine930258896">
          <table:table-cell table:style-name="Table3.A1" office:value-type="string">
            <text:p text:style-name="P42"><text:span text:style-name="T50">package</text:span><text:span text:style-name="T60"> es.caib.distribucio.backoffice.utils;</text:span></text:p>
            <text:p text:style-name="P183"/>
            <text:p text:style-name="P55"><text:span text:style-name="T50">import</text:span><text:span text:style-name="T60"> java.util.Map;</text:span></text:p>
            <text:p text:style-name="P183"/>
            <text:p text:style-name="P55"><text:span text:style-name="T200">/** </text:span><text:span text:style-name="T201">Interfície</text:span><text:span text:style-name="T200"> a </text:span><text:span text:style-name="T201">implementar</text:span><text:span text:style-name="T200"> </text:span><text:span text:style-name="T201">si</text:span><text:span text:style-name="T200"> </text:span><text:span text:style-name="T201">es</text:span><text:span text:style-name="T200"> </text:span><text:span text:style-name="T201">vol</text:span><text:span text:style-name="T200"> </text:span><text:span text:style-name="T201">estar</text:span><text:span text:style-name="T200"> </text:span><text:span text:style-name="T201">informat</text:span><text:span text:style-name="T200"> </text:span><text:span text:style-name="T201">de</text:span><text:span text:style-name="T200"> </text:span><text:span text:style-name="T201">les</text:span><text:span text:style-name="T200"> </text:span><text:span text:style-name="T201">peticions</text:span><text:span text:style-name="T200"> </text:span><text:span text:style-name="T201">que</text:span><text:span text:style-name="T200"> </text:span><text:span text:style-name="T201">es</text:span><text:span text:style-name="T200"> fan a l'Arxiu</text:span></text:p>
            <text:p text:style-name="P132"><text:s/>* </text:p>
            <text:p text:style-name="P132"><text:s/>*/</text:p>
            <text:p text:style-name="P55"><text:span text:style-name="T50">public</text:span><text:span text:style-name="T60"> </text:span><text:span text:style-name="T50">interface</text:span><text:span text:style-name="T60"> </text:span><text:span text:style-name="T61">ArxiuPluginListener</text:span><text:span text:style-name="T60"> {<text:tab/></text:span></text:p>
            <text:p text:style-name="P83"><text:tab/></text:p>
            <text:p text:style-name="P55"><text:span text:style-name="T60"><text:tab/></text:span><text:span text:style-name="T200">/** </text:span><text:span text:style-name="T201">Mètode</text:span><text:span text:style-name="T200"> per </text:span><text:span text:style-name="T201">notificar</text:span><text:span text:style-name="T200"> </text:span><text:span text:style-name="T201">les</text:span><text:span text:style-name="T200"> </text:span><text:span text:style-name="T201">crides</text:span><text:span text:style-name="T200"> </text:span><text:span text:style-name="T201">fetes</text:span><text:span text:style-name="T200"> a l'arxiu, els </text:span><text:span text:style-name="T201">paràmetres</text:span><text:span text:style-name="T200">, el </text:span><text:span text:style-name="T201">resultat</text:span><text:span text:style-name="T200"> i el </text:span><text:span text:style-name="T201">temps</text:span><text:span text:style-name="T200"> </text:span><text:span text:style-name="T201">de</text:span><text:span text:style-name="T200"> </text:span><text:span text:style-name="T201">la</text:span><text:span text:style-name="T200"> </text:span><text:span text:style-name="T201">petició</text:span></text:p>
            <text:p text:style-name="P132"><text:tab/> * </text:p>
            <text:p text:style-name="P55"><text:span text:style-name="T200"><text:tab/> * </text:span><text:span text:style-name="T203">@param</text:span><text:span text:style-name="T200"> metode</text:span></text:p>
            <text:p text:style-name="P55"><text:span text:style-name="T200"><text:tab/> * <text:tab/><text:tab/><text:tab/></text:span><text:span text:style-name="T201">Mètode</text:span><text:span text:style-name="T200"> </text:span><text:span text:style-name="T201">invocat</text:span></text:p>
            <text:p text:style-name="P55"><text:span text:style-name="T200"><text:tab/> * </text:span><text:span text:style-name="T203">@param</text:span><text:span text:style-name="T200"> parametres</text:span></text:p>
            <text:p text:style-name="P55"><text:span text:style-name="T200"><text:tab/> * <text:tab/><text:tab/><text:tab/></text:span><text:span text:style-name="T201">Paràmetres</text:span><text:span text:style-name="T200"> </text:span><text:span text:style-name="T201">més</text:span><text:span text:style-name="T200"> </text:span><text:span text:style-name="T201">representatius</text:span></text:p>
            <text:p text:style-name="P55"><text:span text:style-name="T200"><text:tab/> * </text:span><text:span text:style-name="T203">@param</text:span><text:span text:style-name="T200"> correcte</text:span></text:p>
            <text:p text:style-name="P55"><text:span text:style-name="T200"><text:tab/> * <text:tab/><text:tab/><text:tab/></text:span><text:span text:style-name="T201">Resultat</text:span><text:span text:style-name="T200"> </text:span><text:span text:style-name="T201">correcte</text:span></text:p>
            <text:p text:style-name="P55"><text:span text:style-name="T200"><text:tab/> * </text:span><text:span text:style-name="T203">@param</text:span><text:span text:style-name="T200"> error</text:span></text:p>
            <text:p text:style-name="P55"><text:soft-page-break/><text:span text:style-name="T200"><text:tab/> * <text:tab/><text:tab/><text:tab/></text:span><text:span text:style-name="T201">Descripció</text:span><text:span text:style-name="T200"> </text:span><text:span text:style-name="T201">de</text:span><text:span text:style-name="T200"> l'error </text:span><text:span text:style-name="T201">en</text:span><text:span text:style-name="T200"> </text:span><text:span text:style-name="T201">cas</text:span><text:span text:style-name="T200"> d'error</text:span></text:p>
            <text:p text:style-name="P55"><text:span text:style-name="T200"><text:tab/> * </text:span><text:span text:style-name="T203">@param</text:span><text:span text:style-name="T200"> e</text:span></text:p>
            <text:p text:style-name="P55"><text:span text:style-name="T200"><text:tab/> * <text:tab/><text:tab/><text:tab/></text:span><text:span text:style-name="T201">Excepció</text:span><text:span text:style-name="T200"> </text:span><text:span text:style-name="T201">en</text:span><text:span text:style-name="T200"> </text:span><text:span text:style-name="T201">cas</text:span><text:span text:style-name="T200"> </text:span><text:span text:style-name="T201">de</text:span><text:span text:style-name="T200"> </text:span><text:span text:style-name="T201">produir</text:span><text:span text:style-name="T205">-</text:span><text:span text:style-name="T201">se</text:span><text:span text:style-name="T200"> </text:span><text:span text:style-name="T201">una</text:span><text:span text:style-name="T200"> </text:span><text:span text:style-name="T201">excepció</text:span></text:p>
            <text:p text:style-name="P55"><text:span text:style-name="T200"><text:tab/> * </text:span><text:span text:style-name="T203">@param</text:span><text:span text:style-name="T200"> timeMs</text:span></text:p>
            <text:p text:style-name="P55"><text:span text:style-name="T200"><text:tab/> * <text:tab/><text:tab/><text:tab/></text:span><text:span text:style-name="T201">Temps</text:span><text:span text:style-name="T200"> </text:span><text:span text:style-name="T201">en</text:span><text:span text:style-name="T200"> </text:span><text:span text:style-name="T201">ms</text:span><text:span text:style-name="T200"> </text:span><text:span text:style-name="T201">transcorreguts</text:span><text:span text:style-name="T200"> </text:span><text:span text:style-name="T201">en</text:span><text:span text:style-name="T200"> </text:span><text:span text:style-name="T201">la</text:span><text:span text:style-name="T200"> </text:span><text:span text:style-name="T201">crida</text:span></text:p>
            <text:p text:style-name="P132"><text:tab/> */</text:p>
            <text:p text:style-name="P55"><text:span text:style-name="T60"><text:tab/></text:span><text:span text:style-name="T50">public</text:span><text:span text:style-name="T60"> </text:span><text:span text:style-name="T50">void</text:span><text:span text:style-name="T60"> event(String </text:span><text:span text:style-name="T86">metode</text:span><text:span text:style-name="T60">, Map&lt;String, String&gt; </text:span><text:span text:style-name="T86">parametres</text:span><text:span text:style-name="T60">, </text:span><text:span text:style-name="T50">boolean</text:span><text:span text:style-name="T60"> </text:span><text:span text:style-name="T86">correcte</text:span><text:span text:style-name="T60">, String </text:span><text:span text:style-name="T86">error</text:span><text:span text:style-name="T60">, Exception </text:span><text:span text:style-name="T86">e</text:span><text:span text:style-name="T60">, </text:span><text:span text:style-name="T50">long</text:span><text:span text:style-name="T60"> </text:span><text:span text:style-name="T86">timeMs</text:span><text:span text:style-name="T60">);</text:span></text:p>
            <text:p text:style-name="P183"/>
            <text:p text:style-name="P82">}</text:p>
          </table:table-cell>
        </table:table-row>
      </table:table>
      <text:p text:style-name="P70"/>
      <text:list xml:id="list94025028090462" text:continue-list="list94024419876514" text:style-name="Outline">
        <text:list-item>
          <text:list>
            <text:list-item>
              <text:list>
                <text:list-item>
                  <text:h text:style-name="P424" text:outline-level="3"><text:bookmark-start text:name="__RefHeading___Toc50908_2907556958"/><text:span text:style-name="T198">Ús de </text:span><text:span text:style-name="T232">B</text:span><text:span text:style-name="T233">ackofficeArxiuUtils</text:span><text:bookmark-end text:name="__RefHeading___Toc50908_2907556958"/></text:h>
                </text:list-item>
              </text:list>
            </text:list-item>
          </text:list>
        </text:list-item>
      </text:list>
      <text:p text:style-name="P134"><text:span text:style-name="T206">Per utilitzar la </text:span><text:span text:style-name="T234">classe</text:span><text:span text:style-name="T141"> BackofficeArxiuUtils</text:span><text:span text:style-name="T178"> amb les u</text:span><text:span text:style-name="T182">t</text:span><text:span text:style-name="T178">ilitats per l'A</text:span><text:span text:style-name="T180">r</text:span><text:span text:style-name="T178">xiu</text:span><text:span text:style-name="T131"> </text:span><text:span text:style-name="T206">s'ha de crear un objecte de la classe </text:span><text:span text:style-name="T131">BackofficeArxiuUtilsImpl</text:span><text:span text:style-name="T161"> amb la referència al plugin d'Arxiu </text:span><text:span text:style-name="T131">IPluginArxiu</text:span><text:span text:style-name="T161">, consultar el detall de l'anotació de registre mitjançant la llibreria del client de WS de DISTRIBUCIO </text:span><text:span text:style-name="T131">distribucio-ws-client</text:span><text:span text:style-name="T161"> i invocar el mètode <text:s/></text:span><text:span text:style-name="T138">crearExpedientAmbAnotacioDeRegistre</text:span><text:span text:style-name="T131"> </text:span><text:span text:style-name="T162">amb la informació de l'expedient a crear o a modificar.</text:span><text:span text:style-name="T163">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5">passades com a paràmetres</text:span><text:span text:style-name="T163">.</text:span><text:span text:style-name="T162">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6"><text:span text:style-name="T162">A</text:span><text:span text:style-name="T154"> continuació es mostra el diagrama de classes pel resultat de la crida.</text:span></text:p>
      <text:p text:style-name="P71"><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5"><text:line-break/></text:span>Fig. <text:sequence text:ref-name="refFig.3" text:name="Fig." text:formula="ooow:Fig.+1" style:num-format="1">4</text:sequence>: Classes per contenir el resultat de la crida al mètode crearExpedientAmbAnotacioDeRegistre.</text:p></draw:text-box></draw:frame><text:soft-page-break/></text:p>
      <text:p text:style-name="P134"><text:span text:style-name="T176">S</text:span><text:span text:style-name="T177">i el mètode falla en la creació de l'expedient o el traspàs dels interessats llavors el resultat contindrà l'error i els annexos no s'hauran traspassat.</text:span></text:p>
      <text:p text:style-name="P134"><text:span text:style-name="T177">Quan es traspassin els diferents annexos s'anirà informant el resultat per cada annex. L'usuari de la llibreria podrà consultar el resultat a partir del seu identificador d'Arxiu uuid original a partir del mètode </text:span><text:span text:style-name="T140">ArxiuResultat.getResultatAnnex(String uuid) </text:span><text:span text:style-name="T177">i obtenir el nou per en l'objecte</text:span><text:span text:style-name="T140"> ArxiuResultatAnnex</text:span><text:span text:style-name="T177"> amb el mètode getIdentificador</text:span><text:span text:style-name="T140">()</text:span><text:span text:style-name="T177">. L'objecte de tipus </text:span><text:span text:style-name="T140">ArxiuResultatAnnex</text:span><text:span text:style-name="T177"> conté l'identificador de l'arxiu si s'ha mogut o existia, l'acció realitzada o la descripció de l'error en el cas que no s'hagi pogut moure. </text:span></text:p>
      <text:p text:style-name="P167"><text:span text:style-name="T172">L'aplicació </text:span><text:span text:style-name="T139">backoffice </text:span><text:span text:style-name="T172">ha d'implementar la seva lògica pròpia per incorporar la informació dels annexos en el seu propi sistema.</text:span></text:p>
      <text:list xml:id="list94024071070055" text:continue-numbering="true" text:style-name="Outline">
        <text:list-item>
          <text:list>
            <text:list-item>
              <text:list>
                <text:list-item>
                  <text:h text:style-name="P424" text:outline-level="3"><text:bookmark-start text:name="__RefHeading___Toc50910_2907556958"/>Exemple Java<text:bookmark-end text:name="__RefHeading___Toc50910_2907556958"/></text:h>
                </text:list-item>
              </text:list>
            </text:list-item>
          </text:list>
        </text:list-item>
      </text:list>
      <text:p text:style-name="P168">En el següent exemple de codi es mostra una imlementació del WS <text:span text:style-name="T207">de backoffice de DISTRIBUCIO que rep peticions d'anotacions pendents des de DISTRIBUCIO i les processa amb la llibreria d'utilitats. El codi sencer es pot consultar a l' </text:span><text:span text:style-name="T207"><text:bookmark-ref text:reference-format="text" text:ref-name="__RefHeading___Toc60796_1326387233">Annex II: Exemple d'ús de la llibreria de distribucio-backoffice-utils</text:bookmark-ref></text:span><text:span text:style-name="T207">.</text:span></text:p>
      <text:p text:style-name="P169">La classe per a l'exemple és la implementació del WS que rep<text:span text:style-name="T208"> anotacions pendents de registre i té una referència al client del WS d'integració de DISTRIBUCIO per consultar anotacions i una instància del plugin de l'API de l'Arxiu.</text:span></text:p>
      <text:p text:style-name="P28">taula.<text:span text:style-name="T209"> Classe de proves per rebre peticions de WS en el mètode </text:span><text:span text:style-name="T149">comunicarAnotacionsPendents</text:span><text:span text:style-name="T209">.</text:span></text:p>
      <table:table table:name="Table5" table:style-name="Table5">
        <table:table-column table:style-name="Table5.A"/>
        <text:soft-page-break/>
        <table:table-row table:style-name="TableLine930260624">
          <table:table-cell table:style-name="Table5.A1" office:value-type="string">
            <text:p text:style-name="P115">@Component</text:p>
            <text:p text:style-name="P119"><text:span text:style-name="T109">@WebService</text:span><text:span text:style-name="T59">(</text:span></text:p>
            <text:p text:style-name="P119"><text:span text:style-name="T59"><text:tab/><text:tab/>name = </text:span><text:span text:style-name="T36">"Backoffice"</text:span><text:span text:style-name="T59">,</text:span></text:p>
            <text:p text:style-name="P119"><text:span text:style-name="T59"><text:tab/><text:tab/>serviceName = </text:span><text:span text:style-name="T36">"BackofficeService"</text:span><text:span text:style-name="T59">,</text:span></text:p>
            <text:p text:style-name="P119"><text:span text:style-name="T59"><text:tab/><text:tab/>portName = </text:span><text:span text:style-name="T36">"BackofficeServicePort"</text:span><text:span text:style-name="T59">,</text:span></text:p>
            <text:p text:style-name="P119"><text:span text:style-name="T59"><text:tab/><text:tab/>endpointInterface = </text:span><text:span text:style-name="T36">"es.caib.ripea.core.api.service.ws.BackofficeWsServiceBean"</text:span><text:span text:style-name="T59">,</text:span></text:p>
            <text:p text:style-name="P119"><text:span text:style-name="T59"><text:tab/><text:tab/>targetNamespace = </text:span><text:span text:style-name="T36">"http://www.caib.es/distribucio/ws/backoffice"</text:span><text:span text:style-name="T59">)</text:span></text:p>
            <text:p text:style-name="P119"><text:span text:style-name="T51">public</text:span><text:span text:style-name="T59"> </text:span><text:span text:style-name="T51">class</text:span><text:span text:style-name="T59"> BackofficeWsServiceImpl </text:span><text:span text:style-name="T51">implements</text:span><text:span text:style-name="T59"> BackofficeWsService, </text:span></text:p>
            <text:p text:style-name="P92"><text:tab/><text:tab/><text:tab/><text:tab/><text:tab/><text:tab/><text:tab/><text:tab/><text:tab/><text:tab/><text:tab/><text:tab/>ArxiuPluginListener {</text:p>
            <text:p text:style-name="P92"><text:tab/></text:p>
            <text:p text:style-name="P119"><text:span text:style-name="T59"><text:tab/></text:span><text:span text:style-name="T199">/** </text:span><text:span text:style-name="T202">Instància</text:span><text:span text:style-name="T199"> </text:span><text:span text:style-name="T202">del</text:span><text:span text:style-name="T199"> </text:span><text:span text:style-name="T202">plugin</text:span><text:span text:style-name="T199"> d'Arxiu */</text:span></text:p>
            <text:p text:style-name="P119"><text:span text:style-name="T59"><text:tab/></text:span><text:span text:style-name="T51">private</text:span><text:span text:style-name="T59"> IArxiuPlugin </text:span><text:span text:style-name="T79">arxiuPlugin</text:span><text:span text:style-name="T59"> = </text:span><text:span text:style-name="T51">null</text:span><text:span text:style-name="T59">;</text:span></text:p>
            <text:p text:style-name="P92"><text:tab/><text:tab/></text:p>
            <text:p text:style-name="P119"><text:span text:style-name="T59"><text:tab/></text:span><text:span text:style-name="T199">/** </text:span><text:span text:style-name="T202">Mètode</text:span><text:span text:style-name="T199"> </text:span><text:span text:style-name="T202">del</text:span><text:span text:style-name="T199"> WS </text:span><text:span text:style-name="T202">que</text:span><text:span text:style-name="T199"> </text:span><text:span text:style-name="T202">rep</text:span><text:span text:style-name="T199"> </text:span><text:span text:style-name="T202">les</text:span><text:span text:style-name="T199"> </text:span><text:span text:style-name="T202">comunicacions</text:span><text:span text:style-name="T199"> d'anotacions </text:span><text:span text:style-name="T202">pendents</text:span><text:span text:style-name="T199">. */</text:span></text:p>
            <text:p text:style-name="P119"><text:span text:style-name="T59"><text:tab/></text:span><text:span text:style-name="T109">@Override</text:span></text:p>
            <text:p text:style-name="P117"><text:span text:style-name="T59"><text:tab/></text:span><text:span text:style-name="T51">public</text:span><text:span text:style-name="T59"> </text:span><text:span text:style-name="T51">void</text:span><text:span text:style-name="T59"> </text:span><text:span text:style-name="T63">comunicarAnotacionsPendents</text:span><text:span text:style-name="T59">(List&lt;AnotacioRegistreId&gt; </text:span><text:span text:style-name="T85">ids</text:span><text:span text:style-name="T59">) {</text:span></text:p>
            <text:p text:style-name="P117"><text:span text:style-name="T59"><text:tab/><text:tab/></text:span><text:span text:style-name="T64">....</text:span></text:p>
            <text:p text:style-name="P88"><text:tab/>}</text:p>
            <text:p text:style-name="P88"><text:tab/>...</text:p>
            <text:p text:style-name="P88">}</text:p>
          </table:table-cell>
        </table:table-row>
      </table:table>
      <text:p text:style-name="P169"/>
      <text:p text:style-name="P134"><text:span text:style-name="T208">Dins del mètode <text:s/></text:span><text:span text:style-name="T150">comunicarAnotacionsPendents</text:span><text:span text:style-name="T190"> instancia el client del WS d'integració amb el Backoffice i el plugin de l'API de l'Arxiu</text:span><text:span text:style-name="T192"> i consulta l'anotació del registre d'entrada. En la següent porció de codi es pot veure com es crea l'objecte per a la llibreria d'utilitats del backoffice amb la referència al plugin d'Arxiu.</text:span></text:p>
      <text:p text:style-name="P28"><text:span text:style-name="T172">taula.</text:span><text:span text:style-name="T191"> Creació de l'objecte passant l'API d'Arxiu al constructor.</text:span></text:p>
      <table:table table:name="Table6" table:style-name="Table6">
        <table:table-column table:style-name="Table6.A"/>
        <table:table-row table:style-name="TableLine930261488">
          <table:table-cell table:style-name="Table6.A1" office:value-type="string">
            <text:p text:style-name="P121"><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22"><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22"><text:span text:style-name="T59">BackofficeArxiuUtils </text:span><text:span text:style-name="T85">backoffice</text:span><text:span text:style-name="T92">Arxiu</text:span><text:span text:style-name="T85">Utils</text:span><text:span text:style-name="T59"> = </text:span><text:span text:style-name="T49">new</text:span><text:span text:style-name="T59"> BackofficeArxiuUtilsImpl(getArxiuPlugin());</text:span></text:p>
          </table:table-cell>
        </table:table-row>
      </table:table>
      <text:p text:style-name="P78"/>
      <text:p text:style-name="P77">La llibreria permet fixar el nom de la carpeta on es guardaran els annexos i un objecte de tipus <text:span text:style-name="T126">ArxiuPluginListener</text:span> si es volen rebre notificacions cada cop que es realitzi una acció d'integració amb l'Arxiu. </text:p>
      <text:p text:style-name="P77"/>
      <text:p text:style-name="P134"><text:span text:style-name="T194">taula.</text:span><text:span text:style-name="T192"> Propietat per fixar el nom de la carpeta i l'objecte </text:span><text:span text:style-name="T152">ArxiuPluginListener</text:span><text:span text:style-name="T192">.</text:span></text:p>
      <table:table table:name="Table7" table:style-name="Table7">
        <table:table-column table:style-name="Table7.A"/>
        <table:table-row table:style-name="TableLine930262352">
          <table:table-cell table:style-name="Table7.A1" office:value-type="string">
            <text:p text:style-name="P122"><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22"><text:span text:style-name="T85">backofficeArxiuUtils</text:span><text:span text:style-name="T59">.setArxiuPluginListener(</text:span><text:span text:style-name="T49">this</text:span><text:span text:style-name="T59">);</text:span></text:p>
            <text:p text:style-name="P122"><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21"><text:span text:style-name="T85">backoffice</text:span><text:span text:style-name="T92">Arxiu</text:span><text:span text:style-name="T85">Utils</text:span><text:span text:style-name="T59">.setCarpeta(</text:span><text:span text:style-name="T87">anotacio</text:span><text:span text:style-name="T59">.getIdentificador());</text:span></text:p>
          </table:table-cell>
        </table:table-row>
      </table:table>
      <text:p text:style-name="P78"/>
      <text:p text:style-name="P171"><text:span text:style-name="T191">En el cas de l'exemple, la classe que implementa el WS també implementa </text:span><text:span text:style-name="T193">la interfície </text:span><text:span text:style-name="T153">ArxiuPluginListener</text:span><text:span text:style-name="T193"> amb el mètode </text:span><text:span text:style-name="T153">event</text:span><text:span text:style-name="T193"> per obtenir la informació de la crida al plugin de l'API de l'Arxiu.</text:span></text:p>
      <table:table table:name="Table8" table:style-name="Table8">
        <table:table-column table:style-name="Table8.A"/>
        <table:table-row table:style-name="TableLine930263216">
          <table:table-cell table:style-name="Table8.A1" office:value-type="string">
            <text:p text:style-name="P117"><text:span text:style-name="T51">public</text:span><text:span text:style-name="T59"> </text:span><text:span text:style-name="T51">class</text:span><text:span text:style-name="T59"> BackofficeWsServiceImpl </text:span><text:span text:style-name="T51">implements</text:span><text:span text:style-name="T59"> BackofficeWsService, , <text:tab/><text:tab/><text:tab/><text:tab/><text:tab/><text:tab/><text:tab/><text:tab/><text:tab/><text:tab/><text:tab/></text:span><text:span text:style-name="T65">ArxiuPluginListener</text:span><text:span text:style-name="T59"> {</text:span></text:p>
            <text:p text:style-name="P89">...</text:p>
            <text:p text:style-name="P129"><text:tab/> /** Mètode que la llibreria del backoffice de distribució crida si es </text:p>
            <text:p text:style-name="P123"><text:span text:style-name="T199"><text:tab/> fixa una instància que implementa </text:span><text:span text:style-name="T223">{@link ArxiuPluginListener}</text:span><text:span text:style-name="T199">.</text:span></text:p>
            <text:p text:style-name="P130"><text:tab/> * </text:p>
            <text:p text:style-name="P130"><text:tab/> */</text:p>
            <text:p text:style-name="P119"><text:span text:style-name="T59"><text:tab/></text:span><text:span text:style-name="T109">@Override</text:span></text:p>
            <text:p text:style-name="P119"><text:span text:style-name="T59"><text:tab/></text:span><text:span text:style-name="T51">public</text:span><text:span text:style-name="T59"> </text:span><text:span text:style-name="T51">void</text:span><text:span text:style-name="T59"> </text:span><text:span text:style-name="T63">event</text:span><text:span text:style-name="T59">(</text:span></text:p>
            <text:p text:style-name="P119"><text:span text:style-name="T59"><text:tab/><text:tab/><text:tab/>String </text:span><text:span text:style-name="T85">metode</text:span><text:span text:style-name="T59">, </text:span></text:p>
            <text:p text:style-name="P119"><text:soft-page-break/><text:span text:style-name="T59"><text:tab/><text:tab/><text:tab/>Map&lt;String, String&gt; </text:span><text:span text:style-name="T85">parametres</text:span><text:span text:style-name="T59">, </text:span></text:p>
            <text:p text:style-name="P119"><text:span text:style-name="T59"><text:tab/><text:tab/><text:tab/></text:span><text:span text:style-name="T51">boolean</text:span><text:span text:style-name="T59"> </text:span><text:span text:style-name="T85">correcte</text:span><text:span text:style-name="T59">, </text:span></text:p>
            <text:p text:style-name="P119"><text:span text:style-name="T59"><text:tab/><text:tab/><text:tab/>String </text:span><text:span text:style-name="T85">error</text:span><text:span text:style-name="T59">, </text:span></text:p>
            <text:p text:style-name="P119"><text:span text:style-name="T59"><text:tab/><text:tab/><text:tab/>Exception </text:span><text:span text:style-name="T85">e</text:span><text:span text:style-name="T59">,</text:span></text:p>
            <text:p text:style-name="P119"><text:span text:style-name="T59"><text:tab/><text:tab/><text:tab/></text:span><text:span text:style-name="T51">long</text:span><text:span text:style-name="T59"> </text:span><text:span text:style-name="T85">timeMs</text:span><text:span text:style-name="T59">) {</text:span></text:p>
            <text:p text:style-name="P119"><text:span text:style-name="T59"><text:tab/><text:tab/>StringBuilder </text:span><text:span text:style-name="T85">str</text:span><text:span text:style-name="T59"> = </text:span><text:span text:style-name="T51">new</text:span><text:span text:style-name="T59"> StringBuilder()</text:span></text:p>
            <text:p text:style-name="P119"><text:span text:style-name="T59"><text:tab/><text:tab/><text:tab/><text:tab/>.append(</text:span><text:span text:style-name="T36">"S'ha invocat el mètode \""</text:span><text:span text:style-name="T59">)</text:span></text:p>
            <text:p text:style-name="P119"><text:span text:style-name="T59"><text:tab/><text:tab/><text:tab/><text:tab/>.append(</text:span><text:span text:style-name="T85">metode</text:span><text:span text:style-name="T59">)</text:span></text:p>
            <text:p text:style-name="P119"><text:span text:style-name="T59"><text:tab/><text:tab/><text:tab/><text:tab/>.append(</text:span><text:span text:style-name="T36">"\" amb els paràmetres {"</text:span><text:span text:style-name="T59">);</text:span></text:p>
            <text:p text:style-name="P119"><text:span text:style-name="T59"><text:tab/><text:tab/></text:span><text:span text:style-name="T51">int</text:span><text:span text:style-name="T59"> </text:span><text:span text:style-name="T85">i</text:span><text:span text:style-name="T59"> = 0;</text:span></text:p>
            <text:p text:style-name="P119"><text:span text:style-name="T59"><text:tab/><text:tab/></text:span><text:span text:style-name="T51">for</text:span><text:span text:style-name="T59"> (String </text:span><text:span text:style-name="T85">key</text:span><text:span text:style-name="T59"> : </text:span><text:span text:style-name="T85">parametres</text:span><text:span text:style-name="T59">.keySet()) {</text:span></text:p>
            <text:p text:style-name="P119"><text:span text:style-name="T59"><text:tab/><text:tab/><text:tab/></text:span><text:span text:style-name="T85">str</text:span><text:span text:style-name="T59">.append(</text:span><text:span text:style-name="T85">key</text:span><text:span text:style-name="T59">).append(</text:span><text:span text:style-name="T36">"="</text:span><text:span text:style-name="T59">).append(</text:span><text:span text:style-name="T85">parametres</text:span><text:span text:style-name="T59">.get(</text:span><text:span text:style-name="T85">key</text:span><text:span text:style-name="T59">));</text:span></text:p>
            <text:p text:style-name="P119"><text:span text:style-name="T59"><text:tab/><text:tab/><text:tab/></text:span><text:span text:style-name="T85">i</text:span><text:span text:style-name="T59">++;</text:span></text:p>
            <text:p text:style-name="P119"><text:span text:style-name="T59"><text:tab/><text:tab/><text:tab/></text:span><text:span text:style-name="T51">if</text:span><text:span text:style-name="T59"> (</text:span><text:span text:style-name="T85">i</text:span><text:span text:style-name="T59">&lt;</text:span><text:span text:style-name="T85">parametres</text:span><text:span text:style-name="T59">.size())</text:span></text:p>
            <text:p text:style-name="P119"><text:span text:style-name="T59"><text:tab/><text:tab/><text:tab/><text:tab/></text:span><text:span text:style-name="T85">str</text:span><text:span text:style-name="T59">.append(</text:span><text:span text:style-name="T36">", "</text:span><text:span text:style-name="T59">);</text:span></text:p>
            <text:p text:style-name="P92"><text:tab/><text:tab/>}</text:p>
            <text:p text:style-name="P119"><text:span text:style-name="T59"><text:tab/><text:tab/></text:span><text:span text:style-name="T85">str</text:span><text:span text:style-name="T59">.append(</text:span><text:span text:style-name="T36">"} amb resultat "</text:span><text:span text:style-name="T59">).append(</text:span><text:span text:style-name="T85">correcte</text:span><text:span text:style-name="T59"> ? </text:span><text:span text:style-name="T36">"OK"</text:span><text:span text:style-name="T59"> : </text:span><text:span text:style-name="T36">"KO"</text:span><text:span text:style-name="T59">);</text:span></text:p>
            <text:p text:style-name="P119"><text:span text:style-name="T59"><text:tab/><text:tab/></text:span><text:span text:style-name="T51">if</text:span><text:span text:style-name="T59"> (</text:span><text:span text:style-name="T85">error</text:span><text:span text:style-name="T59"> != </text:span><text:span text:style-name="T51">null</text:span><text:span text:style-name="T59">)</text:span></text:p>
            <text:p text:style-name="P119"><text:span text:style-name="T59"><text:tab/><text:tab/><text:tab/></text:span><text:span text:style-name="T85">str</text:span><text:span text:style-name="T59">.append(</text:span><text:span text:style-name="T36">": "</text:span><text:span text:style-name="T59">).append(</text:span><text:span text:style-name="T85">error</text:span><text:span text:style-name="T59">);</text:span></text:p>
            <text:p text:style-name="P119"><text:span text:style-name="T59"><text:tab/><text:tab/></text:span><text:span text:style-name="T51">if</text:span><text:span text:style-name="T59"> (</text:span><text:span text:style-name="T85">e</text:span><text:span text:style-name="T59"> != </text:span><text:span text:style-name="T51">null</text:span><text:span text:style-name="T59">)</text:span></text:p>
            <text:p text:style-name="P119"><text:span text:style-name="T59"><text:tab/><text:tab/><text:tab/></text:span><text:span text:style-name="T85">str</text:span><text:span text:style-name="T59">.append(</text:span><text:span text:style-name="T36">" "</text:span><text:span text:style-name="T59">).append(</text:span><text:span text:style-name="T85">e</text:span><text:span text:style-name="T59">.getClass()).append(</text:span><text:span text:style-name="T36">" "</text:span><text:span text:style-name="T59">).append(</text:span><text:span text:style-name="T85">e</text:span><text:span text:style-name="T59">.getMessage());</text:span></text:p>
            <text:p text:style-name="P119"><text:span text:style-name="T59"><text:tab/><text:tab/></text:span><text:span text:style-name="T85">str</text:span><text:span text:style-name="T59">.append(</text:span><text:span text:style-name="T36">" "</text:span><text:span text:style-name="T59">).append(</text:span><text:span text:style-name="T85">timeMs</text:span><text:span text:style-name="T59">).append(</text:span><text:span text:style-name="T36">"ms"</text:span><text:span text:style-name="T59">);</text:span></text:p>
            <text:p text:style-name="P92"><text:tab/><text:tab/></text:p>
            <text:p text:style-name="P119"><text:span text:style-name="T59"><text:tab/><text:tab/></text:span><text:span text:style-name="T80">logger</text:span><text:span text:style-name="T59">.debug(</text:span><text:span text:style-name="T85">str</text:span><text:span text:style-name="T59">.toString());</text:span></text:p>
            <text:p text:style-name="P89"><text:tab/>}</text:p>
            <text:p text:style-name="P89">...</text:p>
            <text:p text:style-name="P89">}</text:p>
          </table:table-cell>
        </table:table-row>
      </table:table>
      <text:p text:style-name="P79"/>
      <text:p text:style-name="P172"><text:span text:style-name="T193">E</text:span><text:span text:style-name="T191">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2">taula.</text:span><text:span text:style-name="T191"> Crida al mètode </text:span><text:span text:style-name="T151">crearExpedientAmbAnotacioRegistre</text:span><text:span text:style-name="T191">.</text:span></text:p>
      <table:table table:name="Table9" table:style-name="Table9">
        <table:table-column table:style-name="Table9.A"/>
        <table:table-row table:style-name="TableLine930264080">
          <table:table-cell table:style-name="Table9.A1" office:value-type="string">
            <text:p text:style-name="P117"><text:span text:style-name="T217">/</text:span><text:span text:style-name="T219">/ Crida a la creació de l'expedient</text:span></text:p>
            <text:p text:style-name="P126"><text:span text:style-name="T59">String </text:span><text:span text:style-name="T85">SERIE_DOCUMENTAL</text:span><text:span text:style-name="T59"> = </text:span><text:span text:style-name="T36">"S0002"</text:span><text:span text:style-name="T59">; </text:span></text:p>
            <text:p text:style-name="P126"><text:span text:style-name="T59">String </text:span><text:span text:style-name="T85">CLASSIFICACIO</text:span><text:span text:style-name="T59"> = </text:span><text:span text:style-name="T36">"000000"</text:span><text:span text:style-name="T59">;</text:span></text:p>
            <text:p text:style-name="P126"><text:span text:style-name="T59">ArxiuResultat </text:span><text:span text:style-name="T85">arxiuResultat</text:span><text:span text:style-name="T59">;</text:span></text:p>
            <text:p text:style-name="P126"><text:span text:style-name="T51">int</text:span><text:span text:style-name="T59"> </text:span><text:span text:style-name="T85">intent</text:span><text:span text:style-name="T59"> = 0;</text:span></text:p>
            <text:p text:style-name="P126"><text:span text:style-name="T59">String </text:span><text:span text:style-name="T85">expedientUuid</text:span><text:span text:style-name="T59"> = </text:span><text:span text:style-name="T51">null</text:span><text:span text:style-name="T59">;</text:span></text:p>
            <text:p text:style-name="P126"><text:span text:style-name="T51">do</text:span><text:span text:style-name="T59"> {</text:span></text:p>
            <text:p text:style-name="P126"><text:span text:style-name="T59"><text:tab/></text:span><text:span text:style-name="T217">// Crida al mètode de creació de la llibreria</text:span></text:p>
            <text:p text:style-name="P126"><text:span text:style-name="T59"><text:tab/></text:span><text:span text:style-name="T85">arxiuResultat</text:span><text:span text:style-name="T59"> = </text:span><text:span text:style-name="T85">BackofficeArxiuUtils</text:span><text:span text:style-name="T59">.crearExpedientAmbAnotacioRegistre(</text:span></text:p>
            <text:p text:style-name="P126"><text:span text:style-name="T59"><text:tab/><text:tab/><text:tab/><text:tab/><text:tab/><text:tab/><text:tab/><text:tab/></text:span><text:span text:style-name="T85">expedientUuid</text:span><text:span text:style-name="T59">,</text:span></text:p>
            <text:p text:style-name="P126"><text:span text:style-name="T59"><text:tab/><text:tab/><text:tab/><text:tab/><text:tab/><text:tab/><text:tab/><text:tab/></text:span><text:span text:style-name="T85">anotacio</text:span><text:span text:style-name="T59">.getIdentificador(),</text:span></text:p>
            <text:p text:style-name="P126"><text:span text:style-name="T59"><text:tab/><text:tab/><text:tab/><text:tab/><text:tab/><text:tab/><text:tab/><text:tab/></text:span><text:span text:style-name="T51">null</text:span><text:span text:style-name="T59">,</text:span></text:p>
            <text:p text:style-name="P126"><text:span text:style-name="T59"><text:tab/><text:tab/><text:tab/><text:tab/><text:tab/><text:tab/><text:tab/><text:tab/>Arrays.</text:span><text:span text:style-name="T66">asList</text:span><text:span text:style-name="T59">(</text:span><text:span text:style-name="T36">"A04019281"</text:span><text:span text:style-name="T59">),</text:span></text:p>
            <text:p text:style-name="P126"><text:span text:style-name="T59"><text:tab/><text:tab/><text:tab/><text:tab/><text:tab/><text:tab/><text:tab/><text:tab/></text:span><text:span text:style-name="T51">new</text:span><text:span text:style-name="T59"> Date(),</text:span></text:p>
            <text:p text:style-name="P126"><text:span text:style-name="T59"><text:tab/><text:tab/><text:tab/><text:tab/><text:tab/><text:tab/><text:tab/><text:tab/></text:span><text:span text:style-name="T85">CLASSIFICACIO</text:span><text:span text:style-name="T59">,</text:span></text:p>
            <text:p text:style-name="P126"><text:span text:style-name="T59"><text:tab/><text:tab/><text:tab/><text:tab/><text:tab/><text:tab/><text:tab/><text:tab/>ExpedientEstatEnumDto.</text:span><text:span text:style-name="T80">OBERT</text:span><text:span text:style-name="T59">,</text:span></text:p>
            <text:p text:style-name="P126"><text:span text:style-name="T59"><text:tab/><text:tab/><text:tab/><text:tab/><text:tab/><text:tab/><text:tab/><text:tab/></text:span><text:span text:style-name="T85">SERIE_DOCUMENTAL</text:span><text:span text:style-name="T59">,</text:span></text:p>
            <text:p text:style-name="P126"><text:span text:style-name="T59"><text:tab/><text:tab/><text:tab/><text:tab/><text:tab/><text:tab/><text:tab/><text:tab/></text:span><text:span text:style-name="T85">anotacio</text:span><text:span text:style-name="T59">);</text:span></text:p>
            <text:p text:style-name="P126"><text:span text:style-name="T59"><text:tab/></text:span><text:span text:style-name="T85">expedientUuid</text:span><text:span text:style-name="T59"> = </text:span><text:span text:style-name="T85">arxiuResultat</text:span><text:span text:style-name="T59">.getIdentificadorExpedient();</text:span></text:p>
            <text:p text:style-name="P126"><text:span text:style-name="T59"><text:tab/></text:span><text:span text:style-name="T217">// Imprimeix el resultat per pantalla</text:span></text:p>
            <text:p text:style-name="P126"><text:span text:style-name="T59"><text:tab/></text:span><text:span text:style-name="T51">this</text:span><text:span text:style-name="T59">.logResultat(</text:span></text:p>
            <text:p text:style-name="P126"><text:span text:style-name="T59"><text:tab/><text:tab/><text:tab/></text:span><text:span text:style-name="T36">"Resultat de la crida "</text:span><text:span text:style-name="T59"> + </text:span><text:span text:style-name="T85">intent</text:span><text:span text:style-name="T59">++ + </text:span><text:span text:style-name="T36">" crearExpedientAmbAnotacioRegistre per l'expedient"</text:span><text:span text:style-name="T59"> + </text:span><text:span text:style-name="T85">anotacio</text:span><text:span text:style-name="T59">.getExpedientNumero(),</text:span></text:p>
            <text:p text:style-name="P126"><text:span text:style-name="T59"><text:tab/><text:tab/><text:tab/></text:span><text:span text:style-name="T85">arxiuResultat</text:span><text:span text:style-name="T59">);<text:tab/><text:tab/><text:tab/><text:tab/><text:tab/></text:span></text:p>
            <text:p text:style-name="P42"><text:span text:style-name="T67">} </text:span><text:span text:style-name="T52">while</text:span><text:span text:style-name="T67">(</text:span><text:span text:style-name="T88">arxiuResultat</text:span><text:span text:style-name="T67">.getErrorCodi() !=</text:span><text:span text:style-name="T68"> Distri</text:span><text:span text:style-name="T69">bucioArxiuError.</text:span><text:span text:style-name="T82">NO_ERROR</text:span><text:span text:style-name="T69"> &amp;&amp; </text:span><text:span text:style-name="T90">in</text:span><text:span text:style-name="T91">tent</text:span><text:span text:style-name="T70"> &lt; 10);<text:tab/></text:span></text:p>
          </table:table-cell>
        </table:table-row>
      </table:table>
      <text:p text:style-name="P80"/>
      <text:p text:style-name="P172"><text:span text:style-name="T191">A mode informatiu a l'exemple s'imprimeix als logs el contingut de l'objecte </text:span><text:span text:style-name="T151">arxiuResultat</text:span><text:span text:style-name="T191"> amb el mètode </text:span><text:span text:style-name="T151">logResultat</text:span><text:span text:style-name="T191">.</text:span></text:p>
      <table:table table:name="Table10" table:style-name="Table10">
        <table:table-column table:style-name="Table10.A"/>
        <text:soft-page-break/>
        <table:table-row table:style-name="TableLine930264944">
          <table:table-cell table:style-name="Table10.A1" office:value-type="string">
            <text:p text:style-name="P124"><text:span text:style-name="T51">private</text:span><text:span text:style-name="T59"> </text:span><text:span text:style-name="T51">void</text:span><text:span text:style-name="T59"> </text:span><text:span text:style-name="T63">logResultat</text:span><text:span text:style-name="T59">(String </text:span><text:span text:style-name="T85">descripcio</text:span><text:span text:style-name="T59">, ArxiuResultat </text:span><text:span text:style-name="T85">arxiuResultat</text:span><text:span text:style-name="T59">) {</text:span></text:p>
            <text:p text:style-name="P126"><text:span text:style-name="T59"><text:tab/></text:span><text:span text:style-name="T80">logger</text:span><text:span text:style-name="T59">.debug(</text:span><text:span text:style-name="T85">descripcio</text:span><text:span text:style-name="T59">);</text:span></text:p>
            <text:p text:style-name="P126"><text:span text:style-name="T59"><text:tab/></text:span><text:span text:style-name="T217">// Resultat a nivell d'expedient</text:span></text:p>
            <text:p text:style-name="P126"><text:span text:style-name="T59"><text:tab/></text:span><text:span text:style-name="T80">logger</text:span><text:span text:style-name="T59">.debug(</text:span><text:span text:style-name="T36">"- uuid: "</text:span><text:span text:style-name="T59"> + </text:span><text:span text:style-name="T85">arxiuResultat</text:span><text:span text:style-name="T59">.getIdentificadorExpedient());</text:span></text:p>
            <text:p text:style-name="P126"><text:span text:style-name="T59"><text:tab/></text:span><text:span text:style-name="T80">logger</text:span><text:span text:style-name="T59">.debug(</text:span><text:span text:style-name="T36">"- accio: "</text:span><text:span text:style-name="T59"> + </text:span><text:span text:style-name="T85">arxiuResultat</text:span><text:span text:style-name="T59">.getAccio());</text:span></text:p>
            <text:p text:style-name="P126"><text:span text:style-name="T59"><text:tab/></text:span><text:span text:style-name="T80">logger</text:span><text:span text:style-name="T59">.debug(</text:span><text:span text:style-name="T36">"- errorCodi: "</text:span><text:span text:style-name="T59"> + </text:span><text:span text:style-name="T85">arxiuResultat</text:span><text:span text:style-name="T59">.getErrorCodi());</text:span></text:p>
            <text:p text:style-name="P126"><text:span text:style-name="T59"><text:tab/></text:span><text:span text:style-name="T80">logger</text:span><text:span text:style-name="T59">.debug(</text:span><text:span text:style-name="T36">"- errorMessage: "</text:span><text:span text:style-name="T59"> + </text:span><text:span text:style-name="T85">arxiuResultat</text:span><text:span text:style-name="T59">.getErrorMessage());</text:span></text:p>
            <text:p text:style-name="P126"><text:span text:style-name="T59"><text:tab/></text:span><text:span text:style-name="T80">logger</text:span><text:span text:style-name="T59">.debug(</text:span><text:span text:style-name="T36">"- excepcio: "</text:span><text:span text:style-name="T59"> + (</text:span><text:span text:style-name="T85">arxiuResultat</text:span><text:span text:style-name="T59">.getException() != </text:span><text:span text:style-name="T51">null</text:span><text:span text:style-name="T59">? </text:span><text:span text:style-name="T85">arxiuResultat</text:span><text:span text:style-name="T59">.getException().getClass() + </text:span><text:span text:style-name="T36">" "</text:span><text:span text:style-name="T59"> + </text:span><text:span text:style-name="T85">arxiuResultat</text:span><text:span text:style-name="T59">.getException().getMessage() : <text:s/></text:span><text:span text:style-name="T36">" - "</text:span><text:span text:style-name="T59">));</text:span></text:p>
            <text:p text:style-name="P185"/>
            <text:p text:style-name="P126"><text:span text:style-name="T59"><text:tab/></text:span><text:span text:style-name="T217">// Resultat pels annexos</text:span></text:p>
            <text:p text:style-name="P126"><text:span text:style-name="T59"><text:tab/>List&lt;ArxiuResultatAnnex&gt; </text:span><text:span text:style-name="T85">resultatAnnexos</text:span><text:span text:style-name="T59"> = </text:span><text:span text:style-name="T85">arxiuResultat</text:span><text:span text:style-name="T59">.getResultatAnnexos(); </text:span></text:p>
            <text:p text:style-name="P126"><text:span text:style-name="T59"><text:tab/></text:span><text:span text:style-name="T80">logger</text:span><text:span text:style-name="T59">.debug(</text:span><text:span text:style-name="T36">" - Resultat dels "</text:span><text:span text:style-name="T59"> + </text:span><text:span text:style-name="T85">resultatAnnexos</text:span><text:span text:style-name="T59">.size() + </text:span><text:span text:style-name="T36">" annexos:"</text:span><text:span text:style-name="T59">);</text:span></text:p>
            <text:p text:style-name="P126"><text:span text:style-name="T59"><text:tab/></text:span><text:span text:style-name="T51">for</text:span><text:span text:style-name="T59"> (ArxiuResultatAnnex </text:span><text:span text:style-name="T85">resultatAnnex</text:span><text:span text:style-name="T59"> : </text:span><text:span text:style-name="T85">resultatAnnexos</text:span><text:span text:style-name="T59">) {</text:span></text:p>
            <text:p text:style-name="P126"><text:span text:style-name="T59"><text:tab/><text:tab/></text:span><text:span text:style-name="T80">logger</text:span><text:span text:style-name="T59">.debug(</text:span><text:span text:style-name="T36">"\b- uuid: "</text:span><text:span text:style-name="T59"> + </text:span><text:span text:style-name="T85">resultatAnnex</text:span><text:span text:style-name="T59">.getIdentificadorAnnex());</text:span></text:p>
            <text:p text:style-name="P126"><text:span text:style-name="T59"><text:tab/><text:tab/></text:span><text:span text:style-name="T80">logger</text:span><text:span text:style-name="T59">.debug(</text:span><text:span text:style-name="T36">"\\b- accio: "</text:span><text:span text:style-name="T59"> + </text:span><text:span text:style-name="T85">resultatAnnex</text:span><text:span text:style-name="T59">.getAccio());</text:span></text:p>
            <text:p text:style-name="P126"><text:span text:style-name="T59"><text:tab/><text:tab/></text:span><text:span text:style-name="T80">logger</text:span><text:span text:style-name="T59">.debug(</text:span><text:span text:style-name="T36">"\\b- errorCodi: "</text:span><text:span text:style-name="T59"> + </text:span><text:span text:style-name="T85">resultatAnnex</text:span><text:span text:style-name="T59">.getErrorCodi());</text:span></text:p>
            <text:p text:style-name="P126"><text:span text:style-name="T59"><text:tab/><text:tab/></text:span><text:span text:style-name="T80">logger</text:span><text:span text:style-name="T59">.debug(</text:span><text:span text:style-name="T36">"\\b- errorMessage: "</text:span><text:span text:style-name="T59"> + </text:span><text:span text:style-name="T85">resultatAnnex</text:span><text:span text:style-name="T59">.getErrorMessage());</text:span></text:p>
            <text:p text:style-name="P126"><text:span text:style-name="T59"><text:tab/><text:tab/></text:span><text:span text:style-name="T80">logger</text:span><text:span text:style-name="T59">.debug(</text:span><text:span text:style-name="T36">"\\b- excepcio: "</text:span><text:span text:style-name="T59"> + (</text:span><text:span text:style-name="T85">resultatAnnex</text:span><text:span text:style-name="T59">.getException() != </text:span><text:span text:style-name="T51">null</text:span><text:span text:style-name="T59">? </text:span><text:span text:style-name="T85">resultatAnnex</text:span><text:span text:style-name="T59">.getException().getClass() + </text:span><text:span text:style-name="T36">" "</text:span><text:span text:style-name="T59"> + </text:span><text:span text:style-name="T85">resultatAnnex</text:span><text:span text:style-name="T59">.getException().getMessage() : <text:s/></text:span><text:span text:style-name="T36">" - "</text:span><text:span text:style-name="T59">));</text:span></text:p>
            <text:p text:style-name="P97"><text:tab/>}</text:p>
            <text:p text:style-name="P95">}</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5"><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5"><text:line-break/></text:span>Fig. <text:sequence text:ref-name="refFig.5" text:name="Fig." text:formula="ooow:Fig.+1" style:num-format="1">6</text:sequence>: Expedient després de la crida al mètode de la llibreria d'utilitats<text:span text:style-name="T226">.</text:span></text:p></draw:text-box></draw:frame><text:soft-page-break/></text:p>
      <text:p text:style-name="P173">Per acabar es mostra la porció de codi que consulta el nou expedient i comunica l'estat a l'aplicació de DISTRIBUCIO<text:span text:style-name="T224"> segons el codi del resultat.</text:span></text:p>
      <table:table table:name="Table11" table:style-name="Table11">
        <table:table-column table:style-name="Table11.A"/>
        <table:table-row table:style-name="TableLine930265808">
          <table:table-cell table:style-name="Table11.A1" office:value-type="string">
            <text:p text:style-name="P117"><text:span text:style-name="T217">// </text:span><text:span text:style-name="T218">Consultem</text:span><text:span text:style-name="T217"> el </text:span><text:span text:style-name="T218">nou</text:span><text:span text:style-name="T217"> expedient a l'Arxiu</text:span></text:p>
            <text:p text:style-name="P119"><text:span text:style-name="T51">if</text:span><text:span text:style-name="T59"> (</text:span><text:span text:style-name="T85">expedientUuid</text:span><text:span text:style-name="T59"> != </text:span><text:span text:style-name="T51">null</text:span><text:span text:style-name="T59">) {</text:span></text:p>
            <text:p text:style-name="P119"><text:span text:style-name="T59"><text:tab/>Expedient </text:span><text:span text:style-name="T85">expedientDetalls</text:span><text:span text:style-name="T59"> = getArxiuPlugin().expedientDetalls(</text:span><text:span text:style-name="T85">arxiuResultat</text:span><text:span text:style-name="T59">.getIdentificadorExpedient(), </text:span><text:span text:style-name="T51">null</text:span><text:span text:style-name="T59">);</text:span></text:p>
            <text:p text:style-name="P119"><text:span text:style-name="T59"><text:tab/></text:span><text:span text:style-name="T80">logger</text:span><text:span text:style-name="T59">.debug(</text:span><text:span text:style-name="T36">"S'ha creat l'expedient \""</text:span><text:span text:style-name="T59"> + </text:span><text:span text:style-name="T85">expedientDetalls</text:span><text:span text:style-name="T59">.getNom() + </text:span><text:span text:style-name="T36">"\" amb id="</text:span><text:span text:style-name="T59"> + </text:span><text:span text:style-name="T85">expedientDetalls</text:span><text:span text:style-name="T59">.getIdentificador() + </text:span><text:span text:style-name="T36">" per l'anotació "</text:span><text:span text:style-name="T59"> + </text:span><text:span text:style-name="T85">anotacio</text:span><text:span text:style-name="T59">.getIdentificador() + </text:span><text:span text:style-name="T36">" amb els següents continguts:"</text:span><text:span text:style-name="T59">);</text:span></text:p>
            <text:p text:style-name="P119"><text:span text:style-name="T59"><text:tab/></text:span><text:span text:style-name="T51">for</text:span><text:span text:style-name="T59"> (ContingutArxiu </text:span><text:span text:style-name="T85">contingut</text:span><text:span text:style-name="T59"> : </text:span><text:span text:style-name="T85">expedientDetalls</text:span><text:span text:style-name="T59">.getContinguts()) {</text:span></text:p>
            <text:p text:style-name="P119"><text:span text:style-name="T59"><text:tab/><text:tab/></text:span><text:span text:style-name="T80">logger</text:span><text:span text:style-name="T59">.debug(</text:span><text:span text:style-name="T36">"- "</text:span><text:span text:style-name="T59"> + </text:span><text:span text:style-name="T85">contingut</text:span><text:span text:style-name="T59">.getIdentificador() + </text:span><text:span text:style-name="T36">" "</text:span><text:span text:style-name="T59"> + </text:span><text:span text:style-name="T85">contingut</text:span><text:span text:style-name="T59">.getNom() + </text:span><text:span text:style-name="T36">" amb "</text:span><text:span text:style-name="T59"> + (</text:span><text:span text:style-name="T85">contingut</text:span><text:span text:style-name="T59">.getFirmes() != </text:span><text:span text:style-name="T51">null</text:span><text:span text:style-name="T59">? </text:span><text:span text:style-name="T85">contingut</text:span><text:span text:style-name="T59">.getFirmes().size() : 0) + </text:span><text:span text:style-name="T36">" firmes."</text:span><text:span text:style-name="T59">);</text:span></text:p>
            <text:p text:style-name="P92"><text:tab/>}</text:p>
            <text:p text:style-name="P119"><text:span text:style-name="T59">} </text:span><text:span text:style-name="T51">else</text:span><text:span text:style-name="T59"> {</text:span></text:p>
            <text:p text:style-name="P119"><text:span text:style-name="T59"><text:tab/></text:span><text:span text:style-name="T80">logger</text:span><text:span text:style-name="T59">.warn(</text:span><text:span text:style-name="T36">"L'expedient no s'ha pogut crear per l'anotació "</text:span><text:span text:style-name="T59"> + </text:span><text:span text:style-name="T85">anotacio</text:span><text:span text:style-name="T59">.getIdentificador());</text:span></text:p>
            <text:p text:style-name="P92">}</text:p>
            <text:p text:style-name="P119"><text:span text:style-name="T217">// </text:span><text:span text:style-name="T218">Es</text:span><text:span text:style-name="T217"> </text:span><text:span text:style-name="T218">comunica</text:span><text:span text:style-name="T217"> el </text:span><text:span text:style-name="T218">resultat</text:span><text:span text:style-name="T217"> a DISTRIBUCIO</text:span></text:p>
            <text:p text:style-name="P119"><text:span text:style-name="T51">switch</text:span><text:span text:style-name="T59">(</text:span><text:span text:style-name="T85">arxiuResultat</text:span><text:span text:style-name="T59">.getErrorCodi()) {</text:span></text:p>
            <text:p text:style-name="P119"><text:span text:style-name="T59"><text:tab/></text:span><text:span text:style-name="T51">case</text:span><text:span text:style-name="T59"> 0:</text:span></text:p>
            <text:p text:style-name="P119"><text:span text:style-name="T59"><text:tab/><text:tab/></text:span><text:span text:style-name="T85">backofficeClient</text:span><text:span text:style-name="T59">.canviEstat(</text:span><text:span text:style-name="T85">idWs</text:span><text:span text:style-name="T59">, es.caib.distribucio.ws.backofficeintegracio.Estat.</text:span><text:span text:style-name="T80">PROCESSADA</text:span><text:span text:style-name="T59">, </text:span><text:span text:style-name="T36">"Processada"</text:span><text:span text:style-name="T59">);</text:span></text:p>
            <text:p text:style-name="P119"><text:span text:style-name="T59"><text:tab/><text:tab/></text:span><text:span text:style-name="T51">break</text:span><text:span text:style-name="T59">;</text:span></text:p>
            <text:p text:style-name="P119"><text:span text:style-name="T59"><text:tab/></text:span><text:span text:style-name="T51">default</text:span><text:span text:style-name="T59">:</text:span></text:p>
            <text:p text:style-name="P119"><text:span text:style-name="T59"><text:tab/><text:tab/></text:span><text:span text:style-name="T85">backofficeClient</text:span><text:span text:style-name="T59">.canviEstat(</text:span><text:span text:style-name="T85">idWs</text:span><text:span text:style-name="T59">, es.caib.distribucio.ws.backofficeintegracio.Estat.</text:span><text:span text:style-name="T80">ERROR</text:span><text:span text:style-name="T59">, </text:span><text:span text:style-name="T85">arxiuResultat</text:span><text:span text:style-name="T59">.getErrorCodi()</text:span><text:span text:style-name="T72"> + </text:span><text:span text:style-name="T38">" "</text:span><text:span text:style-name="T72"> + </text:span><text:span text:style-name="T85">arxiuResultat</text:span><text:span text:style-name="T59">.getErrorMessage());</text:span></text:p>
            <text:p text:style-name="P119"><text:span text:style-name="T59"><text:tab/><text:tab/></text:span><text:span text:style-name="T51">break</text:span><text:span text:style-name="T59">;</text:span></text:p>
            <text:p text:style-name="P90">}</text:p>
          </table:table-cell>
        </table:table-row>
      </table:table>
      <text:p text:style-name="P75"/>
      <text:list xml:id="list94024194620660" text:continue-numbering="true" text:style-name="Outline">
        <text:list-item>
          <text:list>
            <text:list-item>
              <text:h text:style-name="P417" text:outline-level="2"><text:bookmark-start text:name="__RefHeading___Toc50910_29075569581"/>Utilitats per Sistra2<text:bookmark-end text:name="__RefHeading___Toc50910_29075569581"/></text:h>
            </text:list-item>
          </text:list>
        </text:list-item>
      </text:list>
      <text:p text:style-name="P181"><text:span text:style-name="T235">S</text:span><text:span text:style-name="T236">erà un cas comú que els tràmits telemàtics de Sistra2 arribin als backoffices de Distribucio amb documents tècnics de pagaments o formularis com annexos. Aquests documents contenen un XML </text:span><text:soft-page-break/><text:span text:style-name="T236">definit pels esquemes XSD corresponents de Sistra2 i contenen les dades d'un formulari o d'un pagament. A fi de facilitar el l</text:span><text:span text:style-name="T237">a </text:span><text:span text:style-name="T236">interpretació </text:span><text:span text:style-name="T237">del </text:span><text:span text:style-name="T236">contingut per part dels backoffices de Distribucio s'ha creat la classe d'utilitats </text:span><text:span text:style-name="T147">BackofficeSistra2Utils</text:span><text:span text:style-name="T181"> amb els mètodes per extreure la informació dels documents tècnics XML. En aquest apartat es descriu l'ús de la llibreria per aquest cas i un exemple Java.</text:span></text:p>
      <text:list xml:id="list94026094382090" text:continue-numbering="true" text:style-name="Outline">
        <text:list-item>
          <text:list>
            <text:list-item>
              <text:list>
                <text:list-item>
                  <text:h text:style-name="P425" text:outline-level="3"><text:bookmark-start text:name="__RefHeading___Toc366109_93553639"/><text:span text:style-name="T231">Ús de </text:span><text:span text:style-name="T132">BackofficeSistra2Utils</text:span><text:bookmark-end text:name="__RefHeading___Toc366109_93553639"/></text:h>
                </text:list-item>
              </text:list>
            </text:list-item>
          </text:list>
        </text:list-item>
      </text:list>
      <text:p text:style-name="P175"><text:span text:style-name="T206">Per utilitzar la </text:span><text:span text:style-name="T234">classe</text:span><text:span text:style-name="T141"> BackofficeS</text:span><text:span text:style-name="T142">istra2U</text:span><text:span text:style-name="T141">tils</text:span><text:span text:style-name="T178"> amb les u</text:span><text:span text:style-name="T182">t</text:span><text:span text:style-name="T178">ilitats</text:span><text:span text:style-name="T182"> per Sistra2</text:span><text:span text:style-name="T178"> </text:span><text:span text:style-name="T238">s'ha de crear un objecte de la classe </text:span><text:span text:style-name="T131">Backoffice</text:span><text:span text:style-name="T143">S</text:span><text:span text:style-name="T142">istra2</text:span><text:span text:style-name="T131">UtilsImpl</text:span><text:span text:style-name="T162">.</text:span><text:span text:style-name="T166"> Aquesta classe no precisa de configurar i conté 2 mètodes per llegir el contingut d'un </text:span><text:span text:style-name="T168">document </text:span><text:span text:style-name="T166">annex i retornar la informació d'un formulari o d'un pagament. Els mètodes que conté són:</text:span></text:p>
      <text:list xml:id="list3941836577" text:style-name="L18">
        <text:list-item>
          <text:p text:style-name="P462"><text:span text:style-name="T142">F</text:span><text:span text:style-name="T144">ormulario</text:span><text:span text:style-name="T133"> parseXml</text:span><text:span text:style-name="T134">Formulario</text:span><text:span text:style-name="T133">(</text:span><text:span text:style-name="T142">b</text:span><text:span text:style-name="T146">yte[]</text:span><text:span text:style-name="T133">) </text:span><text:span text:style-name="T166">: Processa el contingut </text:span><text:span text:style-name="T168">en bytes </text:span><text:span text:style-name="T166">de</text:span><text:span text:style-name="T168">l document annex del formulari </text:span><text:span text:style-name="T166">i retorna les dades del pagament en forma d'objecte</text:span><text:span text:style-name="T133"> </text:span><text:span text:style-name="T144">Formulario</text:span><text:span text:style-name="T166">.</text:span></text:p>
        </text:list-item>
        <text:list-item>
          <text:p text:style-name="P462"><text:span text:style-name="T133">Pago parseXmlPago(</text:span><text:span text:style-name="T142">b</text:span><text:span text:style-name="T146">yte[]</text:span><text:span text:style-name="T133">) </text:span><text:span text:style-name="T166">: Processa el contingut </text:span><text:span text:style-name="T168">en bytes del document</text:span><text:span text:style-name="T182"> </text:span><text:span text:style-name="T166">annex </text:span><text:span text:style-name="T168">del pagament </text:span><text:span text:style-name="T166">i retorna les dades del pagament en forma d'objecte</text:span><text:span text:style-name="T133"> Pago</text:span><text:span text:style-name="T166">.</text:span><text:span text:style-name="T133"> </text:span></text:p>
        </text:list-item>
      </text:list>
      <text:p text:style-name="P175"><text:span text:style-name="T176">T</text:span><text:span text:style-name="T183">ant la classe </text:span><text:span text:style-name="T144">Formulario</text:span><text:span text:style-name="T183"> com la classe </text:span><text:span text:style-name="T144">Pago</text:span><text:span text:style-name="T183"> estan generades a partir dels esquemes XSD de les dades XML provinents de Sistra i els mètodes serveixen per transformar les dades XML a objectes que puguin ser tractats pel backoffice</text:span><text:span text:style-name="T163">.</text:span></text:p>
      <text:p text:style-name="P72"><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5"><text:line-break/></text:span>Fig. <text:sequence text:ref-name="refFig.6" text:name="Fig." text:formula="ooow:Fig.+1" style:num-format="1">7</text:sequence>: Diagrama de classes de BackofficeSistra2Utils i les classes de Formulario i Pago que retorna.</text:p></draw:text-box></draw:frame></text:p>
      <text:p text:style-name="P176"><text:soft-page-break/><text:span text:style-name="T181">E</text:span><text:span text:style-name="T172">ls mètodes reben </text:span><text:span text:style-name="T188">el contingut en </text:span><text:span text:style-name="T148">byte[]</text:span><text:span text:style-name="T172"> com a paràmetre d'entrada i retornen un objecte </text:span><text:span text:style-name="T139">Formulario</text:span><text:span text:style-name="T172"> o </text:span><text:span text:style-name="T139">Pago</text:span><text:span text:style-name="T172"> segons el mètode invocat. Cal controlar qualsevol excepció que es pugui produir quan el contingut de l'annex no és vàlid i el parseig de l'XML falla.</text:span></text:p>
      <text:list xml:id="list94024783452851" text:continue-list="list94026094382090" text:style-name="Outline">
        <text:list-item>
          <text:list>
            <text:list-item>
              <text:list>
                <text:list-item>
                  <text:h text:style-name="P426" text:outline-level="3"><text:bookmark-start text:name="__RefHeading___Toc366111_93553639"/>Exemple Java<text:bookmark-end text:name="__RefHeading___Toc366111_93553639"/></text:h>
                </text:list-item>
              </text:list>
            </text:list-item>
          </text:list>
        </text:list-item>
      </text:list>
      <text:p text:style-name="P180">En el següent exemple de codi es mostra un exemple de crida al mètode de conversió de l'annex a dades de formulari.</text:p>
      <text:p text:style-name="P177"><text:span text:style-name="T44">taula.</text:span><text:span text:style-name="T210"> </text:span><text:span text:style-name="T214">C</text:span><text:span text:style-name="T215">onversió d'un annex corresponent a un document tècnic d'un formulari XML</text:span><text:span text:style-name="T210">.</text:span></text:p>
      <table:table table:name="Table12" table:style-name="Table12">
        <table:table-column table:style-name="Table12.A"/>
        <table:table-row table:style-name="TableLine930267536">
          <table:table-cell table:style-name="Table12.A1" office:value-type="string">
            <text:p text:style-name="P93"/>
            <text:p text:style-name="P189">// Inicialitza la classe d'utilitats de Sistra2</text:p>
            <text:p text:style-name="P125"><text:span text:style-name="T59">BackofficeSistra2Utils </text:span><text:span text:style-name="T85">sistraUtils</text:span><text:span text:style-name="T59"> = </text:span><text:span text:style-name="T51">new</text:span><text:span text:style-name="T59"> BackofficeSistra2UtilsImpl();</text:span></text:p>
            <text:p text:style-name="P184"/>
            <text:p text:style-name="P188">// Simula l'annex</text:p>
            <text:p text:style-name="P52"><text:span text:style-name="T52">byte</text:span><text:span text:style-name="T67">[] </text:span><text:span text:style-name="T89">contingut</text:span><text:span text:style-name="T67"> = Files.</text:span><text:span text:style-name="T71">readAllBytes</text:span><text:span text:style-name="T67">(Paths.</text:span><text:span text:style-name="T71">get</text:span><text:span text:style-name="T67">(</text:span><text:span text:style-name="T52">this</text:span><text:span text:style-name="T67">.getClass().getClassLoader().getResource(</text:span><text:span text:style-name="T40">"formulario.xml"</text:span><text:span text:style-name="T67">).toURI()));</text:span></text:p>
            <text:p text:style-name="P188">// Llegeix el formulari</text:p>
            <text:p text:style-name="P125"><text:span text:style-name="T59">Formulario </text:span><text:span text:style-name="T85">formulario</text:span><text:span text:style-name="T59"> = </text:span><text:span text:style-name="T51">null</text:span><text:span text:style-name="T59">;</text:span></text:p>
            <text:p text:style-name="P125"><text:span text:style-name="T51">try</text:span><text:span text:style-name="T59"> {</text:span></text:p>
            <text:p text:style-name="P127"><text:span text:style-name="T59"><text:tab/></text:span><text:span text:style-name="T85">formulario</text:span><text:span text:style-name="T59"> = </text:span><text:span text:style-name="T85">sistraUtils</text:span><text:span text:style-name="T59">.parseXmlFormulario(</text:span><text:span text:style-name="T93">contingut</text:span><text:span text:style-name="T59">);</text:span></text:p>
            <text:p text:style-name="P125"><text:span text:style-name="T59">} </text:span><text:span text:style-name="T51">catch</text:span><text:span text:style-name="T59"> (Exception </text:span><text:span text:style-name="T85">e</text:span><text:span text:style-name="T59">) {</text:span></text:p>
            <text:p text:style-name="P125"><text:span text:style-name="T59"><text:tab/></text:span><text:span text:style-name="T51">throw</text:span><text:span text:style-name="T59"> </text:span><text:span text:style-name="T51">new</text:span><text:span text:style-name="T59"> Exception(</text:span><text:span text:style-name="T36">"Error llegint l'annex : "</text:span><text:span text:style-name="T59"> + </text:span><text:span text:style-name="T85">e</text:span><text:span text:style-name="T59">.getMessage());</text:span></text:p>
            <text:p text:style-name="P96">}</text:p>
            <text:p text:style-name="P125"><text:span text:style-name="T59">System.</text:span><text:span text:style-name="T80">out</text:span><text:span text:style-name="T59">.println(</text:span><text:span text:style-name="T36">"Llegit el fornmulari, formulario.accion="</text:span><text:span text:style-name="T59"> + </text:span><text:span text:style-name="T85">formulario</text:span><text:span text:style-name="T59">.getAccion());</text:span></text:p>
            <text:p text:style-name="P93"/>
          </table:table-cell>
        </table:table-row>
      </table:table>
      <text:p text:style-name="P170"/>
      <text:p text:style-name="P178">Per a l'exemple s'ha creat l'arxiu <text:span text:style-name="T126">formulario.xml</text:span><text:span text:style-name="T154"> amb l' XML d'exemple per a la lectura. A continuació es mostra aquest XML d'exemple.</text:span></text:p>
      <text:p text:style-name="P179"><text:span text:style-name="T44">taula.</text:span><text:span text:style-name="T210"> </text:span><text:span text:style-name="T214">E</text:span><text:span text:style-name="T216">xemple d' </text:span><text:span text:style-name="T215">XML</text:span><text:span text:style-name="T216"> pel formulari</text:span><text:span text:style-name="T210">.</text:span></text:p>
      <table:table table:name="Table13" table:style-name="Table13">
        <table:table-column table:style-name="Table13.A"/>
        <table:table-row table:style-name="TableLine930268688">
          <table:table-cell table:style-name="Table13.A1" office:value-type="string">
            <text:p text:style-name="P94"><text:span text:style-name="T14">&lt;?</text:span><text:span text:style-name="T20">xml</text:span> <text:span text:style-name="T25">version</text:span>=<text:span text:style-name="T41">"1.0"</text:span> <text:span text:style-name="T25">encoding</text:span>=<text:span text:style-name="T41">"UTF-8"</text:span> <text:span text:style-name="T25">standalone</text:span>=<text:span text:style-name="T41">"yes"</text:span><text:span text:style-name="T14">?&gt;</text:span></text:p>
            <text:p text:style-name="P120"><text:span text:style-name="T17">&lt;</text:span><text:span text:style-name="T22">ns2:FORMULARIO</text:span><text:span text:style-name="T117"> </text:span><text:span text:style-name="T26">accion</text:span><text:span text:style-name="T59">=</text:span><text:span text:style-name="T39">"accion"</text:span><text:span text:style-name="T117"> </text:span><text:span text:style-name="T26">xmlns:ns2</text:span><text:span text:style-name="T59">=</text:span><text:span text:style-name="T39">"urn:es:caib:sistra2:xml:formulario:v1:model"</text:span><text:span text:style-name="T17">&gt;</text:span></text:p>
            <text:p text:style-name="P120"><text:span text:style-name="T59"><text:tab/></text:span><text:span text:style-name="T17">&lt;</text:span><text:span text:style-name="T22">CAMPO</text:span><text:span text:style-name="T117"> </text:span><text:span text:style-name="T26">id</text:span><text:span text:style-name="T59">=</text:span><text:span text:style-name="T39">"campo_0"</text:span><text:span text:style-name="T17">&gt;</text:span></text:p>
            <text:p text:style-name="P120"><text:span text:style-name="T59"><text:tab/><text:tab/></text:span><text:span text:style-name="T17">&lt;</text:span><text:span text:style-name="T22">VALOR</text:span><text:span text:style-name="T117"> </text:span><text:span text:style-name="T26">codigo</text:span><text:span text:style-name="T59">=</text:span><text:span text:style-name="T39">"cod_0"</text:span><text:span text:style-name="T17">&gt;</text:span><text:span text:style-name="T59">valor_i</text:span><text:span text:style-name="T17">&lt;/</text:span><text:span text:style-name="T22">VALOR</text:span><text:span text:style-name="T17">&gt;</text:span></text:p>
            <text:p text:style-name="P120"><text:span text:style-name="T59"><text:tab/><text:tab/></text:span><text:span text:style-name="T17">&lt;</text:span><text:span text:style-name="T22">VALOR</text:span><text:span text:style-name="T117"> </text:span><text:span text:style-name="T26">codigo</text:span><text:span text:style-name="T59">=</text:span><text:span text:style-name="T39">"cod_0"</text:span><text:span text:style-name="T17">&gt;</text:span><text:span text:style-name="T59">valor_i</text:span><text:span text:style-name="T17">&lt;/</text:span><text:span text:style-name="T22">VALOR</text:span><text:span text:style-name="T17">&gt;</text:span></text:p>
            <text:p text:style-name="P120"><text:span text:style-name="T59"><text:tab/></text:span><text:span text:style-name="T17">&lt;/</text:span><text:span text:style-name="T22">CAMPO</text:span><text:span text:style-name="T17">&gt;</text:span></text:p>
            <text:p text:style-name="P120"><text:span text:style-name="T59"><text:tab/></text:span><text:span text:style-name="T17">&lt;</text:span><text:span text:style-name="T22">CAMPO</text:span><text:span text:style-name="T117"> </text:span><text:span text:style-name="T26">id</text:span><text:span text:style-name="T59">=</text:span><text:span text:style-name="T39">"campo_1"</text:span><text:span text:style-name="T17">&gt;</text:span></text:p>
            <text:p text:style-name="P120"><text:span text:style-name="T59"><text:tab/><text:tab/></text:span><text:span text:style-name="T17">&lt;</text:span><text:span text:style-name="T22">VALOR</text:span><text:span text:style-name="T117"> </text:span><text:span text:style-name="T26">codigo</text:span><text:span text:style-name="T59">=</text:span><text:span text:style-name="T39">"cod_1"</text:span><text:span text:style-name="T17">&gt;</text:span><text:span text:style-name="T59">valor_i</text:span><text:span text:style-name="T17">&lt;/</text:span><text:span text:style-name="T22">VALOR</text:span><text:span text:style-name="T17">&gt;</text:span></text:p>
            <text:p text:style-name="P120"><text:span text:style-name="T59"><text:tab/><text:tab/></text:span><text:span text:style-name="T17">&lt;</text:span><text:span text:style-name="T22">VALOR</text:span><text:span text:style-name="T117"> </text:span><text:span text:style-name="T26">codigo</text:span><text:span text:style-name="T59">=</text:span><text:span text:style-name="T39">"cod_1"</text:span><text:span text:style-name="T17">&gt;</text:span><text:span text:style-name="T59">valor_i</text:span><text:span text:style-name="T17">&lt;/</text:span><text:span text:style-name="T22">VALOR</text:span><text:span text:style-name="T17">&gt;</text:span></text:p>
            <text:p text:style-name="P120"><text:span text:style-name="T59"><text:tab/></text:span><text:span text:style-name="T17">&lt;/</text:span><text:span text:style-name="T22">CAMPO</text:span><text:span text:style-name="T17">&gt;</text:span></text:p>
            <text:p text:style-name="P94"><text:span text:style-name="T14">&lt;/</text:span><text:span text:style-name="T20">ns2:FORMULARIO</text:span><text:span text:style-name="T14">&gt;</text:span></text:p>
          </table:table-cell>
        </table:table-row>
      </table:table>
      <text:p text:style-name="P73"/>
      <text:p text:style-name="P177"/>
      <text:list xml:id="list94025715202982" text:continue-numbering="true" text:style-name="Outline">
        <text:list-header>
          <text:h text:style-name="P406" text:outline-level="1" text:is-list-header="true"><text:bookmark-start text:name="__RefHeading___Toc117515_1680181998"/><text:span text:style-name="T112">Annex I: WSDL del backoffice</text:span> <text:bookmark-end text:name="__RefHeading___Toc117515_1680181998"/></text:h>
        </text:list-header>
      </text:list>
      <text:p text:style-name="P192"><text:span text:style-name="T18">&lt;?</text:span> <text:span text:style-name="T23">xml</text:span> <text:span text:style-name="T27">version</text:span> <text:span text:style-name="T60">= </text:span><text:span text:style-name="T37">'1.0'</text:span> <text:span text:style-name="T27">encoding</text:span> <text:span text:style-name="T60">= </text:span><text:span text:style-name="T37">'UTF-8'</text:span> <text:span text:style-name="T18">?&gt;&lt;</text:span> <text:span text:style-name="T23">wsdl:definitions</text:span> <text:span text:style-name="T27">name</text:span> <text:span text:style-name="T60">= </text:span><text:span text:style-name="T37">"BackofficeService"</text:span> <text:span text:style-name="T27">targetNamespace</text:span> <text:span text:style-name="T60">= </text:span><text:span text:style-name="T37">"http://www.caib.es/distribucio/ws/backoffice"</text:span> <text:span text:style-name="T27">xmlns:ns1</text:span> <text:span text:style-name="T60">= </text:span><text:span text:style-name="T37">"http://schemas.xmlsoap.org/wsdl/soap/http"</text:span> <text:span text:style-name="T27">xmlns:soap</text:span> <text:span text:style-name="T60">= </text:span><text:span text:style-name="T37">"http://schemas.xmlsoap.org/wsdl/soap/"</text:span> <text:span text:style-name="T27">xmlns:tns</text:span> <text:span text:style-name="T60">= </text:span><text:span text:style-name="T37">"http://www.caib.es/distribucio/ws/backoffice"</text:span> <text:span text:style-name="T60"><text:s text:c="3"/></text:span><text:span text:style-name="T27">xmlns:wsdl</text:span> <text:span text:style-name="T60">= </text:span><text:span text:style-name="T37">"http://schemas.xmlsoap.org/wsdl/"</text:span> <text:span text:style-name="T27">xmlns:xsd</text:span> <text:span text:style-name="T60">= </text:span><text:span text:style-name="T37">"http://www.w3.org/2001/XMLSchema"</text:span> <text:span text:style-name="T18">&gt;</text:span> </text:p>
      <text:p text:style-name="P193"><text:span text:style-name="T60"><text:s text:c="4"/></text:span><text:span text:style-name="T77"><text:s text:c="3"/></text:span><text:span text:style-name="T19">&lt;</text:span> <text:span text:style-name="T24">wsdl:types</text:span> <text:span text:style-name="T19">&gt;</text:span> </text:p>
      <text:p text:style-name="P190"><text:span text:style-name="T14">&lt;</text:span> <text:span text:style-name="T20">xs:schema</text:span> <text:span text:style-name="T25">elementFormDefault</text:span> <text:span text:style-name="T54">=</text:span> <text:span text:style-name="T41">"unqualified"</text:span> <text:span text:style-name="T25">targetNamespace</text:span> <text:span text:style-name="T54">=</text:span> <text:span text:style-name="T41">"http://www.caib.es/distribucio/ws/backoffice"</text:span> <text:span text:style-name="T25">version</text:span> <text:span text:style-name="T54">=</text:span> <text:span text:style-name="T41">"1.0"</text:span> <text:span text:style-name="T25">xmlns:tns</text:span> <text:span text:style-name="T54">=</text:span> <text:span text:style-name="T41">"http://www.caib.es/distribucio/ws/backoffice"</text:span> <text:span text:style-name="T25">xmlns:xs</text:span> <text:span text:style-name="T54">=</text:span> <text:span text:style-name="T41">"http://www.w3.org/2001/XMLSchema"</text:span> <text:span text:style-name="T14">&gt;</text:span> </text:p>
      <text:p text:style-name="P190"><text:span text:style-name="T14">&lt;</text:span> <text:span text:style-name="T20">xs:element</text:span> <text:span text:style-name="T25">name</text:span> <text:span text:style-name="T54">=</text:span> <text:span text:style-name="T41">"comunicarAnotacionsPendents"</text:span> <text:span text:style-name="T25">type</text:span> <text:span text:style-name="T54">=</text:span> <text:span text:style-name="T41">"tns:comunicarAnotacionsPendents"</text:span> <text:span text:style-name="T14">/&gt;</text:span> </text:p>
      <text:p text:style-name="P190"><text:span text:style-name="T14">&lt;</text:span> <text:span text:style-name="T20">xs:element</text:span> <text:span text:style-name="T25">name</text:span> <text:span text:style-name="T54">=</text:span> <text:span text:style-name="T41">"comunicarAnotacionsPendentsResponse"</text:span> <text:span text:style-name="T25">type</text:span> <text:span text:style-name="T54">=</text:span> <text:span text:style-name="T41">"tns:comunicarAnotacionsPendentsResponse"</text:span> <text:span text:style-name="T14">/&gt;</text:span> </text:p>
      <text:p text:style-name="P190"><text:span text:style-name="T14">&lt;</text:span> <text:span text:style-name="T20">xs:complexType</text:span> <text:span text:style-name="T25">name</text:span> <text:span text:style-name="T54">=</text:span> <text:span text:style-name="T41">"comunicarAnotacionsPendents"</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axOccurs</text:span> <text:span text:style-name="T54">=</text:span> <text:span text:style-name="T41">"unbounded"</text:span> <text:span text:style-name="T25">name</text:span> <text:span text:style-name="T54">=</text:span> <text:span text:style-name="T41">"ids"</text:span> <text:span text:style-name="T25">type</text:span> <text:span text:style-name="T54">=</text:span> <text:span text:style-name="T41">"tns: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4">=</text:span> <text:span text:style-name="T41">"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inOccurs</text:span> <text:span text:style-name="T54">=</text:span> <text:span text:style-name="T41">"0"</text:span> <text:span text:style-name="T25">name</text:span> <text:span text:style-name="T54">=</text:span> <text:span text:style-name="T41">"clauAcces"</text:span> <text:span text:style-name="T25">type</text:span> <text:span text:style-name="T54">=</text:span> <text:span text:style-name="T41">"xs:string"</text:span> <text:span text:style-name="T14">/&gt;</text:span> </text:p>
      <text:p text:style-name="P190"><text:span text:style-name="T14">&lt;</text:span> <text:span text:style-name="T20">xs:element</text:span> <text:span text:style-name="T25">minOccurs</text:span> <text:span text:style-name="T54">=</text:span> <text:span text:style-name="T41">"0"</text:span> <text:span text:style-name="T25">name</text:span> <text:span text:style-name="T54">=</text:span> <text:span text:style-name="T41">"indetificador"</text:span> <text:span text:style-name="T25">type</text:span> <text:span text:style-name="T54">=</text:span> <text:span text:style-name="T41">"xs:string"</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4">=</text:span> <text:span text:style-name="T41">"comunicarAnotacionsPendentsResponse"</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schema</text:span> <text:span text:style-name="T14">&gt;</text:span> </text:p>
      <text:p text:style-name="P190"><text:span text:style-name="T54"><text:s text:c="5"/></text:span><text:span text:style-name="T14">&lt;/</text:span> <text:span text:style-name="T20">wsdl:types</text:span> <text:span text:style-name="T14">&gt;</text:span> </text:p>
      <text:p text:style-name="P190"><text:span text:style-name="T54"><text:s text:c="5"/></text:span><text:span text:style-name="T14">&lt;</text:span> <text:span text:style-name="T20">wsdl:message</text:span> <text:span text:style-name="T25">name</text:span> <text:span text:style-name="T54">=</text:span> <text:span text:style-name="T41">"comunicarAnotacionsPendents"</text:span> <text:span text:style-name="T14">&gt;</text:span> </text:p>
      <text:p text:style-name="P190"><text:span text:style-name="T54"><text:s text:c="7"/></text:span><text:span text:style-name="T14">&lt;</text:span> <text:span text:style-name="T20">wsdl:part</text:span> <text:span text:style-name="T25">element</text:span> <text:span text:style-name="T54">=</text:span> <text:span text:style-name="T41">"tns:comunicarAnotacionsPendents"</text:span> <text:span text:style-name="T25">name</text:span> <text:span text:style-name="T54">=</text:span> <text:span text:style-name="T41">"parameters"</text:span> <text:span text:style-name="T14">&gt;</text:span> </text:p>
      <text:p text:style-name="P190"><text:span text:style-name="T54"><text:s text:c="7"/></text:span><text:span text:style-name="T14">&lt;/</text:span> <text:span text:style-name="T20">wsdl:part</text:span> <text:span text:style-name="T14">&gt;</text:span> </text:p>
      <text:p text:style-name="P190"><text:span text:style-name="T54"><text:s text:c="5"/></text:span><text:span text:style-name="T14">&lt;/</text:span> <text:span text:style-name="T20">wsdl:message</text:span> <text:span text:style-name="T14">&gt;</text:span> </text:p>
      <text:p text:style-name="P190"><text:span text:style-name="T54"><text:s text:c="5"/></text:span><text:span text:style-name="T14">&lt;</text:span> <text:span text:style-name="T20">wsdl:message</text:span> <text:span text:style-name="T25">name</text:span> <text:span text:style-name="T54">=</text:span> <text:span text:style-name="T41">"comunicarAnotacionsPendentsResponse"</text:span> <text:span text:style-name="T14">&gt;</text:span> </text:p>
      <text:p text:style-name="P190"><text:span text:style-name="T54"><text:s text:c="7"/></text:span><text:span text:style-name="T14">&lt;</text:span> <text:span text:style-name="T20">wsdl:part</text:span> <text:span text:style-name="T25">element</text:span> <text:span text:style-name="T54">=</text:span> <text:span text:style-name="T41">"tns:comunicarAnotacionsPendentsResponse"</text:span> <text:span text:style-name="T25">name</text:span> <text:span text:style-name="T54">=</text:span> <text:span text:style-name="T41">"parameters"</text:span> <text:span text:style-name="T14">&gt;</text:span> </text:p>
      <text:p text:style-name="P190"><text:span text:style-name="T54"><text:s text:c="7"/></text:span><text:span text:style-name="T14">&lt;/</text:span> <text:span text:style-name="T20">wsdl:part</text:span> <text:span text:style-name="T14">&gt;</text:span> </text:p>
      <text:p text:style-name="P190"><text:span text:style-name="T54"><text:s text:c="5"/></text:span><text:span text:style-name="T14">&lt;/</text:span> <text:span text:style-name="T20">wsdl:message</text:span> <text:span text:style-name="T14">&gt;</text:span> </text:p>
      <text:p text:style-name="P190"><text:span text:style-name="T54"><text:s text:c="5"/></text:span><text:span text:style-name="T14">&lt;</text:span> <text:span text:style-name="T20">wsdl:portType</text:span> <text:span text:style-name="T25">name</text:span> <text:span text:style-name="T54">=</text:span> <text:span text:style-name="T41">"Backoffice"</text:span> <text:span text:style-name="T14">&gt;</text:span> </text:p>
      <text:p text:style-name="P190"><text:span text:style-name="T54"><text:s text:c="7"/></text:span><text:span text:style-name="T14">&lt;</text:span> <text:span text:style-name="T20">wsdl:operation</text:span> <text:span text:style-name="T25">name</text:span> <text:span text:style-name="T54">=</text:span> <text:span text:style-name="T41">"comunicarAnotacionsPendents"</text:span> <text:span text:style-name="T14">&gt;</text:span> </text:p>
      <text:p text:style-name="P190"><text:span text:style-name="T54"><text:s text:c="9"/></text:span><text:span text:style-name="T14">&lt;</text:span> <text:span text:style-name="T20">wsdl:input</text:span> <text:span text:style-name="T25">message</text:span> <text:span text:style-name="T54">=</text:span> <text:span text:style-name="T41">"tns:comunicarAnotacionsPendents"</text:span> <text:span text:style-name="T25">name</text:span> <text:span text:style-name="T54">=</text:span> <text:span text:style-name="T41">"comunicarAnotacionsPendents"</text:span> <text:span text:style-name="T14">&gt;</text:span> </text:p>
      <text:p text:style-name="P190"><text:span text:style-name="T54"><text:s text:c="7"/></text:span><text:span text:style-name="T14">&lt;/</text:span> <text:span text:style-name="T20">wsdl:input</text:span> <text:span text:style-name="T14">&gt;</text:span> </text:p>
      <text:p text:style-name="P190"><text:soft-page-break/><text:s/><text:span text:style-name="T54"><text:s text:c="9"/></text:span><text:span text:style-name="T14">&lt;</text:span> <text:span text:style-name="T20">wsdl:output</text:span> <text:span text:style-name="T25">message</text:span> <text:span text:style-name="T54">=</text:span> <text:span text:style-name="T41">"tns:comunicarAnotacionsPendentsResponse"</text:span> <text:span text:style-name="T25">name</text:span> <text:span text:style-name="T54">=</text:span> <text:span text:style-name="T41">"comunicarAnotacionsPendentsResponse"</text:span> <text:span text:style-name="T14">&gt;</text:span> </text:p>
      <text:p text:style-name="P190"><text:span text:style-name="T54"><text:s text:c="7"/></text:span><text:span text:style-name="T14">&lt;/</text:span> <text:span text:style-name="T20">wsdl:output</text:span> <text:span text:style-name="T14">&gt;</text:span> </text:p>
      <text:p text:style-name="P190"><text:s text:c="2"/><text:span text:style-name="T54"><text:s text:c="7"/></text:span><text:span text:style-name="T14">&lt;/</text:span> <text:span text:style-name="T20">wsdl:operation</text:span> <text:span text:style-name="T14">&gt;</text:span> </text:p>
      <text:p text:style-name="P190"><text:span text:style-name="T54"><text:s text:c="5"/></text:span><text:span text:style-name="T14">&lt;/</text:span> <text:span text:style-name="T20">wsdl:portType</text:span> <text:span text:style-name="T14">&gt;</text:span> </text:p>
      <text:p text:style-name="P190"><text:span text:style-name="T54"><text:s text:c="5"/></text:span><text:span text:style-name="T14">&lt;</text:span> <text:span text:style-name="T20">wsdl:binding</text:span> <text:span text:style-name="T25">name</text:span> <text:span text:style-name="T54">=</text:span> <text:span text:style-name="T41">"BackofficeServiceSoapBinding"</text:span> <text:span text:style-name="T25">type</text:span> <text:span text:style-name="T54">=</text:span> <text:span text:style-name="T41">"tns:Backoffice"</text:span> <text:span text:style-name="T14">&gt;</text:span> </text:p>
      <text:p text:style-name="P190"><text:span text:style-name="T54"><text:s text:c="7"/></text:span><text:span text:style-name="T14">&lt;</text:span> <text:span text:style-name="T20">soap:binding</text:span> <text:span text:style-name="T25">style</text:span> <text:span text:style-name="T54">=</text:span> <text:span text:style-name="T41">"document"</text:span> <text:span text:style-name="T25">transport</text:span> <text:span text:style-name="T54">=</text:span> <text:span text:style-name="T41">"http://schemas.xmlsoap.org/soap/http"</text:span> <text:span text:style-name="T14">/&gt;</text:span> </text:p>
      <text:p text:style-name="P190"><text:span text:style-name="T54"><text:s text:c="7"/></text:span><text:span text:style-name="T14">&lt;</text:span> <text:span text:style-name="T20">wsdl:operation</text:span> <text:span text:style-name="T25">name</text:span> <text:span text:style-name="T54">=</text:span> <text:span text:style-name="T41">"comunicarAnotacionsPendents"</text:span> <text:span text:style-name="T14">&gt;</text:span> </text:p>
      <text:p text:style-name="P190"><text:span text:style-name="T54"><text:s text:c="9"/></text:span><text:span text:style-name="T14">&lt;</text:span> <text:span text:style-name="T20">soap:operation</text:span> <text:span text:style-name="T25">soapAction</text:span> <text:span text:style-name="T54">=</text:span> <text:span text:style-name="T41">""</text:span> <text:span text:style-name="T25">style</text:span> <text:span text:style-name="T54">=</text:span> <text:span text:style-name="T41">"document"</text:span> <text:span text:style-name="T14">/&gt;</text:span> </text:p>
      <text:p text:style-name="P190"><text:span text:style-name="T54"><text:s text:c="9"/></text:span><text:span text:style-name="T14">&lt;</text:span> <text:span text:style-name="T20">wsdl:input</text:span> <text:span text:style-name="T25">name</text:span> <text:span text:style-name="T54">=</text:span> <text:span text:style-name="T41">"comunicarAnotacionsPendents"</text:span> <text:span text:style-name="T14">&gt;</text:span> </text:p>
      <text:p text:style-name="P190"><text:span text:style-name="T54"><text:s text:c="11"/></text:span><text:span text:style-name="T14">&lt;</text:span> <text:span text:style-name="T20">soap:body</text:span> <text:span text:style-name="T25">use</text:span> <text:span text:style-name="T54">=</text:span> <text:span text:style-name="T41">"literal"</text:span> <text:span text:style-name="T14">/&gt;</text:span> </text:p>
      <text:p text:style-name="P190"><text:span text:style-name="T54"><text:s text:c="9"/></text:span><text:span text:style-name="T14">&lt;/</text:span> <text:span text:style-name="T20">wsdl:input</text:span> <text:span text:style-name="T14">&gt;</text:span> </text:p>
      <text:p text:style-name="P190"><text:span text:style-name="T54"><text:s text:c="9"/></text:span><text:span text:style-name="T14">&lt;</text:span> <text:span text:style-name="T20">wsdl:output</text:span> <text:span text:style-name="T25">name</text:span> <text:span text:style-name="T54">=</text:span> <text:span text:style-name="T41">"comunicarAnotacionsPendentsResponse"</text:span> <text:span text:style-name="T14">&gt;</text:span> </text:p>
      <text:p text:style-name="P190"><text:span text:style-name="T54"><text:s text:c="11"/></text:span><text:span text:style-name="T14">&lt;</text:span> <text:span text:style-name="T20">soap:body</text:span> <text:span text:style-name="T25">use</text:span> <text:span text:style-name="T54">=</text:span> <text:span text:style-name="T41">"literal"</text:span> <text:span text:style-name="T14">/&gt;</text:span> </text:p>
      <text:p text:style-name="P190"><text:span text:style-name="T54"><text:s text:c="9"/></text:span><text:span text:style-name="T14">&lt;/</text:span> <text:span text:style-name="T20">wsdl:output</text:span> <text:span text:style-name="T14">&gt;</text:span> </text:p>
      <text:p text:style-name="P190"><text:span text:style-name="T54"><text:s text:c="7"/></text:span><text:span text:style-name="T14">&lt;/</text:span> <text:span text:style-name="T20">wsdl:operation</text:span> <text:span text:style-name="T14">&gt;</text:span> </text:p>
      <text:p text:style-name="P190"><text:span text:style-name="T54"><text:s text:c="5"/></text:span><text:span text:style-name="T14">&lt;/</text:span> <text:span text:style-name="T20">wsdl:binding</text:span> <text:span text:style-name="T14">&gt;</text:span> </text:p>
      <text:p text:style-name="P190"><text:span text:style-name="T54"><text:s text:c="5"/></text:span><text:span text:style-name="T14">&lt;</text:span> <text:span text:style-name="T20">wsdl:service</text:span> <text:span text:style-name="T25">name</text:span> <text:span text:style-name="T54">=</text:span> <text:span text:style-name="T41">"BackofficeService"</text:span> <text:span text:style-name="T14">&gt;</text:span> </text:p>
      <text:p text:style-name="P190"><text:s text:c="3"/><text:span text:style-name="T54"><text:s text:c="7"/></text:span><text:span text:style-name="T14">&lt;</text:span> <text:span text:style-name="T20">wsdl:port</text:span> <text:span text:style-name="T25">binding</text:span> <text:span text:style-name="T54">=</text:span> <text:span text:style-name="T41">"tns:BackofficeServiceSoapBinding"</text:span> <text:span text:style-name="T25">name</text:span> <text:span text:style-name="T54">=</text:span> <text:span text:style-name="T41">"BackofficeServicePort"</text:span> <text:span text:style-name="T14">&gt;</text:span> </text:p>
      <text:p text:style-name="P190"><text:span text:style-name="T54"><text:s text:c="9"/></text:span><text:span text:style-name="T14">&lt;</text:span> <text:span text:style-name="T20">soap:address</text:span> <text:span text:style-name="T25">location</text:span> <text:span text:style-name="T54">=</text:span> <text:span text:style-name="T41">"http://localhost:8080/distribucio/ws/backoffice"</text:span> <text:span text:style-name="T14">/&gt;</text:span> </text:p>
      <text:p text:style-name="P190"><text:span text:style-name="T54"><text:s text:c="7"/></text:span><text:span text:style-name="T14">&lt;/</text:span> <text:span text:style-name="T20">wsdl:port</text:span> <text:span text:style-name="T14">&gt;</text:span> </text:p>
      <text:p text:style-name="P190"><text:span text:style-name="T54"><text:s text:c="5"/></text:span><text:span text:style-name="T14">&lt;/</text:span> <text:span text:style-name="T20">wsdl:service</text:span> <text:span text:style-name="T14">&gt;</text:span> </text:p>
      <text:p text:style-name="P191"><text:span text:style-name="T14">&lt;/</text:span> <text:span text:style-name="T20">wsdl:definitions</text:span> <text:span text:style-name="T14">&gt;</text:span> </text:p>
      <text:p text:style-name="P43"><text:s text:c="3"/></text:p>
      <text:list xml:id="list94025285871191" text:continue-numbering="true" text:style-name="Outline">
        <text:list-header>
          <text:h text:style-name="P407" text:outline-level="1" text:is-list-header="true"><text:bookmark-start text:name="__RefHeading___Toc60796_1326387233"/><text:span text:style-name="T112">Annex </text:span><text:span text:style-name="T229">II</text:span><text:span text:style-name="T112">: </text:span><text:span text:style-name="T227">E</text:span><text:span text:style-name="T228">xemple d'ús de la llibreria de </text:span><text:span text:style-name="T230">distribucio-backoffice-utils</text:span><text:bookmark-end text:name="__RefHeading___Toc60796_1326387233"/></text:h>
        </text:list-header>
      </text:list>
      <table:table table:name="Table4" table:style-name="Table4">
        <table:table-column table:style-name="Table4.A"/>
        <table:table-row table:style-name="TableLine930269552">
          <table:table-cell table:style-name="Table4.A1" office:value-type="string">
            <text:p text:style-name="P118"><text:span text:style-name="T51">package</text:span><text:span text:style-name="T59"> es.caib.distribucio.core.service.ws.backoffice;</text:span></text:p>
            <text:p text:style-name="P186"/>
            <text:p text:style-name="P120"><text:span text:style-name="T51">import</text:span><text:span text:style-name="T59"> java.util.Arrays;</text:span></text:p>
            <text:p text:style-name="P120"><text:span text:style-name="T51">import</text:span><text:span text:style-name="T59"> java.util.Date;</text:span></text:p>
            <text:p text:style-name="P120"><text:span text:style-name="T51">import</text:span><text:span text:style-name="T59"> java.util.List;</text:span></text:p>
            <text:p text:style-name="P120"><text:span text:style-name="T51">import</text:span><text:span text:style-name="T59"> java.util.Map;</text:span></text:p>
            <text:p text:style-name="P120"><text:span text:style-name="T51">import</text:span><text:span text:style-name="T59"> java.util.Properties;</text:span></text:p>
            <text:p text:style-name="P186"/>
            <text:p text:style-name="P120"><text:span text:style-name="T51">import</text:span><text:span text:style-name="T59"> javax.jws.WebService;</text:span></text:p>
            <text:p text:style-name="P186"/>
            <text:p text:style-name="P120"><text:span text:style-name="T51">import</text:span><text:span text:style-name="T59"> org.apache.commons.lang.builder.ToStringBuilder;</text:span></text:p>
            <text:p text:style-name="P120"><text:span text:style-name="T51">import</text:span><text:span text:style-name="T59"> org.slf4j.Logger;</text:span></text:p>
            <text:p text:style-name="P120"><text:span text:style-name="T51">import</text:span><text:span text:style-name="T59"> org.slf4j.LoggerFactory;</text:span></text:p>
            <text:p text:style-name="P120"><text:span text:style-name="T51">import</text:span><text:span text:style-name="T59"> org.springframework.stereotype.Component;</text:span></text:p>
            <text:p text:style-name="P186"/>
            <text:p text:style-name="P120"><text:span text:style-name="T51">import</text:span><text:span text:style-name="T59"> es.caib.distribucio.backoffice.utils.arxiu.ArxiuPluginListener;</text:span></text:p>
            <text:p text:style-name="P120"><text:span text:style-name="T51">import</text:span><text:span text:style-name="T59"> es.caib.distribucio.backoffice.utils.arxiu.ArxiuResultat;</text:span></text:p>
            <text:p text:style-name="P120"><text:span text:style-name="T51">import</text:span><text:span text:style-name="T59"> es.caib.distribucio.backoffice.utils.arxiu.ArxiuResultatAnnex;</text:span></text:p>
            <text:p text:style-name="P120"><text:span text:style-name="T51">import</text:span><text:span text:style-name="T59"> es.caib.distribucio.backoffice.utils.arxiu.BackofficeArxiuUtils;</text:span></text:p>
            <text:p text:style-name="P120"><text:span text:style-name="T51">import</text:span><text:span text:style-name="T59"> es.caib.distribucio.backoffice.utils.arxiu.BackofficeArxiuUtilsImpl;</text:span></text:p>
            <text:p text:style-name="P120"><text:span text:style-name="T51">import</text:span><text:span text:style-name="T59"> es.caib.distribucio.backoffice.utils.arxiu.DistribucioArxiuError;</text:span></text:p>
            <text:p text:style-name="P120"><text:span text:style-name="T51">import</text:span><text:span text:style-name="T59"> es.caib.distribucio.backoffice.utils.sistra.BackofficeSistra2Utils;</text:span></text:p>
            <text:p text:style-name="P120"><text:span text:style-name="T51">import</text:span><text:span text:style-name="T59"> es.caib.distribucio.backoffice.utils.sistra.BackofficeSistra2UtilsImpl;</text:span></text:p>
            <text:p text:style-name="P120"><text:span text:style-name="T51">import</text:span><text:span text:style-name="T59"> es.caib.distribucio.backoffice.utils.sistra.formulario.Formulario;</text:span></text:p>
            <text:p text:style-name="P120"><text:span text:style-name="T51">import</text:span><text:span text:style-name="T59"> es.caib.distribucio.backoffice.utils.sistra.pago.Pago;</text:span></text:p>
            <text:p text:style-name="P120"><text:span text:style-name="T51">import</text:span><text:span text:style-name="T59"> es.caib.distribucio.core.api.dto.ExpedientEstatEnumDto;</text:span></text:p>
            <text:p text:style-name="P120"><text:span text:style-name="T51">import</text:span><text:span text:style-name="T59"> es.caib.distribucio.core.api.service.ws.backoffice.AnotacioRegistreId;</text:span></text:p>
            <text:p text:style-name="P120"><text:span text:style-name="T51">import</text:span><text:span text:style-name="T59"> es.caib.distribucio.core.api.service.ws.backoffice.BackofficeWsService;</text:span></text:p>
            <text:p text:style-name="P120"><text:span text:style-name="T51">import</text:span><text:span text:style-name="T59"> es.caib.distribucio.core.helper.IntegracioHelper;</text:span></text:p>
            <text:p text:style-name="P120"><text:span text:style-name="T51">import</text:span><text:span text:style-name="T59"> es.caib.distribucio.core.helper.PropertiesHelper;</text:span></text:p>
            <text:p text:style-name="P120"><text:span text:style-name="T51">import</text:span><text:span text:style-name="T59"> es.caib.distribucio.core.helper.RegistreHelper;</text:span></text:p>
            <text:p text:style-name="P120"><text:span text:style-name="T51">import</text:span><text:span text:style-name="T59"> es.caib.distribucio.plugin.SistemaExternException;</text:span></text:p>
            <text:p text:style-name="P120"><text:span text:style-name="T51">import</text:span><text:span text:style-name="T59"> es.caib.distribucio.ws.backofficeintegracio.Annex;</text:span></text:p>
            <text:p text:style-name="P120"><text:span text:style-name="T51">import</text:span><text:span text:style-name="T59"> es.caib.distribucio.ws.backofficeintegracio.AnotacioRegistreEntrada;</text:span></text:p>
            <text:p text:style-name="P120"><text:span text:style-name="T51">import</text:span><text:span text:style-name="T59"> es.caib.distribucio.ws.backofficeintegracio.BackofficeIntegracio;</text:span></text:p>
            <text:p text:style-name="P120"><text:span text:style-name="T51">import</text:span><text:span text:style-name="T59"> es.caib.distribucio.ws.client.BackofficeIntegracioWsClientFactory;</text:span></text:p>
            <text:p text:style-name="P120"><text:span text:style-name="T51">import</text:span><text:span text:style-name="T59"> es.caib.plugins.arxiu.api.ContingutArxiu;</text:span></text:p>
            <text:p text:style-name="P120"><text:span text:style-name="T51">import</text:span><text:span text:style-name="T59"> es.caib.plugins.arxiu.api.Document;</text:span></text:p>
            <text:p text:style-name="P120"><text:span text:style-name="T51">import</text:span><text:span text:style-name="T59"> es.caib.plugins.arxiu.api.Expedient;</text:span></text:p>
            <text:p text:style-name="P118"><text:span text:style-name="T51">import</text:span><text:span text:style-name="T59"> es.caib.plugins.arxiu.api.IArxiuPlugin;</text:span></text:p>
            <text:p text:style-name="P187"/>
            <text:p text:style-name="P131">/**</text:p>
            <text:p text:style-name="P119"><text:span text:style-name="T199"><text:s/>* </text:span><text:span text:style-name="T202">Exemple</text:span><text:span text:style-name="T199"> </text:span><text:span text:style-name="T202">de</text:span><text:span text:style-name="T199"> WS </text:span><text:span text:style-name="T202">Backoffice</text:span><text:span text:style-name="T199"> </text:span><text:span text:style-name="T202">Distribucio</text:span><text:span text:style-name="T199"> per </text:span><text:span text:style-name="T202">rebre</text:span><text:span text:style-name="T199"> </text:span><text:span text:style-name="T202">peticions</text:span><text:span text:style-name="T199"> d'anotacions </text:span><text:span text:style-name="T202">pendents</text:span></text:p>
            <text:p text:style-name="P131"><text:s/>* </text:p>
            <text:p text:style-name="P119"><text:span text:style-name="T199"><text:s/>* </text:span><text:span text:style-name="T204">@author</text:span><text:span text:style-name="T199"> Limit </text:span><text:span text:style-name="T202">Tecnologies</text:span><text:span text:style-name="T199"> &lt;limit</text:span><text:span text:style-name="T202">@limit.es</text:span><text:span text:style-name="T199">&gt;</text:span></text:p>
            <text:p text:style-name="P131"><text:s/>*/</text:p>
            <text:p text:style-name="P116">@Component</text:p>
            <text:p text:style-name="P119"><text:span text:style-name="T109">@WebService</text:span><text:span text:style-name="T59">(</text:span></text:p>
            <text:p text:style-name="P119"><text:span text:style-name="T59"><text:tab/><text:tab/>name = </text:span><text:span text:style-name="T36">"Backoffice"</text:span><text:span text:style-name="T59">,</text:span></text:p>
            <text:p text:style-name="P119"><text:span text:style-name="T59"><text:tab/><text:tab/>serviceName = </text:span><text:span text:style-name="T36">"BackofficeService"</text:span><text:span text:style-name="T59">,</text:span></text:p>
            <text:p text:style-name="P119"><text:span text:style-name="T59"><text:tab/><text:tab/>portName = </text:span><text:span text:style-name="T36">"BackofficeServicePort"</text:span><text:span text:style-name="T59">,</text:span></text:p>
            <text:p text:style-name="P119"><text:span text:style-name="T59"><text:tab/><text:tab/>endpointInterface = </text:span><text:span text:style-name="T36">"es.caib.ripea.core.api.service.ws.BackofficeWsServiceBean"</text:span><text:span text:style-name="T59">,</text:span></text:p>
            <text:p text:style-name="P119"><text:span text:style-name="T59"><text:tab/><text:tab/>targetNamespace = </text:span><text:span text:style-name="T36">"http://www.caib.es/distribucio/ws/backoffice"</text:span><text:span text:style-name="T59">)</text:span></text:p>
            <text:p text:style-name="P119"><text:span text:style-name="T51">public</text:span><text:span text:style-name="T59"> </text:span><text:span text:style-name="T51">class</text:span><text:span text:style-name="T59"> BackofficeWsServiceImpl </text:span><text:span text:style-name="T51">implements</text:span><text:span text:style-name="T59"> BackofficeWsService, </text:span></text:p>
            <text:p text:style-name="P92"><text:tab/><text:tab/><text:tab/><text:tab/><text:tab/><text:tab/><text:tab/><text:tab/><text:tab/><text:tab/><text:tab/><text:tab/>ArxiuPluginListener {</text:p>
            <text:p text:style-name="P92"><text:tab/></text:p>
            <text:p text:style-name="P119"><text:span text:style-name="T59"><text:tab/></text:span><text:span text:style-name="T199">/** </text:span><text:span text:style-name="T202">Instància</text:span><text:span text:style-name="T199"> </text:span><text:span text:style-name="T202">del</text:span><text:span text:style-name="T199"> </text:span><text:span text:style-name="T202">plugin</text:span><text:span text:style-name="T199"> d'Arxiu */</text:span></text:p>
            <text:p text:style-name="P119"><text:span text:style-name="T59"><text:tab/></text:span><text:span text:style-name="T51">private</text:span><text:span text:style-name="T59"> IArxiuPlugin </text:span><text:span text:style-name="T79">arxiuPlugin</text:span><text:span text:style-name="T59"> = </text:span><text:span text:style-name="T51">null</text:span><text:span text:style-name="T59">;</text:span></text:p>
            <text:p text:style-name="P92"><text:tab/><text:tab/></text:p>
            <text:p text:style-name="P119"><text:span text:style-name="T59"><text:tab/></text:span><text:span text:style-name="T199">/** </text:span><text:span text:style-name="T202">Mètode</text:span><text:span text:style-name="T199"> </text:span><text:span text:style-name="T202">del</text:span><text:span text:style-name="T199"> WS </text:span><text:span text:style-name="T202">que</text:span><text:span text:style-name="T199"> </text:span><text:span text:style-name="T202">rep</text:span><text:span text:style-name="T199"> </text:span><text:span text:style-name="T202">les</text:span><text:span text:style-name="T199"> </text:span><text:span text:style-name="T202">comunicacions</text:span><text:span text:style-name="T199"> d'anotacions </text:span><text:span text:style-name="T202">pendents</text:span><text:span text:style-name="T199">. */</text:span></text:p>
            <text:p text:style-name="P119"><text:span text:style-name="T59"><text:tab/></text:span><text:span text:style-name="T109">@Override</text:span></text:p>
            <text:p text:style-name="P119"><text:span text:style-name="T59"><text:tab/></text:span><text:span text:style-name="T51">public</text:span><text:span text:style-name="T59"> </text:span><text:span text:style-name="T51">void</text:span><text:span text:style-name="T59"> comunicarAnotacionsPendents(List&lt;AnotacioRegistreId&gt; </text:span><text:span text:style-name="T85">ids</text:span><text:span text:style-name="T59">) {</text:span></text:p>
            <text:p text:style-name="P187"/>
            <text:p text:style-name="P119"><text:span text:style-name="T59"><text:tab/><text:tab/></text:span><text:span text:style-name="T51">try</text:span><text:span text:style-name="T59"> {</text:span></text:p>
            <text:p text:style-name="P119"><text:span text:style-name="T59"><text:tab/><text:tab/><text:tab/></text:span><text:span text:style-name="T217">// Client </text:span><text:span text:style-name="T218">dels</text:span><text:span text:style-name="T217"> </text:span><text:span text:style-name="T218">serveis</text:span><text:span text:style-name="T217"> web </text:span><text:span text:style-name="T218">de</text:span><text:span text:style-name="T217"> </text:span><text:span text:style-name="T218">backoffice</text:span><text:span text:style-name="T217"> per </text:span><text:span text:style-name="T218">consultar</text:span><text:span text:style-name="T217"> </text:span><text:span text:style-name="T218">anotacions</text:span></text:p>
            <text:p text:style-name="P119"><text:span text:style-name="T59"><text:tab/><text:tab/><text:tab/>BackofficeIntegracio </text:span><text:span text:style-name="T85">backofficeClient</text:span><text:span text:style-name="T59"> = getBackofficeIntegracioServicePort();</text:span></text:p>
            <text:p text:style-name="P119"><text:span text:style-name="T59"><text:tab/><text:tab/><text:tab/>es.caib.distribucio.ws.backofficeintegracio.AnotacioRegistreId </text:span><text:span text:style-name="T85">idWs</text:span><text:span text:style-name="T59">;</text:span></text:p>
            <text:p text:style-name="P128"><text:span text:style-name="T59"><text:tab/><text:tab/><text:tab/></text:span><text:span text:style-name="T51">for</text:span><text:span text:style-name="T59"> (AnotacioRegistreId </text:span><text:span text:style-name="T85">id</text:span><text:span text:style-name="T59"> : </text:span><text:span text:style-name="T85">ids</text:span><text:span text:style-name="T59">) {</text:span></text:p>
            <text:p text:style-name="P119"><text:soft-page-break/><text:span text:style-name="T59"><text:tab/><text:tab/><text:tab/><text:tab/></text:span><text:span text:style-name="T51">try</text:span><text:span text:style-name="T59"> {</text:span></text:p>
            <text:p text:style-name="P119"><text:span text:style-name="T59"><text:tab/><text:tab/><text:tab/><text:tab/><text:tab/></text:span><text:span text:style-name="T217">// </text:span><text:span text:style-name="T218">Construeix</text:span><text:span text:style-name="T217"> l'identificador </text:span><text:span text:style-name="T218">pel</text:span><text:span text:style-name="T217"> WS </text:span><text:span text:style-name="T218">del</text:span><text:span text:style-name="T217"> </text:span><text:span text:style-name="T218">backoffice</text:span><text:span text:style-name="T217"> </text:span><text:span text:style-name="T218">de</text:span><text:span text:style-name="T217"> DISTRIBUCIO</text:span></text:p>
            <text:p text:style-name="P119"><text:span text:style-name="T59"><text:tab/><text:tab/><text:tab/><text:tab/><text:tab/></text:span><text:span text:style-name="T85">idWs</text:span><text:span text:style-name="T59"> = </text:span><text:span text:style-name="T51">new</text:span><text:span text:style-name="T59"> es.caib.distribucio.ws.backofficeintegracio.AnotacioRegistreId();</text:span></text:p>
            <text:p text:style-name="P119"><text:span text:style-name="T59"><text:tab/><text:tab/><text:tab/><text:tab/><text:tab/></text:span><text:span text:style-name="T85">idWs</text:span><text:span text:style-name="T59">.setClauAcces(</text:span><text:span text:style-name="T85">id</text:span><text:span text:style-name="T59">.getClauAcces());</text:span></text:p>
            <text:p text:style-name="P119"><text:span text:style-name="T59"><text:tab/><text:tab/><text:tab/><text:tab/><text:tab/></text:span><text:span text:style-name="T85">idWs</text:span><text:span text:style-name="T59">.setIde</text:span><text:span text:style-name="T76">n</text:span><text:span text:style-name="T59">tificador(</text:span><text:span text:style-name="T85">id</text:span><text:span text:style-name="T59">.getIde</text:span><text:span text:style-name="T76">n</text:span><text:span text:style-name="T59">tificador());</text:span></text:p>
            <text:p text:style-name="P92"><text:tab/><text:tab/></text:p>
            <text:p text:style-name="P119"><text:span text:style-name="T59"><text:tab/><text:tab/><text:tab/><text:tab/><text:tab/></text:span><text:span text:style-name="T217">// </text:span><text:span text:style-name="T218">Consulta</text:span><text:span text:style-name="T217"> l'anotació</text:span></text:p>
            <text:p text:style-name="P119"><text:span text:style-name="T59"><text:tab/><text:tab/><text:tab/><text:tab/><text:tab/>AnotacioRegistreEntrada </text:span><text:span text:style-name="T85">anotacio</text:span><text:span text:style-name="T59"> = </text:span><text:span text:style-name="T85">backofficeClient</text:span><text:span text:style-name="T59">.consulta(</text:span><text:span text:style-name="T85">idWs</text:span><text:span text:style-name="T59">);</text:span></text:p>
            <text:p text:style-name="P119"><text:span text:style-name="T59"><text:tab/><text:tab/><text:tab/><text:tab/><text:tab/></text:span><text:span text:style-name="T217">// </text:span><text:span text:style-name="T218">Canvia</text:span><text:span text:style-name="T217"> l'estat a </text:span><text:span text:style-name="T218">Rebuda</text:span></text:p>
            <text:p text:style-name="P119"><text:span text:style-name="T59"><text:tab/><text:tab/><text:tab/><text:tab/><text:tab/></text:span><text:span text:style-name="T85">backofficeClient</text:span><text:span text:style-name="T59">.canviEstat(</text:span></text:p>
            <text:p text:style-name="P119"><text:span text:style-name="T59"><text:tab/><text:tab/><text:tab/><text:tab/><text:tab/><text:tab/><text:tab/></text:span><text:span text:style-name="T85">idWs</text:span><text:span text:style-name="T59">,</text:span></text:p>
            <text:p text:style-name="P119"><text:span text:style-name="T59"><text:tab/><text:tab/><text:tab/><text:tab/><text:tab/><text:tab/><text:tab/>es.caib.distribucio.ws.backofficeintegracio.Estat.</text:span><text:span text:style-name="T80">REBUDA</text:span><text:span text:style-name="T59">,</text:span></text:p>
            <text:p text:style-name="P119"><text:span text:style-name="T59"><text:tab/><text:tab/><text:tab/><text:tab/><text:tab/><text:tab/><text:tab/></text:span><text:span text:style-name="T36">"Canviar l'estat a rebuda"</text:span><text:span text:style-name="T59">);</text:span></text:p>
            <text:p text:style-name="P92"><text:tab/><text:tab/><text:tab/><text:tab/><text:tab/></text:p>
            <text:p text:style-name="P119"><text:span text:style-name="T59"><text:tab/><text:tab/><text:tab/><text:tab/><text:tab/></text:span><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19"><text:span text:style-name="T59"><text:tab/><text:tab/><text:tab/><text:tab/><text:tab/></text:span><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19"><text:span text:style-name="T59"><text:tab/><text:tab/><text:tab/><text:tab/><text:tab/>BackofficeArxiuUtils </text:span><text:span text:style-name="T85">backoffice</text:span><text:span text:style-name="T92">Arxiu</text:span><text:span text:style-name="T85">Utils</text:span><text:span text:style-name="T59"> = </text:span><text:span text:style-name="T51">new</text:span><text:span text:style-name="T59"> BackofficeArxiuUtilsImpl(getArxiuPlugin());</text:span></text:p>
            <text:p text:style-name="P119"><text:span text:style-name="T59"><text:tab/><text:tab/><text:tab/><text:tab/><text:tab/></text:span><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19"><text:span text:style-name="T59"><text:tab/><text:tab/><text:tab/><text:tab/><text:tab/></text:span><text:span text:style-name="T85">backoffice</text:span><text:span text:style-name="T92">Arxiu</text:span><text:span text:style-name="T85">Utils</text:span><text:span text:style-name="T59">.setArxiuPluginListener(</text:span><text:span text:style-name="T51">this</text:span><text:span text:style-name="T59">);</text:span></text:p>
            <text:p text:style-name="P119"><text:span text:style-name="T59"><text:tab/><text:tab/><text:tab/><text:tab/><text:tab/></text:span><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19"><text:span text:style-name="T59"><text:tab/><text:tab/><text:tab/><text:tab/><text:tab/></text:span><text:span text:style-name="T85">backoffice</text:span><text:span text:style-name="T92">Arxiu</text:span><text:span text:style-name="T85">Utils</text:span><text:span text:style-name="T59">.setCarpeta(</text:span><text:span text:style-name="T85">anotacio</text:span><text:span text:style-name="T59">.getIdentificador());</text:span></text:p>
            <text:p text:style-name="P92"><text:tab/><text:tab/></text:p>
            <text:p text:style-name="P119"><text:span text:style-name="T59"><text:tab/><text:tab/><text:tab/><text:tab/><text:tab/></text:span><text:span text:style-name="T217">// </text:span><text:span text:style-name="T218">Crida</text:span><text:span text:style-name="T217"> a </text:span><text:span text:style-name="T218">la</text:span><text:span text:style-name="T217"> </text:span><text:span text:style-name="T218">creació</text:span><text:span text:style-name="T217"> </text:span><text:span text:style-name="T218">de</text:span><text:span text:style-name="T217"> l'expedient</text:span></text:p>
            <text:p text:style-name="P119"><text:span text:style-name="T59"><text:tab/><text:tab/><text:tab/><text:tab/><text:tab/>String </text:span><text:span text:style-name="T85">SERIE_DOCUMENTAL</text:span><text:span text:style-name="T59"> = </text:span><text:span text:style-name="T36">"S0002"</text:span><text:span text:style-name="T59">; </text:span></text:p>
            <text:p text:style-name="P119"><text:span text:style-name="T59"><text:tab/><text:tab/><text:tab/><text:tab/><text:tab/>String </text:span><text:span text:style-name="T85">CLASSIFICACIO</text:span><text:span text:style-name="T59"> = </text:span><text:span text:style-name="T36">"000000"</text:span><text:span text:style-name="T59">;</text:span></text:p>
            <text:p text:style-name="P119"><text:span text:style-name="T59"><text:tab/><text:tab/><text:tab/><text:tab/><text:tab/>ArxiuResultat </text:span><text:span text:style-name="T85">arxiuResultat</text:span><text:span text:style-name="T59">;</text:span></text:p>
            <text:p text:style-name="P119"><text:span text:style-name="T59"><text:tab/><text:tab/><text:tab/><text:tab/><text:tab/></text:span><text:span text:style-name="T51">int</text:span><text:span text:style-name="T59"> </text:span><text:span text:style-name="T85">intent</text:span><text:span text:style-name="T59"> = 0;</text:span></text:p>
            <text:p text:style-name="P119"><text:span text:style-name="T59"><text:tab/><text:tab/><text:tab/><text:tab/><text:tab/>String </text:span><text:span text:style-name="T85">expedientUuid</text:span><text:span text:style-name="T59"> = </text:span><text:span text:style-name="T51">null</text:span><text:span text:style-name="T59">;</text:span></text:p>
            <text:p text:style-name="P119"><text:span text:style-name="T59"><text:tab/><text:tab/><text:tab/><text:tab/><text:tab/></text:span><text:span text:style-name="T51">do</text:span><text:span text:style-name="T59"> {</text:span></text:p>
            <text:p text:style-name="P119"><text:span text:style-name="T59"><text:tab/><text:tab/><text:tab/><text:tab/><text:tab/><text:tab/></text:span><text:span text:style-name="T217">// </text:span><text:span text:style-name="T218">Crida</text:span><text:span text:style-name="T217"> </text:span><text:span text:style-name="T218">al</text:span><text:span text:style-name="T217"> </text:span><text:span text:style-name="T218">mètode</text:span><text:span text:style-name="T217"> </text:span><text:span text:style-name="T218">de</text:span><text:span text:style-name="T217"> </text:span><text:span text:style-name="T218">creació</text:span><text:span text:style-name="T217"> </text:span><text:span text:style-name="T218">de</text:span><text:span text:style-name="T217"> </text:span><text:span text:style-name="T218">la</text:span><text:span text:style-name="T217"> </text:span><text:span text:style-name="T218">llibreria</text:span></text:p>
            <text:p text:style-name="P119"><text:span text:style-name="T59"><text:tab/><text:tab/><text:tab/><text:tab/><text:tab/><text:tab/></text:span><text:span text:style-name="T85">arxiuResultat</text:span><text:span text:style-name="T59"> = </text:span><text:span text:style-name="T85">backoffice</text:span><text:span text:style-name="T92">Arxiu</text:span><text:span text:style-name="T85">Utils</text:span><text:span text:style-name="T59">.crearExpedientAmbAnotacioRegistre(</text:span></text:p>
            <text:p text:style-name="P119"><text:span text:style-name="T59"><text:tab/><text:tab/><text:tab/><text:tab/><text:tab/><text:tab/><text:tab/><text:tab/></text:span><text:span text:style-name="T85">expedientUuid</text:span><text:span text:style-name="T59">,</text:span></text:p>
            <text:p text:style-name="P119"><text:span text:style-name="T59"><text:tab/><text:tab/><text:tab/><text:tab/><text:tab/><text:tab/><text:tab/><text:tab/></text:span><text:span text:style-name="T85">anotacio</text:span><text:span text:style-name="T59">.getIdentificador(),</text:span></text:p>
            <text:p text:style-name="P119"><text:span text:style-name="T59"><text:tab/><text:tab/><text:tab/><text:tab/><text:tab/><text:tab/><text:tab/><text:tab/></text:span><text:span text:style-name="T51">null</text:span><text:span text:style-name="T59">,</text:span></text:p>
            <text:p text:style-name="P119"><text:span text:style-name="T59"><text:tab/><text:tab/><text:tab/><text:tab/><text:tab/><text:tab/><text:tab/><text:tab/>Arrays.</text:span><text:span text:style-name="T66">asList</text:span><text:span text:style-name="T59">(</text:span><text:span text:style-name="T36">"A04019281"</text:span><text:span text:style-name="T59">),</text:span></text:p>
            <text:p text:style-name="P119"><text:span text:style-name="T59"><text:tab/><text:tab/><text:tab/><text:tab/><text:tab/><text:tab/><text:tab/><text:tab/></text:span><text:span text:style-name="T51">new</text:span><text:span text:style-name="T59"> Date(),</text:span></text:p>
            <text:p text:style-name="P119"><text:span text:style-name="T59"><text:tab/><text:tab/><text:tab/><text:tab/><text:tab/><text:tab/><text:tab/><text:tab/></text:span><text:span text:style-name="T85">CLASSIFICACIO</text:span><text:span text:style-name="T59">,</text:span></text:p>
            <text:p text:style-name="P119"><text:span text:style-name="T59"><text:tab/><text:tab/><text:tab/><text:tab/><text:tab/><text:tab/><text:tab/><text:tab/>ExpedientEstatEnumDto.</text:span><text:span text:style-name="T80">OBERT</text:span><text:span text:style-name="T59">,</text:span></text:p>
            <text:p text:style-name="P119"><text:span text:style-name="T59"><text:tab/><text:tab/><text:tab/><text:tab/><text:tab/><text:tab/><text:tab/><text:tab/></text:span><text:span text:style-name="T85">SERIE_DOCUMENTAL</text:span><text:span text:style-name="T59">,</text:span></text:p>
            <text:p text:style-name="P119"><text:span text:style-name="T59"><text:tab/><text:tab/><text:tab/><text:tab/><text:tab/><text:tab/><text:tab/><text:tab/></text:span><text:span text:style-name="T85">anotacio</text:span><text:span text:style-name="T59">);</text:span></text:p>
            <text:p text:style-name="P119"><text:span text:style-name="T59"><text:tab/><text:tab/><text:tab/><text:tab/><text:tab/><text:tab/></text:span><text:span text:style-name="T85">expedientUuid</text:span><text:span text:style-name="T59"> = </text:span><text:span text:style-name="T85">arxiuResultat</text:span><text:span text:style-name="T59">.getIdentificadorExpedient();</text:span></text:p>
            <text:p text:style-name="P119"><text:span text:style-name="T59"><text:tab/><text:tab/><text:tab/><text:tab/><text:tab/><text:tab/></text:span><text:span text:style-name="T217">// </text:span><text:span text:style-name="T218">Imprimeix</text:span><text:span text:style-name="T217"> el </text:span><text:span text:style-name="T218">resultat</text:span><text:span text:style-name="T217"> per </text:span><text:span text:style-name="T218">pantalla</text:span></text:p>
            <text:p text:style-name="P119"><text:span text:style-name="T59"><text:tab/><text:tab/><text:tab/><text:tab/><text:tab/><text:tab/></text:span><text:span text:style-name="T51">this</text:span><text:span text:style-name="T59">.logResultat(</text:span></text:p>
            <text:p text:style-name="P119"><text:span text:style-name="T59"><text:tab/><text:tab/><text:tab/><text:tab/><text:tab/><text:tab/><text:tab/><text:tab/></text:span><text:span text:style-name="T36">"Resultat de la crida "</text:span><text:span text:style-name="T59"> + </text:span><text:span text:style-name="T85">intent</text:span><text:span text:style-name="T59">++ + </text:span><text:span text:style-name="T36">" crearExpedientAmbAnotacioRegistre per l'expedient"</text:span><text:span text:style-name="T59"> + </text:span><text:span text:style-name="T85">anotacio</text:span><text:span text:style-name="T59">.getExpedientNumero(),</text:span></text:p>
            <text:p text:style-name="P119"><text:span text:style-name="T59"><text:tab/><text:tab/><text:tab/><text:tab/><text:tab/><text:tab/><text:tab/><text:tab/></text:span><text:span text:style-name="T85">arxiuResultat</text:span><text:span text:style-name="T59">);<text:tab/><text:tab/><text:tab/><text:tab/><text:tab/></text:span></text:p>
            <text:p text:style-name="P119"><text:span text:style-name="T59"><text:tab/><text:tab/><text:tab/><text:tab/><text:tab/>} </text:span><text:span text:style-name="T51">while</text:span><text:span text:style-name="T59">(</text:span><text:span text:style-name="T85">arxiuResultat</text:span><text:span text:style-name="T59">.getErrorCodi() != </text:span><text:span text:style-name="T73">DistribucioArxiuError.</text:span><text:span text:style-name="T81">NO_ERROR</text:span><text:span text:style-name="T59"> &amp;&amp; </text:span><text:span text:style-name="T85">intent</text:span><text:span text:style-name="T59"> &lt; 10);<text:tab/></text:span></text:p>
            <text:p text:style-name="P187"/>
            <text:p text:style-name="P119"><text:span text:style-name="T59"><text:tab/><text:tab/><text:tab/><text:tab/><text:tab/></text:span><text:span text:style-name="T217">// </text:span><text:span text:style-name="T218">Consultem</text:span><text:span text:style-name="T217"> el </text:span><text:span text:style-name="T218">nou</text:span><text:span text:style-name="T217"> expedient a l'Arxiu</text:span></text:p>
            <text:p text:style-name="P119"><text:span text:style-name="T59"><text:tab/><text:tab/><text:tab/><text:tab/><text:tab/></text:span><text:span text:style-name="T51">if</text:span><text:span text:style-name="T59"> (</text:span><text:span text:style-name="T85">expedientUuid</text:span><text:span text:style-name="T59"> != </text:span><text:span text:style-name="T51">null</text:span><text:span text:style-name="T59">) {</text:span></text:p>
            <text:p text:style-name="P119"><text:span text:style-name="T59"><text:tab/><text:tab/><text:tab/><text:tab/><text:tab/><text:tab/>Expedient </text:span><text:span text:style-name="T85">expedientDetalls</text:span><text:span text:style-name="T59"> = getArxiuPlugin().expedientDetalls(</text:span><text:span text:style-name="T85">arxiuResultat</text:span><text:span text:style-name="T59">.getIdentificadorExpedient(), </text:span><text:span text:style-name="T51">null</text:span><text:span text:style-name="T59">);</text:span></text:p>
            <text:p text:style-name="P119"><text:span text:style-name="T59"><text:tab/><text:tab/><text:tab/><text:tab/><text:tab/><text:tab/></text:span><text:span text:style-name="T80">logger</text:span><text:span text:style-name="T59">.debug(</text:span><text:span text:style-name="T36">"S'ha creat l'expedient \""</text:span><text:span text:style-name="T59"> + </text:span><text:span text:style-name="T85">expedientDetalls</text:span><text:span text:style-name="T59">.getNom() + </text:span><text:span text:style-name="T36">"\" amb id="</text:span><text:span text:style-name="T59"> + </text:span><text:span text:style-name="T85">expedientDetalls</text:span><text:span text:style-name="T59">.getIdentificador() + </text:span><text:span text:style-name="T36">" per l'anotació "</text:span><text:span text:style-name="T59"> + </text:span><text:span text:style-name="T85">anotacio</text:span><text:span text:style-name="T59">.getIdentificador() + </text:span><text:span text:style-name="T36">" amb els següents continguts:"</text:span><text:span text:style-name="T59">);</text:span></text:p>
            <text:p text:style-name="P119"><text:span text:style-name="T59"><text:tab/><text:tab/><text:tab/><text:tab/><text:tab/><text:tab/></text:span><text:span text:style-name="T51">for</text:span><text:span text:style-name="T59"> (ContingutArxiu </text:span><text:span text:style-name="T85">contingut</text:span><text:span text:style-name="T59"> : </text:span><text:span text:style-name="T85">expedientDetalls</text:span><text:span text:style-name="T59">.getContinguts()) {</text:span></text:p>
            <text:p text:style-name="P119"><text:span text:style-name="T59"><text:tab/><text:tab/><text:tab/><text:tab/><text:tab/><text:tab/><text:tab/></text:span><text:span text:style-name="T80">logger</text:span><text:span text:style-name="T59">.debug(</text:span><text:span text:style-name="T36">"- "</text:span><text:span text:style-name="T59"> + </text:span><text:span text:style-name="T85">contingut</text:span><text:span text:style-name="T59">.getIdentificador() + </text:span><text:span text:style-name="T36">" "</text:span><text:span text:style-name="T59"> + </text:span><text:span text:style-name="T85">contingut</text:span><text:span text:style-name="T59">.getNom() + </text:span><text:span text:style-name="T36">" amb "</text:span><text:span text:style-name="T59"> + (</text:span><text:span text:style-name="T85">contingut</text:span><text:span text:style-name="T59">.getFirmes() != </text:span><text:span text:style-name="T51">null</text:span><text:span text:style-name="T59">? </text:span><text:span text:style-name="T85">contingut</text:span><text:span text:style-name="T59">.getFirmes().size() : 0) + </text:span><text:span text:style-name="T36">" firmes."</text:span><text:span text:style-name="T59">);</text:span></text:p>
            <text:p text:style-name="P92"><text:tab/><text:tab/><text:tab/><text:tab/><text:tab/><text:tab/>}</text:p>
            <text:p text:style-name="P119"><text:span text:style-name="T59"><text:tab/><text:tab/><text:tab/><text:tab/><text:tab/>} </text:span><text:span text:style-name="T51">else</text:span><text:span text:style-name="T59"> {</text:span></text:p>
            <text:p text:style-name="P119"><text:span text:style-name="T59"><text:tab/><text:tab/><text:tab/><text:tab/><text:tab/><text:tab/></text:span><text:span text:style-name="T80">logger</text:span><text:span text:style-name="T59">.warn(</text:span><text:span text:style-name="T36">"L'expedient no s'ha pogut crear per l'anotació "</text:span><text:span text:style-name="T59"> + </text:span><text:span text:style-name="T85">anotacio</text:span><text:span text:style-name="T59">.getIdentificador());</text:span></text:p>
            <text:p text:style-name="P92"><text:tab/><text:tab/><text:tab/><text:tab/><text:tab/>}</text:p>
            <text:p text:style-name="P92"><text:tab/><text:tab/><text:tab/><text:tab/><text:tab/><text:span text:style-name="T220">// Processament dels annexos de documents tècnics segons el títol</text:span></text:p>
            <text:p text:style-name="P125"><text:span text:style-name="T59"><text:tab/><text:tab/><text:tab/><text:tab/><text:tab/>String </text:span><text:span text:style-name="T85">titol</text:span><text:span text:style-name="T59">;</text:span></text:p>
            <text:p text:style-name="P125"><text:soft-page-break/><text:span text:style-name="T59"><text:tab/><text:tab/><text:tab/><text:tab/><text:tab/></text:span><text:span text:style-name="T51">for</text:span><text:span text:style-name="T59"> (Annex </text:span><text:span text:style-name="T85">annex</text:span><text:span text:style-name="T59"> : </text:span><text:span text:style-name="T85">anotacio</text:span><text:span text:style-name="T59">.getAnnexos()) {</text:span></text:p>
            <text:p text:style-name="P125"><text:span text:style-name="T59"><text:tab/><text:tab/><text:tab/><text:tab/><text:tab/><text:tab/></text:span><text:span text:style-name="T85">titol</text:span><text:span text:style-name="T59"> = </text:span><text:span text:style-name="T85">annex</text:span><text:span text:style-name="T59">.getTitol();</text:span></text:p>
            <text:p text:style-name="P125"><text:span text:style-name="T59"><text:tab/><text:tab/><text:tab/><text:tab/><text:tab/><text:tab/></text:span><text:span text:style-name="T51">if</text:span><text:span text:style-name="T59"> (</text:span><text:span text:style-name="T85">titol</text:span><text:span text:style-name="T59"> != </text:span><text:span text:style-name="T51">null</text:span><text:span text:style-name="T59"> </text:span></text:p>
            <text:p text:style-name="P125"><text:span text:style-name="T59"><text:tab/><text:tab/><text:tab/><text:tab/><text:tab/><text:tab/><text:tab/><text:tab/>&amp;&amp; (</text:span><text:span text:style-name="T36">"FORMULARIO"</text:span><text:span text:style-name="T59">.equals(</text:span><text:span text:style-name="T85">titol</text:span><text:span text:style-name="T59">) </text:span></text:p>
            <text:p text:style-name="P125"><text:span text:style-name="T59"><text:tab/><text:tab/><text:tab/><text:tab/><text:tab/><text:tab/><text:tab/><text:tab/><text:tab/><text:tab/>|| </text:span><text:span text:style-name="T36">"PAGO"</text:span><text:span text:style-name="T59">.equals(</text:span><text:span text:style-name="T85">titol</text:span><text:span text:style-name="T59">))) {</text:span></text:p>
            <text:p text:style-name="P125"><text:span text:style-name="T59"><text:tab/><text:tab/><text:tab/><text:tab/><text:tab/><text:tab/><text:tab/></text:span><text:span text:style-name="T217">// Recupera el contingut de l'annex</text:span></text:p>
            <text:p text:style-name="P125"><text:span text:style-name="T59"><text:tab/><text:tab/><text:tab/><text:tab/><text:tab/><text:tab/><text:tab/>Document </text:span><text:span text:style-name="T85">document</text:span><text:span text:style-name="T59"> = getArxiuPlugin().documentDetalls(</text:span><text:span text:style-name="T85">annex</text:span><text:span text:style-name="T59">.getUuid(), </text:span><text:span text:style-name="T51">null</text:span><text:span text:style-name="T59">, </text:span><text:span text:style-name="T51">true</text:span><text:span text:style-name="T59">);<text:tab/><text:tab/><text:tab/><text:tab/><text:tab/><text:tab/><text:tab/></text:span></text:p>
            <text:p text:style-name="P125"><text:span text:style-name="T59"><text:tab/><text:tab/><text:tab/><text:tab/><text:tab/><text:tab/><text:tab/></text:span><text:span text:style-name="T51">byte</text:span><text:span text:style-name="T59">[] </text:span><text:span text:style-name="T85">contingut</text:span><text:span text:style-name="T59"> = </text:span><text:span text:style-name="T85">document</text:span><text:span text:style-name="T59">.getContingut().getContingut();</text:span></text:p>
            <text:p text:style-name="P125"><text:span text:style-name="T59"><text:tab/><text:tab/><text:tab/><text:tab/><text:tab/><text:tab/><text:tab/></text:span><text:span text:style-name="T217">// Interpreta el contingut amb la classe BackofficeSistra2Utils</text:span></text:p>
            <text:p text:style-name="P125"><text:span text:style-name="T59"><text:tab/><text:tab/><text:tab/><text:tab/><text:tab/><text:tab/><text:tab/>BackofficeSistra2Utils </text:span><text:span text:style-name="T85">sistra2Utils</text:span><text:span text:style-name="T59"> = </text:span><text:span text:style-name="T51">new</text:span><text:span text:style-name="T59"> BackofficeSistra2UtilsImpl();</text:span></text:p>
            <text:p text:style-name="P125"><text:span text:style-name="T59"><text:tab/><text:tab/><text:tab/><text:tab/><text:tab/><text:tab/><text:tab/></text:span><text:span text:style-name="T80">logger</text:span><text:span text:style-name="T59">.debug(</text:span><text:span text:style-name="T36">" <text:s/>Document tècnic \""</text:span><text:span text:style-name="T59"> + </text:span><text:span text:style-name="T85">titol</text:span><text:span text:style-name="T59"> + </text:span><text:span text:style-name="T36">"\". Dades:"</text:span><text:span text:style-name="T59">);</text:span></text:p>
            <text:p text:style-name="P125"><text:span text:style-name="T59"><text:tab/><text:tab/><text:tab/><text:tab/><text:tab/><text:tab/><text:tab/></text:span><text:span text:style-name="T51">try</text:span><text:span text:style-name="T59"> {</text:span></text:p>
            <text:p text:style-name="P125"><text:span text:style-name="T59"><text:tab/><text:tab/><text:tab/><text:tab/><text:tab/><text:tab/><text:tab/><text:tab/></text:span><text:span text:style-name="T51">if</text:span><text:span text:style-name="T59"> (</text:span><text:span text:style-name="T36">"FORMULARIO"</text:span><text:span text:style-name="T59">.equals(</text:span><text:span text:style-name="T85">titol</text:span><text:span text:style-name="T59">)) {</text:span></text:p>
            <text:p text:style-name="P125"><text:span text:style-name="T59"><text:tab/><text:tab/><text:tab/><text:tab/><text:tab/><text:tab/><text:tab/><text:tab/><text:tab/>Formulario </text:span><text:span text:style-name="T85">formulario</text:span><text:span text:style-name="T59"> = </text:span><text:span text:style-name="T85">sistra2Utils</text:span><text:span text:style-name="T59">.parseXmlFormulario(</text:span><text:span text:style-name="T85">contingut</text:span><text:span text:style-name="T59">);</text:span></text:p>
            <text:p text:style-name="P125"><text:span text:style-name="T59"><text:tab/><text:tab/><text:tab/><text:tab/><text:tab/><text:tab/><text:tab/><text:tab/><text:tab/></text:span><text:span text:style-name="T80">logger</text:span><text:span text:style-name="T59">.debug(</text:span><text:span text:style-name="T36">" <text:s/>formulario: "</text:span><text:span text:style-name="T59"> + ToStringBuilder.</text:span><text:span text:style-name="T66">reflectionToString</text:span><text:span text:style-name="T59">(</text:span><text:span text:style-name="T85">formulario</text:span><text:span text:style-name="T59">));<text:tab/><text:tab/><text:tab/><text:tab/><text:tab/><text:tab/><text:tab/><text:tab/></text:span></text:p>
            <text:p text:style-name="P125"><text:span text:style-name="T59"><text:tab/><text:tab/><text:tab/><text:tab/><text:tab/><text:tab/><text:tab/><text:tab/>} </text:span><text:span text:style-name="T51">else</text:span><text:span text:style-name="T59"> </text:span><text:span text:style-name="T51">if</text:span><text:span text:style-name="T59"> (</text:span><text:span text:style-name="T36">"PAGO"</text:span><text:span text:style-name="T59">.equals(</text:span><text:span text:style-name="T85">titol</text:span><text:span text:style-name="T59">)) {</text:span></text:p>
            <text:p text:style-name="P125"><text:span text:style-name="T59"><text:tab/><text:tab/><text:tab/><text:tab/><text:tab/><text:tab/><text:tab/><text:tab/><text:tab/>Pago </text:span><text:span text:style-name="T85">pago</text:span><text:span text:style-name="T59"> = </text:span><text:span text:style-name="T85">sistra2Utils</text:span><text:span text:style-name="T59">.parseXmlPago(</text:span><text:span text:style-name="T85">contingut</text:span><text:span text:style-name="T59">);</text:span></text:p>
            <text:p text:style-name="P125"><text:span text:style-name="T59"><text:tab/><text:tab/><text:tab/><text:tab/><text:tab/><text:tab/><text:tab/><text:tab/><text:tab/></text:span><text:span text:style-name="T80">logger</text:span><text:span text:style-name="T59">.debug(</text:span><text:span text:style-name="T36">" <text:s/>pago: "</text:span><text:span text:style-name="T59"> + ToStringBuilder.</text:span><text:span text:style-name="T66">reflectionToString</text:span><text:span text:style-name="T59">(</text:span><text:span text:style-name="T85">pago</text:span><text:span text:style-name="T59">));<text:tab/><text:tab/><text:tab/><text:tab/><text:tab/><text:tab/><text:tab/><text:tab/></text:span></text:p>
            <text:p text:style-name="P96"><text:tab/><text:tab/><text:tab/><text:tab/><text:tab/><text:tab/><text:tab/><text:tab/>}</text:p>
            <text:p text:style-name="P125"><text:span text:style-name="T59"><text:tab/><text:tab/><text:tab/><text:tab/><text:tab/><text:tab/><text:tab/>} </text:span><text:span text:style-name="T51">catch</text:span><text:span text:style-name="T59">(Exception </text:span><text:span text:style-name="T85">e</text:span><text:span text:style-name="T59">) {<text:tab/><text:tab/><text:tab/><text:tab/><text:tab/><text:tab/><text:tab/><text:tab/></text:span></text:p>
            <text:p text:style-name="P125"><text:span text:style-name="T59"><text:tab/><text:tab/><text:tab/><text:tab/><text:tab/><text:tab/><text:tab/><text:tab/></text:span><text:span text:style-name="T80">logger</text:span><text:span text:style-name="T59">.error(</text:span><text:span text:style-name="T36">"Error obtenint la informació del document tècnic "</text:span><text:span text:style-name="T59"> + </text:span><text:span text:style-name="T85">titol</text:span><text:span text:style-name="T59"> + </text:span><text:span text:style-name="T36">":"</text:span><text:span text:style-name="T59"> + </text:span><text:span text:style-name="T85">e</text:span><text:span text:style-name="T59">.getMessage(), </text:span><text:span text:style-name="T85">e</text:span><text:span text:style-name="T59">);</text:span></text:p>
            <text:p text:style-name="P96"><text:tab/><text:tab/><text:tab/><text:tab/><text:tab/><text:tab/><text:tab/>}</text:p>
            <text:p text:style-name="P96"><text:tab/><text:tab/><text:tab/><text:tab/><text:tab/><text:tab/>}</text:p>
            <text:p text:style-name="P184"/>
            <text:p text:style-name="P96"><text:tab/><text:tab/><text:tab/><text:tab/><text:tab/>}</text:p>
            <text:p text:style-name="P126"><text:span text:style-name="T59"><text:tab/><text:tab/><text:tab/><text:tab/><text:tab/></text:span><text:span text:style-name="T217">// Es comunica el resultat a DISTRIBUCIO</text:span></text:p>
            <text:p text:style-name="P119"><text:span text:style-name="T74"><text:tab/><text:tab/><text:tab/><text:tab/><text:tab/></text:span><text:span text:style-name="T53">switch</text:span><text:span text:style-name="T74">(</text:span><text:span text:style-name="T94">arxiuResultat</text:span><text:span text:style-name="T74">.ge</text:span><text:span text:style-name="T59">tErrorCodi()) {</text:span></text:p>
            <text:p text:style-name="P119"><text:span text:style-name="T59"><text:tab/><text:tab/><text:tab/><text:tab/><text:tab/><text:tab/></text:span><text:span text:style-name="T51">case</text:span><text:span text:style-name="T59"> 0:</text:span></text:p>
            <text:p text:style-name="P119"><text:span text:style-name="T59"><text:tab/><text:tab/><text:tab/><text:tab/><text:tab/><text:tab/><text:tab/></text:span><text:span text:style-name="T85">backofficeClient</text:span><text:span text:style-name="T59">.canviEstat(</text:span><text:span text:style-name="T85">idWs</text:span><text:span text:style-name="T59">, es.caib.distribucio.ws.backofficeintegracio.Estat.</text:span><text:span text:style-name="T80">PROCESSADA</text:span><text:span text:style-name="T59">, </text:span><text:span text:style-name="T36">"Processada"</text:span><text:span text:style-name="T59">);</text:span></text:p>
            <text:p text:style-name="P119"><text:span text:style-name="T59"><text:tab/><text:tab/><text:tab/><text:tab/><text:tab/><text:tab/><text:tab/></text:span><text:span text:style-name="T51">break</text:span><text:span text:style-name="T59">;</text:span></text:p>
            <text:p text:style-name="P119"><text:span text:style-name="T59"><text:tab/><text:tab/><text:tab/><text:tab/><text:tab/><text:tab/></text:span><text:span text:style-name="T51">default</text:span><text:span text:style-name="T59">:</text:span></text:p>
            <text:p text:style-name="P119"><text:span text:style-name="T59"><text:tab/><text:tab/><text:tab/><text:tab/><text:tab/><text:tab/><text:tab/></text:span><text:span text:style-name="T85">backofficeClient</text:span><text:span text:style-name="T59">.canviEstat(</text:span><text:span text:style-name="T85">idWs</text:span><text:span text:style-name="T59">, es.caib.distribucio.ws.backofficeintegracio.Estat.</text:span><text:span text:style-name="T80">ERROR</text:span><text:span text:style-name="T59">, </text:span><text:span text:style-name="T85">arxiuResultat</text:span><text:span text:style-name="T59">.getErrorCodi()</text:span><text:span text:style-name="T72"> + </text:span><text:span text:style-name="T38">" "</text:span><text:span text:style-name="T72"> + </text:span><text:span text:style-name="T85">arxiuResultat</text:span><text:span text:style-name="T59">.getErrorMessage());</text:span></text:p>
            <text:p text:style-name="P119"><text:span text:style-name="T59"><text:tab/><text:tab/><text:tab/><text:tab/><text:tab/><text:tab/><text:tab/></text:span><text:span text:style-name="T51">break</text:span><text:span text:style-name="T59">;</text:span></text:p>
            <text:p text:style-name="P92"><text:tab/><text:tab/><text:tab/><text:tab/><text:tab/>}</text:p>
            <text:p text:style-name="P119"><text:span text:style-name="T59"><text:tab/><text:tab/><text:tab/><text:tab/>} </text:span><text:span text:style-name="T51">catch</text:span><text:span text:style-name="T59"> (Throwable </text:span><text:span text:style-name="T85">ex</text:span><text:span text:style-name="T59">) {</text:span></text:p>
            <text:p text:style-name="P119"><text:span text:style-name="T59"><text:tab/><text:tab/><text:tab/><text:tab/><text:tab/></text:span><text:span text:style-name="T80">logger</text:span><text:span text:style-name="T59">.error(</text:span><text:span text:style-name="T36">"Error al processant la petició d'anotació amb id "</text:span><text:span text:style-name="T59"> + </text:span><text:span text:style-name="T85">id</text:span><text:span text:style-name="T59">.getIde</text:span><text:span text:style-name="T76">n</text:span><text:span text:style-name="T59">tificador(), </text:span><text:span text:style-name="T85">ex</text:span><text:span text:style-name="T59">);</text:span></text:p>
            <text:p text:style-name="P92"><text:tab/><text:tab/><text:tab/><text:tab/>}</text:p>
            <text:p text:style-name="P92"><text:tab/><text:tab/><text:tab/>}<text:tab/><text:tab/><text:tab/></text:p>
            <text:p text:style-name="P119"><text:span text:style-name="T59"><text:tab/><text:tab/>} </text:span><text:span text:style-name="T51">catch</text:span><text:span text:style-name="T59"> (Exception </text:span><text:span text:style-name="T85">e</text:span><text:span text:style-name="T59">) {</text:span></text:p>
            <text:p text:style-name="P119"><text:span text:style-name="T59"><text:tab/><text:tab/><text:tab/></text:span><text:span text:style-name="T80">logger</text:span><text:span text:style-name="T59">.error(</text:span><text:span text:style-name="T36">"Error no controlat en el mètode de comunicació d'anotacions pendents: "</text:span><text:span text:style-name="T59"> + </text:span><text:span text:style-name="T85">e</text:span><text:span text:style-name="T59">.getMessage(), </text:span><text:span text:style-name="T85">e</text:span><text:span text:style-name="T59">);</text:span></text:p>
            <text:p text:style-name="P92"><text:tab/><text:tab/>}</text:p>
            <text:p text:style-name="P92"><text:tab/>}</text:p>
            <text:p text:style-name="P187"/>
            <text:p text:style-name="P187"/>
            <text:p text:style-name="P92"><text:tab/></text:p>
            <text:p text:style-name="P92"><text:tab/></text:p>
            <text:p text:style-name="P119"><text:span text:style-name="T59"><text:tab/></text:span><text:span text:style-name="T51">private</text:span><text:span text:style-name="T59"> </text:span><text:span text:style-name="T51">void</text:span><text:span text:style-name="T59"> logResultat(String </text:span><text:span text:style-name="T85">descripcio</text:span><text:span text:style-name="T59">, ArxiuResultat </text:span><text:span text:style-name="T85">arxiuResultat</text:span><text:span text:style-name="T59">) {</text:span></text:p>
            <text:p text:style-name="P119"><text:span text:style-name="T59"><text:tab/><text:tab/></text:span><text:span text:style-name="T80">logger</text:span><text:span text:style-name="T59">.debug(</text:span><text:span text:style-name="T85">descripcio</text:span><text:span text:style-name="T59">);</text:span></text:p>
            <text:p text:style-name="P119"><text:span text:style-name="T59"><text:tab/><text:tab/></text:span><text:span text:style-name="T217">// </text:span><text:span text:style-name="T218">Resultat</text:span><text:span text:style-name="T217"> a </text:span><text:span text:style-name="T218">nivell</text:span><text:span text:style-name="T217"> d'expedient</text:span></text:p>
            <text:p text:style-name="P119"><text:span text:style-name="T59"><text:tab/><text:tab/></text:span><text:span text:style-name="T80">logger</text:span><text:span text:style-name="T59">.debug(</text:span><text:span text:style-name="T36">"- uuid: "</text:span><text:span text:style-name="T59"> + </text:span><text:span text:style-name="T85">arxiuResultat</text:span><text:span text:style-name="T59">.getIdentificadorExpedient());</text:span></text:p>
            <text:p text:style-name="P119"><text:span text:style-name="T59"><text:tab/><text:tab/></text:span><text:span text:style-name="T80">logger</text:span><text:span text:style-name="T59">.debug(</text:span><text:span text:style-name="T36">"- accio: "</text:span><text:span text:style-name="T59"> + </text:span><text:span text:style-name="T85">arxiuResultat</text:span><text:span text:style-name="T59">.getAccio());</text:span></text:p>
            <text:p text:style-name="P119"><text:span text:style-name="T59"><text:tab/><text:tab/></text:span><text:span text:style-name="T80">logger</text:span><text:span text:style-name="T59">.debug(</text:span><text:span text:style-name="T36">"- errorCodi: "</text:span><text:span text:style-name="T59"> + </text:span><text:span text:style-name="T85">arxiuResultat</text:span><text:span text:style-name="T59">.getErrorCodi());</text:span></text:p>
            <text:p text:style-name="P119"><text:span text:style-name="T59"><text:tab/><text:tab/></text:span><text:span text:style-name="T80">logger</text:span><text:span text:style-name="T59">.debug(</text:span><text:span text:style-name="T36">"- errorMessage: "</text:span><text:span text:style-name="T59"> + </text:span><text:span text:style-name="T85">arxiuResultat</text:span><text:span text:style-name="T59">.getErrorMessage());</text:span></text:p>
            <text:p text:style-name="P119"><text:span text:style-name="T59"><text:tab/><text:tab/></text:span><text:span text:style-name="T80">logger</text:span><text:span text:style-name="T59">.debug(</text:span><text:span text:style-name="T36">"- excepcio: "</text:span><text:span text:style-name="T59"> + (</text:span><text:span text:style-name="T85">arxiuResultat</text:span><text:span text:style-name="T59">.getException() != </text:span><text:span text:style-name="T51">null</text:span><text:span text:style-name="T59">? </text:span><text:span text:style-name="T85">arxiuResultat</text:span><text:span text:style-name="T59">.getException().getClass() + </text:span><text:span text:style-name="T36">" "</text:span><text:span text:style-name="T59"> + </text:span><text:span text:style-name="T85">arxiuResultat</text:span><text:span text:style-name="T59">.getException().getMessage() : <text:s/></text:span><text:span text:style-name="T36">" - "</text:span><text:span text:style-name="T59">));</text:span></text:p>
            <text:p text:style-name="P187"/>
            <text:p text:style-name="P119"><text:soft-page-break/><text:span text:style-name="T59"><text:tab/><text:tab/></text:span><text:span text:style-name="T217">// </text:span><text:span text:style-name="T218">Resultat</text:span><text:span text:style-name="T217"> </text:span><text:span text:style-name="T218">pels</text:span><text:span text:style-name="T217"> </text:span><text:span text:style-name="T218">annexos</text:span></text:p>
            <text:p text:style-name="P119"><text:span text:style-name="T59"><text:tab/><text:tab/>List&lt;ArxiuResultatAnnex&gt; </text:span><text:span text:style-name="T85">resultatAnnexos</text:span><text:span text:style-name="T59"> = </text:span><text:span text:style-name="T85">arxiuResultat</text:span><text:span text:style-name="T59">.getResultatAnnexos(); </text:span></text:p>
            <text:p text:style-name="P119"><text:span text:style-name="T59"><text:tab/><text:tab/></text:span><text:span text:style-name="T80">logger</text:span><text:span text:style-name="T59">.debug(</text:span><text:span text:style-name="T36">" - Resultat dels "</text:span><text:span text:style-name="T59"> + </text:span><text:span text:style-name="T85">resultatAnnexos</text:span><text:span text:style-name="T59">.size() + </text:span><text:span text:style-name="T36">" annexos:"</text:span><text:span text:style-name="T59">);</text:span></text:p>
            <text:p text:style-name="P119"><text:span text:style-name="T59"><text:tab/><text:tab/></text:span><text:span text:style-name="T51">for</text:span><text:span text:style-name="T59"> (ArxiuResultatAnnex </text:span><text:span text:style-name="T85">resultatAnnex</text:span><text:span text:style-name="T59"> : </text:span><text:span text:style-name="T85">resultatAnnexos</text:span><text:span text:style-name="T59">) {</text:span></text:p>
            <text:p text:style-name="P119"><text:span text:style-name="T59"><text:tab/><text:tab/><text:tab/></text:span><text:span text:style-name="T80">logger</text:span><text:span text:style-name="T59">.debug(</text:span><text:span text:style-name="T36">"\b- uuid: "</text:span><text:span text:style-name="T59"> + </text:span><text:span text:style-name="T85">resultatAnnex</text:span><text:span text:style-name="T59">.getIdentificadorAnnex());</text:span></text:p>
            <text:p text:style-name="P119"><text:span text:style-name="T59"><text:tab/><text:tab/><text:tab/></text:span><text:span text:style-name="T80">logger</text:span><text:span text:style-name="T59">.debug(</text:span><text:span text:style-name="T36">"\\b- accio: "</text:span><text:span text:style-name="T59"> + </text:span><text:span text:style-name="T85">resultatAnnex</text:span><text:span text:style-name="T59">.getAccio());</text:span></text:p>
            <text:p text:style-name="P119"><text:span text:style-name="T59"><text:tab/><text:tab/><text:tab/></text:span><text:span text:style-name="T80">logger</text:span><text:span text:style-name="T59">.debug(</text:span><text:span text:style-name="T36">"\\b- errorCodi: "</text:span><text:span text:style-name="T59"> + </text:span><text:span text:style-name="T85">resultatAnnex</text:span><text:span text:style-name="T59">.getErrorCodi());</text:span></text:p>
            <text:p text:style-name="P119"><text:span text:style-name="T59"><text:tab/><text:tab/><text:tab/></text:span><text:span text:style-name="T80">logger</text:span><text:span text:style-name="T59">.debug(</text:span><text:span text:style-name="T36">"\\b- errorMessage: "</text:span><text:span text:style-name="T59"> + </text:span><text:span text:style-name="T85">resultatAnnex</text:span><text:span text:style-name="T59">.getErrorMessage());</text:span></text:p>
            <text:p text:style-name="P119"><text:span text:style-name="T59"><text:tab/><text:tab/><text:tab/></text:span><text:span text:style-name="T80">logger</text:span><text:span text:style-name="T59">.debug(</text:span><text:span text:style-name="T36">"\\b- excepcio: "</text:span><text:span text:style-name="T59"> + (</text:span><text:span text:style-name="T85">resultatAnnex</text:span><text:span text:style-name="T59">.getException() != </text:span><text:span text:style-name="T51">null</text:span><text:span text:style-name="T59">? </text:span><text:span text:style-name="T85">resultatAnnex</text:span><text:span text:style-name="T59">.getException().getClass() + </text:span><text:span text:style-name="T36">" "</text:span><text:span text:style-name="T59"> + </text:span><text:span text:style-name="T85">resultatAnnex</text:span><text:span text:style-name="T59">.getException().getMessage() : <text:s/></text:span><text:span text:style-name="T36">" - "</text:span><text:span text:style-name="T59">));</text:span></text:p>
            <text:p text:style-name="P92"><text:tab/><text:tab/>}</text:p>
            <text:p text:style-name="P92"><text:tab/>}</text:p>
            <text:p text:style-name="P187"/>
            <text:p text:style-name="P119"><text:span text:style-name="T59"><text:tab/></text:span><text:span text:style-name="T51">private</text:span><text:span text:style-name="T59"> IArxiuPlugin getArxiuPlugin() </text:span><text:span text:style-name="T51">throws</text:span><text:span text:style-name="T59"> SistemaExternException {</text:span></text:p>
            <text:p text:style-name="P119"><text:span text:style-name="T59"><text:tab/><text:tab/></text:span><text:span text:style-name="T51">if</text:span><text:span text:style-name="T59"> (</text:span><text:span text:style-name="T79">arxiuPlugin</text:span><text:span text:style-name="T59"> == </text:span><text:span text:style-name="T51">null</text:span><text:span text:style-name="T59">) {</text:span></text:p>
            <text:p text:style-name="P119"><text:span text:style-name="T59"><text:tab/><text:tab/><text:tab/>String </text:span><text:span text:style-name="T85">pluginClass</text:span><text:span text:style-name="T59"> = getPropertyPluginArxiu();</text:span></text:p>
            <text:p text:style-name="P119"><text:span text:style-name="T59"><text:tab/><text:tab/><text:tab/></text:span><text:span text:style-name="T51">if</text:span><text:span text:style-name="T59"> (</text:span><text:span text:style-name="T85">pluginClass</text:span><text:span text:style-name="T59"> != </text:span><text:span text:style-name="T51">null</text:span><text:span text:style-name="T59"> &amp;&amp; </text:span><text:span text:style-name="T85">pluginClass</text:span><text:span text:style-name="T59">.length() &gt; 0) {</text:span></text:p>
            <text:p text:style-name="P119"><text:span text:style-name="T59"><text:tab/><text:tab/><text:tab/><text:tab/></text:span><text:span text:style-name="T51">try</text:span><text:span text:style-name="T59"> {</text:span></text:p>
            <text:p text:style-name="P119"><text:span text:style-name="T59"><text:tab/><text:tab/><text:tab/><text:tab/><text:tab/>Class&lt;?&gt; </text:span><text:span text:style-name="T85">clazz</text:span><text:span text:style-name="T59"> = Class.</text:span><text:span text:style-name="T66">forName</text:span><text:span text:style-name="T59">(</text:span><text:span text:style-name="T85">pluginClass</text:span><text:span text:style-name="T59">);</text:span></text:p>
            <text:p text:style-name="P119"><text:span text:style-name="T59"><text:tab/><text:tab/><text:tab/><text:tab/><text:tab/></text:span><text:span text:style-name="T51">if</text:span><text:span text:style-name="T59"> (PropertiesHelper.</text:span><text:span text:style-name="T66">getProperties</text:span><text:span text:style-name="T59">().isLlegirSystem()) {</text:span></text:p>
            <text:p text:style-name="P119"><text:span text:style-name="T59"><text:tab/><text:tab/><text:tab/><text:tab/><text:tab/><text:tab/></text:span><text:span text:style-name="T79">arxiuPlugin</text:span><text:span text:style-name="T59"> = (IArxiuPlugin)</text:span><text:span text:style-name="T85">clazz</text:span><text:span text:style-name="T59">.getDeclaredConstructor(</text:span></text:p>
            <text:p text:style-name="P119"><text:span text:style-name="T59"><text:tab/><text:tab/><text:tab/><text:tab/><text:tab/><text:tab/><text:tab/><text:tab/>String.</text:span><text:span text:style-name="T51">class</text:span><text:span text:style-name="T59">).newInstance(</text:span></text:p>
            <text:p text:style-name="P119"><text:span text:style-name="T59"><text:tab/><text:tab/><text:tab/><text:tab/><text:tab/><text:tab/><text:tab/><text:tab/></text:span><text:span text:style-name="T36">"es.caib.distribucio."</text:span><text:span text:style-name="T59">);</text:span></text:p>
            <text:p text:style-name="P119"><text:span text:style-name="T59"><text:tab/><text:tab/><text:tab/><text:tab/><text:tab/>} </text:span><text:span text:style-name="T51">else</text:span><text:span text:style-name="T59"> {</text:span></text:p>
            <text:p text:style-name="P119"><text:span text:style-name="T59"><text:tab/><text:tab/><text:tab/><text:tab/><text:tab/><text:tab/></text:span><text:span text:style-name="T79">arxiuPlugin</text:span><text:span text:style-name="T59"> = (IArxiuPlugin)</text:span><text:span text:style-name="T85">clazz</text:span><text:span text:style-name="T59">.getDeclaredConstructor(</text:span></text:p>
            <text:p text:style-name="P119"><text:span text:style-name="T59"><text:tab/><text:tab/><text:tab/><text:tab/><text:tab/><text:tab/><text:tab/><text:tab/>String.</text:span><text:span text:style-name="T51">class</text:span><text:span text:style-name="T59">,</text:span></text:p>
            <text:p text:style-name="P119"><text:span text:style-name="T59"><text:tab/><text:tab/><text:tab/><text:tab/><text:tab/><text:tab/><text:tab/><text:tab/>Properties.</text:span><text:span text:style-name="T51">class</text:span><text:span text:style-name="T59">).newInstance(</text:span></text:p>
            <text:p text:style-name="P119"><text:span text:style-name="T59"><text:tab/><text:tab/><text:tab/><text:tab/><text:tab/><text:tab/><text:tab/><text:tab/></text:span><text:span text:style-name="T36">"es.caib.distribucio."</text:span><text:span text:style-name="T59">,</text:span></text:p>
            <text:p text:style-name="P119"><text:span text:style-name="T59"><text:tab/><text:tab/><text:tab/><text:tab/><text:tab/><text:tab/><text:tab/><text:tab/>PropertiesHelper.</text:span><text:span text:style-name="T66">getProperties</text:span><text:span text:style-name="T59">().findAll());</text:span></text:p>
            <text:p text:style-name="P92"><text:tab/><text:tab/><text:tab/><text:tab/><text:tab/>}</text:p>
            <text:p text:style-name="P119"><text:span text:style-name="T59"><text:tab/><text:tab/><text:tab/><text:tab/>} </text:span><text:span text:style-name="T51">catch</text:span><text:span text:style-name="T59"> (Exception </text:span><text:span text:style-name="T85">ex</text:span><text:span text:style-name="T59">) {</text:span></text:p>
            <text:p text:style-name="P119"><text:span text:style-name="T59"><text:tab/><text:tab/><text:tab/><text:tab/><text:tab/></text:span><text:span text:style-name="T51">throw</text:span><text:span text:style-name="T59"> </text:span><text:span text:style-name="T51">new</text:span><text:span text:style-name="T59"> SistemaExternException(</text:span></text:p>
            <text:p text:style-name="P119"><text:span text:style-name="T59"><text:tab/><text:tab/><text:tab/><text:tab/><text:tab/><text:tab/><text:tab/>IntegracioHelper.</text:span><text:span text:style-name="T80">INTCODI_ARXIU</text:span><text:span text:style-name="T59">,</text:span></text:p>
            <text:p text:style-name="P119"><text:span text:style-name="T59"><text:tab/><text:tab/><text:tab/><text:tab/><text:tab/><text:tab/><text:tab/></text:span><text:span text:style-name="T36">"Error al crear la instància del plugin d'arxiu digital"</text:span><text:span text:style-name="T59">,</text:span></text:p>
            <text:p text:style-name="P119"><text:span text:style-name="T59"><text:tab/><text:tab/><text:tab/><text:tab/><text:tab/><text:tab/><text:tab/></text:span><text:span text:style-name="T85">ex</text:span><text:span text:style-name="T59">);</text:span></text:p>
            <text:p text:style-name="P92"><text:tab/><text:tab/><text:tab/><text:tab/>}</text:p>
            <text:p text:style-name="P119"><text:span text:style-name="T59"><text:tab/><text:tab/><text:tab/>} </text:span><text:span text:style-name="T51">else</text:span><text:span text:style-name="T59"> {</text:span></text:p>
            <text:p text:style-name="P119"><text:span text:style-name="T59"><text:tab/><text:tab/><text:tab/><text:tab/></text:span><text:span text:style-name="T51">throw</text:span><text:span text:style-name="T59"> </text:span><text:span text:style-name="T51">new</text:span><text:span text:style-name="T59"> SistemaExternException(</text:span></text:p>
            <text:p text:style-name="P119"><text:span text:style-name="T59"><text:tab/><text:tab/><text:tab/><text:tab/><text:tab/><text:tab/>IntegracioHelper.</text:span><text:span text:style-name="T80">INTCODI_ARXIU</text:span><text:span text:style-name="T59">,</text:span></text:p>
            <text:p text:style-name="P119"><text:span text:style-name="T59"><text:tab/><text:tab/><text:tab/><text:tab/><text:tab/><text:tab/></text:span><text:span text:style-name="T36">"No està configurada la classe per al plugin d'arxiu digital"</text:span><text:span text:style-name="T59">);</text:span></text:p>
            <text:p text:style-name="P92"><text:tab/><text:tab/><text:tab/>}</text:p>
            <text:p text:style-name="P92"><text:tab/><text:tab/>}</text:p>
            <text:p text:style-name="P119"><text:span text:style-name="T59"><text:tab/><text:tab/></text:span><text:span text:style-name="T51">return</text:span><text:span text:style-name="T59"> </text:span><text:span text:style-name="T79">arxiuPlugin</text:span><text:span text:style-name="T59">;</text:span></text:p>
            <text:p text:style-name="P92"><text:tab/>}</text:p>
            <text:p text:style-name="P119"><text:span text:style-name="T59"><text:tab/></text:span><text:span text:style-name="T51">private</text:span><text:span text:style-name="T59"> String getPropertyPluginArxiu() {</text:span></text:p>
            <text:p text:style-name="P119"><text:span text:style-name="T59"><text:tab/><text:tab/></text:span><text:span text:style-name="T51">return</text:span><text:span text:style-name="T59"> PropertiesHelper.</text:span><text:span text:style-name="T66">getProperties</text:span><text:span text:style-name="T59">().getProperty(</text:span></text:p>
            <text:p text:style-name="P119"><text:span text:style-name="T59"><text:tab/><text:tab/><text:tab/><text:tab/></text:span><text:span text:style-name="T36">"es.caib.distribucio.plugin.arxiu.class"</text:span><text:span text:style-name="T59">);</text:span></text:p>
            <text:p text:style-name="P92"><text:tab/>}</text:p>
            <text:p text:style-name="P92"><text:tab/></text:p>
            <text:p text:style-name="P119"><text:span text:style-name="T59"><text:tab/></text:span><text:span text:style-name="T51">private</text:span><text:span text:style-name="T59"> BackofficeIntegracio getBackofficeIntegracioServicePort() </text:span><text:span text:style-name="T51">throws</text:span><text:span text:style-name="T59"> Exception {</text:span></text:p>
            <text:p text:style-name="P119"><text:span text:style-name="T59"><text:tab/><text:tab/>BackofficeIntegracio </text:span><text:span text:style-name="T85">wsClient</text:span><text:span text:style-name="T59"> = </text:span><text:span text:style-name="T51">null</text:span><text:span text:style-name="T59">;</text:span></text:p>
            <text:p text:style-name="P119"><text:span text:style-name="T59"><text:tab/><text:tab/>String </text:span><text:span text:style-name="T85">url</text:span><text:span text:style-name="T59"> = PropertiesHelper.</text:span><text:span text:style-name="T66">getProperties</text:span><text:span text:style-name="T59">().getProperty(</text:span><text:span text:style-name="T36">"es.caib.distribucio.backoffice.test.backofficeIntegracio.url"</text:span><text:span text:style-name="T59">);</text:span></text:p>
            <text:p text:style-name="P119"><text:span text:style-name="T59"><text:tab/><text:tab/>String </text:span><text:span text:style-name="T85">usuari</text:span><text:span text:style-name="T59"> = PropertiesHelper.</text:span><text:span text:style-name="T66">getProperties</text:span><text:span text:style-name="T59">().getProperty(</text:span><text:span text:style-name="T36">"es.caib.distribucio.backoffice.test.backofficeIntegracio.usuari"</text:span><text:span text:style-name="T59">);</text:span></text:p>
            <text:p text:style-name="P119"><text:span text:style-name="T59"><text:tab/><text:tab/>String </text:span><text:span text:style-name="T85">contrasenya</text:span><text:span text:style-name="T59"> = PropertiesHelper.</text:span><text:span text:style-name="T66">getProperties</text:span><text:span text:style-name="T59">().getProperty(</text:span><text:span text:style-name="T36">"es.caib.distribucio.backoffice.test.backofficeIntegracio.contrasenya"</text:span><text:span text:style-name="T59">);</text:span></text:p>
            <text:p text:style-name="P119"><text:span text:style-name="T59"><text:tab/><text:tab/></text:span><text:span text:style-name="T51">if</text:span><text:span text:style-name="T59"> (</text:span><text:span text:style-name="T85">url</text:span><text:span text:style-name="T59"> != </text:span><text:span text:style-name="T51">null</text:span><text:span text:style-name="T59"> &amp;&amp; </text:span><text:span text:style-name="T85">usuari</text:span><text:span text:style-name="T59"> != </text:span><text:span text:style-name="T51">null</text:span><text:span text:style-name="T59"> &amp;&amp; </text:span><text:span text:style-name="T85">contrasenya</text:span><text:span text:style-name="T59"> != </text:span><text:span text:style-name="T51">null</text:span><text:span text:style-name="T59">) {</text:span></text:p>
            <text:p text:style-name="P119"><text:span text:style-name="T59"><text:tab/><text:tab/><text:tab/></text:span><text:span text:style-name="T80">logger</text:span><text:span text:style-name="T59">.debug(</text:span><text:span text:style-name="T36">"&gt;&gt;&gt; Creant el client BackofficeIntegracio WS"</text:span><text:span text:style-name="T59">);</text:span></text:p>
            <text:p text:style-name="P119"><text:span text:style-name="T59"><text:tab/><text:tab/><text:tab/></text:span><text:span text:style-name="T85">wsClient</text:span><text:span text:style-name="T59"> = BackofficeIntegracioWsClientFactory.</text:span><text:span text:style-name="T66">getWsClient</text:span><text:span text:style-name="T59">(</text:span></text:p>
            <text:p text:style-name="P119"><text:span text:style-name="T59"><text:tab/><text:tab/><text:tab/><text:tab/><text:tab/></text:span><text:span text:style-name="T85">url</text:span><text:span text:style-name="T59">,</text:span></text:p>
            <text:p text:style-name="P119"><text:span text:style-name="T59"><text:tab/><text:tab/><text:tab/><text:tab/><text:tab/></text:span><text:span text:style-name="T85">usuari</text:span><text:span text:style-name="T59">,</text:span></text:p>
            <text:p text:style-name="P119"><text:span text:style-name="T59"><text:tab/><text:tab/><text:tab/><text:tab/><text:tab/></text:span><text:span text:style-name="T85">contrasenya</text:span><text:span text:style-name="T59">);</text:span></text:p>
            <text:p text:style-name="P119"><text:span text:style-name="T59"><text:tab/><text:tab/>} </text:span><text:span text:style-name="T51">else</text:span><text:span text:style-name="T59"> {</text:span></text:p>
            <text:p text:style-name="P119"><text:span text:style-name="T59"><text:tab/><text:tab/><text:tab/></text:span><text:span text:style-name="T51">throw</text:span><text:span text:style-name="T59"> </text:span><text:span text:style-name="T51">new</text:span><text:span text:style-name="T59"> RuntimeException(</text:span><text:span text:style-name="T36">"Falta configurar les propietats pel client de Backoffice de DISTRIBUCIO <text:s/>es.caib.distribucio.backoffice.test.backofficeIntegracio.*"</text:span><text:span text:style-name="T59">);</text:span></text:p>
            <text:p text:style-name="P92"><text:tab/><text:tab/>}</text:p>
            <text:p text:style-name="P119"><text:soft-page-break/><text:span text:style-name="T59"><text:tab/><text:tab/></text:span><text:span text:style-name="T51">return</text:span><text:span text:style-name="T59"> </text:span><text:span text:style-name="T85">wsClient</text:span><text:span text:style-name="T59">;</text:span></text:p>
            <text:p text:style-name="P92"><text:tab/>}</text:p>
            <text:p text:style-name="P187"/>
            <text:p text:style-name="P119"><text:span text:style-name="T59"><text:tab/></text:span><text:span text:style-name="T51">private</text:span><text:span text:style-name="T59"> </text:span><text:span text:style-name="T51">static</text:span><text:span text:style-name="T59"> </text:span><text:span text:style-name="T51">final</text:span><text:span text:style-name="T59"> Logger </text:span><text:span text:style-name="T80">logger</text:span><text:span text:style-name="T59"> = LoggerFactory.</text:span><text:span text:style-name="T66">getLogger</text:span><text:span text:style-name="T59">(RegistreHelper.</text:span><text:span text:style-name="T51">class</text:span><text:span text:style-name="T59">);</text:span></text:p>
            <text:p text:style-name="P187"/>
            <text:p text:style-name="P119"><text:span text:style-name="T59"><text:tab/></text:span><text:span text:style-name="T199">/** </text:span><text:span text:style-name="T202">Mètode</text:span><text:span text:style-name="T199"> </text:span><text:span text:style-name="T202">que</text:span><text:span text:style-name="T199"> </text:span><text:span text:style-name="T202">la</text:span><text:span text:style-name="T199"> </text:span><text:span text:style-name="T202">llibreria</text:span><text:span text:style-name="T199"> </text:span><text:span text:style-name="T202">del</text:span><text:span text:style-name="T199"> </text:span><text:span text:style-name="T202">backoffice</text:span><text:span text:style-name="T199"> </text:span><text:span text:style-name="T202">de</text:span><text:span text:style-name="T199"> </text:span><text:span text:style-name="T202">distribució</text:span><text:span text:style-name="T199"> </text:span><text:span text:style-name="T202">crida</text:span><text:span text:style-name="T199"> </text:span><text:span text:style-name="T202">si</text:span><text:span text:style-name="T199"> </text:span><text:span text:style-name="T202">es</text:span><text:span text:style-name="T199"> </text:span><text:span text:style-name="T202">fixa</text:span><text:span text:style-name="T199"> </text:span><text:span text:style-name="T202">una</text:span><text:span text:style-name="T199"> </text:span><text:span text:style-name="T202">instància</text:span><text:span text:style-name="T199"> </text:span><text:span text:style-name="T202">que</text:span><text:span text:style-name="T199"> </text:span><text:span text:style-name="T202">implementa</text:span><text:span text:style-name="T199"> </text:span><text:span text:style-name="T223">{@link ArxiuPluginListener}</text:span><text:span text:style-name="T199">.</text:span></text:p>
            <text:p text:style-name="P131"><text:tab/> * </text:p>
            <text:p text:style-name="P131"><text:tab/> */</text:p>
            <text:p text:style-name="P119"><text:span text:style-name="T59"><text:tab/></text:span><text:span text:style-name="T109">@Override</text:span></text:p>
            <text:p text:style-name="P119"><text:span text:style-name="T59"><text:tab/></text:span><text:span text:style-name="T51">public</text:span><text:span text:style-name="T59"> </text:span><text:span text:style-name="T51">void</text:span><text:span text:style-name="T59"> event(</text:span></text:p>
            <text:p text:style-name="P119"><text:span text:style-name="T59"><text:tab/><text:tab/><text:tab/>String </text:span><text:span text:style-name="T85">metode</text:span><text:span text:style-name="T59">, </text:span></text:p>
            <text:p text:style-name="P119"><text:span text:style-name="T59"><text:tab/><text:tab/><text:tab/>Map&lt;String, String&gt; </text:span><text:span text:style-name="T85">parametres</text:span><text:span text:style-name="T59">, </text:span></text:p>
            <text:p text:style-name="P119"><text:span text:style-name="T59"><text:tab/><text:tab/><text:tab/></text:span><text:span text:style-name="T51">boolean</text:span><text:span text:style-name="T59"> </text:span><text:span text:style-name="T85">correcte</text:span><text:span text:style-name="T59">, </text:span></text:p>
            <text:p text:style-name="P119"><text:span text:style-name="T59"><text:tab/><text:tab/><text:tab/>String </text:span><text:span text:style-name="T85">error</text:span><text:span text:style-name="T59">, </text:span></text:p>
            <text:p text:style-name="P119"><text:span text:style-name="T59"><text:tab/><text:tab/><text:tab/>Exception </text:span><text:span text:style-name="T85">e</text:span><text:span text:style-name="T59">,</text:span></text:p>
            <text:p text:style-name="P119"><text:span text:style-name="T59"><text:tab/><text:tab/><text:tab/></text:span><text:span text:style-name="T51">long</text:span><text:span text:style-name="T59"> </text:span><text:span text:style-name="T85">timeMs</text:span><text:span text:style-name="T59">) {</text:span></text:p>
            <text:p text:style-name="P119"><text:span text:style-name="T59"><text:tab/><text:tab/>StringBuilder </text:span><text:span text:style-name="T85">str</text:span><text:span text:style-name="T59"> = </text:span><text:span text:style-name="T51">new</text:span><text:span text:style-name="T59"> StringBuilder()</text:span></text:p>
            <text:p text:style-name="P119"><text:span text:style-name="T59"><text:tab/><text:tab/><text:tab/><text:tab/>.append(</text:span><text:span text:style-name="T36">"S'ha invocat el mètode \""</text:span><text:span text:style-name="T59">)</text:span></text:p>
            <text:p text:style-name="P119"><text:span text:style-name="T59"><text:tab/><text:tab/><text:tab/><text:tab/>.append(</text:span><text:span text:style-name="T85">metode</text:span><text:span text:style-name="T59">)</text:span></text:p>
            <text:p text:style-name="P119"><text:span text:style-name="T59"><text:tab/><text:tab/><text:tab/><text:tab/>.append(</text:span><text:span text:style-name="T36">"\" amb els paràmetres {"</text:span><text:span text:style-name="T59">);</text:span></text:p>
            <text:p text:style-name="P119"><text:span text:style-name="T59"><text:tab/><text:tab/></text:span><text:span text:style-name="T51">int</text:span><text:span text:style-name="T59"> </text:span><text:span text:style-name="T85">i</text:span><text:span text:style-name="T59"> = 0;</text:span></text:p>
            <text:p text:style-name="P119"><text:span text:style-name="T59"><text:tab/><text:tab/></text:span><text:span text:style-name="T51">for</text:span><text:span text:style-name="T59"> (String </text:span><text:span text:style-name="T85">key</text:span><text:span text:style-name="T59"> : </text:span><text:span text:style-name="T85">parametres</text:span><text:span text:style-name="T59">.keySet()) {</text:span></text:p>
            <text:p text:style-name="P119"><text:span text:style-name="T59"><text:tab/><text:tab/><text:tab/></text:span><text:span text:style-name="T85">str</text:span><text:span text:style-name="T59">.append(</text:span><text:span text:style-name="T85">key</text:span><text:span text:style-name="T59">).append(</text:span><text:span text:style-name="T36">"="</text:span><text:span text:style-name="T59">).append(</text:span><text:span text:style-name="T85">parametres</text:span><text:span text:style-name="T59">.get(</text:span><text:span text:style-name="T85">key</text:span><text:span text:style-name="T59">));</text:span></text:p>
            <text:p text:style-name="P119"><text:span text:style-name="T59"><text:tab/><text:tab/><text:tab/></text:span><text:span text:style-name="T85">i</text:span><text:span text:style-name="T59">++;</text:span></text:p>
            <text:p text:style-name="P119"><text:span text:style-name="T59"><text:tab/><text:tab/><text:tab/></text:span><text:span text:style-name="T51">if</text:span><text:span text:style-name="T59"> (</text:span><text:span text:style-name="T85">i</text:span><text:span text:style-name="T59">&lt;</text:span><text:span text:style-name="T85">parametres</text:span><text:span text:style-name="T59">.size())</text:span></text:p>
            <text:p text:style-name="P119"><text:span text:style-name="T59"><text:tab/><text:tab/><text:tab/><text:tab/></text:span><text:span text:style-name="T85">str</text:span><text:span text:style-name="T59">.append(</text:span><text:span text:style-name="T36">", "</text:span><text:span text:style-name="T59">);</text:span></text:p>
            <text:p text:style-name="P92"><text:tab/><text:tab/>}</text:p>
            <text:p text:style-name="P119"><text:span text:style-name="T59"><text:tab/><text:tab/></text:span><text:span text:style-name="T85">str</text:span><text:span text:style-name="T59">.append(</text:span><text:span text:style-name="T36">"} amb resultat "</text:span><text:span text:style-name="T59">).append(</text:span><text:span text:style-name="T85">correcte</text:span><text:span text:style-name="T59"> ? </text:span><text:span text:style-name="T36">"OK"</text:span><text:span text:style-name="T59"> : </text:span><text:span text:style-name="T36">"KO"</text:span><text:span text:style-name="T59">);</text:span></text:p>
            <text:p text:style-name="P119"><text:span text:style-name="T59"><text:tab/><text:tab/></text:span><text:span text:style-name="T51">if</text:span><text:span text:style-name="T59"> (</text:span><text:span text:style-name="T85">error</text:span><text:span text:style-name="T59"> != </text:span><text:span text:style-name="T51">null</text:span><text:span text:style-name="T59">)</text:span></text:p>
            <text:p text:style-name="P119"><text:span text:style-name="T59"><text:tab/><text:tab/><text:tab/></text:span><text:span text:style-name="T85">str</text:span><text:span text:style-name="T59">.append(</text:span><text:span text:style-name="T36">": "</text:span><text:span text:style-name="T59">).append(</text:span><text:span text:style-name="T85">error</text:span><text:span text:style-name="T59">);</text:span></text:p>
            <text:p text:style-name="P119"><text:span text:style-name="T59"><text:tab/><text:tab/></text:span><text:span text:style-name="T51">if</text:span><text:span text:style-name="T59"> (</text:span><text:span text:style-name="T85">e</text:span><text:span text:style-name="T59"> != </text:span><text:span text:style-name="T51">null</text:span><text:span text:style-name="T59">)</text:span></text:p>
            <text:p text:style-name="P119"><text:span text:style-name="T59"><text:tab/><text:tab/><text:tab/></text:span><text:span text:style-name="T85">str</text:span><text:span text:style-name="T59">.append(</text:span><text:span text:style-name="T36">" "</text:span><text:span text:style-name="T59">).append(</text:span><text:span text:style-name="T85">e</text:span><text:span text:style-name="T59">.getClass()).append(</text:span><text:span text:style-name="T36">" "</text:span><text:span text:style-name="T59">).append(</text:span><text:span text:style-name="T85">e</text:span><text:span text:style-name="T59">.getMessage());</text:span></text:p>
            <text:p text:style-name="P119"><text:span text:style-name="T59"><text:tab/><text:tab/></text:span><text:span text:style-name="T85">str</text:span><text:span text:style-name="T59">.append(</text:span><text:span text:style-name="T36">" "</text:span><text:span text:style-name="T59">).append(</text:span><text:span text:style-name="T85">timeMs</text:span><text:span text:style-name="T59">).append(</text:span><text:span text:style-name="T36">"ms"</text:span><text:span text:style-name="T59">);</text:span></text:p>
            <text:p text:style-name="P92"><text:tab/><text:tab/></text:p>
            <text:p text:style-name="P119"><text:span text:style-name="T59"><text:tab/><text:tab/></text:span><text:span text:style-name="T80">logger</text:span><text:span text:style-name="T59">.debug(</text:span><text:span text:style-name="T85">str</text:span><text:span text:style-name="T59">.toString());</text:span></text:p>
            <text:p text:style-name="P92"><text:tab/>}</text:p>
            <text:p text:style-name="P91">}</text:p>
          </table:table-cell>
        </table:table-row>
      </table:table>
      <text:p text:style-name="P182"><draw:frame text:anchor-type="paragraph" draw:z-index="59" draw:name="Forma4" draw:style-name="gr2" draw:text-style-name="P465" svg:width="18.058cm" svg:height="5.181cm" svg:x="0.43cm" svg:y="0.766cm"><draw:text-box><text:p/></draw:text-box></draw:frame></text:p>
      <text:p text:style-name="P182"/>
      <text:p text:style-name="P1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144209824">
            <table:table-cell table:style-name="TableBox1144211840"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16</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3-20T09:40:22.869999823">20/03/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13M1S</meta:editing-duration>
    <meta:editing-cycles>291</meta:editing-cycles>
    <meta:generator>LibreOffice/7.3.5.2$Windows_X86_64 LibreOffice_project/184fe81b8c8c30d8b5082578aee2fed2ea847c01</meta:generator>
    <dc:date>2026-03-20T09:40:22.192000000</dc:date>
    <dc:creator>Daniel Moreno Linares</dc:creator>
    <meta:document-statistic meta:table-count="35" meta:image-count="15" meta:object-count="0" meta:page-count="51" meta:paragraph-count="1928" meta:word-count="10171" meta:character-count="76611" meta:non-whitespace-character-count="66092"/>
  </office:meta>
</office:document-meta>
</file>