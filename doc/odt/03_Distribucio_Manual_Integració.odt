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250000016910C7E6BE.png" manifest:media-type="image/png"/>
  <manifest:file-entry manifest:full-path="Pictures/200000090000411E00005DA44F15E491.svm" manifest:media-type="image/x-svm"/>
  <manifest:file-entry manifest:full-path="Pictures/10000000000006A400000104792F8214.png" manifest:media-type="image/png"/>
  <manifest:file-entry manifest:full-path="Pictures/100000000000042F000002652F67F6D0.png" manifest:media-type="image/png"/>
  <manifest:file-entry manifest:full-path="Pictures/10000001000002770000038BE4555057.png" manifest:media-type="image/png"/>
  <manifest:file-entry manifest:full-path="Pictures/10000001000002E6000002BBD71058E4.png" manifest:media-type="image/png"/>
  <manifest:file-entry manifest:full-path="Pictures/1000000100000303000000A29DF3ECA6.png" manifest:media-type="image/png"/>
  <manifest:file-entry manifest:full-path="Pictures/1000000100000259000001691D245771.png" manifest:media-type="image/png"/>
  <manifest:file-entry manifest:full-path="Pictures/100000010000017600000106110C88ED.png" manifest:media-type="image/png"/>
  <manifest:file-entry manifest:full-path="Pictures/100000010000022500000119572521D6.png" manifest:media-type="image/png"/>
  <manifest:file-entry manifest:full-path="Pictures/1000000100000171000001063B672558.png" manifest:media-type="image/png"/>
  <manifest:file-entry manifest:full-path="Pictures/20000009000006B5000000E73EC66AFA.svm" manifest:media-type="image/x-svm"/>
  <manifest:file-entry manifest:full-path="Pictures/10000001000004D90000028B6D568F62.png" manifest:media-type="image/png"/>
  <manifest:file-entry manifest:full-path="Pictures/10000001000000420000000A937B5137.png" manifest:media-type="image/png"/>
  <manifest:file-entry manifest:full-path="Pictures/100000010000017100000192F2130587.png" manifest:media-type="image/png"/>
  <manifest:file-entry manifest:full-path="Pictures/100000010000041B000001C31F13D5E0.png" manifest:media-type="image/png"/>
  <manifest:file-entry manifest:full-path="Pictures/10000001000002A4000001786B260243.png" manifest:media-type="image/png"/>
  <manifest:file-entry manifest:full-path="Pictures/100000000000042F00000265E139B203.png" manifest:media-type="image/png"/>
  <manifest:file-entry manifest:full-path="Pictures/100000010000032A0000021FAB5956C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JetBrains Mono" svg:font-family="'JetBrains Mono'"/>
    <style:font-face style:name="JetBrains Mono1" svg:font-family="'JetBrains Mono'" style:font-family-generic="swiss"/>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1.A12" style:family="table-cell">
      <style:table-cell-properties fo:padding-left="0.132cm" fo:padding-right="0.123cm" fo:padding-top="0cm" fo:padding-bottom="0cm" fo:border-left="1.5pt solid #000000" fo:border-right="0.5pt solid #000000" fo:border-top="none" fo:border-bottom="1.5pt solid #000000"/>
    </style:style>
    <style:style style:name="Taula1.B12" style:family="table-cell">
      <style:table-cell-properties fo:padding-left="0.132cm" fo:padding-right="0.123cm" fo:padding-top="0cm" fo:padding-bottom="0cm" fo:border-left="0.5pt solid #000000" fo:border-right="0.5pt solid #000000" fo:border-top="none" fo:border-bottom="1.5pt solid #000000"/>
    </style:style>
    <style:style style:name="Taula1.C12" style:family="table-cell">
      <style:table-cell-properties fo:padding-left="0.132cm" fo:padding-right="0.123cm" fo:padding-top="0cm" fo:padding-bottom="0cm" fo:border-left="0.5pt solid #000000" fo:border-right="0.5pt solid #000000" fo:border-top="none" fo:border-bottom="1.5pt solid #000000"/>
    </style:style>
    <style:style style:name="Taula1.D12"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b09e8f" style:font-name-complex="Arial Narrow1"/>
    </style:style>
    <style:style style:name="P19" style:family="paragraph" style:parent-style-name="Standard">
      <style:paragraph-properties fo:margin-top="0cm" fo:margin-bottom="0.212cm" style:contextual-spacing="false" fo:text-align="start" style:justify-single-word="false"/>
      <style:text-properties style:font-name="Calibri1" fo:language="ca" fo:country="ES" officeooo:rsid="01b0de17" officeooo:paragraph-rsid="01b0de17" style:font-name-complex="Arial Narrow1"/>
    </style:style>
    <style:style style:name="P20"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21" style:family="paragraph" style:parent-style-name="Standard">
      <style:paragraph-properties fo:text-align="end" style:justify-single-word="false"/>
      <style:text-properties officeooo:paragraph-rsid="001dc238"/>
    </style:style>
    <style:style style:name="P22" style:family="paragraph" style:parent-style-name="Standard">
      <style:paragraph-properties fo:margin-top="0.499cm" fo:margin-bottom="0.199cm" style:contextual-spacing="false" fo:text-align="end" style:justify-single-word="false"/>
      <style:text-properties officeooo:paragraph-rsid="01b9c3b2"/>
    </style:style>
    <style:style style:name="P23" style:family="paragraph" style:parent-style-name="Standard">
      <style:text-properties officeooo:paragraph-rsid="001bba47"/>
    </style:style>
    <style:style style:name="P24"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7" style:family="paragraph" style:parent-style-name="Standard">
      <style:text-properties fo:font-weight="bold" officeooo:paragraph-rsid="001d1802" style:font-weight-asian="bold" style:font-weight-complex="bold"/>
    </style:style>
    <style:style style:name="P28" style:family="paragraph" style:parent-style-name="Text_20_body">
      <style:text-properties fo:font-weight="bold" officeooo:rsid="00ea866e" officeooo:paragraph-rsid="00d673d7" style:font-weight-asian="bold" style:font-weight-complex="bold"/>
    </style:style>
    <style:style style:name="P29" style:family="paragraph" style:parent-style-name="Text_20_body">
      <style:text-properties fo:font-weight="bold" officeooo:rsid="00ebb296" officeooo:paragraph-rsid="00d673d7" style:font-weight-asian="bold" style:font-weight-complex="bold"/>
    </style:style>
    <style:style style:name="P30"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31"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2"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3"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4"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5"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6"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7"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8"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9"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40"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41" style:family="paragraph" style:parent-style-name="Standard">
      <style:paragraph-properties fo:text-align="justify" style:justify-single-word="false"/>
      <style:text-properties officeooo:paragraph-rsid="008ce69e"/>
    </style:style>
    <style:style style:name="P42" style:family="paragraph" style:parent-style-name="Standard">
      <style:paragraph-properties fo:text-align="justify" style:justify-single-word="false"/>
      <style:text-properties officeooo:paragraph-rsid="00d673d7"/>
    </style:style>
    <style:style style:name="P43"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4" style:family="paragraph" style:parent-style-name="Table_20_Contents">
      <style:paragraph-properties fo:text-align="justify" style:justify-single-word="false"/>
      <style:text-properties officeooo:paragraph-rsid="01a9cdd2"/>
    </style:style>
    <style:style style:name="P45" style:family="paragraph" style:parent-style-name="Table_20_Contents">
      <style:paragraph-properties fo:text-align="justify" style:justify-single-word="false"/>
      <style:text-properties officeooo:paragraph-rsid="019cebf9"/>
    </style:style>
    <style:style style:name="P46" style:family="paragraph" style:parent-style-name="Table_20_Contents">
      <style:paragraph-properties fo:text-align="justify" style:justify-single-word="false"/>
    </style:style>
    <style:style style:name="P47" style:family="paragraph" style:parent-style-name="Text_20_body">
      <style:paragraph-properties fo:text-align="justify" style:justify-single-word="false"/>
      <style:text-properties officeooo:paragraph-rsid="01a3408a"/>
    </style:style>
    <style:style style:name="P48" style:family="paragraph" style:parent-style-name="Standard">
      <style:paragraph-properties fo:text-align="justify" style:justify-single-word="false"/>
      <style:text-properties officeooo:paragraph-rsid="01bdb140"/>
    </style:style>
    <style:style style:name="P49" style:family="paragraph" style:parent-style-name="Standard">
      <style:paragraph-properties fo:margin-top="0cm" fo:margin-bottom="0.212cm" style:contextual-spacing="false" fo:text-align="start" style:justify-single-word="false"/>
      <style:text-properties officeooo:paragraph-rsid="001d1802"/>
    </style:style>
    <style:style style:name="P50" style:family="paragraph" style:parent-style-name="Standard">
      <style:paragraph-properties fo:margin-top="0cm" fo:margin-bottom="0.212cm" style:contextual-spacing="false" fo:text-align="start" style:justify-single-word="false"/>
      <style:text-properties officeooo:paragraph-rsid="00649479"/>
    </style:style>
    <style:style style:name="P51" style:family="paragraph" style:parent-style-name="Standard">
      <style:paragraph-properties fo:margin-top="0cm" fo:margin-bottom="0.212cm" style:contextual-spacing="false" fo:text-align="start" style:justify-single-word="false"/>
      <style:text-properties officeooo:paragraph-rsid="00ec4c44"/>
    </style:style>
    <style:style style:name="P52" style:family="paragraph" style:parent-style-name="Standard">
      <style:paragraph-properties fo:margin-left="0cm" fo:margin-right="0cm" fo:text-align="start" style:justify-single-word="false" fo:text-indent="0cm" style:auto-text-indent="false"/>
    </style:style>
    <style:style style:name="P53"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4" style:family="paragraph" style:parent-style-name="Standard">
      <style:paragraph-properties fo:margin-left="0cm" fo:margin-right="0cm" fo:text-align="start" style:justify-single-word="false" fo:text-indent="0cm" style:auto-text-indent="false"/>
      <style:text-properties officeooo:paragraph-rsid="00d673d7"/>
    </style:style>
    <style:style style:name="P5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6" style:family="paragraph" style:parent-style-name="Standard">
      <style:paragraph-properties fo:text-align="start" style:justify-single-word="false" fo:padding="0.049cm" fo:border="0.06pt solid #000000" style:shadow="#000000 0cm 0cm"/>
      <style:text-properties officeooo:paragraph-rsid="0195481e"/>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5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b79999"/>
    </style:style>
    <style:style style:name="P62" style:family="paragraph" style:parent-style-name="Standard">
      <style:paragraph-properties fo:margin-left="0cm" fo:margin-right="0cm" fo:text-align="start" style:justify-single-word="false" fo:text-indent="0cm" style:auto-text-indent="false"/>
      <style:text-properties officeooo:paragraph-rsid="01bdb140"/>
    </style:style>
    <style:style style:name="P63" style:family="paragraph" style:parent-style-name="Standard">
      <style:text-properties fo:font-style="normal" officeooo:rsid="00d63ec8" officeooo:paragraph-rsid="00d673d7" style:font-style-asian="normal" style:font-style-complex="normal"/>
    </style:style>
    <style:style style:name="P64" style:family="paragraph" style:parent-style-name="Standard">
      <style:text-properties fo:font-style="normal" officeooo:rsid="00db5ce5" officeooo:paragraph-rsid="00d673d7" style:font-style-asian="normal" style:font-style-complex="normal"/>
    </style:style>
    <style:style style:name="P65" style:family="paragraph" style:parent-style-name="Standard">
      <style:text-properties fo:font-style="normal" officeooo:rsid="00db5ce5" officeooo:paragraph-rsid="00e8f23e" style:font-style-asian="normal" style:font-style-complex="normal"/>
    </style:style>
    <style:style style:name="P66" style:family="paragraph" style:parent-style-name="Standard">
      <style:text-properties fo:font-style="normal" officeooo:rsid="00e8f23e" officeooo:paragraph-rsid="00e8f23e" style:font-style-asian="normal" style:font-style-complex="normal"/>
    </style:style>
    <style:style style:name="P67" style:family="paragraph" style:parent-style-name="Text_20_body">
      <style:text-properties fo:font-style="normal" officeooo:rsid="00d81a0e" officeooo:paragraph-rsid="00d673d7" style:font-style-asian="normal" style:font-style-complex="normal"/>
    </style:style>
    <style:style style:name="P68" style:family="paragraph" style:parent-style-name="Text_20_body">
      <style:text-properties fo:font-style="normal" officeooo:rsid="00d81a0e" officeooo:paragraph-rsid="01bdb140" style:font-style-asian="normal" style:font-style-complex="normal"/>
    </style:style>
    <style:style style:name="P69" style:family="paragraph" style:parent-style-name="Text_20_body">
      <style:text-properties fo:font-style="normal" officeooo:rsid="00d901df" officeooo:paragraph-rsid="00d673d7" style:font-style-asian="normal" style:font-style-complex="normal"/>
    </style:style>
    <style:style style:name="P70" style:family="paragraph" style:parent-style-name="Text_20_body">
      <style:text-properties fo:font-style="normal" officeooo:rsid="00de9e71" officeooo:paragraph-rsid="00d673d7" style:font-style-asian="normal" style:font-style-complex="normal"/>
    </style:style>
    <style:style style:name="P71" style:family="paragraph" style:parent-style-name="Text_20_body">
      <style:text-properties fo:font-style="normal" officeooo:rsid="00e1e7f8" officeooo:paragraph-rsid="00d673d7" style:font-style-asian="normal" style:font-style-complex="normal"/>
    </style:style>
    <style:style style:name="P72" style:family="paragraph" style:parent-style-name="Text_20_body">
      <style:text-properties fo:font-style="normal" officeooo:rsid="00e1e7f8" officeooo:paragraph-rsid="00e16f63" style:font-style-asian="normal" style:font-style-complex="normal"/>
    </style:style>
    <style:style style:name="P73" style:family="paragraph" style:parent-style-name="Text_20_body">
      <style:text-properties fo:font-style="normal" officeooo:rsid="00ea10cf" officeooo:paragraph-rsid="00e5f97a" style:font-style-asian="normal" style:font-style-complex="normal"/>
    </style:style>
    <style:style style:name="P74" style:family="paragraph" style:parent-style-name="Standard">
      <style:text-properties fo:font-style="normal" officeooo:rsid="00d63ec8" officeooo:paragraph-rsid="00d673d7" fo:background-color="transparent" style:font-style-asian="normal" style:font-style-complex="normal"/>
    </style:style>
    <style:style style:name="P75" style:family="paragraph" style:parent-style-name="Standard">
      <style:text-properties fo:font-style="normal" officeooo:rsid="00e440cb" officeooo:paragraph-rsid="00dda4cb" fo:background-color="transparent" style:font-style-asian="normal" style:font-style-complex="normal"/>
    </style:style>
    <style:style style:name="P76" style:family="paragraph" style:parent-style-name="Text_20_body">
      <style:text-properties fo:font-style="normal" officeooo:rsid="00dfc741" officeooo:paragraph-rsid="00e8f23e" fo:background-color="transparent" style:font-style-asian="normal" style:font-style-complex="normal"/>
    </style:style>
    <style:style style:name="P77"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8"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9"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80"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81" style:family="paragraph" style:parent-style-name="Standard">
      <style:text-properties officeooo:rsid="00db5ce5" officeooo:paragraph-rsid="00e8f23e"/>
    </style:style>
    <style:style style:name="P82"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4"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5"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6"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7"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8"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89"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3"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5"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6"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7"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98"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99"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100"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1" style:family="paragraph" style:parent-style-name="Standard">
      <style:paragraph-properties style:line-height-at-least="0.476cm"/>
      <style:text-properties fo:color="#000000" loext:opacity="100%" style:font-name="Consolas2" fo:font-size="9pt" fo:font-weight="normal" officeooo:paragraph-rsid="01b5544c" fo:background-color="#dddddd"/>
    </style:style>
    <style:style style:name="P102" style:family="paragraph" style:parent-style-name="Standard">
      <style:paragraph-properties style:line-height-at-least="0.476cm"/>
      <style:text-properties fo:color="#000000" loext:opacity="100%" officeooo:paragraph-rsid="019cebf9" fo:background-color="#fffffe"/>
    </style:style>
    <style:style style:name="P103" style:family="paragraph" style:parent-style-name="Standard">
      <style:paragraph-properties style:line-height-at-least="0.476cm"/>
      <style:text-properties fo:color="#000000" loext:opacity="100%" officeooo:paragraph-rsid="01b8b77e" fo:background-color="#fffffe"/>
    </style:style>
    <style:style style:name="P104" style:family="paragraph" style:parent-style-name="Standard">
      <style:paragraph-properties style:line-height-at-least="0.476cm"/>
      <style:text-properties fo:color="#000000" loext:opacity="100%" officeooo:paragraph-rsid="019cebf9" fo:background-color="#dddddd"/>
    </style:style>
    <style:style style:name="P105" style:family="paragraph" style:parent-style-name="Standard">
      <style:paragraph-properties style:line-height-at-least="0.476cm"/>
      <style:text-properties fo:color="#000000" loext:opacity="100%" officeooo:paragraph-rsid="01b5544c" fo:background-color="#dddddd"/>
    </style:style>
    <style:style style:name="P106" style:family="paragraph" style:parent-style-name="Standard">
      <style:paragraph-properties style:line-height-at-least="0.476cm"/>
      <style:text-properties fo:color="#000000" loext:opacity="100%" officeooo:paragraph-rsid="01b71c80" fo:background-color="#dddddd"/>
    </style:style>
    <style:style style:name="P107"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08"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09"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10"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11" style:family="paragraph" style:parent-style-name="Standard">
      <style:paragraph-properties fo:text-align="justify" style:justify-single-word="false"/>
      <style:text-properties fo:font-size="8pt" officeooo:paragraph-rsid="00d673d7" style:font-size-asian="8pt" style:font-size-complex="8pt"/>
    </style:style>
    <style:style style:name="P112"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13"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4"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16"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17"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18"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1"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24" style:family="paragraph" style:parent-style-name="Standard">
      <style:text-properties officeooo:paragraph-rsid="00d673d7"/>
    </style:style>
    <style:style style:name="P125" style:family="paragraph" style:parent-style-name="Text_20_body">
      <style:text-properties officeooo:paragraph-rsid="00d673d7"/>
    </style:style>
    <style:style style:name="P126" style:family="paragraph" style:parent-style-name="Standard">
      <style:text-properties officeooo:rsid="00d4e88a" officeooo:paragraph-rsid="00d8ffe0"/>
    </style:style>
    <style:style style:name="P127" style:family="paragraph" style:parent-style-name="Standard">
      <style:text-properties officeooo:paragraph-rsid="00e8f23e"/>
    </style:style>
    <style:style style:name="P128" style:family="paragraph" style:parent-style-name="Text_20_body">
      <style:text-properties officeooo:paragraph-rsid="00e8f23e"/>
    </style:style>
    <style:style style:name="P129" style:family="paragraph" style:parent-style-name="Fig.">
      <style:text-properties officeooo:paragraph-rsid="00e8f23e"/>
    </style:style>
    <style:style style:name="P130" style:family="paragraph" style:parent-style-name="Standard">
      <style:paragraph-properties fo:text-align="justify" style:justify-single-word="false"/>
      <style:text-properties officeooo:rsid="00931a7c" officeooo:paragraph-rsid="019c96f9"/>
    </style:style>
    <style:style style:name="P131" style:family="paragraph" style:parent-style-name="Text_20_body">
      <style:paragraph-properties fo:text-align="justify" style:justify-single-word="false"/>
      <style:text-properties officeooo:rsid="00931a7c" officeooo:paragraph-rsid="018c7b7a"/>
    </style:style>
    <style:style style:name="P132"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33"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34"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35"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36"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37"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38"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3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0" style:family="paragraph" style:parent-style-name="Text_20_body">
      <style:paragraph-properties fo:text-align="justify" style:justify-single-word="false"/>
      <style:text-properties officeooo:rsid="0052b05f" officeooo:paragraph-rsid="0074fa21"/>
    </style:style>
    <style:style style:name="P141" style:family="paragraph" style:parent-style-name="Text_20_body">
      <style:paragraph-properties fo:text-align="justify" style:justify-single-word="false"/>
      <style:text-properties officeooo:rsid="00771bf9" officeooo:paragraph-rsid="00771bf9"/>
    </style:style>
    <style:style style:name="P142" style:family="paragraph" style:parent-style-name="Text_20_body">
      <style:paragraph-properties fo:text-align="center" style:justify-single-word="false"/>
      <style:text-properties officeooo:rsid="00771bf9" officeooo:paragraph-rsid="00771bf9"/>
    </style:style>
    <style:style style:name="P143" style:family="paragraph" style:parent-style-name="Text_20_body">
      <style:text-properties officeooo:rsid="008ce69e" officeooo:paragraph-rsid="008ce69e"/>
    </style:style>
    <style:style style:name="P144" style:family="paragraph" style:parent-style-name="Text_20_body">
      <style:paragraph-properties fo:text-align="justify" style:justify-single-word="false"/>
      <style:text-properties officeooo:rsid="008ce69e" officeooo:paragraph-rsid="008ce69e"/>
    </style:style>
    <style:style style:name="P145" style:family="paragraph" style:parent-style-name="Text_20_body">
      <style:paragraph-properties fo:text-align="justify" style:justify-single-word="false"/>
      <style:text-properties officeooo:rsid="008ce69e" officeooo:paragraph-rsid="00771bf9"/>
    </style:style>
    <style:style style:name="P146" style:family="paragraph" style:parent-style-name="Text_20_body">
      <style:paragraph-properties fo:text-align="justify" style:justify-single-word="false"/>
      <style:text-properties officeooo:rsid="008ce69e" officeooo:paragraph-rsid="018c7b7a"/>
    </style:style>
    <style:style style:name="P147" style:family="paragraph" style:parent-style-name="Text_20_body">
      <style:paragraph-properties fo:text-align="justify" style:justify-single-word="false"/>
      <style:text-properties officeooo:rsid="008ce69e" officeooo:paragraph-rsid="01a9cdd2"/>
    </style:style>
    <style:style style:name="P148" style:family="paragraph" style:parent-style-name="Text_20_body">
      <style:text-properties officeooo:rsid="00a9a467" officeooo:paragraph-rsid="00a9a467"/>
    </style:style>
    <style:style style:name="P149" style:family="paragraph" style:parent-style-name="Text_20_body">
      <style:text-properties officeooo:rsid="00a9a467" officeooo:paragraph-rsid="019b515e"/>
    </style:style>
    <style:style style:name="P150" style:family="paragraph" style:parent-style-name="Text_20_body">
      <style:text-properties officeooo:rsid="00a9a467" officeooo:paragraph-rsid="019b5d65"/>
    </style:style>
    <style:style style:name="P151" style:family="paragraph" style:parent-style-name="Text_20_body">
      <style:text-properties officeooo:rsid="00aeb4b4" officeooo:paragraph-rsid="0195481e"/>
    </style:style>
    <style:style style:name="P152" style:family="paragraph" style:parent-style-name="Text_20_body">
      <style:paragraph-properties fo:text-align="center" style:justify-single-word="false"/>
      <style:text-properties officeooo:rsid="007af11d" officeooo:paragraph-rsid="01949037"/>
    </style:style>
    <style:style style:name="P153" style:family="paragraph" style:parent-style-name="Text_20_body">
      <style:paragraph-properties fo:text-align="center" style:justify-single-word="false"/>
      <style:text-properties officeooo:rsid="007af11d" officeooo:paragraph-rsid="019c96f9"/>
    </style:style>
    <style:style style:name="P154"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55" style:family="paragraph" style:parent-style-name="Text_20_body">
      <style:text-properties officeooo:rsid="00de9e71" officeooo:paragraph-rsid="00d673d7"/>
    </style:style>
    <style:style style:name="P156" style:family="paragraph" style:parent-style-name="Text_20_body">
      <style:text-properties officeooo:rsid="00e2fa38" officeooo:paragraph-rsid="00d673d7"/>
    </style:style>
    <style:style style:name="P157" style:family="paragraph" style:parent-style-name="Text_20_body">
      <style:text-properties officeooo:rsid="00e440cb" officeooo:paragraph-rsid="00d673d7"/>
    </style:style>
    <style:style style:name="P158" style:family="paragraph" style:parent-style-name="Text_20_body">
      <style:text-properties officeooo:rsid="00e59aa6" officeooo:paragraph-rsid="00d673d7"/>
    </style:style>
    <style:style style:name="P159" style:family="paragraph" style:parent-style-name="Text_20_body">
      <style:text-properties officeooo:rsid="00ea10cf" officeooo:paragraph-rsid="00d673d7"/>
    </style:style>
    <style:style style:name="P160" style:family="paragraph" style:parent-style-name="Text_20_body">
      <style:text-properties officeooo:rsid="00ea10cf" officeooo:paragraph-rsid="00e54ccf"/>
    </style:style>
    <style:style style:name="P161" style:family="paragraph" style:parent-style-name="Text_20_body">
      <style:text-properties officeooo:rsid="00ea866e" officeooo:paragraph-rsid="00d673d7"/>
    </style:style>
    <style:style style:name="P162" style:family="paragraph" style:parent-style-name="Text_20_body">
      <style:text-properties officeooo:rsid="00ebb296" officeooo:paragraph-rsid="00d673d7"/>
    </style:style>
    <style:style style:name="P163" style:family="paragraph" style:parent-style-name="Text_20_body">
      <style:text-properties officeooo:rsid="00ecdaee" officeooo:paragraph-rsid="00d673d7"/>
    </style:style>
    <style:style style:name="P164" style:family="paragraph" style:parent-style-name="Text_20_body">
      <style:text-properties officeooo:rsid="00d8ffe0" officeooo:paragraph-rsid="00d8ffe0"/>
    </style:style>
    <style:style style:name="P165" style:family="paragraph" style:parent-style-name="Text_20_body">
      <style:text-properties officeooo:paragraph-rsid="00e16f63"/>
    </style:style>
    <style:style style:name="P166" style:family="paragraph" style:parent-style-name="Text_20_body">
      <style:text-properties officeooo:rsid="00e54ccf" officeooo:paragraph-rsid="00e54ccf"/>
    </style:style>
    <style:style style:name="P167" style:family="paragraph" style:parent-style-name="Text_20_body">
      <style:text-properties officeooo:paragraph-rsid="00e54ccf"/>
    </style:style>
    <style:style style:name="P168" style:family="paragraph" style:parent-style-name="Text_20_body">
      <style:text-properties officeooo:rsid="00e5f97a" officeooo:paragraph-rsid="00e5f97a"/>
    </style:style>
    <style:style style:name="P169" style:family="paragraph" style:parent-style-name="Text_20_body">
      <style:text-properties officeooo:paragraph-rsid="00e5f97a"/>
    </style:style>
    <style:style style:name="P170" style:family="paragraph" style:parent-style-name="Text_20_body">
      <style:text-properties officeooo:rsid="00e54ccf" officeooo:paragraph-rsid="00e54ccf" fo:background-color="transparent"/>
    </style:style>
    <style:style style:name="P171" style:family="paragraph" style:parent-style-name="Text_20_body">
      <style:text-properties officeooo:paragraph-rsid="00dda4cb"/>
    </style:style>
    <style:style style:name="P172"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73"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74"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75"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76"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77"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78"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79"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8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81"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82" style:family="paragraph" style:parent-style-name="Fig.">
      <style:text-properties officeooo:rsid="00ccb8e2" officeooo:paragraph-rsid="00e8f23e"/>
    </style:style>
    <style:style style:name="P183"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84"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85"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86" style:family="paragraph" style:parent-style-name="Table_20_Contents">
      <style:paragraph-properties fo:text-align="justify" style:justify-single-word="false"/>
      <style:text-properties officeooo:rsid="014c5388" officeooo:paragraph-rsid="01a1cb29"/>
    </style:style>
    <style:style style:name="P187" style:family="paragraph" style:parent-style-name="Table_20_Contents">
      <style:paragraph-properties fo:text-align="justify" style:justify-single-word="false"/>
      <style:text-properties officeooo:rsid="014c5388" officeooo:paragraph-rsid="01a9cdd2"/>
    </style:style>
    <style:style style:name="P188" style:family="paragraph" style:parent-style-name="Standard">
      <style:text-properties officeooo:rsid="014c5388" officeooo:paragraph-rsid="01a9cdd2"/>
    </style:style>
    <style:style style:name="P189" style:family="paragraph" style:parent-style-name="Text_20_body">
      <style:text-properties officeooo:rsid="014c5388" officeooo:paragraph-rsid="01a9cdd2"/>
    </style:style>
    <style:style style:name="P190" style:family="paragraph" style:parent-style-name="Text_20_body">
      <style:text-properties officeooo:rsid="014c5388" officeooo:paragraph-rsid="019cebf9"/>
    </style:style>
    <style:style style:name="P191" style:family="paragraph" style:parent-style-name="Text_20_body">
      <style:text-properties officeooo:rsid="014c5388" officeooo:paragraph-rsid="01a1cb29"/>
    </style:style>
    <style:style style:name="P192" style:family="paragraph" style:parent-style-name="Text_20_body">
      <style:text-properties officeooo:rsid="014c5388" officeooo:paragraph-rsid="01b79797"/>
    </style:style>
    <style:style style:name="P193" style:family="paragraph" style:parent-style-name="Table_20_Contents">
      <style:paragraph-properties fo:text-align="justify" style:justify-single-word="false"/>
      <style:text-properties style:font-name="Consolas" officeooo:paragraph-rsid="019cebf9"/>
    </style:style>
    <style:style style:name="P194"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195" style:family="paragraph" style:parent-style-name="Table_20_Contents">
      <style:paragraph-properties fo:text-align="justify" style:justify-single-word="false"/>
      <style:text-properties style:font-name="Consolas" officeooo:rsid="015e4779" officeooo:paragraph-rsid="019cebf9"/>
    </style:style>
    <style:style style:name="P196" style:family="paragraph" style:parent-style-name="Table_20_Contents">
      <style:paragraph-properties fo:text-align="justify" style:justify-single-word="false"/>
      <style:text-properties style:font-name="Consolas" officeooo:rsid="01622317" officeooo:paragraph-rsid="019cebf9"/>
    </style:style>
    <style:style style:name="P197"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198"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199" style:family="paragraph" style:parent-style-name="Text_20_body">
      <style:text-properties officeooo:rsid="0149cec3" officeooo:paragraph-rsid="01a9cdd2"/>
    </style:style>
    <style:style style:name="P200" style:family="paragraph" style:parent-style-name="Table_20_Contents">
      <style:paragraph-properties fo:text-align="justify" style:justify-single-word="false"/>
      <style:text-properties officeooo:rsid="015c0e13" officeooo:paragraph-rsid="019cebf9"/>
    </style:style>
    <style:style style:name="P201" style:family="paragraph" style:parent-style-name="Table_20_Contents">
      <style:paragraph-properties fo:text-align="justify" style:justify-single-word="false"/>
      <style:text-properties officeooo:rsid="015fa555" officeooo:paragraph-rsid="019cebf9"/>
    </style:style>
    <style:style style:name="P202" style:family="paragraph" style:parent-style-name="Text_20_body">
      <style:text-properties officeooo:rsid="015fa555" officeooo:paragraph-rsid="019cebf9"/>
    </style:style>
    <style:style style:name="P203" style:family="paragraph" style:parent-style-name="Table_20_Contents">
      <style:paragraph-properties fo:text-align="justify" style:justify-single-word="false"/>
      <style:text-properties officeooo:rsid="0160d5f3" officeooo:paragraph-rsid="019cebf9"/>
    </style:style>
    <style:style style:name="P204" style:family="paragraph" style:parent-style-name="Table_20_Contents">
      <style:paragraph-properties fo:text-align="justify" style:justify-single-word="false"/>
      <style:text-properties officeooo:rsid="0160d5f3" officeooo:paragraph-rsid="01a9cdd2"/>
    </style:style>
    <style:style style:name="P205"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06"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07" style:family="paragraph" style:parent-style-name="Standard">
      <style:text-properties officeooo:rsid="007f55bb" officeooo:paragraph-rsid="01a9cdd2"/>
    </style:style>
    <style:style style:name="P208" style:family="paragraph" style:parent-style-name="Text_20_body">
      <style:text-properties officeooo:rsid="007f55bb" officeooo:paragraph-rsid="01915c4c"/>
    </style:style>
    <style:style style:name="P209" style:family="paragraph" style:parent-style-name="Text_20_body">
      <style:paragraph-properties fo:text-align="center" style:justify-single-word="false"/>
      <style:text-properties officeooo:rsid="007f55bb" officeooo:paragraph-rsid="01915c4c"/>
    </style:style>
    <style:style style:name="P210" style:family="paragraph" style:parent-style-name="Table_20_Contents">
      <style:paragraph-properties fo:text-align="justify" style:justify-single-word="false"/>
      <style:text-properties officeooo:rsid="01546630" officeooo:paragraph-rsid="01a9cdd2"/>
    </style:style>
    <style:style style:name="P211" style:family="paragraph" style:parent-style-name="Text_20_body">
      <style:paragraph-properties fo:text-align="center" style:justify-single-word="false"/>
      <style:text-properties officeooo:rsid="007ddc84" officeooo:paragraph-rsid="01915c4c"/>
    </style:style>
    <style:style style:name="P212" style:family="paragraph" style:parent-style-name="Text_20_body">
      <style:text-properties officeooo:rsid="007ddc84" officeooo:paragraph-rsid="01915c4c"/>
    </style:style>
    <style:style style:name="P213" style:family="paragraph" style:parent-style-name="Text_20_body">
      <style:text-properties officeooo:rsid="007ddc84" officeooo:paragraph-rsid="019c96f9"/>
    </style:style>
    <style:style style:name="P214" style:family="paragraph" style:parent-style-name="Text_20_body">
      <style:text-properties officeooo:rsid="01836b49" officeooo:paragraph-rsid="01915c4c"/>
    </style:style>
    <style:style style:name="P215" style:family="paragraph" style:parent-style-name="Figure">
      <style:text-properties officeooo:paragraph-rsid="018d9a1e"/>
    </style:style>
    <style:style style:name="P216" style:family="paragraph" style:parent-style-name="Figure">
      <style:text-properties officeooo:paragraph-rsid="01a9cdd2"/>
    </style:style>
    <style:style style:name="P217" style:family="paragraph" style:parent-style-name="Text_20_body">
      <style:text-properties officeooo:paragraph-rsid="01a9cdd2"/>
    </style:style>
    <style:style style:name="P218" style:family="paragraph" style:parent-style-name="Text_20_body">
      <style:text-properties officeooo:rsid="01915c4c" officeooo:paragraph-rsid="01915c4c"/>
    </style:style>
    <style:style style:name="P219" style:family="paragraph" style:parent-style-name="Text_20_body">
      <style:paragraph-properties fo:margin-left="0cm" fo:margin-right="0cm" fo:text-indent="0cm" style:auto-text-indent="false"/>
      <style:text-properties officeooo:rsid="01915c4c" officeooo:paragraph-rsid="01949037"/>
    </style:style>
    <style:style style:name="P220" style:family="paragraph" style:parent-style-name="Text_20_body">
      <style:text-properties officeooo:rsid="018c7b7a" officeooo:paragraph-rsid="018c7b7a"/>
    </style:style>
    <style:style style:name="P221" style:family="paragraph" style:parent-style-name="Text_20_body">
      <style:text-properties officeooo:rsid="018c7b7a" officeooo:paragraph-rsid="01a9cdd2"/>
    </style:style>
    <style:style style:name="P222" style:family="paragraph" style:parent-style-name="Table_20_Contents">
      <style:paragraph-properties fo:text-align="justify" style:justify-single-word="false"/>
      <style:text-properties officeooo:rsid="018c7b7a" officeooo:paragraph-rsid="018c7b7a"/>
    </style:style>
    <style:style style:name="P223" style:family="paragraph" style:parent-style-name="Text_20_body">
      <style:paragraph-properties fo:text-align="justify" style:justify-single-word="false"/>
      <style:text-properties officeooo:rsid="018c7b7a" officeooo:paragraph-rsid="01a3408a"/>
    </style:style>
    <style:style style:name="P224" style:family="paragraph" style:parent-style-name="Text_20_body">
      <style:paragraph-properties fo:text-align="justify" style:justify-single-word="false"/>
      <style:text-properties officeooo:rsid="018c7b7a" officeooo:paragraph-rsid="01a9cdd2"/>
    </style:style>
    <style:style style:name="P225" style:family="paragraph" style:parent-style-name="Text_20_body">
      <style:paragraph-properties fo:text-align="justify" style:justify-single-word="false"/>
      <style:text-properties officeooo:rsid="018c7b7a" officeooo:paragraph-rsid="01aba0a4"/>
    </style:style>
    <style:style style:name="P226" style:family="paragraph" style:parent-style-name="Text_20_body">
      <style:paragraph-properties fo:text-align="justify" style:justify-single-word="false"/>
      <style:text-properties officeooo:rsid="018c7b7a" officeooo:paragraph-rsid="01b79999"/>
    </style:style>
    <style:style style:name="P227" style:family="paragraph" style:parent-style-name="Text_20_body">
      <style:paragraph-properties fo:text-align="center" style:justify-single-word="false"/>
      <style:text-properties officeooo:rsid="018c7b7a" officeooo:paragraph-rsid="018c7b7a"/>
    </style:style>
    <style:style style:name="P228" style:family="paragraph" style:parent-style-name="Text_20_body">
      <style:paragraph-properties fo:text-align="center" style:justify-single-word="false"/>
      <style:text-properties officeooo:rsid="018c7b7a" officeooo:paragraph-rsid="018f92fd"/>
    </style:style>
    <style:style style:name="P229" style:family="paragraph" style:parent-style-name="Text_20_body">
      <style:text-properties officeooo:rsid="018c7b7a" officeooo:paragraph-rsid="018f92fd"/>
    </style:style>
    <style:style style:name="P230"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31"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32"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33" style:family="paragraph" style:parent-style-name="Standard">
      <style:paragraph-properties fo:text-align="justify" style:justify-single-word="false" fo:padding="0.049cm" fo:border="0.06pt solid #000000" style:shadow="#808080 0.18cm 0.18cm"/>
      <style:text-properties officeooo:rsid="005a2d0c" officeooo:paragraph-rsid="01b79999"/>
    </style:style>
    <style:style style:name="P234"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35" style:family="paragraph" style:parent-style-name="Standard">
      <style:text-properties fo:language="ca" fo:country="ES" officeooo:rsid="003dd471" officeooo:paragraph-rsid="018c7b7a"/>
    </style:style>
    <style:style style:name="P236"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37" style:family="paragraph" style:parent-style-name="Standard">
      <style:text-properties style:font-name="Calibri" fo:language="ca" fo:country="ES" officeooo:paragraph-rsid="018c7b7a"/>
    </style:style>
    <style:style style:name="P238" style:family="paragraph" style:parent-style-name="Standard">
      <style:paragraph-properties fo:padding="0.049cm" fo:border="0.06pt solid #000000" style:shadow="#000000 0cm 0cm"/>
      <style:text-properties officeooo:paragraph-rsid="0195481e"/>
    </style:style>
    <style:style style:name="P239" style:family="paragraph" style:parent-style-name="Text_20_body">
      <style:text-properties officeooo:rsid="0195481e" officeooo:paragraph-rsid="0195481e"/>
    </style:style>
    <style:style style:name="P240"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41"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42"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43"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44"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45"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46"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47"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48"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49"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50"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51"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52"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53"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54"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55"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56"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57"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58"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59"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60"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61"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62"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63"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64"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66"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67"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68"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69"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70"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71"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73"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74"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75"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76"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77"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78"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80"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81"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82"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283"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284"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285"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286"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287"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288"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289"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290"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291"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292"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295"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296"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297"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299"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01"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02"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03"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04"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05"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07"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09"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10"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11"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12"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13"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14"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15"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16"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17"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18"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19"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20"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21"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22"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23"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24"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25"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26"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27"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28"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29"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30"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31"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32"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33"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34"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35"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36"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37"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38"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39" style:family="paragraph" style:parent-style-name="Table_20_Contents">
      <style:paragraph-properties fo:text-align="start" style:justify-single-word="false"/>
      <style:text-properties style:font-name="Calibri2" fo:font-size="10pt" fo:language="ca" fo:country="ES" officeooo:rsid="01b5e40b" officeooo:paragraph-rsid="01b5e40b" style:font-size-asian="10pt" style:font-size-complex="10pt"/>
    </style:style>
    <style:style style:name="P340" style:family="paragraph" style:parent-style-name="Table_20_Contents">
      <style:paragraph-properties fo:text-align="center" style:justify-single-word="false"/>
      <style:text-properties style:font-name="Calibri2" fo:font-size="10pt" fo:language="ca" fo:country="ES" officeooo:rsid="01b5e40b" officeooo:paragraph-rsid="01b5e40b" style:font-size-asian="10pt" style:font-size-complex="10pt"/>
    </style:style>
    <style:style style:name="P341" style:family="paragraph" style:parent-style-name="Table_20_Contents">
      <style:paragraph-properties fo:text-align="end" style:justify-single-word="false"/>
      <style:text-properties style:font-name="Calibri2" fo:font-size="10pt" fo:language="ca" fo:country="ES" officeooo:rsid="01b5e40b" officeooo:paragraph-rsid="01b5e40b" style:font-size-asian="10pt" style:font-size-complex="10pt"/>
    </style:style>
    <style:style style:name="P342" style:family="paragraph" style:parent-style-name="Table_20_Contents">
      <style:paragraph-properties fo:text-align="center" style:justify-single-word="false"/>
      <style:text-properties style:font-name="Calibri2" fo:font-size="10pt" fo:language="ca" fo:country="ES" officeooo:rsid="01b71330" officeooo:paragraph-rsid="01b71330" style:font-size-asian="10pt" style:font-size-complex="10pt"/>
    </style:style>
    <style:style style:name="P343"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44"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45"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46"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47"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48"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49"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50"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51"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52"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53"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54"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55"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56"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57"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58" style:family="paragraph" style:parent-style-name="Table_20_Contents">
      <style:paragraph-properties fo:text-align="justify" style:justify-single-word="false"/>
      <style:text-properties officeooo:rsid="01a00707" officeooo:paragraph-rsid="01a00707"/>
    </style:style>
    <style:style style:name="P359" style:family="paragraph" style:parent-style-name="Table_20_Contents">
      <style:paragraph-properties fo:text-align="justify" style:justify-single-word="false"/>
      <style:text-properties officeooo:rsid="01a00707" officeooo:paragraph-rsid="01a9cdd2"/>
    </style:style>
    <style:style style:name="P360"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61"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62"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63"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64"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65" style:family="paragraph" style:parent-style-name="Text_20_body">
      <style:paragraph-properties fo:text-align="justify" style:justify-single-word="false"/>
      <style:text-properties officeooo:rsid="009dea99" officeooo:paragraph-rsid="018c7b7a"/>
    </style:style>
    <style:style style:name="P366" style:family="paragraph" style:parent-style-name="Text_20_body">
      <style:paragraph-properties fo:text-align="justify" style:justify-single-word="false"/>
      <style:text-properties officeooo:rsid="007e0567" officeooo:paragraph-rsid="018c7b7a"/>
    </style:style>
    <style:style style:name="P367" style:family="paragraph" style:parent-style-name="Text_20_body">
      <style:paragraph-properties fo:text-align="justify" style:justify-single-word="false"/>
      <style:text-properties officeooo:rsid="009edb4e" officeooo:paragraph-rsid="018c7b7a"/>
    </style:style>
    <style:style style:name="P368" style:family="paragraph" style:parent-style-name="Text_20_body">
      <style:text-properties officeooo:rsid="00675fb3" officeooo:paragraph-rsid="00a8be7c"/>
    </style:style>
    <style:style style:name="P369" style:family="paragraph" style:parent-style-name="Text_20_body">
      <style:paragraph-properties fo:margin-left="0cm" fo:margin-right="0cm" fo:text-indent="0cm" style:auto-text-indent="false"/>
      <style:text-properties officeooo:rsid="01949037" officeooo:paragraph-rsid="01949037"/>
    </style:style>
    <style:style style:name="P370" style:family="paragraph" style:parent-style-name="Text_20_body">
      <style:text-properties officeooo:rsid="017c0014" officeooo:paragraph-rsid="019b515e"/>
    </style:style>
    <style:style style:name="P371" style:family="paragraph" style:parent-style-name="Fig.">
      <style:paragraph-properties fo:text-align="center" style:justify-single-word="false"/>
      <style:text-properties officeooo:rsid="017e73c9" officeooo:paragraph-rsid="01794cf9"/>
    </style:style>
    <style:style style:name="P37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73"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b79999" style:font-size-asian="10pt"/>
    </style:style>
    <style:style style:name="P374"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75"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76"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77" style:family="paragraph" style:parent-style-name="Standard">
      <style:paragraph-properties fo:margin-top="0cm" fo:margin-bottom="0.212cm" style:contextual-spacing="false" fo:text-align="start" style:justify-single-word="false"/>
      <style:text-properties officeooo:rsid="01b09e8f" officeooo:paragraph-rsid="01b09e8f"/>
    </style:style>
    <style:style style:name="P378" style:family="paragraph" style:parent-style-name="Text_20_body">
      <style:paragraph-properties fo:text-align="justify" style:justify-single-word="false"/>
      <style:text-properties officeooo:rsid="002cbdf3" officeooo:paragraph-rsid="01b79999"/>
    </style:style>
    <style:style style:name="P379" style:family="paragraph" style:parent-style-name="Text_20_body">
      <style:text-properties officeooo:rsid="00d81a0e" officeooo:paragraph-rsid="01bdb140"/>
    </style:style>
    <style:style style:name="P380" style:family="paragraph" style:parent-style-name="Contents_20_1">
      <style:paragraph-properties>
        <style:tab-stops>
          <style:tab-stop style:position="17cm" style:type="right" style:leader-style="dotted" style:leader-text="."/>
        </style:tab-stops>
      </style:paragraph-properties>
    </style:style>
    <style:style style:name="P381" style:family="paragraph" style:parent-style-name="Contents_20_2">
      <style:paragraph-properties>
        <style:tab-stops>
          <style:tab-stop style:position="17cm" style:type="right" style:leader-style="dotted" style:leader-text="."/>
        </style:tab-stops>
      </style:paragraph-properties>
    </style:style>
    <style:style style:name="P382" style:family="paragraph" style:parent-style-name="Contents_20_3">
      <style:paragraph-properties>
        <style:tab-stops>
          <style:tab-stop style:position="17cm" style:type="right" style:leader-style="dotted" style:leader-text="."/>
        </style:tab-stops>
      </style:paragraph-properties>
    </style:style>
    <style:style style:name="P383" style:family="paragraph" style:parent-style-name="Fig." style:list-style-name="L16">
      <style:text-properties officeooo:rsid="00ccb8e2" officeooo:paragraph-rsid="00e8f23e"/>
    </style:style>
    <style:style style:name="P384" style:family="paragraph" style:parent-style-name="Fig." style:list-style-name="L16">
      <style:text-properties fo:font-style="normal" officeooo:rsid="00ccb8e2" officeooo:paragraph-rsid="00e8f23e" style:font-style-asian="normal" style:font-style-complex="normal"/>
    </style:style>
    <style:style style:name="P385" style:family="paragraph" style:parent-style-name="Heading_20_1" style:master-page-name="Cos">
      <style:paragraph-properties fo:margin-left="0cm" fo:margin-right="0cm" fo:text-align="center" style:justify-single-word="false" fo:text-indent="0cm" style:auto-text-indent="false" style:page-number="auto"/>
    </style:style>
    <style:style style:name="P386" style:family="paragraph" style:parent-style-name="Heading_20_1">
      <style:paragraph-properties fo:margin-left="0cm" fo:margin-right="0cm" fo:text-indent="0cm" style:auto-text-indent="false" fo:break-before="page"/>
      <style:text-properties officeooo:rsid="0065d6d8" officeooo:paragraph-rsid="0065d6d8"/>
    </style:style>
    <style:style style:name="P387" style:family="paragraph" style:parent-style-name="Heading_20_1">
      <style:paragraph-properties fo:margin-left="0cm" fo:margin-right="0cm" fo:text-indent="0cm" style:auto-text-indent="false" fo:break-before="page"/>
      <style:text-properties officeooo:rsid="00a8be7c" officeooo:paragraph-rsid="00a9a467"/>
    </style:style>
    <style:style style:name="P388" style:family="paragraph" style:parent-style-name="Heading_20_1">
      <style:paragraph-properties fo:margin-left="0cm" fo:margin-right="0cm" fo:text-indent="0cm" style:auto-text-indent="false" fo:break-before="page"/>
      <style:text-properties officeooo:rsid="018d9a1e" officeooo:paragraph-rsid="018d9a1e"/>
    </style:style>
    <style:style style:name="P389" style:family="paragraph" style:parent-style-name="Heading_20_1">
      <style:paragraph-properties fo:margin-left="0cm" fo:margin-right="0cm" fo:text-indent="0cm" style:auto-text-indent="false" fo:break-before="page"/>
      <style:text-properties officeooo:rsid="018d9a1e" officeooo:paragraph-rsid="01a3c4fd"/>
    </style:style>
    <style:style style:name="P390"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391"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392"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393" style:family="paragraph" style:parent-style-name="Heading_20_2">
      <style:paragraph-properties fo:margin-left="1.9cm" fo:margin-right="0cm" fo:text-indent="-1.3cm" style:auto-text-indent="false"/>
      <style:text-properties officeooo:paragraph-rsid="018c7b7a"/>
    </style:style>
    <style:style style:name="P394" style:family="paragraph" style:parent-style-name="Heading_20_2">
      <style:paragraph-properties fo:margin-left="1.9cm" fo:margin-right="0cm" fo:text-indent="-1.3cm" style:auto-text-indent="false"/>
      <style:text-properties officeooo:paragraph-rsid="01915c4c"/>
    </style:style>
    <style:style style:name="P395" style:family="paragraph" style:parent-style-name="Heading_20_2">
      <style:paragraph-properties fo:margin-left="1.9cm" fo:margin-right="0cm" fo:text-indent="-1.3cm" style:auto-text-indent="false"/>
      <style:text-properties officeooo:rsid="018f92fd" officeooo:paragraph-rsid="018f92fd"/>
    </style:style>
    <style:style style:name="P396" style:family="paragraph" style:parent-style-name="Heading_20_2">
      <style:paragraph-properties fo:margin-left="1.9cm" fo:margin-right="0cm" fo:text-indent="-1.3cm" style:auto-text-indent="false"/>
      <style:text-properties officeooo:rsid="018c7b7a" officeooo:paragraph-rsid="018c7b7a"/>
    </style:style>
    <style:style style:name="P397" style:family="paragraph" style:parent-style-name="Heading_20_2">
      <style:paragraph-properties fo:margin-left="1.9cm" fo:margin-right="0cm" fo:text-indent="-1.3cm" style:auto-text-indent="false"/>
      <style:text-properties officeooo:rsid="018c7b7a" officeooo:paragraph-rsid="019c96f9"/>
    </style:style>
    <style:style style:name="P398" style:family="paragraph" style:parent-style-name="Heading_20_2">
      <style:paragraph-properties fo:margin-left="1.9cm" fo:margin-right="0cm" fo:text-indent="-1.3cm" style:auto-text-indent="false"/>
      <style:text-properties officeooo:rsid="018c7b7a" officeooo:paragraph-rsid="01a3408a"/>
    </style:style>
    <style:style style:name="P399" style:family="paragraph" style:parent-style-name="Heading_20_2">
      <style:paragraph-properties fo:margin-left="1.9cm" fo:margin-right="0cm" fo:text-indent="-1.3cm" style:auto-text-indent="false"/>
      <style:text-properties officeooo:rsid="018c7b7a" officeooo:paragraph-rsid="01a9cdd2"/>
    </style:style>
    <style:style style:name="P400" style:family="paragraph" style:parent-style-name="Heading_20_2">
      <style:paragraph-properties fo:margin-left="1.9cm" fo:margin-right="0cm" fo:text-indent="-1.3cm" style:auto-text-indent="false"/>
      <style:text-properties officeooo:rsid="019c96f9" officeooo:paragraph-rsid="019c96f9"/>
    </style:style>
    <style:style style:name="P401"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02"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03"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04" style:family="paragraph" style:parent-style-name="Heading_20_2">
      <style:paragraph-properties fo:margin-left="1.9cm" fo:margin-right="0cm" fo:text-indent="-1.3cm" style:auto-text-indent="false"/>
      <style:text-properties officeooo:rsid="00d8ffe0" officeooo:paragraph-rsid="00d8ffe0"/>
    </style:style>
    <style:style style:name="P405" style:family="paragraph" style:parent-style-name="Heading_20_2">
      <style:paragraph-properties fo:margin-left="1.9cm" fo:margin-right="0cm" fo:text-indent="-1.3cm" style:auto-text-indent="false"/>
      <style:text-properties officeooo:rsid="00dbb531" officeooo:paragraph-rsid="00dbb531"/>
    </style:style>
    <style:style style:name="P406" style:family="paragraph" style:parent-style-name="Heading_20_3">
      <style:paragraph-properties fo:margin-left="1.9cm" fo:text-indent="-1.3cm" style:auto-text-indent="false"/>
    </style:style>
    <style:style style:name="P407" style:family="paragraph" style:parent-style-name="Heading_20_3">
      <style:paragraph-properties fo:margin-left="1.9cm" fo:margin-right="0cm" fo:text-indent="-1.3cm" style:auto-text-indent="false"/>
      <style:text-properties officeooo:paragraph-rsid="00d673d7"/>
    </style:style>
    <style:style style:name="P408" style:family="paragraph" style:parent-style-name="Heading_20_3">
      <style:paragraph-properties fo:margin-left="1.9cm" fo:margin-right="0cm" fo:text-indent="-1.3cm" style:auto-text-indent="false"/>
      <style:text-properties officeooo:paragraph-rsid="00dda4cb"/>
    </style:style>
    <style:style style:name="P409" style:family="paragraph" style:parent-style-name="Heading_20_3">
      <style:paragraph-properties fo:margin-left="1.9cm" fo:margin-right="0cm" fo:text-indent="-1.3cm" style:auto-text-indent="false"/>
      <style:text-properties officeooo:rsid="018c7b7a" officeooo:paragraph-rsid="018c7b7a"/>
    </style:style>
    <style:style style:name="P410" style:family="paragraph" style:parent-style-name="Heading_20_3">
      <style:paragraph-properties fo:margin-left="1.9cm" fo:text-indent="-1.3cm" style:auto-text-indent="false"/>
      <style:text-properties officeooo:rsid="01a9cdd2" officeooo:paragraph-rsid="01a9cdd2"/>
    </style:style>
    <style:style style:name="P411" style:family="paragraph" style:parent-style-name="Heading_20_3">
      <style:paragraph-properties fo:margin-left="1.9cm" fo:text-indent="-1.3cm" style:auto-text-indent="false"/>
      <style:text-properties fo:font-style="italic" fo:font-weight="bold" officeooo:rsid="01a9cdd2" officeooo:paragraph-rsid="01a9cdd2" style:font-style-asian="italic" style:font-weight-asian="bold" style:font-style-complex="italic" style:font-weight-complex="bold"/>
    </style:style>
    <style:style style:name="P412" style:family="paragraph" style:parent-style-name="Heading_20_3">
      <style:paragraph-properties fo:margin-left="1.9cm" fo:margin-right="0cm" fo:text-indent="-1.3cm" style:auto-text-indent="false"/>
      <style:text-properties officeooo:rsid="00dda4cb" officeooo:paragraph-rsid="00dda4cb"/>
    </style:style>
    <style:style style:name="P413" style:family="paragraph" style:parent-style-name="Standard" style:list-style-name="L14">
      <style:text-properties officeooo:paragraph-rsid="00e8f23e"/>
    </style:style>
    <style:style style:name="P414" style:family="paragraph" style:parent-style-name="Standard" style:list-style-name="L14">
      <style:text-properties fo:font-style="italic" officeooo:rsid="00e8f23e" officeooo:paragraph-rsid="00e8f23e" style:font-style-asian="italic" style:font-style-complex="italic"/>
    </style:style>
    <style:style style:name="P415"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c100af" style:font-size-asian="10pt"/>
    </style:style>
    <style:style style:name="P416"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c100af" style:font-size-asian="10pt"/>
    </style:style>
    <style:style style:name="P417"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c100af"/>
    </style:style>
    <style:style style:name="P418"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c6bac5" style:font-name-complex="Arial Narrow1"/>
    </style:style>
    <style:style style:name="P419" style:family="paragraph" style:parent-style-name="Standard">
      <style:paragraph-properties fo:margin-top="0cm" fo:margin-bottom="0.212cm" style:contextual-spacing="false" fo:text-align="start" style:justify-single-word="false"/>
      <style:text-properties style:font-name="Calibri1" fo:language="ca" fo:country="ES" officeooo:rsid="01c6bac5" officeooo:paragraph-rsid="01c6bac5" style:font-name-complex="Arial Narrow1"/>
    </style:style>
    <style:style style:name="P420" style:family="paragraph" style:parent-style-name="Standard">
      <style:paragraph-properties fo:margin-top="0cm" fo:margin-bottom="0.212cm" style:contextual-spacing="false" fo:text-align="start" style:justify-single-word="false"/>
      <style:text-properties officeooo:rsid="01c6bac5" officeooo:paragraph-rsid="01c6bac5"/>
    </style:style>
    <style:style style:name="P421" style:family="paragraph" style:parent-style-name="Standard">
      <style:paragraph-properties fo:text-align="start" style:justify-single-word="false"/>
      <style:text-properties officeooo:rsid="0195481e" officeooo:paragraph-rsid="0195481e"/>
    </style:style>
    <style:style style:name="P422"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423"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424" style:family="paragraph" style:parent-style-name="Standard">
      <style:text-properties officeooo:paragraph-rsid="01c8f747"/>
    </style:style>
    <style:style style:name="P425" style:family="paragraph" style:parent-style-name="Standard">
      <style:text-properties officeooo:paragraph-rsid="01c9808c"/>
    </style:style>
    <style:style style:name="P426" style:family="paragraph" style:parent-style-name="Standard">
      <style:text-properties officeooo:paragraph-rsid="01ca54b2"/>
    </style:style>
    <style:style style:name="P427"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428" style:family="paragraph" style:parent-style-name="Table_20_Contents" style:list-style-name="L1">
      <style:paragraph-properties fo:text-align="justify" style:justify-single-word="false"/>
      <style:text-properties officeooo:paragraph-rsid="019cebf9"/>
    </style:style>
    <style:style style:name="P429" style:family="paragraph" style:parent-style-name="Table_20_Contents" style:list-style-name="L4">
      <style:paragraph-properties fo:text-align="justify" style:justify-single-word="false"/>
      <style:text-properties officeooo:paragraph-rsid="01a9cdd2"/>
    </style:style>
    <style:style style:name="P430" style:family="paragraph" style:parent-style-name="Table_20_Contents" style:list-style-name="L7">
      <style:paragraph-properties fo:text-align="justify" style:justify-single-word="false"/>
      <style:text-properties officeooo:paragraph-rsid="01a9cdd2"/>
    </style:style>
    <style:style style:name="P431" style:family="paragraph" style:parent-style-name="Table_20_Contents">
      <style:paragraph-properties fo:text-align="justify" style:justify-single-word="false"/>
      <style:text-properties officeooo:paragraph-rsid="01b79999"/>
    </style:style>
    <style:style style:name="P432" style:family="paragraph" style:parent-style-name="Table_20_Contents" style:list-style-name="L2">
      <style:paragraph-properties fo:text-align="justify" style:justify-single-word="false"/>
      <style:text-properties officeooo:rsid="015fa555" officeooo:paragraph-rsid="019cebf9"/>
    </style:style>
    <style:style style:name="P433" style:family="paragraph" style:parent-style-name="Table_20_Contents" style:list-style-name="L3">
      <style:paragraph-properties fo:text-align="justify" style:justify-single-word="false"/>
      <style:text-properties officeooo:rsid="015fa555" officeooo:paragraph-rsid="019cebf9"/>
    </style:style>
    <style:style style:name="P434" style:family="paragraph" style:parent-style-name="Table_20_Contents" style:list-style-name="L2">
      <style:paragraph-properties fo:text-align="justify" style:justify-single-word="false"/>
      <style:text-properties officeooo:rsid="014f9ade" officeooo:paragraph-rsid="019cebf9"/>
    </style:style>
    <style:style style:name="P435" style:family="paragraph" style:parent-style-name="Table_20_Contents" style:list-style-name="L5">
      <style:paragraph-properties fo:text-align="justify" style:justify-single-word="false"/>
      <style:text-properties officeooo:rsid="014f9ade" officeooo:paragraph-rsid="01a9cdd2"/>
    </style:style>
    <style:style style:name="P436" style:family="paragraph" style:parent-style-name="Table_20_Contents" style:list-style-name="L6">
      <style:paragraph-properties fo:text-align="justify" style:justify-single-word="false"/>
      <style:text-properties officeooo:rsid="014f9ade" officeooo:paragraph-rsid="01a9cdd2"/>
    </style:style>
    <style:style style:name="P437" style:family="paragraph" style:parent-style-name="Table_20_Contents" style:list-style-name="L2">
      <style:paragraph-properties fo:text-align="justify" style:justify-single-word="false"/>
      <style:text-properties officeooo:rsid="0151259d" officeooo:paragraph-rsid="019cebf9"/>
    </style:style>
    <style:style style:name="P438" style:family="paragraph" style:parent-style-name="Table_20_Contents" style:list-style-name="L3">
      <style:paragraph-properties fo:text-align="justify" style:justify-single-word="false"/>
      <style:text-properties officeooo:rsid="0151259d" officeooo:paragraph-rsid="019cebf9"/>
    </style:style>
    <style:style style:name="P439" style:family="paragraph" style:parent-style-name="Table_20_Contents" style:list-style-name="L5">
      <style:paragraph-properties fo:text-align="justify" style:justify-single-word="false"/>
      <style:text-properties officeooo:rsid="0151259d" officeooo:paragraph-rsid="01a9cdd2"/>
    </style:style>
    <style:style style:name="P440" style:family="paragraph" style:parent-style-name="Table_20_Contents" style:list-style-name="L6">
      <style:paragraph-properties fo:text-align="justify" style:justify-single-word="false"/>
      <style:text-properties officeooo:rsid="0151259d" officeooo:paragraph-rsid="01a9cdd2"/>
    </style:style>
    <style:style style:name="P441" style:family="paragraph" style:parent-style-name="Table_20_Contents" style:list-style-name="L8">
      <style:paragraph-properties fo:text-align="justify" style:justify-single-word="false"/>
      <style:text-properties officeooo:rsid="0151259d" officeooo:paragraph-rsid="01a9cdd2"/>
    </style:style>
    <style:style style:name="P442" style:family="paragraph" style:parent-style-name="Table_20_Contents" style:list-style-name="L1">
      <style:paragraph-properties fo:text-align="justify" style:justify-single-word="false"/>
      <style:text-properties fo:font-weight="bold" officeooo:rsid="01622317" officeooo:paragraph-rsid="019cebf9" style:font-weight-asian="bold" style:font-weight-complex="bold"/>
    </style:style>
    <style:style style:name="P443" style:family="paragraph" style:parent-style-name="Table_20_Contents" style:list-style-name="L4">
      <style:paragraph-properties fo:text-align="justify" style:justify-single-word="false"/>
      <style:text-properties fo:font-weight="bold" officeooo:paragraph-rsid="01a9cdd2" style:font-weight-asian="bold" style:font-weight-complex="bold"/>
    </style:style>
    <style:style style:name="P444" style:family="paragraph" style:parent-style-name="Table_20_Contents" style:list-style-name="L1">
      <style:paragraph-properties fo:text-align="justify" style:justify-single-word="false"/>
      <style:text-properties fo:font-weight="normal" officeooo:rsid="0163fbf5" officeooo:paragraph-rsid="019cebf9" style:font-weight-asian="normal" style:font-weight-complex="normal"/>
    </style:style>
    <style:style style:name="P445" style:family="paragraph" style:parent-style-name="Table_20_Contents" style:list-style-name="L7">
      <style:paragraph-properties fo:text-align="justify" style:justify-single-word="false"/>
      <style:text-properties officeooo:rsid="0156bbc2" officeooo:paragraph-rsid="01a9cdd2"/>
    </style:style>
    <style:style style:name="P446" style:family="paragraph" style:parent-style-name="Table_20_Contents" style:list-style-name="L8">
      <style:paragraph-properties fo:text-align="justify" style:justify-single-word="false"/>
      <style:text-properties officeooo:rsid="015ba97b" officeooo:paragraph-rsid="01a9cdd2"/>
    </style:style>
    <style:style style:name="P447" style:family="paragraph" style:parent-style-name="Text_20_body" style:list-style-name="L9">
      <style:text-properties officeooo:rsid="01915c4c" officeooo:paragraph-rsid="01915c4c"/>
    </style:style>
    <style:style style:name="P448" style:family="paragraph" style:parent-style-name="Text_20_body" style:list-style-name="L11">
      <style:text-properties officeooo:rsid="007ddc84" officeooo:paragraph-rsid="01915c4c"/>
    </style:style>
    <style:style style:name="P449" style:family="paragraph" style:parent-style-name="Text_20_body" style:list-style-name="L11">
      <style:text-properties officeooo:rsid="007f55bb" officeooo:paragraph-rsid="01915c4c"/>
    </style:style>
    <style:style style:name="P450" style:family="paragraph" style:parent-style-name="Text_20_body" style:list-style-name="L12">
      <style:text-properties officeooo:rsid="007f55bb" officeooo:paragraph-rsid="01915c4c"/>
    </style:style>
    <style:style style:name="P451" style:family="paragraph" style:parent-style-name="Text_20_body" style:list-style-name="L11">
      <style:text-properties officeooo:rsid="0084ae02" officeooo:paragraph-rsid="01915c4c"/>
    </style:style>
    <style:style style:name="P452" style:family="paragraph" style:parent-style-name="Text_20_body" style:list-style-name="L12">
      <style:text-properties officeooo:rsid="01836b49" officeooo:paragraph-rsid="01915c4c"/>
    </style:style>
    <style:style style:name="P453" style:family="paragraph" style:parent-style-name="Text_20_body" style:list-style-name="L13">
      <style:text-properties officeooo:rsid="0149cec3" officeooo:paragraph-rsid="01a9cdd2"/>
    </style:style>
    <style:style style:name="P454" style:family="paragraph" style:parent-style-name="Text_20_body" style:list-style-name="L13">
      <style:text-properties officeooo:rsid="014adc01" officeooo:paragraph-rsid="01a9cdd2"/>
    </style:style>
    <style:style style:name="P455" style:family="paragraph" style:parent-style-name="Text_20_body" style:list-style-name="L15">
      <style:text-properties officeooo:paragraph-rsid="00d8ffe0"/>
    </style:style>
    <style:style style:name="P456" style:family="paragraph" style:parent-style-name="Text_20_body" style:list-style-name="L15">
      <style:text-properties officeooo:paragraph-rsid="01875821"/>
    </style:style>
    <style:style style:name="P457" style:family="paragraph" style:parent-style-name="Text_20_body" style:list-style-name="L15">
      <style:text-properties officeooo:rsid="00d8ffe0" officeooo:paragraph-rsid="00d8ffe0"/>
    </style:style>
    <style:style style:name="P458" style:family="paragraph" style:parent-style-name="Text_20_body" style:list-style-name="L15">
      <style:text-properties officeooo:rsid="01bf53e5" officeooo:paragraph-rsid="01bf53e5"/>
    </style:style>
    <style:style style:name="P459" style:family="paragraph" style:parent-style-name="Text_20_body" style:list-style-name="L17">
      <style:text-properties fo:font-style="normal" officeooo:rsid="00de9e71" officeooo:paragraph-rsid="00d673d7" style:font-style-asian="normal" style:font-style-complex="normal"/>
    </style:style>
    <style:style style:name="P460"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461" style:family="paragraph" style:parent-style-name="Text_20_body" style:list-style-name="L17">
      <style:text-properties officeooo:rsid="00de9e71" officeooo:paragraph-rsid="00d673d7"/>
    </style:style>
    <style:style style:name="P462" style:family="paragraph" style:parent-style-name="Text_20_body" style:list-style-name="L17">
      <style:text-properties officeooo:rsid="00de9e71" officeooo:paragraph-rsid="01c60b1f"/>
    </style:style>
    <style:style style:name="P463" style:family="paragraph" style:parent-style-name="Text_20_body" style:list-style-name="L18">
      <style:text-properties officeooo:paragraph-rsid="00e16f63"/>
    </style:style>
    <style:style style:name="P464" style:family="paragraph" style:parent-style-name="Text_20_body">
      <style:paragraph-properties fo:text-align="justify" style:justify-single-word="false"/>
      <style:text-properties officeooo:paragraph-rsid="01c100af"/>
    </style:style>
    <style:style style:name="P465" style:family="paragraph" style:parent-style-name="Text_20_body">
      <style:paragraph-properties fo:text-align="justify" style:justify-single-word="false"/>
      <style:text-properties officeooo:rsid="018c7b7a" officeooo:paragraph-rsid="01c100af"/>
    </style:style>
    <style:style style:name="P466" style:family="paragraph" style:parent-style-name="Text_20_body">
      <style:text-properties officeooo:paragraph-rsid="00d673d7"/>
    </style:style>
    <style:style style:name="P467" style:family="paragraph">
      <style:paragraph-properties fo:text-align="center" style:writing-mode="lr-tb"/>
      <style:text-properties fo:color="#ffffff" loext:opacity="100%"/>
    </style:style>
    <style:style style:name="P468" style:family="paragraph">
      <loext:graphic-properties draw:fill="solid" draw:fill-color="#ed1c24"/>
      <style:paragraph-properties fo:text-align="center" style:writing-mode="lr-tb"/>
      <style:text-properties fo:color="#ffffff" loext:opacity="100%"/>
    </style:style>
    <style:style style:name="P469" style:family="paragraph">
      <loext:graphic-properties draw:fill="none" draw:fill-color="#ffffff"/>
    </style:style>
    <style:style style:name="P470"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Consolas1" fo:font-size="10pt" officeooo:rsid="01bdb140" style:font-size-asian="10pt"/>
    </style:style>
    <style:style style:name="T20" style:family="text">
      <style:text-properties fo:color="#008080" loext:opacity="100%" style:font-name="Monospace" fo:font-size="10pt" style:font-size-asian="10pt" style:font-size-complex="10pt"/>
    </style:style>
    <style:style style:name="T21" style:family="text">
      <style:text-properties fo:color="#3f7f7f" loext:opacity="100%"/>
    </style:style>
    <style:style style:name="T22" style:family="text">
      <style:text-properties fo:color="#3f7f7f" loext:opacity="100%" style:font-name="Monospace1" fo:font-size="10pt" style:font-size-asian="10pt"/>
    </style:style>
    <style:style style:name="T23" style:family="text">
      <style:text-properties fo:color="#3f7f7f" loext:opacity="100%" style:font-name="Consolas1"/>
    </style:style>
    <style:style style:name="T24" style:family="text">
      <style:text-properties fo:color="#3f7f7f" loext:opacity="100%" style:font-name="Consolas1" fo:font-size="10pt" style:font-size-asian="10pt"/>
    </style:style>
    <style:style style:name="T25" style:family="text">
      <style:text-properties fo:color="#3f7f7f" loext:opacity="100%" style:font-name="Monospace" fo:font-size="10pt" style:font-size-asian="10pt" style:font-size-complex="10pt"/>
    </style:style>
    <style:style style:name="T26" style:family="text">
      <style:text-properties fo:color="#7f007f" loext:opacity="100%"/>
    </style:style>
    <style:style style:name="T27" style:family="text">
      <style:text-properties fo:color="#7f007f" loext:opacity="100%" style:font-name="Consolas1"/>
    </style:style>
    <style:style style:name="T28" style:family="text">
      <style:text-properties fo:color="#7f007f" loext:opacity="100%" style:font-name="Consolas1" fo:font-size="10pt" style:font-size-asian="10pt"/>
    </style:style>
    <style:style style:name="T29" style:family="text">
      <style:text-properties fo:color="#3c3c3c" loext:opacity="100%" style:font-name="Monospace1" fo:font-size="10pt" style:font-size-asian="10pt"/>
    </style:style>
    <style:style style:name="T30" style:family="text">
      <style:text-properties fo:color="#3c3c3c" loext:opacity="100%" style:font-name="Monospace1" fo:font-size="10pt" officeooo:rsid="018c7b7a" style:font-size-asian="10pt"/>
    </style:style>
    <style:style style:name="T31" style:family="text">
      <style:text-properties fo:color="#3c3c3c" loext:opacity="100%" style:font-name="Monospace1" fo:font-size="10pt" officeooo:rsid="01a3408a" style:font-size-asian="10pt"/>
    </style:style>
    <style:style style:name="T32" style:family="text">
      <style:text-properties fo:color="#3c3c3c" loext:opacity="100%" style:font-name="Monospace1" fo:font-size="10pt" officeooo:rsid="01bbecb4" style:font-size-asian="10pt"/>
    </style:style>
    <style:style style:name="T33" style:family="text">
      <style:text-properties fo:color="#3c3c3c" loext:opacity="100%" style:font-name="Monospace1" fo:font-size="10pt" officeooo:rsid="01b902f5" style:font-size-asian="10pt"/>
    </style:style>
    <style:style style:name="T34" style:family="text">
      <style:text-properties fo:color="#2a00ff" loext:opacity="100%" style:font-name="Monospace1" fo:font-size="10pt" style:font-size-asian="10pt"/>
    </style:style>
    <style:style style:name="T35" style:family="text">
      <style:text-properties fo:color="#2a00ff" loext:opacity="100%" style:font-name="Monospace1" fo:font-size="10pt" officeooo:rsid="01aba0a4" style:font-size-asian="10pt"/>
    </style:style>
    <style:style style:name="T36" style:family="text">
      <style:text-properties fo:color="#2a00ff" loext:opacity="100%" style:font-name="Consolas1"/>
    </style:style>
    <style:style style:name="T37" style:family="text">
      <style:text-properties fo:color="#2a00ff" loext:opacity="100%" style:font-name="Consolas1" fo:font-size="10pt" fo:font-style="italic" style:font-size-asian="10pt" style:font-style-asian="italic"/>
    </style:style>
    <style:style style:name="T38" style:family="text">
      <style:text-properties fo:color="#2a00ff" loext:opacity="100%" style:font-name="Consolas1" officeooo:rsid="00ee64c9"/>
    </style:style>
    <style:style style:name="T39" style:family="text">
      <style:text-properties fo:color="#2a00ff" loext:opacity="100%" style:font-name="Consolas1" fo:font-style="italic" style:font-style-asian="italic"/>
    </style:style>
    <style:style style:name="T40" style:family="text">
      <style:text-properties fo:color="#2a00ff" loext:opacity="100%" style:font-name="Consolas1" fo:font-size="8pt" style:text-underline-style="none" style:font-size-asian="8pt" style:font-size-complex="8pt"/>
    </style:style>
    <style:style style:name="T41" style:family="text">
      <style:text-properties fo:color="#2a00ff" loext:opacity="100%" fo:font-style="italic" style:font-style-asian="italic"/>
    </style:style>
    <style:style style:name="T42" style:family="text">
      <style:text-properties fo:font-weight="bold" style:font-weight-asian="bold" style:font-weight-complex="bold"/>
    </style:style>
    <style:style style:name="T43" style:family="text">
      <style:text-properties fo:font-weight="bold" officeooo:rsid="009bb1cd" style:font-weight-asian="bold" style:font-weight-complex="bold"/>
    </style:style>
    <style:style style:name="T44" style:family="text">
      <style:text-properties fo:font-weight="bold" officeooo:rsid="00ea866e" style:font-weight-asian="bold" style:font-weight-complex="bold"/>
    </style:style>
    <style:style style:name="T45" style:family="text">
      <style:text-properties fo:font-weight="bold" officeooo:rsid="014f9ade" style:font-weight-asian="bold" style:font-weight-complex="bold"/>
    </style:style>
    <style:style style:name="T46" style:family="text">
      <style:text-properties fo:font-weight="bold" officeooo:rsid="015c4085" style:font-weight-asian="bold" style:font-weight-complex="bold"/>
    </style:style>
    <style:style style:name="T47" style:family="text">
      <style:text-properties fo:font-weight="bold" officeooo:rsid="01546630" style:font-weight-asian="bold" style:font-weight-complex="bold"/>
    </style:style>
    <style:style style:name="T48" style:family="text">
      <style:text-properties fo:color="#7f0055" loext:opacity="100%" style:font-name="Monospace1" fo:font-size="10pt" fo:font-weight="bold" style:font-size-asian="10pt" style:font-weight-asian="bold"/>
    </style:style>
    <style:style style:name="T49" style:family="text">
      <style:text-properties fo:color="#7f0055" loext:opacity="100%" style:font-name="Consolas1"/>
    </style:style>
    <style:style style:name="T50" style:family="text">
      <style:text-properties fo:color="#7f0055" loext:opacity="100%" style:font-name="Consolas1" fo:font-size="10pt" fo:font-weight="bold" style:font-size-asian="10pt" style:font-weight-asian="bold"/>
    </style:style>
    <style:style style:name="T51" style:family="text">
      <style:text-properties fo:color="#7f0055" loext:opacity="100%" style:font-name="Consolas1" fo:font-weight="bold" style:font-weight-asian="bold"/>
    </style:style>
    <style:style style:name="T52" style:family="text">
      <style:text-properties fo:color="#7f0055" loext:opacity="100%" style:font-name="Consolas1" fo:font-size="8pt" style:text-underline-style="none" fo:font-weight="bold" style:font-size-asian="8pt" style:font-weight-asian="bold" style:font-size-complex="8pt"/>
    </style:style>
    <style:style style:name="T53" style:family="text">
      <style:text-properties fo:color="#000000" loext:opacity="100%"/>
    </style:style>
    <style:style style:name="T54" style:family="text">
      <style:text-properties fo:color="#000000" loext:opacity="100%" style:font-name="Monospace1" fo:font-size="10pt" style:font-size-asian="10pt"/>
    </style:style>
    <style:style style:name="T55" style:family="text">
      <style:text-properties fo:color="#000000" loext:opacity="100%" style:font-name="Monospace1" fo:font-size="10pt" officeooo:rsid="018c7b7a" style:font-size-asian="10pt"/>
    </style:style>
    <style:style style:name="T56" style:family="text">
      <style:text-properties fo:color="#000000" loext:opacity="100%" style:font-name="Monospace1" fo:font-size="10pt" officeooo:rsid="01aba0a4" style:font-size-asian="10pt"/>
    </style:style>
    <style:style style:name="T57" style:family="text">
      <style:text-properties fo:color="#000000" loext:opacity="100%" style:font-name="Monospace1" fo:font-size="10pt" officeooo:rsid="01c100af" style:font-size-asian="10pt"/>
    </style:style>
    <style:style style:name="T58" style:family="text">
      <style:text-properties fo:color="#000000" loext:opacity="100%" style:font-name="Monospace1" fo:font-size="10pt" fo:font-style="italic" style:font-size-asian="10pt" style:font-style-asian="italic"/>
    </style:style>
    <style:style style:name="T59" style:family="text">
      <style:text-properties fo:color="#000000" loext:opacity="100%" style:font-name="Consolas1"/>
    </style:style>
    <style:style style:name="T60" style:family="text">
      <style:text-properties fo:color="#000000" loext:opacity="100%" style:font-name="Consolas1" fo:font-size="10pt" style:font-size-asian="10pt"/>
    </style:style>
    <style:style style:name="T61" style:family="text">
      <style:text-properties fo:color="#000000" loext:opacity="100%" style:font-name="Consolas1" fo:font-size="10pt" officeooo:rsid="01bdb140" style:font-size-asian="10pt"/>
    </style:style>
    <style:style style:name="T62" style:family="text">
      <style:text-properties fo:color="#000000" loext:opacity="100%" style:font-name="Consolas1" fo:font-size="10pt" fo:background-color="#d4d4d4" loext:char-shading-value="0" style:font-size-asian="10pt"/>
    </style:style>
    <style:style style:name="T63"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4" style:family="text">
      <style:text-properties fo:color="#000000" loext:opacity="100%" style:font-name="Consolas1" fo:font-size="10pt" style:rfc-language-tag="es-ES-u-co-trad" fo:language="es" fo:country="ES" officeooo:rsid="01bdb140" fo:background-color="transparent" loext:char-shading-value="0" style:font-size-asian="10pt"/>
    </style:style>
    <style:style style:name="T65" style:family="text">
      <style:text-properties fo:color="#000000" loext:opacity="100%" style:font-name="Consolas1" fo:background-color="#d4d4d4" loext:char-shading-value="0"/>
    </style:style>
    <style:style style:name="T66" style:family="text">
      <style:text-properties fo:color="#000000" loext:opacity="100%" style:font-name="Consolas1" fo:font-weight="bold" style:font-weight-asian="bold" style:font-weight-complex="bold"/>
    </style:style>
    <style:style style:name="T67" style:family="text">
      <style:text-properties fo:color="#000000" loext:opacity="100%" style:font-name="Consolas1" fo:font-style="italic" style:font-style-asian="italic"/>
    </style:style>
    <style:style style:name="T68" style:family="text">
      <style:text-properties fo:color="#000000" loext:opacity="100%" style:font-name="Consolas1" fo:font-size="8pt" style:text-underline-style="none" style:font-size-asian="8pt" style:font-size-complex="8pt"/>
    </style:style>
    <style:style style:name="T69" style:family="text">
      <style:text-properties fo:color="#000000" loext:opacity="100%" style:font-name="Consolas1" fo:font-size="8pt" style:text-underline-style="none" fo:background-color="transparent" loext:char-shading-value="0" style:font-size-asian="8pt" style:font-size-complex="8pt"/>
    </style:style>
    <style:style style:name="T70" style:family="text">
      <style:text-properties fo:color="#000000" loext:opacity="100%" style:font-name="Consolas1" fo:font-size="8pt" fo:background-color="transparent" loext:char-shading-value="0" style:font-size-asian="8pt" style:font-size-complex="8pt"/>
    </style:style>
    <style:style style:name="T71" style:family="text">
      <style:text-properties fo:color="#000000" loext:opacity="100%" style:font-name="Consolas1" fo:font-size="8pt" style:font-size-asian="8pt" style:font-size-complex="8pt"/>
    </style:style>
    <style:style style:name="T72" style:family="text">
      <style:text-properties fo:color="#000000" loext:opacity="100%" style:font-name="Consolas1" fo:font-size="8pt" fo:font-style="italic" style:text-underline-style="none" style:font-size-asian="8pt" style:font-style-asian="italic" style:font-size-complex="8pt"/>
    </style:style>
    <style:style style:name="T73" style:family="text">
      <style:text-properties fo:color="#000000" loext:opacity="100%" style:font-name="Consolas1" officeooo:rsid="00ee64c9"/>
    </style:style>
    <style:style style:name="T74" style:family="text">
      <style:text-properties fo:color="#000000" loext:opacity="100%" style:font-name="Consolas1" fo:font-size="9pt" style:font-size-asian="9pt"/>
    </style:style>
    <style:style style:name="T75" style:family="text">
      <style:text-properties fo:color="#000000" loext:opacity="100%" style:font-name="Monospace" fo:font-size="10pt" style:font-size-asian="10pt" style:font-size-complex="10pt"/>
    </style:style>
    <style:style style:name="T76" style:family="text">
      <style:text-properties fo:color="#000000" loext:opacity="100%" style:font-name="Monospace" fo:font-size="10pt" fo:font-style="normal" fo:font-weight="normal" style:font-size-asian="10pt" style:font-style-asian="normal" style:font-weight-asian="normal" style:font-style-complex="normal"/>
    </style:style>
    <style:style style:name="T77" style:family="text">
      <style:text-properties fo:color="#000000" loext:opacity="100%" style:font-name="JetBrains Mono1" fo:font-size="10pt" fo:font-style="normal" fo:font-weight="normal" fo:background-color="transparent" loext:char-shading-value="0" style:font-size-asian="10pt" style:font-style-asian="normal" style:font-weight-asian="normal"/>
    </style:style>
    <style:style style:name="T78" style:family="text">
      <style:text-properties fo:color="#000000" loext:opacity="100%" style:font-name="JetBrains Mono1" fo:font-size="10pt" fo:font-style="normal" fo:font-weight="normal" officeooo:rsid="01c9808c" fo:background-color="transparent" loext:char-shading-value="0" style:font-size-asian="10pt" style:font-style-asian="normal" style:font-weight-asian="normal"/>
    </style:style>
    <style:style style:name="T79" style:family="text">
      <style:text-properties fo:color="#000000" loext:opacity="100%" style:font-name="JetBrains Mono1" fo:font-size="10pt" fo:font-style="normal" fo:font-weight="normal" style:font-size-asian="10pt" style:font-style-asian="normal" style:font-weight-asian="normal"/>
    </style:style>
    <style:style style:name="T80" style:family="text">
      <style:text-properties fo:color="#000000" loext:opacity="100%" style:font-name="JetBrains Mono1" fo:font-size="10pt" fo:font-style="normal" fo:font-weight="normal" style:font-size-asian="10pt" style:font-style-asian="normal" style:font-weight-asian="normal"/>
    </style:style>
    <style:style style:name="T81" style:family="text">
      <style:text-properties fo:color="#000000" loext:opacity="100%" style:font-name="JetBrains Mono1" fo:font-size="10pt" fo:font-style="normal" fo:font-weight="normal" style:font-size-asian="10pt" style:font-style-asian="normal" style:font-weight-asian="normal"/>
    </style:style>
    <style:style style:name="T82" style:family="text">
      <style:text-properties fo:color="#000000" loext:opacity="100%" style:font-name="JetBrains Mono1" fo:font-size="10pt" fo:font-style="normal" fo:font-weight="normal" style:font-size-asian="10pt" style:font-style-asian="normal" style:font-weight-asian="normal"/>
    </style:style>
    <style:style style:name="T83" style:family="text">
      <style:text-properties fo:color="#000000" loext:opacity="100%" style:font-name="JetBrains Mono1" fo:font-size="10pt" fo:font-style="italic" fo:font-weight="normal" style:font-size-asian="10pt" style:font-style-asian="italic" style:font-weight-asian="normal"/>
    </style:style>
    <style:style style:name="T84" style:family="text">
      <style:text-properties fo:color="#000000" loext:opacity="100%" style:font-name="JetBrains Mono" fo:font-size="10pt" fo:font-style="normal" fo:font-weight="normal" style:font-size-asian="10pt" style:font-style-asian="normal" style:font-weight-asian="normal"/>
    </style:style>
    <style:style style:name="T85" style:family="text">
      <style:text-properties fo:color="#0000c0" loext:opacity="100%" style:font-name="Monospace1" fo:font-size="10pt" fo:font-style="italic" fo:font-weight="bold" style:font-size-asian="10pt" style:font-style-asian="italic" style:font-weight-asian="bold"/>
    </style:style>
    <style:style style:name="T86" style:family="text">
      <style:text-properties fo:color="#0000c0" loext:opacity="100%" style:font-name="Monospace1" fo:font-size="10pt" fo:font-style="italic" fo:font-weight="bold" officeooo:rsid="01c100af" style:font-size-asian="10pt" style:font-style-asian="italic" style:font-weight-asian="bold"/>
    </style:style>
    <style:style style:name="T87" style:family="text">
      <style:text-properties fo:color="#0000c0" loext:opacity="100%" style:font-name="Consolas1" fo:font-style="italic" fo:font-weight="bold" style:font-style-asian="italic" style:font-weight-asian="bold"/>
    </style:style>
    <style:style style:name="T88"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89" style:family="text">
      <style:text-properties fo:color="#6a3e3e" loext:opacity="100%" style:font-name="Monospace1" fo:font-size="10pt" style:font-size-asian="10pt"/>
    </style:style>
    <style:style style:name="T90" style:family="text">
      <style:text-properties fo:color="#6a3e3e" loext:opacity="100%" style:font-name="Monospace1" fo:font-size="10pt" officeooo:rsid="01aba0a4" style:font-size-asian="10pt"/>
    </style:style>
    <style:style style:name="T91" style:family="text">
      <style:text-properties fo:color="#6a3e3e" loext:opacity="100%" style:font-name="Monospace1" fo:font-size="10pt" officeooo:rsid="01c100af" style:font-size-asian="10pt"/>
    </style:style>
    <style:style style:name="T92" style:family="text">
      <style:text-properties fo:color="#6a3e3e" loext:opacity="100%" style:font-name="Consolas1"/>
    </style:style>
    <style:style style:name="T93" style:family="text">
      <style:text-properties fo:color="#6a3e3e" loext:opacity="100%" style:font-name="Consolas1" fo:font-size="10pt" style:font-size-asian="10pt"/>
    </style:style>
    <style:style style:name="T94" style:family="text">
      <style:text-properties fo:color="#6a3e3e" loext:opacity="100%" style:font-name="Consolas1" fo:background-color="#d4d4d4" loext:char-shading-value="0"/>
    </style:style>
    <style:style style:name="T95" style:family="text">
      <style:text-properties fo:color="#6a3e3e" loext:opacity="100%" style:font-name="Consolas1" fo:font-size="8pt" style:text-underline-style="none" style:font-size-asian="8pt" style:font-size-complex="8pt"/>
    </style:style>
    <style:style style:name="T96"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97" style:family="text">
      <style:text-properties fo:color="#6a3e3e" loext:opacity="100%" style:font-name="Consolas1" fo:font-size="8pt" fo:background-color="transparent" loext:char-shading-value="0" style:font-size-asian="8pt" style:font-size-complex="8pt"/>
    </style:style>
    <style:style style:name="T98" style:family="text">
      <style:text-properties fo:color="#6a3e3e" loext:opacity="100%" style:font-name="Consolas1" fo:font-size="8pt" style:font-size-asian="8pt" style:font-size-complex="8pt"/>
    </style:style>
    <style:style style:name="T99" style:family="text">
      <style:text-properties fo:color="#6a3e3e" loext:opacity="100%" style:font-name="Consolas1" officeooo:rsid="00dbb531"/>
    </style:style>
    <style:style style:name="T100" style:family="text">
      <style:text-properties fo:color="#6a3e3e" loext:opacity="100%" style:font-name="Consolas1" officeooo:rsid="00f0f9b1" fo:background-color="transparent" loext:char-shading-value="0"/>
    </style:style>
    <style:style style:name="T101" style:family="text">
      <style:text-properties officeooo:rsid="0086959c"/>
    </style:style>
    <style:style style:name="T102" style:family="text">
      <style:text-properties officeooo:rsid="008b673d"/>
    </style:style>
    <style:style style:name="T103" style:family="text">
      <style:text-properties officeooo:rsid="0090deb7"/>
    </style:style>
    <style:style style:name="T104" style:family="text">
      <style:text-properties officeooo:rsid="0090e737"/>
    </style:style>
    <style:style style:name="T105" style:family="text">
      <style:text-properties officeooo:rsid="00523cb7"/>
    </style:style>
    <style:style style:name="T106" style:family="text">
      <style:text-properties officeooo:rsid="005032ec"/>
    </style:style>
    <style:style style:name="T107" style:family="text">
      <style:text-properties officeooo:rsid="005362e2"/>
    </style:style>
    <style:style style:name="T108" style:family="text">
      <style:text-properties officeooo:rsid="005608e4"/>
    </style:style>
    <style:style style:name="T109" style:family="text">
      <style:text-properties officeooo:rsid="0051440a"/>
    </style:style>
    <style:style style:name="T110" style:family="text">
      <style:text-properties officeooo:rsid="005bb6f5"/>
    </style:style>
    <style:style style:name="T111" style:family="text">
      <style:text-properties officeooo:rsid="00600629"/>
    </style:style>
    <style:style style:name="T112" style:family="text">
      <style:text-properties officeooo:rsid="0062c50e"/>
    </style:style>
    <style:style style:name="T113" style:family="text">
      <style:text-properties officeooo:rsid="009569da"/>
    </style:style>
    <style:style style:name="T114" style:family="text">
      <style:text-properties officeooo:rsid="009bb1cd"/>
    </style:style>
    <style:style style:name="T115" style:family="text">
      <style:text-properties fo:color="#646464" loext:opacity="100%" style:font-name="Consolas1"/>
    </style:style>
    <style:style style:name="T116" style:family="text">
      <style:text-properties officeooo:rsid="00a8be7c"/>
    </style:style>
    <style:style style:name="T117" style:family="text">
      <style:text-properties officeooo:rsid="00a9a467"/>
    </style:style>
    <style:style style:name="T118" style:family="text">
      <style:text-properties officeooo:rsid="003e02b8"/>
    </style:style>
    <style:style style:name="T119" style:family="text">
      <style:text-properties officeooo:rsid="0084ae02"/>
    </style:style>
    <style:style style:name="T120" style:family="text">
      <style:text-properties officeooo:rsid="007ddc84"/>
    </style:style>
    <style:style style:name="T121" style:family="text">
      <style:text-properties officeooo:rsid="00b5a0a7"/>
    </style:style>
    <style:style style:name="T122" style:family="text">
      <style:text-properties officeooo:rsid="00a824e0"/>
    </style:style>
    <style:style style:name="T123" style:family="text">
      <style:text-properties style:font-name="Consolas1"/>
    </style:style>
    <style:style style:name="T124" style:family="text">
      <style:text-properties style:font-name="Consolas1" fo:font-size="9pt" style:font-size-asian="9pt"/>
    </style:style>
    <style:style style:name="T125" style:family="text">
      <style:text-properties officeooo:rsid="00cc0058"/>
    </style:style>
    <style:style style:name="T126" style:family="text">
      <style:text-properties fo:color="#007dc3" loext:opacity="100%" style:font-name="Calibri2" fo:font-size="18pt" officeooo:rsid="00285050" fo:background-color="transparent" loext:char-shading-value="0" style:font-size-asian="18pt" style:font-size-complex="18pt"/>
    </style:style>
    <style:style style:name="T127" style:family="text">
      <style:text-properties fo:color="#007dc3" loext:opacity="100%" style:font-name="Calibri2" fo:font-size="18pt" officeooo:rsid="00cd0e15" fo:background-color="transparent" loext:char-shading-value="0" style:font-size-asian="18pt" style:font-size-complex="18pt"/>
    </style:style>
    <style:style style:name="T128" style:family="text">
      <style:text-properties fo:color="#007dc3" loext:opacity="100%" style:font-name="Calibri2" fo:font-size="18pt" officeooo:rsid="015aa6d9" fo:background-color="transparent" loext:char-shading-value="0" style:font-size-asian="18pt" style:font-size-complex="18pt"/>
    </style:style>
    <style:style style:name="T129" style:family="text">
      <style:text-properties fo:color="#007dc3" loext:opacity="100%" style:font-name="Calibri2" fo:font-size="18pt" officeooo:rsid="01bf6626" fo:background-color="transparent" loext:char-shading-value="0" style:font-size-asian="18pt" style:font-size-complex="18pt"/>
    </style:style>
    <style:style style:name="T130" style:family="text">
      <style:text-properties fo:color="#007dc3" loext:opacity="100%" style:font-name="Calibri2" fo:font-size="18pt" officeooo:rsid="01cc4e60" fo:background-color="transparent" loext:char-shading-value="0" style:font-size-asian="18pt" style:font-size-complex="18pt"/>
    </style:style>
    <style:style style:name="T131" style:family="text">
      <style:text-properties officeooo:rsid="00d338c0"/>
    </style:style>
    <style:style style:name="T132" style:family="text">
      <style:text-properties officeooo:rsid="00d63ec8"/>
    </style:style>
    <style:style style:name="T133" style:family="text">
      <style:text-properties fo:font-style="italic" style:font-style-asian="italic" style:font-style-complex="italic"/>
    </style:style>
    <style:style style:name="T134" style:family="text">
      <style:text-properties fo:font-style="italic" officeooo:rsid="00d63ec8" style:font-style-asian="italic" style:font-style-complex="italic"/>
    </style:style>
    <style:style style:name="T135" style:family="text">
      <style:text-properties fo:font-style="italic" officeooo:rsid="00db5ce5" style:font-style-asian="italic" style:font-style-complex="italic"/>
    </style:style>
    <style:style style:name="T136" style:family="text">
      <style:text-properties fo:font-style="italic" officeooo:rsid="00e38553" style:font-style-asian="italic" style:font-style-complex="italic"/>
    </style:style>
    <style:style style:name="T137" style:family="text">
      <style:text-properties fo:font-style="italic" officeooo:rsid="00df575f" style:font-style-asian="italic" style:font-style-complex="italic"/>
    </style:style>
    <style:style style:name="T138" style:family="text">
      <style:text-properties fo:font-style="italic" officeooo:rsid="00e07efa" style:font-style-asian="italic" style:font-style-complex="italic"/>
    </style:style>
    <style:style style:name="T139" style:family="text">
      <style:text-properties fo:font-style="italic" officeooo:rsid="00df017d" style:font-style-asian="italic" style:font-style-complex="italic"/>
    </style:style>
    <style:style style:name="T140" style:family="text">
      <style:text-properties fo:font-style="italic" officeooo:rsid="00e16f63" style:font-style-asian="italic" style:font-style-complex="italic"/>
    </style:style>
    <style:style style:name="T141" style:family="text">
      <style:text-properties fo:font-style="italic" officeooo:rsid="00e33a20" style:font-style-asian="italic" style:font-style-complex="italic"/>
    </style:style>
    <style:style style:name="T142" style:family="text">
      <style:text-properties fo:font-style="italic" officeooo:rsid="00e8f23e" style:font-style-asian="italic" style:font-style-complex="italic"/>
    </style:style>
    <style:style style:name="T143" style:family="text">
      <style:text-properties fo:font-style="italic" officeooo:rsid="00d8ffe0" style:font-style-asian="italic" style:font-style-complex="italic"/>
    </style:style>
    <style:style style:name="T144" style:family="text">
      <style:text-properties fo:font-style="italic" officeooo:rsid="01546630" style:font-style-asian="italic" style:font-style-complex="italic"/>
    </style:style>
    <style:style style:name="T145" style:family="text">
      <style:text-properties fo:font-style="italic" fo:font-weight="bold" officeooo:rsid="00db5ce5" style:font-style-asian="italic" style:font-weight-asian="bold" style:font-style-complex="italic" style:font-weight-complex="bold"/>
    </style:style>
    <style:style style:name="T146" style:family="text">
      <style:text-properties fo:font-style="italic" fo:background-color="transparent" loext:char-shading-value="0" style:font-style-asian="italic" style:font-style-complex="italic"/>
    </style:style>
    <style:style style:name="T147" style:family="text">
      <style:text-properties fo:font-style="italic" officeooo:rsid="00e440cb" fo:background-color="transparent" loext:char-shading-value="0" style:font-style-asian="italic" style:font-style-complex="italic"/>
    </style:style>
    <style:style style:name="T148" style:family="text">
      <style:text-properties fo:font-style="italic" officeooo:rsid="00df017d" fo:background-color="transparent" loext:char-shading-value="0" style:font-style-asian="italic" style:font-style-complex="italic"/>
    </style:style>
    <style:style style:name="T149" style:family="text">
      <style:text-properties fo:font-style="italic" officeooo:rsid="00e16f63" fo:background-color="transparent" loext:char-shading-value="0" style:font-style-asian="italic" style:font-style-complex="italic"/>
    </style:style>
    <style:style style:name="T150" style:family="text">
      <style:text-properties fo:font-style="italic" officeooo:rsid="00e07efa" fo:background-color="transparent" loext:char-shading-value="0" style:font-style-asian="italic" style:font-style-complex="italic"/>
    </style:style>
    <style:style style:name="T151" style:family="text">
      <style:text-properties fo:font-style="italic" officeooo:rsid="00e33a20" fo:background-color="transparent" loext:char-shading-value="0" style:font-style-asian="italic" style:font-style-complex="italic"/>
    </style:style>
    <style:style style:name="T152" style:family="text">
      <style:text-properties fo:font-style="italic" officeooo:rsid="00dd25a6" fo:background-color="transparent" loext:char-shading-value="0" style:font-style-asian="italic" style:font-style-complex="italic"/>
    </style:style>
    <style:style style:name="T153" style:family="text">
      <style:text-properties fo:font-style="italic" officeooo:rsid="00ee103b" fo:background-color="transparent" loext:char-shading-value="0" style:font-style-asian="italic" style:font-style-complex="italic"/>
    </style:style>
    <style:style style:name="T154" style:family="text">
      <style:text-properties fo:font-style="italic" officeooo:rsid="00dda4cb" fo:background-color="transparent" loext:char-shading-value="0" style:font-style-asian="italic" style:font-style-complex="italic"/>
    </style:style>
    <style:style style:name="T155" style:family="text">
      <style:text-properties fo:font-style="italic" officeooo:rsid="00f0f9b1" fo:background-color="transparent" loext:char-shading-value="0" style:font-style-asian="italic" style:font-style-complex="italic"/>
    </style:style>
    <style:style style:name="T156" style:family="text">
      <style:text-properties fo:font-style="italic" fo:font-weight="normal" style:font-style-asian="italic" style:font-weight-asian="normal" style:font-style-complex="italic" style:font-weight-complex="normal"/>
    </style:style>
    <style:style style:name="T157" style:family="text">
      <style:text-properties fo:font-style="italic" fo:font-weight="normal" officeooo:rsid="00ea866e" style:font-style-asian="italic" style:font-weight-asian="normal" style:font-style-complex="italic" style:font-weight-complex="normal"/>
    </style:style>
    <style:style style:name="T158" style:family="text">
      <style:text-properties fo:font-style="italic" fo:font-weight="normal" fo:background-color="transparent" loext:char-shading-value="0" style:font-style-asian="italic" style:font-weight-asian="normal" style:font-style-complex="italic" style:font-weight-complex="normal"/>
    </style:style>
    <style:style style:name="T159"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60"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61" style:family="text">
      <style:text-properties fo:font-style="normal" style:font-style-asian="normal" style:font-style-complex="normal"/>
    </style:style>
    <style:style style:name="T162" style:family="text">
      <style:text-properties fo:font-style="normal" officeooo:rsid="00d63ec8" style:font-style-asian="normal" style:font-style-complex="normal"/>
    </style:style>
    <style:style style:name="T163" style:family="text">
      <style:text-properties fo:font-style="normal" officeooo:rsid="00db5ce5" style:font-style-asian="normal" style:font-style-complex="normal"/>
    </style:style>
    <style:style style:name="T164" style:family="text">
      <style:text-properties fo:font-style="normal" officeooo:rsid="00cb38e8" style:font-style-asian="normal" style:font-style-complex="normal"/>
    </style:style>
    <style:style style:name="T165" style:family="text">
      <style:text-properties fo:font-style="normal" officeooo:rsid="00e38553" style:font-style-asian="normal" style:font-style-complex="normal"/>
    </style:style>
    <style:style style:name="T166" style:family="text">
      <style:text-properties fo:font-style="normal" officeooo:rsid="00d87f80" style:font-style-asian="normal" style:font-style-complex="normal"/>
    </style:style>
    <style:style style:name="T167" style:family="text">
      <style:text-properties fo:font-style="normal" officeooo:rsid="00df575f" style:font-style-asian="normal" style:font-style-complex="normal"/>
    </style:style>
    <style:style style:name="T168" style:family="text">
      <style:text-properties fo:font-style="normal" officeooo:rsid="00e07efa" style:font-style-asian="normal" style:font-style-complex="normal"/>
    </style:style>
    <style:style style:name="T169" style:family="text">
      <style:text-properties fo:font-style="normal" officeooo:rsid="00e1e7f8" style:font-style-asian="normal" style:font-style-complex="normal"/>
    </style:style>
    <style:style style:name="T170" style:family="text">
      <style:text-properties fo:font-style="normal" officeooo:rsid="00e2fa38" style:font-style-asian="normal" style:font-style-complex="normal"/>
    </style:style>
    <style:style style:name="T171" style:family="text">
      <style:text-properties fo:font-style="normal" officeooo:rsid="00d8ffe0" style:font-style-asian="normal" style:font-style-complex="normal"/>
    </style:style>
    <style:style style:name="T172" style:family="text">
      <style:text-properties fo:font-style="normal" officeooo:rsid="00e0368e" style:font-style-asian="normal" style:font-style-complex="normal"/>
    </style:style>
    <style:style style:name="T173" style:family="text">
      <style:text-properties fo:font-style="normal" officeooo:rsid="00e16f63" style:font-style-asian="normal" style:font-style-complex="normal"/>
    </style:style>
    <style:style style:name="T174" style:family="text">
      <style:text-properties fo:font-style="normal" officeooo:rsid="00e8f23e" style:font-style-asian="normal" style:font-style-complex="normal"/>
    </style:style>
    <style:style style:name="T175" style:family="text">
      <style:text-properties fo:font-style="normal" officeooo:rsid="00ee103b" style:font-style-asian="normal" style:font-style-complex="normal"/>
    </style:style>
    <style:style style:name="T176" style:family="text">
      <style:text-properties fo:font-style="normal" officeooo:rsid="01546630" style:font-style-asian="normal" style:font-style-complex="normal"/>
    </style:style>
    <style:style style:name="T177" style:family="text">
      <style:text-properties fo:font-style="normal" officeooo:rsid="014f9ade" style:font-style-asian="normal" style:font-style-complex="normal"/>
    </style:style>
    <style:style style:name="T178" style:family="text">
      <style:text-properties fo:font-style="normal" officeooo:rsid="01b4bedd" style:font-style-asian="normal" style:font-style-complex="normal"/>
    </style:style>
    <style:style style:name="T179" style:family="text">
      <style:text-properties fo:font-style="normal" officeooo:rsid="01bdb140" style:font-style-asian="normal" style:font-style-complex="normal"/>
    </style:style>
    <style:style style:name="T180" style:family="text">
      <style:text-properties fo:font-style="normal" fo:background-color="transparent" loext:char-shading-value="0" style:font-style-asian="normal" style:font-style-complex="normal"/>
    </style:style>
    <style:style style:name="T181" style:family="text">
      <style:text-properties fo:font-style="normal" officeooo:rsid="00d63ec8" fo:background-color="transparent" loext:char-shading-value="0" style:font-style-asian="normal" style:font-style-complex="normal"/>
    </style:style>
    <style:style style:name="T182" style:family="text">
      <style:text-properties fo:font-style="normal" officeooo:rsid="00d81a0e" fo:background-color="transparent" loext:char-shading-value="0" style:font-style-asian="normal" style:font-style-complex="normal"/>
    </style:style>
    <style:style style:name="T183" style:family="text">
      <style:text-properties fo:font-style="normal" officeooo:rsid="00e2fa38" fo:background-color="transparent" loext:char-shading-value="0" style:font-style-asian="normal" style:font-style-complex="normal"/>
    </style:style>
    <style:style style:name="T184" style:family="text">
      <style:text-properties fo:font-style="normal" officeooo:rsid="00e1e7f8" fo:background-color="transparent" loext:char-shading-value="0" style:font-style-asian="normal" style:font-style-complex="normal"/>
    </style:style>
    <style:style style:name="T185" style:family="text">
      <style:text-properties fo:font-style="normal" officeooo:rsid="00e440cb" fo:background-color="transparent" loext:char-shading-value="0" style:font-style-asian="normal" style:font-style-complex="normal"/>
    </style:style>
    <style:style style:name="T186" style:family="text">
      <style:text-properties fo:font-style="normal" officeooo:rsid="00df017d" fo:background-color="transparent" loext:char-shading-value="0" style:font-style-asian="normal" style:font-style-complex="normal"/>
    </style:style>
    <style:style style:name="T187" style:family="text">
      <style:text-properties fo:font-style="normal" officeooo:rsid="00dfc741" fo:background-color="transparent" loext:char-shading-value="0" style:font-style-asian="normal" style:font-style-complex="normal"/>
    </style:style>
    <style:style style:name="T188" style:family="text">
      <style:text-properties fo:font-style="normal" officeooo:rsid="00e0368e" fo:background-color="transparent" loext:char-shading-value="0" style:font-style-asian="normal" style:font-style-complex="normal"/>
    </style:style>
    <style:style style:name="T189" style:family="text">
      <style:text-properties fo:font-style="normal" officeooo:rsid="00dda4cb" fo:background-color="transparent" loext:char-shading-value="0" style:font-style-asian="normal" style:font-style-complex="normal"/>
    </style:style>
    <style:style style:name="T190" style:family="text">
      <style:text-properties fo:font-style="normal" officeooo:rsid="00e16f63" fo:background-color="transparent" loext:char-shading-value="0" style:font-style-asian="normal" style:font-style-complex="normal"/>
    </style:style>
    <style:style style:name="T191" style:family="text">
      <style:text-properties fo:font-style="normal" officeooo:rsid="00e33a20" fo:background-color="transparent" loext:char-shading-value="0" style:font-style-asian="normal" style:font-style-complex="normal"/>
    </style:style>
    <style:style style:name="T192" style:family="text">
      <style:text-properties fo:font-style="normal" officeooo:rsid="00db5ce5" fo:background-color="transparent" loext:char-shading-value="0" style:font-style-asian="normal" style:font-style-complex="normal"/>
    </style:style>
    <style:style style:name="T193" style:family="text">
      <style:text-properties fo:font-style="normal" officeooo:rsid="00e8f23e" fo:background-color="transparent" loext:char-shading-value="0" style:font-style-asian="normal" style:font-style-complex="normal"/>
    </style:style>
    <style:style style:name="T194" style:family="text">
      <style:text-properties fo:font-style="normal" officeooo:rsid="00d87f80" fo:background-color="transparent" loext:char-shading-value="0" style:font-style-asian="normal" style:font-style-complex="normal"/>
    </style:style>
    <style:style style:name="T195" style:family="text">
      <style:text-properties fo:font-style="normal" officeooo:rsid="00dd25a6" fo:background-color="transparent" loext:char-shading-value="0" style:font-style-asian="normal" style:font-style-complex="normal"/>
    </style:style>
    <style:style style:name="T196" style:family="text">
      <style:text-properties fo:font-style="normal" officeooo:rsid="00f0f9b1" fo:background-color="transparent" loext:char-shading-value="0" style:font-style-asian="normal" style:font-style-complex="normal"/>
    </style:style>
    <style:style style:name="T197" style:family="text">
      <style:text-properties fo:font-style="normal" officeooo:rsid="00d8ffe0" fo:background-color="transparent" loext:char-shading-value="0" style:font-style-asian="normal" style:font-style-complex="normal"/>
    </style:style>
    <style:style style:name="T198" style:family="text">
      <style:text-properties fo:font-style="normal" fo:font-weight="normal" officeooo:rsid="00ea866e" style:font-style-asian="normal" style:font-weight-asian="normal" style:font-style-complex="normal" style:font-weight-complex="normal"/>
    </style:style>
    <style:style style:name="T199" style:family="text">
      <style:text-properties fo:font-style="normal" fo:font-weight="normal" fo:background-color="transparent" loext:char-shading-value="0" style:font-style-asian="normal" style:font-weight-asian="normal" style:font-style-complex="normal" style:font-weight-complex="normal"/>
    </style:style>
    <style:style style:name="T200"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01"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02"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03" style:family="text">
      <style:text-properties fo:font-style="normal" fo:font-weight="bold" officeooo:rsid="01546630" style:font-style-asian="normal" style:font-weight-asian="bold" style:font-style-complex="normal" style:font-weight-complex="bold"/>
    </style:style>
    <style:style style:name="T204" style:family="text">
      <style:text-properties officeooo:rsid="00db5ce5"/>
    </style:style>
    <style:style style:name="T205" style:family="text">
      <style:text-properties officeooo:rsid="00d87f80"/>
    </style:style>
    <style:style style:name="T206" style:family="text">
      <style:text-properties officeooo:rsid="00dac55c"/>
    </style:style>
    <style:style style:name="T207" style:family="text">
      <style:text-properties fo:color="#3f5fbf" loext:opacity="100%" style:font-name="Consolas1"/>
    </style:style>
    <style:style style:name="T208" style:family="text">
      <style:text-properties fo:color="#3f5fbf" loext:opacity="100%" style:font-name="Consolas1" fo:font-size="10pt" style:font-size-asian="10pt"/>
    </style:style>
    <style:style style:name="T209" style:family="text">
      <style:text-properties fo:color="#3f5fbf" loext:opacity="100%" style:font-name="Consolas1" fo:font-size="10pt" style:text-underline-style="solid" style:text-underline-width="auto" style:text-underline-color="font-color" style:font-size-asian="10pt"/>
    </style:style>
    <style:style style:name="T210" style:family="text">
      <style:text-properties fo:color="#7f9fbf" loext:opacity="100%" style:font-name="Consolas1" fo:font-size="10pt" fo:font-weight="bold" style:font-size-asian="10pt" style:font-weight-asian="bold"/>
    </style:style>
    <style:style style:name="T211" style:family="text">
      <style:text-properties fo:color="#7f7f9f" loext:opacity="100%" style:font-name="Consolas1" fo:font-size="10pt" style:font-size-asian="10pt"/>
    </style:style>
    <style:style style:name="T212" style:family="text">
      <style:text-properties officeooo:rsid="00e07efa"/>
    </style:style>
    <style:style style:name="T213" style:family="text">
      <style:text-properties officeooo:rsid="00e85af2"/>
    </style:style>
    <style:style style:name="T214" style:family="text">
      <style:text-properties officeooo:rsid="00ea866e"/>
    </style:style>
    <style:style style:name="T215" style:family="text">
      <style:text-properties fo:font-weight="normal" style:font-weight-asian="normal" style:font-weight-complex="normal"/>
    </style:style>
    <style:style style:name="T216" style:family="text">
      <style:text-properties fo:font-weight="normal" officeooo:rsid="00ea866e" style:font-weight-asian="normal" style:font-weight-complex="normal"/>
    </style:style>
    <style:style style:name="T217" style:family="text">
      <style:text-properties fo:font-weight="normal" officeooo:rsid="0163fbf5" style:font-weight-asian="normal" style:font-weight-complex="normal"/>
    </style:style>
    <style:style style:name="T218" style:family="text">
      <style:text-properties fo:font-weight="normal" officeooo:rsid="016f0584" style:font-weight-asian="normal" style:font-weight-complex="normal"/>
    </style:style>
    <style:style style:name="T219" style:family="text">
      <style:text-properties fo:font-weight="normal" officeooo:rsid="01b0c851" style:font-weight-asian="normal" style:font-weight-complex="normal"/>
    </style:style>
    <style:style style:name="T220" style:family="text">
      <style:text-properties fo:font-weight="normal" officeooo:rsid="00ea866e" fo:background-color="transparent" loext:char-shading-value="0" style:font-weight-asian="normal" style:font-weight-complex="normal"/>
    </style:style>
    <style:style style:name="T221" style:family="text">
      <style:text-properties fo:font-weight="normal" officeooo:rsid="00e54ccf" fo:background-color="transparent" loext:char-shading-value="0" style:font-weight-asian="normal" style:font-weight-complex="normal"/>
    </style:style>
    <style:style style:name="T222" style:family="text">
      <style:text-properties fo:font-weight="normal" officeooo:rsid="00e5f97a" fo:background-color="transparent" loext:char-shading-value="0" style:font-weight-asian="normal" style:font-weight-complex="normal"/>
    </style:style>
    <style:style style:name="T223" style:family="text">
      <style:text-properties fo:color="#3f7f5f" loext:opacity="100%" style:font-name="Consolas1"/>
    </style:style>
    <style:style style:name="T224" style:family="text">
      <style:text-properties fo:color="#3f7f5f" loext:opacity="100%" style:font-name="Consolas1" style:text-underline-style="solid" style:text-underline-width="auto" style:text-underline-color="font-color"/>
    </style:style>
    <style:style style:name="T225" style:family="text">
      <style:text-properties fo:color="#3f7f5f" loext:opacity="100%" style:font-name="Consolas1" style:text-underline-style="none"/>
    </style:style>
    <style:style style:name="T226" style:family="text">
      <style:text-properties fo:color="#3f7f5f" loext:opacity="100%" style:font-name="Monospace1" fo:font-size="10pt" style:font-size-asian="10pt"/>
    </style:style>
    <style:style style:name="T227" style:family="text">
      <style:text-properties fo:color="#3f7f5f" loext:opacity="100%" style:font-name="Monospace1" fo:font-size="10pt" officeooo:rsid="018c7b7a" style:font-size-asian="10pt"/>
    </style:style>
    <style:style style:name="T228" style:family="text">
      <style:text-properties fo:color="#3f3fbf" loext:opacity="100%" style:font-name="Consolas1"/>
    </style:style>
    <style:style style:name="T229" style:family="text">
      <style:text-properties officeooo:rsid="00ee64c9"/>
    </style:style>
    <style:style style:name="T230" style:family="text">
      <style:text-properties text:display="none"/>
    </style:style>
    <style:style style:name="T231" style:family="text">
      <style:text-properties officeooo:rsid="00ebb296"/>
    </style:style>
    <style:style style:name="T232"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3"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4"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5"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6" style:family="text">
      <style:text-properties officeooo:rsid="00dda4cb"/>
    </style:style>
    <style:style style:name="T237"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8"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9" style:family="text">
      <style:text-properties officeooo:rsid="00df017d" fo:background-color="transparent" loext:char-shading-value="0"/>
    </style:style>
    <style:style style:name="T240" style:family="text">
      <style:text-properties officeooo:rsid="00e59aa6" fo:background-color="transparent" loext:char-shading-value="0"/>
    </style:style>
    <style:style style:name="T241" style:family="text">
      <style:text-properties officeooo:rsid="00dda4cb" fo:background-color="transparent" loext:char-shading-value="0"/>
    </style:style>
    <style:style style:name="T242" style:family="text">
      <style:text-properties officeooo:rsid="00ee103b" fo:background-color="transparent" loext:char-shading-value="0"/>
    </style:style>
    <style:style style:name="T243" style:family="text">
      <style:text-properties officeooo:rsid="00e16f63"/>
    </style:style>
    <style:style style:name="T244" style:family="text">
      <style:text-properties officeooo:rsid="00e8f23e"/>
    </style:style>
    <style:style style:name="T245" style:family="text">
      <style:text-properties officeooo:rsid="00ec4c44"/>
    </style:style>
    <style:style style:name="T246" style:family="text">
      <style:text-properties officeooo:rsid="00f7036b"/>
    </style:style>
    <style:style style:name="T247" style:family="text">
      <style:text-properties officeooo:rsid="00f8fa7f"/>
    </style:style>
    <style:style style:name="T248" style:family="text">
      <style:text-properties officeooo:rsid="00f9eb5c"/>
    </style:style>
    <style:style style:name="T249" style:family="text">
      <style:text-properties officeooo:rsid="00fa2108"/>
    </style:style>
    <style:style style:name="T250" style:family="text">
      <style:text-properties officeooo:rsid="00fadb7a"/>
    </style:style>
    <style:style style:name="T251" style:family="text">
      <style:text-properties officeooo:rsid="00fb0ac1"/>
    </style:style>
    <style:style style:name="T252" style:family="text">
      <style:text-properties officeooo:rsid="00fc5e61"/>
    </style:style>
    <style:style style:name="T253" style:family="text">
      <style:text-properties officeooo:rsid="00fdedbb"/>
    </style:style>
    <style:style style:name="T254" style:family="text">
      <style:text-properties officeooo:rsid="00ff2832"/>
    </style:style>
    <style:style style:name="T255" style:family="text">
      <style:text-properties officeooo:rsid="010136dd"/>
    </style:style>
    <style:style style:name="T256" style:family="text">
      <style:text-properties officeooo:rsid="0104c9b6"/>
    </style:style>
    <style:style style:name="T257" style:family="text">
      <style:text-properties officeooo:rsid="0105b899"/>
    </style:style>
    <style:style style:name="T258" style:family="text">
      <style:text-properties officeooo:rsid="0106886f"/>
    </style:style>
    <style:style style:name="T259" style:family="text">
      <style:text-properties officeooo:rsid="01073b25"/>
    </style:style>
    <style:style style:name="T260" style:family="text">
      <style:text-properties officeooo:rsid="0108f91b"/>
    </style:style>
    <style:style style:name="T261" style:family="text">
      <style:text-properties officeooo:rsid="010af096"/>
    </style:style>
    <style:style style:name="T262" style:family="text">
      <style:text-properties officeooo:rsid="010e1f55"/>
    </style:style>
    <style:style style:name="T263" style:family="text">
      <style:text-properties officeooo:rsid="010fbae5"/>
    </style:style>
    <style:style style:name="T264" style:family="text">
      <style:text-properties officeooo:rsid="0110d1f4"/>
    </style:style>
    <style:style style:name="T265" style:family="text">
      <style:text-properties officeooo:rsid="011208a6"/>
    </style:style>
    <style:style style:name="T266" style:family="text">
      <style:text-properties officeooo:rsid="011355b4"/>
    </style:style>
    <style:style style:name="T267" style:family="text">
      <style:text-properties officeooo:rsid="0113da63"/>
    </style:style>
    <style:style style:name="T268" style:family="text">
      <style:text-properties style:text-underline-style="none"/>
    </style:style>
    <style:style style:name="T269" style:family="text">
      <style:text-properties officeooo:rsid="01212e12"/>
    </style:style>
    <style:style style:name="T270" style:family="text">
      <style:text-properties officeooo:rsid="0121d8ec"/>
    </style:style>
    <style:style style:name="T271" style:family="text">
      <style:text-properties officeooo:rsid="0124bd62"/>
    </style:style>
    <style:style style:name="T272" style:family="text">
      <style:text-properties officeooo:rsid="01258e96"/>
    </style:style>
    <style:style style:name="T273" style:family="text">
      <style:text-properties officeooo:rsid="0127de30"/>
    </style:style>
    <style:style style:name="T274" style:family="text">
      <style:text-properties officeooo:rsid="01286d0a"/>
    </style:style>
    <style:style style:name="T275" style:family="text">
      <style:text-properties officeooo:rsid="012ada2e"/>
    </style:style>
    <style:style style:name="T276" style:family="text">
      <style:text-properties officeooo:rsid="012ec9b6"/>
    </style:style>
    <style:style style:name="T277" style:family="text">
      <style:text-properties officeooo:rsid="005eebc7"/>
    </style:style>
    <style:style style:name="T278" style:family="text">
      <style:text-properties officeooo:rsid="012ef337"/>
    </style:style>
    <style:style style:name="T279" style:family="text">
      <style:text-properties fo:color="#a41515" loext:opacity="100%" style:font-name="Consolas1" fo:font-size="9pt" style:font-size-asian="9pt"/>
    </style:style>
    <style:style style:name="T280" style:family="text">
      <style:text-properties fo:color="#a41515" loext:opacity="100%" style:font-name="Consolas1" fo:font-size="9pt" officeooo:rsid="01bb9662" style:font-size-asian="9pt"/>
    </style:style>
    <style:style style:name="T281" style:family="text">
      <style:text-properties fo:color="#0451a6" loext:opacity="100%" style:font-name="Consolas1" fo:font-size="9pt" style:font-size-asian="9pt"/>
    </style:style>
    <style:style style:name="T282" style:family="text">
      <style:text-properties officeooo:rsid="0149cec3"/>
    </style:style>
    <style:style style:name="T283" style:family="text">
      <style:text-properties officeooo:rsid="014adc01"/>
    </style:style>
    <style:style style:name="T284" style:family="text">
      <style:text-properties officeooo:rsid="014f9ade"/>
    </style:style>
    <style:style style:name="T285" style:family="text">
      <style:text-properties officeooo:rsid="0151259d"/>
    </style:style>
    <style:style style:name="T286" style:family="text">
      <style:text-properties officeooo:rsid="0151fd2e"/>
    </style:style>
    <style:style style:name="T287" style:family="text">
      <style:text-properties officeooo:rsid="01546630"/>
    </style:style>
    <style:style style:name="T288" style:family="text">
      <style:text-properties officeooo:rsid="01554eb3"/>
    </style:style>
    <style:style style:name="T289" style:family="text">
      <style:text-properties officeooo:rsid="0155bc3d"/>
    </style:style>
    <style:style style:name="T290" style:family="text">
      <style:text-properties officeooo:rsid="015c0e13"/>
    </style:style>
    <style:style style:name="T291" style:family="text">
      <style:text-properties officeooo:rsid="015c4085"/>
    </style:style>
    <style:style style:name="T292" style:family="text">
      <style:text-properties officeooo:rsid="015e4779"/>
    </style:style>
    <style:style style:name="T293" style:family="text">
      <style:text-properties fo:color="#0451a5" loext:opacity="100%" style:font-name="Consolas2" fo:font-size="9pt" fo:font-weight="normal"/>
    </style:style>
    <style:style style:name="T294" style:family="text">
      <style:text-properties fo:color="#0451a5" loext:opacity="100%" style:font-name="Consolas2" fo:font-size="9pt" fo:font-weight="normal" fo:background-color="#fffffe" loext:char-shading-value="0"/>
    </style:style>
    <style:style style:name="T295" style:family="text">
      <style:text-properties fo:color="#0451a5" loext:opacity="100%" style:font-name="Consolas2" fo:font-size="9pt" fo:font-weight="normal" officeooo:rsid="01b5544c"/>
    </style:style>
    <style:style style:name="T296" style:family="text">
      <style:text-properties fo:color="#0451a5" loext:opacity="100%" style:font-name="Consolas2" fo:font-size="9pt" fo:font-weight="normal" officeooo:rsid="01b71c80"/>
    </style:style>
    <style:style style:name="T297" style:family="text">
      <style:text-properties fo:color="#0451a5" loext:opacity="100%" style:font-name="Consolas2" fo:font-size="9pt" fo:font-weight="bold"/>
    </style:style>
    <style:style style:name="T298" style:family="text">
      <style:text-properties officeooo:rsid="015fa555"/>
    </style:style>
    <style:style style:name="T299" style:family="text">
      <style:text-properties style:font-name="Consolas2" fo:font-size="9pt" fo:font-weight="normal"/>
    </style:style>
    <style:style style:name="T300" style:family="text">
      <style:text-properties style:font-name="Consolas2" fo:font-size="9pt" fo:font-weight="normal" officeooo:rsid="015fa555"/>
    </style:style>
    <style:style style:name="T301" style:family="text">
      <style:text-properties fo:color="#a31515" loext:opacity="100%" style:font-name="Consolas2" fo:font-size="9pt" fo:font-weight="normal"/>
    </style:style>
    <style:style style:name="T302" style:family="text">
      <style:text-properties fo:color="#a31515" loext:opacity="100%" style:font-name="Consolas2" fo:font-size="9pt" fo:font-weight="normal" officeooo:rsid="01b5544c"/>
    </style:style>
    <style:style style:name="T303" style:family="text">
      <style:text-properties fo:color="#a31515" loext:opacity="100%" style:font-name="Consolas2" fo:font-size="9pt" fo:font-weight="normal" officeooo:rsid="01b71c80"/>
    </style:style>
    <style:style style:name="T304" style:family="text">
      <style:text-properties fo:color="#098658" loext:opacity="100%" style:font-name="Consolas2" fo:font-size="9pt" fo:font-weight="normal"/>
    </style:style>
    <style:style style:name="T305" style:family="text">
      <style:text-properties officeooo:rsid="0160d5f3"/>
    </style:style>
    <style:style style:name="T306" style:family="text">
      <style:text-properties officeooo:rsid="01622317"/>
    </style:style>
    <style:style style:name="T307" style:family="text">
      <style:text-properties officeooo:rsid="0163fbf5"/>
    </style:style>
    <style:style style:name="T308" style:family="text">
      <style:text-properties officeooo:rsid="016529da"/>
    </style:style>
    <style:style style:name="T309" style:family="text">
      <style:text-properties officeooo:rsid="016cca63"/>
    </style:style>
    <style:style style:name="T310" style:family="text">
      <style:text-properties officeooo:rsid="016e9a6e"/>
    </style:style>
    <style:style style:name="T311" style:family="text">
      <style:text-properties officeooo:rsid="016f0584"/>
    </style:style>
    <style:style style:name="T312" style:family="text">
      <style:text-properties officeooo:rsid="017087d4"/>
    </style:style>
    <style:style style:name="T313" style:family="text">
      <style:text-properties officeooo:rsid="01723150"/>
    </style:style>
    <style:style style:name="T314" style:family="text">
      <style:text-properties officeooo:rsid="0176c9fd"/>
    </style:style>
    <style:style style:name="T315" style:family="text">
      <style:text-properties officeooo:rsid="0177982d"/>
    </style:style>
    <style:style style:name="T316" style:family="text">
      <style:text-properties officeooo:rsid="01794cf9"/>
    </style:style>
    <style:style style:name="T317" style:family="text">
      <style:text-properties officeooo:rsid="017a98da"/>
    </style:style>
    <style:style style:name="T318" style:family="text">
      <style:text-properties officeooo:rsid="017c0014"/>
    </style:style>
    <style:style style:name="T319" style:family="text">
      <style:text-properties officeooo:rsid="01836b49"/>
    </style:style>
    <style:style style:name="T320" style:family="text">
      <style:text-properties officeooo:rsid="007f55bb"/>
    </style:style>
    <style:style style:name="T321" style:family="text">
      <style:text-properties style:rfc-language-tag="es-ES-u-co-trad" fo:language="es" fo:country="ES" fo:font-style="normal" officeooo:rsid="01875821" style:font-style-asian="normal" style:font-style-complex="normal"/>
    </style:style>
    <style:style style:name="T322" style:family="text">
      <style:text-properties style:rfc-language-tag="es-ES-u-co-trad" fo:language="es" fo:country="ES" fo:font-style="normal" officeooo:rsid="01875821" fo:background-color="transparent" loext:char-shading-value="0" style:font-style-asian="normal" style:font-style-complex="normal"/>
    </style:style>
    <style:style style:name="T323" style:family="text">
      <style:text-properties officeooo:rsid="018c7b7a"/>
    </style:style>
    <style:style style:name="T324" style:family="text">
      <style:text-properties officeooo:rsid="018f92fd"/>
    </style:style>
    <style:style style:name="T325" style:family="text">
      <style:text-properties officeooo:rsid="019009d8"/>
    </style:style>
    <style:style style:name="T326" style:family="text">
      <style:text-properties officeooo:rsid="01915c4c"/>
    </style:style>
    <style:style style:name="T327" style:family="text">
      <style:text-properties officeooo:rsid="007af11d"/>
    </style:style>
    <style:style style:name="T328" style:family="text">
      <style:text-properties officeooo:rsid="01949037"/>
    </style:style>
    <style:style style:name="T329" style:family="text">
      <style:text-properties officeooo:rsid="01974b8c"/>
    </style:style>
    <style:style style:name="T330" style:family="text">
      <style:text-properties officeooo:rsid="01985e2b"/>
    </style:style>
    <style:style style:name="T331" style:family="text">
      <style:text-properties officeooo:rsid="01997fee"/>
    </style:style>
    <style:style style:name="T332" style:family="text">
      <style:text-properties officeooo:rsid="019b515e"/>
    </style:style>
    <style:style style:name="T333" style:family="text">
      <style:text-properties officeooo:rsid="019b5d65"/>
    </style:style>
    <style:style style:name="T334" style:family="text">
      <style:text-properties officeooo:rsid="01a00707"/>
    </style:style>
    <style:style style:name="T335" style:family="text">
      <style:text-properties officeooo:rsid="01a3c4fd"/>
    </style:style>
    <style:style style:name="T336" style:family="text">
      <style:text-properties officeooo:rsid="01a794fe"/>
    </style:style>
    <style:style style:name="T337" style:family="text">
      <style:text-properties officeooo:rsid="01a9cdd2"/>
    </style:style>
    <style:style style:name="T338" style:family="text">
      <style:text-properties officeooo:rsid="01aba0a4"/>
    </style:style>
    <style:style style:name="T339" style:family="text">
      <style:text-properties officeooo:rsid="01af45bb"/>
    </style:style>
    <style:style style:name="T340" style:family="text">
      <style:text-properties officeooo:rsid="01b1a3a8"/>
    </style:style>
    <style:style style:name="T341" style:family="text">
      <style:text-properties officeooo:rsid="01b368bb"/>
    </style:style>
    <style:style style:name="T342" style:family="text">
      <style:text-properties officeooo:rsid="01b46b41"/>
    </style:style>
    <style:style style:name="T343" style:family="text">
      <style:text-properties officeooo:rsid="01b4bedd"/>
    </style:style>
    <style:style style:name="T344" style:family="text">
      <style:text-properties officeooo:rsid="01b5e40b"/>
    </style:style>
    <style:style style:name="T345" style:family="text">
      <style:text-properties officeooo:rsid="01b71c80"/>
    </style:style>
    <style:style style:name="T346" style:family="text">
      <style:text-properties officeooo:rsid="01bbecb4"/>
    </style:style>
    <style:style style:name="T347" style:family="text">
      <style:text-properties officeooo:rsid="01b77b84"/>
    </style:style>
    <style:style style:name="T348" style:family="text">
      <style:text-properties officeooo:rsid="01b8b2cf"/>
    </style:style>
    <style:style style:name="T349" style:family="text">
      <style:text-properties officeooo:rsid="01bb17a7"/>
    </style:style>
    <style:style style:name="T350" style:family="text">
      <style:text-properties officeooo:rsid="01b902f5"/>
    </style:style>
    <style:style style:name="T351" style:family="text">
      <style:text-properties officeooo:rsid="01bd1247"/>
    </style:style>
    <style:style style:name="T352" style:family="text">
      <style:text-properties officeooo:rsid="01bdb140"/>
    </style:style>
    <style:style style:name="T353" style:family="text">
      <style:text-properties officeooo:rsid="01bf6626"/>
    </style:style>
    <style:style style:name="T354" style:family="text">
      <style:text-properties fo:color="#cf8e6d" loext:opacity="100%" style:font-name="JetBrains Mono1" fo:font-size="10pt" fo:font-style="normal" fo:font-weight="normal" style:font-size-asian="10pt" style:font-style-asian="normal" style:font-weight-asian="normal"/>
    </style:style>
    <style:style style:name="T355" style:family="text">
      <style:text-properties fo:color="#cf8e6d" loext:opacity="100%" style:font-name="JetBrains Mono1" fo:font-size="10pt" fo:font-style="normal" fo:font-weight="normal" fo:background-color="transparent" loext:char-shading-value="0" style:font-size-asian="10pt" style:font-style-asian="normal" style:font-weight-asian="normal"/>
    </style:style>
    <style:style style:name="T356" style:family="text">
      <style:text-properties fo:color="#cf8e6d" loext:opacity="100%" style:font-name="JetBrains Mono1" fo:font-size="10pt" fo:font-style="normal" fo:font-weight="normal" officeooo:rsid="01c9808c" fo:background-color="transparent" loext:char-shading-value="0" style:font-size-asian="10pt" style:font-style-asian="normal" style:font-weight-asian="normal"/>
    </style:style>
    <style:style style:name="T357" style:family="text">
      <style:text-properties fo:color="#cf8e6d" loext:opacity="100%" style:font-name="Monospace" fo:font-size="10pt" fo:font-style="normal" fo:font-weight="normal" style:font-size-asian="10pt" style:font-style-asian="normal" style:font-weight-asian="normal" style:font-style-complex="normal"/>
    </style:style>
    <style:style style:name="T358" style:family="text">
      <style:text-properties fo:color="#bcbec4" loext:opacity="100%" style:font-name="JetBrains Mono1" fo:font-size="10pt" fo:font-style="normal" fo:font-weight="normal" style:font-size-asian="10pt" style:font-style-asian="normal" style:font-weight-asian="normal"/>
    </style:style>
    <style:style style:name="T359" style:family="text">
      <style:text-properties fo:color="#bcbec4" loext:opacity="100%" style:font-name="JetBrains Mono1" fo:font-size="10pt" fo:font-style="normal" fo:font-weight="normal" fo:background-color="transparent" loext:char-shading-value="0" style:font-size-asian="10pt" style:font-style-asian="normal" style:font-weight-asian="normal"/>
    </style:style>
    <style:style style:name="T360" style:family="text">
      <style:text-properties fo:color="#bcbec4" loext:opacity="100%" style:font-name="JetBrains Mono1" fo:font-size="10pt" fo:font-style="italic" fo:font-weight="normal" style:font-size-asian="10pt" style:font-style-asian="italic" style:font-weight-asian="normal"/>
    </style:style>
    <style:style style:name="T361" style:family="text">
      <style:text-properties fo:color="#c77dbb" loext:opacity="100%" style:font-name="JetBrains Mono1" fo:font-size="10pt" fo:font-style="normal" fo:font-weight="normal" style:font-size-asian="10pt" style:font-style-asian="normal" style:font-weight-asian="normal"/>
    </style:style>
    <style:style style:name="T362" style:family="text">
      <style:text-properties fo:color="#c77dbb" loext:opacity="100%" style:font-name="JetBrains Mono1" fo:font-size="10pt" fo:font-style="normal" fo:font-weight="normal" fo:background-color="transparent" loext:char-shading-value="0" style:font-size-asian="10pt" style:font-style-asian="normal" style:font-weight-asian="normal"/>
    </style:style>
    <style:style style:name="T363" style:family="text">
      <style:text-properties fo:color="#c77dbb" loext:opacity="100%" style:font-name="JetBrains Mono1" fo:font-size="10pt" fo:font-style="italic" fo:font-weight="normal" style:font-size-asian="10pt" style:font-style-asian="italic" style:font-weight-asian="normal"/>
    </style:style>
    <style:style style:name="T364" style:family="text">
      <style:text-properties fo:color="#c77dbb" loext:opacity="100%" style:font-name="JetBrains Mono1" fo:font-size="10pt" fo:font-style="italic" fo:font-weight="normal" fo:background-color="transparent" loext:char-shading-value="0" style:font-size-asian="10pt" style:font-style-asian="italic" style:font-weight-asian="normal"/>
    </style:style>
    <style:style style:name="T365" style:family="text">
      <style:text-properties fo:color="#6aab73" loext:opacity="100%" style:font-name="JetBrains Mono1" fo:font-size="10pt" fo:font-style="normal" fo:font-weight="normal" style:font-size-asian="10pt" style:font-style-asian="normal" style:font-weight-asian="normal"/>
    </style:style>
    <style:style style:name="T366" style:family="text">
      <style:text-properties fo:color="#6aab73" loext:opacity="100%" style:font-name="JetBrains Mono1" fo:font-size="10pt" fo:font-style="normal" fo:font-weight="normal" fo:background-color="transparent" loext:char-shading-value="0" style:font-size-asian="10pt" style:font-style-asian="normal" style:font-weight-asian="normal"/>
    </style:style>
    <style:style style:name="T367" style:family="text">
      <style:text-properties officeooo:rsid="01c18745"/>
    </style:style>
    <style:style style:name="T368" style:family="text">
      <style:text-properties officeooo:rsid="01c47d22"/>
    </style:style>
    <style:style style:name="T369" style:family="text">
      <style:text-properties fo:color="#d5b778" loext:opacity="100%" style:font-name="JetBrains Mono1" fo:font-size="10pt" fo:font-style="normal" fo:font-weight="normal" style:font-size-asian="10pt" style:font-style-asian="normal" style:font-weight-asian="normal"/>
    </style:style>
    <style:style style:name="T370" style:family="text">
      <style:text-properties fo:color="#5f826b" loext:opacity="100%" style:font-name="JetBrains Mono1" fo:font-size="10pt" fo:font-style="italic" fo:font-weight="normal" style:font-size-asian="10pt" style:font-style-asian="italic" style:font-weight-asian="normal"/>
    </style:style>
    <style:style style:name="T371" style:family="text">
      <style:text-properties fo:color="#b3ae60" loext:opacity="100%" style:font-name="JetBrains Mono1" fo:font-size="10pt" fo:font-style="normal" fo:font-weight="normal" style:font-size-asian="10pt" style:font-style-asian="normal" style:font-weight-asian="normal"/>
    </style:style>
    <style:style style:name="T372" style:family="text">
      <style:text-properties fo:color="#b3ae60" loext:opacity="100%" style:font-name="JetBrains Mono1" fo:font-size="10pt" fo:font-style="normal" fo:font-weight="normal" officeooo:rsid="01ca54b2" style:font-size-asian="10pt" style:font-style-asian="normal" style:font-weight-asian="normal"/>
    </style:style>
    <style:style style:name="T373" style:family="text">
      <style:text-properties fo:color="#b3ae60" loext:opacity="100%" style:font-name="JetBrains Mono1" fo:font-size="10pt" fo:font-style="normal" fo:font-weight="normal" fo:background-color="transparent" loext:char-shading-value="0" style:font-size-asian="10pt" style:font-style-asian="normal" style:font-weight-asian="normal"/>
    </style:style>
    <style:style style:name="T374" style:family="text">
      <style:text-properties fo:color="#b3ae60" loext:opacity="100%" style:font-name="JetBrains Mono1" fo:font-size="10pt" fo:font-style="normal" fo:font-weight="normal" officeooo:rsid="01c8f747" fo:background-color="transparent" loext:char-shading-value="0" style:font-size-asian="10pt" style:font-style-asian="normal" style:font-weight-asian="normal"/>
    </style:style>
    <style:style style:name="T375" style:family="text">
      <style:text-properties fo:color="#67a37c" loext:opacity="100%" style:font-name="JetBrains Mono1" fo:font-size="10pt" fo:font-style="italic" fo:font-weight="normal" style:font-size-asian="10pt" style:font-style-asian="italic" style:font-weight-asian="normal"/>
    </style:style>
    <style:style style:name="T376" style:family="text">
      <style:text-properties fo:color="#68a67e" loext:opacity="100%" style:font-name="JetBrains Mono1" fo:font-size="10pt" fo:font-style="italic" fo:font-weight="normal" style:font-size-asian="10pt" style:font-style-asian="italic" style:font-weight-asian="normal"/>
    </style:style>
    <style:style style:name="T377" style:family="text">
      <style:text-properties fo:color="#7a7e85" loext:opacity="100%" style:font-name="JetBrains Mono1" fo:font-size="10pt" fo:font-style="normal" fo:font-weight="normal" style:font-size-asian="10pt" style:font-style-asian="normal" style:font-weight-asian="normal"/>
    </style:style>
    <style:style style:name="T378" style:family="text">
      <style:text-properties fo:color="#7a7e85" loext:opacity="100%" style:font-name="JetBrains Mono1" fo:font-size="10pt" fo:font-style="normal" fo:font-weight="normal" fo:background-color="transparent" loext:char-shading-value="0" style:font-size-asian="10pt" style:font-style-asian="normal" style:font-weight-asian="normal"/>
    </style:style>
    <style:style style:name="T379" style:family="text">
      <style:text-properties fo:color="#56a8f5" loext:opacity="100%" style:font-name="JetBrains Mono1" fo:font-size="10pt" fo:font-style="normal" fo:font-weight="normal" style:font-size-asian="10pt" style:font-style-asian="normal" style:font-weight-asian="normal"/>
    </style:style>
    <style:style style:name="T380" style:family="text">
      <style:text-properties fo:color="#56a8f5" loext:opacity="100%" style:font-name="JetBrains Mono1" fo:font-size="10pt" fo:font-style="normal" fo:font-weight="normal" fo:background-color="transparent" loext:char-shading-value="0" style:font-size-asian="10pt" style:font-style-asian="normal" style:font-weight-asian="normal"/>
    </style:style>
    <style:style style:name="T381"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loext:decorative="false"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loext:decorative="fals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3"/>
      <text:p text:style-name="P23"><draw:g text:anchor-type="as-char" draw:z-index="0" draw:name="Forma2" draw:style-name="gr3"><draw:frame draw:name="Picture 2" draw:style-name="gr4" draw:text-style-name="P470" svg:width="13.553cm" svg:height="2.514cm" svg:x="3.438cm" svg:y="0cm"><draw:image xlink:href="Pictures/10000000000006A400000104792F8214.png" xlink:type="simple" xlink:show="embed" xlink:actuate="onLoad" draw:mime-type="image/png"><text:p/></draw:image></draw:frame><draw:frame draw:name="Picture 3" draw:style-name="gr5" draw:text-style-name="P470" svg:width="3.209cm" svg:height="2.511cm" svg:x="0cm" svg:y="0cm"><draw:image xlink:href="Pictures/10000001000002E6000002BBD71058E4.png" xlink:type="simple" xlink:show="embed" xlink:actuate="onLoad" draw:mime-type="image/png"><text:p/></draw:image></draw:frame></draw:g><text:s text:c="5"/></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pan text:style-name="T102">DISTRIBUCIO</text:span>: Manual d’integració </text:p>
      <text:p text:style-name="P22"><text:span text:style-name="T130">22</text:span><text:span text:style-name="T127"> d</text:span><text:span text:style-name="T129">e juny</text:span><text:span text:style-name="T128"> </text:span><text:span text:style-name="T126">de 202</text:span><text:span text:style-name="T129">6</text:span></text:p>
      <text:p text:style-name="P138">Serveis d’Administració Electrònica en el Govern de les Illes Balears</text:p>
      <text:p text:style-name="P137">Lot 3 (Serveis de tramitació d’expedients electrònics)</text:p>
      <text:p text:style-name="P137"/>
      <text:p text:style-name="P137"/>
      <text:p text:style-name="P137"/>
      <text:p text:style-name="P137"/>
      <text:p text:style-name="P4">Oficina Tècnica de Direcció de Projecte</text:p>
      <text:list text:style-name="Outline">
        <text:list-header>
          <text:h text:style-name="P385"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32">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11"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11"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101">Modificació del document segons plantilla enviada per la DGDT</text:span>.</text:p>
          </table:table-cell>
        </table:table-row>
        <table:table-row table:style-name="Taula1.1">
          <table:table-cell table:style-name="Taula1.A5" office:value-type="string">
            <text:p text:style-name="P49"><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31">2</text:span></text:p>
          </table:table-cell>
          <table:table-cell table:style-name="Taula1.D5" office:value-type="string">
            <text:p text:style-name="P50"><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51"><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45">3</text:span></text:p>
          </table:table-cell>
          <table:table-cell table:style-name="Taula1.D6" office:value-type="string">
            <text:p text:style-name="P50"><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05">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05">Afegir punts per explicar les APIs REST d'integració per backoffices i per crear regles de distribucio de forma remota. </text:p>
          </table:table-cell>
        </table:table-row>
        <table:table-row table:style-name="Taula1.1">
          <table:table-cell table:style-name="Taula1.A8" office:value-type="string">
            <text:p text:style-name="P205"><text:span text:style-name="T314">05</text:span>/0<text:span text:style-name="T314">7</text:span>/23</text:p>
          </table:table-cell>
          <table:table-cell table:style-name="Taula1.B8" office:value-type="string">
            <text:p text:style-name="P15">Límit Tecnologies</text:p>
          </table:table-cell>
          <table:table-cell table:style-name="Taula1.C8" office:value-type="string">
            <text:p text:style-name="P15">1.<text:span text:style-name="T314">5</text:span></text:p>
          </table:table-cell>
          <table:table-cell table:style-name="Taula1.D8" office:value-type="string">
            <text:p text:style-name="P205"><text:span text:style-name="T314">Revisar documentació i exemples.</text:span> </text:p>
          </table:table-cell>
        </table:table-row>
        <table:table-row table:style-name="Taula1.1">
          <table:table-cell table:style-name="Taula1.A9" office:value-type="string">
            <text:p text:style-name="P206"><text:span text:style-name="T338">12</text:span>/0<text:span text:style-name="T338">4/</text:span>2<text:span text:style-name="T338">4</text:span></text:p>
          </table:table-cell>
          <table:table-cell table:style-name="Taula1.B9" office:value-type="string">
            <text:p text:style-name="P16">Límit Tecnologies</text:p>
          </table:table-cell>
          <table:table-cell table:style-name="Taula1.C9" office:value-type="string">
            <text:p text:style-name="P17">1.6</text:p>
          </table:table-cell>
          <table:table-cell table:style-name="Taula1.D9" office:value-type="string">
            <text:p text:style-name="P242">Revisió per a la versió 1.0<text:span text:style-name="T339">.1</text:span> de l’aplicació.</text:p>
          </table:table-cell>
        </table:table-row>
        <table:table-row table:style-name="Taula1.1">
          <table:table-cell table:style-name="Taula1.A9" office:value-type="string">
            <text:p text:style-name="P206"><text:span text:style-name="T343">09</text:span>/<text:span text:style-name="T341">1</text:span><text:span text:style-name="T343">2</text:span><text:span text:style-name="T338">/</text:span><text:span text:style-name="T341">25</text:span></text:p>
          </table:table-cell>
          <table:table-cell table:style-name="Taula1.B9" office:value-type="string">
            <text:p text:style-name="P16">Límit Tecnologies</text:p>
          </table:table-cell>
          <table:table-cell table:style-name="Taula1.C9" office:value-type="string">
            <text:p text:style-name="P17">1.<text:span text:style-name="T341">7</text:span></text:p>
          </table:table-cell>
          <table:table-cell table:style-name="Taula1.D9" office:value-type="string">
            <text:p text:style-name="P376">Nou paràmetre <text:span text:style-name="T133">tipusSia</text:span><text:span text:style-name="T161"> a l'API de regles.<text:line-break/></text:span><text:span text:style-name="T178">Informació del codi de servei i codi i nom del tràmit en la consulta d'anotacions.</text:span></text:p>
          </table:table-cell>
        </table:table-row>
        <table:table-row table:style-name="Taula1.1">
          <table:table-cell table:style-name="Taula1.A9" office:value-type="string">
            <text:p text:style-name="P377"><text:span text:style-name="T353">05</text:span>/<text:span text:style-name="T353">06</text:span>/2<text:span text:style-name="T346">6</text:span></text:p>
          </table:table-cell>
          <table:table-cell table:style-name="Taula1.B9" office:value-type="string">
            <text:p text:style-name="P18">Límit Tecnologies</text:p>
          </table:table-cell>
          <table:table-cell table:style-name="Taula1.C9" office:value-type="string">
            <text:p text:style-name="P19">1.<text:span text:style-name="T347">8</text:span></text:p>
          </table:table-cell>
          <table:table-cell table:style-name="Taula1.D9" office:value-type="string">
            <text:p text:style-name="P377"><text:span text:style-name="T346">Actualització versions llibreries client. </text:span>Revisió del Servei de gestió d<text:span text:style-name="T348">'</text:span>anotacions pels backoffices.</text:p>
          </table:table-cell>
        </table:table-row>
        <table:table-row table:style-name="Taula1.1">
          <table:table-cell table:style-name="Taula1.A9" office:value-type="string">
            <text:p text:style-name="P420">22/06/26</text:p>
          </table:table-cell>
          <table:table-cell table:style-name="Taula1.B9" office:value-type="string">
            <text:p text:style-name="P418">Límit Tecnologies</text:p>
          </table:table-cell>
          <table:table-cell table:style-name="Taula1.C9" office:value-type="string">
            <text:p text:style-name="P419">1.9</text:p>
          </table:table-cell>
          <table:table-cell table:style-name="Taula1.D9" office:value-type="string">
            <text:p text:style-name="P420">Actualitzar versió REST y revisar les referencies SOAP</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32">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39"/>
          </table:table-cell>
          <table:table-cell table:style-name="Taula2.B4" office:value-type="string">
            <text:p text:style-name="P139"/>
          </table:table-cell>
          <table:table-cell table:style-name="Taula2.C4" office:value-type="string">
            <text:p text:style-name="P139"/>
          </table:table-cell>
        </table:table-row>
        <table:table-row table:style-name="Taula2.1">
          <table:table-cell table:style-name="Taula2.A5" office:value-type="string">
            <text:p text:style-name="P139"/>
          </table:table-cell>
          <table:table-cell table:style-name="Taula2.B5" office:value-type="string">
            <text:p text:style-name="P139"/>
          </table:table-cell>
          <table:table-cell table:style-name="Taula2.C5" office:value-type="string">
            <text:p text:style-name="P139"/>
          </table:table-cell>
        </table:table-row>
        <table:table-row table:style-name="Taula2.1">
          <table:table-cell table:style-name="Taula2.A6" office:value-type="string">
            <text:p text:style-name="P139"/>
          </table:table-cell>
          <table:table-cell table:style-name="Taula2.B6" office:value-type="string">
            <text:p text:style-name="P139"/>
          </table:table-cell>
          <table:table-cell table:style-name="Taula2.C6" office:value-type="string">
            <text:p text:style-name="P139"/>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32">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ext:soft-page-break/>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39"/>
          </table:table-cell>
          <table:table-cell table:style-name="Taula3.B4" office:value-type="string">
            <text:p text:style-name="P139"/>
          </table:table-cell>
          <table:table-cell table:style-name="Taula3.C4" office:value-type="string">
            <text:p text:style-name="P139"/>
          </table:table-cell>
        </table:table-row>
        <table:table-row table:style-name="Taula3.1">
          <table:table-cell table:style-name="Taula3.A5" office:value-type="string">
            <text:p text:style-name="P139"/>
          </table:table-cell>
          <table:table-cell table:style-name="Taula3.B5" office:value-type="string">
            <text:p text:style-name="P139"/>
          </table:table-cell>
          <table:table-cell table:style-name="Taula3.C5" office:value-type="string">
            <text:p text:style-name="P139"/>
          </table:table-cell>
        </table:table-row>
        <table:table-row table:style-name="Taula3.1">
          <table:table-cell table:style-name="Taula3.A6" office:value-type="string">
            <text:p text:style-name="P139"/>
          </table:table-cell>
          <table:table-cell table:style-name="Taula3.B6" office:value-type="string">
            <text:p text:style-name="P139"/>
          </table:table-cell>
          <table:table-cell table:style-name="Taula3.C6" office:value-type="string">
            <text:p text:style-name="P139"/>
          </table:table-cell>
        </table:table-row>
      </table:table>
      <text:p text:style-name="P2"/>
      <text:p text:style-name="P2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32">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39"/>
          </table:table-cell>
          <table:table-cell table:style-name="Taula6.B4" office:value-type="string">
            <text:p text:style-name="P139"/>
          </table:table-cell>
          <table:table-cell table:style-name="Taula6.C4" office:value-type="string">
            <text:p text:style-name="P139"/>
          </table:table-cell>
        </table:table-row>
        <table:table-row table:style-name="Taula6.1">
          <table:table-cell table:style-name="Taula6.A5" office:value-type="string">
            <text:p text:style-name="P139"/>
          </table:table-cell>
          <table:table-cell table:style-name="Taula6.B5" office:value-type="string">
            <text:p text:style-name="P139"/>
          </table:table-cell>
          <table:table-cell table:style-name="Taula6.C5" office:value-type="string">
            <text:p text:style-name="P139"/>
          </table:table-cell>
        </table:table-row>
      </table:table>
      <text:p text:style-name="P2"><text:s text:c="5"/></text:p>
      <text:p text:style-name="P2"/>
      <text:p text:style-name="P25">Índex</text:p>
      <text:p text:style-name="P24"/>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0"><text:a xlink:type="simple" xlink:href="#__RefHeading___Toc21421_3940995463" text:style-name="Index_20_Link" text:visited-style-name="Index_20_Link">Control de versions del document<text:tab/>2</text:a></text:p>
          <text:p text:style-name="P380"><text:a xlink:type="simple" xlink:href="#__RefHeading___Toc16768_2313926538" text:style-name="Index_20_Link" text:visited-style-name="Index_20_Link">1. Objecte<text:tab/>5</text:a></text:p>
          <text:p text:style-name="P380"><text:a xlink:type="simple" xlink:href="#__RefHeading___Toc160468_1680181998" text:style-name="Index_20_Link" text:visited-style-name="Index_20_Link">2. Servei d’enviament d'anotacions<text:tab/>6</text:a></text:p>
          <text:p text:style-name="P381"><text:a xlink:type="simple" xlink:href="#__RefHeading___Toc16770_2313926538" text:style-name="Index_20_Link" text:visited-style-name="Index_20_Link">2.1. Diagrames de seqüència<text:tab/>6</text:a></text:p>
          <text:p text:style-name="P382"><text:a xlink:type="simple" xlink:href="#__RefHeading___Toc8043_1716379843" text:style-name="Index_20_Link" text:visited-style-name="Index_20_Link">2.1.1. Processament síncron<text:tab/>6</text:a></text:p>
          <text:p text:style-name="P382"><text:a xlink:type="simple" xlink:href="#__RefHeading___Toc15562_3365326968" text:style-name="Index_20_Link" text:visited-style-name="Index_20_Link">2.1.2. Processament asíncron<text:tab/>7</text:a></text:p>
          <text:p text:style-name="P381"><text:a xlink:type="simple" xlink:href="#__RefHeading___Toc227353_390838441" text:style-name="Index_20_Link" text:visited-style-name="Index_20_Link">2.2. Descripció del servei<text:tab/>8</text:a></text:p>
          <text:p text:style-name="P381"><text:a xlink:type="simple" xlink:href="#__RefHeading___Toc16772_2313926538" text:style-name="Index_20_Link" text:visited-style-name="Index_20_Link">2.3. Model de dades<text:tab/>8</text:a></text:p>
          <text:p text:style-name="P381"><text:a xlink:type="simple" xlink:href="#__RefHeading___Toc227355_390838441" text:style-name="Index_20_Link" text:visited-style-name="Index_20_Link">2.4. Utilització del servei<text:tab/>14</text:a></text:p>
          <text:p text:style-name="P380"><text:a xlink:type="simple" xlink:href="#__RefHeading___Toc160470_1680181998" text:style-name="Index_20_Link" text:visited-style-name="Index_20_Link">3. Servei de gestió d’anotacions pels backoffices<text:tab/>16</text:a></text:p>
          <text:p text:style-name="P381"><text:a xlink:type="simple" xlink:href="#__RefHeading___Toc227357_390838441" text:style-name="Index_20_Link" text:visited-style-name="Index_20_Link">3.1. Diagrama de seqüència<text:tab/>16</text:a></text:p>
          <text:p text:style-name="P381"><text:a xlink:type="simple" xlink:href="#__RefHeading___Toc227359_390838441" text:style-name="Index_20_Link" text:visited-style-name="Index_20_Link">3.2. Descripció del servei<text:tab/>18</text:a></text:p>
          <text:p text:style-name="P382"><text:a xlink:type="simple" xlink:href="#__RefHeading___Toc53751_2521683781" text:style-name="Index_20_Link" text:visited-style-name="Index_20_Link">3.2.1. Consulta d'una anotació de registre<text:tab/>18</text:a></text:p>
          <text:p text:style-name="P382"><text:a xlink:type="simple" xlink:href="#__RefHeading___Toc53753_2521683781" text:style-name="Index_20_Link" text:visited-style-name="Index_20_Link">3.2.2. Canvi d'estat d'una anotació<text:tab/>20</text:a></text:p>
          <text:p text:style-name="P381"><text:a xlink:type="simple" xlink:href="#__RefHeading___Toc227361_390838441" text:style-name="Index_20_Link" text:visited-style-name="Index_20_Link">3.3. Model de dades<text:tab/>21</text:a></text:p>
          <text:p text:style-name="P381"><text:a xlink:type="simple" xlink:href="#__RefHeading___Toc227363_390838441" text:style-name="Index_20_Link" text:visited-style-name="Index_20_Link">3.4. Utilització del servei<text:tab/>26</text:a></text:p>
          <text:p text:style-name="P380"><text:a xlink:type="simple" xlink:href="#__RefHeading___Toc227365_390838441" text:style-name="Index_20_Link" text:visited-style-name="Index_20_Link">4. Servei de gestió de regles<text:tab/>27</text:a></text:p>
          <text:p text:style-name="P381"><text:a xlink:type="simple" xlink:href="#__RefHeading___Toc227367_390838441" text:style-name="Index_20_Link" text:visited-style-name="Index_20_Link">4.1. Descripció del servei<text:tab/>27</text:a></text:p>
          <text:p text:style-name="P382"><text:a xlink:type="simple" xlink:href="#__RefHeading___Toc227369_390838441" text:style-name="Index_20_Link" text:visited-style-name="Index_20_Link">4.1.1. Crear una regla<text:tab/>28</text:a></text:p>
          <text:p text:style-name="P382"><text:a xlink:type="simple" xlink:href="#__RefHeading___Toc227371_390838441" text:style-name="Index_20_Link" text:visited-style-name="Index_20_Link">4.1.2. Canviar estat d’una regla<text:tab/>28</text:a></text:p>
          <text:p text:style-name="P382"><text:a xlink:type="simple" xlink:href="#__RefHeading___Toc227373_390838441" text:style-name="Index_20_Link" text:visited-style-name="Index_20_Link">4.1.3. Consultar informació d’una regla<text:tab/>29</text:a></text:p>
          <text:p text:style-name="P381"><text:a xlink:type="simple" xlink:href="#__RefHeading___Toc227375_390838441" text:style-name="Index_20_Link" text:visited-style-name="Index_20_Link">4.2. Utilització del servei<text:tab/>30</text:a></text:p>
          <text:p text:style-name="P380"><text:a xlink:type="simple" xlink:href="#__RefHeading___Toc60794_1326387233" text:style-name="Index_20_Link" text:visited-style-name="Index_20_Link">5. Llibreria d'utilitats pels backoffices de DISTRIBUCIO<text:tab/>32</text:a></text:p>
          <text:p text:style-name="P381"><text:a xlink:type="simple" xlink:href="#__RefHeading___Toc50902_2907556958" text:style-name="Index_20_Link" text:visited-style-name="Index_20_Link">5.1. Informació de la llibreria<text:tab/>32</text:a></text:p>
          <text:p text:style-name="P381"><text:a xlink:type="simple" xlink:href="#__RefHeading___Toc50904_2907556958" text:style-name="Index_20_Link" text:visited-style-name="Index_20_Link">5.2. Com incloure la llibreria<text:tab/>33</text:a></text:p>
          <text:p text:style-name="P381"><text:a xlink:type="simple" xlink:href="#__RefHeading___Toc366105_93553639" text:style-name="Index_20_Link" text:visited-style-name="Index_20_Link">5.3. Històric<text:tab/>34</text:a></text:p>
          <text:p text:style-name="P381"><text:a xlink:type="simple" xlink:href="#__RefHeading___Toc366107_93553639" text:style-name="Index_20_Link" text:visited-style-name="Index_20_Link">5.4. Utilitats per l'Arxiu<text:tab/>34</text:a></text:p>
          <text:p text:style-name="P382"><text:a xlink:type="simple" xlink:href="#__RefHeading___Toc50906_2907556958" text:style-name="Index_20_Link" text:visited-style-name="Index_20_Link">5.4.1. Paràmetres<text:tab/>35</text:a></text:p>
          <text:p text:style-name="P382"><text:a xlink:type="simple" xlink:href="#__RefHeading___Toc50908_2907556958" text:style-name="Index_20_Link" text:visited-style-name="Index_20_Link">5.4.2. Ús de <text:span text:style-name="T133">B</text:span><text:span text:style-name="T133">ackofficeArxiuUtils</text:span><text:tab/>36</text:a></text:p>
          <text:p text:style-name="P382"><text:a xlink:type="simple" xlink:href="#__RefHeading___Toc50910_2907556958" text:style-name="Index_20_Link" text:visited-style-name="Index_20_Link">5.4.3. Exemple Java<text:tab/>37</text:a></text:p>
          <text:p text:style-name="P381"><text:a xlink:type="simple" xlink:href="#__RefHeading___Toc50910_29075569581" text:style-name="Index_20_Link" text:visited-style-name="Index_20_Link">5.5. Utilitats per Sistra2<text:tab/>41</text:a></text:p>
          <text:p text:style-name="P382"><text:a xlink:type="simple" xlink:href="#__RefHeading___Toc366109_93553639" text:style-name="Index_20_Link" text:visited-style-name="Index_20_Link">5.5.1. Ús de <text:span text:style-name="T133">BackofficeSistra2Utils</text:span><text:tab/>42</text:a></text:p>
          <text:p text:style-name="P382"><text:a xlink:type="simple" xlink:href="#__RefHeading___Toc366111_93553639" text:style-name="Index_20_Link" text:visited-style-name="Index_20_Link">5.5.2. Exemple Java<text:tab/>43</text:a></text:p>
          <text:p text:style-name="P380"><text:a xlink:type="simple" xlink:href="#__RefHeading___Toc117515_1680181998" text:style-name="Index_20_Link" text:visited-style-name="Index_20_Link">Annex I: WSDL del backoffice<text:tab/>44</text:a></text:p>
          <text:p text:style-name="P380"><text:a xlink:type="simple" xlink:href="#__RefHeading___Toc60796_1326387233" text:style-name="Index_20_Link" text:visited-style-name="Index_20_Link">Annex II: Exemple d'ús de la llibreria de <text:span text:style-name="T133">distribucio-backoffice-utils</text:span><text:tab/>46</text:a></text:p>
        </text:index-body>
      </text:table-of-content>
      <text:p text:style-name="Standard"/>
      <text:p text:style-name="Text_20_body"/>
      <text:list xml:id="list112332904566663" text:continue-numbering="true" text:style-name="Outline">
        <text:list-item>
          <text:h text:style-name="P386" text:outline-level="1"><text:bookmark-start text:name="__RefHeading___Toc16768_2313926538"/>Objecte <text:bookmark-end text:name="__RefHeading___Toc16768_2313926538"/></text:h>
        </text:list-item>
      </text:list>
      <text:p text:style-name="P368"><text:span text:style-name="T315">L'objectiu d'aquest document és proporcionar </text:span>la informació necessària per a la integració amb el<text:span text:style-name="T116">s</text:span> <text:span text:style-name="T326">diferents </text:span>servei<text:span text:style-name="T116">s </text:span><text:span text:style-name="T326">que proporciona l’aplicació</text:span><text:span text:style-name="T116"> DISTRIBUCIÓ.</text:span></text:p>
      <text:p text:style-name="P218">Les aplicacions que s’integren amb distribució pertanyen a un dels següents grups:</text:p>
      <text:list text:style-name="L9">
        <text:list-item>
          <text:p text:style-name="P447">Aplicacions de registre: aquestes aplicacions recullen les anotacions del registre d’entrada i les donen d’alta a distribució.</text:p>
        </text:list-item>
        <text:list-item>
          <text:p text:style-name="P447">Backoffices: aquestes aplicacions son les encarregades de processar les anotacions de registre.</text:p>
        </text:list-item>
      </text:list>
      <text:p text:style-name="P218">Les aplicacions de registre fan us del servei d’enviament d’anotacions de registre per a donar-les d’alta a DISTRIBUCIÓ i que comenci el seu processament.</text:p>
      <text:p text:style-name="P218">Per a cada anotació de registre, DISTRIBUCIÓ s’encarrega de calcular el backoffice encarregat del seu processament (mitjançant l’aplicació de regles) i d’informar a aquests backoffices de les anotacions pendents de processar.</text:p>
      <text:p text:style-name="P218">Els backoffices consulten les anotacions de registre a DISTRIBUCIÓ i canvien el seu estat una vegada les han processat.</text:p>
      <text:p text:style-name="P371"><draw:frame draw:style-name="fr4" draw:name="Marc3" text:anchor-type="as-char" svg:width="16.325cm" draw:z-index="62"><draw:text-box fo:min-height="3.678cm"><text:p text:style-name="Figure"><draw:frame draw:style-name="fr7" draw:name="Image8" text:anchor-type="paragraph" svg:width="16.325cm" style:rel-width="100%" svg:height="3.678cm" style:rel-height="scale" draw:z-index="63"><draw:image xlink:href="Pictures/1000000100000303000000A29DF3ECA6.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48"/>
      <text:p text:style-name="P149">A l'apartat <text:bookmark-ref text:reference-format="number" text:ref-name="__RefNumPara__81015_1680181998">2</text:bookmark-ref><text:span text:style-name="T316"><text:s/></text:span>es <text:span text:style-name="T330">descriu el servei d’enviament d’anotacions</text:span> de registre a DISTRIBUCIÓ.</text:p>
      <text:p text:style-name="P150">A l'apartat <text:bookmark-ref text:reference-format="number" text:ref-name="__RefNumPara__52044_2521683781">Error: no se encontró el origen de la referencia</text:bookmark-ref><text:span text:style-name="T316"><text:s/></text:span>es <text:span text:style-name="T330">mostra</text:span> com <text:span text:style-name="T329">implementar el servei dels backoffices que rep la llista d’anotacions pendents de processar de</text:span> DISTRIBUCIÓ.</text:p>
      <text:p text:style-name="P150">A l'apartat <text:bookmark-ref text:reference-format="number" text:ref-name="__RefNumPara__81017_1680181998">3</text:bookmark-ref><text:span text:style-name="T316"><text:s/></text:span>es <text:span text:style-name="T332">descriu el servei </text:span><text:span text:style-name="T331">que permet </text:span><text:span text:style-name="T333">als backoffices </text:span><text:span text:style-name="T332">consultar i </text:span><text:span text:style-name="T331">canviar l’estat de les anotacions</text:span><text:span text:style-name="T332"> </text:span><text:span text:style-name="T333">informades des </text:span><text:span text:style-name="T332">de </text:span>DISTRIBUCIÓ<text:span text:style-name="T317">.</text:span></text:p>
      <text:p text:style-name="P149">A l'apartat <text:bookmark-ref text:reference-format="number" text:ref-name="__RefNumPara__52573_2521683781">5</text:bookmark-ref><text:span text:style-name="T316"><text:s/></text:span>es <text:span text:style-name="T332">descriu el servei que permet gestionar les regles de </text:span>DISTRIBUCIÓ<text:span text:style-name="T317">.</text:span></text:p>
      <text:p text:style-name="P370">A l'apartat <text:bookmark-ref text:reference-format="number-all-superior" text:ref-name="__RefHeading___Toc60794_1326387233">5</text:bookmark-ref><text:s/>es detalla la llibreria d'utilitats comunes de <text:span text:style-name="T117">DISTRIBUCIÓ</text:span> per a backoffices per moure els documents annexos dins de l'Arxiu o per interpretar la informació XML de formularis i pagaments provinents de SISTRA2.</text:p>
      <text:list text:continue-list="list112332904566663" text:style-name="Outline">
        <text:list-item>
          <text:h text:style-name="P387" text:outline-level="1"><text:bookmark-start text:name="__RefHeading___Toc160468_1680181998"/><text:bookmark-start text:name="__RefNumPara__81015_1680181998"/><text:span text:style-name="T323">Servei d’e</text:span>nviament d'anotacions <text:bookmark-end text:name="__RefHeading___Toc160468_1680181998"/><text:bookmark-end text:name="__RefNumPara__81015_1680181998"/></text:h>
        </text:list-item>
      </text:list>
      <text:p text:style-name="P220">Aquest servei permet l’enviament d’anotacions de registre a una de les bústies de distribució. Aquest enviament es pot fer de forma síncrona o de forma asíncrona.</text:p>
      <text:p text:style-name="P220"><text:span text:style-name="T318">En aquest apartat es descriu</text:span>en<text:span text:style-name="T318"> e</text:span>ls casos d’ús<text:span text:style-name="T318">, el model de dades i els detalls i el client per a la seva integració.</text:span></text:p>
      <text:p text:style-name="P227"><draw:frame draw:style-name="fr3" draw:name="Marc2" text:anchor-type="as-char" svg:width="9.895cm" draw:z-index="64"><draw:text-box fo:min-height="6.932cm"><text:p text:style-name="P215"><draw:frame draw:style-name="fr7" draw:name="Imatge6" text:anchor-type="paragraph" svg:width="9.895cm" style:rel-width="100%" svg:height="6.932cm" style:rel-height="scale" draw:z-index="65"><draw:image xlink:href="Pictures/100000010000017600000106110C88ED.png" xlink:type="simple" xlink:show="embed" xlink:actuate="onLoad" draw:mime-type="image/png"/></draw:frame>Figura <text:span text:style-name="T117"><text:sequence text:ref-name="refFig.0" text:name="Fig." text:formula="ooow:Fig.+1" style:num-format="1">1</text:sequence></text:span>: <text:s/><text:span text:style-name="T316">Casos d'ús </text:span><text:span text:style-name="T325">de l’enviament</text:span><text:span text:style-name="T318"> d'anotacions a </text:span><text:span text:style-name="T316">DISTRIBUCIO</text:span></text:p></draw:text-box></draw:frame></text:p>
      <text:list text:continue-numbering="true" text:style-name="Outline">
        <text:list-item>
          <text:list>
            <text:list-item>
              <text:h text:style-name="P395" text:outline-level="2"><text:bookmark-start text:name="__RefHeading___Toc16770_2313926538"/>Diagrames d<text:span text:style-name="T325">e seqüència</text:span><text:bookmark-end text:name="__RefHeading___Toc16770_2313926538"/></text:h>
            </text:list-item>
          </text:list>
        </text:list-item>
      </text:list>
      <text:p text:style-name="P143">Segons la configuració de l’aplicació, el processament de l’anotació de registre es <text:span text:style-name="T104">pot dur</text:span> a terme de forma síncrona o de forma asíncrona.</text:p>
      <text:list text:continue-numbering="true" text:style-name="Outline">
        <text:list-item>
          <text:list>
            <text:list-item>
              <text:list>
                <text:list-item>
                  <text:h text:style-name="P409" text:outline-level="3"><text:bookmark-start text:name="__RefHeading___Toc8043_1716379843"/><text:span text:style-name="T324">Processament</text:span> síncron<text:bookmark-end text:name="__RefHeading___Toc8043_1716379843"/></text:h>
                </text:list-item>
              </text:list>
            </text:list-item>
          </text:list>
        </text:list-item>
      </text:list>
      <text:p text:style-name="P145">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41"/>
      <text:p text:style-name="P142"><text:soft-page-break/><text:s text:c="5"/><draw:frame draw:style-name="fr9" draw:name="Imatge2" text:anchor-type="as-char" svg:width="14.526cm" svg:height="7.435cm" draw:z-index="66"><draw:image xlink:href="Pictures/100000010000022500000119572521D6.png" xlink:type="simple" xlink:show="embed" xlink:actuate="onLoad" draw:mime-type="image/png"/></draw:frame><text:s text:c="5"/></text:p>
      <text:p text:style-name="P41"/>
      <text:p text:style-name="P144">La resposta retornada al client podrà retornar un error si alguna de les passes efectuades no s’ha pogut completar correctament.</text:p>
      <text:list text:continue-numbering="true" text:style-name="Outline">
        <text:list-item>
          <text:list>
            <text:list-item>
              <text:list>
                <text:list-item>
                  <text:h text:style-name="P409" text:outline-level="3"><text:bookmark-start text:name="__RefHeading___Toc15562_3365326968"/><text:span text:style-name="T324">Processament</text:span> asíncron<text:bookmark-end text:name="__RefHeading___Toc15562_3365326968"/></text:h>
                </text:list-item>
              </text:list>
            </text:list-item>
          </text:list>
        </text:list-item>
      </text:list>
      <text:p text:style-name="P144">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44"/>
      <text:p text:style-name="P140"><draw:frame draw:style-name="fr9" draw:name="Imatge1" text:anchor-type="as-char" svg:width="14.526cm" svg:height="9.551cm" draw:z-index="67"><draw:image xlink:href="Pictures/10000001000002250000016910C7E6BE.png" xlink:type="simple" xlink:show="embed" xlink:actuate="onLoad" draw:mime-type="image/png"/></draw:frame><text:s text:c="5"/></text:p>
      <text:p text:style-name="P144"><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text:continue-numbering="true" text:style-name="Outline">
        <text:list-item>
          <text:list>
            <text:list-item>
              <text:h text:style-name="P396" text:outline-level="2"><text:bookmark-start text:name="Còpia de __RefHeading___Toc16772_2313926538 2"/><text:bookmark-start text:name="__RefHeading___Toc227353_390838441"/><text:bookmark-start text:name="Còpia de __RefNumPara__80988_1680181998 2"/>Descripció del servei<text:bookmark-end text:name="Còpia de __RefHeading___Toc16772_2313926538 2"/><text:bookmark-end text:name="__RefHeading___Toc227353_390838441"/><text:bookmark-end text:name="Còpia de __RefNumPara__80988_1680181998 2"/></text:h>
            </text:list-item>
          </text:list>
        </text:list-item>
      </text:list>
      <text:p text:style-name="P378"><text:span text:style-name="T323">Aquest servei</text:span> <text:span text:style-name="T323">disposa d’un únic mètode</text:span><text:span text:style-name="T114"> </text:span><text:span text:style-name="T43">enviarAnotacioRegistreEntrada</text:span> <text:span text:style-name="T114">que </text:span><text:span text:style-name="T323">permet l’enviament d’</text:span><text:span text:style-name="T114">anotacions provinents del registre d’entrada.</text:span><text:span text:style-name="T349"> Des de la versió 1.0.6 és possible donar d'alta anotacions amb el servei de l'API REST.</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61">Enviament d’anotacions de registre</text:p>
          </table:table-cell>
          <table:covered-table-cell/>
        </table:table-row>
        <table:table-row table:style-name="Taula12.1">
          <table:table-cell table:style-name="Taula12.A2" office:value-type="string">
            <text:p text:style-name="P40">Adreça</text:p>
          </table:table-cell>
          <table:table-cell table:style-name="Taula12.B2" office:value-type="string">
            <text:p text:style-name="P431">http<text:span text:style-name="T323">s</text:span>://<text:span text:style-name="T323">DISTRIB_HOST</text:span>/distribucio<text:span text:style-name="T349">api</text:span>/<text:span text:style-name="T349">interna/</text:span>bustia<text:span text:style-name="T349">/alta</text:span></text:p>
          </table:table-cell>
        </table:table-row>
        <table:table-row table:style-name="Taula12.1">
          <table:table-cell table:style-name="Taula12.A2" office:value-type="string">
            <text:p text:style-name="P40">Autenticació</text:p>
          </table:table-cell>
          <table:table-cell table:style-name="Taula12.B3" office:value-type="string">
            <text:p text:style-name="P222">HTTP Basic</text:p>
          </table:table-cell>
        </table:table-row>
        <table:table-row table:style-name="Taula12.1">
          <table:table-cell table:style-name="Taula12.A2" office:value-type="string">
            <text:p text:style-name="P40">Rols requerits</text:p>
          </table:table-cell>
          <table:table-cell table:style-name="Taula12.B4" office:value-type="string">
            <text:p text:style-name="P46">DIS_BSTWS</text:p>
          </table:table-cell>
        </table:table-row>
        <table:table-row table:style-name="Taula12.1">
          <table:table-cell table:style-name="Taula12.A2" office:value-type="string">
            <text:p text:style-name="P40">Mètode</text:p>
          </table:table-cell>
          <table:table-cell table:style-name="Taula12.B5" office:value-type="string">
            <text:p text:style-name="P364">enviarAnotacioRegistreEntrada</text:p>
          </table:table-cell>
        </table:table-row>
        <table:table-row table:style-name="Taula12.1">
          <table:table-cell table:style-name="Taula12.A2" office:value-type="string">
            <text:p text:style-name="P40">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22">Nom</text:p>
                </table:table-cell>
                <table:table-cell table:style-name="Taula13.A1" office:value-type="string">
                  <text:p text:style-name="P222">Tipus</text:p>
                </table:table-cell>
                <table:table-cell table:style-name="Taula13.C1" office:value-type="string">
                  <text:p text:style-name="P222">Descripció</text:p>
                </table:table-cell>
              </table:table-row>
              <table:table-row>
                <table:table-cell table:style-name="Taula13.A2" office:value-type="string">
                  <text:p text:style-name="P46">entitat</text:p>
                </table:table-cell>
                <table:table-cell table:style-name="Taula13.B2" office:value-type="string">
                  <text:p text:style-name="P222">String</text:p>
                </table:table-cell>
                <table:table-cell table:style-name="Taula13.C2" office:value-type="string">
                  <text:p text:style-name="P46">El codi de l’entitat de DISTRIBUCIO a on es vol donar d’alta l’anotació.</text:p>
                </table:table-cell>
              </table:table-row>
              <table:table-row>
                <table:table-cell table:style-name="Taula13.A3" office:value-type="string">
                  <text:p text:style-name="P46">unitatAdministrativa</text:p>
                </table:table-cell>
                <table:table-cell table:style-name="Taula13.B3" office:value-type="string">
                  <text:p text:style-name="P222">String</text:p>
                </table:table-cell>
                <table:table-cell table:style-name="Taula13.C3" office:value-type="string">
                  <text:p text:style-name="P46">El codi DIR3 de la unitat administrativa destinatària de l’anotació de registre.</text:p>
                </table:table-cell>
              </table:table-row>
              <table:table-row>
                <table:table-cell table:style-name="Taula13.A4" office:value-type="string">
                  <text:p text:style-name="P46">registreEntrada</text:p>
                </table:table-cell>
                <table:table-cell table:style-name="Taula13.B4" office:value-type="string">
                  <text:p text:style-name="P222">RegistreAnotacio</text:p>
                </table:table-cell>
                <table:table-cell table:style-name="Taula13.C4" office:value-type="string">
                  <text:p text:style-name="P46">objecte amb la informació associada a l’anotació de registre</text:p>
                </table:table-cell>
              </table:table-row>
            </table:table>
            <text:p text:style-name="P46"/>
          </table:table-cell>
        </table:table-row>
        <table:table-row table:style-name="Taula12.1">
          <table:table-cell table:style-name="Taula12.A2" office:value-type="string">
            <text:p text:style-name="P40">Valor retornat</text:p>
          </table:table-cell>
          <table:table-cell table:style-name="Taula12.B7" office:value-type="string">
            <text:p text:style-name="P222">(no retorna cap valor)</text:p>
          </table:table-cell>
        </table:table-row>
      </table:table>
      <text:p text:style-name="P365"/>
      <text:p text:style-name="P367">Per a més informació sobre com emplenar correctament l’objecte de tipus RegistreEntrada es pot consultar el punt <text:bookmark-ref text:reference-format="number" text:ref-name="__RefNumPara__80988_1680181998">2.3</text:bookmark-ref><text:s/>d’aquest mateix document.</text:p>
      <text:p text:style-name="P367">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text:continue-numbering="true" text:style-name="Outline">
        <text:list-item>
          <text:list>
            <text:list-item>
              <text:h text:style-name="P393" text:outline-level="2"><text:bookmark-start text:name="__RefHeading___Toc16772_2313926538"/><text:bookmark-start text:name="__RefNumPara__80988_1680181998"/>Model de <text:span text:style-name="T323">dades</text:span> <text:bookmark-end text:name="__RefHeading___Toc16772_2313926538"/><text:bookmark-end text:name="__RefNumPara__80988_1680181998"/></text:h>
            </text:list-item>
          </text:list>
        </text:list-item>
      </text:list>
      <text:p text:style-name="P366">Aquest és el model de <text:span text:style-name="T323">dades</text:span> del servei d’<text:span text:style-name="T103">enviament d’anotacions de registre</text:span>.</text:p>
      <text:p text:style-name="P366"><draw:frame draw:style-name="fr10" draw:name="Image1" text:anchor-type="paragraph" svg:width="16.669cm" svg:height="23.971cm" draw:z-index="56"><draw:image xlink:href="Pictures/200000090000411E00005DA44F15E491.svm" xlink:type="simple" xlink:show="embed" xlink:actuate="onLoad" draw:mime-type="image/x-svm"/><draw:image xlink:href="Pictures/10000001000002770000038BE4555057.png" xlink:type="simple" xlink:show="embed" xlink:actuate="onLoad" draw:mime-type="image/png"/></draw:frame><text:soft-page-break/></text:p>
      <text:p text:style-name="P131"><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table-cell table:style-name="Taula17.A1" table:number-columns-spanned="5" office:value-type="string">
            <text:p text:style-name="P133">RegistreAnotacio</text:p>
          </table:table-cell>
          <table:covered-table-cell/>
          <table:covered-table-cell/>
          <table:covered-table-cell/>
          <table:covered-table-cell/>
        </table:table-row>
        <table:table-row>
          <table:table-cell table:style-name="Taula17.A2" office:value-type="string">
            <text:p text:style-name="P33">Nom del camp</text:p>
          </table:table-cell>
          <table:table-cell table:style-name="Taula17.A2" office:value-type="string">
            <text:p text:style-name="P33">Tipus</text:p>
          </table:table-cell>
          <table:table-cell table:style-name="Taula17.A2" office:value-type="string">
            <text:p text:style-name="P33">Mult.</text:p>
          </table:table-cell>
          <table:table-cell table:style-name="Taula17.A2" office:value-type="string">
            <text:p text:style-name="P35">Tamany</text:p>
          </table:table-cell>
          <table:table-cell table:style-name="Taula17.E2" office:value-type="string">
            <text:p text:style-name="P35">Descripció</text:p>
          </table:table-cell>
        </table:table-row>
        <table:table-row>
          <table:table-cell table:style-name="Taula17.A3" office:value-type="string">
            <text:p text:style-name="P243">tipusES</text:p>
          </table:table-cell>
          <table:table-cell table:style-name="Taula17.A3" office:value-type="string">
            <text:p text:style-name="P243">Cadena</text:p>
          </table:table-cell>
          <table:table-cell table:style-name="Taula17.A3" office:value-type="string">
            <text:p text:style-name="P244">0..1</text:p>
          </table:table-cell>
          <table:table-cell table:style-name="Taula17.D3" office:value-type="float" office:value="1">
            <text:p text:style-name="P244">1</text:p>
          </table:table-cell>
          <table:table-cell table:style-name="Taula17.E3" office:value-type="string">
            <text:p text:style-name="P243">Tipus d'assentament registral:<text:line-break/>- "E": entrada<text:line-break/>- "S": sortida<text:line-break/>El camp no és obligatori i si no s'informa es prendrà "E" per defecte.</text:p>
          </table:table-cell>
        </table:table-row>
        <table:table-row>
          <table:table-cell table:style-name="Taula17.A3" office:value-type="string">
            <text:p text:style-name="P246">numero</text:p>
          </table:table-cell>
          <table:table-cell table:style-name="Taula17.A3" office:value-type="string">
            <text:p text:style-name="P247">Cadena</text:p>
          </table:table-cell>
          <table:table-cell table:style-name="Taula17.D3" office:value-type="float" office:value="1">
            <text:p text:style-name="P248">1</text:p>
          </table:table-cell>
          <table:table-cell table:style-name="Taula17.D3" office:value-type="float" office:value="255">
            <text:p text:style-name="P343"><text:span text:style-name="T247">2</text:span>5<text:span text:style-name="T247">5</text:span></text:p>
          </table:table-cell>
          <table:table-cell table:style-name="Taula17.E3" office:value-type="string">
            <text:p text:style-name="P250">Número identificador de l’assentament registral. És únic.</text:p>
          </table:table-cell>
        </table:table-row>
        <table:table-row>
          <table:table-cell table:style-name="Taula17.A3" office:value-type="string">
            <text:p text:style-name="P246">data</text:p>
          </table:table-cell>
          <table:table-cell table:style-name="Taula17.A3" office:value-type="string">
            <text:p text:style-name="P252">Data</text:p>
          </table:table-cell>
          <table:table-cell table:style-name="Taula17.A3" office:value-type="string">
            <text:p text:style-name="P248">1</text:p>
          </table:table-cell>
          <table:table-cell table:style-name="Taula17.A3" office:value-type="string">
            <text:p text:style-name="P254">14</text:p>
          </table:table-cell>
          <table:table-cell table:style-name="Taula17.E5" office:value-type="string">
            <text:p text:style-name="P252">Data de <text:span text:style-name="T105">l’assentament.</text:span> </text:p>
          </table:table-cell>
        </table:table-row>
        <table:table-row>
          <table:table-cell table:style-name="Taula17.A3" office:value-type="string">
            <text:p text:style-name="P246"><text:span text:style-name="T106">d</text:span>ataOrigen</text:p>
          </table:table-cell>
          <table:table-cell table:style-name="Taula17.A3" office:value-type="string">
            <text:p text:style-name="P252">Data</text:p>
          </table:table-cell>
          <table:table-cell table:style-name="Taula17.A3" office:value-type="string">
            <text:p text:style-name="P248">0..1</text:p>
          </table:table-cell>
          <table:table-cell table:style-name="Taula17.A3" office:value-type="string">
            <text:p text:style-name="P255">14</text:p>
          </table:table-cell>
          <table:table-cell table:style-name="Taula17.E6" office:value-type="string">
            <text:p text:style-name="P252">Data <text:span text:style-name="T105">origen </text:span>de l’assentament.</text:p>
          </table:table-cell>
        </table:table-row>
        <table:table-row>
          <table:table-cell table:style-name="Taula17.A3" office:value-type="string">
            <text:p text:style-name="P257">identificador</text:p>
          </table:table-cell>
          <table:table-cell table:style-name="Taula17.A3" office:value-type="string">
            <text:p text:style-name="P258">Cadena</text:p>
          </table:table-cell>
          <table:table-cell table:style-name="Taula17.A3" office:value-type="string">
            <text:p text:style-name="P259">1</text:p>
          </table:table-cell>
          <table:table-cell table:style-name="Taula17.A3" office:value-type="string">
            <text:p text:style-name="P343">1<text:span text:style-name="T249">00</text:span></text:p>
          </table:table-cell>
          <table:table-cell table:style-name="Taula17.E7" office:value-type="string">
            <text:p text:style-name="P250">Codi identificador de l’assentament registral.</text:p>
          </table:table-cell>
        </table:table-row>
        <table:table-row>
          <table:table-cell table:style-name="Taula17.A3" office:value-type="string">
            <text:p text:style-name="P257">entitatCodi</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345">2<text:span text:style-name="T247">55</text:span></text:p>
          </table:table-cell>
          <table:table-cell table:style-name="Taula17.E8" office:value-type="string">
            <text:p text:style-name="P250">Codi <text:span text:style-name="T107">DIR3 </text:span>de l’entitat governamental a la que va dirigit l’assentament registral.</text:p>
          </table:table-cell>
        </table:table-row>
        <table:table-row>
          <table:table-cell table:style-name="Taula17.A3" office:value-type="string">
            <text:p text:style-name="P257">entitatDescripcio</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346">2<text:span text:style-name="T247">55</text:span></text:p>
          </table:table-cell>
          <table:table-cell table:style-name="Taula17.E9" office:value-type="string">
            <text:p text:style-name="P250"><text:span text:style-name="T107">Descripció DIR3</text:span> de l’entitat governamental a la que va dirigit l’assentament registral.</text:p>
          </table:table-cell>
        </table:table-row>
        <table:table-row>
          <table:table-cell table:style-name="Taula17.A3" office:value-type="string">
            <text:p text:style-name="P257">oficinaCodi</text:p>
          </table:table-cell>
          <table:table-cell table:style-name="Taula17.A3" office:value-type="string">
            <text:p text:style-name="P258">Cadena</text:p>
          </table:table-cell>
          <table:table-cell table:style-name="Taula17.A3" office:value-type="string">
            <text:p text:style-name="P259">1</text:p>
          </table:table-cell>
          <table:table-cell table:style-name="Taula17.A3" office:value-type="string">
            <text:p text:style-name="P255">21</text:p>
          </table:table-cell>
          <table:table-cell table:style-name="Taula17.E10" office:value-type="string">
            <text:p text:style-name="P262">Codi DIR3 de l’oficina on es registre.</text:p>
          </table:table-cell>
        </table:table-row>
        <table:table-row>
          <table:table-cell table:style-name="Taula17.A3" office:value-type="string">
            <text:p text:style-name="P257">oficinaDescripcio</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64"><text:span text:style-name="T248">3</text:span>00</text:p>
          </table:table-cell>
          <table:table-cell table:style-name="Taula17.E11" office:value-type="string">
            <text:p text:style-name="P252">Denominació DIR3 de l'entitat registral on es registre l'assentament.</text:p>
          </table:table-cell>
        </table:table-row>
        <table:table-row>
          <table:table-cell table:style-name="Taula17.A3" office:value-type="string">
            <text:p text:style-name="P257">oficinaOrigenCodi</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55">21</text:p>
          </table:table-cell>
          <table:table-cell table:style-name="Taula17.E12" office:value-type="string">
            <text:p text:style-name="P252"/>
          </table:table-cell>
        </table:table-row>
        <table:table-row>
          <table:table-cell table:style-name="Taula17.A3" office:value-type="string">
            <text:p text:style-name="P257">oficinaOrigenDescripcio</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64">100</text:p>
          </table:table-cell>
          <table:table-cell table:style-name="Taula17.E13" office:value-type="string">
            <text:p text:style-name="P252"/>
          </table:table-cell>
        </table:table-row>
        <table:table-row>
          <table:table-cell table:style-name="Taula17.A3" office:value-type="string">
            <text:p text:style-name="P257">llibreCodi</text:p>
          </table:table-cell>
          <table:table-cell table:style-name="Taula17.A3" office:value-type="string">
            <text:p text:style-name="P258">Cadena</text:p>
          </table:table-cell>
          <table:table-cell table:style-name="Taula17.A3" office:value-type="string">
            <text:p text:style-name="P259">1</text:p>
          </table:table-cell>
          <table:table-cell table:style-name="Taula17.A3" office:value-type="string">
            <text:p text:style-name="P255">4</text:p>
          </table:table-cell>
          <table:table-cell table:style-name="Taula17.E14" office:value-type="string">
            <text:p text:style-name="P262">Codi del llibre al qual s’ha fet l’assentament registral rebut.</text:p>
          </table:table-cell>
        </table:table-row>
        <table:table-row>
          <table:table-cell table:style-name="Taula17.A3" office:value-type="string">
            <text:p text:style-name="P257">llibreDescripcio</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84">255</text:p>
          </table:table-cell>
          <table:table-cell table:style-name="Taula17.E15" office:value-type="string">
            <text:p text:style-name="P262">Denominació del llibre al qual s’ha fet l’assentament registral rebut.</text:p>
          </table:table-cell>
        </table:table-row>
        <table:table-row>
          <table:table-cell table:style-name="Taula17.A3" office:value-type="string">
            <text:p text:style-name="P257">extracte</text:p>
          </table:table-cell>
          <table:table-cell table:style-name="Taula17.A3" office:value-type="string">
            <text:p text:style-name="P258">Cadena</text:p>
          </table:table-cell>
          <table:table-cell table:style-name="Taula17.A3" office:value-type="string">
            <text:p text:style-name="P259">1</text:p>
          </table:table-cell>
          <table:table-cell table:style-name="Taula17.A3" office:value-type="string">
            <text:p text:style-name="P264">240</text:p>
          </table:table-cell>
          <table:table-cell table:style-name="Taula17.E16" office:value-type="string">
            <text:p text:style-name="P252">Extracte o resum de l'assentament.</text:p>
          </table:table-cell>
        </table:table-row>
        <table:table-row>
          <table:table-cell table:style-name="Taula17.A3" office:value-type="string">
            <text:p text:style-name="P257">assumpteTipusCodi</text:p>
          </table:table-cell>
          <table:table-cell table:style-name="Taula17.A3" office:value-type="string">
            <text:p text:style-name="P258">Cadena</text:p>
          </table:table-cell>
          <table:table-cell table:style-name="Taula17.A3" office:value-type="string">
            <text:p text:style-name="P259"><text:span text:style-name="T125">0..</text:span>1</text:p>
          </table:table-cell>
          <table:table-cell table:style-name="Taula17.A3" office:value-type="string">
            <text:p text:style-name="P255">16</text:p>
          </table:table-cell>
          <table:table-cell table:style-name="Taula17.E17" office:value-type="string">
            <text:p text:style-name="P262">Codi del tipus d’assumpte de l’assentament registral.</text:p>
          </table:table-cell>
        </table:table-row>
        <table:table-row>
          <table:table-cell table:style-name="Taula17.A3" office:value-type="string">
            <text:p text:style-name="P257">assumpteTipusDescripcio</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64">100</text:p>
          </table:table-cell>
          <table:table-cell table:style-name="Taula17.E18" office:value-type="string">
            <text:p text:style-name="P262">Denominació del tipus d’assumpte de l’assentament registral.</text:p>
          </table:table-cell>
        </table:table-row>
        <table:table-row>
          <table:table-cell table:style-name="Taula17.A3" office:value-type="string">
            <text:p text:style-name="P257">assumpteCodi</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55">16</text:p>
          </table:table-cell>
          <table:table-cell table:style-name="Taula17.E19" office:value-type="string">
            <text:p text:style-name="P262">Codi de l’assumpte.</text:p>
          </table:table-cell>
        </table:table-row>
        <table:table-row>
          <table:table-cell table:style-name="Taula17.A3" office:value-type="string">
            <text:p text:style-name="P257"><text:span text:style-name="T107">a</text:span>ssumpteDescripcio</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343">2<text:span text:style-name="T250">55</text:span></text:p>
          </table:table-cell>
          <table:table-cell table:style-name="Taula17.E20" office:value-type="string">
            <text:p text:style-name="P262">Denominació de l’assumpte.</text:p>
          </table:table-cell>
        </table:table-row>
        <table:table-row>
          <table:table-cell table:style-name="Taula17.A3" office:value-type="string">
            <text:p text:style-name="P257">referencia</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55">16</text:p>
          </table:table-cell>
          <table:table-cell table:style-name="Taula17.E21" office:value-type="string">
            <text:p text:style-name="P252">Referència externa a qualque element de l'assentament.</text:p>
          </table:table-cell>
        </table:table-row>
        <table:table-row>
          <table:table-cell table:style-name="Taula17.A3" office:value-type="string">
            <text:p text:style-name="P257">expedientNumero</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55">80</text:p>
          </table:table-cell>
          <table:table-cell table:style-name="Taula17.E22" office:value-type="string">
            <text:p text:style-name="P252">Referència al nombre d'expedient de l'assentament.</text:p>
          </table:table-cell>
        </table:table-row>
        <table:table-row>
          <table:table-cell table:style-name="Taula17.A3" office:value-type="string">
            <text:p text:style-name="P257">numeroOrigen</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55">80</text:p>
          </table:table-cell>
          <table:table-cell table:style-name="Taula17.E23" office:value-type="string">
            <text:p text:style-name="P252"/>
          </table:table-cell>
        </table:table-row>
        <table:table-row>
          <table:table-cell table:style-name="Taula17.A3" office:value-type="string">
            <text:p text:style-name="P257">idiomaCodi</text:p>
          </table:table-cell>
          <table:table-cell table:style-name="Taula17.A3" office:value-type="string">
            <text:p text:style-name="P258">Cadena</text:p>
          </table:table-cell>
          <table:table-cell table:style-name="Taula17.A3" office:value-type="string">
            <text:p text:style-name="P259">1</text:p>
          </table:table-cell>
          <table:table-cell table:style-name="Taula17.A3" office:value-type="string">
            <text:p text:style-name="P255">2</text:p>
          </table:table-cell>
          <table:table-cell table:style-name="Taula17.E24" office:value-type="string">
            <text:p text:style-name="P266">Codi d’idioma amb el que s’ha fet l’assentament.</text:p>
          </table:table-cell>
        </table:table-row>
        <text:soft-page-break/>
        <table:table-row>
          <table:table-cell table:style-name="Taula17.A3" office:value-type="string">
            <text:p text:style-name="P257">idiomaDescripcio</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64">100</text:p>
          </table:table-cell>
          <table:table-cell table:style-name="Taula17.E25" office:value-type="string">
            <text:p text:style-name="P266">Descripció d’idioma amb el que s’ha fet l’assentament.</text:p>
          </table:table-cell>
        </table:table-row>
        <table:table-row>
          <table:table-cell table:style-name="Taula17.A3" office:value-type="string">
            <text:p text:style-name="P258">transportTipusCodi</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55">2<text:span text:style-name="T251">0</text:span></text:p>
          </table:table-cell>
          <table:table-cell table:style-name="Taula17.E26" office:value-type="string">
            <text:p text:style-name="P252">Codi SICRES3 del segment internos – tipo transporte.</text:p>
          </table:table-cell>
        </table:table-row>
        <table:table-row>
          <table:table-cell table:style-name="Taula17.A3" office:value-type="string">
            <text:p text:style-name="P258">transportTipusDescripcio</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64">100</text:p>
          </table:table-cell>
          <table:table-cell table:style-name="Taula17.E27" office:value-type="string">
            <text:p text:style-name="P252">Descripció SICRES3 del segment internos – tipo transporte.</text:p>
          </table:table-cell>
        </table:table-row>
        <table:table-row>
          <table:table-cell table:style-name="Taula17.A3" office:value-type="string">
            <text:p text:style-name="P258">transportNumero</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55">20</text:p>
          </table:table-cell>
          <table:table-cell table:style-name="Taula17.E28" office:value-type="string">
            <text:p text:style-name="P252">Número del transport.</text:p>
          </table:table-cell>
        </table:table-row>
        <table:table-row>
          <table:table-cell table:style-name="Taula17.A3" office:value-type="string">
            <text:p text:style-name="P258">usuariCodi</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55">20</text:p>
          </table:table-cell>
          <table:table-cell table:style-name="Taula17.E29" office:value-type="string">
            <text:p text:style-name="P252">Codi de l'usuari que vol realitzar l'operació.</text:p>
          </table:table-cell>
        </table:table-row>
        <table:table-row>
          <table:table-cell table:style-name="Taula17.A3" office:value-type="string">
            <text:p text:style-name="P258">usuariNom</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345">7<text:span text:style-name="T252">67</text:span></text:p>
          </table:table-cell>
          <table:table-cell table:style-name="Taula17.E30" office:value-type="string">
            <text:p text:style-name="P252"><text:span text:style-name="T108">Nom</text:span> de l'usuari que vol realitzar l'operació.</text:p>
          </table:table-cell>
        </table:table-row>
        <table:table-row>
          <table:table-cell table:style-name="Taula17.A3" office:value-type="string">
            <text:p text:style-name="P258">usuariContacte</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343">2<text:span text:style-name="T253">55</text:span></text:p>
          </table:table-cell>
          <table:table-cell table:style-name="Taula17.E31" office:value-type="string">
            <text:p text:style-name="P252">Contacte de l'usuari que fa l'assentament. Si és un registre electrònic el responsable del tràmit.</text:p>
          </table:table-cell>
        </table:table-row>
        <table:table-row>
          <table:table-cell table:style-name="Taula17.A3" office:value-type="string">
            <text:p text:style-name="P258">aplicacioCodi</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343">2<text:span text:style-name="T254">55</text:span></text:p>
          </table:table-cell>
          <table:table-cell table:style-name="Taula17.E32" office:value-type="string">
            <text:p text:style-name="P266">Codi de l’aplicació que fa l’enviament de l’assentament registral.</text:p>
          </table:table-cell>
        </table:table-row>
        <table:table-row>
          <table:table-cell table:style-name="Taula17.A3" office:value-type="string">
            <text:p text:style-name="P258">aplicacioVersio</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343">2<text:span text:style-name="T254">55</text:span></text:p>
          </table:table-cell>
          <table:table-cell table:style-name="Taula17.E33" office:value-type="string">
            <text:p text:style-name="P266">Versió de l’aplicació que fa l’enviament de l’assentament registral.</text:p>
          </table:table-cell>
        </table:table-row>
        <table:table-row>
          <table:table-cell table:style-name="Taula17.A3" office:value-type="string">
            <text:p text:style-name="P258">documentacioFisicaCodi</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68">19</text:p>
          </table:table-cell>
          <table:table-cell table:style-name="Taula17.E34" office:value-type="string">
            <text:p text:style-name="P252">Codi SICRES del segment internos – Documentación física y/o soportes.</text:p>
          </table:table-cell>
        </table:table-row>
        <table:table-row>
          <table:table-cell table:style-name="Taula17.A3" office:value-type="string">
            <text:p text:style-name="P258">documentacioFisicaDescripcio</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64">100</text:p>
          </table:table-cell>
          <table:table-cell table:style-name="Taula17.E35" office:value-type="string">
            <text:p text:style-name="P266">Descripció del segment internos – Documentación física y/o soportes</text:p>
          </table:table-cell>
        </table:table-row>
        <table:table-row>
          <table:table-cell table:style-name="Taula17.A3" office:value-type="string">
            <text:p text:style-name="P258">observacions</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64">50</text:p>
          </table:table-cell>
          <table:table-cell table:style-name="Taula17.E36" office:value-type="string">
            <text:p text:style-name="P266">Observacions de l’assentament.</text:p>
          </table:table-cell>
        </table:table-row>
        <table:table-row>
          <table:table-cell table:style-name="Taula17.A3" office:value-type="string">
            <text:p text:style-name="P258">exposa</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69">lob</text:p>
          </table:table-cell>
          <table:table-cell table:style-name="Taula17.E37" office:value-type="string">
            <text:p text:style-name="P266">Exposició de fets.</text:p>
          </table:table-cell>
        </table:table-row>
        <table:table-row>
          <table:table-cell table:style-name="Taula17.A3" office:value-type="string">
            <text:p text:style-name="P258">solicita</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269">lob</text:p>
          </table:table-cell>
          <table:table-cell table:style-name="Taula17.E38" office:value-type="string">
            <text:p text:style-name="P266">Objecte de la sol·licitud si escau.</text:p>
          </table:table-cell>
        </table:table-row>
        <table:table-row>
          <table:table-cell table:style-name="Taula17.A3" office:value-type="string">
            <text:p text:style-name="P258">interessats</text:p>
          </table:table-cell>
          <table:table-cell table:style-name="Taula17.A3" office:value-type="string">
            <text:p text:style-name="P258">RegistreInteressat</text:p>
          </table:table-cell>
          <table:table-cell table:style-name="Taula17.A3" office:value-type="string">
            <text:p text:style-name="P248">0..<text:span text:style-name="T109">n</text:span> </text:p>
          </table:table-cell>
          <table:table-cell table:style-name="Taula17.A3" office:value-type="string">
            <text:p text:style-name="P264"/>
          </table:table-cell>
          <table:table-cell table:style-name="Taula17.E39" office:value-type="string">
            <text:p text:style-name="P270">Dades que componen els interessats de l’assentament registral si n’hi ha.</text:p>
          </table:table-cell>
        </table:table-row>
        <table:table-row>
          <table:table-cell table:style-name="Taula17.A3" office:value-type="string">
            <text:p text:style-name="P258">annexos</text:p>
          </table:table-cell>
          <table:table-cell table:style-name="Taula17.A3" office:value-type="string">
            <text:p text:style-name="P258">RegistreAnnex</text:p>
          </table:table-cell>
          <table:table-cell table:style-name="Taula17.A3" office:value-type="string">
            <text:p text:style-name="P248">0..<text:span text:style-name="T109">n</text:span> </text:p>
          </table:table-cell>
          <table:table-cell table:style-name="Taula17.A3" office:value-type="string">
            <text:p text:style-name="P264"/>
          </table:table-cell>
          <table:table-cell table:style-name="Taula17.E40" office:value-type="string">
            <text:p text:style-name="P270">Dades que componen els annexos dels assentaments registrals si n’hi ha.</text:p>
          </table:table-cell>
        </table:table-row>
        <table:table-row>
          <table:table-cell table:style-name="Taula17.A3" office:value-type="string">
            <text:p text:style-name="P258">justificant</text:p>
          </table:table-cell>
          <table:table-cell table:style-name="Taula17.A3" office:value-type="string">
            <text:p text:style-name="P258">RegistreAnnex</text:p>
          </table:table-cell>
          <table:table-cell table:style-name="Taula17.A3" office:value-type="string">
            <text:p text:style-name="P259">0..1</text:p>
          </table:table-cell>
          <table:table-cell table:style-name="Taula17.A3" office:value-type="string">
            <text:p text:style-name="P272"/>
          </table:table-cell>
          <table:table-cell table:style-name="Taula17.E41" office:value-type="string">
            <text:p text:style-name="P270">Dades que componen el justificant de l’assentament registral si n’hi ha. Es compon de les mateixes dades que un annex.</text:p>
          </table:table-cell>
        </table:table-row>
        <table:table-row>
          <table:table-cell table:style-name="Taula17.A3" office:value-type="string">
            <text:p text:style-name="P257"><text:span text:style-name="T122">procediment</text:span>Codi</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345">6<text:span text:style-name="T255">4</text:span></text:p>
          </table:table-cell>
          <table:table-cell table:style-name="Taula17.E42" office:value-type="string">
            <text:p text:style-name="P262">Codi <text:span text:style-name="T342">SIA </text:span>de<text:span text:style-name="T342">l</text:span> <text:span text:style-name="T122">procediment</text:span>.</text:p>
          </table:table-cell>
        </table:table-row>
        <table:table-row>
          <table:table-cell table:style-name="Taula17.A3" office:value-type="string">
            <text:p text:style-name="P257"><text:span text:style-name="T342">servei</text:span>Codi</text:p>
          </table:table-cell>
          <table:table-cell table:style-name="Taula17.A3" office:value-type="string">
            <text:p text:style-name="P258">Cadena</text:p>
          </table:table-cell>
          <table:table-cell table:style-name="Taula17.A3" office:value-type="string">
            <text:p text:style-name="P248">0..1</text:p>
          </table:table-cell>
          <table:table-cell table:style-name="Taula17.A3" office:value-type="string">
            <text:p text:style-name="P345">6<text:span text:style-name="T255">4</text:span></text:p>
          </table:table-cell>
          <table:table-cell table:style-name="Taula17.E42" office:value-type="string">
            <text:p text:style-name="P262">Codi <text:span text:style-name="T342">SIA </text:span>de<text:span text:style-name="T342">l servei</text:span>.</text:p>
          </table:table-cell>
        </table:table-row>
        <table:table-row>
          <table:table-cell table:style-name="Taula17.A3" office:value-type="string">
            <text:p text:style-name="P243">presencial</text:p>
          </table:table-cell>
          <table:table-cell table:style-name="Taula17.A3" office:value-type="string">
            <text:p text:style-name="P243">Boolea</text:p>
          </table:table-cell>
          <table:table-cell table:style-name="Taula17.A3" office:value-type="string">
            <text:p text:style-name="P244">0..1</text:p>
          </table:table-cell>
          <table:table-cell table:style-name="Taula17.A3" office:value-type="string">
            <text:p text:style-name="P273"/>
          </table:table-cell>
          <table:table-cell table:style-name="Taula17.E44" office:value-type="string">
            <text:p text:style-name="P243">Paràmetre booleà per indicar si el registre és prensencial</text:p>
          </table:table-cell>
        </table:table-row>
      </table:table>
      <text:p text:style-name="P237"/>
      <text:p text:style-name="P235"/>
      <table:table table:name="Taula18" table:style-name="Taula18">
        <table:table-column table:style-name="Taula18.A"/>
        <table:table-column table:style-name="Taula18.B"/>
        <table:table-column table:style-name="Taula18.C"/>
        <table:table-column table:style-name="Taula18.D"/>
        <table:table-column table:style-name="Taula18.E"/>
        <table:table-row>
          <table:table-cell table:style-name="Taula18.A1" table:number-columns-spanned="5" office:value-type="string">
            <text:p text:style-name="P133">Registre<text:span text:style-name="T113">Annex</text:span> </text:p>
          </table:table-cell>
          <table:covered-table-cell/>
          <table:covered-table-cell/>
          <table:covered-table-cell/>
          <table:covered-table-cell/>
        </table:table-row>
        <table:table-row>
          <table:table-cell table:style-name="Taula18.A2" office:value-type="string">
            <text:p text:style-name="P33">Nom del camp</text:p>
          </table:table-cell>
          <table:table-cell table:style-name="Taula18.A2" office:value-type="string">
            <text:p text:style-name="P33">Tipus</text:p>
          </table:table-cell>
          <table:table-cell table:style-name="Taula18.A2" office:value-type="string">
            <text:p text:style-name="P33">Mult.</text:p>
          </table:table-cell>
          <table:table-cell table:style-name="Taula18.A2" office:value-type="string">
            <text:p text:style-name="P35">Tamany</text:p>
          </table:table-cell>
          <table:table-cell table:style-name="Taula18.E2" office:value-type="string">
            <text:p text:style-name="P35">Descripció</text:p>
          </table:table-cell>
        </table:table-row>
        <table:table-row>
          <table:table-cell table:style-name="Taula18.A3" office:value-type="string">
            <text:p text:style-name="P274">titol</text:p>
          </table:table-cell>
          <table:table-cell table:style-name="Taula18.A3" office:value-type="string">
            <text:p text:style-name="P277">Cadena</text:p>
          </table:table-cell>
          <table:table-cell table:style-name="Taula18.A3" office:value-type="string">
            <text:p text:style-name="P278">1</text:p>
          </table:table-cell>
          <table:table-cell table:style-name="Taula18.D3" office:value-type="float" office:value="200">
            <text:p text:style-name="P275">200</text:p>
          </table:table-cell>
          <table:table-cell table:style-name="Taula18.E3" office:value-type="string">
            <text:p text:style-name="P279">Títol del document</text:p>
          </table:table-cell>
        </table:table-row>
        <text:soft-page-break/>
        <table:table-row>
          <table:table-cell table:style-name="Taula18.A3" office:value-type="string">
            <text:p text:style-name="P274">fitxerNom</text:p>
          </table:table-cell>
          <table:table-cell table:style-name="Taula18.A3" office:value-type="string">
            <text:p text:style-name="P277">Cadena</text:p>
          </table:table-cell>
          <table:table-cell table:style-name="Taula18.D3" office:value-type="float" office:value="1">
            <text:p text:style-name="P278">1</text:p>
          </table:table-cell>
          <table:table-cell table:style-name="Taula18.D3" office:value-type="float" office:value="256">
            <text:p text:style-name="P347">2<text:span text:style-name="T256">56</text:span></text:p>
          </table:table-cell>
          <table:table-cell table:style-name="Taula18.E4" office:value-type="string">
            <text:p text:style-name="P279">Nom del fitxer annexat</text:p>
          </table:table-cell>
        </table:table-row>
        <table:table-row>
          <table:table-cell table:style-name="Taula18.A3" office:value-type="string">
            <text:p text:style-name="P274">fitxerTamany</text:p>
          </table:table-cell>
          <table:table-cell table:style-name="Taula18.A3" office:value-type="string">
            <text:p text:style-name="P275">Numèric</text:p>
          </table:table-cell>
          <table:table-cell table:style-name="Taula18.A3" office:value-type="string">
            <text:p text:style-name="P278">0..1</text:p>
          </table:table-cell>
          <table:table-cell table:style-name="Taula18.A3" office:value-type="string">
            <text:p text:style-name="P275"/>
          </table:table-cell>
          <table:table-cell table:style-name="Taula18.E5" office:value-type="string">
            <text:p text:style-name="P279">Tamany en <text:span text:style-name="T268">bytes</text:span> del fitxer annexat</text:p>
          </table:table-cell>
        </table:table-row>
        <table:table-row>
          <table:table-cell table:style-name="Taula18.A3" office:value-type="string">
            <text:p text:style-name="P274">fitxerTipusMime</text:p>
          </table:table-cell>
          <table:table-cell table:style-name="Taula18.A3" office:value-type="string">
            <text:p text:style-name="P277">Cadena</text:p>
          </table:table-cell>
          <table:table-cell table:style-name="Taula18.A3" office:value-type="string">
            <text:p text:style-name="P278">1</text:p>
          </table:table-cell>
          <table:table-cell table:style-name="Taula18.A3" office:value-type="string">
            <text:p text:style-name="P347">3<text:span text:style-name="T256">0</text:span></text:p>
          </table:table-cell>
          <table:table-cell table:style-name="Taula18.E6" office:value-type="string">
            <text:p text:style-name="P279">Tipus MIME del fitxer annexat</text:p>
          </table:table-cell>
        </table:table-row>
        <table:table-row>
          <table:table-cell table:style-name="Taula18.A3" office:value-type="string">
            <text:p text:style-name="P274">fitxerArxiuUuid</text:p>
          </table:table-cell>
          <table:table-cell table:style-name="Taula18.A3" office:value-type="string">
            <text:p text:style-name="P277">Cadena</text:p>
          </table:table-cell>
          <table:table-cell table:style-name="Taula18.A3" office:value-type="string">
            <text:p text:style-name="P278">0..1</text:p>
          </table:table-cell>
          <table:table-cell table:style-name="Taula18.D3" office:value-type="float" office:value="256">
            <text:p text:style-name="P347">2<text:span text:style-name="T257">56</text:span></text:p>
          </table:table-cell>
          <table:table-cell table:style-name="Taula18.E7" office:value-type="string">
            <text:p text:style-name="P279">Uuid de l’arxiu digital si s’escau</text:p>
          </table:table-cell>
        </table:table-row>
        <table:table-row>
          <table:table-cell table:style-name="Taula18.A3" office:value-type="string">
            <text:p text:style-name="P274">fitxerContingut</text:p>
          </table:table-cell>
          <table:table-cell table:style-name="Taula18.A3" office:value-type="string">
            <text:p text:style-name="P275">Byte[]</text:p>
          </table:table-cell>
          <table:table-cell table:style-name="Taula18.A3" office:value-type="string">
            <text:p text:style-name="P278">0..1</text:p>
          </table:table-cell>
          <table:table-cell table:style-name="Taula18.A3" office:value-type="string">
            <text:p text:style-name="P275"/>
          </table:table-cell>
          <table:table-cell table:style-name="Taula18.E8" office:value-type="string">
            <text:p text:style-name="P279">Cadena de bytes que compon el contingut del fitxer annexat</text:p>
          </table:table-cell>
        </table:table-row>
        <table:table-row>
          <table:table-cell table:style-name="Taula18.A3" office:value-type="string">
            <text:p text:style-name="P274">eniDataCaptura</text:p>
          </table:table-cell>
          <table:table-cell table:style-name="Taula18.A3" office:value-type="string">
            <text:p text:style-name="P275">Data</text:p>
          </table:table-cell>
          <table:table-cell table:style-name="Taula18.A3" office:value-type="string">
            <text:p text:style-name="P278">1</text:p>
          </table:table-cell>
          <table:table-cell table:style-name="Taula18.D3" office:value-type="float" office:value="14">
            <text:p text:style-name="P275">14</text:p>
          </table:table-cell>
          <table:table-cell table:style-name="Taula18.E8" office:value-type="string">
            <text:p text:style-name="P279">Data de captura del document</text:p>
          </table:table-cell>
        </table:table-row>
        <table:table-row>
          <table:table-cell table:style-name="Taula18.A3" office:value-type="string">
            <text:p text:style-name="P274">eniOrigen</text:p>
          </table:table-cell>
          <table:table-cell table:style-name="Taula18.A3" office:value-type="string">
            <text:p text:style-name="P277">Cadena</text:p>
          </table:table-cell>
          <table:table-cell table:style-name="Taula18.A3" office:value-type="string">
            <text:p text:style-name="P278">1</text:p>
          </table:table-cell>
          <table:table-cell table:style-name="Taula18.D3" office:value-type="float" office:value="10">
            <text:p text:style-name="P278">1<text:span text:style-name="T257">0</text:span></text:p>
          </table:table-cell>
          <table:table-cell table:style-name="Taula18.E8" office:value-type="string">
            <text:p text:style-name="P250">Codi de la metadada origen de la NTI de document electrònic</text:p>
          </table:table-cell>
        </table:table-row>
        <table:table-row>
          <table:table-cell table:style-name="Taula18.A3" office:value-type="string">
            <text:p text:style-name="P274">eniEstatElaboracio</text:p>
          </table:table-cell>
          <table:table-cell table:style-name="Taula18.A3" office:value-type="string">
            <text:p text:style-name="P277">Cadena</text:p>
          </table:table-cell>
          <table:table-cell table:style-name="Taula18.A3" office:value-type="string">
            <text:p text:style-name="P278">1</text:p>
          </table:table-cell>
          <table:table-cell table:style-name="Taula18.D3" office:value-type="float" office:value="4">
            <text:p text:style-name="P278">4</text:p>
          </table:table-cell>
          <table:table-cell table:style-name="Taula18.E8" office:value-type="string">
            <text:p text:style-name="P250">Codi de la metadada <text:span text:style-name="T110">estat elaboració</text:span> de la NTI de document electrònic.</text:p>
          </table:table-cell>
        </table:table-row>
        <table:table-row>
          <table:table-cell table:style-name="Taula18.A3" office:value-type="string">
            <text:p text:style-name="P274">eniTipusDocumental</text:p>
          </table:table-cell>
          <table:table-cell table:style-name="Taula18.A3" office:value-type="string">
            <text:p text:style-name="P277">Cadena</text:p>
          </table:table-cell>
          <table:table-cell table:style-name="Taula18.A3" office:value-type="string">
            <text:p text:style-name="P278">1</text:p>
          </table:table-cell>
          <table:table-cell table:style-name="Taula18.D3" office:value-type="float" office:value="255">
            <text:p text:style-name="P348">2<text:span text:style-name="T258">55</text:span></text:p>
          </table:table-cell>
          <table:table-cell table:style-name="Taula18.E8" office:value-type="string">
            <text:p text:style-name="P250">Codi de la metadada tipus documental de la NTI de document electrònic.</text:p>
          </table:table-cell>
        </table:table-row>
        <table:table-row>
          <table:table-cell table:style-name="Taula18.A3" office:value-type="string">
            <text:p text:style-name="P274">sicresTipusDocument</text:p>
          </table:table-cell>
          <table:table-cell table:style-name="Taula18.A3" office:value-type="string">
            <text:p text:style-name="P277">Cadena</text:p>
          </table:table-cell>
          <table:table-cell table:style-name="Taula18.A3" office:value-type="string">
            <text:p text:style-name="P278">0..1</text:p>
          </table:table-cell>
          <table:table-cell table:style-name="Taula18.D3" office:value-type="float" office:value="2">
            <text:p text:style-name="P278">2</text:p>
          </table:table-cell>
          <table:table-cell table:style-name="Taula18.E8" office:value-type="string">
            <text:p text:style-name="P250">Codi SICRES del segment Anexo – tipo de documento</text:p>
          </table:table-cell>
        </table:table-row>
        <table:table-row>
          <table:table-cell table:style-name="Taula18.A3" office:value-type="string">
            <text:p text:style-name="P274">localitzacio</text:p>
          </table:table-cell>
          <table:table-cell table:style-name="Taula18.A3" office:value-type="string">
            <text:p text:style-name="P277">Cadena</text:p>
          </table:table-cell>
          <table:table-cell table:style-name="Taula18.A3" office:value-type="string">
            <text:p text:style-name="P278">0..1</text:p>
          </table:table-cell>
          <table:table-cell table:style-name="Taula18.D3" office:value-type="float" office:value="80">
            <text:p text:style-name="P278">80</text:p>
          </table:table-cell>
          <table:table-cell table:style-name="Taula18.E8" office:value-type="string">
            <text:p text:style-name="P250"/>
          </table:table-cell>
        </table:table-row>
        <table:table-row>
          <table:table-cell table:style-name="Taula18.A3" office:value-type="string">
            <text:p text:style-name="P281">metaDades</text:p>
          </table:table-cell>
          <table:table-cell table:style-name="Taula18.A3" office:value-type="string">
            <text:p text:style-name="P282">MetaDades</text:p>
          </table:table-cell>
          <table:table-cell table:style-name="Taula18.A3" office:value-type="string">
            <text:p text:style-name="P282">0..1</text:p>
          </table:table-cell>
          <table:table-cell table:style-name="Taula18.D3">
            <text:p text:style-name="P278"/>
          </table:table-cell>
          <table:table-cell table:style-name="Taula18.E8" office:value-type="string">
            <text:p text:style-name="P281">Camp MetaDada amb entrades de tipus codi i valor per metadades addicionals.</text:p>
          </table:table-cell>
        </table:table-row>
        <table:table-row>
          <table:table-cell table:style-name="Taula18.A3" office:value-type="string">
            <text:p text:style-name="P274">observacions</text:p>
          </table:table-cell>
          <table:table-cell table:style-name="Taula18.A3" office:value-type="string">
            <text:p text:style-name="P277">Cadena</text:p>
          </table:table-cell>
          <table:table-cell table:style-name="Taula18.A3" office:value-type="string">
            <text:p text:style-name="P278">0..1</text:p>
          </table:table-cell>
          <table:table-cell table:style-name="Taula18.D3" office:value-type="float" office:value="50">
            <text:p text:style-name="P278">50</text:p>
          </table:table-cell>
          <table:table-cell table:style-name="Taula18.E8" office:value-type="string">
            <text:p text:style-name="P283">Observacions a destacar sobre la informació annexada</text:p>
          </table:table-cell>
        </table:table-row>
        <table:table-row>
          <table:table-cell table:style-name="Taula18.A3" office:value-type="string">
            <text:p text:style-name="P274">firmes</text:p>
          </table:table-cell>
          <table:table-cell table:style-name="Taula18.A3" office:value-type="string">
            <text:p text:style-name="P275">Firma</text:p>
          </table:table-cell>
          <table:table-cell table:style-name="Taula18.A3" office:value-type="string">
            <text:p text:style-name="P278">0..1</text:p>
          </table:table-cell>
          <table:table-cell table:style-name="Taula18.A3" office:value-type="string">
            <text:p text:style-name="P285"/>
          </table:table-cell>
          <table:table-cell table:style-name="Taula18.E8" office:value-type="string">
            <text:p text:style-name="P283">Llista de firmes del fitxer </text:p>
          </table:table-cell>
        </table:table-row>
        <table:table-row>
          <table:table-cell table:style-name="Taula18.A3" office:value-type="string">
            <text:p text:style-name="P274">timestamp</text:p>
          </table:table-cell>
          <table:table-cell table:style-name="Taula18.A3" office:value-type="string">
            <text:p text:style-name="P277">Cadena</text:p>
          </table:table-cell>
          <table:table-cell table:style-name="Taula18.A3" office:value-type="string">
            <text:p text:style-name="P278">0..1</text:p>
          </table:table-cell>
          <table:table-cell table:style-name="Taula18.D3" office:value-type="float" office:value="100">
            <text:p text:style-name="P278">100</text:p>
          </table:table-cell>
          <table:table-cell table:style-name="Taula18.E8" office:value-type="string">
            <text:p text:style-name="P250">Segell de temps del fitxer annex en base64.</text:p>
          </table:table-cell>
        </table:table-row>
        <table:table-row>
          <table:table-cell table:style-name="Taula18.A3" office:value-type="string">
            <text:p text:style-name="P274">validacioOCSP</text:p>
          </table:table-cell>
          <table:table-cell table:style-name="Taula18.A3" office:value-type="string">
            <text:p text:style-name="P277">Cadena</text:p>
          </table:table-cell>
          <table:table-cell table:style-name="Taula18.A3" office:value-type="string">
            <text:p text:style-name="P278">0..1</text:p>
          </table:table-cell>
          <table:table-cell table:style-name="Taula18.D3" office:value-type="float" office:value="255">
            <text:p text:style-name="P348">2<text:span text:style-name="T259">55</text:span></text:p>
          </table:table-cell>
          <table:table-cell table:style-name="Taula18.E19" office:value-type="string">
            <text:p text:style-name="P250">Validació OCSP del certificat emprat per signar en base64.</text:p>
          </table:table-cell>
        </table:table-row>
      </table:table>
      <text:p text:style-name="P234"/>
      <text:p text:style-name="P237"/>
      <text:p text:style-name="P235"/>
      <table:table table:name="Taula19" table:style-name="Taula19">
        <table:table-column table:style-name="Taula19.A"/>
        <table:table-column table:style-name="Taula19.B"/>
        <table:table-column table:style-name="Taula19.C"/>
        <table:table-column table:style-name="Taula19.D"/>
        <table:table-column table:style-name="Taula19.E"/>
        <table:table-row>
          <table:table-cell table:style-name="Taula19.A1" table:number-columns-spanned="5" office:value-type="string">
            <text:p text:style-name="P133">Registre<text:span text:style-name="T113">Firma</text:span> </text:p>
          </table:table-cell>
          <table:covered-table-cell/>
          <table:covered-table-cell/>
          <table:covered-table-cell/>
          <table:covered-table-cell/>
        </table:table-row>
        <table:table-row>
          <table:table-cell table:style-name="Taula19.A2" office:value-type="string">
            <text:p text:style-name="P33">Nom del camp</text:p>
          </table:table-cell>
          <table:table-cell table:style-name="Taula19.A2" office:value-type="string">
            <text:p text:style-name="P33">Tipus</text:p>
          </table:table-cell>
          <table:table-cell table:style-name="Taula19.A2" office:value-type="string">
            <text:p text:style-name="P33">Mult.</text:p>
          </table:table-cell>
          <table:table-cell table:style-name="Taula19.A2" office:value-type="string">
            <text:p text:style-name="P35">Tamany</text:p>
          </table:table-cell>
          <table:table-cell table:style-name="Taula19.E2" office:value-type="string">
            <text:p text:style-name="P35">Descripció</text:p>
          </table:table-cell>
        </table:table-row>
        <table:table-row>
          <table:table-cell table:style-name="Taula19.A3" office:value-type="string">
            <text:p text:style-name="P283">tipus</text:p>
          </table:table-cell>
          <table:table-cell table:style-name="Taula19.A3" office:value-type="string">
            <text:p text:style-name="P277">Cadena</text:p>
          </table:table-cell>
          <table:table-cell table:style-name="Taula19.A3" office:value-type="string">
            <text:p text:style-name="P287">1</text:p>
          </table:table-cell>
          <table:table-cell table:style-name="Taula19.D3" office:value-type="float" office:value="30">
            <text:p text:style-name="P287">30</text:p>
          </table:table-cell>
          <table:table-cell table:style-name="Taula19.E3" office:value-type="string">
            <text:p text:style-name="P290">Codi del tipus de firma</text:p>
          </table:table-cell>
        </table:table-row>
        <table:table-row>
          <table:table-cell table:style-name="Taula19.A3" office:value-type="string">
            <text:p text:style-name="P283">perfil</text:p>
          </table:table-cell>
          <table:table-cell table:style-name="Taula19.A3" office:value-type="string">
            <text:p text:style-name="P277">Cadena</text:p>
          </table:table-cell>
          <table:table-cell table:style-name="Taula19.A3" office:value-type="string">
            <text:p text:style-name="P287">0..1</text:p>
          </table:table-cell>
          <table:table-cell table:style-name="Taula19.D3" office:value-type="float" office:value="30">
            <text:p text:style-name="P287">30</text:p>
          </table:table-cell>
          <table:table-cell table:style-name="Taula19.E4" office:value-type="string">
            <text:p text:style-name="P290">Codi de perfil de la firma.</text:p>
          </table:table-cell>
        </table:table-row>
        <table:table-row>
          <table:table-cell table:style-name="Taula19.A3" office:value-type="string">
            <text:p text:style-name="P283">fitxerNom</text:p>
          </table:table-cell>
          <table:table-cell table:style-name="Taula19.A3" office:value-type="string">
            <text:p text:style-name="P277">Cadena</text:p>
          </table:table-cell>
          <table:table-cell table:style-name="Taula19.A3" office:value-type="string">
            <text:p text:style-name="P278">0..1</text:p>
          </table:table-cell>
          <table:table-cell table:style-name="Taula19.A3" office:value-type="string">
            <text:p text:style-name="P349">2<text:span text:style-name="T260">56</text:span></text:p>
          </table:table-cell>
          <table:table-cell table:style-name="Taula19.E5" office:value-type="string">
            <text:p text:style-name="P288">Nom del fitxer de firma de l’annex si n’hi ha. <text:span text:style-name="T111">És obligatori si el tipus de firma és TF04.</text:span> </text:p>
          </table:table-cell>
        </table:table-row>
        <table:table-row>
          <table:table-cell table:style-name="Taula19.A3" office:value-type="string">
            <text:p text:style-name="P283">contingut</text:p>
          </table:table-cell>
          <table:table-cell table:style-name="Taula19.A3" office:value-type="string">
            <text:p text:style-name="P285">Byte[]</text:p>
          </table:table-cell>
          <table:table-cell table:style-name="Taula19.A3" office:value-type="string">
            <text:p text:style-name="P287">0..1</text:p>
          </table:table-cell>
          <table:table-cell table:style-name="Taula19.A3" office:value-type="string">
            <text:p text:style-name="P287">var</text:p>
          </table:table-cell>
          <table:table-cell table:style-name="Taula19.E6" office:value-type="string">
            <text:p text:style-name="P288">Cadena de bytes que componen el contingut del fitxer de firma annex si n’hi ha. <text:span text:style-name="T111">És obligatori si el tipus de firma és TF04.</text:span> </text:p>
          </table:table-cell>
        </table:table-row>
        <table:table-row>
          <table:table-cell table:style-name="Taula19.A3" office:value-type="string">
            <text:p text:style-name="P283">tipusMime</text:p>
          </table:table-cell>
          <table:table-cell table:style-name="Taula19.A3" office:value-type="string">
            <text:p text:style-name="P277">Cadena</text:p>
          </table:table-cell>
          <table:table-cell table:style-name="Taula19.A3" office:value-type="string">
            <text:p text:style-name="P278">0..1</text:p>
          </table:table-cell>
          <table:table-cell table:style-name="Taula19.D3" office:value-type="float" office:value="30">
            <text:p text:style-name="P347">3<text:span text:style-name="T260">0</text:span></text:p>
          </table:table-cell>
          <table:table-cell table:style-name="Taula19.E7" office:value-type="string">
            <text:p text:style-name="P288">Tipus MIME del fitxer de firma annexat si n’hi ha. <text:span text:style-name="T111">És obligatori si el tipus de firma és TF04.</text:span> </text:p>
          </table:table-cell>
        </table:table-row>
        <text:soft-page-break/>
        <table:table-row>
          <table:table-cell table:style-name="Taula19.A3" office:value-type="string">
            <text:p text:style-name="P283">csv</text:p>
          </table:table-cell>
          <table:table-cell table:style-name="Taula19.A3" office:value-type="string">
            <text:p text:style-name="P277">Cadena</text:p>
          </table:table-cell>
          <table:table-cell table:style-name="Taula19.A3" office:value-type="string">
            <text:p text:style-name="P278">0..1</text:p>
          </table:table-cell>
          <table:table-cell table:style-name="Taula19.A3" office:value-type="string">
            <text:p text:style-name="P275"/>
          </table:table-cell>
          <table:table-cell table:style-name="Taula19.E8" office:value-type="string">
            <text:p text:style-name="P279">En cas de que el fitxer es signi amb CSV, contingut del CSV en base64.</text:p>
          </table:table-cell>
        </table:table-row>
        <table:table-row>
          <table:table-cell table:style-name="Taula19.A3" office:value-type="string">
            <text:p text:style-name="P283">csvRegulacio</text:p>
          </table:table-cell>
          <table:table-cell table:style-name="Taula19.A3" office:value-type="string">
            <text:p text:style-name="P277">Cadena</text:p>
          </table:table-cell>
          <table:table-cell table:style-name="Taula19.A3" office:value-type="string">
            <text:p text:style-name="P278">1</text:p>
          </table:table-cell>
          <table:table-cell table:style-name="Taula19.D3" office:value-type="float" office:value="640">
            <text:p text:style-name="P287">640</text:p>
          </table:table-cell>
          <table:table-cell table:style-name="Taula19.E9" office:value-type="string">
            <text:p text:style-name="P288">Text de regulació CSV.</text:p>
          </table:table-cell>
        </table:table-row>
      </table:table>
      <text:p text:style-name="P234"/>
      <text:p text:style-name="P236"/>
      <table:table table:name="Taula20" table:style-name="Taula20">
        <table:table-column table:style-name="Taula20.A"/>
        <table:table-column table:style-name="Taula20.B"/>
        <table:table-column table:style-name="Taula20.C"/>
        <table:table-column table:style-name="Taula20.D"/>
        <table:table-column table:style-name="Taula20.E"/>
        <table:table-row>
          <table:table-cell table:style-name="Taula20.A1" table:number-columns-spanned="5" office:value-type="string">
            <text:p text:style-name="P133">Registre<text:span text:style-name="T113">Interessat</text:span> </text:p>
          </table:table-cell>
          <table:covered-table-cell/>
          <table:covered-table-cell/>
          <table:covered-table-cell/>
          <table:covered-table-cell/>
        </table:table-row>
        <table:table-row>
          <table:table-cell table:style-name="Taula20.A2" office:value-type="string">
            <text:p text:style-name="P33">Nom del camp</text:p>
          </table:table-cell>
          <table:table-cell table:style-name="Taula20.A2" office:value-type="string">
            <text:p text:style-name="P33">Tipus</text:p>
          </table:table-cell>
          <table:table-cell table:style-name="Taula20.A2" office:value-type="string">
            <text:p text:style-name="P33">Mult.</text:p>
          </table:table-cell>
          <table:table-cell table:style-name="Taula20.A2" office:value-type="string">
            <text:p text:style-name="P35">Tamany</text:p>
          </table:table-cell>
          <table:table-cell table:style-name="Taula20.E2" office:value-type="string">
            <text:p text:style-name="P35">Descripció</text:p>
          </table:table-cell>
        </table:table-row>
        <table:table-row>
          <table:table-cell table:style-name="Taula20.A3" office:value-type="string">
            <text:p text:style-name="P283">tipus</text:p>
          </table:table-cell>
          <table:table-cell table:style-name="Taula20.A3" office:value-type="string">
            <text:p text:style-name="P277">Cadena</text:p>
          </table:table-cell>
          <table:table-cell table:style-name="Taula20.A3" office:value-type="string">
            <text:p text:style-name="P287">1</text:p>
          </table:table-cell>
          <table:table-cell table:style-name="Taula20.D3" office:value-type="float" office:value="19">
            <text:p text:style-name="P349">1<text:span text:style-name="T261">9</text:span></text:p>
          </table:table-cell>
          <table:table-cell table:style-name="Taula20.E3" office:value-type="string">
            <text:p text:style-name="P290">Figura jurídica de la persona <text:line-break/>'1' = Administració.</text:p>
            <text:p text:style-name="P290">'2' = Persona física.</text:p>
            <text:p text:style-name="P290">'3' = Persona jurídica.</text:p>
          </table:table-cell>
        </table:table-row>
        <table:table-row>
          <table:table-cell table:style-name="Taula20.A3" office:value-type="string">
            <text:p text:style-name="P292">documentTipus</text:p>
          </table:table-cell>
          <table:table-cell table:style-name="Taula20.A3" office:value-type="string">
            <text:p text:style-name="P277">Cadena</text:p>
          </table:table-cell>
          <table:table-cell table:style-name="Taula20.A3" office:value-type="string">
            <text:p text:style-name="P294">0..1</text:p>
          </table:table-cell>
          <table:table-cell table:style-name="Taula20.D3" office:value-type="float" office:value="1">
            <text:p text:style-name="P350">1</text:p>
          </table:table-cell>
          <table:table-cell table:style-name="Taula20.E4" office:value-type="string">
            <text:p text:style-name="P290">Codi SICRES del segment interesado –</text:p>
            <text:p text:style-name="P290">documento de identificacion de interesado tipo.</text:p>
          </table:table-cell>
        </table:table-row>
        <table:table-row>
          <table:table-cell table:style-name="Taula20.A3" office:value-type="string">
            <text:p text:style-name="P292">documentNum</text:p>
          </table:table-cell>
          <table:table-cell table:style-name="Taula20.A3" office:value-type="string">
            <text:p text:style-name="P277">Cadena</text:p>
          </table:table-cell>
          <table:table-cell table:style-name="Taula20.A3" office:value-type="string">
            <text:p text:style-name="P297"><text:span text:style-name="T112">0..</text:span>1</text:p>
          </table:table-cell>
          <table:table-cell table:style-name="Taula20.A3" office:value-type="string">
            <text:p text:style-name="P350">1<text:span text:style-name="T262">7</text:span></text:p>
          </table:table-cell>
          <table:table-cell table:style-name="Taula20.E5" office:value-type="string">
            <text:p text:style-name="P295">Número de document identificatiu.</text:p>
          </table:table-cell>
        </table:table-row>
        <table:table-row>
          <table:table-cell table:style-name="Taula20.A3" office:value-type="string">
            <text:p text:style-name="P292">nom</text:p>
          </table:table-cell>
          <table:table-cell table:style-name="Taula20.A3" office:value-type="string">
            <text:p text:style-name="P285">Cadena</text:p>
          </table:table-cell>
          <table:table-cell table:style-name="Taula20.A3" office:value-type="string">
            <text:p text:style-name="P294">C</text:p>
          </table:table-cell>
          <table:table-cell table:style-name="Taula20.A3" office:value-type="string">
            <text:p text:style-name="P350">2<text:span text:style-name="T262">55</text:span></text:p>
          </table:table-cell>
          <table:table-cell table:style-name="Taula20.E6" office:value-type="string">
            <text:p text:style-name="P298">Nom de l’interessat. Obligatori si és una persona física.</text:p>
          </table:table-cell>
        </table:table-row>
        <table:table-row>
          <table:table-cell table:style-name="Taula20.A3" office:value-type="string">
            <text:p text:style-name="P292">llinatge1</text:p>
          </table:table-cell>
          <table:table-cell table:style-name="Taula20.A3" office:value-type="string">
            <text:p text:style-name="P277">Cadena</text:p>
          </table:table-cell>
          <table:table-cell table:style-name="Taula20.A3" office:value-type="string">
            <text:p text:style-name="P294">C</text:p>
          </table:table-cell>
          <table:table-cell table:style-name="Taula20.D3" office:value-type="float" office:value="255">
            <text:p text:style-name="P350">2<text:span text:style-name="T262">55</text:span></text:p>
          </table:table-cell>
          <table:table-cell table:style-name="Taula20.E7" office:value-type="string">
            <text:p text:style-name="P298">Primer llinatge de l’interessat. Obligatori si és una persona física.</text:p>
          </table:table-cell>
        </table:table-row>
        <table:table-row>
          <table:table-cell table:style-name="Taula20.A3" office:value-type="string">
            <text:p text:style-name="P292">llinatge2</text:p>
          </table:table-cell>
          <table:table-cell table:style-name="Taula20.A3" office:value-type="string">
            <text:p text:style-name="P277">Cadena</text:p>
          </table:table-cell>
          <table:table-cell table:style-name="Taula20.A3" office:value-type="string">
            <text:p text:style-name="P294">0..1</text:p>
          </table:table-cell>
          <table:table-cell table:style-name="Taula20.A3" office:value-type="string">
            <text:p text:style-name="P350">2<text:span text:style-name="T262">55</text:span></text:p>
          </table:table-cell>
          <table:table-cell table:style-name="Taula20.E8" office:value-type="string">
            <text:p text:style-name="P298">Segon llinatge de l’interessat</text:p>
          </table:table-cell>
        </table:table-row>
        <table:table-row>
          <table:table-cell table:style-name="Taula20.A3" office:value-type="string">
            <text:p text:style-name="P292">raoSocial</text:p>
          </table:table-cell>
          <table:table-cell table:style-name="Taula20.A3" office:value-type="string">
            <text:p text:style-name="P277">Cadena</text:p>
          </table:table-cell>
          <table:table-cell table:style-name="Taula20.A3" office:value-type="string">
            <text:p text:style-name="P294">C</text:p>
          </table:table-cell>
          <table:table-cell table:style-name="Taula20.D3" office:value-type="float" office:value="2000">
            <text:p text:style-name="P350">2<text:span text:style-name="T263">000</text:span></text:p>
          </table:table-cell>
          <table:table-cell table:style-name="Taula20.E9" office:value-type="string">
            <text:p text:style-name="P298">Raó social de l’interessat. Obligatori si és una persona jurídica.</text:p>
          </table:table-cell>
        </table:table-row>
        <table:table-row>
          <table:table-cell table:style-name="Taula20.A3" office:value-type="string">
            <text:p text:style-name="P292">pais</text:p>
          </table:table-cell>
          <table:table-cell table:style-name="Taula20.A3" office:value-type="string">
            <text:p text:style-name="P277">Cadena</text:p>
          </table:table-cell>
          <table:table-cell table:style-name="Taula20.A3" office:value-type="string">
            <text:p text:style-name="P294">C</text:p>
          </table:table-cell>
          <table:table-cell table:style-name="Taula20.D3" office:value-type="float" office:value="100">
            <text:p text:style-name="P350">1<text:span text:style-name="T264">00</text:span></text:p>
          </table:table-cell>
          <table:table-cell table:style-name="Taula20.E9" office:value-type="string">
            <text:p text:style-name="P288">Codi ISO numèric del País de la persona.</text:p>
          </table:table-cell>
        </table:table-row>
        <table:table-row>
          <table:table-cell table:style-name="Taula20.A3" office:value-type="string">
            <text:p text:style-name="P292">provincia</text:p>
          </table:table-cell>
          <table:table-cell table:style-name="Taula20.A3" office:value-type="string">
            <text:p text:style-name="P277">Cadena</text:p>
          </table:table-cell>
          <table:table-cell table:style-name="Taula20.A3" office:value-type="string">
            <text:p text:style-name="P294">C</text:p>
          </table:table-cell>
          <table:table-cell table:style-name="Taula20.D3" office:value-type="float" office:value="100">
            <text:p text:style-name="P350">1<text:span text:style-name="T265">00</text:span></text:p>
          </table:table-cell>
          <table:table-cell table:style-name="Taula20.E9" office:value-type="string">
            <text:p text:style-name="P288">Codi INE de la província de la persona.</text:p>
          </table:table-cell>
        </table:table-row>
        <table:table-row>
          <table:table-cell table:style-name="Taula20.A3" office:value-type="string">
            <text:p text:style-name="P292">municipi</text:p>
          </table:table-cell>
          <table:table-cell table:style-name="Taula20.A3" office:value-type="string">
            <text:p text:style-name="P277">Cadena</text:p>
          </table:table-cell>
          <table:table-cell table:style-name="Taula20.A3" office:value-type="string">
            <text:p text:style-name="P294">C</text:p>
          </table:table-cell>
          <table:table-cell table:style-name="Taula20.D3" office:value-type="float" office:value="100">
            <text:p text:style-name="P294">100</text:p>
          </table:table-cell>
          <table:table-cell table:style-name="Taula20.E9" office:value-type="string">
            <text:p text:style-name="P288">Codi del Municipi de la persona.</text:p>
          </table:table-cell>
        </table:table-row>
        <table:table-row>
          <table:table-cell table:style-name="Taula20.A3" office:value-type="string">
            <text:p text:style-name="P292">adresa</text:p>
          </table:table-cell>
          <table:table-cell table:style-name="Taula20.A3" office:value-type="string">
            <text:p text:style-name="P277">Cadena</text:p>
          </table:table-cell>
          <table:table-cell table:style-name="Taula20.A3" office:value-type="string">
            <text:p text:style-name="P294">C</text:p>
          </table:table-cell>
          <table:table-cell table:style-name="Taula20.D3" office:value-type="float" office:value="160">
            <text:p text:style-name="P350">1<text:span text:style-name="T266">60</text:span></text:p>
          </table:table-cell>
          <table:table-cell table:style-name="Taula20.E9" office:value-type="string">
            <text:p text:style-name="P298">Adreça postal de l’interessat.</text:p>
          </table:table-cell>
        </table:table-row>
        <table:table-row>
          <table:table-cell table:style-name="Taula20.A3" office:value-type="string">
            <text:p text:style-name="P292">codiPostal</text:p>
          </table:table-cell>
          <table:table-cell table:style-name="Taula20.A3" office:value-type="string">
            <text:p text:style-name="P277">Cadena</text:p>
          </table:table-cell>
          <table:table-cell table:style-name="Taula20.A3" office:value-type="string">
            <text:p text:style-name="P294">C</text:p>
          </table:table-cell>
          <table:table-cell table:style-name="Taula20.D3" office:value-type="float" office:value="5">
            <text:p text:style-name="P350">5</text:p>
          </table:table-cell>
          <table:table-cell table:style-name="Taula20.E9" office:value-type="string">
            <text:p text:style-name="P288"/>
          </table:table-cell>
        </table:table-row>
        <table:table-row>
          <table:table-cell table:style-name="Taula20.A3" office:value-type="string">
            <text:p text:style-name="P292">email</text:p>
          </table:table-cell>
          <table:table-cell table:style-name="Taula20.A3" office:value-type="string">
            <text:p text:style-name="P277">Cadena</text:p>
          </table:table-cell>
          <table:table-cell table:style-name="Taula20.A3" office:value-type="string">
            <text:p text:style-name="P294">0..1</text:p>
          </table:table-cell>
          <table:table-cell table:style-name="Taula20.D3" office:value-type="float" office:value="160">
            <text:p text:style-name="P350">1<text:span text:style-name="T267">60</text:span></text:p>
          </table:table-cell>
          <table:table-cell table:style-name="Taula20.E9" office:value-type="string">
            <text:p text:style-name="P288"/>
          </table:table-cell>
        </table:table-row>
        <table:table-row>
          <table:table-cell table:style-name="Taula20.A3" office:value-type="string">
            <text:p text:style-name="P292">telefon</text:p>
          </table:table-cell>
          <table:table-cell table:style-name="Taula20.A3" office:value-type="string">
            <text:p text:style-name="P277">Cadena</text:p>
          </table:table-cell>
          <table:table-cell table:style-name="Taula20.A3" office:value-type="string">
            <text:p text:style-name="P294">0..1</text:p>
          </table:table-cell>
          <table:table-cell table:style-name="Taula20.D3" office:value-type="float" office:value="20">
            <text:p text:style-name="P350">2<text:span text:style-name="T267">0</text:span></text:p>
          </table:table-cell>
          <table:table-cell table:style-name="Taula20.E9" office:value-type="string">
            <text:p text:style-name="P288"/>
          </table:table-cell>
        </table:table-row>
        <table:table-row>
          <table:table-cell table:style-name="Taula20.A3" office:value-type="string">
            <text:p text:style-name="P292">emailHabilitat</text:p>
          </table:table-cell>
          <table:table-cell table:style-name="Taula20.A3" office:value-type="string">
            <text:p text:style-name="P277">Cadena</text:p>
          </table:table-cell>
          <table:table-cell table:style-name="Taula20.A3" office:value-type="string">
            <text:p text:style-name="P294">0..1</text:p>
          </table:table-cell>
          <table:table-cell table:style-name="Taula20.D3" office:value-type="float" office:value="160">
            <text:p text:style-name="P350">1<text:span text:style-name="T267">60</text:span></text:p>
          </table:table-cell>
          <table:table-cell table:style-name="Taula20.E9" office:value-type="string">
            <text:p text:style-name="P288">En cas de disposar d'adreça electrònica habilitada.</text:p>
          </table:table-cell>
        </table:table-row>
        <table:table-row>
          <table:table-cell table:style-name="Taula20.A3" office:value-type="string">
            <text:p text:style-name="P292">canalPreferent</text:p>
          </table:table-cell>
          <table:table-cell table:style-name="Taula20.A3" office:value-type="string">
            <text:p text:style-name="P277">Cadena</text:p>
          </table:table-cell>
          <table:table-cell table:style-name="Taula20.A3" office:value-type="string">
            <text:p text:style-name="P294">0..1</text:p>
          </table:table-cell>
          <table:table-cell table:style-name="Taula20.D3" office:value-type="float" office:value="2">
            <text:p text:style-name="P350">2</text:p>
          </table:table-cell>
          <table:table-cell table:style-name="Taula20.E9" office:value-type="string">
            <text:p text:style-name="P288">Codi SICRES del segment interesado – canal</text:p>
            <text:p text:style-name="P288">preferente de notificación del interesado.</text:p>
          </table:table-cell>
        </table:table-row>
        <table:table-row>
          <table:table-cell table:style-name="Taula20.A3" office:value-type="string">
            <text:p text:style-name="P300">codiDire</text:p>
          </table:table-cell>
          <table:table-cell table:style-name="Taula20.A3" office:value-type="string">
            <text:p text:style-name="P301">cadena</text:p>
          </table:table-cell>
          <table:table-cell table:style-name="Taula20.A3" office:value-type="string">
            <text:p text:style-name="P301">0..1</text:p>
          </table:table-cell>
          <table:table-cell table:style-name="Taula20.D3" office:value-type="float" office:value="20">
            <text:p text:style-name="P301">20</text:p>
          </table:table-cell>
          <table:table-cell table:style-name="Taula20.E9" office:value-type="string">
            <text:p text:style-name="P300">Codi DIRe de l'interessat.</text:p>
          </table:table-cell>
        </table:table-row>
        <table:table-row>
          <table:table-cell table:style-name="Taula20.A3" office:value-type="string">
            <text:p text:style-name="P292">observacions</text:p>
          </table:table-cell>
          <table:table-cell table:style-name="Taula20.A3" office:value-type="string">
            <text:p text:style-name="P277">Cadena</text:p>
          </table:table-cell>
          <table:table-cell table:style-name="Taula20.A3" office:value-type="string">
            <text:p text:style-name="P294">0..1</text:p>
          </table:table-cell>
          <table:table-cell table:style-name="Taula20.D3" office:value-type="float" office:value="160">
            <text:p text:style-name="P350">1<text:span text:style-name="T267">60</text:span></text:p>
          </table:table-cell>
          <table:table-cell table:style-name="Taula20.E9" office:value-type="string">
            <text:p text:style-name="P288"/>
          </table:table-cell>
        </table:table-row>
        <table:table-row>
          <table:table-cell table:style-name="Taula20.A3" office:value-type="string">
            <text:p text:style-name="P292">representant</text:p>
          </table:table-cell>
          <table:table-cell table:style-name="Taula20.A3" office:value-type="string">
            <text:p text:style-name="P293">RegistreInteressat</text:p>
          </table:table-cell>
          <table:table-cell table:style-name="Taula20.A3" office:value-type="string">
            <text:p text:style-name="P294">0..1</text:p>
          </table:table-cell>
          <table:table-cell table:style-name="Taula20.A3" office:value-type="string">
            <text:p text:style-name="P294"/>
          </table:table-cell>
          <table:table-cell table:style-name="Taula20.E9" office:value-type="string">
            <text:p text:style-name="P302">Interessat que actua de representant de l’actual.</text:p>
          </table:table-cell>
        </table:table-row>
        <table:table-row>
          <table:table-cell table:style-name="Taula20.A3" office:value-type="string">
            <text:p text:style-name="P292">representat</text:p>
          </table:table-cell>
          <table:table-cell table:style-name="Taula20.A3" office:value-type="string">
            <text:p text:style-name="P293">RegistreInteressat</text:p>
          </table:table-cell>
          <table:table-cell table:style-name="Taula20.A3" office:value-type="string">
            <text:p text:style-name="P294">0..1</text:p>
          </table:table-cell>
          <table:table-cell table:style-name="Taula20.A3" office:value-type="string">
            <text:p text:style-name="P294"/>
          </table:table-cell>
          <table:table-cell table:style-name="Taula20.E22" office:value-type="string">
            <text:p text:style-name="P302">Interessat que actua com a representat per l’actual.</text:p>
          </table:table-cell>
        </table:table-row>
      </table:table>
      <text:p text:style-name="P234"><text:soft-page-break/></text:p>
      <text:list text:continue-numbering="true" text:style-name="Outline">
        <text:list-item>
          <text:list>
            <text:list-item>
              <text:h text:style-name="P396" text:outline-level="2"><text:bookmark-start text:name="Còpia de __RefHeading___Toc16776_2313926538 1"/><text:bookmark-start text:name="__RefHeading___Toc227355_390838441"/>Utilització del servei<text:bookmark-end text:name="Còpia de __RefHeading___Toc16776_2313926538 1"/><text:bookmark-end text:name="__RefHeading___Toc227355_390838441"/></text:h>
            </text:list-item>
          </text:list>
        </text:list-item>
      </text:list>
      <text:p text:style-name="P226"><text:span text:style-name="T349">Per donar d'alta anotacions de a Distribucio des del Registre es disposa </text:span>d’un client<text:span text:style-name="T349"> pel WS SOAP i un altre client per l'API REST </text:span><text:s/>que facilit<text:span text:style-name="T349">en</text:span> la seva utilització.</text:p>
      <text:p text:style-name="P226">Per a fer ús <text:span text:style-name="T349">del client </text:span><text:span text:style-name="T346">API REST </text:span><text:span text:style-name="T349">per Java </text:span><text:span text:style-name="T351">11</text:span><text:span text:style-name="T349"> </text:span>es pot utilitzar la següent dependència Maven:</text:p>
      <text:p text:style-name="P373"/>
      <text:p text:style-name="P233"><text:span text:style-name="T29"><text:s/><text:tab/> </text:span><text:span text:style-name="T15">&lt;</text:span> <text:span text:style-name="T22">dependency</text:span> <text:span text:style-name="T15">&gt;</text:span> </text:p>
      <text:p text:style-name="P61"><text:span text:style-name="T29"><text:s/><text:tab/> <text:tab/> </text:span><text:span text:style-name="T15">&lt;</text:span> <text:span text:style-name="T22">groupId</text:span> <text:span text:style-name="T15">&gt;</text:span> <text:span text:style-name="T29">es.caib.distribucio</text:span> <text:span text:style-name="T15">&lt;/</text:span> <text:span text:style-name="T22">groupId</text:span> <text:span text:style-name="T15">&gt;</text:span> </text:p>
      <text:p text:style-name="P61"><text:span text:style-name="T29"><text:s/><text:tab/> <text:tab/> </text:span><text:span text:style-name="T15">&lt;</text:span> <text:span text:style-name="T22">artifactId</text:span> <text:span text:style-name="T15">&gt;</text:span> <text:span text:style-name="T29">distribucio-</text:span><text:span text:style-name="T32">rest</text:span><text:span text:style-name="T29">-client</text:span> <text:span text:style-name="T15">&lt;/</text:span> <text:span text:style-name="T22">artifactId</text:span> <text:span text:style-name="T15">&gt;</text:span> </text:p>
      <text:p text:style-name="P61"><text:span text:style-name="T29"><text:s/><text:tab/> <text:tab/> </text:span><text:span text:style-name="T15">&lt;</text:span> <text:span text:style-name="T22">version</text:span> <text:span text:style-name="T15">&gt;</text:span> <text:span text:style-name="T30">1.0.</text:span><text:span text:style-name="T33">7</text:span> <text:span text:style-name="T15">&lt;/</text:span> <text:span text:style-name="T22">version</text:span> <text:span text:style-name="T15">&gt;</text:span> </text:p>
      <text:p text:style-name="P233"><text:span text:style-name="T29"><text:s/><text:tab/> </text:span><text:span text:style-name="T15">&lt;/</text:span> <text:span text:style-name="T22">dependency</text:span> <text:span text:style-name="T15">&gt;</text:span> </text:p>
      <text:p text:style-name="P233"/>
      <text:p text:style-name="P226"/>
      <text:p text:style-name="P226">Per a utilitzar aquesta dependència és necessari tenir configurat el següent repository:</text:p>
      <text:p text:style-name="P374"/>
      <text:p text:style-name="P230"><text:span text:style-name="T29"><text:s/><text:tab/> </text:span><text:span text:style-name="T15">&lt;</text:span> <text:span text:style-name="T22">repository</text:span> <text:span text:style-name="T15">&gt;</text:span> </text:p>
      <text:p text:style-name="P55"><text:span text:style-name="T29"><text:s/><text:tab/> <text:tab/> </text:span><text:span text:style-name="T15">&lt;</text:span> <text:span text:style-name="T22">id</text:span> <text:span text:style-name="T15">&gt;</text:span> <text:span text:style-name="T29">github-governib-maven-repo</text:span> <text:span text:style-name="T15">&lt;/</text:span> <text:span text:style-name="T22">id</text:span> <text:span text:style-name="T15">&gt;</text:span> </text:p>
      <text:p text:style-name="P55"><text:span text:style-name="T29"><text:s/><text:tab/> <text:tab/> </text:span><text:span text:style-name="T15">&lt;</text:span> <text:span text:style-name="T22">name</text:span> <text:span text:style-name="T15">&gt;</text:span> <text:span text:style-name="T29">GitHub GovernIB Maven Repository</text:span> <text:span text:style-name="T15">&lt;/</text:span> <text:span text:style-name="T22">name</text:span> <text:span text:style-name="T15">&gt;</text:span> </text:p>
      <text:p text:style-name="P55"><text:span text:style-name="T29"><text:s/><text:tab/> <text:tab/> </text:span><text:span text:style-name="T15">&lt;</text:span> <text:span text:style-name="T22">url</text:span> <text:span text:style-name="T15">&gt;</text:span> <text:span text:style-name="T29">http://GovernIB.github.io/maven/maven/</text:span> <text:span text:style-name="T15">&lt;/</text:span> <text:span text:style-name="T22">url</text:span> <text:span text:style-name="T15">&gt;</text:span> </text:p>
      <text:p text:style-name="P230"><text:span text:style-name="T29"><text:s/><text:tab/> </text:span><text:span text:style-name="T15">&lt;/</text:span> <text:span text:style-name="T22">repository</text:span> <text:span text:style-name="T15">&gt;</text:span> </text:p>
      <text:p text:style-name="P230"/>
      <text:p text:style-name="P146"/>
      <text:p text:style-name="P465">Aquesta dependència ens dona accés a la classe B<text:span text:style-name="T367">ustia</text:span>RestClient que ens permet fer cridades al servei. En el següent fragment de codi es pot veure un exemple de com utilitzar aquesta classe per a fer cridades al servei:</text:p>
      <text:p text:style-name="P415"/>
      <text:p text:style-name="P417"><text:span text:style-name="T54"><text:tab/><text:tab/>Busti</text:span><text:span text:style-name="T57">aRestClient</text:span><text:span text:style-name="T54"> </text:span><text:span text:style-name="T89">bustia</text:span><text:span text:style-name="T91">RestClient</text:span><text:span text:style-name="T54"> = </text:span><text:span text:style-name="T48">new</text:span><text:span text:style-name="T357"> </text:span><text:span text:style-name="T76">BustiaRestClient(</text:span></text:p>
      <text:p text:style-name="P417"><text:span text:style-name="T54"><text:tab/><text:tab/><text:tab/></text:span><text:span text:style-name="T34">"http://DISTRIB_HOST/distribucioapi/interna/bustia/alta"</text:span><text:span text:style-name="T54">,</text:span></text:p>
      <text:p text:style-name="P417"><text:span text:style-name="T54"><text:tab/><text:tab/><text:tab/><text:tab/></text:span><text:span text:style-name="T34">"USERNAME"</text:span><text:span text:style-name="T54">,</text:span></text:p>
      <text:p text:style-name="P417"><text:span text:style-name="T54"><text:tab/><text:tab/><text:tab/><text:tab/></text:span><text:span text:style-name="T34">"PASSWORD"</text:span><text:span text:style-name="T54">);</text:span></text:p>
      <text:p text:style-name="P417"><text:span text:style-name="T54"><text:tab/><text:tab/>RegistreAnotacio </text:span><text:span text:style-name="T91">a</text:span><text:span text:style-name="T89">notacio</text:span><text:span text:style-name="T54"> = </text:span><text:span text:style-name="T48">new</text:span><text:span text:style-name="T54"> RegistreAnotacio();</text:span></text:p>
      <text:p text:style-name="P417"><text:span text:style-name="T54"><text:tab/><text:tab/></text:span><text:span text:style-name="T226">// </text:span><text:span text:style-name="T227">TODO e</text:span><text:span text:style-name="T226">mplenar dades de l'anotació de registre</text:span></text:p>
      <text:p text:style-name="P417"><text:span text:style-name="T54"><text:tab/><text:tab/></text:span><text:span text:style-name="T48">try</text:span><text:span text:style-name="T54"> {</text:span></text:p>
      <text:p text:style-name="P417"><text:span text:style-name="T54"><text:tab/><text:tab/><text:tab/></text:span><text:span text:style-name="T89">bustia</text:span><text:span text:style-name="T91">RestClient</text:span><text:span text:style-name="T54">.</text:span><text:span text:style-name="T57">alta</text:span><text:span text:style-name="T54">(</text:span></text:p>
      <text:p text:style-name="P417"><text:span text:style-name="T54"><text:tab/><text:tab/><text:tab/><text:tab/><text:tab/></text:span><text:span text:style-name="T85">ENTITAT</text:span><text:span text:style-name="T86">_DIST</text:span><text:span text:style-name="T85">_CODI</text:span><text:span text:style-name="T54">,</text:span></text:p>
      <text:p text:style-name="P417"><text:span text:style-name="T54"><text:tab/><text:tab/><text:tab/><text:tab/><text:tab/></text:span><text:span text:style-name="T86">UNITAT_ADM</text:span><text:span text:style-name="T85">_CODI</text:span><text:span text:style-name="T54">,</text:span></text:p>
      <text:p text:style-name="P417"><text:span text:style-name="T54"><text:tab/><text:tab/><text:tab/><text:tab/><text:tab/></text:span><text:span text:style-name="T91">a</text:span><text:span text:style-name="T89">notacio</text:span><text:span text:style-name="T54">);</text:span></text:p>
      <text:p text:style-name="P417"><text:span text:style-name="T54"><text:tab/><text:tab/>} </text:span><text:span text:style-name="T48">catch</text:span><text:span text:style-name="T54"> (Exception </text:span><text:span text:style-name="T89">ex</text:span><text:span text:style-name="T54">) {</text:span></text:p>
      <text:p text:style-name="P417"><text:span text:style-name="T54"><text:tab/><text:tab/><text:tab/></text:span><text:span text:style-name="T226">// </text:span><text:span text:style-name="T227">TODO tractar e</text:span><text:span text:style-name="T226">rrors en l'enviament</text:span></text:p>
      <text:p text:style-name="P417"><text:span text:style-name="T54"><text:tab/><text:tab/><text:tab/></text:span><text:span text:style-name="T89">ex</text:span><text:span text:style-name="T54">.printStackTrace();</text:span></text:p>
      <text:p text:style-name="P416"><text:tab/><text:tab/>}</text:p>
      <text:p text:style-name="P416"/>
      <text:p text:style-name="P464"/>
      <text:p text:style-name="Standard"><text:soft-page-break/><text:tab/>Servei de backoffice de distribució</text:p>
      <text:p text:style-name="P219">Els backoffices son els encarregats de processar les anotacions de registre <text:span text:style-name="T328">que son notificades des de</text:span> <text:span text:style-name="T328">l</text:span>’aplicació <text:span text:style-name="T327">DISTRIBUCIÓ.</text:span></text:p>
      <text:p text:style-name="P369">Aquesta notificació es du a terme mitjançant una cridada un servei que han d’implementar de forma obligatòria tots els backoffices. <text:span text:style-name="T327">La interfície d’aquest servei és la següent:</text:span></text:p>
      <text:p text:style-name="P152"><draw:frame draw:style-name="fr8" draw:name="Còpia de Imatge4 1" text:anchor-type="as-char" svg:width="17cm" svg:height="2.288cm" draw:z-index="68"><draw:image xlink:href="Pictures/20000009000006B5000000E73EC66AFA.svm" xlink:type="simple" xlink:show="embed" xlink:actuate="onLoad" draw:mime-type="image/x-svm"/><draw:image xlink:href="Pictures/10000001000000420000000A937B5137.png" xlink:type="simple" xlink:show="embed" xlink:actuate="onLoad" draw:mime-type="image/png"/></draw:frame><text:s text:c="5"/></text:p>
      <text:p text:style-name="P239">Per a la implementació REST s’ha d’habilitar una URL que rebi peticions POST a on s’informi d’una llista de les anotacions pendents. Aquesta llista es rebrà en format JSON i tendrà una estructura anàloga a la del següent exemple:</text:p>
      <text:p text:style-name="P96"/>
      <text:p text:style-name="P96">[ {</text:p>
      <text:p text:style-name="P56"><text:span text:style-name="T279">"i</text:span><text:span text:style-name="T280">n</text:span><text:span text:style-name="T279">detificador" </text:span><text:span text:style-name="T74">: </text:span><text:span text:style-name="T281">"GOIBE1111/2022"</text:span><text:span text:style-name="T74">,</text:span></text:p>
      <text:p text:style-name="P56"><text:span text:style-name="T279">"clauAcces" </text:span><text:span text:style-name="T74">: </text:span><text:span text:style-name="T281">"hv/8hXYRSFYtVEjZyDfEE8KdOIiX3N1UEXGiltl3rbw="</text:span></text:p>
      <text:p text:style-name="P96">}, {</text:p>
      <text:p text:style-name="P56"><text:span text:style-name="T279">"i</text:span><text:span text:style-name="T280">n</text:span><text:span text:style-name="T279">d</text:span><text:span text:style-name="T280">e</text:span><text:span text:style-name="T279">tificador" </text:span><text:span text:style-name="T74">: </text:span><text:span text:style-name="T281">"GOIBE2222/2022"</text:span><text:span text:style-name="T74">,</text:span></text:p>
      <text:p text:style-name="P238"><text:span text:style-name="T279">"clauAcces" </text:span><text:span text:style-name="T74">: </text:span><text:span text:style-name="T281">"AzRwN0QQV70RR4IxXFZsPj2FYJ2VA7LDiKap19MmA/U="</text:span></text:p>
      <text:p text:style-name="P238"><text:span text:style-name="T281">}</text:span><text:span text:style-name="T124"> ]</text:span></text:p>
      <text:p text:style-name="P238"/>
      <text:p text:style-name="P151"/>
      <text:p text:style-name="P421"><text:span text:style-name="T11">En qualsevol d’aquestes implementacions l’autenticació haurà de ser de tipus HTTP Basic.</text:span></text:p>
      <text:p text:style-name="P20"/>
      <text:p text:style-name="P240"><text:span text:style-name="T12">Important:</text:span><text:span text:style-name="T11"> Les implementacions REST han de permetre una cridada amb un JSON que representa una llista buida («[]») sense produir cap error.</text:span></text:p>
      <text:p text:style-name="P20"/>
      <text:list text:continue-numbering="true" text:style-name="Outline">
        <text:list-item>
          <text:h text:style-name="P388" text:outline-level="1"><text:bookmark-start text:name="__RefHeading___Toc160470_1680181998"/><text:bookmark-start text:name="__RefNumPara__81017_1680181998"/>Servei de gestió d’anotacions pels backoffices<text:bookmark-end text:name="__RefHeading___Toc160470_1680181998"/><text:bookmark-end text:name="__RefNumPara__81017_1680181998"/></text:h>
        </text:list-item>
      </text:list>
      <text:p text:style-name="P229">Aquest servei permet <text:span text:style-name="T324">als backoffices consultar la informació d’una anotació de registre i canviar el seu estat.</text:span></text:p>
      <text:p text:style-name="P228"><draw:frame draw:style-name="fr3" draw:name="Marc1" text:anchor-type="as-char" svg:width="10.109cm" draw:z-index="69"><draw:text-box fo:min-height="8.481cm"><text:p text:style-name="P215"><draw:frame draw:style-name="fr7" draw:name="Còpia de Imatge6 1" text:anchor-type="paragraph" svg:width="10.109cm" style:rel-width="100%" svg:height="7.08cm" style:rel-height="scale" draw:z-index="70"><draw:image xlink:href="Pictures/1000000100000171000001063B672558.png" xlink:type="simple" xlink:show="embed" xlink:actuate="onLoad" draw:mime-type="image/png"/></draw:frame>Figura <text:span text:style-name="T117"><text:sequence text:ref-name="refFig.1" text:name="Fig." text:formula="ooow:Fig.+1" style:num-format="1">2</text:sequence></text:span>: <text:s/><text:span text:style-name="T316">Casos d'ús </text:span><text:span text:style-name="T336">de gestió </text:span><text:span text:style-name="T318">d'anotacions a </text:span><text:span text:style-name="T316">DISTRIBUCIÓ</text:span></text:p></draw:text-box></draw:frame></text:p>
      <text:list xml:id="list112333514977112" text:continue-numbering="true" text:style-name="Outline">
        <text:list-item>
          <text:list>
            <text:list-item>
              <text:h text:style-name="P394" text:outline-level="2"><text:bookmark-start text:name="Còpia de __RefHeading___Toc16770_2313926538 1"/><text:bookmark-start text:name="__RefHeading___Toc227357_390838441"/><text:span text:style-name="T324">Diagram</text:span><text:span text:style-name="T326">a</text:span><text:span text:style-name="T324"> d</text:span><text:span text:style-name="T325">e seqüència</text:span><text:bookmark-end text:name="Còpia de __RefHeading___Toc16770_2313926538 1"/><text:bookmark-end text:name="__RefHeading___Toc227357_390838441"/></text:h>
            </text:list-item>
          </text:list>
        </text:list-item>
      </text:list>
      <text:p text:style-name="P212">El <text:span text:style-name="T119">detall</text:span> de la comunicació <text:span text:style-name="T119">entre</text:span> l’aplicació DISTRIBUCIÓ <text:span text:style-name="T337">i</text:span><text:span text:style-name="T119"> el backoffice </text:span><text:span text:style-name="T337">per a la gestió de les anotacions </text:span><text:span text:style-name="T119">es pot veure en el següent diagrama.</text:span></text:p>
      <text:p text:style-name="P211"><draw:custom-shape text:anchor-type="paragraph" draw:z-index="57" draw:name="Forma 6" draw:style-name="gr1" draw:text-style-name="P468" svg:width="0.556cm" svg:height="0.454cm" svg:x="8.474cm" svg:y="2.879cm"><text:p text:style-name="P467"><text:span text:style-name="T381">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58" draw:name="Forma 7" draw:style-name="gr1" draw:text-style-name="P468" svg:width="0.556cm" svg:height="0.454cm" svg:x="7.601cm" svg:y="3.487cm"><text:p text:style-name="P467"><text:span text:style-name="T381">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59" draw:name="Forma 8" draw:style-name="gr1" draw:text-style-name="P468" svg:width="0.556cm" svg:height="0.454cm" svg:x="1.251cm" svg:y="1.873cm"><text:p text:style-name="P467"><text:span text:style-name="T381">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0" draw:name="Forma 9" draw:style-name="gr1" draw:text-style-name="P468" svg:width="0.556cm" svg:height="0.454cm" svg:x="7.442cm" svg:y="5.048cm"><text:p text:style-name="P467"><text:span text:style-name="T381">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1" draw:name="Forma 10" draw:style-name="gr1" draw:text-style-name="P468" svg:width="0.556cm" svg:height="0.454cm" svg:x="7.468cm" svg:y="7.165cm"><text:p text:style-name="P467"><text:span text:style-name="T381">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1"><draw:image xlink:href="Pictures/1000000100000259000001691D245771.png" xlink:type="simple" xlink:show="embed" xlink:actuate="onLoad" draw:mime-type="image/png"/></draw:frame></text:p>
      <text:list text:style-name="L11">
        <text:list-item>
          <text:p text:style-name="P448">L’aplicació de distribució comunica al backoffice <text:span text:style-name="T121">l'existència</text:span> d’anotacions de registre pendents de processar mitjançant el mètode comunicarAnotacionsPendents del servei DistribucioBackoffice.</text:p>
        </text:list-item>
        <text:list-item>
          <text:p text:style-name="P449">El backoffice <text:span text:style-name="T121">ha de </text:span>guardar en una coa la llista d’anotacions a processar i finalitzar la comunicació.</text:p>
        </text:list-item>
        <text:list-item>
          <text:p text:style-name="P451">El backoffice <text:span text:style-name="T121">ha de processar les anotacions pendents que se li han comunicat.</text:span></text:p>
        </text:list-item>
      </text:list>
      <text:p text:style-name="P208">A mesura que el backoffice vagi processant les anotacions de registre, es requer<text:span text:style-name="T121">eix</text:span> la següent comunicació amb l’aplicació de DISTRIBUCIO:</text:p>
      <text:list text:continue-numbering="true" text:style-name="L11">
        <text:list-item>
          <text:p text:style-name="P449">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49"><text:bookmark-start text:name="__RefNumPara__52573_2521683781"/>Una vegada processada l’anotació, el backoffice haurà de comunicar a l’aplicació de DISTRIBUCIO l’estat d’aquest processament mitjançant el mètode canviEstat<text:span text:style-name="T120"> del servei DistribucioBackoffice.</text:span> Els possibles estats son:<text:bookmark-end text:name="__RefNumPara__52573_2521683781"/></text:p>
        </text:list-item>
      </text:list>
      <text:list text:style-name="L12">
        <text:list-item>
          <text:list>
            <text:list-item>
              <text:p text:style-name="P452">REBUDA: S'ha rebut la petició al backoffice.</text:p>
            </text:list-item>
            <text:list-item>
              <text:p text:style-name="P450">PENDENT<text:span text:style-name="T319">: L'anotació s'ha rebut i consultat correctament i està pendent de processament.</text:span></text:p>
            </text:list-item>
            <text:list-item>
              <text:p text:style-name="P452">REBUTJADA: Es comunica l'estat i el motiu a DISTRIBUCIO conforme l'anotació es rebutja des del backoffice i per a que quedi com a rebutjada i pendent de processament a DISTRIBUCIO</text:p>
            </text:list-item>
            <text:list-item>
              <text:p text:style-name="P450"><text:soft-page-break/>PROCESSADA<text:span text:style-name="T319">: L'anotació s'ha processat correctament al backoffice.</text:span></text:p>
            </text:list-item>
            <text:list-item>
              <text:p text:style-name="P450">ERROR<text:span text:style-name="T319">: El processament de l'anotació o la consulta ha resultat amb error i es comunica a DISTRIBUCIO per a que reintenti l'enviament o la marqui amb un error.</text:span></text:p>
            </text:list-item>
          </text:list>
        </text:list-item>
      </text:list>
      <text:p text:style-name="P214">Quan el backoffice rep la comunicació d'anotació pendent pot marcar l'estat <text:span text:style-name="T320">«</text:span>REBUDA<text:span text:style-name="T320">»</text:span> conforme ha rebut la petició i si no processa immediatament l'anotació pot posar que està pendent de processament amb l'estat <text:span text:style-name="T320">«</text:span>PENDENT<text:span text:style-name="T320">»</text:span>.</text:p>
      <text:p text:style-name="P208">Si el backoffice ha processat correctament l’anotació de registre l’estat indicat haurà de ser «PROCESSADA». En canvi, si l’anotació ha produït algun tipus d’error de processament, l’estat indicat haurà de ser «ERROR».<text:span text:style-name="T319"> També hi ha la possibilitat de rebutjar les anotacions amb l'estat </text:span>«<text:span text:style-name="T319">REBUTJADA</text:span>»<text:span text:style-name="T319">.</text:span></text:p>
      <text:list xml:id="list112332462549198" text:continue-list="list112333514977112" text:style-name="Outline">
        <text:list-item>
          <text:list>
            <text:list-item>
              <text:h text:style-name="P397" text:outline-level="2"><text:bookmark-start text:name="Còpia de Còpia de __RefHeading___Toc16772_2313926538 2 1"/><text:bookmark-start text:name="__RefHeading___Toc227359_390838441"/><text:bookmark-start text:name="Còpia de Còpia de __RefNumPara__80988_1680181998 2 1"/>Descripció del servei<text:bookmark-end text:name="Còpia de Còpia de __RefHeading___Toc16772_2313926538 2 1"/><text:bookmark-end text:name="__RefHeading___Toc227359_390838441"/><text:bookmark-end text:name="Còpia de Còpia de __RefNumPara__80988_1680181998 2 1"/></text:h>
              <text:list>
                <text:list-item>
                  <text:h text:style-name="P406" text:outline-level="3"><text:bookmark-start text:name="__RefHeading___Toc53751_2521683781"/>Consulta d'una anotació <text:span text:style-name="T334">de registre</text:span><text:bookmark-end text:name="__RefHeading___Toc53751_2521683781"/></text:h>
                </text:list-item>
              </text:list>
            </text:list-item>
          </text:list>
        </text:list-item>
      </text:list>
      <text:p text:style-name="P185"/>
      <text:p text:style-name="P191">Aquest mètode és el que permet <text:span text:style-name="T290">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192">Els backoffices d’integració hauran de sol·licitar la creació d’un usuari d’integració específic que disposi del rol <text:span text:style-name="Strong_20_Emphasis"><text:span text:style-name="T133">DIS_BACK</text:span></text:span>, necessari per poder accedir als serveis de consulta i canvi d’estat de les anotacions.</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60">Consulta d’una anotació de registre</text:p>
          </table:table-cell>
          <table:covered-table-cell/>
        </table:table-row>
        <table:table-row>
          <table:table-cell table:style-name="Taula14.A2" office:value-type="string">
            <text:p text:style-name="P37">Mètode</text:p>
          </table:table-cell>
          <table:table-cell table:style-name="Taula14.B2" office:value-type="string">
            <text:p text:style-name="P200">GET</text:p>
          </table:table-cell>
        </table:table-row>
        <table:table-row>
          <table:table-cell table:style-name="Taula14.A2" office:value-type="string">
            <text:p text:style-name="P31">URL</text:p>
          </table:table-cell>
          <table:table-cell table:style-name="Taula14.B2" office:value-type="string">
            <text:p text:style-name="P186">http<text:span text:style-name="T323">s</text:span>://<text:span text:style-name="T323">DISTRIB_HOST/distribucioapi/interna</text:span>/<text:span text:style-name="T290">backoffice</text:span>/<text:span text:style-name="T290">consulta</text:span></text:p>
          </table:table-cell>
        </table:table-row>
        <table:table-row>
          <table:table-cell table:style-name="Taula14.A2" office:value-type="string">
            <text:p text:style-name="P30">Descripció</text:p>
          </table:table-cell>
          <table:table-cell table:style-name="Taula14.B2" office:value-type="string">
            <text:p text:style-name="P45"><text:span text:style-name="T290">Consulta les dades d'una anotació i dels seus interessats i annexos a partir de l'identificador i clau comunicada per DISTRIBUCIO</text:span>.<text:span text:style-name="T291"> </text:span></text:p>
          </table:table-cell>
        </table:table-row>
        <table:table-row>
          <table:table-cell table:style-name="Taula14.A2" office:value-type="string">
            <text:p text:style-name="P37">Autenticació</text:p>
          </table:table-cell>
          <table:table-cell table:style-name="Taula14.B2" office:value-type="string">
            <text:p text:style-name="P358">HTTP Basic</text:p>
          </table:table-cell>
        </table:table-row>
        <table:table-row>
          <table:table-cell table:style-name="Taula14.A2" office:value-type="string">
            <text:p text:style-name="P37">Rols requerits</text:p>
          </table:table-cell>
          <table:table-cell table:style-name="Taula14.B2" office:value-type="string">
            <text:p text:style-name="P358">DIS_BACKWS</text:p>
          </table:table-cell>
        </table:table-row>
        <table:table-row>
          <table:table-cell table:style-name="Taula14.A2" office:value-type="string">
            <text:p text:style-name="P30">Paràmetres</text:p>
          </table:table-cell>
          <table:table-cell table:style-name="Taula14.B2" office:value-type="string">
            <text:list xml:id="list2470982607" text:style-name="L1">
              <text:list-item>
                <text:p text:style-name="P428"><text:span text:style-name="T46">identificador</text:span><text:span text:style-name="T284">:</text:span><text:span text:style-name="T291"> És l'identificador de l'anotació comunicada per DISTRIBUCIO. </text:span><text:span text:style-name="T310">Sol coincidir amb </text:span><text:span text:style-name="T291">el número de registre de l'anotació.</text:span></text:p>
              </text:list-item>
              <text:list-item>
                <text:p text:style-name="P428"><text:span text:style-name="T45">clauAcces</text:span><text:span text:style-name="T284">: </text:span><text:span text:style-name="T291">És una clau proporcionada per DISTRIBUCIO en el moment de notificar al backoffice l'anotació de registre que s'ha d'emprar per consultar o canviar l'estat </text:span><text:span text:style-name="T310">de</text:span><text:span text:style-name="T291"> l'anotació.</text:span></text:p>
              </text:list-item>
            </text:list>
            <text:p text:style-name="P45"><text:span text:style-name="T305">Com que és una petició de consulta els paràmetres s'informen en la </text:span><text:span text:style-name="T310">pròpia </text:span><text:span text:style-name="T305">URL. </text:span><text:soft-page-break/><text:span text:style-name="T291">Un exemple de petició seria el següent. </text:span><text:span text:style-name="T292">Pels paràmetres identificador: </text:span><text:span text:style-name="T294">"GOIBE715-DEV/2023"</text:span><text:span text:style-name="T292"> i clau d'accés </text:span><text:span text:style-name="T294">"JRwLmCaMES6JKAAnzhd5K9Qi4ppjudiLwd+2b5LNsVo="</text:span><text:span text:style-name="T292"> la petició amb els paràmetres codif</text:span><text:span text:style-name="T310">i</text:span><text:span text:style-name="T292">cats </text:span><text:span text:style-name="T310">és</text:span><text:span text:style-name="T292">:</text:span></text:p>
            <text:p text:style-name="P195">GET https://<text:span text:style-name="T310">se</text:span>.caib.es/distribucioapi/interna/backoffice/consulta?ide<text:span text:style-name="T350">n</text:span>tificador=GOIBE715-DEV%2F2023&amp;clauAcces=JRwLmCaMES6JKAAnzhd5K9Qi4ppjudiLwd%2B2b5LNsVo%3D</text:p>
          </table:table-cell>
        </table:table-row>
        <table:table-row>
          <table:table-cell table:style-name="Taula14.A2" office:value-type="string">
            <text:p text:style-name="P30">Resultat</text:p>
          </table:table-cell>
          <table:table-cell table:style-name="Taula14.B2" office:value-type="string">
            <text:list text:style-name="L2">
              <text:list-item>
                <text:p text:style-name="P432">HTTP 200 i el JSON del detall de l'anotació com a cos de la resposta.</text:p>
              </text:list-item>
              <text:list-item>
                <text:p text:style-name="P434">HTTP <text:span text:style-name="T298">401</text:span> <text:span text:style-name="T298">si l'usuari no té el rol DIS_BACKWS amb un missatge d'error com a cos de la resposta.</text:span></text:p>
              </text:list-item>
              <text:list-item>
                <text:p text:style-name="P437">HTTP 500 si es produe<text:span text:style-name="T310">i</text:span>x un error intern no controlat <text:span text:style-name="T298">consultant l'anotació</text:span>.</text:p>
              </text:list-item>
            </text:list>
            <text:p text:style-name="P201"><text:s/>Un exemple de JSON de resposta, de forma abreujada, seria el següent:</text:p>
            <text:p text:style-name="P201"/>
            <text:p text:style-name="P99">{</text:p>
            <text:p text:style-name="P104">    <text:span text:style-name="T301">"identificador"</text:span><text:span text:style-name="T299">: </text:span><text:span text:style-name="T293">"GOIBE715-DEV/2023"</text:span><text:span text:style-name="T299">,</text:span></text:p>
            <text:p text:style-name="P106">    <text:span text:style-name="T301">"procedimentCodi"</text:span><text:span text:style-name="T299">: </text:span><text:span text:style-name="T293">"703381"</text:span><text:span text:style-name="T299">,</text:span></text:p>
            <text:p text:style-name="P106">    <text:span text:style-name="T301">"</text:span><text:span text:style-name="T303">servei</text:span><text:span text:style-name="T301">Codi"</text:span><text:span text:style-name="T299">: </text:span><text:span text:style-name="T296">null</text:span><text:span text:style-name="T299">,</text:span></text:p>
            <text:p text:style-name="P106">    <text:span text:style-name="T301">"extracte"</text:span><text:span text:style-name="T299">: </text:span><text:span text:style-name="T293">"Solicitud de equivalencia - Equivalencia con los títulos de Graduado en Educación Secundaria Obligatoria y de Bachiller"</text:span><text:span text:style-name="T299">,</text:span></text:p>
            <text:p text:style-name="P104">    <text:span text:style-name="T301">"data"</text:span><text:span text:style-name="T299">: </text:span><text:span text:style-name="T304">1683181017253</text:span><text:span text:style-name="T299">,</text:span></text:p>
            <text:p text:style-name="P100"><text:s text:c="2"/>...</text:p>
            <text:p text:style-name="P104">    <text:span text:style-name="T301">"interessats"</text:span><text:span text:style-name="T299">: [</text:span></text:p>
            <text:p text:style-name="P104">        <text:span text:style-name="T299">{</text:span></text:p>
            <text:p text:style-name="P104">            <text:span text:style-name="T301">"tipus"</text:span><text:span text:style-name="T299">: </text:span><text:span text:style-name="T293">"PERSONA_FISICA"</text:span><text:span text:style-name="T299">,</text:span></text:p>
            <text:p text:style-name="P104">            <text:span text:style-name="T301">"documentTipus"</text:span><text:span text:style-name="T299">: </text:span><text:span text:style-name="T293">"NIF"</text:span><text:span text:style-name="T299">,</text:span></text:p>
            <text:p text:style-name="P104">            <text:span text:style-name="T298">...</text:span></text:p>
            <text:p text:style-name="P104">        <text:span text:style-name="T299">}</text:span></text:p>
            <text:p text:style-name="P104">    <text:span text:style-name="T299">],</text:span></text:p>
            <text:p text:style-name="P104">    <text:span text:style-name="T301">"annexos"</text:span><text:span text:style-name="T299">: [</text:span></text:p>
            <text:p text:style-name="P104">        <text:span text:style-name="T299">{</text:span></text:p>
            <text:p text:style-name="P104">            <text:span text:style-name="T301">"titol"</text:span><text:span text:style-name="T299">: </text:span><text:span text:style-name="T293">"Formulario de identificación del firmante"</text:span><text:span text:style-name="T299">,</text:span></text:p>
            <text:p text:style-name="P104">            <text:span text:style-name="T301">"nom"</text:span><text:span text:style-name="T299">: </text:span><text:span text:style-name="T293">"FORM-1-1.pdf"</text:span><text:span text:style-name="T299">,</text:span></text:p>
            <text:p text:style-name="P104">            <text:span text:style-name="T301">"contingut"</text:span><text:span text:style-name="T299">: </text:span><text:span text:style-name="T297">null</text:span><text:span text:style-name="T299">,</text:span></text:p>
            <text:p text:style-name="P104">            <text:span text:style-name="T301">"uuid"</text:span><text:span text:style-name="T299">: </text:span><text:span text:style-name="T293">"0276698a-d0f9-44f7-84be-841a98881e4a"</text:span><text:span text:style-name="T299">,</text:span></text:p>
            <text:p text:style-name="P104">            <text:span text:style-name="T300">...</text:span></text:p>
            <text:p text:style-name="P104">            <text:span text:style-name="T301">"documentValid"</text:span><text:span text:style-name="T299">: </text:span><text:span text:style-name="T297">true</text:span><text:span text:style-name="T299">,</text:span></text:p>
            <text:p text:style-name="P104">            <text:span text:style-name="T301">"documentError"</text:span><text:span text:style-name="T299">: </text:span><text:span text:style-name="T297">null</text:span><text:span text:style-name="T299">,</text:span></text:p>
            <text:p text:style-name="P104">            <text:span text:style-name="T301">"estat"</text:span><text:span text:style-name="T299">: </text:span><text:span text:style-name="T293">"DEFINITIU"</text:span></text:p>
            <text:p text:style-name="P104">        <text:span text:style-name="T299">}</text:span></text:p>
            <text:p text:style-name="P104">    <text:span text:style-name="T299">],</text:span></text:p>
            <text:p text:style-name="P104">    <text:span text:style-name="T301">"justificantFitxerArxiuUuid"</text:span><text:span text:style-name="T299">: </text:span><text:span text:style-name="T293">"0cd70aa5-77aa-4d2e-8032-d84cad38669b"</text:span><text:span text:style-name="T299">,</text:span></text:p>
            <text:p text:style-name="P104">    <text:span text:style-name="T301">"destiCodi"</text:span><text:span text:style-name="T299">: </text:span><text:span text:style-name="T293">"A04013522"</text:span><text:span text:style-name="T299">,</text:span></text:p>
            <text:p text:style-name="P104">    <text:span text:style-name="T301">"destiDescripcio"</text:span><text:span text:style-name="T299">: </text:span><text:span text:style-name="T293">"Direcció General de Planificació, Ordenació i Centres"</text:span></text:p>
            <text:p text:style-name="P105">    <text:span text:style-name="T301">"</text:span><text:span text:style-name="T302">tramitCodi</text:span><text:span text:style-name="T301">"</text:span><text:span text:style-name="T299">: </text:span><text:span text:style-name="T293">"</text:span><text:span text:style-name="T295">1234</text:span><text:span text:style-name="T293">"</text:span></text:p>
            <text:p text:style-name="P105"><text:soft-page-break/>    <text:span text:style-name="T301">"</text:span><text:span text:style-name="T302">tramitNom</text:span><text:span text:style-name="T301">"</text:span><text:span text:style-name="T299">: </text:span><text:span text:style-name="T293">"</text:span><text:span text:style-name="T295">Nom del tràmit</text:span><text:span text:style-name="T293">"</text:span></text:p>
            <text:p text:style-name="P101">}</text:p>
            <text:p text:style-name="P194"/>
          </table:table-cell>
        </table:table-row>
      </table:table>
      <text:p text:style-name="P190"/>
      <text:p text:style-name="P202">El JSON de la resposta conté les dades de l'anotació, els interessats i dels annexos. És el mapeig a JSON de les classes descrites en el punt anterior del WS d'integració. </text:p>
      <text:list xml:id="list112332530807440" text:continue-list="list112332462549198" text:style-name="Outline">
        <text:list-item>
          <text:list>
            <text:list-item>
              <text:list>
                <text:list-item>
                  <text:h text:style-name="P406" text:outline-level="3"><text:bookmark-start text:name="__RefHeading___Toc53753_2521683781"/>Canvi d'estat d'una anotació<text:bookmark-end text:name="__RefHeading___Toc53753_2521683781"/></text:h>
                </text:list-item>
              </text:list>
            </text:list-item>
          </text:list>
        </text:list-item>
      </text:list>
      <text:p text:style-name="P190"><text:span text:style-name="T305">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60">Canvi d'estat d'una anotació</text:p>
          </table:table-cell>
          <table:covered-table-cell/>
        </table:table-row>
        <table:table-row>
          <table:table-cell table:style-name="Taula15.A2" office:value-type="string">
            <text:p text:style-name="P30">URL</text:p>
          </table:table-cell>
          <table:table-cell table:style-name="Taula15.B2" office:value-type="string">
            <text:p text:style-name="P186">http<text:span text:style-name="T323">s</text:span>://<text:span text:style-name="T323">DISTRIB_HOST/distribucioapi/interna</text:span>/<text:span text:style-name="T290">backoffice</text:span>/<text:span text:style-name="T305">canviEstat</text:span></text:p>
          </table:table-cell>
        </table:table-row>
        <table:table-row>
          <table:table-cell table:style-name="Taula15.A3" office:value-type="string">
            <text:p text:style-name="P39">Mètode</text:p>
          </table:table-cell>
          <table:table-cell table:style-name="Taula15.B3" office:value-type="string">
            <text:p text:style-name="P203">POST</text:p>
          </table:table-cell>
        </table:table-row>
        <table:table-row>
          <table:table-cell table:style-name="Taula15.A3" office:value-type="string">
            <text:p text:style-name="P30">Descripció</text:p>
          </table:table-cell>
          <table:table-cell table:style-name="Taula15.B3" office:value-type="string">
            <text:p text:style-name="P45">Canvia l'estat d'una anotació de registre enviada a backoffice.<text:span text:style-name="T291"> </text:span></text:p>
          </table:table-cell>
        </table:table-row>
        <table:table-row>
          <table:table-cell table:style-name="Taula15.A3" office:value-type="string">
            <text:p text:style-name="P37">Autenticació</text:p>
          </table:table-cell>
          <table:table-cell table:style-name="Taula15.B3" office:value-type="string">
            <text:p text:style-name="P358">HTTP Basic</text:p>
          </table:table-cell>
        </table:table-row>
        <table:table-row>
          <table:table-cell table:style-name="Taula15.A3" office:value-type="string">
            <text:p text:style-name="P37">Rols requerits</text:p>
          </table:table-cell>
          <table:table-cell table:style-name="Taula15.B3" office:value-type="string">
            <text:p text:style-name="P358">DIS_BACKWS</text:p>
          </table:table-cell>
        </table:table-row>
        <table:table-row>
          <table:table-cell table:style-name="Taula15.A3" office:value-type="string">
            <text:p text:style-name="P30">Paràmetres</text:p>
          </table:table-cell>
          <table:table-cell table:style-name="Taula15.B3" office:value-type="string">
            <text:p text:style-name="P183"><text:s/>En aquest cas <text:span text:style-name="T306">la petició es passa com a un objecte JSON en el cos de la petició POST on s'ha d</text:span><text:span text:style-name="T311">'</text:span><text:span text:style-name="T306">especificar l'identificador amb la clau, l'estat i les observacions. Els paràmetres serien els següents:</text:span></text:p>
            <text:p text:style-name="P183"/>
            <text:list text:continue-list="list2470982607" text:style-name="L1">
              <text:list-item>
                <text:p text:style-name="P442">id:</text:p>
                <text:list>
                  <text:list-item>
                    <text:p text:style-name="P428"><text:span text:style-name="T46">identificador</text:span><text:span text:style-name="T284">:</text:span><text:span text:style-name="T291"> És l'identificador de l'anotació comunicada per DISTRIBUCIO. Típicament sol ser el número de registre de l'anotació.</text:span><text:span text:style-name="T307"> Format String, dada obligatòria.</text:span></text:p>
                  </text:list-item>
                  <text:list-item>
                    <text:p text:style-name="P428"><text:span text:style-name="T45">clauAcces</text:span><text:span text:style-name="T284">: </text:span><text:span text:style-name="T291">És una clau proporcionada per DISTRIBUCIO en el moment de notificar al backoffice l'anotació de registre que s'ha d'emprar per consultar o canviar l'estat a l'anotació</text:span><text:span text:style-name="T307">. Format String, dada o</text:span><text:span text:style-name="T311">b</text:span><text:span text:style-name="T307">li</text:span><text:span text:style-name="T311">g</text:span><text:span text:style-name="T307">atòria</text:span><text:span text:style-name="T291">.</text:span></text:p>
                  </text:list-item>
                </text:list>
              </text:list-item>
              <text:list-item>
                <text:p text:style-name="P442">estat:<text:span text:style-name="T307"> </text:span><text:span text:style-name="T217">Codi del nou estat a comunicar a DISTRIBUCIO per l'anotació. S'ha d'informar en fo</text:span><text:span text:style-name="T218">r</text:span><text:span text:style-name="T217">mat String i és una dada obligatòria. Els possibles estats són:</text:span></text:p>
                <text:list>
                  <text:list-item>
                    <text:p text:style-name="P444">REBUDA: Indica a DISTRIBUCIO que pot marcar l'anotació com a rebuda al backoffice.</text:p>
                  </text:list-item>
                  <text:list-item>
                    <text:p text:style-name="P444">PROCESSADA: <text:span text:style-name="T311">Marca l'anotació </text:span>l'anotació <text:span text:style-name="T311">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11">n</text:span>t de l'Arxiu de l'expedient del backoffice.</text:p>
                  </text:list-item>
                  <text:list-item>
                    <text:p text:style-name="P444">REBUTJADA: Marca l'anotació com a rebutjada pel backoffice. <text:soft-page-break/>Aquesta apareixerà com a<text:span text:style-name="T311"> rebutjada pel backoffice </text:span>a DISTRIBUCIO <text:span text:style-name="T311">amb el comentari que s'hagi informat</text:span>.<text:span text:style-name="T311"> </text:span></text:p>
                  </text:list-item>
                  <text:list-item>
                    <text:p text:style-name="P444">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42">observacions:<text:span text:style-name="T307"> </text:span><text:span text:style-name="T217">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45"/>
            <text:p text:style-name="P45"><text:span text:style-name="T291"><text:s/>Un exemple de petició seria el següent. </text:span><text:span text:style-name="T292">Pels paràmetres identificador: </text:span><text:span text:style-name="T294">"GOIBE1682590959780/2023"</text:span><text:span text:style-name="T292"> i clau d'accés </text:span><text:span text:style-name="T294">"RfG3stK7Bc7JmuOk+riod/uOnBNGUEPqZt6+1/HiTlc="</text:span><text:span text:style-name="T292"> la petició amb els paràmetres</text:span><text:span text:style-name="T306"> en el cos de la petició POST com a JSON</text:span><text:span text:style-name="T292"> seria:</text:span></text:p>
            <text:p text:style-name="P196">POST</text:p>
            <text:p text:style-name="P98">{</text:p>
            <text:p text:style-name="P102">  <text:span text:style-name="T301">"id"</text:span><text:span text:style-name="T299">: {</text:span></text:p>
            <text:p text:style-name="P103">    <text:span text:style-name="T301">"identificador"</text:span><text:span text:style-name="T299">: </text:span><text:span text:style-name="T293">"GOIBE1682590959780/2023"</text:span><text:span text:style-name="T299">,</text:span></text:p>
            <text:p text:style-name="P102">    <text:span text:style-name="T301">"clauAcces"</text:span><text:span text:style-name="T299">: </text:span><text:span text:style-name="T293">"RfG3stK7Bc7JmuOk+riod/uOnBNGUEPqZt6+1/HiTlc="</text:span></text:p>
            <text:p text:style-name="P102">  <text:span text:style-name="T299">},</text:span></text:p>
            <text:p text:style-name="P102">  <text:span text:style-name="T301">"estat"</text:span><text:span text:style-name="T299">: </text:span><text:span text:style-name="T293">"PROCESSADA"</text:span><text:span text:style-name="T299">,</text:span></text:p>
            <text:p text:style-name="P102">  <text:span text:style-name="T301">"observacions"</text:span><text:span text:style-name="T299">: </text:span><text:span text:style-name="T293">"S'ha creat l'expedient 123/2023"</text:span></text:p>
            <text:p text:style-name="P97">}</text:p>
            <text:p text:style-name="P193"/>
          </table:table-cell>
        </table:table-row>
        <table:table-row>
          <table:table-cell table:style-name="Taula15.A8" office:value-type="string">
            <text:p text:style-name="P30">Resultat</text:p>
          </table:table-cell>
          <table:table-cell table:style-name="Taula15.B8" office:value-type="string">
            <text:list text:style-name="L3">
              <text:list-item>
                <text:p text:style-name="P433">HTTP 200 <text:span text:style-name="T308">si la petició s'ha processat correctament.</text:span></text:p>
              </text:list-item>
              <text:list-item>
                <text:p text:style-name="P438">HTTP 500 si es produeix un error intern no controlat <text:span text:style-name="T298">consultant l'anotació</text:span>.<text:span text:style-name="T308"> Com a cos de la resposta es retorna el missatge de confirmació.</text:span></text:p>
              </text:list-item>
            </text:list>
          </table:table-cell>
        </table:table-row>
      </table:table>
      <text:p text:style-name="P202"/>
      <text:list text:continue-list="list112332530807440" text:style-name="Outline">
        <text:list-item>
          <text:list>
            <text:list-item>
              <text:h text:style-name="P400" text:outline-level="2"><text:bookmark-start text:name="Còpia de Còpia de Còpia de __RefHeading___Toc16772_2313926538 2 1 3"/><text:bookmark-start text:name="__RefHeading___Toc227361_390838441"/><text:bookmark-start text:name="Còpia de Còpia de Còpia de __RefNumPara__80988_1680181998 2 1 3"/>Model de dades<text:bookmark-end text:name="Còpia de Còpia de Còpia de __RefHeading___Toc16772_2313926538 2 1 3"/><text:bookmark-end text:name="__RefHeading___Toc227361_390838441"/><text:bookmark-end text:name="Còpia de Còpia de Còpia de __RefNumPara__80988_1680181998 2 1 3"/></text:h>
            </text:list-item>
          </text:list>
        </text:list-item>
      </text:list>
      <text:p text:style-name="P213">A continuació es mostra el diagrama de classes amb els detalls de l’objecte AnotacioRegistreEntrada:</text:p>
      <text:p text:style-name="P153"><text:soft-page-break/><draw:frame draw:style-name="fr8" draw:name="Imagen2" text:anchor-type="as-char" svg:width="17cm" svg:height="8.916cm" draw:z-index="72"><draw:image xlink:href="Pictures/10000001000004D90000028B6D568F62.png" xlink:type="simple" xlink:show="embed" xlink:actuate="onLoad" draw:mime-type="image/png"/></draw:frame></text:p>
      <text:p text:style-name="P130"/>
      <table:table table:name="Taula4" table:style-name="Taula4">
        <table:table-column table:style-name="Taula4.A"/>
        <table:table-column table:style-name="Taula4.B"/>
        <table:table-column table:style-name="Taula4.C"/>
        <table:table-column table:style-name="Taula4.D"/>
        <table:table-column table:style-name="Taula4.E"/>
        <table:table-row>
          <table:table-cell table:style-name="Taula4.A1" table:number-columns-spanned="5" office:value-type="string">
            <text:p text:style-name="P134">annex</text:p>
          </table:table-cell>
          <table:covered-table-cell/>
          <table:covered-table-cell/>
          <table:covered-table-cell/>
          <table:covered-table-cell/>
        </table:table-row>
        <table:table-row>
          <table:table-cell table:style-name="Taula4.A2" office:value-type="string">
            <text:p text:style-name="P34">Nom del camp</text:p>
          </table:table-cell>
          <table:table-cell table:style-name="Taula4.A2" office:value-type="string">
            <text:p text:style-name="P34">Tipus</text:p>
          </table:table-cell>
          <table:table-cell table:style-name="Taula4.A2" office:value-type="string">
            <text:p text:style-name="P34">Mult.</text:p>
          </table:table-cell>
          <table:table-cell table:style-name="Taula4.A2" office:value-type="string">
            <text:p text:style-name="P36">Tamany</text:p>
          </table:table-cell>
          <table:table-cell table:style-name="Taula4.E2" office:value-type="string">
            <text:p text:style-name="P36">Descripció</text:p>
          </table:table-cell>
        </table:table-row>
        <table:table-row>
          <table:table-cell table:style-name="Taula4.A3" office:value-type="string">
            <text:p text:style-name="P303">contingut</text:p>
          </table:table-cell>
          <table:table-cell table:style-name="Taula4.A3" office:value-type="string">
            <text:p text:style-name="P286">Byte[]</text:p>
          </table:table-cell>
          <table:table-cell table:style-name="Taula4.A3" office:value-type="string">
            <text:p text:style-name="P245">0..1</text:p>
          </table:table-cell>
          <table:table-cell table:style-name="Taula4.A3" office:value-type="string">
            <text:p text:style-name="P304">var</text:p>
          </table:table-cell>
          <table:table-cell table:style-name="Taula4.E3" office:value-type="string">
            <text:p text:style-name="P289">Cadena de bytes que componen el contingut del fitxer de firma annex si n’hi ha. <text:span text:style-name="T111">És obligatori si el tipus de firma és TF04.</text:span></text:p>
          </table:table-cell>
        </table:table-row>
        <table:table-row>
          <table:table-cell table:style-name="Taula4.A3" office:value-type="string">
            <text:p text:style-name="P306">firmaContingut</text:p>
          </table:table-cell>
          <table:table-cell table:style-name="Taula4.A3" office:value-type="string">
            <text:p text:style-name="P286">Byte[]</text:p>
          </table:table-cell>
          <table:table-cell table:style-name="Taula4.A3" office:value-type="string">
            <text:p text:style-name="P245">0..1</text:p>
          </table:table-cell>
          <table:table-cell table:style-name="Taula4.A3" office:value-type="string">
            <text:p text:style-name="P351">var</text:p>
          </table:table-cell>
          <table:table-cell table:style-name="Taula4.E3" office:value-type="string">
            <text:p text:style-name="P289">Cadena de bytes que componen el contingut del fitxer de firma annex si n’hi ha. <text:span text:style-name="T111">És obligatori si el tipus de firma és TF04.</text:span> </text:p>
          </table:table-cell>
        </table:table-row>
        <table:table-row>
          <table:table-cell table:style-name="Taula4.A3" office:value-type="string">
            <text:p text:style-name="P306">firmaNom</text:p>
          </table:table-cell>
          <table:table-cell table:style-name="Taula4.A3" office:value-type="string">
            <text:p text:style-name="P307">Cadena</text:p>
          </table:table-cell>
          <table:table-cell table:style-name="Taula4.A3" office:value-type="string">
            <text:p text:style-name="P245">0..1</text:p>
          </table:table-cell>
          <table:table-cell table:style-name="Taula4.A3" office:value-type="string">
            <text:p text:style-name="P304">256</text:p>
          </table:table-cell>
          <table:table-cell table:style-name="Taula4.E3" office:value-type="string">
            <text:p text:style-name="P253"><text:s/><text:span text:style-name="T274">Nom del fitxer de la firma de l’annex si n’hi ha. És obligatori si el tipus de firma és TF04.</text:span></text:p>
          </table:table-cell>
        </table:table-row>
        <table:table-row>
          <table:table-cell table:style-name="Taula4.A3" office:value-type="string">
            <text:p text:style-name="P306">firmaPerfil</text:p>
          </table:table-cell>
          <table:table-cell table:style-name="Taula4.A3" office:value-type="string">
            <text:p text:style-name="P307">firmaPerfil</text:p>
          </table:table-cell>
          <table:table-cell table:style-name="Taula4.A3" office:value-type="string">
            <text:p text:style-name="P249">0..1</text:p>
          </table:table-cell>
          <table:table-cell table:style-name="Taula4.A3" office:value-type="string">
            <text:p text:style-name="P304">30</text:p>
          </table:table-cell>
          <table:table-cell table:style-name="Taula4.E3" office:value-type="string">
            <text:p text:style-name="P305">Codi de perfil de la firma. </text:p>
          </table:table-cell>
        </table:table-row>
        <table:table-row>
          <table:table-cell table:style-name="Taula4.A3" office:value-type="string">
            <text:p text:style-name="P306">firmaTamany</text:p>
          </table:table-cell>
          <table:table-cell table:style-name="Taula4.A3" office:value-type="string">
            <text:p text:style-name="P276">Numèric</text:p>
          </table:table-cell>
          <table:table-cell table:style-name="Taula4.A3" office:value-type="string">
            <text:p text:style-name="P260"/>
          </table:table-cell>
          <table:table-cell table:style-name="Taula4.A3" office:value-type="string">
            <text:p text:style-name="P344"/>
          </table:table-cell>
          <table:table-cell table:style-name="Taula4.E3" office:value-type="string">
            <text:p text:style-name="P251"/>
          </table:table-cell>
        </table:table-row>
        <table:table-row>
          <table:table-cell table:style-name="Taula4.A3" office:value-type="string">
            <text:p text:style-name="P306">firmaTipus</text:p>
          </table:table-cell>
          <table:table-cell table:style-name="Taula4.A3" office:value-type="string">
            <text:p text:style-name="P307">firmaTipus</text:p>
          </table:table-cell>
          <table:table-cell table:style-name="Taula4.A3" office:value-type="string">
            <text:p text:style-name="P249">0..1</text:p>
          </table:table-cell>
          <table:table-cell table:style-name="Taula4.A3" office:value-type="string">
            <text:p text:style-name="P352">30</text:p>
          </table:table-cell>
          <table:table-cell table:style-name="Taula4.E3" office:value-type="string">
            <text:p text:style-name="P308">Codi del tipus de firma. </text:p>
          </table:table-cell>
        </table:table-row>
        <table:table-row>
          <table:table-cell table:style-name="Taula4.A3" office:value-type="string">
            <text:p text:style-name="P306">firmaTipusMime</text:p>
          </table:table-cell>
          <table:table-cell table:style-name="Taula4.A3" office:value-type="string">
            <text:p text:style-name="P261">Cadena</text:p>
          </table:table-cell>
          <table:table-cell table:style-name="Taula4.A3" office:value-type="string">
            <text:p text:style-name="P249">0..1</text:p>
          </table:table-cell>
          <table:table-cell table:style-name="Taula4.A3" office:value-type="string">
            <text:p text:style-name="P352">30</text:p>
          </table:table-cell>
          <table:table-cell table:style-name="Taula4.E3" office:value-type="string">
            <text:p text:style-name="P308">Tipus MIME del fitxer de firma annexat si n’hi ha. És obligatori si el tipus de firma és TF04.</text:p>
          </table:table-cell>
        </table:table-row>
        <table:table-row>
          <table:table-cell table:style-name="Taula4.A3" office:value-type="string">
            <text:p text:style-name="P306">nom</text:p>
          </table:table-cell>
          <table:table-cell table:style-name="Taula4.A3" office:value-type="string">
            <text:p text:style-name="P261">Cadena</text:p>
          </table:table-cell>
          <table:table-cell table:style-name="Taula4.A3" office:value-type="string">
            <text:p text:style-name="P260"><text:span text:style-name="T269">0..</text:span>1</text:p>
          </table:table-cell>
          <table:table-cell table:style-name="Taula4.A3" office:value-type="string">
            <text:p text:style-name="P309">256</text:p>
          </table:table-cell>
          <table:table-cell table:style-name="Taula4.E3" office:value-type="string">
            <text:p text:style-name="P308">Nom del fitxer annexat. </text:p>
          </table:table-cell>
        </table:table-row>
        <table:table-row>
          <table:table-cell table:style-name="Taula4.A3" office:value-type="string">
            <text:p text:style-name="P306">ntiEstadoElaboracion</text:p>
          </table:table-cell>
          <table:table-cell table:style-name="Taula4.A3" office:value-type="string">
            <text:p text:style-name="P307">ntiEstadoElaboracion</text:p>
          </table:table-cell>
          <table:table-cell table:style-name="Taula4.A3" office:value-type="string">
            <text:p text:style-name="P249">0..1</text:p>
          </table:table-cell>
          <table:table-cell table:style-name="Taula4.A3" office:value-type="string">
            <text:p text:style-name="P309">4</text:p>
          </table:table-cell>
          <table:table-cell table:style-name="Taula4.E3" office:value-type="string">
            <text:p text:style-name="P308">Codi de la metadata estat elaboració de la NTI de document electrònic. </text:p>
          </table:table-cell>
        </table:table-row>
        <table:table-row>
          <table:table-cell table:style-name="Taula4.A3" office:value-type="string">
            <text:p text:style-name="P306">ntiFechaCaptura</text:p>
          </table:table-cell>
          <table:table-cell table:style-name="Taula4.A3" office:value-type="string">
            <text:p text:style-name="P307">dateTime</text:p>
          </table:table-cell>
          <table:table-cell table:style-name="Taula4.A3" office:value-type="string">
            <text:p text:style-name="P249">0..1</text:p>
          </table:table-cell>
          <table:table-cell table:style-name="Taula4.A3" office:value-type="string">
            <text:p text:style-name="P309">14</text:p>
          </table:table-cell>
          <table:table-cell table:style-name="Taula4.E3" office:value-type="string">
            <text:p text:style-name="P280">Data de captura del document.</text:p>
          </table:table-cell>
        </table:table-row>
        <table:table-row>
          <table:table-cell table:style-name="Taula4.A3" office:value-type="string">
            <text:p text:style-name="P310">ntiOrigen</text:p>
          </table:table-cell>
          <table:table-cell table:style-name="Taula4.A3" office:value-type="string">
            <text:p text:style-name="P311">ntiOrigen</text:p>
          </table:table-cell>
          <table:table-cell table:style-name="Taula4.A3" office:value-type="string">
            <text:p text:style-name="P249">0..1</text:p>
          </table:table-cell>
          <table:table-cell table:style-name="Taula4.A3" office:value-type="string">
            <text:p text:style-name="P309">10</text:p>
          </table:table-cell>
          <table:table-cell table:style-name="Taula4.E3" office:value-type="string">
            <text:p text:style-name="P251">Codi de la metadada origen de la NTI de document electrònic.</text:p>
          </table:table-cell>
        </table:table-row>
        <table:table-row>
          <table:table-cell table:style-name="Taula4.A3" office:value-type="string">
            <text:p text:style-name="P310">ntiTipoDocumental</text:p>
          </table:table-cell>
          <table:table-cell table:style-name="Taula4.A3" office:value-type="string">
            <text:p text:style-name="P311">ntiTipoDocumento</text:p>
          </table:table-cell>
          <table:table-cell table:style-name="Taula4.A3" office:value-type="string">
            <text:p text:style-name="P260"><text:span text:style-name="T270">0..</text:span>1</text:p>
          </table:table-cell>
          <table:table-cell table:style-name="Taula4.A3" office:value-type="string">
            <text:p text:style-name="P309">255</text:p>
          </table:table-cell>
          <table:table-cell table:style-name="Taula4.E3" office:value-type="string">
            <text:p text:style-name="P251">Codi de la metadada tipus <text:soft-page-break/>documental de la NTI de document electrònic.</text:p>
          </table:table-cell>
        </table:table-row>
        <table:table-row>
          <table:table-cell table:style-name="Taula4.A3" office:value-type="string">
            <text:p text:style-name="P310">observacions</text:p>
          </table:table-cell>
          <table:table-cell table:style-name="Taula4.A3" office:value-type="string">
            <text:p text:style-name="P261">Cadena</text:p>
          </table:table-cell>
          <table:table-cell table:style-name="Taula4.A3" office:value-type="string">
            <text:p text:style-name="P249">0..1</text:p>
          </table:table-cell>
          <table:table-cell table:style-name="Taula4.A3" office:value-type="string">
            <text:p text:style-name="P85">50</text:p>
          </table:table-cell>
          <table:table-cell table:style-name="Taula4.E3" office:value-type="string">
            <text:p text:style-name="P284">Observacions a destacar sobre la informació annexada.</text:p>
          </table:table-cell>
        </table:table-row>
        <table:table-row>
          <table:table-cell table:style-name="Taula4.A3" office:value-type="string">
            <text:p text:style-name="P310">sicresTipoDocumento</text:p>
          </table:table-cell>
          <table:table-cell table:style-name="Taula4.A3" office:value-type="string">
            <text:p text:style-name="P311">sicresTipoDocumento</text:p>
          </table:table-cell>
          <table:table-cell table:style-name="Taula4.A3" office:value-type="string">
            <text:p text:style-name="P260"><text:span text:style-name="T270">0..</text:span>1</text:p>
          </table:table-cell>
          <table:table-cell table:style-name="Taula4.A3" office:value-type="string">
            <text:p text:style-name="P309">2</text:p>
          </table:table-cell>
          <table:table-cell table:style-name="Taula4.E3" office:value-type="string">
            <text:p text:style-name="P251">Codi SICRES del segment Anexo – tipo de documento.</text:p>
          </table:table-cell>
        </table:table-row>
        <table:table-row>
          <table:table-cell table:style-name="Taula4.A3" office:value-type="string">
            <text:p text:style-name="P310">sicresValidezDocumento</text:p>
          </table:table-cell>
          <table:table-cell table:style-name="Taula4.A3" office:value-type="string">
            <text:p text:style-name="P311">sicresValidezDocumento</text:p>
          </table:table-cell>
          <table:table-cell table:style-name="Taula4.A3" office:value-type="string">
            <text:p text:style-name="P260"><text:span text:style-name="T125">0..</text:span>1</text:p>
          </table:table-cell>
          <table:table-cell table:style-name="Taula4.A3" office:value-type="string">
            <text:p text:style-name="P256"/>
          </table:table-cell>
          <table:table-cell table:style-name="Taula4.E3" office:value-type="string">
            <text:p text:style-name="P263"/>
          </table:table-cell>
        </table:table-row>
        <table:table-row>
          <table:table-cell table:style-name="Taula4.A3" office:value-type="string">
            <text:p text:style-name="P310">tamany</text:p>
          </table:table-cell>
          <table:table-cell table:style-name="Taula4.A3" office:value-type="string">
            <text:p text:style-name="P311">numèric</text:p>
          </table:table-cell>
          <table:table-cell table:style-name="Taula4.A3" office:value-type="string">
            <text:p text:style-name="P249"/>
          </table:table-cell>
          <table:table-cell table:style-name="Taula4.A3" office:value-type="string">
            <text:p text:style-name="P265"/>
          </table:table-cell>
          <table:table-cell table:style-name="Taula4.E3" office:value-type="string">
            <text:p text:style-name="P308">Tamany en bytes del fitxer annexat. </text:p>
          </table:table-cell>
        </table:table-row>
        <table:table-row>
          <table:table-cell table:style-name="Taula4.A3" office:value-type="string">
            <text:p text:style-name="P310">tipusMime</text:p>
          </table:table-cell>
          <table:table-cell table:style-name="Taula4.A3" office:value-type="string">
            <text:p text:style-name="P261">Cadena</text:p>
          </table:table-cell>
          <table:table-cell table:style-name="Taula4.A3" office:value-type="string">
            <text:p text:style-name="P249">0..1</text:p>
          </table:table-cell>
          <table:table-cell table:style-name="Taula4.A3" office:value-type="string">
            <text:p text:style-name="P309">30</text:p>
          </table:table-cell>
          <table:table-cell table:style-name="Taula4.E3" office:value-type="string">
            <text:p text:style-name="P280">Tipus MIME del fitxer annexat.</text:p>
          </table:table-cell>
        </table:table-row>
        <table:table-row>
          <table:table-cell table:style-name="Taula4.A3" office:value-type="string">
            <text:p text:style-name="P310">titol</text:p>
          </table:table-cell>
          <table:table-cell table:style-name="Taula4.A3" office:value-type="string">
            <text:p text:style-name="P261">Cadena</text:p>
          </table:table-cell>
          <table:table-cell table:style-name="Taula4.A3" office:value-type="string">
            <text:p text:style-name="P249">0..1</text:p>
          </table:table-cell>
          <table:table-cell table:style-name="Taula4.A3" office:value-type="string">
            <text:p text:style-name="P352">200</text:p>
          </table:table-cell>
          <table:table-cell table:style-name="Taula4.E3" office:value-type="string">
            <text:p text:style-name="P308">Títol del document. </text:p>
          </table:table-cell>
        </table:table-row>
        <table:table-row>
          <table:table-cell table:style-name="Taula4.A3" office:value-type="string">
            <text:p text:style-name="P310">uuid</text:p>
          </table:table-cell>
          <table:table-cell table:style-name="Taula4.A3" office:value-type="string">
            <text:p text:style-name="P261">Cadena</text:p>
          </table:table-cell>
          <table:table-cell table:style-name="Taula4.A3" office:value-type="string">
            <text:p text:style-name="P249">0..1</text:p>
          </table:table-cell>
          <table:table-cell table:style-name="Taula4.A3" office:value-type="string">
            <text:p text:style-name="P309">256</text:p>
          </table:table-cell>
          <table:table-cell table:style-name="Taula4.E3" office:value-type="string">
            <text:p text:style-name="P308">Uuid de l’arxiu digital si s’escau. </text:p>
          </table:table-cell>
        </table:table-row>
      </table:table>
      <text:p text:style-name="P130"/>
      <table:table table:name="Taula7" table:style-name="Taula7">
        <table:table-column table:style-name="Taula7.A"/>
        <table:table-column table:style-name="Taula7.B"/>
        <table:table-column table:style-name="Taula7.C"/>
        <table:table-column table:style-name="Taula7.D"/>
        <table:table-column table:style-name="Taula7.E"/>
        <table:table-row>
          <table:table-cell table:style-name="Taula7.A1" table:number-columns-spanned="5" office:value-type="string">
            <text:p text:style-name="P135">anotacioRegistreBase</text:p>
          </table:table-cell>
          <table:covered-table-cell/>
          <table:covered-table-cell/>
          <table:covered-table-cell/>
          <table:covered-table-cell/>
        </table:table-row>
        <table:table-row>
          <table:table-cell table:style-name="Taula7.A2" office:value-type="string">
            <text:p text:style-name="P34">Nom del camp</text:p>
          </table:table-cell>
          <table:table-cell table:style-name="Taula7.A2" office:value-type="string">
            <text:p text:style-name="P34">Tipus</text:p>
          </table:table-cell>
          <table:table-cell table:style-name="Taula7.A2" office:value-type="string">
            <text:p text:style-name="P34">Mult.</text:p>
          </table:table-cell>
          <table:table-cell table:style-name="Taula7.A2" office:value-type="string">
            <text:p text:style-name="P36">Tamany</text:p>
          </table:table-cell>
          <table:table-cell table:style-name="Taula7.E2" office:value-type="string">
            <text:p text:style-name="P36">Descripció</text:p>
          </table:table-cell>
        </table:table-row>
        <table:table-row>
          <table:table-cell table:style-name="Taula7.A3" office:value-type="string">
            <text:p text:style-name="P310">annexos</text:p>
          </table:table-cell>
          <table:table-cell table:style-name="Taula7.A3" office:value-type="string">
            <text:p text:style-name="P311">annex</text:p>
          </table:table-cell>
          <table:table-cell table:style-name="Taula7.A3" office:value-type="string">
            <text:p text:style-name="P245">0..*</text:p>
          </table:table-cell>
          <table:table-cell table:style-name="Taula7.D3">
            <text:p text:style-name="P245"/>
          </table:table-cell>
          <table:table-cell table:style-name="Taula7.E3" office:value-type="string">
            <text:p text:style-name="P313">Annex al que fa referència amb les seves propietats. </text:p>
          </table:table-cell>
        </table:table-row>
        <table:table-row>
          <table:table-cell table:style-name="Taula7.A3" office:value-type="string">
            <text:p text:style-name="P310">aplicacioCodi</text:p>
          </table:table-cell>
          <table:table-cell table:style-name="Taula7.A3" office:value-type="string">
            <text:p text:style-name="P311">Cadena</text:p>
          </table:table-cell>
          <table:table-cell table:style-name="Taula7.A3" office:value-type="string">
            <text:p text:style-name="P245">0..1</text:p>
          </table:table-cell>
          <table:table-cell table:style-name="Taula7.D3" office:value-type="float" office:value="255">
            <text:p text:style-name="P353">255</text:p>
          </table:table-cell>
          <table:table-cell table:style-name="Taula7.E3" office:value-type="string">
            <text:p text:style-name="P313">Codi de l’aplicació que fa l’enviament de l’assentament registral. </text:p>
          </table:table-cell>
        </table:table-row>
        <table:table-row>
          <table:table-cell table:style-name="Taula7.A3" office:value-type="string">
            <text:p text:style-name="P310">aplicacioVersio</text:p>
          </table:table-cell>
          <table:table-cell table:style-name="Taula7.A3" office:value-type="string">
            <text:p text:style-name="P307">Cadena</text:p>
          </table:table-cell>
          <table:table-cell table:style-name="Taula7.A3" office:value-type="string">
            <text:p text:style-name="P245">0..1</text:p>
          </table:table-cell>
          <table:table-cell table:style-name="Taula7.A3" office:value-type="string">
            <text:p text:style-name="P314">255</text:p>
          </table:table-cell>
          <table:table-cell table:style-name="Taula7.E5" office:value-type="string">
            <text:p text:style-name="P253"><text:s/><text:span text:style-name="T108">Versió de l’aplicació que fa l’enviament de l’assentament registral.</text:span></text:p>
          </table:table-cell>
        </table:table-row>
        <table:table-row>
          <table:table-cell table:style-name="Taula7.A3" office:value-type="string">
            <text:p text:style-name="P310">assumpteCodiCodi</text:p>
          </table:table-cell>
          <table:table-cell table:style-name="Taula7.A3" office:value-type="string">
            <text:p text:style-name="P311">Cadena</text:p>
          </table:table-cell>
          <table:table-cell table:style-name="Taula7.A3" office:value-type="string">
            <text:p text:style-name="P249">0..1</text:p>
          </table:table-cell>
          <table:table-cell table:style-name="Taula7.A3" office:value-type="string">
            <text:p text:style-name="P314">16</text:p>
          </table:table-cell>
          <table:table-cell table:style-name="Taula7.E6" office:value-type="string">
            <text:p text:style-name="P263">Codi de l’ass<text:span text:style-name="T275">umpte</text:span>.</text:p>
          </table:table-cell>
        </table:table-row>
        <table:table-row>
          <table:table-cell table:style-name="Taula7.A3" office:value-type="string">
            <text:p text:style-name="P310">assumpteCodiDescripcio</text:p>
          </table:table-cell>
          <table:table-cell table:style-name="Taula7.A3" office:value-type="string">
            <text:p text:style-name="P311">Cadena</text:p>
          </table:table-cell>
          <table:table-cell table:style-name="Taula7.A3" office:value-type="string">
            <text:p text:style-name="P312">0..1</text:p>
          </table:table-cell>
          <table:table-cell table:style-name="Taula7.A3" office:value-type="string">
            <text:p text:style-name="P353">255</text:p>
          </table:table-cell>
          <table:table-cell table:style-name="Taula7.E7" office:value-type="string">
            <text:p text:style-name="P263">Denominació de l’assumpte.</text:p>
          </table:table-cell>
        </table:table-row>
        <table:table-row>
          <table:table-cell table:style-name="Taula7.A3" office:value-type="string">
            <text:p text:style-name="P315">assumpteTipusCodi</text:p>
          </table:table-cell>
          <table:table-cell table:style-name="Taula7.A3" office:value-type="string">
            <text:p text:style-name="P316">Cadena</text:p>
          </table:table-cell>
          <table:table-cell table:style-name="Taula7.A3" office:value-type="string">
            <text:p text:style-name="P249">0..1</text:p>
          </table:table-cell>
          <table:table-cell table:style-name="Taula7.A3" office:value-type="string">
            <text:p text:style-name="P353">16</text:p>
          </table:table-cell>
          <table:table-cell table:style-name="Taula7.E8" office:value-type="string">
            <text:p text:style-name="P313">Codi de l’assumpte. </text:p>
          </table:table-cell>
        </table:table-row>
        <table:table-row>
          <table:table-cell table:style-name="Taula7.A3" office:value-type="string">
            <text:p text:style-name="P315">assumpteTipusDescripcio</text:p>
          </table:table-cell>
          <table:table-cell table:style-name="Taula7.A3" office:value-type="string">
            <text:p text:style-name="P261">Cadena</text:p>
          </table:table-cell>
          <table:table-cell table:style-name="Taula7.A3" office:value-type="string">
            <text:p text:style-name="P249">0..1</text:p>
          </table:table-cell>
          <table:table-cell table:style-name="Taula7.A3" office:value-type="string">
            <text:p text:style-name="P353">100</text:p>
          </table:table-cell>
          <table:table-cell table:style-name="Taula7.E9" office:value-type="string">
            <text:p text:style-name="P263">Denominació del tipus d’assumpte de l’assentament registral.</text:p>
          </table:table-cell>
        </table:table-row>
        <table:table-row>
          <table:table-cell table:style-name="Taula7.A3" office:value-type="string">
            <text:p text:style-name="P315">data</text:p>
          </table:table-cell>
          <table:table-cell table:style-name="Taula7.A3" office:value-type="string">
            <text:p text:style-name="P316">dateTime</text:p>
          </table:table-cell>
          <table:table-cell table:style-name="Taula7.A3" office:value-type="string">
            <text:p text:style-name="P260"><text:span text:style-name="T269">0..</text:span>1</text:p>
          </table:table-cell>
          <table:table-cell table:style-name="Taula7.A3" office:value-type="string">
            <text:p text:style-name="P314">14</text:p>
          </table:table-cell>
          <table:table-cell table:style-name="Taula7.E10" office:value-type="string">
            <text:p text:style-name="P313">Data de l’assentament. </text:p>
          </table:table-cell>
        </table:table-row>
        <table:table-row>
          <table:table-cell table:style-name="Taula7.A3" office:value-type="string">
            <text:p text:style-name="P315">docFisicaCodi</text:p>
          </table:table-cell>
          <table:table-cell table:style-name="Taula7.A3" office:value-type="string">
            <text:p text:style-name="P316">Cadena</text:p>
          </table:table-cell>
          <table:table-cell table:style-name="Taula7.A3" office:value-type="string">
            <text:p text:style-name="P249">0..1</text:p>
          </table:table-cell>
          <table:table-cell table:style-name="Taula7.A3" office:value-type="string">
            <text:p text:style-name="P314">19</text:p>
          </table:table-cell>
          <table:table-cell table:style-name="Taula7.E11" office:value-type="string">
            <text:p text:style-name="P253">Codi SICRES del segment internos – Documentación física y/o soportes.</text:p>
          </table:table-cell>
        </table:table-row>
        <table:table-row>
          <table:table-cell table:style-name="Taula7.A3" office:value-type="string">
            <text:p text:style-name="P315">docFisicaDescripcio</text:p>
          </table:table-cell>
          <table:table-cell table:style-name="Taula7.A3" office:value-type="string">
            <text:p text:style-name="P316">Cadena</text:p>
          </table:table-cell>
          <table:table-cell table:style-name="Taula7.A3" office:value-type="string">
            <text:p text:style-name="P249">0..1</text:p>
          </table:table-cell>
          <table:table-cell table:style-name="Taula7.A3" office:value-type="string">
            <text:p text:style-name="P314">100</text:p>
          </table:table-cell>
          <table:table-cell table:style-name="Taula7.E12" office:value-type="string">
            <text:p text:style-name="P267">Descripció del segment internos – Documentación física y/o soportes.</text:p>
          </table:table-cell>
        </table:table-row>
        <table:table-row>
          <table:table-cell table:style-name="Taula7.A3" office:value-type="string">
            <text:p text:style-name="P315">entitatCodi</text:p>
          </table:table-cell>
          <table:table-cell table:style-name="Taula7.A3" office:value-type="string">
            <text:p text:style-name="P316">Cadena</text:p>
          </table:table-cell>
          <table:table-cell table:style-name="Taula7.A3" office:value-type="string">
            <text:p text:style-name="P249">0..1</text:p>
          </table:table-cell>
          <table:table-cell table:style-name="Taula7.A3" office:value-type="string">
            <text:p text:style-name="P314">255</text:p>
          </table:table-cell>
          <table:table-cell table:style-name="Taula7.E13" office:value-type="string">
            <text:p text:style-name="P251">Codi <text:span text:style-name="T107">DIR3 </text:span>de l’entitat governamental a la que va dirigit l’assentament registral.</text:p>
          </table:table-cell>
        </table:table-row>
        <table:table-row>
          <table:table-cell table:style-name="Taula7.A3" office:value-type="string">
            <text:p text:style-name="P315">entitatDescripcio</text:p>
          </table:table-cell>
          <table:table-cell table:style-name="Taula7.A3" office:value-type="string">
            <text:p text:style-name="P316">Cadena</text:p>
          </table:table-cell>
          <table:table-cell table:style-name="Taula7.A3" office:value-type="string">
            <text:p text:style-name="P260"><text:span text:style-name="T270">0..</text:span>1</text:p>
          </table:table-cell>
          <table:table-cell table:style-name="Taula7.A3" office:value-type="string">
            <text:p text:style-name="P318">255</text:p>
          </table:table-cell>
          <table:table-cell table:style-name="Taula7.E14" office:value-type="string">
            <text:p text:style-name="P251"><text:span text:style-name="T107">Descripció</text:span> de l’entitat governamental a la que va dirigit l’assentament registral.</text:p>
          </table:table-cell>
        </table:table-row>
        <table:table-row>
          <table:table-cell table:style-name="Taula7.A3" office:value-type="string">
            <text:p text:style-name="P315">expedientNumero</text:p>
          </table:table-cell>
          <table:table-cell table:style-name="Taula7.A3" office:value-type="string">
            <text:p text:style-name="P261">Cadena</text:p>
          </table:table-cell>
          <table:table-cell table:style-name="Taula7.A3" office:value-type="string">
            <text:p text:style-name="P249">0..1</text:p>
          </table:table-cell>
          <table:table-cell table:style-name="Taula7.A3" office:value-type="string">
            <text:p text:style-name="P86">255</text:p>
          </table:table-cell>
          <table:table-cell table:style-name="Taula7.E15" office:value-type="string">
            <text:p text:style-name="P319">Número identificador de l’assentament registral. És únic. </text:p>
          </table:table-cell>
        </table:table-row>
        <table:table-row>
          <table:table-cell table:style-name="Taula7.A3" office:value-type="string">
            <text:p text:style-name="P315">exposa</text:p>
          </table:table-cell>
          <table:table-cell table:style-name="Taula7.A3" office:value-type="string">
            <text:p text:style-name="P316">Cadena</text:p>
          </table:table-cell>
          <table:table-cell table:style-name="Taula7.A3" office:value-type="string">
            <text:p text:style-name="P260"><text:span text:style-name="T270">0..</text:span>1</text:p>
          </table:table-cell>
          <table:table-cell table:style-name="Taula7.A3" office:value-type="string">
            <text:p text:style-name="P318">lob</text:p>
          </table:table-cell>
          <table:table-cell table:style-name="Taula7.E16" office:value-type="string">
            <text:p text:style-name="P319">Exposició de fets. </text:p>
          </table:table-cell>
        </table:table-row>
        <table:table-row>
          <table:table-cell table:style-name="Taula7.A3" office:value-type="string">
            <text:p text:style-name="P315">extracte</text:p>
          </table:table-cell>
          <table:table-cell table:style-name="Taula7.A3" office:value-type="string">
            <text:p text:style-name="P316">Cadena</text:p>
          </table:table-cell>
          <table:table-cell table:style-name="Taula7.A3" office:value-type="string">
            <text:p text:style-name="P260"><text:span text:style-name="T125">0..</text:span>1</text:p>
          </table:table-cell>
          <table:table-cell table:style-name="Taula7.A3" office:value-type="string">
            <text:p text:style-name="P318">240</text:p>
          </table:table-cell>
          <table:table-cell table:style-name="Taula7.E17" office:value-type="string">
            <text:p text:style-name="P319">Extracte o resum de l’assentament. </text:p>
          </table:table-cell>
        </table:table-row>
        <table:table-row>
          <table:table-cell table:style-name="Taula7.A3" office:value-type="string">
            <text:p text:style-name="P315">identificador</text:p>
          </table:table-cell>
          <table:table-cell table:style-name="Taula7.A3" office:value-type="string">
            <text:p text:style-name="P316">Cadena</text:p>
          </table:table-cell>
          <table:table-cell table:style-name="Taula7.A3" office:value-type="string">
            <text:p text:style-name="P317">0..1</text:p>
          </table:table-cell>
          <table:table-cell table:style-name="Taula7.A3" office:value-type="string">
            <text:p text:style-name="P318">100</text:p>
          </table:table-cell>
          <table:table-cell table:style-name="Taula7.E18" office:value-type="string">
            <text:p text:style-name="P319">Codi identificador de l’assentament registral. </text:p>
          </table:table-cell>
        </table:table-row>
        <text:soft-page-break/>
        <table:table-row>
          <table:table-cell table:style-name="Taula7.A3" office:value-type="string">
            <text:p text:style-name="P315">idiomaCodi</text:p>
          </table:table-cell>
          <table:table-cell table:style-name="Taula7.A3" office:value-type="string">
            <text:p text:style-name="P261">Cadena</text:p>
          </table:table-cell>
          <table:table-cell table:style-name="Taula7.A3" office:value-type="string">
            <text:p text:style-name="P249">0..1</text:p>
          </table:table-cell>
          <table:table-cell table:style-name="Taula7.A3" office:value-type="string">
            <text:p text:style-name="P318">2</text:p>
          </table:table-cell>
          <table:table-cell table:style-name="Taula7.E19" office:value-type="string">
            <text:p text:style-name="P267">Codi d’idioma amb el que s’ha fet l’assentament.</text:p>
          </table:table-cell>
        </table:table-row>
        <table:table-row>
          <table:table-cell table:style-name="Taula7.A3" office:value-type="string">
            <text:p text:style-name="P315">idiomaDescripcio</text:p>
          </table:table-cell>
          <table:table-cell table:style-name="Taula7.A3" office:value-type="string">
            <text:p text:style-name="P261">Cadena</text:p>
          </table:table-cell>
          <table:table-cell table:style-name="Taula7.A3" office:value-type="string">
            <text:p text:style-name="P249">0..1</text:p>
          </table:table-cell>
          <table:table-cell table:style-name="Taula7.A3" office:value-type="string">
            <text:p text:style-name="P354">100</text:p>
          </table:table-cell>
          <table:table-cell table:style-name="Taula7.E20" office:value-type="string">
            <text:p text:style-name="P267">Descripció d’idioma amb el que s’ha fet l’assentament.</text:p>
          </table:table-cell>
        </table:table-row>
        <table:table-row table:style-name="Taula7.21">
          <table:table-cell table:style-name="Taula7.A3" office:value-type="string">
            <text:p text:style-name="P315">interessats</text:p>
          </table:table-cell>
          <table:table-cell table:style-name="Taula7.A3" office:value-type="string">
            <text:p text:style-name="P316">interessat</text:p>
          </table:table-cell>
          <table:table-cell table:style-name="Taula7.A3" office:value-type="string">
            <text:p text:style-name="P249">0..*</text:p>
          </table:table-cell>
          <table:table-cell table:style-name="Taula7.A3" office:value-type="string">
            <text:p text:style-name="P256"/>
          </table:table-cell>
          <table:table-cell table:style-name="Taula7.E21" office:value-type="string">
            <text:p text:style-name="P271">Dades que componen els interessats de l’assentament registral si n’hi ha.</text:p>
          </table:table-cell>
        </table:table-row>
        <table:table-row table:style-name="Taula7.21">
          <table:table-cell table:style-name="Taula7.A3" office:value-type="string">
            <text:p text:style-name="P320">llibreCodi</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2">4</text:p>
          </table:table-cell>
          <table:table-cell table:style-name="Taula7.E22" office:value-type="string">
            <text:p text:style-name="P263">Codi del llibre al qual s’ha fet l’assentament registral rebut.</text:p>
          </table:table-cell>
        </table:table-row>
        <table:table-row table:style-name="Taula7.21">
          <table:table-cell table:style-name="Taula7.A3" office:value-type="string">
            <text:p text:style-name="P320">llibreDescripcio</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2">255</text:p>
          </table:table-cell>
          <table:table-cell table:style-name="Taula7.E23" office:value-type="string">
            <text:p text:style-name="P263">Denominació del llibre al qual s’ha fet l’assentament registral rebut.</text:p>
          </table:table-cell>
        </table:table-row>
        <table:table-row table:style-name="Taula7.21">
          <table:table-cell table:style-name="Taula7.A3" office:value-type="string">
            <text:p text:style-name="P320">observacions</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2">50</text:p>
          </table:table-cell>
          <table:table-cell table:style-name="Taula7.E23" office:value-type="string">
            <text:p text:style-name="P267">Observacions de l’assentament.</text:p>
          </table:table-cell>
        </table:table-row>
        <table:table-row table:style-name="Taula7.21">
          <table:table-cell table:style-name="Taula7.A3" office:value-type="string">
            <text:p text:style-name="P320">oficinaCodi</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2">21</text:p>
          </table:table-cell>
          <table:table-cell table:style-name="Taula7.E23" office:value-type="string">
            <text:p text:style-name="P263">Codi DIR3 de l’oficina on es registre.</text:p>
          </table:table-cell>
        </table:table-row>
        <table:table-row table:style-name="Taula7.21">
          <table:table-cell table:style-name="Taula7.A3" office:value-type="string">
            <text:p text:style-name="P320">oficinaDescripcio</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2">300</text:p>
          </table:table-cell>
          <table:table-cell table:style-name="Taula7.E23" office:value-type="string">
            <text:p text:style-name="P253">Denominació DIR3 de l'entitat registral on es registre l'assentament.</text:p>
          </table:table-cell>
        </table:table-row>
        <table:table-row table:style-name="Taula7.21">
          <table:table-cell table:style-name="Taula7.A3" office:value-type="string">
            <text:p text:style-name="P320">origenData</text:p>
          </table:table-cell>
          <table:table-cell table:style-name="Taula7.A3" office:value-type="string">
            <text:p text:style-name="P321">dateTime</text:p>
          </table:table-cell>
          <table:table-cell table:style-name="Taula7.A3" office:value-type="string">
            <text:p text:style-name="P249">0..1</text:p>
          </table:table-cell>
          <table:table-cell table:style-name="Taula7.A3" office:value-type="string">
            <text:p text:style-name="P322">14</text:p>
          </table:table-cell>
          <table:table-cell table:style-name="Taula7.E23" office:value-type="string">
            <text:p text:style-name="P253">Data <text:span text:style-name="T105">origen </text:span>de l’assentament.</text:p>
          </table:table-cell>
        </table:table-row>
        <table:table-row table:style-name="Taula7.21">
          <table:table-cell table:style-name="Taula7.A3" office:value-type="string">
            <text:p text:style-name="P320">origenRegistreNumero</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2">80</text:p>
          </table:table-cell>
          <table:table-cell table:style-name="Taula7.E23" office:value-type="string">
            <text:p text:style-name="P253"/>
          </table:table-cell>
        </table:table-row>
        <table:table-row table:style-name="Taula7.21">
          <table:table-cell table:style-name="Taula7.A3" office:value-type="string">
            <text:p text:style-name="P320">procedimentCodi</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2">64</text:p>
          </table:table-cell>
          <table:table-cell table:style-name="Taula7.E23" office:value-type="string">
            <text:p text:style-name="P323">Codi <text:span text:style-name="T344">SIA </text:span>de procediment. </text:p>
          </table:table-cell>
        </table:table-row>
        <table:table-row table:style-name="Taula7.21">
          <table:table-cell table:style-name="Taula7.A3" office:value-type="string">
            <text:p text:style-name="P320"><text:span text:style-name="T344">servei</text:span>Codi</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2">64</text:p>
          </table:table-cell>
          <table:table-cell table:style-name="Taula7.E23" office:value-type="string">
            <text:p text:style-name="P323">Codi <text:span text:style-name="T344">SIA </text:span>de<text:span text:style-name="T344">l servei</text:span>. </text:p>
          </table:table-cell>
        </table:table-row>
        <table:table-row table:style-name="Taula7.21">
          <table:table-cell table:style-name="Taula7.A3" office:value-type="string">
            <text:p text:style-name="P320">refExterna</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256"/>
          </table:table-cell>
          <table:table-cell table:style-name="Taula7.E23" office:value-type="string">
            <text:p text:style-name="P253"/>
          </table:table-cell>
        </table:table-row>
        <table:table-row table:style-name="Taula7.21">
          <table:table-cell table:style-name="Taula7.A3" office:value-type="string">
            <text:p text:style-name="P320">solicita</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2">lob</text:p>
          </table:table-cell>
          <table:table-cell table:style-name="Taula7.E23" office:value-type="string">
            <text:p text:style-name="P267">Objecte de la sol·licitud si escau.</text:p>
          </table:table-cell>
        </table:table-row>
        <table:table-row table:style-name="Taula7.21">
          <table:table-cell table:style-name="Taula7.A3" office:value-type="string">
            <text:p text:style-name="P320">transportNumero</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4">20</text:p>
          </table:table-cell>
          <table:table-cell table:style-name="Taula7.E23" office:value-type="string">
            <text:p text:style-name="P325">Número de transport. </text:p>
          </table:table-cell>
        </table:table-row>
        <table:table-row table:style-name="Taula7.21">
          <table:table-cell table:style-name="Taula7.A3" office:value-type="string">
            <text:p text:style-name="P320">transportTipusCodi</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4">20</text:p>
          </table:table-cell>
          <table:table-cell table:style-name="Taula7.E23" office:value-type="string">
            <text:p text:style-name="P253">Codi SICRES3 del segment internos – tipo transporte.</text:p>
          </table:table-cell>
        </table:table-row>
        <table:table-row table:style-name="Taula7.21">
          <table:table-cell table:style-name="Taula7.A3" office:value-type="string">
            <text:p text:style-name="P320">transportTipusDescripcio</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4">100</text:p>
          </table:table-cell>
          <table:table-cell table:style-name="Taula7.E23" office:value-type="string">
            <text:p text:style-name="P253">Descripció del segment internos – tipo transporte.</text:p>
          </table:table-cell>
        </table:table-row>
        <table:table-row table:style-name="Taula7.21">
          <table:table-cell table:style-name="Taula7.A3" office:value-type="string">
            <text:p text:style-name="P320">usuariCodi</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4">20</text:p>
          </table:table-cell>
          <table:table-cell table:style-name="Taula7.E23" office:value-type="string">
            <text:p text:style-name="P253">Codi de l'usuari que vol realitzar l'operació.</text:p>
          </table:table-cell>
        </table:table-row>
        <table:table-row table:style-name="Taula7.21">
          <table:table-cell table:style-name="Taula7.A3" office:value-type="string">
            <text:p text:style-name="P320">usuariNom</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4">767</text:p>
          </table:table-cell>
          <table:table-cell table:style-name="Taula7.E23" office:value-type="string">
            <text:p text:style-name="P253"><text:span text:style-name="T108">Nom</text:span> de l'usuari que vol realitzar l'operació.</text:p>
          </table:table-cell>
        </table:table-row>
        <table:table-row table:style-name="Taula7.21">
          <table:table-cell table:style-name="Taula7.A3" office:value-type="string">
            <text:p text:style-name="P320">justificantFitxerArxiuUuid</text:p>
          </table:table-cell>
          <table:table-cell table:style-name="Taula7.A3" office:value-type="string">
            <text:p text:style-name="P321">Cadena</text:p>
          </table:table-cell>
          <table:table-cell table:style-name="Taula7.A3" office:value-type="string">
            <text:p text:style-name="P249">0..1</text:p>
          </table:table-cell>
          <table:table-cell table:style-name="Taula7.A3" office:value-type="string">
            <text:p text:style-name="P324">256</text:p>
          </table:table-cell>
          <table:table-cell table:style-name="Taula7.E38" office:value-type="string">
            <text:p text:style-name="P326">Paràmetre que emmagatzema el uuid del justificant. Serveix per recuperar el justificant des del backoffice.</text:p>
          </table:table-cell>
        </table:table-row>
        <table:table-row table:style-name="Taula7.21">
          <table:table-cell table:style-name="Taula7.A3" office:value-type="string">
            <text:p text:style-name="P339">tramitCodi</text:p>
          </table:table-cell>
          <table:table-cell table:style-name="Taula7.A3" office:value-type="string">
            <text:p text:style-name="P340">Cadena</text:p>
          </table:table-cell>
          <table:table-cell table:style-name="Taula7.A3" office:value-type="string">
            <text:p text:style-name="P341">0..1</text:p>
          </table:table-cell>
          <table:table-cell table:style-name="Taula7.A3" office:value-type="string">
            <text:p text:style-name="P342">64</text:p>
          </table:table-cell>
          <table:table-cell table:style-name="Taula7.E38" office:value-type="string">
            <text:p text:style-name="P339">Codi del tràmit.</text:p>
          </table:table-cell>
        </table:table-row>
        <table:table-row table:style-name="Taula7.21">
          <table:table-cell table:style-name="Taula7.A3" office:value-type="string">
            <text:p text:style-name="P339">tramitNom</text:p>
          </table:table-cell>
          <table:table-cell table:style-name="Taula7.A3" office:value-type="string">
            <text:p text:style-name="P340">Cadena</text:p>
          </table:table-cell>
          <table:table-cell table:style-name="Taula7.A3" office:value-type="string">
            <text:p text:style-name="P341">0..1</text:p>
          </table:table-cell>
          <table:table-cell table:style-name="Taula7.A3" office:value-type="string">
            <text:p text:style-name="P342">256</text:p>
          </table:table-cell>
          <table:table-cell table:style-name="Taula7.E38" office:value-type="string">
            <text:p text:style-name="P339">Nom del tràmit.</text:p>
          </table:table-cell>
        </table:table-row>
      </table:table>
      <text:p text:style-name="P130"/>
      <table:table table:name="Taula9" table:style-name="Taula9">
        <table:table-column table:style-name="Taula9.A"/>
        <table:table-column table:style-name="Taula9.B"/>
        <table:table-column table:style-name="Taula9.C"/>
        <table:table-column table:style-name="Taula9.D"/>
        <table:table-column table:style-name="Taula9.E"/>
        <table:table-row>
          <table:table-cell table:style-name="Taula9.A1" table:number-columns-spanned="5" office:value-type="string">
            <text:p text:style-name="P135">AnotacioRegistre<text:span text:style-name="T272">Entrada =&gt; tns:anotacioRegistreBase</text:span></text:p>
          </table:table-cell>
          <table:covered-table-cell/>
          <table:covered-table-cell/>
          <table:covered-table-cell/>
          <table:covered-table-cell/>
        </table:table-row>
        <table:table-row>
          <table:table-cell table:style-name="Taula9.A2" office:value-type="string">
            <text:p text:style-name="P34">Nom del camp</text:p>
          </table:table-cell>
          <table:table-cell table:style-name="Taula9.A2" office:value-type="string">
            <text:p text:style-name="P34">Tipus</text:p>
          </table:table-cell>
          <table:table-cell table:style-name="Taula9.A2" office:value-type="string">
            <text:p text:style-name="P34">Mult.</text:p>
          </table:table-cell>
          <table:table-cell table:style-name="Taula9.A2" office:value-type="string">
            <text:p text:style-name="P36">Tamany</text:p>
          </table:table-cell>
          <table:table-cell table:style-name="Taula9.E2" office:value-type="string">
            <text:p text:style-name="P36">Descripció</text:p>
          </table:table-cell>
        </table:table-row>
        <table:table-row>
          <table:table-cell table:style-name="Taula9.A3" office:value-type="string">
            <text:p text:style-name="P327">destiCodi</text:p>
          </table:table-cell>
          <table:table-cell table:style-name="Taula9.A3" office:value-type="string">
            <text:p text:style-name="P321">Cadena</text:p>
          </table:table-cell>
          <table:table-cell table:style-name="Taula9.A3" office:value-type="string">
            <text:p text:style-name="P245">0..<text:span text:style-name="T271">1</text:span></text:p>
          </table:table-cell>
          <table:table-cell table:style-name="Taula9.D3" office:value-type="float" office:value="21">
            <text:p text:style-name="P324">21</text:p>
          </table:table-cell>
          <table:table-cell table:style-name="Taula9.E3" office:value-type="string">
            <text:p text:style-name="P325">Codi DIR3 de la oficina destí. </text:p>
          </table:table-cell>
        </table:table-row>
        <table:table-row>
          <table:table-cell table:style-name="Taula9.A3" office:value-type="string">
            <text:p text:style-name="P327">destiDescripcio</text:p>
          </table:table-cell>
          <table:table-cell table:style-name="Taula9.A3" office:value-type="string">
            <text:p text:style-name="P311">Cadena</text:p>
          </table:table-cell>
          <table:table-cell table:style-name="Taula9.A3" office:value-type="string">
            <text:p text:style-name="P245">0..1</text:p>
          </table:table-cell>
          <table:table-cell table:style-name="Taula9.D3" office:value-type="float" office:value="300">
            <text:p text:style-name="P355">300</text:p>
          </table:table-cell>
          <table:table-cell table:style-name="Taula9.E3" office:value-type="string">
            <text:p text:style-name="P325">Descripció de la oficina destí. </text:p>
          </table:table-cell>
        </table:table-row>
      </table:table>
      <text:p text:style-name="P130"/>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table-cell table:style-name="Taula8.A1" table:number-columns-spanned="5" office:value-type="string">
            <text:p text:style-name="P135">anotacioRegistre<text:span text:style-name="T271">Id</text:span></text:p>
          </table:table-cell>
          <table:covered-table-cell/>
          <table:covered-table-cell/>
          <table:covered-table-cell/>
          <table:covered-table-cell/>
        </table:table-row>
        <table:table-row>
          <table:table-cell table:style-name="Taula8.A2" office:value-type="string">
            <text:p text:style-name="P34">Nom del camp</text:p>
          </table:table-cell>
          <table:table-cell table:style-name="Taula8.A2" office:value-type="string">
            <text:p text:style-name="P34">Tipus</text:p>
          </table:table-cell>
          <table:table-cell table:style-name="Taula8.A2" office:value-type="string">
            <text:p text:style-name="P34">Mult.</text:p>
          </table:table-cell>
          <table:table-cell table:style-name="Taula8.A2" office:value-type="string">
            <text:p text:style-name="P36">Tamany</text:p>
          </table:table-cell>
          <table:table-cell table:style-name="Taula8.E2" office:value-type="string">
            <text:p text:style-name="P36">Descripció</text:p>
          </table:table-cell>
        </table:table-row>
        <table:table-row>
          <table:table-cell table:style-name="Taula8.A3" office:value-type="string">
            <text:p text:style-name="P320">clauAcces</text:p>
          </table:table-cell>
          <table:table-cell table:style-name="Taula8.A3" office:value-type="string">
            <text:p text:style-name="P321">Cadena</text:p>
          </table:table-cell>
          <table:table-cell table:style-name="Taula8.A3" office:value-type="string">
            <text:p text:style-name="P245">0..<text:span text:style-name="T271">1</text:span></text:p>
          </table:table-cell>
          <table:table-cell table:style-name="Taula8.D3">
            <text:p text:style-name="P245"/>
          </table:table-cell>
          <table:table-cell table:style-name="Taula8.E3" office:value-type="string">
            <text:p text:style-name="P330">Clau d’accés per accedir a l’informació. </text:p>
          </table:table-cell>
        </table:table-row>
        <table:table-row table:style-name="Taula8.4">
          <table:table-cell table:style-name="Taula8.A3" office:value-type="string">
            <text:p text:style-name="P320">identificador</text:p>
          </table:table-cell>
          <table:table-cell table:style-name="Taula8.A3" office:value-type="string">
            <text:p text:style-name="P311">Cadena</text:p>
          </table:table-cell>
          <table:table-cell table:style-name="Taula8.A3" office:value-type="string">
            <text:p text:style-name="P245">0..1</text:p>
          </table:table-cell>
          <table:table-cell table:style-name="Taula8.D3">
            <text:p text:style-name="P344"/>
          </table:table-cell>
          <table:table-cell table:style-name="Taula8.E3" office:value-type="string">
            <text:p text:style-name="P330">Identificador de l’usuari per poder accedir a l’informació. </text:p>
          </table:table-cell>
        </table:table-row>
      </table:table>
      <text:p text:style-name="P130"/>
      <table:table table:name="Taula10" table:style-name="Taula10">
        <table:table-column table:style-name="Taula10.A"/>
        <table:table-column table:style-name="Taula10.B"/>
        <table:table-column table:style-name="Taula10.C"/>
        <table:table-column table:style-name="Taula10.D"/>
        <table:table-column table:style-name="Taula10.E"/>
        <table:table-row>
          <table:table-cell table:style-name="Taula10.A1" table:number-columns-spanned="5" office:value-type="string">
            <text:p text:style-name="P136">interessatBase</text:p>
          </table:table-cell>
          <table:covered-table-cell/>
          <table:covered-table-cell/>
          <table:covered-table-cell/>
          <table:covered-table-cell/>
        </table:table-row>
        <table:table-row>
          <table:table-cell table:style-name="Taula10.A2" office:value-type="string">
            <text:p text:style-name="P34">Nom del camp</text:p>
          </table:table-cell>
          <table:table-cell table:style-name="Taula10.A2" office:value-type="string">
            <text:p text:style-name="P34">Tipus</text:p>
          </table:table-cell>
          <table:table-cell table:style-name="Taula10.A2" office:value-type="string">
            <text:p text:style-name="P34">Mult.</text:p>
          </table:table-cell>
          <table:table-cell table:style-name="Taula10.A2" office:value-type="string">
            <text:p text:style-name="P36">Tamany</text:p>
          </table:table-cell>
          <table:table-cell table:style-name="Taula10.E2" office:value-type="string">
            <text:p text:style-name="P36">Descripció</text:p>
          </table:table-cell>
        </table:table-row>
        <table:table-row>
          <table:table-cell table:style-name="Taula10.A3" office:value-type="string">
            <text:p text:style-name="P327">adresa</text:p>
          </table:table-cell>
          <table:table-cell table:style-name="Taula10.A3" office:value-type="string">
            <text:p text:style-name="P328">Cadena</text:p>
          </table:table-cell>
          <table:table-cell table:style-name="Taula10.A3" office:value-type="string">
            <text:p text:style-name="P245">0..1</text:p>
          </table:table-cell>
          <table:table-cell table:style-name="Taula10.D3" office:value-type="float" office:value="160">
            <text:p text:style-name="P332">160</text:p>
          </table:table-cell>
          <table:table-cell table:style-name="Taula10.E3" office:value-type="string">
            <text:p text:style-name="P299">Adreça postal de l’interessat.</text:p>
          </table:table-cell>
        </table:table-row>
        <table:table-row>
          <table:table-cell table:style-name="Taula10.A3" office:value-type="string">
            <text:p text:style-name="P327">adresaElectronica</text:p>
          </table:table-cell>
          <table:table-cell table:style-name="Taula10.A3" office:value-type="string">
            <text:p text:style-name="P328">Cadena</text:p>
          </table:table-cell>
          <table:table-cell table:style-name="Taula10.A3" office:value-type="string">
            <text:p text:style-name="P245">0..1</text:p>
          </table:table-cell>
          <table:table-cell table:style-name="Taula10.D3" office:value-type="float" office:value="160">
            <text:p text:style-name="P356">160</text:p>
          </table:table-cell>
          <table:table-cell table:style-name="Taula10.E3" office:value-type="string">
            <text:p text:style-name="P299">Adreça <text:span text:style-name="T276">electrònica</text:span> de l’interessat.</text:p>
          </table:table-cell>
        </table:table-row>
        <table:table-row>
          <table:table-cell table:style-name="Taula10.A3" office:value-type="string">
            <text:p text:style-name="P327">canal</text:p>
          </table:table-cell>
          <table:table-cell table:style-name="Taula10.A3" office:value-type="string">
            <text:p text:style-name="P307">Cadena</text:p>
          </table:table-cell>
          <table:table-cell table:style-name="Taula10.A3" office:value-type="string">
            <text:p text:style-name="P245">0..1</text:p>
          </table:table-cell>
          <table:table-cell table:style-name="Taula10.A3" office:value-type="string">
            <text:p text:style-name="P332">2</text:p>
          </table:table-cell>
          <table:table-cell table:style-name="Taula10.E5" office:value-type="string">
            <text:p text:style-name="P253"><text:s/><text:span text:style-name="T277">Codi SICRES del segment interesado – canal</text:span></text:p>
            <text:p text:style-name="P289">preferente de notificación del interesado.</text:p>
          </table:table-cell>
        </table:table-row>
        <table:table-row>
          <table:table-cell table:style-name="Taula10.A3" office:value-type="string">
            <text:p text:style-name="P327">cp</text:p>
          </table:table-cell>
          <table:table-cell table:style-name="Taula10.A3" office:value-type="string">
            <text:p text:style-name="P328">Cadena</text:p>
          </table:table-cell>
          <table:table-cell table:style-name="Taula10.A3" office:value-type="string">
            <text:p text:style-name="P249">0..1</text:p>
          </table:table-cell>
          <table:table-cell table:style-name="Taula10.A3" office:value-type="string">
            <text:p text:style-name="P332">5</text:p>
          </table:table-cell>
          <table:table-cell table:style-name="Taula10.E6" office:value-type="string">
            <text:p text:style-name="P333">Codi postal del l’interessat. </text:p>
          </table:table-cell>
        </table:table-row>
        <table:table-row>
          <table:table-cell table:style-name="Taula10.A3" office:value-type="string">
            <text:p text:style-name="P327">documentNumero</text:p>
          </table:table-cell>
          <table:table-cell table:style-name="Taula10.A3" office:value-type="string">
            <text:p text:style-name="P328">Cadena</text:p>
          </table:table-cell>
          <table:table-cell table:style-name="Taula10.A3" office:value-type="string">
            <text:p text:style-name="P329">0..1</text:p>
          </table:table-cell>
          <table:table-cell table:style-name="Taula10.A3" office:value-type="string">
            <text:p text:style-name="P356">17</text:p>
          </table:table-cell>
          <table:table-cell table:style-name="Taula10.E7" office:value-type="string">
            <text:p text:style-name="P296">Número de document identificatiu.</text:p>
          </table:table-cell>
        </table:table-row>
        <table:table-row>
          <table:table-cell table:style-name="Taula10.A3" office:value-type="string">
            <text:p text:style-name="P327">documentTipus</text:p>
          </table:table-cell>
          <table:table-cell table:style-name="Taula10.A3" office:value-type="string">
            <text:p text:style-name="P328">documentTipus</text:p>
          </table:table-cell>
          <table:table-cell table:style-name="Taula10.A3" office:value-type="string">
            <text:p text:style-name="P249">0..1</text:p>
          </table:table-cell>
          <table:table-cell table:style-name="Taula10.A3" office:value-type="string">
            <text:p text:style-name="P356">1</text:p>
          </table:table-cell>
          <table:table-cell table:style-name="Taula10.E8" office:value-type="string">
            <text:p text:style-name="P291">Codi SICRES del segment interesado –</text:p>
            <text:p text:style-name="P291">documento de identificacion de interesado tipo.</text:p>
          </table:table-cell>
        </table:table-row>
        <table:table-row>
          <table:table-cell table:style-name="Taula10.A3" office:value-type="string">
            <text:p text:style-name="P327">email</text:p>
          </table:table-cell>
          <table:table-cell table:style-name="Taula10.A3" office:value-type="string">
            <text:p text:style-name="P261">Cadena</text:p>
          </table:table-cell>
          <table:table-cell table:style-name="Taula10.A3" office:value-type="string">
            <text:p text:style-name="P249">0..1</text:p>
          </table:table-cell>
          <table:table-cell table:style-name="Taula10.A3" office:value-type="string">
            <text:p text:style-name="P356">160</text:p>
          </table:table-cell>
          <table:table-cell table:style-name="Taula10.E9" office:value-type="string">
            <text:p text:style-name="P333">Correu electrònic de l’interessat. </text:p>
          </table:table-cell>
        </table:table-row>
        <table:table-row>
          <table:table-cell table:style-name="Taula10.A3" office:value-type="string">
            <text:p text:style-name="P327">llinatge1</text:p>
          </table:table-cell>
          <table:table-cell table:style-name="Taula10.A3" office:value-type="string">
            <text:p text:style-name="P261">Cadena</text:p>
          </table:table-cell>
          <table:table-cell table:style-name="Taula10.A3" office:value-type="string">
            <text:p text:style-name="P260"><text:span text:style-name="T269">0..</text:span>1</text:p>
          </table:table-cell>
          <table:table-cell table:style-name="Taula10.A3" office:value-type="string">
            <text:p text:style-name="P332">255</text:p>
          </table:table-cell>
          <table:table-cell table:style-name="Taula10.E10" office:value-type="string">
            <text:p text:style-name="P299">Primer llinatge de l’interessat. Obligatori si és una persona física.</text:p>
          </table:table-cell>
        </table:table-row>
        <table:table-row>
          <table:table-cell table:style-name="Taula10.A3" office:value-type="string">
            <text:p text:style-name="P327">llinatge2</text:p>
          </table:table-cell>
          <table:table-cell table:style-name="Taula10.A3" office:value-type="string">
            <text:p text:style-name="P328">Cadena</text:p>
          </table:table-cell>
          <table:table-cell table:style-name="Taula10.A3" office:value-type="string">
            <text:p text:style-name="P249">0..1</text:p>
          </table:table-cell>
          <table:table-cell table:style-name="Taula10.A3" office:value-type="string">
            <text:p text:style-name="P332">255</text:p>
          </table:table-cell>
          <table:table-cell table:style-name="Taula10.E11" office:value-type="string">
            <text:p text:style-name="P299">Segon llinatge de l’interessat.</text:p>
          </table:table-cell>
        </table:table-row>
        <table:table-row>
          <table:table-cell table:style-name="Taula10.A3" office:value-type="string">
            <text:p text:style-name="P327">municipi</text:p>
          </table:table-cell>
          <table:table-cell table:style-name="Taula10.A3" office:value-type="string">
            <text:p text:style-name="P328">Cadena</text:p>
          </table:table-cell>
          <table:table-cell table:style-name="Taula10.A3" office:value-type="string">
            <text:p text:style-name="P249">0..1</text:p>
          </table:table-cell>
          <table:table-cell table:style-name="Taula10.A3" office:value-type="string">
            <text:p text:style-name="P332">100</text:p>
          </table:table-cell>
          <table:table-cell table:style-name="Taula10.E12" office:value-type="string">
            <text:p text:style-name="P333">Nom del municipi de la persona. </text:p>
          </table:table-cell>
        </table:table-row>
        <table:table-row>
          <table:table-cell table:style-name="Taula10.A3" office:value-type="string">
            <text:p text:style-name="P327">municipiCodi</text:p>
          </table:table-cell>
          <table:table-cell table:style-name="Taula10.A3" office:value-type="string">
            <text:p text:style-name="P328">Cadena</text:p>
          </table:table-cell>
          <table:table-cell table:style-name="Taula10.A3" office:value-type="string">
            <text:p text:style-name="P249">0..1</text:p>
          </table:table-cell>
          <table:table-cell table:style-name="Taula10.A3" office:value-type="string">
            <text:p text:style-name="P332">100</text:p>
          </table:table-cell>
          <table:table-cell table:style-name="Taula10.E13" office:value-type="string">
            <text:p text:style-name="P333">Codi del municipi de la persona. </text:p>
          </table:table-cell>
        </table:table-row>
        <table:table-row>
          <table:table-cell table:style-name="Taula10.A3" office:value-type="string">
            <text:p text:style-name="P327">nom</text:p>
          </table:table-cell>
          <table:table-cell table:style-name="Taula10.A3" office:value-type="string">
            <text:p text:style-name="P328">Cadena</text:p>
          </table:table-cell>
          <table:table-cell table:style-name="Taula10.A3" office:value-type="string">
            <text:p text:style-name="P260"><text:span text:style-name="T270">0..</text:span>1</text:p>
          </table:table-cell>
          <table:table-cell table:style-name="Taula10.A3" office:value-type="string">
            <text:p text:style-name="P332">255</text:p>
          </table:table-cell>
          <table:table-cell table:style-name="Taula10.E14" office:value-type="string">
            <text:p text:style-name="P299">Nom de l’interessat. Obligatori si és una persona física.</text:p>
          </table:table-cell>
        </table:table-row>
        <table:table-row>
          <table:table-cell table:style-name="Taula10.A3" office:value-type="string">
            <text:p text:style-name="P310">observacions</text:p>
          </table:table-cell>
          <table:table-cell table:style-name="Taula10.A3" office:value-type="string">
            <text:p text:style-name="P261">Cadena</text:p>
          </table:table-cell>
          <table:table-cell table:style-name="Taula10.A3" office:value-type="string">
            <text:p text:style-name="P249">0..1</text:p>
          </table:table-cell>
          <table:table-cell table:style-name="Taula10.A3" office:value-type="string">
            <text:p text:style-name="P87">160</text:p>
          </table:table-cell>
          <table:table-cell table:style-name="Taula10.E15" office:value-type="string">
            <text:p text:style-name="P333">Observacions a destacar sobre la persona interessada. </text:p>
          </table:table-cell>
        </table:table-row>
        <table:table-row>
          <table:table-cell table:style-name="Taula10.A3" office:value-type="string">
            <text:p text:style-name="P327">organCodi</text:p>
          </table:table-cell>
          <table:table-cell table:style-name="Taula10.A3" office:value-type="string">
            <text:p text:style-name="P328">Cadena</text:p>
          </table:table-cell>
          <table:table-cell table:style-name="Taula10.A3" office:value-type="string">
            <text:p text:style-name="P260"><text:span text:style-name="T270">0..</text:span>1</text:p>
          </table:table-cell>
          <table:table-cell table:style-name="Taula10.A3" office:value-type="string">
            <text:p text:style-name="P265"/>
          </table:table-cell>
          <table:table-cell table:style-name="Taula10.E16" office:value-type="string">
            <text:p text:style-name="P253"/>
          </table:table-cell>
        </table:table-row>
        <table:table-row>
          <table:table-cell table:style-name="Taula10.A3" office:value-type="string">
            <text:p text:style-name="P327">pais</text:p>
          </table:table-cell>
          <table:table-cell table:style-name="Taula10.A3" office:value-type="string">
            <text:p text:style-name="P328">Cadena</text:p>
          </table:table-cell>
          <table:table-cell table:style-name="Taula10.A3" office:value-type="string">
            <text:p text:style-name="P260"><text:span text:style-name="T125">0..</text:span>1</text:p>
          </table:table-cell>
          <table:table-cell table:style-name="Taula10.A3" office:value-type="string">
            <text:p text:style-name="P331">100</text:p>
          </table:table-cell>
          <table:table-cell table:style-name="Taula10.E17" office:value-type="string">
            <text:p text:style-name="P289"><text:span text:style-name="T278">Nom</text:span> del País de la persona.</text:p>
          </table:table-cell>
        </table:table-row>
        <table:table-row>
          <table:table-cell table:style-name="Taula10.A3" office:value-type="string">
            <text:p text:style-name="P327">paisCodi</text:p>
          </table:table-cell>
          <table:table-cell table:style-name="Taula10.A3" office:value-type="string">
            <text:p text:style-name="P328">Cadena</text:p>
          </table:table-cell>
          <table:table-cell table:style-name="Taula10.A3" office:value-type="string">
            <text:p text:style-name="P329">0..1</text:p>
          </table:table-cell>
          <table:table-cell table:style-name="Taula10.A3" office:value-type="string">
            <text:p text:style-name="P331">100</text:p>
          </table:table-cell>
          <table:table-cell table:style-name="Taula10.E18" office:value-type="string">
            <text:p text:style-name="P289">Codi ISO numèric del País de la persona.</text:p>
          </table:table-cell>
        </table:table-row>
        <table:table-row>
          <table:table-cell table:style-name="Taula10.A3" office:value-type="string">
            <text:p text:style-name="P327">provincia</text:p>
          </table:table-cell>
          <table:table-cell table:style-name="Taula10.A3" office:value-type="string">
            <text:p text:style-name="P261">Cadena</text:p>
          </table:table-cell>
          <table:table-cell table:style-name="Taula10.A3" office:value-type="string">
            <text:p text:style-name="P249">0..1</text:p>
          </table:table-cell>
          <table:table-cell table:style-name="Taula10.A3" office:value-type="string">
            <text:p text:style-name="P331">100</text:p>
          </table:table-cell>
          <table:table-cell table:style-name="Taula10.E19" office:value-type="string">
            <text:p text:style-name="P289"><text:span text:style-name="T278">Nom</text:span> de la província de la persona.</text:p>
          </table:table-cell>
        </table:table-row>
        <table:table-row>
          <table:table-cell table:style-name="Taula10.A3" office:value-type="string">
            <text:p text:style-name="P327">provinciaCodi</text:p>
          </table:table-cell>
          <table:table-cell table:style-name="Taula10.A3" office:value-type="string">
            <text:p text:style-name="P261">Cadena</text:p>
          </table:table-cell>
          <table:table-cell table:style-name="Taula10.A3" office:value-type="string">
            <text:p text:style-name="P249">0..1</text:p>
          </table:table-cell>
          <table:table-cell table:style-name="Taula10.A3" office:value-type="string">
            <text:p text:style-name="P357">100</text:p>
          </table:table-cell>
          <table:table-cell table:style-name="Taula10.E20" office:value-type="string">
            <text:p text:style-name="P289">Codi INE de la província de la persona.</text:p>
          </table:table-cell>
        </table:table-row>
        <table:table-row>
          <table:table-cell table:style-name="Taula10.A3" office:value-type="string">
            <text:p text:style-name="P334">raoSocial</text:p>
          </table:table-cell>
          <table:table-cell table:style-name="Taula10.A3" office:value-type="string">
            <text:p text:style-name="P261">Cadena</text:p>
          </table:table-cell>
          <table:table-cell table:style-name="Taula10.A3" office:value-type="string">
            <text:p text:style-name="P249">0..1</text:p>
          </table:table-cell>
          <table:table-cell table:style-name="Taula10.A3" office:value-type="string">
            <text:p text:style-name="P331">2000</text:p>
          </table:table-cell>
          <table:table-cell table:style-name="Taula10.E21" office:value-type="string">
            <text:p text:style-name="P299">Raó social de l’interessat. Obligatori si és una persona jurídica.</text:p>
          </table:table-cell>
        </table:table-row>
        <table:table-row>
          <table:table-cell table:style-name="Taula10.A3" office:value-type="string">
            <text:p text:style-name="P334">telefon</text:p>
          </table:table-cell>
          <table:table-cell table:style-name="Taula10.A3" office:value-type="string">
            <text:p text:style-name="P335">Cadena</text:p>
          </table:table-cell>
          <table:table-cell table:style-name="Taula10.A3" office:value-type="string">
            <text:p text:style-name="P336">0..1</text:p>
          </table:table-cell>
          <table:table-cell table:style-name="Taula10.A3" office:value-type="string">
            <text:p text:style-name="P331">20</text:p>
          </table:table-cell>
          <table:table-cell table:style-name="Taula10.E21" office:value-type="string">
            <text:p text:style-name="P330">Telèfon de l’interessat. </text:p>
          </table:table-cell>
        </table:table-row>
        <table:table-row>
          <table:table-cell table:style-name="Taula10.A3" office:value-type="string">
            <text:p text:style-name="P334">tipus</text:p>
          </table:table-cell>
          <table:table-cell table:style-name="Taula10.A3" office:value-type="string">
            <text:p text:style-name="P335">interessatTipus</text:p>
          </table:table-cell>
          <table:table-cell table:style-name="Taula10.A3" office:value-type="string">
            <text:p text:style-name="P336">0..1</text:p>
          </table:table-cell>
          <table:table-cell table:style-name="Taula10.A3" office:value-type="string">
            <text:p text:style-name="P331">19</text:p>
          </table:table-cell>
          <table:table-cell table:style-name="Taula10.E23" office:value-type="string">
            <text:p text:style-name="P291">Figura jurídica de la persona <text:line-break/>'1' = Administració.</text:p>
            <text:p text:style-name="P291"><text:soft-page-break/>'2' = Persona física.</text:p>
            <text:p text:style-name="P291">'3' = Persona jurídica.</text:p>
          </table:table-cell>
        </table:table-row>
      </table:table>
      <text:p text:style-name="P130"/>
      <table:table table:name="Taula11" table:style-name="Taula11">
        <table:table-column table:style-name="Taula11.A"/>
        <table:table-column table:style-name="Taula11.B"/>
        <table:table-column table:style-name="Taula11.C"/>
        <table:table-column table:style-name="Taula11.D"/>
        <table:table-column table:style-name="Taula11.E"/>
        <table:table-row>
          <table:table-cell table:style-name="Taula11.A1" table:number-columns-spanned="5" office:value-type="string">
            <text:p text:style-name="P136">Interessa<text:span text:style-name="T273">t =&gt; tns:interessatBase</text:span></text:p>
          </table:table-cell>
          <table:covered-table-cell/>
          <table:covered-table-cell/>
          <table:covered-table-cell/>
          <table:covered-table-cell/>
        </table:table-row>
        <table:table-row>
          <table:table-cell table:style-name="Taula11.A2" office:value-type="string">
            <text:p text:style-name="P34">Nom del camp</text:p>
          </table:table-cell>
          <table:table-cell table:style-name="Taula11.A2" office:value-type="string">
            <text:p text:style-name="P34">Tipus</text:p>
          </table:table-cell>
          <table:table-cell table:style-name="Taula11.A2" office:value-type="string">
            <text:p text:style-name="P34">Mult.</text:p>
          </table:table-cell>
          <table:table-cell table:style-name="Taula11.A2" office:value-type="string">
            <text:p text:style-name="P36">Tamany</text:p>
          </table:table-cell>
          <table:table-cell table:style-name="Taula11.E2" office:value-type="string">
            <text:p text:style-name="P36">Descripció</text:p>
          </table:table-cell>
        </table:table-row>
        <table:table-row>
          <table:table-cell table:style-name="Taula11.A3" office:value-type="string">
            <text:p text:style-name="P337">representant</text:p>
          </table:table-cell>
          <table:table-cell table:style-name="Taula11.A3" office:value-type="string">
            <text:p text:style-name="P338">representant</text:p>
          </table:table-cell>
          <table:table-cell table:style-name="Taula11.A3" office:value-type="string">
            <text:p text:style-name="P245">0..1</text:p>
          </table:table-cell>
          <table:table-cell table:style-name="Taula11.D3">
            <text:p text:style-name="P245"/>
          </table:table-cell>
          <table:table-cell table:style-name="Taula11.E3" office:value-type="string">
            <text:p text:style-name="P330">Dades de la persona representant descrites amb les mateixes propietats que els interessats. </text:p>
          </table:table-cell>
        </table:table-row>
      </table:table>
      <text:p text:style-name="P241"/>
      <text:list text:continue-numbering="true" text:style-name="Outline">
        <text:list-item>
          <text:list>
            <text:list-item>
              <text:h text:style-name="P398" text:outline-level="2"><text:bookmark-start text:name="Còpia de Còpia de __RefHeading___Toc16776_2313926538 1 1"/><text:bookmark-start text:name="__RefHeading___Toc227363_390838441"/>Utilització del servei<text:bookmark-end text:name="Còpia de Còpia de __RefHeading___Toc16776_2313926538 1 1"/><text:bookmark-end text:name="__RefHeading___Toc227363_390838441"/></text:h>
            </text:list-item>
          </text:list>
        </text:list-item>
      </text:list>
      <text:p text:style-name="P223">Aquest servei disposa d’un client que facilita la seva utilització.</text:p>
      <text:p text:style-name="P224">Per a fer ús d’aquest client en una aplicació Java es pot utilitzar la següent dependència Maven:</text:p>
      <text:p text:style-name="P372"/>
      <text:p text:style-name="P232"><text:span text:style-name="T29"><text:s/><text:tab/> </text:span><text:span text:style-name="T15">&lt;</text:span><text:span text:style-name="T16">d</text:span><text:span text:style-name="T22">ependency</text:span><text:span text:style-name="T15">&gt;</text:span></text:p>
      <text:p text:style-name="P58"><text:span text:style-name="T29"><text:s/><text:tab/> <text:tab/> </text:span><text:span text:style-name="T15">&lt;</text:span><text:span text:style-name="T22">groupId</text:span><text:span text:style-name="T15">&gt;</text:span><text:span text:style-name="T29">es.caib.distribucio</text:span><text:span text:style-name="T15">&lt;/</text:span><text:span text:style-name="T22">groupId</text:span><text:span text:style-name="T15">&gt;</text:span></text:p>
      <text:p text:style-name="P58"><text:span text:style-name="T29"><text:s/><text:tab/> <text:tab/> </text:span><text:span text:style-name="T15">&lt;</text:span><text:span text:style-name="T22">artifactId</text:span><text:span text:style-name="T15">&gt;</text:span><text:span text:style-name="T29">distribucio-</text:span><text:span text:style-name="T31">rest</text:span><text:span text:style-name="T29">-client</text:span><text:span text:style-name="T15">&lt;/</text:span><text:span text:style-name="T22">artifactId</text:span><text:span text:style-name="T15">&gt;</text:span></text:p>
      <text:p text:style-name="P58"><text:span text:style-name="T29"><text:s/><text:tab/> <text:tab/> </text:span><text:span text:style-name="T15">&lt;</text:span><text:span text:style-name="T22">version</text:span><text:span text:style-name="T15">&gt;</text:span><text:span text:style-name="T30">1.0.</text:span><text:span text:style-name="T33">7</text:span><text:span text:style-name="T15">&lt;/</text:span><text:span text:style-name="T22">version</text:span><text:span text:style-name="T15">&gt;</text:span></text:p>
      <text:p text:style-name="P232"><text:span text:style-name="T29"><text:s/><text:tab/> </text:span><text:span text:style-name="T15">&lt;/</text:span><text:span text:style-name="T22">dependency</text:span><text:span text:style-name="T15">&gt;</text:span></text:p>
      <text:p text:style-name="P232"/>
      <text:p text:style-name="P224">Per a utilitzar aquesta dependència és necessari tenir configurat el següent repository:</text:p>
      <text:p text:style-name="P375"/>
      <text:p text:style-name="P231"><text:span text:style-name="T29"><text:s/><text:tab/> </text:span><text:span text:style-name="T15">&lt;</text:span><text:span text:style-name="T22">repository</text:span><text:span text:style-name="T15">&gt;</text:span></text:p>
      <text:p text:style-name="P58"><text:span text:style-name="T29"><text:s/><text:tab/> <text:tab/> </text:span><text:span text:style-name="T15">&lt;</text:span><text:span text:style-name="T22">id</text:span><text:span text:style-name="T15">&gt;</text:span><text:span text:style-name="T29">github-governib-maven-repo</text:span><text:span text:style-name="T15">&lt;/</text:span><text:span text:style-name="T22">id</text:span><text:span text:style-name="T15">&gt;</text:span></text:p>
      <text:p text:style-name="P58"><text:span text:style-name="T29"><text:s/><text:tab/> <text:tab/> </text:span><text:span text:style-name="T15">&lt;</text:span><text:span text:style-name="T22">name</text:span><text:span text:style-name="T15">&gt;</text:span><text:span text:style-name="T29">GitHub GovernIB Maven Repository</text:span><text:span text:style-name="T15">&lt;/</text:span><text:span text:style-name="T22">name</text:span><text:span text:style-name="T15">&gt;</text:span></text:p>
      <text:p text:style-name="P58"><text:span text:style-name="T29"><text:s/><text:tab/> <text:tab/> </text:span><text:span text:style-name="T15">&lt;</text:span><text:span text:style-name="T22">url</text:span><text:span text:style-name="T15">&gt;</text:span><text:span text:style-name="T29">http://GovernIB.github.io/maven/maven/</text:span><text:span text:style-name="T15">&lt;/</text:span><text:span text:style-name="T22">url</text:span><text:span text:style-name="T15">&gt;</text:span></text:p>
      <text:p text:style-name="P231"><text:span text:style-name="T29"><text:s/><text:tab/> </text:span><text:span text:style-name="T15">&lt;/</text:span><text:span text:style-name="T22">repository</text:span><text:span text:style-name="T15">&gt;</text:span></text:p>
      <text:p text:style-name="P231"/>
      <text:p text:style-name="P223"/>
      <text:p text:style-name="P223">Aquesta dependència ens dona accés a la classe BackofficeIntegracioRestClient que ens permet fer cridades al servei. En el següent fragment de codi es pot veure un exemple de com utilitzar aquesta classe per a fer cridades al servei:</text:p>
      <text:p text:style-name="P107"/>
      <text:p text:style-name="P57"><text:span text:style-name="T54"><text:tab/><text:tab/></text:span><text:span text:style-name="T55">BackofficeIntegracioRestClient </text:span><text:span text:style-name="T89">restClient</text:span><text:span text:style-name="T54"> = BackofficeIntegracioRestClientFactory.</text:span><text:span text:style-name="T58">getRestClient</text:span><text:span text:style-name="T54">(</text:span></text:p>
      <text:p text:style-name="P53"><text:span text:style-name="T54"><text:tab/><text:tab/><text:tab/><text:tab/></text:span><text:span text:style-name="T34">"http://DISTRIB_HOST/distribucioapi/interna"</text:span><text:span text:style-name="T54">,</text:span></text:p>
      <text:p text:style-name="P53"><text:span text:style-name="T54"><text:tab/><text:tab/><text:tab/><text:tab/></text:span><text:span text:style-name="T34">"USERNAME"</text:span><text:span text:style-name="T54">,</text:span></text:p>
      <text:p text:style-name="P53"><text:span text:style-name="T54"><text:tab/><text:tab/><text:tab/><text:tab/></text:span><text:span text:style-name="T34">"PASSWORD"</text:span><text:span text:style-name="T54">);</text:span></text:p>
      <text:p text:style-name="P53"><text:span text:style-name="T54"><text:tab/><text:tab/>AnotacioRegistreId </text:span><text:span text:style-name="T89">id</text:span><text:span text:style-name="T54"> = </text:span><text:span text:style-name="T48">new</text:span><text:span text:style-name="T54"> AnotacioRegistreId(</text:span></text:p>
      <text:p text:style-name="P53"><text:span text:style-name="T54"><text:tab/><text:tab/><text:tab/><text:tab/></text:span><text:span text:style-name="T34">"GOIBE1708001141307/2024"</text:span><text:span text:style-name="T54">,</text:span></text:p>
      <text:p text:style-name="P53"><text:span text:style-name="T54"><text:tab/><text:tab/><text:tab/><text:tab/></text:span><text:span text:style-name="T34">"BYlMBmFPLGJSytavAH325Yjbwqo9xfXhM+wM0vzHxL4="</text:span><text:span text:style-name="T54">);</text:span></text:p>
      <text:p text:style-name="P57"><text:span text:style-name="T54"><text:tab/><text:tab/>AnotacioRegistreEntrada </text:span><text:span text:style-name="T89">anotacio</text:span><text:span text:style-name="T54"> = </text:span><text:span text:style-name="T89">restClient</text:span><text:span text:style-name="T54">.consulta(</text:span><text:span text:style-name="T89">id</text:span><text:span text:style-name="T54">);</text:span></text:p>
      <text:p text:style-name="P109"/>
      <text:p text:style-name="P47"/>
      <text:list text:continue-numbering="true" text:style-name="Outline">
        <text:list-item>
          <text:h text:style-name="P389" text:outline-level="1"><text:bookmark-start text:name="Còpia de __RefHeading___Toc160470_1680181998 1"/><text:bookmark-start text:name="__RefHeading___Toc227365_390838441"/><text:bookmark-start text:name="Còpia de __RefNumPara__81017_1680181998 1"/>Servei de gestió <text:span text:style-name="T335">de regles</text:span><text:bookmark-end text:name="Còpia de __RefHeading___Toc160470_1680181998 1"/><text:bookmark-end text:name="__RefHeading___Toc227365_390838441"/><text:bookmark-end text:name="Còpia de __RefNumPara__81017_1680181998 1"/></text:h>
        </text:list-item>
      </text:list>
      <text:p text:style-name="P221">Aquest servei permet <text:span text:style-name="T324">als backoffices </text:span><text:span text:style-name="T337">gestionar les regles per a la distribució automàtica de les anotacions de registre.</text:span></text:p>
      <text:p text:style-name="P209"><draw:frame draw:style-name="fr3" draw:name="Marc4" text:anchor-type="as-char" svg:width="9.763cm" draw:z-index="73"><draw:text-box fo:min-height="10.636cm"><text:p text:style-name="P216"><draw:frame draw:style-name="fr7" draw:name="Imatge3" text:anchor-type="paragraph" svg:width="9.763cm" style:rel-width="100%" svg:height="10.636cm" style:rel-height="scale" draw:z-index="74"><draw:image xlink:href="Pictures/100000010000017100000192F2130587.png" xlink:type="simple" xlink:show="embed" xlink:actuate="onLoad" draw:mime-type="image/png"/></draw:frame>Figura <text:sequence text:ref-name="refFigure1" text:name="Figure" text:formula="ooow:Figure+1" style:num-format="1">2</text:sequence>: <text:span text:style-name="T337">C</text:span><text:span text:style-name="T316">asos d'ús </text:span><text:span text:style-name="T336">de gestió </text:span><text:span text:style-name="T318">d</text:span><text:span text:style-name="T337">e regles</text:span><text:span text:style-name="T318"> a </text:span><text:span text:style-name="T316">DISTRIBUCIÓ</text:span></text:p></draw:text-box></draw:frame></text:p>
      <text:p text:style-name="P207"/>
      <text:list xml:id="list112333316671091" text:continue-numbering="true" text:style-name="Outline">
        <text:list-item>
          <text:list>
            <text:list-item>
              <text:h text:style-name="P399" text:outline-level="2"><text:bookmark-start text:name="Còpia de Còpia de Còpia de __RefHeading___Toc16772_2313926538 2 1 4"/><text:bookmark-start text:name="__RefHeading___Toc227367_390838441"/><text:bookmark-start text:name="Còpia de Còpia de Còpia de __RefNumPara__80988_1680181998 2 1 4"/>Descripció del servei<text:bookmark-end text:name="Còpia de Còpia de Còpia de __RefHeading___Toc16772_2313926538 2 1 4"/><text:bookmark-end text:name="__RefHeading___Toc227367_390838441"/><text:bookmark-end text:name="Còpia de Còpia de Còpia de __RefNumPara__80988_1680181998 2 1 4"/></text:h>
            </text:list-item>
          </text:list>
        </text:list-item>
      </text:list>
      <text:p text:style-name="P199">Per tal de facilitar la creació automàtica de regles de tipus enviar a backoffice segons un codi SIA de procediment <text:span text:style-name="T312">DISTRIBUCIO</text:span> ofereix una API REST de creació, <text:s/>consulta i modificació de regles. Les dades bàsiques d'aquesta API REST de regles són les següents:</text:p>
      <text:list text:style-name="L13">
        <text:list-item>
          <text:p text:style-name="P453">URL base: <text:a xlink:type="simple" xlink:href="https://se.caib.es/distribucioapi/interna/regla" text:style-name="Internet_20_link" text:visited-style-name="Visited_20_Internet_20_Link">https://<text:span text:style-name="T309">se</text:span><text:span text:style-name="T283">.caib.es</text:span>/distribucioapi/interna/r<text:span text:style-name="T283">egla</text:span></text:a></text:p>
        </text:list-item>
        <text:list-item>
          <text:p text:style-name="P454">Documentació Swagger: <text:a xlink:type="simple" xlink:href="https://se.caib.es/distribucioapi/interna/api/rest" text:style-name="Internet_20_link" text:visited-style-name="Visited_20_Internet_20_Link"><text:span text:style-name="T282">https://</text:span><text:span text:style-name="T309">se</text:span>.caib.es</text:a><text:a xlink:type="simple" xlink:href="https://se.caib.es/distribucioapi/interna" text:style-name="Internet_20_link" text:visited-style-name="Visited_20_Internet_20_Link"><text:span text:style-name="T282">/distribucioapi/interna</text:span></text:a></text:p>
        </text:list-item>
        <text:list-item>
          <text:p text:style-name="P454">Autenticació: WSBASIC</text:p>
        </text:list-item>
        <text:list-item>
          <text:p text:style-name="P454">Rol necessari: DIS_REGLA</text:p>
        </text:list-item>
      </text:list>
      <text:list xml:id="list112332271383170" text:continue-list="list112333316671091" text:style-name="Outline">
        <text:list-item>
          <text:list>
            <text:list-item>
              <text:list>
                <text:list-item>
                  <text:h text:style-name="P410" text:outline-level="3"><text:bookmark-start text:name="Còpia de __RefHeading___Toc53751_2521683781 1"/><text:bookmark-start text:name="__RefHeading___Toc227369_390838441"/><text:soft-page-break/>Crear una regla<text:bookmark-end text:name="Còpia de __RefHeading___Toc53751_2521683781 1"/><text:bookmark-end text:name="__RefHeading___Toc227369_390838441"/></text:h>
                </text:list-item>
              </text:list>
            </text:list-item>
          </text:list>
        </text:list-item>
      </text:list>
      <text:p text:style-name="P189">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62">Crear una regla</text:p>
          </table:table-cell>
          <table:covered-table-cell/>
        </table:table-row>
        <table:table-row>
          <table:table-cell table:style-name="Taula26.A2" office:value-type="string">
            <text:p text:style-name="P32">URL</text:p>
          </table:table-cell>
          <table:table-cell table:style-name="Taula26.B2" office:value-type="string">
            <text:p text:style-name="P187">http<text:span text:style-name="T323">s</text:span>://<text:span text:style-name="T323">DISTRIB_HOST/distribucioapi/interna</text:span>/regla/add</text:p>
          </table:table-cell>
        </table:table-row>
        <table:table-row>
          <table:table-cell table:style-name="Taula26.A3" office:value-type="string">
            <text:p text:style-name="P38">Mètode</text:p>
          </table:table-cell>
          <table:table-cell table:style-name="Taula26.B3" office:value-type="string">
            <text:p text:style-name="P204">POST</text:p>
          </table:table-cell>
        </table:table-row>
        <table:table-row>
          <table:table-cell table:style-name="Taula26.A3" office:value-type="string">
            <text:p text:style-name="P32">Descripció</text:p>
          </table:table-cell>
          <table:table-cell table:style-name="Taula26.B3" office:value-type="string">
            <text:p text:style-name="P44">Dona d'alta una regla pel backoffice i codi SIA indicat per a l'entitat indicada.</text:p>
          </table:table-cell>
        </table:table-row>
        <table:table-row>
          <table:table-cell table:style-name="Taula26.A3" office:value-type="string">
            <text:p text:style-name="P38">Autenticació</text:p>
          </table:table-cell>
          <table:table-cell table:style-name="Taula26.B3" office:value-type="string">
            <text:p text:style-name="P359">HTTP Basic</text:p>
          </table:table-cell>
        </table:table-row>
        <table:table-row>
          <table:table-cell table:style-name="Taula26.A3" office:value-type="string">
            <text:p text:style-name="P38">Rols requerits</text:p>
          </table:table-cell>
          <table:table-cell table:style-name="Taula26.B3" office:value-type="string">
            <text:p text:style-name="P359">DIS_REGLA</text:p>
          </table:table-cell>
        </table:table-row>
        <table:table-row>
          <table:table-cell table:style-name="Taula26.A3" office:value-type="string">
            <text:p text:style-name="P32">Paràmetres</text:p>
          </table:table-cell>
          <table:table-cell table:style-name="Taula26.B3" office:value-type="string">
            <text:list xml:id="list4148337415" text:style-name="L4">
              <text:list-item>
                <text:p text:style-name="P429"><text:span text:style-name="T42">entitat</text:span><text:span text:style-name="T284">: Codi de l'entitat de DISTRIBUCIO on crear la regla. Típicament per l'entorn del Govern el codi d'entitat és "A04003003".</text:span><text:span text:style-name="T286"> Aquest paràmetre és obligatori.</text:span></text:p>
              </text:list-item>
              <text:list-item>
                <text:p text:style-name="P429"><text:span text:style-name="T42">sia</text:span><text:span text:style-name="T284">: Codi de procediment SIA per crear la regla i aplicar-la a les anotacions que es donin d'alta amb aquest codi</text:span><text:span text:style-name="T313"> </text:span><text:span text:style-name="T284">de procediment.</text:span><text:span text:style-name="T286"> Aquest paràmetre és obligatori.</text:span></text:p>
              </text:list-item>
              <text:list-item>
                <text:p text:style-name="P443">tipusSia<text:span text:style-name="T219">: Codi per indicar si la regla aplica al codi SIA del procediment o del servei. Els possibles valors són 'PROCEDIMENT' i 'SERVEI'. És un paràmetre opcional i per defecte es creen les regles pel SIA del procediment.</text:span></text:p>
              </text:list-item>
              <text:list-item>
                <text:p text:style-name="P429"><text:span text:style-name="T42">backoffice</text:span><text:span text:style-name="T284">: Codi del backoffice pel qual donar d'alta la regla. El backoffice ha d'estar donat d'alta en el manteniment de backoffices a DISTRIBUCIO per l'entitat indicada.</text:span><text:span text:style-name="T286"> Aquest paràmetre és obligatori.</text:span></text:p>
              </text:list-item>
            </text:list>
          </table:table-cell>
        </table:table-row>
        <table:table-row>
          <table:table-cell table:style-name="Taula26.A8" office:value-type="string">
            <text:p text:style-name="P32">Resultat</text:p>
          </table:table-cell>
          <table:table-cell table:style-name="Taula26.B8" office:value-type="string">
            <text:list text:style-name="L5">
              <text:list-item>
                <text:p text:style-name="P435">HTTP 200 <text:span text:style-name="T285">si la regla s'ha creat correctament o ja existia pel mateix backoffice i com a cos <text:s/>de la resposta es retorna el text de missatge de confirmació</text:span>.</text:p>
              </text:list-item>
              <text:list-item>
                <text:p text:style-name="P439">HTTP 404 si l'entitat o el backoffice no es troba per codi.</text:p>
              </text:list-item>
              <text:list-item>
                <text:p text:style-name="P439">HTTP 406 si ja existeix una regla pel mateix codi de procediment però per un altre backoffice.</text:p>
              </text:list-item>
              <text:list-item>
                <text:p text:style-name="P439">HTTP 500 si es produe<text:span text:style-name="T313">i</text:span>x un error intern no controlat creant la regla.</text:p>
              </text:list-item>
            </text:list>
          </table:table-cell>
        </table:table-row>
      </table:table>
      <text:p text:style-name="P188"/>
      <text:list xml:id="list112332903580934" text:continue-list="list112332271383170" text:style-name="Outline">
        <text:list-item>
          <text:list>
            <text:list-item>
              <text:list>
                <text:list-item>
                  <text:h text:style-name="P411" text:outline-level="3"><text:bookmark-start text:name="Còpia de Còpia de __RefHeading___Toc53751_2521683781 1 1"/><text:bookmark-start text:name="__RefHeading___Toc227371_390838441"/>Canviar estat d’una regla<text:bookmark-end text:name="Còpia de Còpia de __RefHeading___Toc53751_2521683781 1 1"/><text:bookmark-end text:name="__RefHeading___Toc227371_390838441"/></text:h>
                </text:list-item>
              </text:list>
            </text:list-item>
          </text:list>
        </text:list-item>
      </text:list>
      <text:p text:style-name="P189">Aquest mètode permet <text:span text:style-name="T337">activar o desactivar una </text:span><text:span text:style-name="T287">regla de tipus enviament a backoffice a partir del codi SIA del procedi</text:span><text:span text:style-name="T313">m</text:span><text:span text:style-name="T287">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62">Canviar estat d’una regla</text:p>
          </table:table-cell>
          <table:covered-table-cell/>
        </table:table-row>
        <table:table-row>
          <table:table-cell table:style-name="Taula16.A2" office:value-type="string">
            <text:p text:style-name="P32">URL</text:p>
          </table:table-cell>
          <table:table-cell table:style-name="Taula16.B2" office:value-type="string">
            <text:p text:style-name="P187">http<text:span text:style-name="T323">s</text:span>://<text:span text:style-name="T323">DISTRIB_HOST/distribucioapi/interna</text:span>/regla/<text:span text:style-name="T283">canviEstat</text:span></text:p>
          </table:table-cell>
        </table:table-row>
        <table:table-row>
          <table:table-cell table:style-name="Taula16.A3" office:value-type="string">
            <text:p text:style-name="P38">Mètode</text:p>
          </table:table-cell>
          <table:table-cell table:style-name="Taula16.B3" office:value-type="string">
            <text:p text:style-name="P204">POST</text:p>
          </table:table-cell>
        </table:table-row>
        <table:table-row>
          <table:table-cell table:style-name="Taula16.A3" office:value-type="string">
            <text:p text:style-name="P32">Descripció</text:p>
          </table:table-cell>
          <table:table-cell table:style-name="Taula16.B3" office:value-type="string">
            <text:p text:style-name="P44"><text:span text:style-name="T337">Canvia l’estat d’una regla donat el codi SIA del procediment</text:span>.</text:p>
          </table:table-cell>
        </table:table-row>
        <table:table-row>
          <table:table-cell table:style-name="Taula16.A3" office:value-type="string">
            <text:p text:style-name="P38">Autenticació</text:p>
          </table:table-cell>
          <table:table-cell table:style-name="Taula16.B3" office:value-type="string">
            <text:p text:style-name="P359">HTTP Basic</text:p>
          </table:table-cell>
        </table:table-row>
        <text:soft-page-break/>
        <table:table-row>
          <table:table-cell table:style-name="Taula16.A3" office:value-type="string">
            <text:p text:style-name="P38">Rols requerits</text:p>
          </table:table-cell>
          <table:table-cell table:style-name="Taula16.B3" office:value-type="string">
            <text:p text:style-name="P359">DIS_REGLA</text:p>
          </table:table-cell>
        </table:table-row>
        <table:table-row>
          <table:table-cell table:style-name="Taula16.A3" office:value-type="string">
            <text:p text:style-name="P32">Paràmetres</text:p>
          </table:table-cell>
          <table:table-cell table:style-name="Taula16.B3" office:value-type="string">
            <text:list xml:id="list112332167695353" text:continue-list="list4148337415" text:style-name="L4">
              <text:list-item>
                <text:p text:style-name="P429"><text:span text:style-name="T42">sia</text:span><text:span text:style-name="T284">: Codi de procediment SIA per </text:span><text:span text:style-name="T287">trobar la regla associada</text:span><text:span text:style-name="T284">.</text:span><text:span text:style-name="T286"> Aquest paràmetre és obligatori.</text:span></text:p>
              </text:list-item>
              <text:list-item>
                <text:p text:style-name="P429"><text:span text:style-name="T47">activa</text:span><text:span text:style-name="T284">: </text:span>Paràmetre opcional <text:span text:style-name="T287">de tipus booleà </text:span>per activar o desactivar la regla. Si on s'especifica es canvia segons el valor que tingui actualment.<text:span text:style-name="T287"> Per exemple </text:span><text:span text:style-name="T144">activa=true</text:span><text:span text:style-name="T176">.</text:span></text:p>
              </text:list-item>
            </text:list>
          </table:table-cell>
        </table:table-row>
        <table:table-row>
          <table:table-cell table:style-name="Taula16.A8" office:value-type="string">
            <text:p text:style-name="P32">Resultat</text:p>
          </table:table-cell>
          <table:table-cell table:style-name="Taula16.B8" office:value-type="string">
            <text:list text:style-name="L6">
              <text:list-item>
                <text:p text:style-name="P436">HTTP 200 <text:span text:style-name="T285">si </text:span><text:span text:style-name="T287">la regla s'ha pogut modificar correctament</text:span>.<text:span text:style-name="T289"> Com a cos del missatge de resposta es retorna el text de confirmació conforme si la regla s'ha activat o desactivat correctament. Per exemple "La regla amb codi 12354 s'ha desactivat correctament.".</text:span></text:p>
              </text:list-item>
              <text:list-item>
                <text:p text:style-name="P440">HTTP <text:span text:style-name="T287">409</text:span> si <text:span text:style-name="T287">no s'ha trobat cap regla el codi de procediment SIA.</text:span></text:p>
              </text:list-item>
              <text:list-item>
                <text:p text:style-name="P440">HTTP 500 si es produe<text:span text:style-name="T313">i</text:span>x un error intern no controlat <text:span text:style-name="T287">modificant</text:span> la regla.</text:p>
              </text:list-item>
            </text:list>
          </table:table-cell>
        </table:table-row>
      </table:table>
      <text:p text:style-name="P189"/>
      <text:list xml:id="list112333838340664" text:continue-list="list112332903580934" text:style-name="Outline">
        <text:list-item>
          <text:list>
            <text:list-item>
              <text:list>
                <text:list-item>
                  <text:h text:style-name="P411" text:outline-level="3"><text:bookmark-start text:name="Còpia de Còpia de Còpia de __RefHeading___Toc53751_2521683781 1 1 1"/><text:bookmark-start text:name="__RefHeading___Toc227373_390838441"/>Consultar informació d’una regla<text:bookmark-end text:name="Còpia de Còpia de Còpia de __RefHeading___Toc53751_2521683781 1 1 1"/><text:bookmark-end text:name="__RefHeading___Toc227373_390838441"/></text:h>
                </text:list-item>
              </text:list>
            </text:list-item>
          </text:list>
        </text:list-item>
      </text:list>
      <text:p text:style-name="P217">Aquest mètode <text:span text:style-name="T287">permet consultar els detalls d'una regla a partir del codi SIA del procediment. En el cos de la respo</text:span><text:span text:style-name="T313">s</text:span><text:span text:style-name="T287">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63"><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table-cell table:style-name="Taula21.A2" office:value-type="string">
            <text:p text:style-name="P32">URL</text:p>
          </table:table-cell>
          <table:table-cell table:style-name="Taula21.B2" office:value-type="string">
            <text:p text:style-name="P187">http<text:span text:style-name="T323">s</text:span>://<text:span text:style-name="T323">DISTRIB_HOST/distribucioapi/interna</text:span>/regla/consultarRegla</text:p>
          </table:table-cell>
        </table:table-row>
        <table:table-row>
          <table:table-cell table:style-name="Taula21.A3" office:value-type="string">
            <text:p text:style-name="P38">Mètode</text:p>
          </table:table-cell>
          <table:table-cell table:style-name="Taula21.B3" office:value-type="string">
            <text:p text:style-name="P204">POST</text:p>
          </table:table-cell>
        </table:table-row>
        <table:table-row>
          <table:table-cell table:style-name="Taula21.A3" office:value-type="string">
            <text:p text:style-name="P32">Descripció</text:p>
          </table:table-cell>
          <table:table-cell table:style-name="Taula21.B3" office:value-type="string">
            <text:p text:style-name="P210">Consulta les regles <text:span text:style-name="T337">que coincideixin amb el codi SIA especificat</text:span>. En principi només hi pot haver una regla de tipus backoffice per codi SIA<text:span text:style-name="T289"> però per compatibilitat es retorna una llista de regles que podrien estar creades pel mateix codi SIA de procediment anteriorment.</text:span></text:p>
          </table:table-cell>
        </table:table-row>
        <table:table-row>
          <table:table-cell table:style-name="Taula21.A3" office:value-type="string">
            <text:p text:style-name="P38">Autenticació</text:p>
          </table:table-cell>
          <table:table-cell table:style-name="Taula21.B3" office:value-type="string">
            <text:p text:style-name="P359">HTTP Basic</text:p>
          </table:table-cell>
        </table:table-row>
        <table:table-row>
          <table:table-cell table:style-name="Taula21.A3" office:value-type="string">
            <text:p text:style-name="P38">Rols requerits</text:p>
          </table:table-cell>
          <table:table-cell table:style-name="Taula21.B3" office:value-type="string">
            <text:p text:style-name="P359">DIS_REGLA</text:p>
          </table:table-cell>
        </table:table-row>
        <table:table-row>
          <table:table-cell table:style-name="Taula21.A3" office:value-type="string">
            <text:p text:style-name="P32">Paràmetres</text:p>
          </table:table-cell>
          <table:table-cell table:style-name="Taula21.B3" office:value-type="string">
            <text:list text:continue-list="list112332167695353" text:style-name="L4">
              <text:list-item>
                <text:p text:style-name="P429"><text:span text:style-name="T203">sia</text:span><text:span text:style-name="T177">: </text:span><text:span text:style-name="T176">Codi SIA de la regla que identifica la regla de tipus backoffice.</text:span></text:p>
              </text:list-item>
            </text:list>
          </table:table-cell>
        </table:table-row>
        <table:table-row>
          <table:table-cell table:style-name="Taula21.A8" office:value-type="string">
            <text:p text:style-name="P32">Resultat</text:p>
          </table:table-cell>
          <table:table-cell table:style-name="Taula21.B8" office:value-type="string">
            <text:list text:style-name="L7">
              <text:list-item>
                <text:p text:style-name="P430"><text:span text:style-name="T284">HTTP 200 </text:span><text:span text:style-name="T285">si </text:span><text:span text:style-name="T287">la regla s'ha pogut </text:span><text:span text:style-name="T288">consultar</text:span><text:span text:style-name="T287"> correctament</text:span><text:span text:style-name="T284">.</text:span><text:span text:style-name="T289"> En el cos del missatge hi ha el JSON amb la llista de regles i els seus detalls, per exemple:</text:span></text:p>
                <text:list>
                  <text:list-item>
                    <text:p text:style-name="P445">Petició:</text:p>
                    <text:list>
                      <text:list-item>
                        <text:p text:style-name="P445">GET https://<text:span text:style-name="T309">se</text:span>.caib.es/distribucioapi/interna/regla/consultarRegla?sia=20220429</text:p>
                      </text:list-item>
                    </text:list>
                  </text:list-item>
                  <text:list-item>
                    <text:p text:style-name="P445">Cos de la resposta</text:p>
                  </text:list-item>
                </text:list>
              </text:list-item>
            </text:list>
            <text:p text:style-name="P197">[</text:p>
            <text:p text:style-name="P197"><text:s text:c="4"/>{</text:p>
            <text:p text:style-name="P197"><text:s text:c="8"/>"id": 1485186,</text:p>
            <text:p text:style-name="P197"><text:s text:c="8"/>"entitat": "Govern de les Illes Balears",</text:p>
            <text:p text:style-name="P197"><text:s text:c="8"/>"data": "13/05/2022 16:51:55",</text:p>
            <text:p text:style-name="P197"><text:s text:c="8"/>"activa": true,</text:p>
            <text:p text:style-name="P197"><text:soft-page-break/><text:s text:c="8"/>"nom": "helium 20220429",</text:p>
            <text:p text:style-name="P198"><text:s text:c="8"/>"tipusSia": "PROCEDIMENT",</text:p>
            <text:p text:style-name="P197"><text:s text:c="8"/>"backofficeDesti": "HELIUM DEV"</text:p>
            <text:p text:style-name="P197"><text:s text:c="4"/>}</text:p>
            <text:p text:style-name="P197">]</text:p>
            <text:list text:style-name="L8">
              <text:list-item>
                <text:p text:style-name="P446">Els camps de la resposta són els següents:</text:p>
                <text:list>
                  <text:list-item>
                    <text:p text:style-name="P446">id: identificador intern de la regla de tipus long.</text:p>
                  </text:list-item>
                  <text:list-item>
                    <text:p text:style-name="P446">entitat: Descripció de l'entitat de DISTRIBUCIO a la qual pertany la regla. Tipus String.</text:p>
                  </text:list-item>
                  <text:list-item>
                    <text:p text:style-name="P446">data: Data de creació de la regla. String amb format "dd/MM/yyyy HH:mm:ss".</text:p>
                  </text:list-item>
                  <text:list-item>
                    <text:p text:style-name="P446">nom: Nom posat a la regla.</text:p>
                  </text:list-item>
                  <text:list-item>
                    <text:p text:style-name="P446">tipusSia<text:span text:style-name="T340">: Indica si la regla s'aplica pel codi SIA del procediment assignat a l'anotació o pel codi SIA del servei assignat a l'anotació.</text:span><text:span text:style-name="T345"> Els possibles valors són "PROCEDIMENT" o "SERVEI".</text:span></text:p>
                  </text:list-item>
                  <text:list-item>
                    <text:p text:style-name="P446">backofficeDesti: Codi del backoffice al qual es notifiquen les anotacions afectades per la regla.</text:p>
                  </text:list-item>
                </text:list>
              </text:list-item>
              <text:list-item>
                <text:p text:style-name="P441">HTTP <text:span text:style-name="T288">404</text:span> si <text:span text:style-name="T287">no s'ha trobat cap regla el codi de procediment SIA.</text:span></text:p>
              </text:list-item>
            </text:list>
          </table:table-cell>
        </table:table-row>
      </table:table>
      <text:p text:style-name="P189"/>
      <text:list text:continue-list="list112333838340664" text:style-name="Outline">
        <text:list-item>
          <text:list>
            <text:list-item>
              <text:h text:style-name="P399" text:outline-level="2"><text:bookmark-start text:name="Còpia de Còpia de Còpia de __RefHeading___Toc16776_2313926538 1 1 1"/><text:bookmark-start text:name="__RefHeading___Toc227375_390838441"/>Utilització del servei<text:bookmark-end text:name="Còpia de Còpia de Còpia de __RefHeading___Toc16776_2313926538 1 1 1"/><text:bookmark-end text:name="__RefHeading___Toc227375_390838441"/></text:h>
            </text:list-item>
          </text:list>
        </text:list-item>
      </text:list>
      <text:p text:style-name="P224">Aquest servei disposa d’un client que facilita la seva utilització.</text:p>
      <text:p text:style-name="P224">Per a fer ús d’aquest client en una aplicació Java es pot utilitzar la següent dependència Maven:</text:p>
      <text:p text:style-name="P372"/>
      <text:p text:style-name="P232"><text:span text:style-name="T29"><text:s/><text:tab/> </text:span><text:span text:style-name="T15">&lt;</text:span><text:span text:style-name="T16">d</text:span><text:span text:style-name="T22">ependency</text:span><text:span text:style-name="T15">&gt;</text:span></text:p>
      <text:p text:style-name="P58"><text:span text:style-name="T29"><text:s/><text:tab/> <text:tab/> </text:span><text:span text:style-name="T15">&lt;</text:span><text:span text:style-name="T22">groupId</text:span><text:span text:style-name="T15">&gt;</text:span><text:span text:style-name="T29">es.caib.distribucio</text:span><text:span text:style-name="T15">&lt;/</text:span><text:span text:style-name="T22">groupId</text:span><text:span text:style-name="T15">&gt;</text:span></text:p>
      <text:p text:style-name="P58"><text:span text:style-name="T29"><text:s/><text:tab/> <text:tab/> </text:span><text:span text:style-name="T15">&lt;</text:span><text:span text:style-name="T22">artifactId</text:span><text:span text:style-name="T15">&gt;</text:span><text:span text:style-name="T29">distribucio-</text:span><text:span text:style-name="T31">rest</text:span><text:span text:style-name="T29">-client</text:span><text:span text:style-name="T15">&lt;/</text:span><text:span text:style-name="T22">artifactId</text:span><text:span text:style-name="T15">&gt;</text:span></text:p>
      <text:p text:style-name="P58"><text:span text:style-name="T29"><text:s/><text:tab/> <text:tab/> </text:span><text:span text:style-name="T15">&lt;</text:span><text:span text:style-name="T22">version</text:span><text:span text:style-name="T15">&gt;</text:span><text:span text:style-name="T30">1.0.</text:span><text:span text:style-name="T33">7</text:span><text:span text:style-name="T15">&lt;/</text:span><text:span text:style-name="T22">version</text:span><text:span text:style-name="T15">&gt;</text:span></text:p>
      <text:p text:style-name="P232"><text:span text:style-name="T29"><text:s/><text:tab/> </text:span><text:span text:style-name="T15">&lt;/</text:span><text:span text:style-name="T22">dependency</text:span><text:span text:style-name="T15">&gt;</text:span></text:p>
      <text:p text:style-name="P232"/>
      <text:p text:style-name="P224">Per a utilitzar aquesta dependència és necessari tenir configurat el següent repository:</text:p>
      <text:p text:style-name="P375"/>
      <text:p text:style-name="P231"><text:span text:style-name="T29"><text:s/><text:tab/> </text:span><text:span text:style-name="T15">&lt;</text:span><text:span text:style-name="T22">repository</text:span><text:span text:style-name="T15">&gt;</text:span></text:p>
      <text:p text:style-name="P58"><text:span text:style-name="T29"><text:s/><text:tab/> <text:tab/> </text:span><text:span text:style-name="T15">&lt;</text:span><text:span text:style-name="T22">id</text:span><text:span text:style-name="T15">&gt;</text:span><text:span text:style-name="T29">github-governib-maven-repo</text:span><text:span text:style-name="T15">&lt;/</text:span><text:span text:style-name="T22">id</text:span><text:span text:style-name="T15">&gt;</text:span></text:p>
      <text:p text:style-name="P58"><text:span text:style-name="T29"><text:s/><text:tab/> <text:tab/> </text:span><text:span text:style-name="T15">&lt;</text:span><text:span text:style-name="T22">name</text:span><text:span text:style-name="T15">&gt;</text:span><text:span text:style-name="T29">GitHub GovernIB Maven Repository</text:span><text:span text:style-name="T15">&lt;/</text:span><text:span text:style-name="T22">name</text:span><text:span text:style-name="T15">&gt;</text:span></text:p>
      <text:p text:style-name="P58"><text:span text:style-name="T29"><text:s/><text:tab/> <text:tab/> </text:span><text:span text:style-name="T15">&lt;</text:span><text:span text:style-name="T22">url</text:span><text:span text:style-name="T15">&gt;</text:span><text:span text:style-name="T29">http://GovernIB.github.io/maven/maven/</text:span><text:span text:style-name="T15">&lt;/</text:span><text:span text:style-name="T22">url</text:span><text:span text:style-name="T15">&gt;</text:span></text:p>
      <text:p text:style-name="P231"><text:span text:style-name="T29"><text:s/><text:tab/> </text:span><text:span text:style-name="T15">&lt;/</text:span><text:span text:style-name="T22">repository</text:span><text:span text:style-name="T15">&gt;</text:span></text:p>
      <text:p text:style-name="P231"/>
      <text:p text:style-name="P147"/>
      <text:p text:style-name="P225">Aquesta dependència ens dona accés a la classe ReglesRestClient que ens permet fer cridades al servei. En el següent fragment de codi es pot veure un exemple de com utilitzar aquesta classe per a fer cridades al servei:</text:p>
      <text:p text:style-name="P108"/>
      <text:p text:style-name="P59"><text:span text:style-name="T54"><text:tab/><text:tab/>ReglesRestClient</text:span><text:span text:style-name="T55"> </text:span><text:span text:style-name="T89">restClient</text:span><text:span text:style-name="T54"> = ReglesRestClientFactory.</text:span><text:span text:style-name="T58">getRestClient</text:span><text:span text:style-name="T54">(</text:span></text:p>
      <text:p text:style-name="P59"><text:soft-page-break/><text:span text:style-name="T54"><text:tab/><text:tab/><text:tab/><text:tab/></text:span><text:span text:style-name="T34">"http://DISTRIB_HOST/distribucioapi/interna"</text:span><text:span text:style-name="T54">,</text:span></text:p>
      <text:p text:style-name="P59"><text:span text:style-name="T54"><text:tab/><text:tab/><text:tab/><text:tab/></text:span><text:span text:style-name="T34">"USERNAME"</text:span><text:span text:style-name="T54">,</text:span></text:p>
      <text:p text:style-name="P59"><text:span text:style-name="T54"><text:tab/><text:tab/><text:tab/><text:tab/></text:span><text:span text:style-name="T34">"PASSWORD"</text:span><text:span text:style-name="T54">);</text:span></text:p>
      <text:p text:style-name="P60"><text:span text:style-name="T54"><text:tab/><text:tab/></text:span><text:span text:style-name="T56">Regla</text:span><text:span text:style-name="T54"> </text:span><text:span text:style-name="T90">regla</text:span><text:span text:style-name="T54"> = </text:span><text:span text:style-name="T89">restClient</text:span><text:span text:style-name="T54">.consulta</text:span><text:span text:style-name="T56">Regla</text:span><text:span text:style-name="T54">(</text:span><text:span text:style-name="T34">"</text:span><text:span text:style-name="T35">CODI_SIA</text:span><text:span text:style-name="T34">"</text:span><text:span text:style-name="T54">);</text:span></text:p>
      <text:p text:style-name="P110"/>
      <text:p text:style-name="P184"/>
      <text:list text:continue-numbering="true" text:style-name="Outline">
        <text:list-item>
          <text:h text:style-name="P390" text:outline-level="1"><text:bookmark-start text:name="__RefHeading___Toc60794_1326387233"/>Llibreria d'utilitats pels backoffices de DISTRIBUCIO<text:bookmark-end text:name="__RefHeading___Toc60794_1326387233"/></text:h>
        </text:list-item>
      </text:list>
      <text:p text:style-name="P126"><text:span text:style-name="T132"><text:s/></text:span>Amb l'objectiu de facilitar la integració dels backoffices amb DISTRIBUCIO <text:span text:style-name="T132">s'ha creat la llibreria </text:span><text:span text:style-name="T134">distribucio-backoffice-utils</text:span><text:span text:style-name="T162"> amb mètodes per facilitar </text:span><text:span text:style-name="T171">tasques comunes dels backoffices per a que s'hagi de fer una implementació específica per cada backoffice com, per exemple, </text:span><text:span text:style-name="T162">traspassar la informació des dels expedients de l'Arxiu de Distribució cap als expedients dins l'Arxiu dels backoffices</text:span><text:span text:style-name="T171"> o extreure dades de documents tècnics de Sistra2.</text:span></text:p>
      <text:p text:style-name="P63"/>
      <text:p text:style-name="P124"><text:span text:style-name="T162"><text:s/>La motivació d'aquesta llibreria és unificar la forma en què els backoffices </text:span><text:span text:style-name="T181">mo</text:span><text:span text:style-name="T186">u</text:span><text:span text:style-name="T181">en la informació des dels expedients de DISTRIBUCIO cap als seus propis expedients dins l'Arxiu. </text:span><text:span text:style-name="T182">D'aquesta forma les crides per moure el contingut i els interessats s'encapsula dins d'una funció que ja té en compte els diferents errors que es poden produir o si els annexos o els interessats ja s'han traspassat en un intent anterior.</text:span></text:p>
      <text:p text:style-name="P74"/>
      <text:p text:style-name="P74">En els següents punts des descriu la llibreria, com funciona i com utilitzar-la.</text:p>
      <text:list xml:id="list112334127049228" text:continue-numbering="true" text:style-name="Outline">
        <text:list-item>
          <text:list>
            <text:list-item>
              <text:h text:style-name="P401" text:outline-level="2"><text:bookmark-start text:name="__RefHeading___Toc50902_2907556958"/>Informació de la llibreria<text:bookmark-end text:name="__RefHeading___Toc50902_2907556958"/></text:h>
            </text:list-item>
          </text:list>
        </text:list-item>
      </text:list>
      <text:p text:style-name="P81">La llibreria consisteix en <text:span text:style-name="T244">classes </text:span>interfície<text:span text:style-name="T244">s</text:span> <text:span text:style-name="T161">amb els mètodes de suport pels </text:span><text:span text:style-name="T133">backoffices</text:span><text:span text:style-name="T161"> i classe</text:span><text:span text:style-name="T174">s</text:span><text:span text:style-name="T161"> amb la implementació</text:span><text:span text:style-name="T174">. La llista de classes d'utilitats són les següents:</text:span></text:p>
      <text:p text:style-name="P66"/>
      <text:list text:style-name="L14">
        <text:list-item>
          <text:p text:style-name="P413"><text:span text:style-name="T142">BackofficeArxiuUtils</text:span><text:span text:style-name="T174">: Aquesta classe d'uilitats conté mètodes per tractar les anotacions i crear un expedient a l'Arxiu del backoffice. </text:span><text:span text:style-name="T192"><text:s/></text:span><text:span text:style-name="T193">C</text:span><text:span text:style-name="T163">onté una referència a la instància del plugin de l'Arxiu </text:span><text:span text:style-name="T135">IArxiuPlugin</text:span><text:span text:style-name="T163"> que emprarà per fer les diferents crides i moure la informació dels expedients de DISTRIBUCIO</text:span><text:span text:style-name="T135"> </text:span><text:span text:style-name="T163">cap a un expedient propi. Així mateix, la llibreria </text:span><text:span text:style-name="T135">distribucio-backoffice-utils.jar</text:span><text:span text:style-name="T163"> utilitza les classes definides en la llibreria client de WS de DISTRIBUCIO</text:span><text:span text:style-name="T135"> distribucio-ws-client.jar.</text:span><text:span text:style-name="T163"> </text:span></text:p>
        </text:list-item>
        <text:list-item>
          <text:p text:style-name="P414">BackofficeSistra2Utils<text:span text:style-name="T161">: Aquesta classe d'utilitats té mètodes per tractar els annexos corresponents a documents tècnics de Sistra2 i extreure'n la informació dels formularis o pagaments.</text:span></text:p>
        </text:list-item>
      </text:list>
      <text:p text:style-name="P66"/>
      <text:p text:style-name="P127"><text:span text:style-name="T161">Com que les utilitats de l'Arxiu empren el plugin d'Arxiu la llibreria té dependències del plugin d'Arxiu </text:span>plugin-arxiu-api.jar<text:span text:style-name="T161"> i de la llibreria de Distribució </text:span><text:span text:style-name="T142">distribucio-ws-client.jar</text:span><text:span text:style-name="T174">. A continuació es mostra el diagrama de blocs de les llibreries relacionades i el </text:span><text:span text:style-name="T142">backoffice</text:span><text:span text:style-name="T174"> que empra la llibreria d'utilitats.</text:span></text:p>
      <text:p text:style-name="P64"/>
      <text:p text:style-name="P154"><draw:frame draw:style-name="fr1" draw:name="Frame1" text:anchor-type="paragraph" svg:width="17cm" draw:z-index="53"><draw:text-box fo:min-height="7.294cm"><text:p text:style-name="Fig."><draw:frame draw:style-name="fr6" draw:name="Image2" text:anchor-type="as-char" svg:width="17cm" style:rel-width="100%" svg:height="7.294cm" style:rel-height="scale" draw:z-index="75"><draw:image xlink:href="Pictures/100000010000041B000001C31F13D5E0.png" xlink:type="simple" xlink:show="embed" xlink:actuate="onLoad" draw:mime-type="image/png"/></draw:frame><text:span text:style-name="T230"><text:line-break/></text:span>Fig. <text:sequence text:ref-name="refFig.2" text:name="Fig." text:formula="ooow:Fig.+1" style:num-format="1">3</text:sequence>: Diagrama de blocks de la llibreria</text:p></draw:text-box></draw:frame><text:soft-page-break/></text:p>
      <text:list text:continue-list="list112334127049228" text:style-name="Outline">
        <text:list-item>
          <text:list>
            <text:list-item>
              <text:h text:style-name="P403" text:outline-level="2"><text:bookmark-start text:name="__RefHeading___Toc50904_2907556958"/>Com incloure la llibreria<text:bookmark-end text:name="__RefHeading___Toc50904_2907556958"/></text:h>
            </text:list-item>
          </text:list>
        </text:list-item>
      </text:list>
      <text:p text:style-name="P67">La llibreria es pot incloure com una dependència maven dins del codi del backoffice de la mateixa forma que s'inclouen les dependències del client del WS de DISTRIBUCIO o de l' API de l'Arxiu.</text:p>
      <text:p text:style-name="P379"><text:span text:style-name="T161">S'ha de tenir en compte la versió específica de la llibreria </text:span><text:span text:style-name="T133">distribucio-backoffice-utils</text:span><text:span text:style-name="T161"> ja que aquesta es pot versionar i millorar en el temps. La versió de la llibreria contindrà el número de versió de DISTRIBUCIO i el número de revisió quan aquesta tingui canvis. </text:span></text:p>
      <text:p text:style-name="P379"><text:span text:style-name="T161">En el cas de </text:span><text:span text:style-name="T179">d'aplicacions Java 7 per JBoss 5.2 es pot incloure </text:span><text:span text:style-name="T161">la següent dependència </text:span><text:span text:style-name="T133">maven</text:span><text:span text:style-name="T161">:</text:span></text:p>
      <table:table table:name="Table2" table:style-name="Table2">
        <table:table-column table:style-name="Table2.A"/>
        <table:table-row>
          <table:table-cell table:style-name="Table2.A1" office:value-type="string">
            <text:p text:style-name="P42"><text:span text:style-name="T18">&lt;</text:span><text:span text:style-name="T24">dependency</text:span><text:span text:style-name="T18">&gt;</text:span></text:p>
            <text:p text:style-name="P54"><text:span text:style-name="T60"><text:tab/></text:span><text:span text:style-name="T18">&lt;</text:span><text:span text:style-name="T24">groupId</text:span><text:span text:style-name="T18">&gt;</text:span><text:span text:style-name="T60">es.caib.distribucio</text:span><text:span text:style-name="T18">&lt;/</text:span><text:span text:style-name="T24">groupId</text:span><text:span text:style-name="T18">&gt;</text:span></text:p>
            <text:p text:style-name="P54"><text:span text:style-name="T60"><text:tab/></text:span><text:span text:style-name="T18">&lt;</text:span><text:span text:style-name="T24">artifactId</text:span><text:span text:style-name="T18">&gt;</text:span><text:span text:style-name="T60">distribucio-backoffice-utils</text:span><text:span text:style-name="T18">&lt;/</text:span><text:span text:style-name="T24">artifactId</text:span><text:span text:style-name="T18">&gt;</text:span></text:p>
            <text:p text:style-name="P54"><text:span text:style-name="T60"><text:tab/></text:span><text:span text:style-name="T18">&lt;</text:span><text:span text:style-name="T24">version</text:span><text:span text:style-name="T18">&gt;</text:span><text:span text:style-name="T60">0.9.</text:span><text:span text:style-name="T63">50</text:span><text:span text:style-name="T18">&lt;/</text:span><text:span text:style-name="T24">version</text:span><text:span text:style-name="T18">&gt;</text:span></text:p>
            <text:p text:style-name="P42"><text:span text:style-name="T18">&lt;/</text:span><text:span text:style-name="T24">dependency</text:span><text:span text:style-name="T18">&gt;</text:span></text:p>
          </table:table-cell>
        </table:table-row>
      </table:table>
      <text:p text:style-name="P67"/>
      <text:p text:style-name="P379"><text:span text:style-name="T161">En el cas de </text:span><text:span text:style-name="T179">d'aplicacions Java 11 per JBoss 7.2 es pot incloure </text:span><text:span text:style-name="T161">la següent dependència </text:span><text:span text:style-name="T133">maven</text:span><text:span text:style-name="T161">:</text:span></text:p>
      <table:table table:name="Table1" table:style-name="Table1">
        <table:table-column table:style-name="Table1.A"/>
        <table:table-row>
          <table:table-cell table:style-name="Table1.A1" office:value-type="string">
            <text:p text:style-name="P48"><text:span text:style-name="T18">&lt;</text:span><text:span text:style-name="T24">dependency</text:span><text:span text:style-name="T18">&gt;</text:span></text:p>
            <text:p text:style-name="P62"><text:span text:style-name="T60"><text:tab/></text:span><text:span text:style-name="T18">&lt;</text:span><text:span text:style-name="T24">groupId</text:span><text:span text:style-name="T18">&gt;</text:span><text:span text:style-name="T60">es.caib.distribucio</text:span><text:span text:style-name="T18">&lt;/</text:span><text:span text:style-name="T24">groupId</text:span><text:span text:style-name="T18">&gt;</text:span></text:p>
            <text:p text:style-name="P62"><text:span text:style-name="T60"><text:tab/></text:span><text:span text:style-name="T18">&lt;</text:span><text:span text:style-name="T24">artifactId</text:span><text:span text:style-name="T18">&gt;</text:span><text:span text:style-name="T60">distribucio-backoffice-utils</text:span><text:span text:style-name="T18">&lt;/</text:span><text:span text:style-name="T24">artifactId</text:span><text:span text:style-name="T18">&gt;</text:span></text:p>
            <text:p text:style-name="P62"><text:span text:style-name="T60"><text:tab/></text:span><text:span text:style-name="T18">&lt;</text:span><text:span text:style-name="T24">version</text:span><text:span text:style-name="T18">&gt;</text:span><text:span text:style-name="T19">1</text:span><text:span text:style-name="T60">.</text:span><text:span text:style-name="T61">0</text:span><text:span text:style-name="T60">.</text:span><text:span text:style-name="T64">8</text:span><text:span text:style-name="T18">&lt;/</text:span><text:span text:style-name="T24">version</text:span><text:span text:style-name="T18">&gt;</text:span></text:p>
            <text:p text:style-name="P48"><text:span text:style-name="T18">&lt;/</text:span><text:span text:style-name="T24">dependency</text:span><text:span text:style-name="T18">&gt;</text:span></text:p>
          </table:table-cell>
        </table:table-row>
      </table:table>
      <text:p text:style-name="P68"/>
      <text:p text:style-name="P69">Aquesta llibreria depèn de la llibreria client de<text:span text:style-name="T352"> </text:span>l<text:span text:style-name="T352">'API REST </text:span>de DISTRIBUCIO per tractar la informació de DISTRIBUCIO i del plugin d'Arxiu per fer les diferents crides a l'Arxiu.</text:p>
      <text:list xml:id="list112334042552897" text:continue-numbering="true" text:style-name="Outline">
        <text:list-item>
          <text:list>
            <text:list-item>
              <text:h text:style-name="P404" text:outline-level="2"><text:bookmark-start text:name="__RefHeading___Toc366105_93553639"/><text:soft-page-break/>Històric<text:bookmark-end text:name="__RefHeading___Toc366105_93553639"/></text:h>
            </text:list-item>
          </text:list>
        </text:list-item>
      </text:list>
      <text:p text:style-name="P164">La llibreria està pensada per anar incorporant noves utilitats i en principi se cercarà la compatibilitat cap a versions anteriors. <text:span text:style-name="T246">La versió de la llibreria coincideix amb la versió de Distribucio en la que es van introduir els canvis. </text:span>L'històric de versions actual és el següent:</text:p>
      <text:list text:style-name="L15">
        <text:list-item>
          <text:p text:style-name="P457">0.9.26 Versió inicial de la llibreria amb la classe <text:span text:style-name="T133">BackofficeUtils</text:span><text:span text:style-name="T161"> per traspassar arxius.</text:span></text:p>
        </text:list-item>
        <text:list-item>
          <text:p text:style-name="P455"><text:span text:style-name="T171">0.9.2</text:span><text:span text:style-name="T197">8</text:span><text:span text:style-name="T171"> S'afegeix la classe </text:span><text:span text:style-name="T143">BackofficeSistra2Utils</text:span><text:span text:style-name="T171"> per extreure dades de documents tècnics i es reanomena la classe anterior </text:span><text:span text:style-name="T143">BackofficeUtils </text:span><text:span text:style-name="T171">a</text:span><text:span text:style-name="T143"> BackofficeArxiuUtils</text:span><text:span text:style-name="T171">.</text:span></text:p>
        </text:list-item>
        <text:list-item>
          <text:p text:style-name="P456"><text:span text:style-name="T171">0.9.</text:span><text:span text:style-name="T322">50</text:span><text:span text:style-name="T171"> </text:span><text:span text:style-name="T321">Modificació per llegir els valors de tipus llista de l'XML de formularis de Sistra2.</text:span><text:span text:style-name="T171">a</text:span><text:span text:style-name="T143"> BackofficeArxiuUtils</text:span><text:span text:style-name="T171">.</text:span></text:p>
        </text:list-item>
        <text:list-item>
          <text:p text:style-name="P458"><text:span text:style-name="T171">1</text:span><text:span text:style-name="T161">.0.1 Primera versió de la llibreria per Java 11 i JBoss 7.2</text:span></text:p>
        </text:list-item>
        <text:list-item>
          <text:p text:style-name="P458"><text:span text:style-name="T161">0.9.51 i 1.0.8 Actualització de les llibreries per actualitzar les llibreries </text:span><text:span text:style-name="T133">distribucio-rest-client</text:span><text:span text:style-name="T161"> i per corregir el missatge d'error quan falli la incorporació d'un annex.</text:span></text:p>
        </text:list-item>
      </text:list>
      <text:list xml:id="list112334026055847" text:continue-list="list112334042552897" text:style-name="Outline">
        <text:list-item>
          <text:list>
            <text:list-item>
              <text:h text:style-name="P405" text:outline-level="2"><text:bookmark-start text:name="__RefHeading___Toc366107_93553639"/>Utilitats per l'Arxiu<text:bookmark-end text:name="__RefHeading___Toc366107_93553639"/></text:h>
            </text:list-item>
          </text:list>
        </text:list-item>
      </text:list>
      <text:p text:style-name="P128">La llibreria d'utilitats inclou la classe <text:span text:style-name="T133">BackofficeArxiuUtils</text:span><text:span text:style-name="T161"> amb els mètodes per fer les tasques de crear un expedient a l'Arxiu i </text:span><text:span text:style-name="T187">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27"><text:span text:style-name="T204"><text:s/>La idea és poder crear i moure la informació de l'expedient a l'Arxiu de DISTRIBUCIO cap a l'expedient a l'Arxiu del </text:span><text:span text:style-name="T135">backoffice</text:span><text:span text:style-name="T163"> a partir de la informació consultada amb el client del WS de DISTRIBUCIO quan el </text:span><text:span text:style-name="T135">backoffice</text:span><text:span text:style-name="T163"> rebi una petició d'anotació pendent. D'aquesta forma la interfície </text:span><text:span text:style-name="T135">BackofficeArxiuUtils</text:span><text:span text:style-name="T163"> defineix el mètode </text:span><text:span text:style-name="T145">crearExpedientAmbAnotacioDeRegistre</text:span><text:span text:style-name="T163"> per a fer el seguit de crides necessàries i retornar un resultat que permeti saber com ha anat el resultat. </text:span></text:p>
      <text:p text:style-name="P65"/>
      <text:p text:style-name="P182"><text:span text:style-name="T164">E</text:span><text:span text:style-name="T161">l mètode </text:span><text:span text:style-name="T133">crearExpedientAmbAnotacioRegistre</text:span><text:span text:style-name="T161"> s'encarrergarà, mitjançant la informació proporcionada, de realitzar les següents crides a l'Arxiu:</text:span></text:p>
      <text:list text:style-name="L16">
        <text:list-item>
          <text:p text:style-name="P383"><text:span text:style-name="T165">Si no s'informa la propietat o paràmetre </text:span><text:span text:style-name="T136">identificador </text:span><text:span text:style-name="T165">llavors es c</text:span><text:span text:style-name="T161">rear</text:span><text:span text:style-name="T165">à</text:span><text:span text:style-name="T161"> el nou expedient a l'arxiu fent una cridada al mètode </text:span><text:span text:style-name="T133">expedientCrear</text:span><text:span text:style-name="T136"> </text:span><text:span text:style-name="T165">amb la infomració de l'expedient passada com a paràmetre</text:span><text:span text:style-name="T161">.</text:span><text:span text:style-name="T166"> Si es detecta que ja està creat llavors continua.</text:span></text:p>
        </text:list-item>
        <text:list-item>
          <text:p text:style-name="P384">Crear els interessats en l'expedient de l'arxiu fent una cridada al mètode <text:span text:style-name="T133">expedientModificar</text:span>.<text:span text:style-name="T205"> Es comprovarà si l'expedient ja conté els interessats.</text:span></text:p>
        </text:list-item>
        <text:list-item>
          <text:p text:style-name="P384">Crear una nova carpeta a dins l'expedient de destí que contendrà tots els annexos de l'anotació de registre (aquesta passa és opcional i només es fa si hi ha un paràmetre activat).<text:span text:style-name="T205"> Primer es comprova si la carpeta ja està creada.</text:span></text:p>
        </text:list-item>
        <text:list-item>
          <text:p text:style-name="P383"><text:soft-page-break/><text:span text:style-name="T161">Moure el document annex des de l'expedient de l'anotació de registre cap al nou expedient creat emprant el mètode </text:span><text:span text:style-name="T133">documentMoure</text:span><text:span text:style-name="T161">. Com que l'expedient d'origen i el de destí pertanyen a sèries documentals diferents això provocarà una cridada al servei dispatchDocument de l'API REST de l'arxiu.</text:span><text:span text:style-name="T166"> S'ha de comprovar si l'annex s'ha mogut prèviament.</text:span></text:p>
        </text:list-item>
      </text:list>
      <text:p text:style-name="P129"><text:span text:style-name="T192">Com que el mètode pot haver produït un error en el transcurs de les crides anteriors </text:span><text:span text:style-name="T194">internament </text:span><text:span text:style-name="T192">es faran les comprovacions necessàries en cada pas per rependre l'execució del mètode.</text:span><text:span text:style-name="T194"> Així doncs, el backoffice integrador podrà reintentar el processament de l'anotació tornant a invocar el mètode amb els mateixos paràmetres amb l'excepció de la creació de l'expedient, ja que el </text:span><text:span text:style-name="T152">backoffice </text:span><text:span text:style-name="T195">ha de guardar l'identificador dins l'Arxiu de l'expedient per continuar amb el traspàs de la informació de manera que no es creïn nous expedients en cada intent.</text:span></text:p>
      <text:p text:style-name="P76"><text:s/>En els següents apartats es descriuen els possibles paràmetres de configuració i es mostra codi d'exemple per al seu ús.</text:p>
      <text:list xml:id="list112333029865201" text:continue-list="list112334026055847" text:style-name="Outline">
        <text:list-item>
          <text:list>
            <text:list-item>
              <text:list>
                <text:list-item>
                  <text:h text:style-name="P407" text:outline-level="3"><text:bookmark-start text:name="__RefHeading___Toc50906_2907556958"/><text:span text:style-name="T206">P</text:span>aràmetres<text:bookmark-end text:name="__RefHeading___Toc50906_2907556958"/></text:h>
                </text:list-item>
              </text:list>
            </text:list-item>
          </text:list>
        </text:list-item>
      </text:list>
      <text:p text:style-name="P155">La classe <text:span text:style-name="T133">BackofficeArxiuUtils</text:span><text:span text:style-name="T161"> es pot configurar a través dels seus mètodes. Els paràmetres són els següents:</text:span></text:p>
      <text:list text:style-name="L17">
        <text:list-item>
          <text:p text:style-name="P459">iArxiuPlugin: </text:p>
          <text:p text:style-name="P462"><text:span text:style-name="T161">És un paràmetre obligatori que s'ha d'especificar a través del constructor </text:span><text:span text:style-name="T133">BackofficeArxiuUtilsImpl(IArxiuPlugin)</text:span><text:span text:style-name="T161"> o a través del métode </text:span><text:span text:style-name="T133">setIArxiuPlugin(IArxiuPlugin)</text:span><text:span text:style-name="T161">. Serveix per tenir referència a la instància de l'API de l'Arxiu i poder fer les crides necessàries per a la creació, modificació i consulta de la informació de l'Arxiu.</text:span></text:p>
        </text:list-item>
        <text:list-item>
          <text:p text:style-name="P459">carpeta:</text:p>
          <text:p text:style-name="P461"><text:span text:style-name="T161">La definició de la carpeta és opcional. Si es fixa un valor per a la carpeta llavors durant les crides es crearà una carpeta on guardar els annexos de l'anotació de registre. És útil quan l'expedient del </text:span><text:span text:style-name="T133">backoffice</text:span><text:span text:style-name="T161"> pot estar relacionat amb diferents anotacions de registre i es vol separar els annexos de les diferents anotacions. Per fixar el nom de la carpeta es pot fer mitjançant el métode </text:span><text:span text:style-name="T133">setCarpeta(String)</text:span><text:span text:style-name="T161">.</text:span></text:p>
        </text:list-item>
        <text:list-item>
          <text:p text:style-name="P459">arxiuPluginListener:</text:p>
          <text:p text:style-name="P461"><text:span text:style-name="T161">A fi de poder controlar les diferents crides que es fan a l'Arxiu la interfície </text:span><text:span text:style-name="T133">BackofficeArxiuUtils</text:span><text:span text:style-name="T161"> permet</text:span><text:span text:style-name="T172"> opcionament</text:span><text:span text:style-name="T161"> fixar una instància que implementi la interfície </text:span><text:span text:style-name="T133">ArxiuPluginListener</text:span><text:span text:style-name="T161">. Cada cop que es cridi a l'Arxiu s'invocarà al mètode </text:span><text:span text:style-name="T133">event</text:span><text:span text:style-name="T161"> de la instància per a que l'aplicació del </text:span><text:span text:style-name="T133">backoffice </text:span><text:span text:style-name="T161">pugui monitoritzar la integració amb l'Arxiu amb la informació dels mètodes invocats, els paràmetres més descriptius, si hi ha hagut error i el temps total de processament en ms. El métode per fixar la instància és </text:span><text:span text:style-name="T137">setArxiuPluginListener(ArxiuPluginListener) </text:span><text:span text:style-name="T167">i l</text:span><text:span text:style-name="T161">a interfície que ha d'implementar la instància és la següent:</text:span></text:p>
        </text:list-item>
      </text:list>
      <table:table table:name="Table3" table:style-name="Table3">
        <table:table-column table:style-name="Table3.A"/>
        <table:table-row>
          <table:table-cell table:style-name="Table3.A1" office:value-type="string">
            <text:p text:style-name="P42"><text:span text:style-name="T50">package</text:span><text:span text:style-name="T60"> es.caib.distribucio.backoffice.utils;</text:span></text:p>
            <text:p text:style-name="P173"><text:soft-page-break/></text:p>
            <text:p text:style-name="P54"><text:span text:style-name="T50">import</text:span><text:span text:style-name="T60"> java.util.Map;</text:span></text:p>
            <text:p text:style-name="P173"/>
            <text:p text:style-name="P54"><text:span text:style-name="T208">/** </text:span><text:span text:style-name="T209">Interfície</text:span><text:span text:style-name="T208"> a </text:span><text:span text:style-name="T209">implementar</text:span><text:span text:style-name="T208"> </text:span><text:span text:style-name="T209">si</text:span><text:span text:style-name="T208"> </text:span><text:span text:style-name="T209">es</text:span><text:span text:style-name="T208"> </text:span><text:span text:style-name="T209">vol</text:span><text:span text:style-name="T208"> </text:span><text:span text:style-name="T209">estar</text:span><text:span text:style-name="T208"> </text:span><text:span text:style-name="T209">informat</text:span><text:span text:style-name="T208"> </text:span><text:span text:style-name="T209">de</text:span><text:span text:style-name="T208"> </text:span><text:span text:style-name="T209">les</text:span><text:span text:style-name="T208"> </text:span><text:span text:style-name="T209">peticions</text:span><text:span text:style-name="T208"> </text:span><text:span text:style-name="T209">que</text:span><text:span text:style-name="T208"> </text:span><text:span text:style-name="T209">es</text:span><text:span text:style-name="T208"> fan a l'Arxiu</text:span></text:p>
            <text:p text:style-name="P123"><text:s/>* </text:p>
            <text:p text:style-name="P123"><text:s/>*/</text:p>
            <text:p text:style-name="P54"><text:span text:style-name="T50">public</text:span><text:span text:style-name="T60"> </text:span><text:span text:style-name="T50">interface</text:span><text:span text:style-name="T60"> </text:span><text:span text:style-name="T62">ArxiuPluginListener</text:span><text:span text:style-name="T60"> {<text:tab/></text:span></text:p>
            <text:p text:style-name="P83"><text:tab/></text:p>
            <text:p text:style-name="P54"><text:span text:style-name="T60"><text:tab/></text:span><text:span text:style-name="T208">/** </text:span><text:span text:style-name="T209">Mètode</text:span><text:span text:style-name="T208"> per </text:span><text:span text:style-name="T209">notificar</text:span><text:span text:style-name="T208"> </text:span><text:span text:style-name="T209">les</text:span><text:span text:style-name="T208"> </text:span><text:span text:style-name="T209">crides</text:span><text:span text:style-name="T208"> </text:span><text:span text:style-name="T209">fetes</text:span><text:span text:style-name="T208"> a l'arxiu, els </text:span><text:span text:style-name="T209">paràmetres</text:span><text:span text:style-name="T208">, el </text:span><text:span text:style-name="T209">resultat</text:span><text:span text:style-name="T208"> i el </text:span><text:span text:style-name="T209">temps</text:span><text:span text:style-name="T208"> </text:span><text:span text:style-name="T209">de</text:span><text:span text:style-name="T208"> </text:span><text:span text:style-name="T209">la</text:span><text:span text:style-name="T208"> </text:span><text:span text:style-name="T209">petició</text:span></text:p>
            <text:p text:style-name="P123"><text:tab/> * </text:p>
            <text:p text:style-name="P54"><text:span text:style-name="T208"><text:tab/> * </text:span><text:span text:style-name="T210">@param</text:span><text:span text:style-name="T208"> metode</text:span></text:p>
            <text:p text:style-name="P54"><text:span text:style-name="T208"><text:tab/> * <text:tab/><text:tab/><text:tab/></text:span><text:span text:style-name="T209">Mètode</text:span><text:span text:style-name="T208"> </text:span><text:span text:style-name="T209">invocat</text:span></text:p>
            <text:p text:style-name="P54"><text:span text:style-name="T208"><text:tab/> * </text:span><text:span text:style-name="T210">@param</text:span><text:span text:style-name="T208"> parametres</text:span></text:p>
            <text:p text:style-name="P54"><text:span text:style-name="T208"><text:tab/> * <text:tab/><text:tab/><text:tab/></text:span><text:span text:style-name="T209">Paràmetres</text:span><text:span text:style-name="T208"> </text:span><text:span text:style-name="T209">més</text:span><text:span text:style-name="T208"> </text:span><text:span text:style-name="T209">representatius</text:span></text:p>
            <text:p text:style-name="P54"><text:span text:style-name="T208"><text:tab/> * </text:span><text:span text:style-name="T210">@param</text:span><text:span text:style-name="T208"> correcte</text:span></text:p>
            <text:p text:style-name="P54"><text:span text:style-name="T208"><text:tab/> * <text:tab/><text:tab/><text:tab/></text:span><text:span text:style-name="T209">Resultat</text:span><text:span text:style-name="T208"> </text:span><text:span text:style-name="T209">correcte</text:span></text:p>
            <text:p text:style-name="P54"><text:span text:style-name="T208"><text:tab/> * </text:span><text:span text:style-name="T210">@param</text:span><text:span text:style-name="T208"> error</text:span></text:p>
            <text:p text:style-name="P54"><text:span text:style-name="T208"><text:tab/> * <text:tab/><text:tab/><text:tab/></text:span><text:span text:style-name="T209">Descripció</text:span><text:span text:style-name="T208"> </text:span><text:span text:style-name="T209">de</text:span><text:span text:style-name="T208"> l'error </text:span><text:span text:style-name="T209">en</text:span><text:span text:style-name="T208"> </text:span><text:span text:style-name="T209">cas</text:span><text:span text:style-name="T208"> d'error</text:span></text:p>
            <text:p text:style-name="P54"><text:span text:style-name="T208"><text:tab/> * </text:span><text:span text:style-name="T210">@param</text:span><text:span text:style-name="T208"> e</text:span></text:p>
            <text:p text:style-name="P54"><text:span text:style-name="T208"><text:tab/> * <text:tab/><text:tab/><text:tab/></text:span><text:span text:style-name="T209">Excepció</text:span><text:span text:style-name="T208"> </text:span><text:span text:style-name="T209">en</text:span><text:span text:style-name="T208"> </text:span><text:span text:style-name="T209">cas</text:span><text:span text:style-name="T208"> </text:span><text:span text:style-name="T209">de</text:span><text:span text:style-name="T208"> </text:span><text:span text:style-name="T209">produir</text:span><text:span text:style-name="T211">-</text:span><text:span text:style-name="T209">se</text:span><text:span text:style-name="T208"> </text:span><text:span text:style-name="T209">una</text:span><text:span text:style-name="T208"> </text:span><text:span text:style-name="T209">excepció</text:span></text:p>
            <text:p text:style-name="P54"><text:span text:style-name="T208"><text:tab/> * </text:span><text:span text:style-name="T210">@param</text:span><text:span text:style-name="T208"> timeMs</text:span></text:p>
            <text:p text:style-name="P54"><text:span text:style-name="T208"><text:tab/> * <text:tab/><text:tab/><text:tab/></text:span><text:span text:style-name="T209">Temps</text:span><text:span text:style-name="T208"> </text:span><text:span text:style-name="T209">en</text:span><text:span text:style-name="T208"> </text:span><text:span text:style-name="T209">ms</text:span><text:span text:style-name="T208"> </text:span><text:span text:style-name="T209">transcorreguts</text:span><text:span text:style-name="T208"> </text:span><text:span text:style-name="T209">en</text:span><text:span text:style-name="T208"> </text:span><text:span text:style-name="T209">la</text:span><text:span text:style-name="T208"> </text:span><text:span text:style-name="T209">crida</text:span></text:p>
            <text:p text:style-name="P123"><text:tab/> */</text:p>
            <text:p text:style-name="P54"><text:span text:style-name="T60"><text:tab/></text:span><text:span text:style-name="T50">public</text:span><text:span text:style-name="T60"> </text:span><text:span text:style-name="T50">void</text:span><text:span text:style-name="T60"> event(String </text:span><text:span text:style-name="T93">metode</text:span><text:span text:style-name="T60">, Map&lt;String, String&gt; </text:span><text:span text:style-name="T93">parametres</text:span><text:span text:style-name="T60">, </text:span><text:span text:style-name="T50">boolean</text:span><text:span text:style-name="T60"> </text:span><text:span text:style-name="T93">correcte</text:span><text:span text:style-name="T60">, String </text:span><text:span text:style-name="T93">error</text:span><text:span text:style-name="T60">, Exception </text:span><text:span text:style-name="T93">e</text:span><text:span text:style-name="T60">, </text:span><text:span text:style-name="T50">long</text:span><text:span text:style-name="T60"> </text:span><text:span text:style-name="T93">timeMs</text:span><text:span text:style-name="T60">);</text:span></text:p>
            <text:p text:style-name="P173"/>
            <text:p text:style-name="P82">}</text:p>
          </table:table-cell>
        </table:table-row>
      </table:table>
      <text:p text:style-name="P70"/>
      <text:list text:continue-list="list112333029865201" text:style-name="Outline">
        <text:list-item>
          <text:list>
            <text:list-item>
              <text:list>
                <text:list-item>
                  <text:h text:style-name="P407" text:outline-level="3"><text:bookmark-start text:name="__RefHeading___Toc50908_2907556958"/><text:span text:style-name="T206">Ús de </text:span><text:span text:style-name="T237">B</text:span><text:span text:style-name="T238">ackofficeArxiuUtils</text:span><text:bookmark-end text:name="__RefHeading___Toc50908_2907556958"/></text:h>
                </text:list-item>
              </text:list>
            </text:list-item>
          </text:list>
        </text:list-item>
      </text:list>
      <text:p text:style-name="P125"><text:span text:style-name="T212">Per utilitzar la </text:span><text:span text:style-name="T239">classe</text:span><text:span text:style-name="T148"> BackofficeArxiuUtils</text:span><text:span text:style-name="T186"> amb les u</text:span><text:span text:style-name="T190">t</text:span><text:span text:style-name="T186">ilitats per l'A</text:span><text:span text:style-name="T188">r</text:span><text:span text:style-name="T186">xiu</text:span><text:span text:style-name="T138"> </text:span><text:span text:style-name="T212">s'ha de crear un objecte de la classe </text:span><text:span text:style-name="T138">BackofficeArxiuUtilsImpl</text:span><text:span text:style-name="T168"> amb la referència al plugin d'Arxiu </text:span><text:span text:style-name="T138">IPluginArxiu</text:span><text:span text:style-name="T168">, consultar el detall de l'anotació de registre mitjançant la llibreria del client de WS de DISTRIBUCIO </text:span><text:span text:style-name="T138">distribucio-ws-client</text:span><text:span text:style-name="T168"> i invocar el mètode </text:span><text:span text:style-name="T145">crearExpedientAmbAnotacioDeRegistre</text:span><text:span text:style-name="T138"> </text:span><text:span text:style-name="T169">amb la informació de l'expedient a crear o a modificar.</text:span><text:span text:style-name="T170">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83">passades com a paràmetres</text:span><text:span text:style-name="T170">.</text:span><text:span text:style-name="T169">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56"><text:span text:style-name="T169">A</text:span><text:span text:style-name="T161"> continuació es mostra el diagrama de classes pel resultat de la crida.</text:span></text:p>
      <text:p text:style-name="P71"><draw:frame draw:style-name="fr2" draw:name="Frame2" text:anchor-type="paragraph" svg:x="0cm" svg:y="0.153cm" svg:width="17cm" draw:z-index="54"><draw:text-box fo:min-height="9.454cm"><text:p text:style-name="Fig."><draw:frame draw:style-name="fr6" draw:name="Image3" text:anchor-type="as-char" svg:width="17cm" style:rel-width="100%" svg:height="9.454cm" style:rel-height="scale" draw:z-index="76"><draw:image xlink:href="Pictures/10000001000002A4000001786B260243.png" xlink:type="simple" xlink:show="embed" xlink:actuate="onLoad" draw:mime-type="image/png"/></draw:frame><text:span text:style-name="T230"><text:line-break/></text:span>Fig. <text:sequence text:ref-name="refFig.3" text:name="Fig." text:formula="ooow:Fig.+1" style:num-format="1">4</text:sequence>: Classes per contenir el resultat de la crida al mètode crearExpedientAmbAnotacioDeRegistre.</text:p></draw:text-box></draw:frame><text:soft-page-break/></text:p>
      <text:p text:style-name="P125"><text:span text:style-name="T184">S</text:span><text:span text:style-name="T185">i el mètode falla en la creació de l'expedient o el traspàs dels interessats llavors el resultat contindrà l'error i els annexos no s'hauran traspassat.</text:span></text:p>
      <text:p text:style-name="P125"><text:span text:style-name="T185">Quan es traspassin els diferents annexos s'anirà informant el resultat per cada annex. L'usuari de la llibreria podrà consultar el resultat a partir del seu identificador d'Arxiu uuid original a partir del mètode </text:span><text:span text:style-name="T147">ArxiuResultat.getResultatAnnex(String uuid) </text:span><text:span text:style-name="T185">i obtenir el nou per en l'objecte</text:span><text:span text:style-name="T147"> ArxiuResultatAnnex</text:span><text:span text:style-name="T185"> amb el mètode getIdentificador</text:span><text:span text:style-name="T147">()</text:span><text:span text:style-name="T185">. L'objecte de tipus </text:span><text:span text:style-name="T147">ArxiuResultatAnnex</text:span><text:span text:style-name="T185"> conté l'identificador de l'arxiu si s'ha mogut o existia, l'acció realitzada o la descripció de l'error en el cas que no s'hagi pogut moure. </text:span></text:p>
      <text:p text:style-name="P157"><text:span text:style-name="T180">L'aplicació </text:span><text:span text:style-name="T146">backoffice </text:span><text:span text:style-name="T180">ha d'implementar la seva lògica pròpia per incorporar la informació dels annexos en el seu propi sistema.</text:span></text:p>
      <text:list text:continue-numbering="true" text:style-name="Outline">
        <text:list-item>
          <text:list>
            <text:list-item>
              <text:list>
                <text:list-item>
                  <text:h text:style-name="P407" text:outline-level="3"><text:bookmark-start text:name="__RefHeading___Toc50910_2907556958"/>Exemple Java<text:bookmark-end text:name="__RefHeading___Toc50910_2907556958"/></text:h>
                </text:list-item>
              </text:list>
            </text:list-item>
          </text:list>
        </text:list-item>
      </text:list>
      <text:p text:style-name="P158">En el següent exemple de codi es mostra una im<text:span text:style-name="T368">p</text:span>lementació del WS <text:span text:style-name="T213">de backoffice de DISTRIBUCIO que rep peticions d'anotacions pendents des de DISTRIBUCIO i les processa amb la llibreria d'utilitats. El codi sencer es pot consultar a l' </text:span><text:span text:style-name="T213"><text:bookmark-ref text:reference-format="text" text:ref-name="__RefHeading___Toc60796_1326387233">Annex II: Exemple d'ús de la llibreria de distribucio-backoffice-utils</text:bookmark-ref></text:span><text:span text:style-name="T213">.</text:span></text:p>
      <text:p text:style-name="P159">La classe per a l'exemple és la implementació del WS que rep<text:span text:style-name="T214"> anotacions pendents de registre i té una referència al client del WS d'integració de DISTRIBUCIO per consultar anotacions i una instància del plugin de l'API de l'Arxiu.</text:span></text:p>
      <text:p text:style-name="P28">taula.<text:span text:style-name="T215"> Classe de proves per rebre peticions de WS en el mètode </text:span><text:span text:style-name="T156">comunicarAnotacionsPendents</text:span><text:span text:style-name="T215">.</text:span></text:p>
      <table:table table:name="Table5" table:style-name="Table5">
        <table:table-column table:style-name="Table5.A"/>
        <text:soft-page-break/>
        <table:table-row>
          <table:table-cell table:style-name="Table5.A1" office:value-type="string">
            <text:p text:style-name="P425"><text:span text:style-name="T356">import </text:span><text:span text:style-name="T78">es.caib.distribucio.logic.intf.service.ws.backoffice.AnotacioRegistreId;</text:span></text:p>
            <text:p text:style-name="P424"><text:span text:style-name="T373"/></text:p>
            <text:p text:style-name="P424"><text:span text:style-name="T373">@</text:span><text:span text:style-name="T374">Controller</text:span><text:span text:style-name="T378"><text:line-break/></text:span><text:span text:style-name="T373">@RequestMapping</text:span><text:span text:style-name="T77">(</text:span><text:span text:style-name="T366">"/public/backoffice"</text:span><text:span text:style-name="T77">)</text:span><text:span text:style-name="T378"><text:line-break/></text:span><text:span text:style-name="T355">public class </text:span><text:span text:style-name="T77">BackofficeRestController</text:span><text:span text:style-name="T359"> </text:span><text:span text:style-name="T355">extends </text:span><text:span text:style-name="T77">BaseUserController</text:span><text:span text:style-name="T359"> </text:span><text:span text:style-name="T77">{</text:span><text:span text:style-name="T359"><text:line-break/><text:tab/></text:span><text:span text:style-name="T373"><text:line-break/><text:tab/></text:span><text:span text:style-name="T77">BackofficeWsService</text:span><text:span text:style-name="T359"> </text:span><text:span text:style-name="T362">backofficeWs</text:span><text:span text:style-name="T359">;<text:line-break/><text:line-break/><text:tab/></text:span><text:span text:style-name="T373">@RequestMapping</text:span><text:span text:style-name="T77">(value = </text:span><text:span text:style-name="T366">"/comunicarAnotacionsPendents"</text:span><text:span text:style-name="T77">, method =</text:span><text:span text:style-name="T359"> </text:span><text:span text:style-name="T77">RequestMethod.</text:span><text:span text:style-name="T364">POST</text:span><text:span text:style-name="T77">)</text:span><text:span text:style-name="T359"><text:line-break/><text:tab/></text:span><text:span text:style-name="T373">@ResponseBody<text:line-break/><text:tab/></text:span><text:span text:style-name="T355">public </text:span><text:span text:style-name="T77">ResponseEntity&lt;Object&gt;</text:span><text:span text:style-name="T359"> </text:span><text:span text:style-name="T380">comunicarAnotacionsPendents</text:span><text:span text:style-name="T77">(<text:tab/><text:tab/><text:tab/><text:line-break/><text:tab/><text:tab/><text:tab/>HttpServletRequest request,</text:span><text:span text:style-name="T359"><text:line-break/><text:tab/><text:tab/><text:tab/></text:span><text:span text:style-name="T373">@RequestBody</text:span><text:span text:style-name="T77">(required = </text:span><text:span text:style-name="T355">true</text:span><text:span text:style-name="T77">) List&lt;AnotacioRegistreId&gt; ids) {</text:span><text:span text:style-name="T359"><text:line-break/><text:tab/><text:tab/></text:span><text:span text:style-name="T77">...</text:span><text:span text:style-name="T359"><text:line-break/></text:span><text:span text:style-name="T77"><text:tab/>}<text:line-break/>}</text:span></text:p>
          </table:table-cell>
        </table:table-row>
      </table:table>
      <text:p text:style-name="P159"/>
      <text:p text:style-name="P125"><text:span text:style-name="T214">Dins del mètode </text:span><text:span text:style-name="T157">comunicarAnotacionsPendents</text:span><text:span text:style-name="T198"> instancia el client del WS d'integració amb el Backoffice i el plugin de l'API de l'Arxiu</text:span><text:span text:style-name="T200"> i consulta l'anotació del registre d'entrada. En la següent porció de codi es pot veure com es crea l'objecte per a la llibreria d'utilitats del backoffice amb la referència al plugin d'Arxiu.</text:span></text:p>
      <text:p text:style-name="P28"><text:span text:style-name="T180">taula.</text:span><text:span text:style-name="T199"> Creació de l'objecte passant l'API d'Arxiu al constructor.</text:span></text:p>
      <table:table table:name="Table6" table:style-name="Table6">
        <table:table-column table:style-name="Table6.A"/>
        <table:table-row>
          <table:table-cell table:style-name="Table6.A1" office:value-type="string">
            <text:p text:style-name="P114"><text:span text:style-name="T223">// </text:span><text:span text:style-name="T224">Prepara</text:span><text:span text:style-name="T223"> </text:span><text:span text:style-name="T224">la</text:span><text:span text:style-name="T223"> </text:span><text:span text:style-name="T224">cria</text:span><text:span text:style-name="T223"> a </text:span><text:span text:style-name="T224">la</text:span><text:span text:style-name="T223"> </text:span><text:span text:style-name="T224">llibreria</text:span><text:span text:style-name="T223"> d'utilitats </text:span><text:span text:style-name="T224">pel</text:span><text:span text:style-name="T223"> </text:span><text:span text:style-name="T224">backoffice</text:span><text:span text:style-name="T223"> </text:span><text:span text:style-name="T224">de</text:span><text:span text:style-name="T223"> DISTRIBUCIO</text:span></text:p>
            <text:p text:style-name="P115"><text:span text:style-name="T223">// Constructor </text:span><text:span text:style-name="T224">amb</text:span><text:span text:style-name="T223"> </text:span><text:span text:style-name="T224">la</text:span><text:span text:style-name="T223"> </text:span><text:span text:style-name="T224">referència</text:span><text:span text:style-name="T223"> </text:span><text:span text:style-name="T224">al</text:span><text:span text:style-name="T223"> </text:span><text:span text:style-name="T224">plugin</text:span><text:span text:style-name="T223"> d'Arxiu</text:span></text:p>
            <text:p text:style-name="P115"><text:span text:style-name="T59">BackofficeArxiuUtils </text:span><text:span text:style-name="T92">backoffice</text:span><text:span text:style-name="T99">Arxiu</text:span><text:span text:style-name="T92">Utils</text:span><text:span text:style-name="T59"> = </text:span><text:span text:style-name="T49">new</text:span><text:span text:style-name="T59"> BackofficeArxiuUtilsImpl(getArxiuPlugin());</text:span></text:p>
          </table:table-cell>
        </table:table-row>
      </table:table>
      <text:p text:style-name="P78"/>
      <text:p text:style-name="P77">La llibreria permet fixar el nom de la carpeta on es guardaran els annexos i un objecte de tipus <text:span text:style-name="T133">ArxiuPluginListener</text:span> si es volen rebre notificacions cada cop que es realitzi una acció d'integració amb l'Arxiu. </text:p>
      <text:p text:style-name="P77"/>
      <text:p text:style-name="P125"><text:span text:style-name="T202">taula.</text:span><text:span text:style-name="T200"> Propietat per fixar el nom de la carpeta i l'objecte </text:span><text:span text:style-name="T159">ArxiuPluginListener</text:span><text:span text:style-name="T200">.</text:span></text:p>
      <table:table table:name="Table7" table:style-name="Table7">
        <table:table-column table:style-name="Table7.A"/>
        <table:table-row>
          <table:table-cell table:style-name="Table7.A1" office:value-type="string">
            <text:p text:style-name="P115"><text:span text:style-name="T223">// </text:span><text:span text:style-name="T224">Afegeix</text:span><text:span text:style-name="T223"> </text:span><text:span text:style-name="T224">la</text:span><text:span text:style-name="T223"> </text:span><text:span text:style-name="T224">instància</text:span><text:span text:style-name="T223"> </text:span><text:span text:style-name="T224">de</text:span><text:span text:style-name="T223"> </text:span><text:span text:style-name="T224">la</text:span><text:span text:style-name="T223"> </text:span><text:span text:style-name="T224">classe</text:span><text:span text:style-name="T223"> </text:span><text:span text:style-name="T224">com</text:span><text:span text:style-name="T223"> a </text:span><text:span text:style-name="T224">escoltador</text:span><text:span text:style-name="T223"> d'events</text:span></text:p>
            <text:p text:style-name="P115"><text:span text:style-name="T92">backofficeArxiuUtils</text:span><text:span text:style-name="T59">.setArxiuPluginListener(</text:span><text:span text:style-name="T49">this</text:span><text:span text:style-name="T59">);</text:span></text:p>
            <text:p text:style-name="P115"><text:span text:style-name="T223">// </text:span><text:span text:style-name="T224">Estableix</text:span><text:span text:style-name="T223"> </text:span><text:span text:style-name="T224">la</text:span><text:span text:style-name="T223"> </text:span><text:span text:style-name="T224">carpeta</text:span><text:span text:style-name="T223"> on </text:span><text:span text:style-name="T224">guardar</text:span><text:span text:style-name="T223"> els </text:span><text:span text:style-name="T224">annexos</text:span><text:span text:style-name="T223"> </text:span><text:span text:style-name="T224">de</text:span><text:span text:style-name="T223"> l'anotació</text:span></text:p>
            <text:p text:style-name="P114"><text:span text:style-name="T92">backoffice</text:span><text:span text:style-name="T99">Arxiu</text:span><text:span text:style-name="T92">Utils</text:span><text:span text:style-name="T59">.setCarpeta(</text:span><text:span text:style-name="T94">anotacio</text:span><text:span text:style-name="T59">.getIdentificador());</text:span></text:p>
          </table:table-cell>
        </table:table-row>
      </table:table>
      <text:p text:style-name="P78"/>
      <text:p text:style-name="P161"><text:span text:style-name="T199">En el cas de l'exemple, la classe que implementa </text:span><text:span text:style-name="T201">la interfície </text:span><text:span text:style-name="T160">ArxiuPluginListener</text:span><text:span text:style-name="T201"> amb el mètode </text:span><text:span text:style-name="T160">event</text:span><text:span text:style-name="T201"> per obtenir la informació de la crida al plugin de l'API de l'Arxiu.</text:span></text:p>
      <table:table table:name="Table8" table:style-name="Table8">
        <table:table-column table:style-name="Table8.A"/>
        <table:table-row>
          <table:table-cell table:style-name="Table8.A1" office:value-type="string">
            <text:p text:style-name="P111"><text:span text:style-name="T51">public</text:span><text:span text:style-name="T59"> </text:span><text:span text:style-name="T51">class</text:span><text:span text:style-name="T59"> BackofficeWsServiceImpl </text:span><text:span text:style-name="T51">implements</text:span><text:span text:style-name="T59"> </text:span><text:span text:style-name="T66">ArxiuPluginListener</text:span><text:span text:style-name="T59"> {</text:span></text:p>
            <text:p text:style-name="P88">...</text:p>
            <text:p text:style-name="P121"><text:tab/> /** Mètode que la llibreria del backoffice de distribució crida si es </text:p>
            <text:p text:style-name="P116"><text:span text:style-name="T207"><text:tab/> fixa una instància que implementa </text:span><text:span text:style-name="T228">{@link ArxiuPluginListener}</text:span><text:span text:style-name="T207">.</text:span></text:p>
            <text:p text:style-name="P122"><text:tab/> * </text:p>
            <text:p text:style-name="P122"><text:tab/> */</text:p>
            <text:p text:style-name="P112"><text:span text:style-name="T59"><text:tab/></text:span><text:span text:style-name="T115">@Override</text:span></text:p>
            <text:p text:style-name="P112"><text:span text:style-name="T59"><text:tab/></text:span><text:span text:style-name="T51">public</text:span><text:span text:style-name="T59"> </text:span><text:span text:style-name="T51">void</text:span><text:span text:style-name="T59"> </text:span><text:span text:style-name="T65">event</text:span><text:span text:style-name="T59">(</text:span></text:p>
            <text:p text:style-name="P112"><text:span text:style-name="T59"><text:tab/><text:tab/><text:tab/>String </text:span><text:span text:style-name="T92">metode</text:span><text:span text:style-name="T59">, </text:span></text:p>
            <text:p text:style-name="P112"><text:span text:style-name="T59"><text:tab/><text:tab/><text:tab/>Map&lt;String, String&gt; </text:span><text:span text:style-name="T92">parametres</text:span><text:span text:style-name="T59">, </text:span></text:p>
            <text:p text:style-name="P112"><text:span text:style-name="T59"><text:tab/><text:tab/><text:tab/></text:span><text:span text:style-name="T51">boolean</text:span><text:span text:style-name="T59"> </text:span><text:span text:style-name="T92">correcte</text:span><text:span text:style-name="T59">, </text:span></text:p>
            <text:p text:style-name="P112"><text:soft-page-break/><text:span text:style-name="T59"><text:tab/><text:tab/><text:tab/>String </text:span><text:span text:style-name="T92">error</text:span><text:span text:style-name="T59">, </text:span></text:p>
            <text:p text:style-name="P112"><text:span text:style-name="T59"><text:tab/><text:tab/><text:tab/>Exception </text:span><text:span text:style-name="T92">e</text:span><text:span text:style-name="T59">,</text:span></text:p>
            <text:p text:style-name="P112"><text:span text:style-name="T59"><text:tab/><text:tab/><text:tab/></text:span><text:span text:style-name="T51">long</text:span><text:span text:style-name="T59"> </text:span><text:span text:style-name="T92">timeMs</text:span><text:span text:style-name="T59">) {</text:span></text:p>
            <text:p text:style-name="P112"><text:span text:style-name="T59"><text:tab/><text:tab/>StringBuilder </text:span><text:span text:style-name="T92">str</text:span><text:span text:style-name="T59"> = </text:span><text:span text:style-name="T51">new</text:span><text:span text:style-name="T59"> StringBuilder()</text:span></text:p>
            <text:p text:style-name="P112"><text:span text:style-name="T59"><text:tab/><text:tab/><text:tab/><text:tab/>.append(</text:span><text:span text:style-name="T36">"S'ha invocat el mètode \""</text:span><text:span text:style-name="T59">)</text:span></text:p>
            <text:p text:style-name="P112"><text:span text:style-name="T59"><text:tab/><text:tab/><text:tab/><text:tab/>.append(</text:span><text:span text:style-name="T92">metode</text:span><text:span text:style-name="T59">)</text:span></text:p>
            <text:p text:style-name="P112"><text:span text:style-name="T59"><text:tab/><text:tab/><text:tab/><text:tab/>.append(</text:span><text:span text:style-name="T36">"\" amb els paràmetres {"</text:span><text:span text:style-name="T59">);</text:span></text:p>
            <text:p text:style-name="P112"><text:span text:style-name="T59"><text:tab/><text:tab/></text:span><text:span text:style-name="T51">int</text:span><text:span text:style-name="T59"> </text:span><text:span text:style-name="T92">i</text:span><text:span text:style-name="T59"> = 0;</text:span></text:p>
            <text:p text:style-name="P112"><text:span text:style-name="T59"><text:tab/><text:tab/></text:span><text:span text:style-name="T51">for</text:span><text:span text:style-name="T59"> (String </text:span><text:span text:style-name="T92">key</text:span><text:span text:style-name="T59"> : </text:span><text:span text:style-name="T92">parametres</text:span><text:span text:style-name="T59">.keySet()) {</text:span></text:p>
            <text:p text:style-name="P112"><text:span text:style-name="T59"><text:tab/><text:tab/><text:tab/></text:span><text:span text:style-name="T92">str</text:span><text:span text:style-name="T59">.append(</text:span><text:span text:style-name="T92">key</text:span><text:span text:style-name="T59">).append(</text:span><text:span text:style-name="T36">"="</text:span><text:span text:style-name="T59">).append(</text:span><text:span text:style-name="T92">parametres</text:span><text:span text:style-name="T59">.get(</text:span><text:span text:style-name="T92">key</text:span><text:span text:style-name="T59">));</text:span></text:p>
            <text:p text:style-name="P112"><text:span text:style-name="T59"><text:tab/><text:tab/><text:tab/></text:span><text:span text:style-name="T92">i</text:span><text:span text:style-name="T59">++;</text:span></text:p>
            <text:p text:style-name="P112"><text:span text:style-name="T59"><text:tab/><text:tab/><text:tab/></text:span><text:span text:style-name="T51">if</text:span><text:span text:style-name="T59"> (</text:span><text:span text:style-name="T92">i</text:span><text:span text:style-name="T59">&lt;</text:span><text:span text:style-name="T92">parametres</text:span><text:span text:style-name="T59">.size())</text:span></text:p>
            <text:p text:style-name="P112"><text:span text:style-name="T59"><text:tab/><text:tab/><text:tab/><text:tab/></text:span><text:span text:style-name="T92">str</text:span><text:span text:style-name="T59">.append(</text:span><text:span text:style-name="T36">", "</text:span><text:span text:style-name="T59">);</text:span></text:p>
            <text:p text:style-name="P90"><text:tab/><text:tab/>}</text:p>
            <text:p text:style-name="P112"><text:span text:style-name="T59"><text:tab/><text:tab/></text:span><text:span text:style-name="T92">str</text:span><text:span text:style-name="T59">.append(</text:span><text:span text:style-name="T36">"} amb resultat "</text:span><text:span text:style-name="T59">).append(</text:span><text:span text:style-name="T92">correcte</text:span><text:span text:style-name="T59"> ? </text:span><text:span text:style-name="T36">"OK"</text:span><text:span text:style-name="T59"> : </text:span><text:span text:style-name="T36">"KO"</text:span><text:span text:style-name="T59">);</text:span></text:p>
            <text:p text:style-name="P112"><text:span text:style-name="T59"><text:tab/><text:tab/></text:span><text:span text:style-name="T51">if</text:span><text:span text:style-name="T59"> (</text:span><text:span text:style-name="T92">error</text:span><text:span text:style-name="T59"> != </text:span><text:span text:style-name="T51">null</text:span><text:span text:style-name="T59">)</text:span></text:p>
            <text:p text:style-name="P112"><text:span text:style-name="T59"><text:tab/><text:tab/><text:tab/></text:span><text:span text:style-name="T92">str</text:span><text:span text:style-name="T59">.append(</text:span><text:span text:style-name="T36">": "</text:span><text:span text:style-name="T59">).append(</text:span><text:span text:style-name="T92">error</text:span><text:span text:style-name="T59">);</text:span></text:p>
            <text:p text:style-name="P112"><text:span text:style-name="T59"><text:tab/><text:tab/></text:span><text:span text:style-name="T51">if</text:span><text:span text:style-name="T59"> (</text:span><text:span text:style-name="T92">e</text:span><text:span text:style-name="T59"> != </text:span><text:span text:style-name="T51">null</text:span><text:span text:style-name="T59">)</text:span></text:p>
            <text:p text:style-name="P112"><text:span text:style-name="T59"><text:tab/><text:tab/><text:tab/></text:span><text:span text:style-name="T92">str</text:span><text:span text:style-name="T59">.append(</text:span><text:span text:style-name="T36">" "</text:span><text:span text:style-name="T59">).append(</text:span><text:span text:style-name="T92">e</text:span><text:span text:style-name="T59">.getClass()).append(</text:span><text:span text:style-name="T36">" "</text:span><text:span text:style-name="T59">).append(</text:span><text:span text:style-name="T92">e</text:span><text:span text:style-name="T59">.getMessage());</text:span></text:p>
            <text:p text:style-name="P112"><text:span text:style-name="T59"><text:tab/><text:tab/></text:span><text:span text:style-name="T92">str</text:span><text:span text:style-name="T59">.append(</text:span><text:span text:style-name="T36">" "</text:span><text:span text:style-name="T59">).append(</text:span><text:span text:style-name="T92">timeMs</text:span><text:span text:style-name="T59">).append(</text:span><text:span text:style-name="T36">"ms"</text:span><text:span text:style-name="T59">);</text:span></text:p>
            <text:p text:style-name="P90"><text:tab/><text:tab/></text:p>
            <text:p text:style-name="P112"><text:span text:style-name="T59"><text:tab/><text:tab/></text:span><text:span text:style-name="T87">logger</text:span><text:span text:style-name="T59">.debug(</text:span><text:span text:style-name="T92">str</text:span><text:span text:style-name="T59">.toString());</text:span></text:p>
            <text:p text:style-name="P88"><text:tab/>}</text:p>
            <text:p text:style-name="P88">...</text:p>
            <text:p text:style-name="P88">}</text:p>
          </table:table-cell>
        </table:table-row>
      </table:table>
      <text:p text:style-name="P79"/>
      <text:p text:style-name="P162"><text:span text:style-name="T201">E</text:span><text:span text:style-name="T199">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9"><text:span text:style-name="T180">taula.</text:span><text:span text:style-name="T199"> Crida al mètode </text:span><text:span text:style-name="T158">crearExpedientAmbAnotacioRegistre</text:span><text:span text:style-name="T199">.</text:span></text:p>
      <table:table table:name="Table9" table:style-name="Table9">
        <table:table-column table:style-name="Table9.A"/>
        <table:table-row>
          <table:table-cell table:style-name="Table9.A1" office:value-type="string">
            <text:p text:style-name="P111"><text:span text:style-name="T223">/</text:span><text:span text:style-name="T225">/ Crida a la creació de l'expedient</text:span></text:p>
            <text:p text:style-name="P119"><text:span text:style-name="T59">String </text:span><text:span text:style-name="T92">SERIE_DOCUMENTAL</text:span><text:span text:style-name="T59"> = </text:span><text:span text:style-name="T36">"S0002"</text:span><text:span text:style-name="T59">; </text:span></text:p>
            <text:p text:style-name="P119"><text:span text:style-name="T59">String </text:span><text:span text:style-name="T92">CLASSIFICACIO</text:span><text:span text:style-name="T59"> = </text:span><text:span text:style-name="T36">"000000"</text:span><text:span text:style-name="T59">;</text:span></text:p>
            <text:p text:style-name="P119"><text:span text:style-name="T59">ArxiuResultat </text:span><text:span text:style-name="T92">arxiuResultat</text:span><text:span text:style-name="T59">;</text:span></text:p>
            <text:p text:style-name="P119"><text:span text:style-name="T51">int</text:span><text:span text:style-name="T59"> </text:span><text:span text:style-name="T92">intent</text:span><text:span text:style-name="T59"> = 0;</text:span></text:p>
            <text:p text:style-name="P119"><text:span text:style-name="T59">String </text:span><text:span text:style-name="T92">expedientUuid</text:span><text:span text:style-name="T59"> = </text:span><text:span text:style-name="T51">null</text:span><text:span text:style-name="T59">;</text:span></text:p>
            <text:p text:style-name="P119"><text:span text:style-name="T51">do</text:span><text:span text:style-name="T59"> {</text:span></text:p>
            <text:p text:style-name="P119"><text:span text:style-name="T59"><text:tab/></text:span><text:span text:style-name="T223">// Crida al mètode de creació de la llibreria</text:span></text:p>
            <text:p text:style-name="P119"><text:span text:style-name="T59"><text:tab/></text:span><text:span text:style-name="T92">arxiuResultat</text:span><text:span text:style-name="T59"> = </text:span><text:span text:style-name="T92">BackofficeArxiuUtils</text:span><text:span text:style-name="T59">.crearExpedientAmbAnotacioRegistre(</text:span></text:p>
            <text:p text:style-name="P119"><text:span text:style-name="T59"><text:tab/><text:tab/><text:tab/><text:tab/><text:tab/><text:tab/><text:tab/><text:tab/></text:span><text:span text:style-name="T92">expedientUuid</text:span><text:span text:style-name="T59">,</text:span></text:p>
            <text:p text:style-name="P119"><text:span text:style-name="T59"><text:tab/><text:tab/><text:tab/><text:tab/><text:tab/><text:tab/><text:tab/><text:tab/></text:span><text:span text:style-name="T92">anotacio</text:span><text:span text:style-name="T59">.getIdentificador(),</text:span></text:p>
            <text:p text:style-name="P119"><text:span text:style-name="T59"><text:tab/><text:tab/><text:tab/><text:tab/><text:tab/><text:tab/><text:tab/><text:tab/></text:span><text:span text:style-name="T51">null</text:span><text:span text:style-name="T59">,</text:span></text:p>
            <text:p text:style-name="P119"><text:span text:style-name="T59"><text:tab/><text:tab/><text:tab/><text:tab/><text:tab/><text:tab/><text:tab/><text:tab/>Arrays.</text:span><text:span text:style-name="T67">asList</text:span><text:span text:style-name="T59">(</text:span><text:span text:style-name="T36">"A04019281"</text:span><text:span text:style-name="T59">),</text:span></text:p>
            <text:p text:style-name="P119"><text:span text:style-name="T59"><text:tab/><text:tab/><text:tab/><text:tab/><text:tab/><text:tab/><text:tab/><text:tab/></text:span><text:span text:style-name="T51">new</text:span><text:span text:style-name="T59"> Date(),</text:span></text:p>
            <text:p text:style-name="P119"><text:span text:style-name="T59"><text:tab/><text:tab/><text:tab/><text:tab/><text:tab/><text:tab/><text:tab/><text:tab/></text:span><text:span text:style-name="T92">CLASSIFICACIO</text:span><text:span text:style-name="T59">,</text:span></text:p>
            <text:p text:style-name="P119"><text:span text:style-name="T59"><text:tab/><text:tab/><text:tab/><text:tab/><text:tab/><text:tab/><text:tab/><text:tab/>ExpedientEstatEnumDto.</text:span><text:span text:style-name="T87">OBERT</text:span><text:span text:style-name="T59">,</text:span></text:p>
            <text:p text:style-name="P119"><text:span text:style-name="T59"><text:tab/><text:tab/><text:tab/><text:tab/><text:tab/><text:tab/><text:tab/><text:tab/></text:span><text:span text:style-name="T92">SERIE_DOCUMENTAL</text:span><text:span text:style-name="T59">,</text:span></text:p>
            <text:p text:style-name="P119"><text:span text:style-name="T59"><text:tab/><text:tab/><text:tab/><text:tab/><text:tab/><text:tab/><text:tab/><text:tab/></text:span><text:span text:style-name="T92">anotacio</text:span><text:span text:style-name="T59">);</text:span></text:p>
            <text:p text:style-name="P119"><text:span text:style-name="T59"><text:tab/></text:span><text:span text:style-name="T92">expedientUuid</text:span><text:span text:style-name="T59"> = </text:span><text:span text:style-name="T92">arxiuResultat</text:span><text:span text:style-name="T59">.getIdentificadorExpedient();</text:span></text:p>
            <text:p text:style-name="P119"><text:span text:style-name="T59"><text:tab/></text:span><text:span text:style-name="T223">// Imprimeix el resultat per pantalla</text:span></text:p>
            <text:p text:style-name="P119"><text:span text:style-name="T59"><text:tab/></text:span><text:span text:style-name="T51">this</text:span><text:span text:style-name="T59">.logResultat(</text:span></text:p>
            <text:p text:style-name="P119"><text:span text:style-name="T59"><text:tab/><text:tab/><text:tab/></text:span><text:span text:style-name="T36">"Resultat de la crida "</text:span><text:span text:style-name="T59"> + </text:span><text:span text:style-name="T92">intent</text:span><text:span text:style-name="T59">++ + </text:span><text:span text:style-name="T36">" crearExpedientAmbAnotacioRegistre per l'expedient"</text:span><text:span text:style-name="T59"> + </text:span><text:span text:style-name="T92">anotacio</text:span><text:span text:style-name="T59">.getExpedientNumero(),</text:span></text:p>
            <text:p text:style-name="P119"><text:span text:style-name="T59"><text:tab/><text:tab/><text:tab/></text:span><text:span text:style-name="T92">arxiuResultat</text:span><text:span text:style-name="T59">);<text:tab/><text:tab/><text:tab/><text:tab/><text:tab/></text:span></text:p>
            <text:p text:style-name="P42"><text:span text:style-name="T68">} </text:span><text:span text:style-name="T52">while</text:span><text:span text:style-name="T68">(</text:span><text:span text:style-name="T95">arxiuResultat</text:span><text:span text:style-name="T68">.getErrorCodi() !=</text:span><text:span text:style-name="T69"> Distri</text:span><text:span text:style-name="T70">bucioArxiuError.</text:span><text:span text:style-name="T88">NO_ERROR</text:span><text:span text:style-name="T70"> &amp;&amp; </text:span><text:span text:style-name="T97">in</text:span><text:span text:style-name="T98">tent</text:span><text:span text:style-name="T71"> &lt; 10);<text:tab/></text:span></text:p>
          </table:table-cell>
        </table:table-row>
      </table:table>
      <text:p text:style-name="P80"/>
      <text:p text:style-name="P162"><text:span text:style-name="T199">A mode informatiu a l'exemple s'imprimeix als logs el contingut de l'objecte </text:span><text:span text:style-name="T158">arxiuResultat</text:span><text:span text:style-name="T199"> amb el mètode </text:span><text:span text:style-name="T158">logResultat</text:span><text:span text:style-name="T199">.</text:span></text:p>
      <table:table table:name="Table10" table:style-name="Table10">
        <table:table-column table:style-name="Table10.A"/>
        <table:table-row>
          <table:table-cell table:style-name="Table10.A1" office:value-type="string">
            <text:p text:style-name="P117"><text:span text:style-name="T51">private</text:span><text:span text:style-name="T59"> </text:span><text:span text:style-name="T51">void</text:span><text:span text:style-name="T59"> </text:span><text:span text:style-name="T65">logResultat</text:span><text:span text:style-name="T59">(String </text:span><text:span text:style-name="T92">descripcio</text:span><text:span text:style-name="T59">, ArxiuResultat </text:span><text:span text:style-name="T92">arxiuResultat</text:span><text:span text:style-name="T59">) {</text:span></text:p>
            <text:p text:style-name="P119"><text:span text:style-name="T59"><text:tab/></text:span><text:span text:style-name="T87">logger</text:span><text:span text:style-name="T59">.debug(</text:span><text:span text:style-name="T92">descripcio</text:span><text:span text:style-name="T59">);</text:span></text:p>
            <text:p text:style-name="P119"><text:soft-page-break/><text:span text:style-name="T59"><text:tab/></text:span><text:span text:style-name="T223">// Resultat a nivell d'expedient</text:span></text:p>
            <text:p text:style-name="P119"><text:span text:style-name="T59"><text:tab/></text:span><text:span text:style-name="T87">logger</text:span><text:span text:style-name="T59">.debug(</text:span><text:span text:style-name="T36">"- uuid: "</text:span><text:span text:style-name="T59"> + </text:span><text:span text:style-name="T92">arxiuResultat</text:span><text:span text:style-name="T59">.getIdentificadorExpedient());</text:span></text:p>
            <text:p text:style-name="P119"><text:span text:style-name="T59"><text:tab/></text:span><text:span text:style-name="T87">logger</text:span><text:span text:style-name="T59">.debug(</text:span><text:span text:style-name="T36">"- accio: "</text:span><text:span text:style-name="T59"> + </text:span><text:span text:style-name="T92">arxiuResultat</text:span><text:span text:style-name="T59">.getAccio());</text:span></text:p>
            <text:p text:style-name="P119"><text:span text:style-name="T59"><text:tab/></text:span><text:span text:style-name="T87">logger</text:span><text:span text:style-name="T59">.debug(</text:span><text:span text:style-name="T36">"- errorCodi: "</text:span><text:span text:style-name="T59"> + </text:span><text:span text:style-name="T92">arxiuResultat</text:span><text:span text:style-name="T59">.getErrorCodi());</text:span></text:p>
            <text:p text:style-name="P119"><text:span text:style-name="T59"><text:tab/></text:span><text:span text:style-name="T87">logger</text:span><text:span text:style-name="T59">.debug(</text:span><text:span text:style-name="T36">"- errorMessage: "</text:span><text:span text:style-name="T59"> + </text:span><text:span text:style-name="T92">arxiuResultat</text:span><text:span text:style-name="T59">.getErrorMessage());</text:span></text:p>
            <text:p text:style-name="P119"><text:span text:style-name="T59"><text:tab/></text:span><text:span text:style-name="T87">logger</text:span><text:span text:style-name="T59">.debug(</text:span><text:span text:style-name="T36">"- excepcio: "</text:span><text:span text:style-name="T59"> + (</text:span><text:span text:style-name="T92">arxiuResultat</text:span><text:span text:style-name="T59">.getException() != </text:span><text:span text:style-name="T51">null</text:span><text:span text:style-name="T59">? </text:span><text:span text:style-name="T92">arxiuResultat</text:span><text:span text:style-name="T59">.getException().getClass() + </text:span><text:span text:style-name="T36">" "</text:span><text:span text:style-name="T59"> + </text:span><text:span text:style-name="T92">arxiuResultat</text:span><text:span text:style-name="T59">.getException().getMessage() : <text:s/></text:span><text:span text:style-name="T36">" - "</text:span><text:span text:style-name="T59">));</text:span></text:p>
            <text:p text:style-name="P175"/>
            <text:p text:style-name="P119"><text:span text:style-name="T59"><text:tab/></text:span><text:span text:style-name="T223">// Resultat pels annexos</text:span></text:p>
            <text:p text:style-name="P119"><text:span text:style-name="T59"><text:tab/>List&lt;ArxiuResultatAnnex&gt; </text:span><text:span text:style-name="T92">resultatAnnexos</text:span><text:span text:style-name="T59"> = </text:span><text:span text:style-name="T92">arxiuResultat</text:span><text:span text:style-name="T59">.getResultatAnnexos(); </text:span></text:p>
            <text:p text:style-name="P119"><text:span text:style-name="T59"><text:tab/></text:span><text:span text:style-name="T87">logger</text:span><text:span text:style-name="T59">.debug(</text:span><text:span text:style-name="T36">" - Resultat dels "</text:span><text:span text:style-name="T59"> + </text:span><text:span text:style-name="T92">resultatAnnexos</text:span><text:span text:style-name="T59">.size() + </text:span><text:span text:style-name="T36">" annexos:"</text:span><text:span text:style-name="T59">);</text:span></text:p>
            <text:p text:style-name="P119"><text:span text:style-name="T59"><text:tab/></text:span><text:span text:style-name="T51">for</text:span><text:span text:style-name="T59"> (ArxiuResultatAnnex </text:span><text:span text:style-name="T92">resultatAnnex</text:span><text:span text:style-name="T59"> : </text:span><text:span text:style-name="T92">resultatAnnexos</text:span><text:span text:style-name="T59">) {</text:span></text:p>
            <text:p text:style-name="P119"><text:span text:style-name="T59"><text:tab/><text:tab/></text:span><text:span text:style-name="T87">logger</text:span><text:span text:style-name="T59">.debug(</text:span><text:span text:style-name="T36">"\b- uuid: "</text:span><text:span text:style-name="T59"> + </text:span><text:span text:style-name="T92">resultatAnnex</text:span><text:span text:style-name="T59">.getIdentificadorAnnex());</text:span></text:p>
            <text:p text:style-name="P119"><text:span text:style-name="T59"><text:tab/><text:tab/></text:span><text:span text:style-name="T87">logger</text:span><text:span text:style-name="T59">.debug(</text:span><text:span text:style-name="T36">"\\b- accio: "</text:span><text:span text:style-name="T59"> + </text:span><text:span text:style-name="T92">resultatAnnex</text:span><text:span text:style-name="T59">.getAccio());</text:span></text:p>
            <text:p text:style-name="P119"><text:span text:style-name="T59"><text:tab/><text:tab/></text:span><text:span text:style-name="T87">logger</text:span><text:span text:style-name="T59">.debug(</text:span><text:span text:style-name="T36">"\\b- errorCodi: "</text:span><text:span text:style-name="T59"> + </text:span><text:span text:style-name="T92">resultatAnnex</text:span><text:span text:style-name="T59">.getErrorCodi());</text:span></text:p>
            <text:p text:style-name="P119"><text:span text:style-name="T59"><text:tab/><text:tab/></text:span><text:span text:style-name="T87">logger</text:span><text:span text:style-name="T59">.debug(</text:span><text:span text:style-name="T36">"\\b- errorMessage: "</text:span><text:span text:style-name="T59"> + </text:span><text:span text:style-name="T92">resultatAnnex</text:span><text:span text:style-name="T59">.getErrorMessage());</text:span></text:p>
            <text:p text:style-name="P119"><text:span text:style-name="T59"><text:tab/><text:tab/></text:span><text:span text:style-name="T87">logger</text:span><text:span text:style-name="T59">.debug(</text:span><text:span text:style-name="T36">"\\b- excepcio: "</text:span><text:span text:style-name="T59"> + (</text:span><text:span text:style-name="T92">resultatAnnex</text:span><text:span text:style-name="T59">.getException() != </text:span><text:span text:style-name="T51">null</text:span><text:span text:style-name="T59">? </text:span><text:span text:style-name="T92">resultatAnnex</text:span><text:span text:style-name="T59">.getException().getClass() + </text:span><text:span text:style-name="T36">" "</text:span><text:span text:style-name="T59"> + </text:span><text:span text:style-name="T92">resultatAnnex</text:span><text:span text:style-name="T59">.getException().getMessage() : <text:s/></text:span><text:span text:style-name="T36">" - "</text:span><text:span text:style-name="T59">));</text:span></text:p>
            <text:p text:style-name="P95"><text:tab/>}</text:p>
            <text:p text:style-name="P93">}</text:p>
          </table:table-cell>
        </table:table-row>
      </table:table>
      <text:p text:style-name="P80"/>
      <text:p text:style-name="P80">En aquest punt ja s'ha utilitzat la llibreria d'integració per moure continguts i a l'Arxiu s'haurien de poder veure els expedients d'origen i final</text:p>
      <text:p text:style-name="P80"/>
      <text:p text:style-name="P80"><draw:frame draw:style-name="fr1" draw:name="Frame3" text:anchor-type="paragraph" svg:width="17cm" draw:z-index="40"><draw:text-box fo:min-height="9.73cm"><text:p text:style-name="Fig."><draw:frame draw:style-name="fr6" draw:name="Image4" text:anchor-type="as-char" svg:width="17cm" style:rel-width="100%" svg:height="9.73cm" style:rel-height="scale" draw:z-index="41"><draw:image xlink:href="Pictures/100000000000042F000002652F67F6D0.png" xlink:type="simple" xlink:show="embed" xlink:actuate="onLoad" draw:mime-type="image/png"/></draw:frame><text:span text:style-name="T230"><text:line-break/></text:span>Fig. <text:sequence text:ref-name="refFig.4" text:name="Fig." text:formula="ooow:Fig.+1" style:num-format="1">5</text:sequence>: Expedient origen a l'Arxiu.</text:p></draw:text-box></draw:frame></text:p>
      <text:p text:style-name="P80"><draw:frame draw:style-name="fr1" draw:name="Frame4" text:anchor-type="paragraph" svg:width="17cm" draw:z-index="37"><draw:text-box fo:min-height="9.73cm"><text:p text:style-name="Fig."><draw:frame draw:style-name="fr6" draw:name="Image5" text:anchor-type="as-char" svg:width="17cm" style:rel-width="100%" svg:height="9.73cm" style:rel-height="scale" draw:z-index="38"><draw:image xlink:href="Pictures/100000000000042F00000265E139B203.png" xlink:type="simple" xlink:show="embed" xlink:actuate="onLoad" draw:mime-type="image/png"/></draw:frame><text:span text:style-name="T230"><text:line-break/></text:span>Fig. <text:sequence text:ref-name="refFig.5" text:name="Fig." text:formula="ooow:Fig.+1" style:num-format="1">6</text:sequence>: Expedient després de la crida al mètode de la llibreria d'utilitats<text:span text:style-name="T231">.</text:span></text:p></draw:text-box></draw:frame><text:soft-page-break/></text:p>
      <text:p text:style-name="P163">Per acabar es mostra la porció de codi que consulta el nou expedient i comunica l'estat a l'aplicació de DISTRIBUCIO<text:span text:style-name="T229"> segons el codi del resultat.</text:span></text:p>
      <table:table table:name="Table11" table:style-name="Table11">
        <table:table-column table:style-name="Table11.A"/>
        <table:table-row>
          <table:table-cell table:style-name="Table11.A1" office:value-type="string">
            <text:p text:style-name="P111"><text:span text:style-name="T223">// </text:span><text:span text:style-name="T224">Consultem</text:span><text:span text:style-name="T223"> el </text:span><text:span text:style-name="T224">nou</text:span><text:span text:style-name="T223"> expedient a l'Arxiu</text:span></text:p>
            <text:p text:style-name="P112"><text:span text:style-name="T51">if</text:span><text:span text:style-name="T59"> (</text:span><text:span text:style-name="T92">expedientUuid</text:span><text:span text:style-name="T59"> != </text:span><text:span text:style-name="T51">null</text:span><text:span text:style-name="T59">) {</text:span></text:p>
            <text:p text:style-name="P112"><text:span text:style-name="T59"><text:tab/>Expedient </text:span><text:span text:style-name="T92">expedientDetalls</text:span><text:span text:style-name="T59"> = getArxiuPlugin().expedientDetalls(</text:span><text:span text:style-name="T92">arxiuResultat</text:span><text:span text:style-name="T59">.getIdentificadorExpedient(), </text:span><text:span text:style-name="T51">null</text:span><text:span text:style-name="T59">);</text:span></text:p>
            <text:p text:style-name="P112"><text:span text:style-name="T59"><text:tab/></text:span><text:span text:style-name="T87">logger</text:span><text:span text:style-name="T59">.debug(</text:span><text:span text:style-name="T36">"S'ha creat l'expedient \""</text:span><text:span text:style-name="T59"> + </text:span><text:span text:style-name="T92">expedientDetalls</text:span><text:span text:style-name="T59">.getNom() + </text:span><text:span text:style-name="T36">"\" amb id="</text:span><text:span text:style-name="T59"> + </text:span><text:span text:style-name="T92">expedientDetalls</text:span><text:span text:style-name="T59">.getIdentificador() + </text:span><text:span text:style-name="T36">" per l'anotació "</text:span><text:span text:style-name="T59"> + </text:span><text:span text:style-name="T92">anotacio</text:span><text:span text:style-name="T59">.getIdentificador() + </text:span><text:span text:style-name="T36">" amb els següents continguts:"</text:span><text:span text:style-name="T59">);</text:span></text:p>
            <text:p text:style-name="P112"><text:span text:style-name="T59"><text:tab/></text:span><text:span text:style-name="T51">for</text:span><text:span text:style-name="T59"> (ContingutArxiu </text:span><text:span text:style-name="T92">contingut</text:span><text:span text:style-name="T59"> : </text:span><text:span text:style-name="T92">expedientDetalls</text:span><text:span text:style-name="T59">.getContinguts()) {</text:span></text:p>
            <text:p text:style-name="P112"><text:span text:style-name="T59"><text:tab/><text:tab/></text:span><text:span text:style-name="T87">logger</text:span><text:span text:style-name="T59">.debug(</text:span><text:span text:style-name="T36">"- "</text:span><text:span text:style-name="T59"> + </text:span><text:span text:style-name="T92">contingut</text:span><text:span text:style-name="T59">.getIdentificador() + </text:span><text:span text:style-name="T36">" "</text:span><text:span text:style-name="T59"> + </text:span><text:span text:style-name="T92">contingut</text:span><text:span text:style-name="T59">.getNom() + </text:span><text:span text:style-name="T36">" amb "</text:span><text:span text:style-name="T59"> + (</text:span><text:span text:style-name="T92">contingut</text:span><text:span text:style-name="T59">.getFirmes() != </text:span><text:span text:style-name="T51">null</text:span><text:span text:style-name="T59">? </text:span><text:span text:style-name="T92">contingut</text:span><text:span text:style-name="T59">.getFirmes().size() : 0) + </text:span><text:span text:style-name="T36">" firmes."</text:span><text:span text:style-name="T59">);</text:span></text:p>
            <text:p text:style-name="P90"><text:tab/>}</text:p>
            <text:p text:style-name="P112"><text:span text:style-name="T59">} </text:span><text:span text:style-name="T51">else</text:span><text:span text:style-name="T59"> {</text:span></text:p>
            <text:p text:style-name="P112"><text:span text:style-name="T59"><text:tab/></text:span><text:span text:style-name="T87">logger</text:span><text:span text:style-name="T59">.warn(</text:span><text:span text:style-name="T36">"L'expedient no s'ha pogut crear per l'anotació "</text:span><text:span text:style-name="T59"> + </text:span><text:span text:style-name="T92">anotacio</text:span><text:span text:style-name="T59">.getIdentificador());</text:span></text:p>
            <text:p text:style-name="P90">}</text:p>
            <text:p text:style-name="P112"><text:span text:style-name="T223">// </text:span><text:span text:style-name="T224">Es</text:span><text:span text:style-name="T223"> </text:span><text:span text:style-name="T224">comunica</text:span><text:span text:style-name="T223"> el </text:span><text:span text:style-name="T224">resultat</text:span><text:span text:style-name="T223"> a DISTRIBUCIO</text:span></text:p>
            <text:p text:style-name="P112"><text:span text:style-name="T51">switch</text:span><text:span text:style-name="T59">(</text:span><text:span text:style-name="T92">arxiuResultat</text:span><text:span text:style-name="T59">.getErrorCodi()) {</text:span></text:p>
            <text:p text:style-name="P112"><text:span text:style-name="T59"><text:tab/></text:span><text:span text:style-name="T51">case</text:span><text:span text:style-name="T59"> 0:</text:span></text:p>
            <text:p text:style-name="P112"><text:span text:style-name="T59"><text:tab/><text:tab/></text:span><text:span text:style-name="T92">backofficeClient</text:span><text:span text:style-name="T59">.canviEstat(</text:span><text:span text:style-name="T92">idWs</text:span><text:span text:style-name="T59">, es.caib.distribucio.ws.backofficeintegracio.Estat.</text:span><text:span text:style-name="T87">PROCESSADA</text:span><text:span text:style-name="T59">, </text:span><text:span text:style-name="T36">"Processada"</text:span><text:span text:style-name="T59">);</text:span></text:p>
            <text:p text:style-name="P112"><text:span text:style-name="T59"><text:tab/><text:tab/></text:span><text:span text:style-name="T51">break</text:span><text:span text:style-name="T59">;</text:span></text:p>
            <text:p text:style-name="P112"><text:span text:style-name="T59"><text:tab/></text:span><text:span text:style-name="T51">default</text:span><text:span text:style-name="T59">:</text:span></text:p>
            <text:p text:style-name="P112"><text:span text:style-name="T59"><text:tab/><text:tab/></text:span><text:span text:style-name="T92">backofficeClient</text:span><text:span text:style-name="T59">.canviEstat(</text:span><text:span text:style-name="T92">idWs</text:span><text:span text:style-name="T59">, es.caib.distribucio.ws.backofficeintegracio.Estat.</text:span><text:span text:style-name="T87">ERROR</text:span><text:span text:style-name="T59">, </text:span><text:span text:style-name="T92">arxiuResultat</text:span><text:span text:style-name="T59">.getErrorCodi()</text:span><text:span text:style-name="T73"> + </text:span><text:span text:style-name="T38">" "</text:span><text:span text:style-name="T73"> + </text:span><text:span text:style-name="T92">arxiuResultat</text:span><text:span text:style-name="T59">.getErrorMessage());</text:span></text:p>
            <text:p text:style-name="P112"><text:span text:style-name="T59"><text:tab/><text:tab/></text:span><text:span text:style-name="T51">break</text:span><text:span text:style-name="T59">;</text:span></text:p>
            <text:p text:style-name="P89">}</text:p>
          </table:table-cell>
        </table:table-row>
      </table:table>
      <text:p text:style-name="P75"/>
      <text:list text:continue-numbering="true" text:style-name="Outline">
        <text:list-item>
          <text:list>
            <text:list-item>
              <text:h text:style-name="P402" text:outline-level="2"><text:bookmark-start text:name="__RefHeading___Toc50910_29075569581"/>Utilitats per Sistra2<text:bookmark-end text:name="__RefHeading___Toc50910_29075569581"/></text:h>
            </text:list-item>
          </text:list>
        </text:list-item>
      </text:list>
      <text:p text:style-name="P171"><text:span text:style-name="T240">S</text:span><text:span text:style-name="T241">erà un cas comú que els tràmits telemàtics de Sistra2 arribin als backoffices de Distribucio amb documents tècnics de pagaments o formularis com annexos. Aquests documents contenen un XML </text:span><text:soft-page-break/><text:span text:style-name="T241">definit pels esquemes XSD corresponents de Sistra2 i contenen les dades d'un formulari o d'un pagament. A fi de facilitar el l</text:span><text:span text:style-name="T242">a </text:span><text:span text:style-name="T241">interpretació </text:span><text:span text:style-name="T242">del </text:span><text:span text:style-name="T241">contingut per part dels backoffices de Distribucio s'ha creat la classe d'utilitats </text:span><text:span text:style-name="T154">BackofficeSistra2Utils</text:span><text:span text:style-name="T189"> amb els mètodes per extreure la informació dels documents tècnics XML. En aquest apartat es descriu l'ús de la llibreria per aquest cas i un exemple Java.</text:span></text:p>
      <text:list xml:id="list112332652903155" text:continue-numbering="true" text:style-name="Outline">
        <text:list-item>
          <text:list>
            <text:list-item>
              <text:list>
                <text:list-item>
                  <text:h text:style-name="P408" text:outline-level="3"><text:bookmark-start text:name="__RefHeading___Toc366109_93553639"/><text:span text:style-name="T236">Ús de </text:span><text:span text:style-name="T139">BackofficeSistra2Utils</text:span><text:bookmark-end text:name="__RefHeading___Toc366109_93553639"/></text:h>
                </text:list-item>
              </text:list>
            </text:list-item>
          </text:list>
        </text:list-item>
      </text:list>
      <text:p text:style-name="P165"><text:span text:style-name="T212">Per utilitzar la </text:span><text:span text:style-name="T239">classe</text:span><text:span text:style-name="T148"> BackofficeS</text:span><text:span text:style-name="T149">istra2U</text:span><text:span text:style-name="T148">tils</text:span><text:span text:style-name="T186"> amb les u</text:span><text:span text:style-name="T190">t</text:span><text:span text:style-name="T186">ilitats</text:span><text:span text:style-name="T190"> per Sistra2</text:span><text:span text:style-name="T186"> </text:span><text:span text:style-name="T243">s'ha de crear un objecte de la classe </text:span><text:span text:style-name="T138">Backoffice</text:span><text:span text:style-name="T150">S</text:span><text:span text:style-name="T149">istra2</text:span><text:span text:style-name="T138">UtilsImpl</text:span><text:span text:style-name="T169">.</text:span><text:span text:style-name="T173"> Aquesta classe no precisa de configurar i conté 2 mètodes per llegir el contingut d'un </text:span><text:span text:style-name="T175">document </text:span><text:span text:style-name="T173">annex i retornar la informació d'un formulari o d'un pagament. Els mètodes que conté són:</text:span></text:p>
      <text:list text:style-name="L18">
        <text:list-item>
          <text:p text:style-name="P463"><text:span text:style-name="T149">F</text:span><text:span text:style-name="T151">ormulario</text:span><text:span text:style-name="T140"> parseXml</text:span><text:span text:style-name="T141">Formulario</text:span><text:span text:style-name="T140">(</text:span><text:span text:style-name="T149">b</text:span><text:span text:style-name="T153">yte[]</text:span><text:span text:style-name="T140">) </text:span><text:span text:style-name="T173">: Processa el contingut </text:span><text:span text:style-name="T175">en bytes </text:span><text:span text:style-name="T173">de</text:span><text:span text:style-name="T175">l document annex del formulari </text:span><text:span text:style-name="T173">i retorna les dades del pagament en forma d'objecte</text:span><text:span text:style-name="T140"> </text:span><text:span text:style-name="T151">Formulario</text:span><text:span text:style-name="T173">.</text:span></text:p>
        </text:list-item>
        <text:list-item>
          <text:p text:style-name="P463"><text:span text:style-name="T140">Pago parseXmlPago(</text:span><text:span text:style-name="T149">b</text:span><text:span text:style-name="T153">yte[]</text:span><text:span text:style-name="T140">) </text:span><text:span text:style-name="T173">: Processa el contingut </text:span><text:span text:style-name="T175">en bytes del document</text:span><text:span text:style-name="T190"> </text:span><text:span text:style-name="T173">annex </text:span><text:span text:style-name="T175">del pagament </text:span><text:span text:style-name="T173">i retorna les dades del pagament en forma d'objecte</text:span><text:span text:style-name="T140"> Pago</text:span><text:span text:style-name="T173">.</text:span><text:span text:style-name="T140"> </text:span></text:p>
        </text:list-item>
      </text:list>
      <text:p text:style-name="P165"><text:span text:style-name="T184">T</text:span><text:span text:style-name="T191">ant la classe </text:span><text:span text:style-name="T151">Formulario</text:span><text:span text:style-name="T191"> com la classe </text:span><text:span text:style-name="T151">Pago</text:span><text:span text:style-name="T191"> estan generades a partir dels esquemes XSD de les dades XML provinents de Sistra i els mètodes serveixen per transformar les dades XML a objectes que puguin ser tractats pel backoffice</text:span><text:span text:style-name="T170">.</text:span></text:p>
      <text:p text:style-name="P72"><draw:frame draw:style-name="fr1" draw:name="Frame6" text:anchor-type="paragraph" svg:width="17cm" draw:z-index="33"><draw:text-box fo:min-height="11.411cm"><text:p text:style-name="Fig."><draw:frame draw:style-name="fr5" draw:name="Image7" text:anchor-type="as-char" svg:width="17cm" style:rel-width="100%" svg:height="11.409cm" style:rel-height="scale" draw:z-index="34"><draw:image xlink:href="Pictures/100000010000032A0000021FAB5956CE.png" xlink:type="simple" xlink:show="embed" xlink:actuate="onLoad" draw:mime-type="image/png"/></draw:frame><text:span text:style-name="T230"><text:line-break/></text:span>Fig. <text:sequence text:ref-name="refFig.6" text:name="Fig." text:formula="ooow:Fig.+1" style:num-format="1">7</text:sequence>: Diagrama de classes de BackofficeSistra2Utils i les classes de Formulario i Pago que retorna.</text:p></draw:text-box></draw:frame></text:p>
      <text:p text:style-name="P166"><text:soft-page-break/><text:span text:style-name="T189">E</text:span><text:span text:style-name="T180">ls mètodes reben </text:span><text:span text:style-name="T196">el contingut en </text:span><text:span text:style-name="T155">byte[]</text:span><text:span text:style-name="T180"> com a paràmetre d'entrada i retornen un objecte </text:span><text:span text:style-name="T146">Formulario</text:span><text:span text:style-name="T180"> o </text:span><text:span text:style-name="T146">Pago</text:span><text:span text:style-name="T180"> segons el mètode invocat. Cal controlar qualsevol excepció que es pugui produir quan el contingut de l'annex no és vàlid i el parseig de l'XML falla.</text:span></text:p>
      <text:list text:continue-list="list112332652903155" text:style-name="Outline">
        <text:list-item>
          <text:list>
            <text:list-item>
              <text:list>
                <text:list-item>
                  <text:h text:style-name="P412" text:outline-level="3"><text:bookmark-start text:name="__RefHeading___Toc366111_93553639"/>Exemple Java<text:bookmark-end text:name="__RefHeading___Toc366111_93553639"/></text:h>
                </text:list-item>
              </text:list>
            </text:list-item>
          </text:list>
        </text:list-item>
      </text:list>
      <text:p text:style-name="P170">En el següent exemple de codi es mostra un exemple de crida al mètode de conversió de l'annex a dades de formulari.</text:p>
      <text:p text:style-name="P167"><text:span text:style-name="T44">taula.</text:span><text:span text:style-name="T216"> </text:span><text:span text:style-name="T220">C</text:span><text:span text:style-name="T221">onversió d'un annex corresponent a un document tècnic d'un formulari XML</text:span><text:span text:style-name="T216">.</text:span></text:p>
      <table:table table:name="Table12" table:style-name="Table12">
        <table:table-column table:style-name="Table12.A"/>
        <table:table-row>
          <table:table-cell table:style-name="Table12.A1" office:value-type="string">
            <text:p text:style-name="P91"/>
            <text:p text:style-name="P177">// Inicialitza la classe d'utilitats de Sistra2</text:p>
            <text:p text:style-name="P118"><text:span text:style-name="T59">BackofficeSistra2Utils </text:span><text:span text:style-name="T92">sistraUtils</text:span><text:span text:style-name="T59"> = </text:span><text:span text:style-name="T51">new</text:span><text:span text:style-name="T59"> BackofficeSistra2UtilsImpl();</text:span></text:p>
            <text:p text:style-name="P174"/>
            <text:p text:style-name="P176">// Simula l'annex</text:p>
            <text:p text:style-name="P52"><text:span text:style-name="T52">byte</text:span><text:span text:style-name="T68">[] </text:span><text:span text:style-name="T96">contingut</text:span><text:span text:style-name="T68"> = Files.</text:span><text:span text:style-name="T72">readAllBytes</text:span><text:span text:style-name="T68">(Paths.</text:span><text:span text:style-name="T72">get</text:span><text:span text:style-name="T68">(</text:span><text:span text:style-name="T52">this</text:span><text:span text:style-name="T68">.getClass().getClassLoader().getResource(</text:span><text:span text:style-name="T40">"formulario.xml"</text:span><text:span text:style-name="T68">).toURI()));</text:span></text:p>
            <text:p text:style-name="P176">// Llegeix el formulari</text:p>
            <text:p text:style-name="P118"><text:span text:style-name="T59">Formulario </text:span><text:span text:style-name="T92">formulario</text:span><text:span text:style-name="T59"> = </text:span><text:span text:style-name="T51">null</text:span><text:span text:style-name="T59">;</text:span></text:p>
            <text:p text:style-name="P118"><text:span text:style-name="T51">try</text:span><text:span text:style-name="T59"> {</text:span></text:p>
            <text:p text:style-name="P120"><text:span text:style-name="T59"><text:tab/></text:span><text:span text:style-name="T92">formulario</text:span><text:span text:style-name="T59"> = </text:span><text:span text:style-name="T92">sistraUtils</text:span><text:span text:style-name="T59">.parseXmlFormulario(</text:span><text:span text:style-name="T100">contingut</text:span><text:span text:style-name="T59">);</text:span></text:p>
            <text:p text:style-name="P118"><text:span text:style-name="T59">} </text:span><text:span text:style-name="T51">catch</text:span><text:span text:style-name="T59"> (Exception </text:span><text:span text:style-name="T92">e</text:span><text:span text:style-name="T59">) {</text:span></text:p>
            <text:p text:style-name="P118"><text:span text:style-name="T59"><text:tab/></text:span><text:span text:style-name="T51">throw</text:span><text:span text:style-name="T59"> </text:span><text:span text:style-name="T51">new</text:span><text:span text:style-name="T59"> Exception(</text:span><text:span text:style-name="T36">"Error llegint l'annex : "</text:span><text:span text:style-name="T59"> + </text:span><text:span text:style-name="T92">e</text:span><text:span text:style-name="T59">.getMessage());</text:span></text:p>
            <text:p text:style-name="P94">}</text:p>
            <text:p text:style-name="P118"><text:span text:style-name="T59">System.</text:span><text:span text:style-name="T87">out</text:span><text:span text:style-name="T59">.println(</text:span><text:span text:style-name="T36">"Llegit el fornmulari, formulario.accion="</text:span><text:span text:style-name="T59"> + </text:span><text:span text:style-name="T92">formulario</text:span><text:span text:style-name="T59">.getAccion());</text:span></text:p>
            <text:p text:style-name="P91"/>
          </table:table-cell>
        </table:table-row>
      </table:table>
      <text:p text:style-name="P160"/>
      <text:p text:style-name="P168">Per a l'exemple s'ha creat l'arxiu <text:span text:style-name="T133">formulario.xml</text:span><text:span text:style-name="T161"> amb l' XML d'exemple per a la lectura. A continuació es mostra aquest XML d'exemple.</text:span></text:p>
      <text:p text:style-name="P169"><text:span text:style-name="T44">taula.</text:span><text:span text:style-name="T216"> </text:span><text:span text:style-name="T220">E</text:span><text:span text:style-name="T222">xemple d' </text:span><text:span text:style-name="T221">XML</text:span><text:span text:style-name="T222"> pel formulari</text:span><text:span text:style-name="T216">.</text:span></text:p>
      <table:table table:name="Table13" table:style-name="Table13">
        <table:table-column table:style-name="Table13.A"/>
        <table:table-row>
          <table:table-cell table:style-name="Table13.A1" office:value-type="string">
            <text:p text:style-name="P92"><text:span text:style-name="T14">&lt;?</text:span><text:span text:style-name="T21">xml</text:span> <text:span text:style-name="T26">version</text:span>=<text:span text:style-name="T41">"1.0"</text:span> <text:span text:style-name="T26">encoding</text:span>=<text:span text:style-name="T41">"UTF-8"</text:span> <text:span text:style-name="T26">standalone</text:span>=<text:span text:style-name="T41">"yes"</text:span><text:span text:style-name="T14">?&gt;</text:span></text:p>
            <text:p text:style-name="P113"><text:span text:style-name="T17">&lt;</text:span><text:span text:style-name="T23">ns2:FORMULARIO</text:span><text:span text:style-name="T123"> </text:span><text:span text:style-name="T27">accion</text:span><text:span text:style-name="T59">=</text:span><text:span text:style-name="T39">"accion"</text:span><text:span text:style-name="T123"> </text:span><text:span text:style-name="T27">xmlns:ns2</text:span><text:span text:style-name="T59">=</text:span><text:span text:style-name="T39">"urn:es:caib:sistra2:xml:formulario:v1:model"</text:span><text:span text:style-name="T17">&gt;</text:span></text:p>
            <text:p text:style-name="P113"><text:span text:style-name="T59"><text:tab/></text:span><text:span text:style-name="T17">&lt;</text:span><text:span text:style-name="T23">CAMPO</text:span><text:span text:style-name="T123"> </text:span><text:span text:style-name="T27">id</text:span><text:span text:style-name="T59">=</text:span><text:span text:style-name="T39">"campo_0"</text:span><text:span text:style-name="T17">&gt;</text:span></text:p>
            <text:p text:style-name="P113"><text:span text:style-name="T59"><text:tab/><text:tab/></text:span><text:span text:style-name="T17">&lt;</text:span><text:span text:style-name="T23">VALOR</text:span><text:span text:style-name="T123"> </text:span><text:span text:style-name="T27">codigo</text:span><text:span text:style-name="T59">=</text:span><text:span text:style-name="T39">"cod_0"</text:span><text:span text:style-name="T17">&gt;</text:span><text:span text:style-name="T59">valor_i</text:span><text:span text:style-name="T17">&lt;/</text:span><text:span text:style-name="T23">VALOR</text:span><text:span text:style-name="T17">&gt;</text:span></text:p>
            <text:p text:style-name="P113"><text:span text:style-name="T59"><text:tab/><text:tab/></text:span><text:span text:style-name="T17">&lt;</text:span><text:span text:style-name="T23">VALOR</text:span><text:span text:style-name="T123"> </text:span><text:span text:style-name="T27">codigo</text:span><text:span text:style-name="T59">=</text:span><text:span text:style-name="T39">"cod_0"</text:span><text:span text:style-name="T17">&gt;</text:span><text:span text:style-name="T59">valor_i</text:span><text:span text:style-name="T17">&lt;/</text:span><text:span text:style-name="T23">VALOR</text:span><text:span text:style-name="T17">&gt;</text:span></text:p>
            <text:p text:style-name="P113"><text:span text:style-name="T59"><text:tab/></text:span><text:span text:style-name="T17">&lt;/</text:span><text:span text:style-name="T23">CAMPO</text:span><text:span text:style-name="T17">&gt;</text:span></text:p>
            <text:p text:style-name="P113"><text:span text:style-name="T59"><text:tab/></text:span><text:span text:style-name="T17">&lt;</text:span><text:span text:style-name="T23">CAMPO</text:span><text:span text:style-name="T123"> </text:span><text:span text:style-name="T27">id</text:span><text:span text:style-name="T59">=</text:span><text:span text:style-name="T39">"campo_1"</text:span><text:span text:style-name="T17">&gt;</text:span></text:p>
            <text:p text:style-name="P113"><text:span text:style-name="T59"><text:tab/><text:tab/></text:span><text:span text:style-name="T17">&lt;</text:span><text:span text:style-name="T23">VALOR</text:span><text:span text:style-name="T123"> </text:span><text:span text:style-name="T27">codigo</text:span><text:span text:style-name="T59">=</text:span><text:span text:style-name="T39">"cod_1"</text:span><text:span text:style-name="T17">&gt;</text:span><text:span text:style-name="T59">valor_i</text:span><text:span text:style-name="T17">&lt;/</text:span><text:span text:style-name="T23">VALOR</text:span><text:span text:style-name="T17">&gt;</text:span></text:p>
            <text:p text:style-name="P113"><text:span text:style-name="T59"><text:tab/><text:tab/></text:span><text:span text:style-name="T17">&lt;</text:span><text:span text:style-name="T23">VALOR</text:span><text:span text:style-name="T123"> </text:span><text:span text:style-name="T27">codigo</text:span><text:span text:style-name="T59">=</text:span><text:span text:style-name="T39">"cod_1"</text:span><text:span text:style-name="T17">&gt;</text:span><text:span text:style-name="T59">valor_i</text:span><text:span text:style-name="T17">&lt;/</text:span><text:span text:style-name="T23">VALOR</text:span><text:span text:style-name="T17">&gt;</text:span></text:p>
            <text:p text:style-name="P113"><text:span text:style-name="T59"><text:tab/></text:span><text:span text:style-name="T17">&lt;/</text:span><text:span text:style-name="T23">CAMPO</text:span><text:span text:style-name="T17">&gt;</text:span></text:p>
            <text:p text:style-name="P92"><text:span text:style-name="T14">&lt;/</text:span><text:span text:style-name="T21">ns2:FORMULARIO</text:span><text:span text:style-name="T14">&gt;</text:span></text:p>
          </table:table-cell>
        </table:table-row>
      </table:table>
      <text:p text:style-name="P73"/>
      <text:p text:style-name="P167"/>
      <text:list text:continue-numbering="true" text:style-name="Outline">
        <text:list-header>
          <text:h text:style-name="P391" text:outline-level="1" text:is-list-header="true"><text:bookmark-start text:name="__RefHeading___Toc117515_1680181998"/><text:span text:style-name="T118">Annex I: WSDL del backoffice</text:span> <text:bookmark-end text:name="__RefHeading___Toc117515_1680181998"/></text:h>
        </text:list-header>
      </text:list>
      <text:p text:style-name="P180"><text:span text:style-name="T18">&lt;?</text:span> <text:span text:style-name="T24">xml</text:span> <text:span text:style-name="T28">version</text:span> <text:span text:style-name="T60">= </text:span><text:span text:style-name="T37">'1.0'</text:span> <text:span text:style-name="T28">encoding</text:span> <text:span text:style-name="T60">= </text:span><text:span text:style-name="T37">'UTF-8'</text:span> <text:span text:style-name="T18">?&gt;&lt;</text:span> <text:span text:style-name="T24">wsdl:definitions</text:span> <text:span text:style-name="T28">name</text:span> <text:span text:style-name="T60">= </text:span><text:span text:style-name="T37">"BackofficeService"</text:span> <text:span text:style-name="T28">targetNamespace</text:span> <text:span text:style-name="T60">= </text:span><text:span text:style-name="T37">"http://www.caib.es/distribucio/ws/backoffice"</text:span> <text:span text:style-name="T28">xmlns:ns1</text:span> <text:span text:style-name="T60">= </text:span><text:span text:style-name="T37">"http://schemas.xmlsoap.org/wsdl/soap/http"</text:span> <text:span text:style-name="T28">xmlns:soap</text:span> <text:span text:style-name="T60">= </text:span><text:span text:style-name="T37">"http://schemas.xmlsoap.org/wsdl/soap/"</text:span> <text:span text:style-name="T28">xmlns:tns</text:span> <text:span text:style-name="T60">= </text:span><text:span text:style-name="T37">"http://www.caib.es/distribucio/ws/backoffice"</text:span> <text:span text:style-name="T60"><text:s text:c="3"/></text:span><text:span text:style-name="T28">xmlns:wsdl</text:span> <text:span text:style-name="T60">= </text:span><text:span text:style-name="T37">"http://schemas.xmlsoap.org/wsdl/"</text:span> <text:span text:style-name="T28">xmlns:xsd</text:span> <text:span text:style-name="T60">= </text:span><text:span text:style-name="T37">"http://www.w3.org/2001/XMLSchema"</text:span> <text:span text:style-name="T18">&gt;</text:span> </text:p>
      <text:p text:style-name="P181"><text:span text:style-name="T60"><text:s text:c="4"/></text:span><text:span text:style-name="T75"><text:s text:c="3"/></text:span><text:span text:style-name="T20">&lt;</text:span> <text:span text:style-name="T25">wsdl:types</text:span> <text:span text:style-name="T20">&gt;</text:span> </text:p>
      <text:p text:style-name="P178"><text:span text:style-name="T14">&lt;</text:span> <text:span text:style-name="T21">xs:schema</text:span> <text:span text:style-name="T26">elementFormDefault</text:span> <text:span text:style-name="T53">=</text:span> <text:span text:style-name="T41">"unqualified"</text:span> <text:span text:style-name="T26">targetNamespace</text:span> <text:span text:style-name="T53">=</text:span> <text:span text:style-name="T41">"http://www.caib.es/distribucio/ws/backoffice"</text:span> <text:span text:style-name="T26">version</text:span> <text:span text:style-name="T53">=</text:span> <text:span text:style-name="T41">"1.0"</text:span> <text:span text:style-name="T26">xmlns:tns</text:span> <text:span text:style-name="T53">=</text:span> <text:span text:style-name="T41">"http://www.caib.es/distribucio/ws/backoffice"</text:span> <text:span text:style-name="T26">xmlns:xs</text:span> <text:span text:style-name="T53">=</text:span> <text:span text:style-name="T41">"http://www.w3.org/2001/XMLSchema"</text:span> <text:span text:style-name="T14">&gt;</text:span> </text:p>
      <text:p text:style-name="P178"><text:span text:style-name="T14">&lt;</text:span> <text:span text:style-name="T21">xs:element</text:span> <text:span text:style-name="T26">name</text:span> <text:span text:style-name="T53">=</text:span> <text:span text:style-name="T41">"comunicarAnotacionsPendents"</text:span> <text:span text:style-name="T26">type</text:span> <text:span text:style-name="T53">=</text:span> <text:span text:style-name="T41">"tns:comunicarAnotacionsPendents"</text:span> <text:span text:style-name="T14">/&gt;</text:span> </text:p>
      <text:p text:style-name="P178"><text:span text:style-name="T14">&lt;</text:span> <text:span text:style-name="T21">xs:element</text:span> <text:span text:style-name="T26">name</text:span> <text:span text:style-name="T53">=</text:span> <text:span text:style-name="T41">"comunicarAnotacionsPendentsResponse"</text:span> <text:span text:style-name="T26">type</text:span> <text:span text:style-name="T53">=</text:span> <text:span text:style-name="T41">"tns:comunicarAnotacionsPendentsResponse"</text:span> <text:span text:style-name="T14">/&gt;</text:span> </text:p>
      <text:p text:style-name="P178"><text:span text:style-name="T14">&lt;</text:span> <text:span text:style-name="T21">xs:complexType</text:span> <text:span text:style-name="T26">name</text:span> <text:span text:style-name="T53">=</text:span> <text:span text:style-name="T41">"comunicarAnotacionsPendents"</text:span> <text:span text:style-name="T14">&gt;</text:span> </text:p>
      <text:p text:style-name="P178"><text:span text:style-name="T14">&lt;</text:span> <text:span text:style-name="T21">xs:sequence</text:span> <text:span text:style-name="T14">&gt;</text:span> </text:p>
      <text:p text:style-name="P178"><text:span text:style-name="T14">&lt;</text:span> <text:span text:style-name="T21">xs:element</text:span> <text:span text:style-name="T26">maxOccurs</text:span> <text:span text:style-name="T53">=</text:span> <text:span text:style-name="T41">"unbounded"</text:span> <text:span text:style-name="T26">name</text:span> <text:span text:style-name="T53">=</text:span> <text:span text:style-name="T41">"ids"</text:span> <text:span text:style-name="T26">type</text:span> <text:span text:style-name="T53">=</text:span> <text:span text:style-name="T41">"tns:anotacioRegistreId"</text:span> <text:span text:style-name="T14">/&gt;</text:span> </text:p>
      <text:p text:style-name="P178"><text:span text:style-name="T14">&lt;/</text:span> <text:span text:style-name="T21">xs:sequence</text:span> <text:span text:style-name="T14">&gt;</text:span> </text:p>
      <text:p text:style-name="P178"><text:span text:style-name="T14">&lt;/</text:span> <text:span text:style-name="T21">xs:complexType</text:span> <text:span text:style-name="T14">&gt;</text:span> </text:p>
      <text:p text:style-name="P178"><text:span text:style-name="T14">&lt;</text:span> <text:span text:style-name="T21">xs:complexType</text:span> <text:span text:style-name="T26">name</text:span> <text:span text:style-name="T53">=</text:span> <text:span text:style-name="T41">"anotacioRegistreId"</text:span> <text:span text:style-name="T14">&gt;</text:span> </text:p>
      <text:p text:style-name="P178"><text:span text:style-name="T14">&lt;</text:span> <text:span text:style-name="T21">xs:sequence</text:span> <text:span text:style-name="T14">&gt;</text:span> </text:p>
      <text:p text:style-name="P178"><text:span text:style-name="T14">&lt;</text:span> <text:span text:style-name="T21">xs:element</text:span> <text:span text:style-name="T26">minOccurs</text:span> <text:span text:style-name="T53">=</text:span> <text:span text:style-name="T41">"0"</text:span> <text:span text:style-name="T26">name</text:span> <text:span text:style-name="T53">=</text:span> <text:span text:style-name="T41">"clauAcces"</text:span> <text:span text:style-name="T26">type</text:span> <text:span text:style-name="T53">=</text:span> <text:span text:style-name="T41">"xs:string"</text:span> <text:span text:style-name="T14">/&gt;</text:span> </text:p>
      <text:p text:style-name="P178"><text:span text:style-name="T14">&lt;</text:span> <text:span text:style-name="T21">xs:element</text:span> <text:span text:style-name="T26">minOccurs</text:span> <text:span text:style-name="T53">=</text:span> <text:span text:style-name="T41">"0"</text:span> <text:span text:style-name="T26">name</text:span> <text:span text:style-name="T53">=</text:span> <text:span text:style-name="T41">"indetificador"</text:span> <text:span text:style-name="T26">type</text:span> <text:span text:style-name="T53">=</text:span> <text:span text:style-name="T41">"xs:string"</text:span> <text:span text:style-name="T14">/&gt;</text:span> </text:p>
      <text:p text:style-name="P178"><text:span text:style-name="T14">&lt;/</text:span> <text:span text:style-name="T21">xs:sequence</text:span> <text:span text:style-name="T14">&gt;</text:span> </text:p>
      <text:p text:style-name="P178"><text:span text:style-name="T14">&lt;/</text:span> <text:span text:style-name="T21">xs:complexType</text:span> <text:span text:style-name="T14">&gt;</text:span> </text:p>
      <text:p text:style-name="P178"><text:span text:style-name="T14">&lt;</text:span> <text:span text:style-name="T21">xs:complexType</text:span> <text:span text:style-name="T26">name</text:span> <text:span text:style-name="T53">=</text:span> <text:span text:style-name="T41">"comunicarAnotacionsPendentsResponse"</text:span> <text:span text:style-name="T14">&gt;</text:span> </text:p>
      <text:p text:style-name="P178"><text:span text:style-name="T14">&lt;</text:span> <text:span text:style-name="T21">xs:sequence</text:span> <text:span text:style-name="T14">/&gt;</text:span> </text:p>
      <text:p text:style-name="P178"><text:span text:style-name="T14">&lt;/</text:span> <text:span text:style-name="T21">xs:complexType</text:span> <text:span text:style-name="T14">&gt;</text:span> </text:p>
      <text:p text:style-name="P178"><text:span text:style-name="T14">&lt;/</text:span> <text:span text:style-name="T21">xs:schema</text:span> <text:span text:style-name="T14">&gt;</text:span> </text:p>
      <text:p text:style-name="P178"><text:span text:style-name="T53"><text:s text:c="5"/></text:span><text:span text:style-name="T14">&lt;/</text:span> <text:span text:style-name="T21">wsdl:types</text:span> <text:span text:style-name="T14">&gt;</text:span> </text:p>
      <text:p text:style-name="P178"><text:span text:style-name="T53"><text:s text:c="5"/></text:span><text:span text:style-name="T14">&lt;</text:span> <text:span text:style-name="T21">wsdl:message</text:span> <text:span text:style-name="T26">name</text:span> <text:span text:style-name="T53">=</text:span> <text:span text:style-name="T41">"comunicarAnotacionsPendents"</text:span> <text:span text:style-name="T14">&gt;</text:span> </text:p>
      <text:p text:style-name="P178"><text:span text:style-name="T53"><text:s text:c="7"/></text:span><text:span text:style-name="T14">&lt;</text:span> <text:span text:style-name="T21">wsdl:part</text:span> <text:span text:style-name="T26">element</text:span> <text:span text:style-name="T53">=</text:span> <text:span text:style-name="T41">"tns:comunicarAnotacionsPendents"</text:span> <text:span text:style-name="T26">name</text:span> <text:span text:style-name="T53">=</text:span> <text:span text:style-name="T41">"parameters"</text:span> <text:span text:style-name="T14">&gt;</text:span> </text:p>
      <text:p text:style-name="P178"><text:span text:style-name="T53"><text:s text:c="7"/></text:span><text:span text:style-name="T14">&lt;/</text:span> <text:span text:style-name="T21">wsdl:part</text:span> <text:span text:style-name="T14">&gt;</text:span> </text:p>
      <text:p text:style-name="P178"><text:span text:style-name="T53"><text:s text:c="5"/></text:span><text:span text:style-name="T14">&lt;/</text:span> <text:span text:style-name="T21">wsdl:message</text:span> <text:span text:style-name="T14">&gt;</text:span> </text:p>
      <text:p text:style-name="P178"><text:span text:style-name="T53"><text:s text:c="5"/></text:span><text:span text:style-name="T14">&lt;</text:span> <text:span text:style-name="T21">wsdl:message</text:span> <text:span text:style-name="T26">name</text:span> <text:span text:style-name="T53">=</text:span> <text:span text:style-name="T41">"comunicarAnotacionsPendentsResponse"</text:span> <text:span text:style-name="T14">&gt;</text:span> </text:p>
      <text:p text:style-name="P178"><text:span text:style-name="T53"><text:s text:c="7"/></text:span><text:span text:style-name="T14">&lt;</text:span> <text:span text:style-name="T21">wsdl:part</text:span> <text:span text:style-name="T26">element</text:span> <text:span text:style-name="T53">=</text:span> <text:span text:style-name="T41">"tns:comunicarAnotacionsPendentsResponse"</text:span> <text:span text:style-name="T26">name</text:span> <text:span text:style-name="T53">=</text:span> <text:span text:style-name="T41">"parameters"</text:span> <text:span text:style-name="T14">&gt;</text:span> </text:p>
      <text:p text:style-name="P178"><text:span text:style-name="T53"><text:s text:c="7"/></text:span><text:span text:style-name="T14">&lt;/</text:span> <text:span text:style-name="T21">wsdl:part</text:span> <text:span text:style-name="T14">&gt;</text:span> </text:p>
      <text:p text:style-name="P178"><text:span text:style-name="T53"><text:s text:c="5"/></text:span><text:span text:style-name="T14">&lt;/</text:span> <text:span text:style-name="T21">wsdl:message</text:span> <text:span text:style-name="T14">&gt;</text:span> </text:p>
      <text:p text:style-name="P178"><text:span text:style-name="T53"><text:s text:c="5"/></text:span><text:span text:style-name="T14">&lt;</text:span> <text:span text:style-name="T21">wsdl:portType</text:span> <text:span text:style-name="T26">name</text:span> <text:span text:style-name="T53">=</text:span> <text:span text:style-name="T41">"Backoffice"</text:span> <text:span text:style-name="T14">&gt;</text:span> </text:p>
      <text:p text:style-name="P178"><text:span text:style-name="T53"><text:s text:c="7"/></text:span><text:span text:style-name="T14">&lt;</text:span> <text:span text:style-name="T21">wsdl:operation</text:span> <text:span text:style-name="T26">name</text:span> <text:span text:style-name="T53">=</text:span> <text:span text:style-name="T41">"comunicarAnotacionsPendents"</text:span> <text:span text:style-name="T14">&gt;</text:span> </text:p>
      <text:p text:style-name="P178"><text:span text:style-name="T53"><text:s text:c="9"/></text:span><text:span text:style-name="T14">&lt;</text:span> <text:span text:style-name="T21">wsdl:input</text:span> <text:span text:style-name="T26">message</text:span> <text:span text:style-name="T53">=</text:span> <text:span text:style-name="T41">"tns:comunicarAnotacionsPendents"</text:span> <text:span text:style-name="T26">name</text:span> <text:span text:style-name="T53">=</text:span> <text:span text:style-name="T41">"comunicarAnotacionsPendents"</text:span> <text:span text:style-name="T14">&gt;</text:span> </text:p>
      <text:p text:style-name="P178"><text:span text:style-name="T53"><text:s text:c="7"/></text:span><text:span text:style-name="T14">&lt;/</text:span> <text:span text:style-name="T21">wsdl:input</text:span> <text:span text:style-name="T14">&gt;</text:span> </text:p>
      <text:p text:style-name="P178"><text:soft-page-break/><text:s/><text:span text:style-name="T53"><text:s text:c="9"/></text:span><text:span text:style-name="T14">&lt;</text:span> <text:span text:style-name="T21">wsdl:output</text:span> <text:span text:style-name="T26">message</text:span> <text:span text:style-name="T53">=</text:span> <text:span text:style-name="T41">"tns:comunicarAnotacionsPendentsResponse"</text:span> <text:span text:style-name="T26">name</text:span> <text:span text:style-name="T53">=</text:span> <text:span text:style-name="T41">"comunicarAnotacionsPendentsResponse"</text:span> <text:span text:style-name="T14">&gt;</text:span> </text:p>
      <text:p text:style-name="P178"><text:span text:style-name="T53"><text:s text:c="7"/></text:span><text:span text:style-name="T14">&lt;/</text:span> <text:span text:style-name="T21">wsdl:output</text:span> <text:span text:style-name="T14">&gt;</text:span> </text:p>
      <text:p text:style-name="P178"><text:s text:c="2"/><text:span text:style-name="T53"><text:s text:c="7"/></text:span><text:span text:style-name="T14">&lt;/</text:span> <text:span text:style-name="T21">wsdl:operation</text:span> <text:span text:style-name="T14">&gt;</text:span> </text:p>
      <text:p text:style-name="P178"><text:span text:style-name="T53"><text:s text:c="5"/></text:span><text:span text:style-name="T14">&lt;/</text:span> <text:span text:style-name="T21">wsdl:portType</text:span> <text:span text:style-name="T14">&gt;</text:span> </text:p>
      <text:p text:style-name="P178"><text:span text:style-name="T53"><text:s text:c="5"/></text:span><text:span text:style-name="T14">&lt;</text:span> <text:span text:style-name="T21">wsdl:binding</text:span> <text:span text:style-name="T26">name</text:span> <text:span text:style-name="T53">=</text:span> <text:span text:style-name="T41">"BackofficeServiceSoapBinding"</text:span> <text:span text:style-name="T26">type</text:span> <text:span text:style-name="T53">=</text:span> <text:span text:style-name="T41">"tns:Backoffice"</text:span> <text:span text:style-name="T14">&gt;</text:span> </text:p>
      <text:p text:style-name="P178"><text:span text:style-name="T53"><text:s text:c="7"/></text:span><text:span text:style-name="T14">&lt;</text:span> <text:span text:style-name="T21">soap:binding</text:span> <text:span text:style-name="T26">style</text:span> <text:span text:style-name="T53">=</text:span> <text:span text:style-name="T41">"document"</text:span> <text:span text:style-name="T26">transport</text:span> <text:span text:style-name="T53">=</text:span> <text:span text:style-name="T41">"http://schemas.xmlsoap.org/soap/http"</text:span> <text:span text:style-name="T14">/&gt;</text:span> </text:p>
      <text:p text:style-name="P178"><text:span text:style-name="T53"><text:s text:c="7"/></text:span><text:span text:style-name="T14">&lt;</text:span> <text:span text:style-name="T21">wsdl:operation</text:span> <text:span text:style-name="T26">name</text:span> <text:span text:style-name="T53">=</text:span> <text:span text:style-name="T41">"comunicarAnotacionsPendents"</text:span> <text:span text:style-name="T14">&gt;</text:span> </text:p>
      <text:p text:style-name="P178"><text:span text:style-name="T53"><text:s text:c="9"/></text:span><text:span text:style-name="T14">&lt;</text:span> <text:span text:style-name="T21">soap:operation</text:span> <text:span text:style-name="T26">soapAction</text:span> <text:span text:style-name="T53">=</text:span> <text:span text:style-name="T41">""</text:span> <text:span text:style-name="T26">style</text:span> <text:span text:style-name="T53">=</text:span> <text:span text:style-name="T41">"document"</text:span> <text:span text:style-name="T14">/&gt;</text:span> </text:p>
      <text:p text:style-name="P178"><text:span text:style-name="T53"><text:s text:c="9"/></text:span><text:span text:style-name="T14">&lt;</text:span> <text:span text:style-name="T21">wsdl:input</text:span> <text:span text:style-name="T26">name</text:span> <text:span text:style-name="T53">=</text:span> <text:span text:style-name="T41">"comunicarAnotacionsPendents"</text:span> <text:span text:style-name="T14">&gt;</text:span> </text:p>
      <text:p text:style-name="P178"><text:span text:style-name="T53"><text:s text:c="11"/></text:span><text:span text:style-name="T14">&lt;</text:span> <text:span text:style-name="T21">soap:body</text:span> <text:span text:style-name="T26">use</text:span> <text:span text:style-name="T53">=</text:span> <text:span text:style-name="T41">"literal"</text:span> <text:span text:style-name="T14">/&gt;</text:span> </text:p>
      <text:p text:style-name="P178"><text:span text:style-name="T53"><text:s text:c="9"/></text:span><text:span text:style-name="T14">&lt;/</text:span> <text:span text:style-name="T21">wsdl:input</text:span> <text:span text:style-name="T14">&gt;</text:span> </text:p>
      <text:p text:style-name="P178"><text:span text:style-name="T53"><text:s text:c="9"/></text:span><text:span text:style-name="T14">&lt;</text:span> <text:span text:style-name="T21">wsdl:output</text:span> <text:span text:style-name="T26">name</text:span> <text:span text:style-name="T53">=</text:span> <text:span text:style-name="T41">"comunicarAnotacionsPendentsResponse"</text:span> <text:span text:style-name="T14">&gt;</text:span> </text:p>
      <text:p text:style-name="P178"><text:span text:style-name="T53"><text:s text:c="11"/></text:span><text:span text:style-name="T14">&lt;</text:span> <text:span text:style-name="T21">soap:body</text:span> <text:span text:style-name="T26">use</text:span> <text:span text:style-name="T53">=</text:span> <text:span text:style-name="T41">"literal"</text:span> <text:span text:style-name="T14">/&gt;</text:span> </text:p>
      <text:p text:style-name="P178"><text:span text:style-name="T53"><text:s text:c="9"/></text:span><text:span text:style-name="T14">&lt;/</text:span> <text:span text:style-name="T21">wsdl:output</text:span> <text:span text:style-name="T14">&gt;</text:span> </text:p>
      <text:p text:style-name="P178"><text:span text:style-name="T53"><text:s text:c="7"/></text:span><text:span text:style-name="T14">&lt;/</text:span> <text:span text:style-name="T21">wsdl:operation</text:span> <text:span text:style-name="T14">&gt;</text:span> </text:p>
      <text:p text:style-name="P178"><text:span text:style-name="T53"><text:s text:c="5"/></text:span><text:span text:style-name="T14">&lt;/</text:span> <text:span text:style-name="T21">wsdl:binding</text:span> <text:span text:style-name="T14">&gt;</text:span> </text:p>
      <text:p text:style-name="P178"><text:span text:style-name="T53"><text:s text:c="5"/></text:span><text:span text:style-name="T14">&lt;</text:span> <text:span text:style-name="T21">wsdl:service</text:span> <text:span text:style-name="T26">name</text:span> <text:span text:style-name="T53">=</text:span> <text:span text:style-name="T41">"BackofficeService"</text:span> <text:span text:style-name="T14">&gt;</text:span> </text:p>
      <text:p text:style-name="P178"><text:s text:c="3"/><text:span text:style-name="T53"><text:s text:c="7"/></text:span><text:span text:style-name="T14">&lt;</text:span> <text:span text:style-name="T21">wsdl:port</text:span> <text:span text:style-name="T26">binding</text:span> <text:span text:style-name="T53">=</text:span> <text:span text:style-name="T41">"tns:BackofficeServiceSoapBinding"</text:span> <text:span text:style-name="T26">name</text:span> <text:span text:style-name="T53">=</text:span> <text:span text:style-name="T41">"BackofficeServicePort"</text:span> <text:span text:style-name="T14">&gt;</text:span> </text:p>
      <text:p text:style-name="P178"><text:span text:style-name="T53"><text:s text:c="9"/></text:span><text:span text:style-name="T14">&lt;</text:span> <text:span text:style-name="T21">soap:address</text:span> <text:span text:style-name="T26">location</text:span> <text:span text:style-name="T53">=</text:span> <text:span text:style-name="T41">"http://localhost:8080/distribucio/ws/backoffice"</text:span> <text:span text:style-name="T14">/&gt;</text:span> </text:p>
      <text:p text:style-name="P178"><text:span text:style-name="T53"><text:s text:c="7"/></text:span><text:span text:style-name="T14">&lt;/</text:span> <text:span text:style-name="T21">wsdl:port</text:span> <text:span text:style-name="T14">&gt;</text:span> </text:p>
      <text:p text:style-name="P178"><text:span text:style-name="T53"><text:s text:c="5"/></text:span><text:span text:style-name="T14">&lt;/</text:span> <text:span text:style-name="T21">wsdl:service</text:span> <text:span text:style-name="T14">&gt;</text:span> </text:p>
      <text:p text:style-name="P179"><text:span text:style-name="T14">&lt;/</text:span> <text:span text:style-name="T21">wsdl:definitions</text:span> <text:span text:style-name="T14">&gt;</text:span> </text:p>
      <text:p text:style-name="P43"><text:s text:c="3"/></text:p>
      <text:list text:continue-numbering="true" text:style-name="Outline">
        <text:list-header>
          <text:h text:style-name="P392" text:outline-level="1" text:is-list-header="true"><text:bookmark-start text:name="__RefHeading___Toc60796_1326387233"/><text:span text:style-name="T118">Annex </text:span><text:span text:style-name="T234">II</text:span><text:span text:style-name="T118">: </text:span><text:span text:style-name="T232">E</text:span><text:span text:style-name="T233">xemple d'ús de la llibreria de </text:span><text:span text:style-name="T235">distribucio-backoffice-utils</text:span><text:bookmark-end text:name="__RefHeading___Toc60796_1326387233"/></text:h>
        </text:list-header>
      </text:list>
      <table:table table:name="Table4" table:style-name="Table4">
        <table:table-column table:style-name="Table4.A"/>
        <table:table-row>
          <table:table-cell table:style-name="Table4.A1" office:value-type="string">
            <text:p text:style-name="P426"><text:span text:style-name="T370">/**<text:line-break/> * <text:line-break/> */<text:line-break/></text:span><text:span text:style-name="T354">package </text:span><text:span text:style-name="T79">es.caib.distribucio.back.rest;</text:span><text:span text:style-name="T358"><text:line-break/><text:line-break/></text:span><text:span text:style-name="T354">import </text:span><text:span text:style-name="T79">java.util.List;</text:span><text:span text:style-name="T358"><text:line-break/><text:line-break/></text:span><text:span text:style-name="T354">import </text:span><text:span text:style-name="T79">javax.servlet.http.HttpServletRequest;</text:span><text:span text:style-name="T358"><text:line-break/><text:line-break/></text:span><text:span text:style-name="T354">import </text:span><text:span text:style-name="T79">org.slf4j.Logger;</text:span><text:span text:style-name="T358"><text:line-break/></text:span><text:span text:style-name="T354">import </text:span><text:span text:style-name="T79">org.slf4j.LoggerFactory;<text:line-break/></text:span><text:span text:style-name="T354">import</text:span><text:span text:style-name="T79"> </text:span><text:span text:style-name="T79">org.springframework.http.HttpStatus;<text:line-break/></text:span><text:span text:style-name="T354">import</text:span><text:span text:style-name="T79"> </text:span><text:span text:style-name="T79">org.springframework.http.ResponseEntity;<text:line-break/></text:span><text:span text:style-name="T354">import</text:span><text:span text:style-name="T79"> </text:span><text:span text:style-name="T79">org.springframework.web.bind.annotation.</text:span><text:span text:style-name="T79">RequestBody</text:span><text:span text:style-name="T79">;<text:line-break/></text:span><text:span text:style-name="T354">import</text:span><text:span text:style-name="T79"> </text:span><text:span text:style-name="T79">org.springframework.web.bind.annotation.</text:span><text:span text:style-name="T79">RequestMapping</text:span><text:span text:style-name="T79">;<text:line-break/></text:span><text:span text:style-name="T354">import</text:span><text:span text:style-name="T79"> </text:span><text:span text:style-name="T79">org.springframework.web.bind.annotation.RequestMethod;<text:line-break/></text:span><text:span text:style-name="T354">import</text:span><text:span text:style-name="T79"> </text:span><text:span text:style-name="T79">org.springframework.web.bind.annotation.</text:span><text:span text:style-name="T79">ResponseBody</text:span><text:span text:style-name="T79">;<text:line-break/><text:line-break/></text:span><text:span text:style-name="T354">import</text:span><text:span text:style-name="T79"> </text:span><text:span text:style-name="T79">es.caib.distribucio.back.controller.BaseUserController;<text:line-break/></text:span><text:span text:style-name="T354">import</text:span><text:span text:style-name="T79"> </text:span><text:span text:style-name="T79">es.caib.distribucio.logic.intf.service.ws.backoffice.AnotacioRegistreId;<text:line-break/></text:span><text:span text:style-name="T354">import</text:span><text:span text:style-name="T79"> </text:span><text:span text:style-name="T79">es.caib.distribucio.logic.intf.service.ws.backoffice.BackofficeWsService;</text:span><text:span text:style-name="T358"><text:line-break/><text:line-break/></text:span><text:span text:style-name="T370">/**<text:line-break/> * Controlador REST per rebre les comunicacions d'anotacions pendents via API REST com<text:line-break/> * a backoffice de Distribucio. És un controlador només de proves, és el mètode API<text:line-break/> * REST que han d'implementar els propis backoffices per rebre anotacions pendents via API REST.<text:line-break/> * <text:line-break/> * <text:line-break/> * </text:span><text:span text:style-name="T375">@author </text:span><text:span text:style-name="T370">Limit Tecnologies </text:span><text:span text:style-name="T376">&lt;limit</text:span><text:span text:style-name="T370">@limit.es&gt;<text:line-break/> */<text:line-break/></text:span><text:span text:style-name="T371">@</text:span><text:span text:style-name="T372">Controller</text:span><text:span text:style-name="T377"><text:line-break/></text:span><text:span text:style-name="T371">@RequestMapping</text:span><text:span text:style-name="T79">(</text:span><text:span text:style-name="T365">"/public/backoffice"</text:span><text:span text:style-name="T79">)</text:span><text:span text:style-name="T377"><text:line-break/></text:span><text:span text:style-name="T354">public class </text:span><text:span text:style-name="T79">BackofficeRestController</text:span><text:span text:style-name="T358"> </text:span><text:span text:style-name="T354">extends </text:span><text:span text:style-name="T79">BaseUserController {</text:span><text:span text:style-name="T358"><text:line-break/><text:tab/></text:span><text:span text:style-name="T371"><text:line-break/><text:tab/></text:span><text:span text:style-name="T79">BackofficeWsService</text:span><text:span text:style-name="T358"> </text:span><text:span text:style-name="T361">backofficeWs</text:span><text:span text:style-name="T358">;<text:line-break/><text:line-break/><text:tab/></text:span><text:span text:style-name="T370">/** Retorna la documentació de l'API. */<text:line-break/><text:tab/></text:span><text:span text:style-name="T371">@RequestMapping</text:span><text:span text:style-name="T79">(value = {</text:span><text:span text:style-name="T365">""</text:span><text:span text:style-name="T79">,</text:span><text:span text:style-name="T358"> </text:span><text:span text:style-name="T365">"/"</text:span><text:span text:style-name="T79">,</text:span><text:span text:style-name="T358"> </text:span><text:span text:style-name="T365">"/apidoc"</text:span><text:span text:style-name="T79">}, method = RequestMethod.</text:span><text:span text:style-name="T363">GET</text:span><text:span text:style-name="T79">)</text:span><text:span text:style-name="T358"><text:line-break/><text:tab/></text:span><text:span text:style-name="T354">public </text:span><text:span text:style-name="T79">String</text:span><text:span text:style-name="T358"> </text:span><text:span text:style-name="T379">documentacio</text:span><text:span text:style-name="T79">(HttpServletRequest request) {</text:span><text:span text:style-name="T358"><text:line-break/><text:tab/><text:tab/><text:line-break/><text:tab/><text:tab/></text:span><text:span text:style-name="T354">return </text:span><text:span text:style-name="T365">"apidoc"</text:span><text:span text:style-name="T79">;</text:span><text:span text:style-name="T358"><text:line-break/><text:tab/></text:span><text:span text:style-name="T79">}</text:span><text:span text:style-name="T358"><text:line-break/><text:line-break/><text:tab/><text:line-break/><text:tab/></text:span><text:span text:style-name="T371">@RequestMapping</text:span><text:span text:style-name="T79">(value = </text:span><text:span text:style-name="T365">"/comunicarAnotacionsPendents"</text:span><text:span text:style-name="T79">, method = RequestMethod.</text:span><text:span text:style-name="T363">POST</text:span><text:span text:style-name="T79">)</text:span><text:span text:style-name="T358"><text:line-break/><text:tab/></text:span><text:span text:style-name="T371">@ResponseBody<text:line-break/><text:tab/></text:span><text:span text:style-name="T354">public </text:span><text:span text:style-name="T79">ResponseEntity&lt;Object&gt;</text:span><text:span text:style-name="T358"> </text:span><text:span text:style-name="T379">comunicarAnotacionsPendents</text:span><text:span text:style-name="T79">(<text:tab/><text:tab/><text:tab/><text:line-break/><text:tab/><text:tab/><text:tab/>HttpServletRequest request,</text:span><text:span text:style-name="T358"><text:line-break/><text:tab/><text:tab/><text:tab/></text:span><text:span text:style-name="T371">@RequestBody</text:span><text:span text:style-name="T79">(required = </text:span><text:span text:style-name="T354">true</text:span><text:span text:style-name="T79">) List&lt;AnotacioRegistreId&gt; ids) {</text:span><text:span text:style-name="T358"><text:line-break/><text:tab/><text:tab/></text:span><text:span text:style-name="T354">try </text:span><text:span text:style-name="T79">{</text:span><text:span text:style-name="T358"><text:line-break/><text:tab/><text:tab/><text:tab/></text:span><text:span text:style-name="T363">logger</text:span><text:span text:style-name="T79">.debug(</text:span><text:span text:style-name="T365">"S'ha rebut una comunicació de " </text:span><text:span text:style-name="T79">+ ids.size() +</text:span><text:span text:style-name="T358"> </text:span><text:span text:style-name="T365">" anotacions pendents: " </text:span><text:span text:style-name="T79">+ ids);</text:span><text:span text:style-name="T358"><text:line-break/><text:tab/><text:tab/><text:tab/></text:span><text:span text:style-name="T361">backofficeWs</text:span><text:span text:style-name="T79">.comunicarAnotacionsPendents(ids);<text:line-break/></text:span><text:soft-page-break/><text:span text:style-name="T79"><text:tab/><text:tab/><text:tab/>String msg = </text:span><text:span text:style-name="T365">"La comunicació de les anotacions pendents s'ha processat correctament."</text:span><text:span text:style-name="T79">;</text:span><text:span text:style-name="T358"><text:line-break/><text:tab/><text:tab/><text:tab/></text:span><text:span text:style-name="T363">logger</text:span><text:span text:style-name="T79">.debug(msg);</text:span><text:span text:style-name="T358"><text:line-break/><text:tab/><text:tab/><text:tab/></text:span><text:span text:style-name="T354">return new </text:span><text:span text:style-name="T79">ResponseEntity&lt;Object&gt;(msg, HttpStatus.</text:span><text:span text:style-name="T363">OK</text:span><text:span text:style-name="T79">);</text:span><text:span text:style-name="T358"><text:line-break/><text:tab/><text:tab/></text:span><text:span text:style-name="T79">}</text:span><text:span text:style-name="T358"> </text:span><text:span text:style-name="T354">catch</text:span><text:span text:style-name="T79">(Exception e) {<text:line-break/><text:tab/><text:tab/><text:tab/>String errorDescripcio = </text:span><text:span text:style-name="T365">"La comunicació de les anotacions pendents s'ha processat amb error: "</text:span><text:span text:style-name="T79"> </text:span><text:span text:style-name="T79">+ e.getMessage();</text:span><text:span text:style-name="T358"><text:line-break/><text:tab/><text:tab/><text:tab/></text:span><text:span text:style-name="T363">logger</text:span><text:span text:style-name="T79">.error(errorDescripcio, e);</text:span><text:span text:style-name="T358"><text:line-break/><text:tab/><text:tab/><text:tab/></text:span><text:span text:style-name="T354">return new </text:span><text:span text:style-name="T79">ResponseEntity&lt;Object&gt;(errorDescripcio, HttpStatus.</text:span><text:span text:style-name="T363">INTERNAL_SERVER_ERROR</text:span><text:span text:style-name="T79">);<text:line-break/><text:tab/><text:tab/>}<text:line-break/><text:tab/>}</text:span><text:span text:style-name="T358"><text:line-break/><text:line-break/><text:tab/></text:span><text:span text:style-name="T354">private static final </text:span><text:span text:style-name="T79">Logger</text:span><text:span text:style-name="T358"> </text:span><text:span text:style-name="T363">logger </text:span><text:span text:style-name="T79">= LoggerFactory.</text:span><text:span text:style-name="T83">getLogger</text:span><text:span text:style-name="T79">(BackofficeRestController.</text:span><text:span text:style-name="T354">class</text:span><text:span text:style-name="T79">);<text:line-break/>}</text:span></text:p>
          </table:table-cell>
        </table:table-row>
      </table:table>
      <text:p text:style-name="P172"><draw:frame text:anchor-type="paragraph" draw:z-index="55" draw:name="Forma4" draw:style-name="gr2" draw:text-style-name="P469" svg:width="18.058cm" svg:height="5.181cm" svg:x="0.43cm" svg:y="0.766cm"><draw:text-box><text:p/></draw:text-box></draw:frame></text:p>
      <text:p text:style-name="P1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JetBrains Mono" svg:font-family="'JetBrains Mono'"/>
    <style:font-face style:name="JetBrains Mono1" svg:font-family="'JetBrains Mono'" style:font-family-generic="swiss"/>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number:text>
      <number:month number:style="long"/>
      <number:text>.</number:text>
      <number:year/>
    </number:date-style>
    <number:date-style style:name="N10111" number:language="ca" number:country="ES">
      <number:day/>
      <number:text>.</number:text>
      <number:month number:style="long"/>
      <number:text>.</number:text>
      <number:year/>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8" style:family="paragraph" style:parent-style-name="Footer">
      <style:text-properties style:font-name="Calibri1"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loext:decorative="false"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loext:decorative="fals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table-cell office:value-type="string">
              <text:p text:style-name="MP1"><draw:g text:anchor-type="as-char" draw:z-index="52" draw:name="Forma1" draw:style-name="Mgr1"><draw:frame draw:name="Picture 2" draw:style-name="Mgr2" draw:text-style-name="MP2" svg:width="6.781cm" svg:height="1.241cm" svg:x="1.72cm" svg:y="0cm"><draw:image xlink:href="Pictures/10000000000006A400000104792F8214.png" xlink:type="simple" xlink:show="embed" xlink:actuate="onLoad" draw:mime-type="image/png"><text:p/></draw:image></draw:frame><draw:frame draw:name="Picture 3" draw:style-name="Mgr3" draw:text-style-name="MP2" svg:width="1.606cm" svg:height="1.239cm" svg:x="0cm" svg:y="0cm"><draw:image xlink:href="Pictures/10000001000002E6000002BBD71058E4.png" xlink:type="simple" xlink:show="embed" xlink:actuate="onLoad" draw: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03_Distribucio_Manual_Integració.odt</text:file-name></text:p>
            </table:table-cell>
            <table:covered-table-cell/>
            <table:covered-table-cell/>
            <table:table-cell table:style-name="Taula5.A1" office:value-type="string">
              <text:p text:style-name="MP5"><text:span text:style-name="MT1">Pàgina </text:span><text:span text:style-name="MT1"><text:page-number text:select-page="current">47</text:page-number></text:span><text:span text:style-name="MT1"><text:s/>/ </text:span><text:span text:style-name="MT1"><text:page-count>47</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26-06-22T11:23:31.418999824">22/06/2026</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0-08T11:33:11.913808357</meta:creation-date>
    <meta:editing-duration>P3DT11H45M26S</meta:editing-duration>
    <meta:editing-cycles>306</meta:editing-cycles>
    <meta:generator>LibreOffice/24.2.1.2$Windows_X86_64 LibreOffice_project/db4def46b0453cc22e2d0305797cf981b68ef5ac</meta:generator>
    <dc:date>2026-06-22T11:23:31.329000000</dc:date>
    <meta:document-statistic meta:table-count="36" meta:image-count="15" meta:object-count="0" meta:page-count="47" meta:paragraph-count="1645" meta:word-count="9339" meta:character-count="66738" meta:non-whitespace-character-count="57772"/>
  </office:meta>
</office:document-meta>
</file>