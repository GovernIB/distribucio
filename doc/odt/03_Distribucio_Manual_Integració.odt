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10000001000002A40000005B1334E899686238FD.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19" style:family="paragraph" style:parent-style-name="Standard">
      <style:paragraph-properties fo:text-align="end" style:justify-single-word="false"/>
      <style:text-properties officeooo:paragraph-rsid="001dc238"/>
    </style:style>
    <style:style style:name="P20" style:family="paragraph" style:parent-style-name="Standard">
      <style:paragraph-properties fo:margin-top="0.499cm" fo:margin-bottom="0.199cm" style:contextual-spacing="false" fo:text-align="end" style:justify-single-word="false"/>
      <style:text-properties officeooo:paragraph-rsid="001bba47"/>
    </style:style>
    <style:style style:name="P21" style:family="paragraph" style:parent-style-name="Standard">
      <style:text-properties officeooo:paragraph-rsid="001bba47"/>
    </style:style>
    <style:style style:name="P22"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3"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4"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5" style:family="paragraph" style:parent-style-name="Standard">
      <style:text-properties fo:font-weight="bold" officeooo:paragraph-rsid="001d1802" style:font-weight-asian="bold" style:font-weight-complex="bold"/>
    </style:style>
    <style:style style:name="P26" style:family="paragraph" style:parent-style-name="Text_20_body">
      <style:text-properties fo:font-weight="bold" officeooo:rsid="00ea866e" officeooo:paragraph-rsid="00d673d7" style:font-weight-asian="bold" style:font-weight-complex="bold"/>
    </style:style>
    <style:style style:name="P27" style:family="paragraph" style:parent-style-name="Text_20_body">
      <style:text-properties fo:font-weight="bold" officeooo:rsid="00ebb296" officeooo:paragraph-rsid="00d673d7" style:font-weight-asian="bold" style:font-weight-complex="bold"/>
    </style:style>
    <style:style style:name="P28"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29"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1"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2"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3"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4"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5"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6"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38"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39" style:family="paragraph" style:parent-style-name="Standard">
      <style:paragraph-properties fo:text-align="justify" style:justify-single-word="false"/>
      <style:text-properties officeooo:paragraph-rsid="008ce69e"/>
    </style:style>
    <style:style style:name="P40" style:family="paragraph" style:parent-style-name="Standard">
      <style:paragraph-properties fo:text-align="justify" style:justify-single-word="false"/>
      <style:text-properties officeooo:paragraph-rsid="00d673d7"/>
    </style:style>
    <style:style style:name="P41"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2" style:family="paragraph" style:parent-style-name="Table_20_Contents">
      <style:paragraph-properties fo:text-align="justify" style:justify-single-word="false"/>
      <style:text-properties officeooo:paragraph-rsid="01a9cdd2"/>
    </style:style>
    <style:style style:name="P43" style:family="paragraph" style:parent-style-name="Table_20_Contents">
      <style:paragraph-properties fo:text-align="justify" style:justify-single-word="false"/>
      <style:text-properties officeooo:paragraph-rsid="019cebf9"/>
    </style:style>
    <style:style style:name="P44" style:family="paragraph" style:parent-style-name="Table_20_Contents">
      <style:paragraph-properties fo:text-align="justify" style:justify-single-word="false"/>
    </style:style>
    <style:style style:name="P45" style:family="paragraph" style:parent-style-name="Text_20_body">
      <style:paragraph-properties fo:text-align="justify" style:justify-single-word="false"/>
      <style:text-properties officeooo:paragraph-rsid="018c7b7a"/>
    </style:style>
    <style:style style:name="P46" style:family="paragraph" style:parent-style-name="Text_20_body">
      <style:paragraph-properties fo:text-align="justify" style:justify-single-word="false"/>
      <style:text-properties officeooo:paragraph-rsid="01a3408a"/>
    </style:style>
    <style:style style:name="P47" style:family="paragraph" style:parent-style-name="Standard">
      <style:paragraph-properties fo:margin-top="0cm" fo:margin-bottom="0.212cm" style:contextual-spacing="false" fo:text-align="start" style:justify-single-word="false"/>
      <style:text-properties officeooo:paragraph-rsid="001d1802"/>
    </style:style>
    <style:style style:name="P48" style:family="paragraph" style:parent-style-name="Standard">
      <style:paragraph-properties fo:margin-top="0cm" fo:margin-bottom="0.212cm" style:contextual-spacing="false" fo:text-align="start" style:justify-single-word="false"/>
      <style:text-properties officeooo:paragraph-rsid="00649479"/>
    </style:style>
    <style:style style:name="P49" style:family="paragraph" style:parent-style-name="Standard">
      <style:paragraph-properties fo:margin-top="0cm" fo:margin-bottom="0.212cm" style:contextual-spacing="false" fo:text-align="start" style:justify-single-word="false"/>
      <style:text-properties officeooo:paragraph-rsid="00ec4c44"/>
    </style:style>
    <style:style style:name="P50" style:family="paragraph" style:parent-style-name="Standard">
      <style:paragraph-properties fo:margin-left="0cm" fo:margin-right="0cm" fo:text-align="start" style:justify-single-word="false" fo:text-indent="0cm" style:auto-text-indent="false"/>
    </style:style>
    <style:style style:name="P51"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2"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3" style:family="paragraph" style:parent-style-name="Standard">
      <style:paragraph-properties fo:margin-left="0cm" fo:margin-right="0cm" fo:text-align="start" style:justify-single-word="false" fo:text-indent="0cm" style:auto-text-indent="false"/>
      <style:text-properties officeooo:paragraph-rsid="00d673d7"/>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5"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6" style:family="paragraph" style:parent-style-name="Standard">
      <style:paragraph-properties fo:text-align="start" style:justify-single-word="false" fo:padding="0.049cm" fo:border="0.06pt solid #000000" style:shadow="#000000 0cm 0cm"/>
      <style:text-properties officeooo:paragraph-rsid="0195481e"/>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5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1" style:family="paragraph" style:parent-style-name="Standard">
      <style:text-properties fo:font-style="normal" officeooo:rsid="00d63ec8" officeooo:paragraph-rsid="00d673d7" style:font-style-asian="normal" style:font-style-complex="normal"/>
    </style:style>
    <style:style style:name="P62" style:family="paragraph" style:parent-style-name="Standard">
      <style:text-properties fo:font-style="normal" officeooo:rsid="00db5ce5" officeooo:paragraph-rsid="00d673d7" style:font-style-asian="normal" style:font-style-complex="normal"/>
    </style:style>
    <style:style style:name="P63" style:family="paragraph" style:parent-style-name="Standard">
      <style:text-properties fo:font-style="normal" officeooo:rsid="00db5ce5" officeooo:paragraph-rsid="00e8f23e" style:font-style-asian="normal" style:font-style-complex="normal"/>
    </style:style>
    <style:style style:name="P64" style:family="paragraph" style:parent-style-name="Standard">
      <style:text-properties fo:font-style="normal" officeooo:rsid="00e8f23e" officeooo:paragraph-rsid="00e8f23e" style:font-style-asian="normal" style:font-style-complex="normal"/>
    </style:style>
    <style:style style:name="P65" style:family="paragraph" style:parent-style-name="Text_20_body">
      <style:text-properties fo:font-style="normal" officeooo:rsid="00d81a0e" officeooo:paragraph-rsid="00d673d7" style:font-style-asian="normal" style:font-style-complex="normal"/>
    </style:style>
    <style:style style:name="P66" style:family="paragraph" style:parent-style-name="Text_20_body">
      <style:text-properties fo:font-style="normal" officeooo:rsid="00d901df" officeooo:paragraph-rsid="00d673d7" style:font-style-asian="normal" style:font-style-complex="normal"/>
    </style:style>
    <style:style style:name="P67" style:family="paragraph" style:parent-style-name="Text_20_body">
      <style:text-properties fo:font-style="normal" officeooo:rsid="00de9e71" officeooo:paragraph-rsid="00d673d7" style:font-style-asian="normal" style:font-style-complex="normal"/>
    </style:style>
    <style:style style:name="P68" style:family="paragraph" style:parent-style-name="Text_20_body">
      <style:text-properties fo:font-style="normal" officeooo:rsid="00e1e7f8" officeooo:paragraph-rsid="00d673d7" style:font-style-asian="normal" style:font-style-complex="normal"/>
    </style:style>
    <style:style style:name="P69" style:family="paragraph" style:parent-style-name="Text_20_body">
      <style:text-properties fo:font-style="normal" officeooo:rsid="00e1e7f8" officeooo:paragraph-rsid="00e16f63" style:font-style-asian="normal" style:font-style-complex="normal"/>
    </style:style>
    <style:style style:name="P70" style:family="paragraph" style:parent-style-name="Text_20_body">
      <style:text-properties fo:font-style="normal" officeooo:rsid="00ea10cf" officeooo:paragraph-rsid="00e5f97a" style:font-style-asian="normal" style:font-style-complex="normal"/>
    </style:style>
    <style:style style:name="P71" style:family="paragraph" style:parent-style-name="Standard">
      <style:text-properties fo:font-style="normal" officeooo:rsid="00d63ec8" officeooo:paragraph-rsid="00d673d7" fo:background-color="transparent" style:font-style-asian="normal" style:font-style-complex="normal"/>
    </style:style>
    <style:style style:name="P72" style:family="paragraph" style:parent-style-name="Standard">
      <style:text-properties fo:font-style="normal" officeooo:rsid="00e440cb" officeooo:paragraph-rsid="00dda4cb" fo:background-color="transparent" style:font-style-asian="normal" style:font-style-complex="normal"/>
    </style:style>
    <style:style style:name="P73" style:family="paragraph" style:parent-style-name="Text_20_body">
      <style:text-properties fo:font-style="normal" officeooo:rsid="00dfc741" officeooo:paragraph-rsid="00e8f23e" fo:background-color="transparent" style:font-style-asian="normal" style:font-style-complex="normal"/>
    </style:style>
    <style:style style:name="P74"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5"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6"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77"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78" style:family="paragraph" style:parent-style-name="Standard">
      <style:text-properties officeooo:rsid="00db5ce5" officeooo:paragraph-rsid="00e8f23e"/>
    </style:style>
    <style:style style:name="P79"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1"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2"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3"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4"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5"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6"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87"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88"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2"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5"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6"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97"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98"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99"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0"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1" style:family="paragraph" style:parent-style-name="Standard">
      <style:paragraph-properties style:line-height-at-least="0.476cm"/>
      <style:text-properties fo:color="#000000" loext:opacity="100%" officeooo:paragraph-rsid="019cebf9" fo:background-color="#fffffe"/>
    </style:style>
    <style:style style:name="P102" style:family="paragraph" style:parent-style-name="Standard">
      <style:paragraph-properties style:line-height-at-least="0.476cm"/>
      <style:text-properties fo:color="#000000" loext:opacity="100%" officeooo:paragraph-rsid="019cebf9" fo:background-color="#dddddd"/>
    </style:style>
    <style:style style:name="P103" style:family="paragraph" style:parent-style-name="Standard">
      <style:paragraph-properties style:line-height-at-least="0.476cm"/>
      <style:text-properties fo:color="#000000" loext:opacity="100%" officeooo:paragraph-rsid="01b5544c" fo:background-color="#dddddd"/>
    </style:style>
    <style:style style:name="P104"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05"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06"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07"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08"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09"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0"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11"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2" style:family="paragraph" style:parent-style-name="Standard">
      <style:paragraph-properties fo:text-align="justify" style:justify-single-word="false"/>
      <style:text-properties fo:font-size="8pt" officeooo:paragraph-rsid="00d673d7" style:font-size-asian="8pt" style:font-size-complex="8pt"/>
    </style:style>
    <style:style style:name="P113" style:family="paragraph" style:parent-style-name="Standard">
      <style:paragraph-properties fo:text-align="start" style:justify-single-word="false"/>
      <style:text-properties fo:font-size="8pt" officeooo:paragraph-rsid="00d673d7" style:font-size-asian="8pt" style:font-size-complex="8pt"/>
    </style:style>
    <style:style style:name="P114"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1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6"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18"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19"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4"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28" style:family="paragraph" style:parent-style-name="Standard">
      <style:text-properties officeooo:paragraph-rsid="00d673d7"/>
    </style:style>
    <style:style style:name="P129" style:family="paragraph" style:parent-style-name="Text_20_body">
      <style:text-properties officeooo:paragraph-rsid="00d673d7"/>
    </style:style>
    <style:style style:name="P130" style:family="paragraph" style:parent-style-name="Standard">
      <style:text-properties officeooo:rsid="00d4e88a" officeooo:paragraph-rsid="00d8ffe0"/>
    </style:style>
    <style:style style:name="P131" style:family="paragraph" style:parent-style-name="Standard">
      <style:text-properties officeooo:paragraph-rsid="00e8f23e"/>
    </style:style>
    <style:style style:name="P132" style:family="paragraph" style:parent-style-name="Text_20_body">
      <style:text-properties officeooo:paragraph-rsid="00e8f23e"/>
    </style:style>
    <style:style style:name="P133" style:family="paragraph" style:parent-style-name="Fig.">
      <style:text-properties officeooo:paragraph-rsid="00e8f23e"/>
    </style:style>
    <style:style style:name="P134" style:family="paragraph" style:parent-style-name="Standard">
      <style:paragraph-properties fo:text-align="justify" style:justify-single-word="false"/>
      <style:text-properties officeooo:rsid="00931a7c" officeooo:paragraph-rsid="019c96f9"/>
    </style:style>
    <style:style style:name="P135" style:family="paragraph" style:parent-style-name="Text_20_body">
      <style:paragraph-properties fo:text-align="justify" style:justify-single-word="false"/>
      <style:text-properties officeooo:rsid="00931a7c" officeooo:paragraph-rsid="018c7b7a"/>
    </style:style>
    <style:style style:name="P136"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37"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38"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39"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40"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1"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2"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4" style:family="paragraph" style:parent-style-name="Text_20_body">
      <style:paragraph-properties fo:text-align="justify" style:justify-single-word="false"/>
      <style:text-properties officeooo:rsid="0052b05f" officeooo:paragraph-rsid="0074fa21"/>
    </style:style>
    <style:style style:name="P145" style:family="paragraph" style:parent-style-name="Text_20_body">
      <style:paragraph-properties fo:text-align="justify" style:justify-single-word="false"/>
      <style:text-properties officeooo:rsid="00771bf9" officeooo:paragraph-rsid="00771bf9"/>
    </style:style>
    <style:style style:name="P146" style:family="paragraph" style:parent-style-name="Text_20_body">
      <style:paragraph-properties fo:text-align="center" style:justify-single-word="false"/>
      <style:text-properties officeooo:rsid="00771bf9" officeooo:paragraph-rsid="00771bf9"/>
    </style:style>
    <style:style style:name="P147" style:family="paragraph" style:parent-style-name="Text_20_body">
      <style:text-properties officeooo:rsid="008ce69e" officeooo:paragraph-rsid="008ce69e"/>
    </style:style>
    <style:style style:name="P148" style:family="paragraph" style:parent-style-name="Text_20_body">
      <style:paragraph-properties fo:text-align="justify" style:justify-single-word="false"/>
      <style:text-properties officeooo:rsid="008ce69e" officeooo:paragraph-rsid="008ce69e"/>
    </style:style>
    <style:style style:name="P149" style:family="paragraph" style:parent-style-name="Text_20_body">
      <style:paragraph-properties fo:text-align="justify" style:justify-single-word="false"/>
      <style:text-properties officeooo:rsid="008ce69e" officeooo:paragraph-rsid="00771bf9"/>
    </style:style>
    <style:style style:name="P150" style:family="paragraph" style:parent-style-name="Text_20_body">
      <style:paragraph-properties fo:text-align="justify" style:justify-single-word="false"/>
      <style:text-properties officeooo:rsid="008ce69e" officeooo:paragraph-rsid="018c7b7a"/>
    </style:style>
    <style:style style:name="P151" style:family="paragraph" style:parent-style-name="Text_20_body">
      <style:paragraph-properties fo:text-align="justify" style:justify-single-word="false"/>
      <style:text-properties officeooo:rsid="008ce69e" officeooo:paragraph-rsid="01a9cdd2"/>
    </style:style>
    <style:style style:name="P152" style:family="paragraph" style:parent-style-name="Text_20_body">
      <style:text-properties officeooo:rsid="00a9a467" officeooo:paragraph-rsid="00a9a467"/>
    </style:style>
    <style:style style:name="P153" style:family="paragraph" style:parent-style-name="Text_20_body">
      <style:text-properties officeooo:rsid="00a9a467" officeooo:paragraph-rsid="019b515e"/>
    </style:style>
    <style:style style:name="P154" style:family="paragraph" style:parent-style-name="Text_20_body">
      <style:text-properties officeooo:rsid="00a9a467" officeooo:paragraph-rsid="019b5d65"/>
    </style:style>
    <style:style style:name="P155" style:family="paragraph" style:parent-style-name="Text_20_body">
      <style:text-properties officeooo:rsid="00aeb4b4" officeooo:paragraph-rsid="0195481e"/>
    </style:style>
    <style:style style:name="P156" style:family="paragraph" style:parent-style-name="Text_20_body">
      <style:paragraph-properties fo:text-align="center" style:justify-single-word="false"/>
      <style:text-properties officeooo:rsid="007af11d" officeooo:paragraph-rsid="01949037"/>
    </style:style>
    <style:style style:name="P157" style:family="paragraph" style:parent-style-name="Text_20_body">
      <style:paragraph-properties fo:text-align="center" style:justify-single-word="false"/>
      <style:text-properties officeooo:rsid="007af11d" officeooo:paragraph-rsid="019c96f9"/>
    </style:style>
    <style:style style:name="P158"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59" style:family="paragraph" style:parent-style-name="Text_20_body">
      <style:text-properties officeooo:rsid="00d81a0e" officeooo:paragraph-rsid="00d673d7"/>
    </style:style>
    <style:style style:name="P160" style:family="paragraph" style:parent-style-name="Text_20_body">
      <style:text-properties officeooo:rsid="00de9e71" officeooo:paragraph-rsid="00d673d7"/>
    </style:style>
    <style:style style:name="P161" style:family="paragraph" style:parent-style-name="Text_20_body">
      <style:text-properties officeooo:rsid="00e2fa38" officeooo:paragraph-rsid="00d673d7"/>
    </style:style>
    <style:style style:name="P162" style:family="paragraph" style:parent-style-name="Text_20_body">
      <style:text-properties officeooo:rsid="00e440cb" officeooo:paragraph-rsid="00d673d7"/>
    </style:style>
    <style:style style:name="P163" style:family="paragraph" style:parent-style-name="Text_20_body">
      <style:text-properties officeooo:rsid="00e59aa6" officeooo:paragraph-rsid="00d673d7"/>
    </style:style>
    <style:style style:name="P164" style:family="paragraph" style:parent-style-name="Text_20_body">
      <style:text-properties officeooo:rsid="00ea10cf" officeooo:paragraph-rsid="00d673d7"/>
    </style:style>
    <style:style style:name="P165" style:family="paragraph" style:parent-style-name="Text_20_body">
      <style:text-properties officeooo:rsid="00ea10cf" officeooo:paragraph-rsid="00e54ccf"/>
    </style:style>
    <style:style style:name="P166" style:family="paragraph" style:parent-style-name="Text_20_body">
      <style:text-properties officeooo:rsid="00ea866e" officeooo:paragraph-rsid="00d673d7"/>
    </style:style>
    <style:style style:name="P167" style:family="paragraph" style:parent-style-name="Text_20_body">
      <style:text-properties officeooo:rsid="00ebb296" officeooo:paragraph-rsid="00d673d7"/>
    </style:style>
    <style:style style:name="P168" style:family="paragraph" style:parent-style-name="Text_20_body">
      <style:text-properties officeooo:rsid="00ecdaee" officeooo:paragraph-rsid="00d673d7"/>
    </style:style>
    <style:style style:name="P169" style:family="paragraph" style:parent-style-name="Text_20_body">
      <style:text-properties officeooo:rsid="00d8ffe0" officeooo:paragraph-rsid="00d8ffe0"/>
    </style:style>
    <style:style style:name="P170" style:family="paragraph" style:parent-style-name="Text_20_body">
      <style:text-properties officeooo:paragraph-rsid="00e16f63"/>
    </style:style>
    <style:style style:name="P171" style:family="paragraph" style:parent-style-name="Text_20_body">
      <style:text-properties officeooo:rsid="00e54ccf" officeooo:paragraph-rsid="00e54ccf"/>
    </style:style>
    <style:style style:name="P172" style:family="paragraph" style:parent-style-name="Text_20_body">
      <style:text-properties officeooo:paragraph-rsid="00e54ccf"/>
    </style:style>
    <style:style style:name="P173" style:family="paragraph" style:parent-style-name="Text_20_body">
      <style:text-properties officeooo:rsid="00e5f97a" officeooo:paragraph-rsid="00e5f97a"/>
    </style:style>
    <style:style style:name="P174" style:family="paragraph" style:parent-style-name="Text_20_body">
      <style:text-properties officeooo:paragraph-rsid="00e5f97a"/>
    </style:style>
    <style:style style:name="P175" style:family="paragraph" style:parent-style-name="Text_20_body">
      <style:text-properties officeooo:rsid="00e54ccf" officeooo:paragraph-rsid="00e54ccf" fo:background-color="transparent"/>
    </style:style>
    <style:style style:name="P176" style:family="paragraph" style:parent-style-name="Text_20_body">
      <style:text-properties officeooo:paragraph-rsid="00dda4cb"/>
    </style:style>
    <style:style style:name="P177"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78"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79"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80"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1"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2"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3"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4"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85"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86"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87"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8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89" style:family="paragraph" style:parent-style-name="Fig.">
      <style:text-properties officeooo:rsid="00ccb8e2" officeooo:paragraph-rsid="00e8f23e"/>
    </style:style>
    <style:style style:name="P190"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1"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2"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3" style:family="paragraph" style:parent-style-name="Table_20_Contents">
      <style:paragraph-properties fo:text-align="justify" style:justify-single-word="false"/>
      <style:text-properties officeooo:rsid="014c5388" officeooo:paragraph-rsid="01a1cb29"/>
    </style:style>
    <style:style style:name="P194" style:family="paragraph" style:parent-style-name="Table_20_Contents">
      <style:paragraph-properties fo:text-align="justify" style:justify-single-word="false"/>
      <style:text-properties officeooo:rsid="014c5388" officeooo:paragraph-rsid="01a9cdd2"/>
    </style:style>
    <style:style style:name="P195" style:family="paragraph" style:parent-style-name="Standard">
      <style:text-properties officeooo:rsid="014c5388" officeooo:paragraph-rsid="01a9cdd2"/>
    </style:style>
    <style:style style:name="P196" style:family="paragraph" style:parent-style-name="Text_20_body">
      <style:text-properties officeooo:rsid="014c5388" officeooo:paragraph-rsid="01a9cdd2"/>
    </style:style>
    <style:style style:name="P197" style:family="paragraph" style:parent-style-name="Text_20_body">
      <style:text-properties officeooo:rsid="014c5388" officeooo:paragraph-rsid="019cebf9"/>
    </style:style>
    <style:style style:name="P198" style:family="paragraph" style:parent-style-name="Text_20_body">
      <style:text-properties officeooo:rsid="014c5388" officeooo:paragraph-rsid="01a1cb29"/>
    </style:style>
    <style:style style:name="P199" style:family="paragraph" style:parent-style-name="Table_20_Contents">
      <style:paragraph-properties fo:text-align="justify" style:justify-single-word="false"/>
      <style:text-properties style:font-name="Consolas" officeooo:paragraph-rsid="019cebf9"/>
    </style:style>
    <style:style style:name="P200"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1" style:family="paragraph" style:parent-style-name="Table_20_Contents">
      <style:paragraph-properties fo:text-align="justify" style:justify-single-word="false"/>
      <style:text-properties style:font-name="Consolas" officeooo:rsid="015e4779" officeooo:paragraph-rsid="019cebf9"/>
    </style:style>
    <style:style style:name="P202" style:family="paragraph" style:parent-style-name="Table_20_Contents">
      <style:paragraph-properties fo:text-align="justify" style:justify-single-word="false"/>
      <style:text-properties style:font-name="Consolas" officeooo:rsid="01622317" officeooo:paragraph-rsid="019cebf9"/>
    </style:style>
    <style:style style:name="P203"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04"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05" style:family="paragraph" style:parent-style-name="Text_20_body">
      <style:text-properties officeooo:rsid="0149cec3" officeooo:paragraph-rsid="01a9cdd2"/>
    </style:style>
    <style:style style:name="P206" style:family="paragraph" style:parent-style-name="Table_20_Contents">
      <style:paragraph-properties fo:text-align="justify" style:justify-single-word="false"/>
      <style:text-properties officeooo:rsid="015c0e13" officeooo:paragraph-rsid="019cebf9"/>
    </style:style>
    <style:style style:name="P207" style:family="paragraph" style:parent-style-name="Table_20_Contents">
      <style:paragraph-properties fo:text-align="justify" style:justify-single-word="false"/>
      <style:text-properties officeooo:rsid="015fa555" officeooo:paragraph-rsid="019cebf9"/>
    </style:style>
    <style:style style:name="P208" style:family="paragraph" style:parent-style-name="Text_20_body">
      <style:text-properties officeooo:rsid="015fa555" officeooo:paragraph-rsid="019cebf9"/>
    </style:style>
    <style:style style:name="P209" style:family="paragraph" style:parent-style-name="Table_20_Contents">
      <style:paragraph-properties fo:text-align="justify" style:justify-single-word="false"/>
      <style:text-properties officeooo:rsid="0160d5f3" officeooo:paragraph-rsid="019cebf9"/>
    </style:style>
    <style:style style:name="P210" style:family="paragraph" style:parent-style-name="Table_20_Contents">
      <style:paragraph-properties fo:text-align="justify" style:justify-single-word="false"/>
      <style:text-properties officeooo:rsid="0160d5f3" officeooo:paragraph-rsid="01a9cdd2"/>
    </style:style>
    <style:style style:name="P211"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2"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3" style:family="paragraph" style:parent-style-name="Standard">
      <style:text-properties officeooo:rsid="007f55bb" officeooo:paragraph-rsid="01a9cdd2"/>
    </style:style>
    <style:style style:name="P214" style:family="paragraph" style:parent-style-name="Text_20_body">
      <style:text-properties officeooo:rsid="007f55bb" officeooo:paragraph-rsid="01915c4c"/>
    </style:style>
    <style:style style:name="P215" style:family="paragraph" style:parent-style-name="Text_20_body">
      <style:paragraph-properties fo:text-align="center" style:justify-single-word="false"/>
      <style:text-properties officeooo:rsid="007f55bb" officeooo:paragraph-rsid="01915c4c"/>
    </style:style>
    <style:style style:name="P216" style:family="paragraph" style:parent-style-name="Table_20_Contents">
      <style:paragraph-properties fo:text-align="justify" style:justify-single-word="false"/>
      <style:text-properties officeooo:rsid="01546630" officeooo:paragraph-rsid="01a9cdd2"/>
    </style:style>
    <style:style style:name="P217" style:family="paragraph" style:parent-style-name="Text_20_body">
      <style:paragraph-properties fo:text-align="center" style:justify-single-word="false"/>
      <style:text-properties officeooo:rsid="007ddc84" officeooo:paragraph-rsid="01915c4c"/>
    </style:style>
    <style:style style:name="P218" style:family="paragraph" style:parent-style-name="Text_20_body">
      <style:text-properties officeooo:rsid="007ddc84" officeooo:paragraph-rsid="01915c4c"/>
    </style:style>
    <style:style style:name="P219" style:family="paragraph" style:parent-style-name="Text_20_body">
      <style:text-properties officeooo:rsid="007ddc84" officeooo:paragraph-rsid="019c96f9"/>
    </style:style>
    <style:style style:name="P220" style:family="paragraph" style:parent-style-name="Text_20_body">
      <style:text-properties officeooo:rsid="01836b49" officeooo:paragraph-rsid="01915c4c"/>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2">
      <style:paragraph-properties>
        <style:tab-stops>
          <style:tab-stop style:position="17cm" style:type="right" style:leader-style="dotted" style:leader-text="."/>
        </style:tab-stops>
      </style:paragraph-properties>
    </style:style>
    <style:style style:name="P223" style:family="paragraph" style:parent-style-name="Contents_20_3">
      <style:paragraph-properties>
        <style:tab-stops>
          <style:tab-stop style:position="17cm" style:type="right" style:leader-style="dotted" style:leader-text="."/>
        </style:tab-stops>
      </style:paragraph-properties>
    </style:style>
    <style:style style:name="P224" style:family="paragraph" style:parent-style-name="Figure">
      <style:text-properties officeooo:paragraph-rsid="018d9a1e"/>
    </style:style>
    <style:style style:name="P225" style:family="paragraph" style:parent-style-name="Figure">
      <style:text-properties officeooo:paragraph-rsid="01a9cdd2"/>
    </style:style>
    <style:style style:name="P226" style:family="paragraph" style:parent-style-name="Text_20_body">
      <style:text-properties officeooo:paragraph-rsid="01a9cdd2"/>
    </style:style>
    <style:style style:name="P227" style:family="paragraph" style:parent-style-name="Text_20_body">
      <style:text-properties officeooo:rsid="01915c4c" officeooo:paragraph-rsid="01915c4c"/>
    </style:style>
    <style:style style:name="P228" style:family="paragraph" style:parent-style-name="Text_20_body">
      <style:paragraph-properties fo:margin-left="0cm" fo:margin-right="0cm" fo:text-indent="0cm" style:auto-text-indent="false"/>
      <style:text-properties officeooo:rsid="01915c4c" officeooo:paragraph-rsid="01949037"/>
    </style:style>
    <style:style style:name="P229" style:family="paragraph" style:parent-style-name="Text_20_body">
      <style:text-properties officeooo:rsid="018c7b7a" officeooo:paragraph-rsid="018c7b7a"/>
    </style:style>
    <style:style style:name="P230" style:family="paragraph" style:parent-style-name="Text_20_body">
      <style:text-properties officeooo:rsid="018c7b7a" officeooo:paragraph-rsid="01a9cdd2"/>
    </style:style>
    <style:style style:name="P231" style:family="paragraph" style:parent-style-name="Table_20_Contents">
      <style:paragraph-properties fo:text-align="justify" style:justify-single-word="false"/>
      <style:text-properties officeooo:rsid="018c7b7a" officeooo:paragraph-rsid="018c7b7a"/>
    </style:style>
    <style:style style:name="P232" style:family="paragraph" style:parent-style-name="Text_20_body">
      <style:paragraph-properties fo:text-align="justify" style:justify-single-word="false"/>
      <style:text-properties officeooo:rsid="018c7b7a" officeooo:paragraph-rsid="018c7b7a"/>
    </style:style>
    <style:style style:name="P233" style:family="paragraph" style:parent-style-name="Text_20_body">
      <style:paragraph-properties fo:text-align="justify" style:justify-single-word="false"/>
      <style:text-properties officeooo:rsid="018c7b7a" officeooo:paragraph-rsid="01a3408a"/>
    </style:style>
    <style:style style:name="P234" style:family="paragraph" style:parent-style-name="Text_20_body">
      <style:paragraph-properties fo:text-align="justify" style:justify-single-word="false"/>
      <style:text-properties officeooo:rsid="018c7b7a" officeooo:paragraph-rsid="01a9cdd2"/>
    </style:style>
    <style:style style:name="P235" style:family="paragraph" style:parent-style-name="Text_20_body">
      <style:paragraph-properties fo:text-align="justify" style:justify-single-word="false"/>
      <style:text-properties officeooo:rsid="018c7b7a" officeooo:paragraph-rsid="01aba0a4"/>
    </style:style>
    <style:style style:name="P236" style:family="paragraph" style:parent-style-name="Text_20_body">
      <style:paragraph-properties fo:text-align="center" style:justify-single-word="false"/>
      <style:text-properties officeooo:rsid="018c7b7a" officeooo:paragraph-rsid="018c7b7a"/>
    </style:style>
    <style:style style:name="P237" style:family="paragraph" style:parent-style-name="Text_20_body">
      <style:paragraph-properties fo:text-align="center" style:justify-single-word="false"/>
      <style:text-properties officeooo:rsid="018c7b7a" officeooo:paragraph-rsid="018f92fd"/>
    </style:style>
    <style:style style:name="P238" style:family="paragraph" style:parent-style-name="Text_20_body">
      <style:text-properties officeooo:rsid="018c7b7a" officeooo:paragraph-rsid="018f92fd"/>
    </style:style>
    <style:style style:name="P239"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40"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1"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2"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43"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44" style:family="paragraph" style:parent-style-name="Standard">
      <style:text-properties fo:language="ca" fo:country="ES" officeooo:rsid="003dd471" officeooo:paragraph-rsid="018c7b7a"/>
    </style:style>
    <style:style style:name="P245"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46" style:family="paragraph" style:parent-style-name="Standard">
      <style:text-properties style:font-name="Calibri" fo:language="ca" fo:country="ES" officeooo:paragraph-rsid="018c7b7a"/>
    </style:style>
    <style:style style:name="P247" style:family="paragraph" style:parent-style-name="Standard">
      <style:paragraph-properties fo:padding="0.049cm" fo:border="0.06pt solid #000000" style:shadow="#000000 0cm 0cm"/>
      <style:text-properties officeooo:paragraph-rsid="0195481e"/>
    </style:style>
    <style:style style:name="P248" style:family="paragraph" style:parent-style-name="Text_20_body">
      <style:text-properties officeooo:rsid="0195481e" officeooo:paragraph-rsid="0195481e"/>
    </style:style>
    <style:style style:name="P249"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50"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1"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52"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53"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54"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55"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56"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57"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58"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59"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60"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1"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62"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63"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64"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66"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67"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68"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69"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70"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1"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72"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73"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74"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75"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76"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77"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78"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80"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82"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83"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84"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85"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86"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87"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89"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90"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1"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292"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293"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296"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299"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1"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04"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06"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09"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10"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1"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12"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13"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14"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15"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16"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17"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18"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19"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20"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1"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22"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23"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24"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25"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26"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27"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28"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29"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30"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1"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32"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33"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34"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35"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36"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37"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38"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39"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40"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1"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42"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43"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44"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45"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46"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47"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48"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49"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50"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51"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52"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53"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54"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55"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56"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57"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58"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59"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60"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61"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62"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63"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64"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65"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66"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67" style:family="paragraph" style:parent-style-name="Table_20_Contents">
      <style:paragraph-properties fo:text-align="justify" style:justify-single-word="false"/>
      <style:text-properties officeooo:rsid="01a00707" officeooo:paragraph-rsid="01a00707"/>
    </style:style>
    <style:style style:name="P368" style:family="paragraph" style:parent-style-name="Table_20_Contents">
      <style:paragraph-properties fo:text-align="justify" style:justify-single-word="false"/>
      <style:text-properties officeooo:rsid="01a00707" officeooo:paragraph-rsid="01a9cdd2"/>
    </style:style>
    <style:style style:name="P369"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70"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71"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72"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73"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74" style:family="paragraph" style:parent-style-name="Text_20_body">
      <style:paragraph-properties fo:text-align="justify" style:justify-single-word="false"/>
      <style:text-properties officeooo:rsid="009dea99" officeooo:paragraph-rsid="018c7b7a"/>
    </style:style>
    <style:style style:name="P375" style:family="paragraph" style:parent-style-name="Text_20_body">
      <style:paragraph-properties fo:text-align="justify" style:justify-single-word="false"/>
      <style:text-properties officeooo:rsid="007e0567" officeooo:paragraph-rsid="018c7b7a"/>
    </style:style>
    <style:style style:name="P376" style:family="paragraph" style:parent-style-name="Text_20_body">
      <style:paragraph-properties fo:text-align="justify" style:justify-single-word="false"/>
      <style:text-properties officeooo:rsid="002cbdf3" officeooo:paragraph-rsid="018c7b7a"/>
    </style:style>
    <style:style style:name="P377" style:family="paragraph" style:parent-style-name="Text_20_body">
      <style:paragraph-properties fo:text-align="justify" style:justify-single-word="false"/>
      <style:text-properties officeooo:rsid="009edb4e" officeooo:paragraph-rsid="018c7b7a"/>
    </style:style>
    <style:style style:name="P378" style:family="paragraph" style:parent-style-name="Text_20_body">
      <style:text-properties officeooo:rsid="00675fb3" officeooo:paragraph-rsid="00a8be7c"/>
    </style:style>
    <style:style style:name="P379" style:family="paragraph" style:parent-style-name="Text_20_body">
      <style:paragraph-properties fo:margin-left="0cm" fo:margin-right="0cm" fo:text-indent="0cm" style:auto-text-indent="false"/>
      <style:text-properties officeooo:rsid="01949037" officeooo:paragraph-rsid="01949037"/>
    </style:style>
    <style:style style:name="P380" style:family="paragraph" style:parent-style-name="Text_20_body">
      <style:text-properties officeooo:rsid="017c0014" officeooo:paragraph-rsid="019b515e"/>
    </style:style>
    <style:style style:name="P381" style:family="paragraph" style:parent-style-name="Fig.">
      <style:paragraph-properties fo:text-align="center" style:justify-single-word="false"/>
      <style:text-properties officeooo:rsid="017e73c9" officeooo:paragraph-rsid="01794cf9"/>
    </style:style>
    <style:style style:name="P38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83"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84"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85"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86"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87" style:family="paragraph" style:parent-style-name="Contents_20_1">
      <style:paragraph-properties>
        <style:tab-stops>
          <style:tab-stop style:position="17cm" style:type="right" style:leader-style="dotted" style:leader-text="."/>
        </style:tab-stops>
      </style:paragraph-properties>
    </style:style>
    <style:style style:name="P388" style:family="paragraph" style:parent-style-name="Contents_20_2">
      <style:paragraph-properties>
        <style:tab-stops>
          <style:tab-stop style:position="17cm" style:type="right" style:leader-style="dotted" style:leader-text="."/>
        </style:tab-stops>
      </style:paragraph-properties>
    </style:style>
    <style:style style:name="P389" style:family="paragraph" style:parent-style-name="Contents_20_3">
      <style:paragraph-properties>
        <style:tab-stops>
          <style:tab-stop style:position="17cm" style:type="right" style:leader-style="dotted" style:leader-text="."/>
        </style:tab-stops>
      </style:paragraph-properties>
    </style:style>
    <style:style style:name="P390" style:family="paragraph" style:parent-style-name="Fig." style:list-style-name="L15">
      <style:text-properties officeooo:rsid="00ccb8e2" officeooo:paragraph-rsid="00e8f23e"/>
    </style:style>
    <style:style style:name="P391" style:family="paragraph" style:parent-style-name="Fig." style:list-style-name="L15">
      <style:text-properties fo:font-style="normal" officeooo:rsid="00ccb8e2" officeooo:paragraph-rsid="00e8f23e" style:font-style-asian="normal" style:font-style-complex="normal"/>
    </style:style>
    <style:style style:name="P392" style:family="paragraph" style:parent-style-name="Heading_20_1" style:master-page-name="Cos">
      <style:paragraph-properties fo:margin-left="0cm" fo:margin-right="0cm" fo:text-align="center" style:justify-single-word="false" fo:text-indent="0cm" style:auto-text-indent="false" style:page-number="auto"/>
    </style:style>
    <style:style style:name="P393" style:family="paragraph" style:parent-style-name="Heading_20_1">
      <style:paragraph-properties fo:margin-left="0cm" fo:margin-right="0cm" fo:text-indent="0cm" style:auto-text-indent="false" fo:break-before="page"/>
      <style:text-properties officeooo:rsid="0065d6d8" officeooo:paragraph-rsid="0065d6d8"/>
    </style:style>
    <style:style style:name="P394" style:family="paragraph" style:parent-style-name="Heading_20_1">
      <style:paragraph-properties fo:margin-left="0cm" fo:margin-right="0cm" fo:text-indent="0cm" style:auto-text-indent="false" fo:break-before="page"/>
      <style:text-properties officeooo:rsid="00a8be7c" officeooo:paragraph-rsid="00a9a467"/>
    </style:style>
    <style:style style:name="P395" style:family="paragraph" style:parent-style-name="Heading_20_1">
      <style:paragraph-properties fo:margin-left="0cm" fo:margin-right="0cm" fo:text-indent="0cm" style:auto-text-indent="false" fo:break-before="page"/>
      <style:text-properties officeooo:rsid="01915c4c" officeooo:paragraph-rsid="01915c4c"/>
    </style:style>
    <style:style style:name="P396" style:family="paragraph" style:parent-style-name="Heading_20_1">
      <style:paragraph-properties fo:margin-left="0cm" fo:margin-right="0cm" fo:text-indent="0cm" style:auto-text-indent="false" fo:break-before="page"/>
      <style:text-properties officeooo:rsid="018d9a1e" officeooo:paragraph-rsid="018d9a1e"/>
    </style:style>
    <style:style style:name="P397" style:family="paragraph" style:parent-style-name="Heading_20_1">
      <style:paragraph-properties fo:margin-left="0cm" fo:margin-right="0cm" fo:text-indent="0cm" style:auto-text-indent="false" fo:break-before="page"/>
      <style:text-properties officeooo:rsid="018d9a1e" officeooo:paragraph-rsid="01a3c4fd"/>
    </style:style>
    <style:style style:name="P398"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399"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00"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1" style:family="paragraph" style:parent-style-name="Heading_20_2">
      <style:paragraph-properties fo:margin-left="1.9cm" fo:margin-right="0cm" fo:text-indent="-1.3cm" style:auto-text-indent="false"/>
      <style:text-properties officeooo:rsid="018f92fd" officeooo:paragraph-rsid="018f92fd"/>
    </style:style>
    <style:style style:name="P402" style:family="paragraph" style:parent-style-name="Heading_20_2">
      <style:paragraph-properties fo:margin-left="1.9cm" fo:margin-right="0cm" fo:text-indent="-1.3cm" style:auto-text-indent="false"/>
      <style:text-properties officeooo:rsid="018c7b7a" officeooo:paragraph-rsid="018c7b7a"/>
    </style:style>
    <style:style style:name="P403" style:family="paragraph" style:parent-style-name="Heading_20_2">
      <style:paragraph-properties fo:margin-left="1.9cm" fo:margin-right="0cm" fo:text-indent="-1.3cm" style:auto-text-indent="false"/>
      <style:text-properties officeooo:rsid="018c7b7a" officeooo:paragraph-rsid="019c96f9"/>
    </style:style>
    <style:style style:name="P404" style:family="paragraph" style:parent-style-name="Heading_20_2">
      <style:paragraph-properties fo:margin-left="1.9cm" fo:margin-right="0cm" fo:text-indent="-1.3cm" style:auto-text-indent="false"/>
      <style:text-properties officeooo:rsid="018c7b7a" officeooo:paragraph-rsid="01a3408a"/>
    </style:style>
    <style:style style:name="P405" style:family="paragraph" style:parent-style-name="Heading_20_2">
      <style:paragraph-properties fo:margin-left="1.9cm" fo:margin-right="0cm" fo:text-indent="-1.3cm" style:auto-text-indent="false"/>
      <style:text-properties officeooo:rsid="018c7b7a" officeooo:paragraph-rsid="01a9cdd2"/>
    </style:style>
    <style:style style:name="P406" style:family="paragraph" style:parent-style-name="Heading_20_2">
      <style:paragraph-properties fo:margin-left="1.9cm" fo:margin-right="0cm" fo:text-indent="-1.3cm" style:auto-text-indent="false"/>
      <style:text-properties officeooo:paragraph-rsid="018c7b7a"/>
    </style:style>
    <style:style style:name="P407" style:family="paragraph" style:parent-style-name="Heading_20_2">
      <style:paragraph-properties fo:margin-left="1.9cm" fo:margin-right="0cm" fo:text-indent="-1.3cm" style:auto-text-indent="false"/>
      <style:text-properties officeooo:paragraph-rsid="01915c4c"/>
    </style:style>
    <style:style style:name="P408" style:family="paragraph" style:parent-style-name="Heading_20_2">
      <style:paragraph-properties fo:margin-left="1.9cm" fo:margin-right="0cm" fo:text-indent="-1.3cm" style:auto-text-indent="false"/>
      <style:text-properties officeooo:rsid="019c96f9" officeooo:paragraph-rsid="019c96f9"/>
    </style:style>
    <style:style style:name="P409"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0"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11"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12" style:family="paragraph" style:parent-style-name="Heading_20_2">
      <style:paragraph-properties fo:margin-left="1.9cm" fo:margin-right="0cm" fo:text-indent="-1.3cm" style:auto-text-indent="false"/>
      <style:text-properties officeooo:rsid="00d8ffe0" officeooo:paragraph-rsid="00d8ffe0"/>
    </style:style>
    <style:style style:name="P413" style:family="paragraph" style:parent-style-name="Heading_20_2">
      <style:paragraph-properties fo:margin-left="1.9cm" fo:margin-right="0cm" fo:text-indent="-1.3cm" style:auto-text-indent="false"/>
      <style:text-properties officeooo:rsid="00dbb531" officeooo:paragraph-rsid="00dbb531"/>
    </style:style>
    <style:style style:name="P414" style:family="paragraph" style:parent-style-name="Heading_20_3">
      <style:paragraph-properties fo:margin-left="1.9cm" fo:margin-right="0cm" fo:text-indent="-1.3cm" style:auto-text-indent="false"/>
      <style:text-properties officeooo:rsid="018c7b7a" officeooo:paragraph-rsid="018c7b7a"/>
    </style:style>
    <style:style style:name="P415" style:family="paragraph" style:parent-style-name="Heading_20_3">
      <style:text-properties officeooo:rsid="01a9cdd2" officeooo:paragraph-rsid="01a9cdd2"/>
    </style:style>
    <style:style style:name="P416"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17" style:family="paragraph" style:parent-style-name="Heading_20_3">
      <style:paragraph-properties fo:margin-left="1.9cm" fo:margin-right="0cm" fo:text-indent="-1.3cm" style:auto-text-indent="false"/>
      <style:text-properties officeooo:paragraph-rsid="00d673d7"/>
    </style:style>
    <style:style style:name="P418" style:family="paragraph" style:parent-style-name="Heading_20_3">
      <style:paragraph-properties fo:margin-left="1.9cm" fo:margin-right="0cm" fo:text-indent="-1.3cm" style:auto-text-indent="false"/>
      <style:text-properties officeooo:paragraph-rsid="00dda4cb"/>
    </style:style>
    <style:style style:name="P419" style:family="paragraph" style:parent-style-name="Heading_20_3">
      <style:paragraph-properties fo:margin-left="1.9cm" fo:margin-right="0cm" fo:text-indent="-1.3cm" style:auto-text-indent="false"/>
      <style:text-properties officeooo:rsid="00dda4cb" officeooo:paragraph-rsid="00dda4cb"/>
    </style:style>
    <style:style style:name="P420" style:family="paragraph" style:parent-style-name="Standard" style:list-style-name="L13">
      <style:text-properties officeooo:paragraph-rsid="00e8f23e"/>
    </style:style>
    <style:style style:name="P421" style:family="paragraph" style:parent-style-name="Standard" style:list-style-name="L13">
      <style:text-properties fo:font-style="italic" officeooo:rsid="00e8f23e" officeooo:paragraph-rsid="00e8f23e" style:font-style-asian="italic" style:font-style-complex="italic"/>
    </style:style>
    <style:style style:name="P422" style:family="paragraph" style:parent-style-name="Standard">
      <style:paragraph-properties style:line-height-at-least="0.476cm"/>
      <style:text-properties fo:color="#000000" loext:opacity="100%" officeooo:paragraph-rsid="01b71c80" fo:background-color="#dddddd"/>
    </style:style>
    <style:style style:name="P423" style:family="paragraph" style:parent-style-name="Table_20_Contents" style:list-style-name="L4">
      <style:paragraph-properties fo:text-align="justify" style:justify-single-word="false"/>
      <style:text-properties officeooo:paragraph-rsid="019cebf9"/>
    </style:style>
    <style:style style:name="P424" style:family="paragraph" style:parent-style-name="Table_20_Contents" style:list-style-name="L8">
      <style:paragraph-properties fo:text-align="justify" style:justify-single-word="false"/>
      <style:text-properties officeooo:paragraph-rsid="01a9cdd2"/>
    </style:style>
    <style:style style:name="P425" style:family="paragraph" style:parent-style-name="Table_20_Contents" style:list-style-name="L11">
      <style:paragraph-properties fo:text-align="justify" style:justify-single-word="false"/>
      <style:text-properties officeooo:paragraph-rsid="01a9cdd2"/>
    </style:style>
    <style:style style:name="P426" style:family="paragraph" style:parent-style-name="Table_20_Contents" style:list-style-name="L5">
      <style:paragraph-properties fo:text-align="justify" style:justify-single-word="false"/>
      <style:text-properties officeooo:rsid="015fa555" officeooo:paragraph-rsid="019cebf9"/>
    </style:style>
    <style:style style:name="P427" style:family="paragraph" style:parent-style-name="Table_20_Contents" style:list-style-name="L6">
      <style:paragraph-properties fo:text-align="justify" style:justify-single-word="false"/>
      <style:text-properties officeooo:rsid="015fa555" officeooo:paragraph-rsid="019cebf9"/>
    </style:style>
    <style:style style:name="P428" style:family="paragraph" style:parent-style-name="Table_20_Contents" style:list-style-name="L5">
      <style:paragraph-properties fo:text-align="justify" style:justify-single-word="false"/>
      <style:text-properties officeooo:rsid="014f9ade" officeooo:paragraph-rsid="019cebf9"/>
    </style:style>
    <style:style style:name="P429" style:family="paragraph" style:parent-style-name="Table_20_Contents" style:list-style-name="L9">
      <style:paragraph-properties fo:text-align="justify" style:justify-single-word="false"/>
      <style:text-properties officeooo:rsid="014f9ade" officeooo:paragraph-rsid="01a9cdd2"/>
    </style:style>
    <style:style style:name="P430" style:family="paragraph" style:parent-style-name="Table_20_Contents" style:list-style-name="L10">
      <style:paragraph-properties fo:text-align="justify" style:justify-single-word="false"/>
      <style:text-properties officeooo:rsid="014f9ade" officeooo:paragraph-rsid="01a9cdd2"/>
    </style:style>
    <style:style style:name="P431" style:family="paragraph" style:parent-style-name="Table_20_Contents" style:list-style-name="L5">
      <style:paragraph-properties fo:text-align="justify" style:justify-single-word="false"/>
      <style:text-properties officeooo:rsid="0151259d" officeooo:paragraph-rsid="019cebf9"/>
    </style:style>
    <style:style style:name="P432" style:family="paragraph" style:parent-style-name="Table_20_Contents" style:list-style-name="L6">
      <style:paragraph-properties fo:text-align="justify" style:justify-single-word="false"/>
      <style:text-properties officeooo:rsid="0151259d" officeooo:paragraph-rsid="019cebf9"/>
    </style:style>
    <style:style style:name="P433" style:family="paragraph" style:parent-style-name="Table_20_Contents" style:list-style-name="L9">
      <style:paragraph-properties fo:text-align="justify" style:justify-single-word="false"/>
      <style:text-properties officeooo:rsid="0151259d" officeooo:paragraph-rsid="01a9cdd2"/>
    </style:style>
    <style:style style:name="P434" style:family="paragraph" style:parent-style-name="Table_20_Contents" style:list-style-name="L10">
      <style:paragraph-properties fo:text-align="justify" style:justify-single-word="false"/>
      <style:text-properties officeooo:rsid="0151259d" officeooo:paragraph-rsid="01a9cdd2"/>
    </style:style>
    <style:style style:name="P435" style:family="paragraph" style:parent-style-name="Table_20_Contents" style:list-style-name="L12">
      <style:paragraph-properties fo:text-align="justify" style:justify-single-word="false"/>
      <style:text-properties officeooo:rsid="0151259d" officeooo:paragraph-rsid="01a9cdd2"/>
    </style:style>
    <style:style style:name="P436" style:family="paragraph" style:parent-style-name="Table_20_Contents" style:list-style-name="L4">
      <style:paragraph-properties fo:text-align="justify" style:justify-single-word="false"/>
      <style:text-properties fo:font-weight="bold" officeooo:rsid="01622317" officeooo:paragraph-rsid="019cebf9" style:font-weight-asian="bold" style:font-weight-complex="bold"/>
    </style:style>
    <style:style style:name="P437" style:family="paragraph" style:parent-style-name="Table_20_Contents" style:list-style-name="L8">
      <style:paragraph-properties fo:text-align="justify" style:justify-single-word="false"/>
      <style:text-properties fo:font-weight="bold" officeooo:paragraph-rsid="01a9cdd2" style:font-weight-asian="bold" style:font-weight-complex="bold"/>
    </style:style>
    <style:style style:name="P438" style:family="paragraph" style:parent-style-name="Table_20_Contents" style:list-style-name="L4">
      <style:paragraph-properties fo:text-align="justify" style:justify-single-word="false"/>
      <style:text-properties fo:font-weight="normal" officeooo:rsid="0163fbf5" officeooo:paragraph-rsid="019cebf9" style:font-weight-asian="normal" style:font-weight-complex="normal"/>
    </style:style>
    <style:style style:name="P439" style:family="paragraph" style:parent-style-name="Table_20_Contents" style:list-style-name="L11">
      <style:paragraph-properties fo:text-align="justify" style:justify-single-word="false"/>
      <style:text-properties officeooo:rsid="0156bbc2" officeooo:paragraph-rsid="01a9cdd2"/>
    </style:style>
    <style:style style:name="P440" style:family="paragraph" style:parent-style-name="Table_20_Contents" style:list-style-name="L12">
      <style:paragraph-properties fo:text-align="justify" style:justify-single-word="false"/>
      <style:text-properties officeooo:rsid="015ba97b" officeooo:paragraph-rsid="01a9cdd2"/>
    </style:style>
    <style:style style:name="P441" style:family="paragraph" style:parent-style-name="Text_20_body" style:list-style-name="L1">
      <style:text-properties officeooo:rsid="01915c4c" officeooo:paragraph-rsid="01915c4c"/>
    </style:style>
    <style:style style:name="P442" style:family="paragraph" style:parent-style-name="Text_20_body" style:list-style-name="L2">
      <style:text-properties officeooo:rsid="007ddc84" officeooo:paragraph-rsid="01915c4c"/>
    </style:style>
    <style:style style:name="P443" style:family="paragraph" style:parent-style-name="Text_20_body" style:list-style-name="L2">
      <style:text-properties officeooo:rsid="007f55bb" officeooo:paragraph-rsid="01915c4c"/>
    </style:style>
    <style:style style:name="P444" style:family="paragraph" style:parent-style-name="Text_20_body" style:list-style-name="L3">
      <style:text-properties officeooo:rsid="007f55bb" officeooo:paragraph-rsid="01915c4c"/>
    </style:style>
    <style:style style:name="P445" style:family="paragraph" style:parent-style-name="Text_20_body" style:list-style-name="L2">
      <style:text-properties officeooo:rsid="0084ae02" officeooo:paragraph-rsid="01915c4c"/>
    </style:style>
    <style:style style:name="P446" style:family="paragraph" style:parent-style-name="Text_20_body" style:list-style-name="L3">
      <style:text-properties officeooo:rsid="01836b49" officeooo:paragraph-rsid="01915c4c"/>
    </style:style>
    <style:style style:name="P447" style:family="paragraph" style:parent-style-name="Text_20_body" style:list-style-name="L7">
      <style:text-properties officeooo:rsid="0149cec3" officeooo:paragraph-rsid="01a9cdd2"/>
    </style:style>
    <style:style style:name="P448" style:family="paragraph" style:parent-style-name="Text_20_body" style:list-style-name="L7">
      <style:text-properties officeooo:rsid="014adc01" officeooo:paragraph-rsid="01a9cdd2"/>
    </style:style>
    <style:style style:name="P449" style:family="paragraph" style:parent-style-name="Text_20_body" style:list-style-name="L14">
      <style:text-properties officeooo:paragraph-rsid="00d8ffe0"/>
    </style:style>
    <style:style style:name="P450" style:family="paragraph" style:parent-style-name="Text_20_body" style:list-style-name="L14">
      <style:text-properties officeooo:paragraph-rsid="01875821"/>
    </style:style>
    <style:style style:name="P451" style:family="paragraph" style:parent-style-name="Text_20_body" style:list-style-name="L14">
      <style:text-properties officeooo:rsid="00d8ffe0" officeooo:paragraph-rsid="00d8ffe0"/>
    </style:style>
    <style:style style:name="P452" style:family="paragraph" style:parent-style-name="Text_20_body" style:list-style-name="L16">
      <style:text-properties fo:font-style="normal" officeooo:rsid="00de9e71" officeooo:paragraph-rsid="00d673d7" style:font-style-asian="normal" style:font-style-complex="normal"/>
    </style:style>
    <style:style style:name="P453" style:family="paragraph" style:parent-style-name="Text_20_body" style:list-style-name="L16">
      <style:text-properties officeooo:rsid="00de9e71" officeooo:paragraph-rsid="00d673d7"/>
    </style:style>
    <style:style style:name="P454" style:family="paragraph" style:parent-style-name="Text_20_body" style:list-style-name="L17">
      <style:text-properties officeooo:paragraph-rsid="00e16f63"/>
    </style:style>
    <style:style style:name="P455" style:family="paragraph">
      <style:paragraph-properties fo:text-align="center" style:writing-mode="lr-tb"/>
      <style:text-properties fo:color="#ffffff" loext:opacity="100%"/>
    </style:style>
    <style:style style:name="P456" style:family="paragraph">
      <loext:graphic-properties draw:fill="solid" draw:fill-color="#ed1c24"/>
      <style:paragraph-properties fo:text-align="center" style:writing-mode="lr-tb"/>
      <style:text-properties fo:color="#ffffff" loext:opacity="100%"/>
    </style:style>
    <style:style style:name="P457" style:family="paragraph">
      <loext:graphic-properties draw:fill="none" draw:fill-color="#ffffff"/>
    </style:style>
    <style:style style:name="P458"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3c3c3c" loext:opacity="100%" style:font-name="Monospace1" fo:font-size="10pt" officeooo:rsid="01b71c80" style:font-size-asian="10pt"/>
    </style:style>
    <style:style style:name="T32" style:family="text">
      <style:text-properties fo:color="#2a00ff" loext:opacity="100%" style:font-name="Monospace1" fo:font-size="10pt" style:font-size-asian="10pt"/>
    </style:style>
    <style:style style:name="T33" style:family="text">
      <style:text-properties fo:color="#2a00ff" loext:opacity="100%" style:font-name="Monospace1" fo:font-size="10pt" officeooo:rsid="01aba0a4" style:font-size-asian="10pt"/>
    </style:style>
    <style:style style:name="T34" style:family="text">
      <style:text-properties fo:color="#2a00ff" loext:opacity="100%" style:font-name="Consolas1"/>
    </style:style>
    <style:style style:name="T35" style:family="text">
      <style:text-properties fo:color="#2a00ff" loext:opacity="100%" style:font-name="Consolas1" fo:font-size="10pt" fo:font-style="italic" style:font-size-asian="10pt" style:font-style-asian="italic"/>
    </style:style>
    <style:style style:name="T36" style:family="text">
      <style:text-properties fo:color="#2a00ff" loext:opacity="100%" style:font-name="Consolas1" officeooo:rsid="00ee64c9"/>
    </style:style>
    <style:style style:name="T37" style:family="text">
      <style:text-properties fo:color="#2a00ff" loext:opacity="100%" style:font-name="Consolas1" fo:font-style="italic" style:font-style-asian="italic"/>
    </style:style>
    <style:style style:name="T38" style:family="text">
      <style:text-properties fo:color="#2a00ff" loext:opacity="100%" style:font-name="Consolas1" fo:font-size="8pt" style:text-underline-style="none" style:font-size-asian="8pt" style:font-size-complex="8pt"/>
    </style:style>
    <style:style style:name="T39" style:family="text">
      <style:text-properties fo:color="#2a00ff" loext:opacity="100%" fo:font-style="italic" style:font-style-asian="italic"/>
    </style:style>
    <style:style style:name="T40" style:family="text">
      <style:text-properties fo:font-weight="bold" style:font-weight-asian="bold" style:font-weight-complex="bold"/>
    </style:style>
    <style:style style:name="T41" style:family="text">
      <style:text-properties fo:font-weight="bold" officeooo:rsid="009bb1cd" style:font-weight-asian="bold" style:font-weight-complex="bold"/>
    </style:style>
    <style:style style:name="T42" style:family="text">
      <style:text-properties fo:font-weight="bold" officeooo:rsid="00ea866e" style:font-weight-asian="bold" style:font-weight-complex="bold"/>
    </style:style>
    <style:style style:name="T43" style:family="text">
      <style:text-properties fo:font-weight="bold" officeooo:rsid="014f9ade" style:font-weight-asian="bold" style:font-weight-complex="bold"/>
    </style:style>
    <style:style style:name="T44" style:family="text">
      <style:text-properties fo:font-weight="bold" officeooo:rsid="015c4085" style:font-weight-asian="bold" style:font-weight-complex="bold"/>
    </style:style>
    <style:style style:name="T45" style:family="text">
      <style:text-properties fo:font-weight="bold" officeooo:rsid="01546630" style:font-weight-asian="bold" style:font-weight-complex="bold"/>
    </style:style>
    <style:style style:name="T46" style:family="text">
      <style:text-properties fo:color="#7f0055" loext:opacity="100%" style:font-name="Monospace1" fo:font-size="10pt" fo:font-weight="bold" style:font-size-asian="10pt" style:font-weight-asian="bold"/>
    </style:style>
    <style:style style:name="T47" style:family="text">
      <style:text-properties fo:color="#7f0055" loext:opacity="100%" style:font-name="Consolas1"/>
    </style:style>
    <style:style style:name="T48" style:family="text">
      <style:text-properties fo:color="#7f0055" loext:opacity="100%" style:font-name="Consolas1" fo:font-size="10pt" fo:font-weight="bold" style:font-size-asian="10pt" style:font-weight-asian="bold"/>
    </style:style>
    <style:style style:name="T49" style:family="text">
      <style:text-properties fo:color="#7f0055" loext:opacity="100%" style:font-name="Consolas1" fo:font-weight="bold" style:font-weight-asian="bold"/>
    </style:style>
    <style:style style:name="T50" style:family="text">
      <style:text-properties fo:color="#7f0055" loext:opacity="100%" style:font-name="Consolas1" fo:font-size="8pt" style:text-underline-style="none" fo:font-weight="bold" style:font-size-asian="8pt" style:font-weight-asian="bold" style:font-size-complex="8pt"/>
    </style:style>
    <style:style style:name="T51" style:family="text">
      <style:text-properties fo:color="#7f0055" loext:opacity="100%" style:font-name="Consolas1" style:text-underline-style="none" fo:font-weight="bold" style:font-weight-asian="bold"/>
    </style:style>
    <style:style style:name="T52" style:family="text">
      <style:text-properties fo:color="#000000" loext:opacity="100%"/>
    </style:style>
    <style:style style:name="T53" style:family="text">
      <style:text-properties fo:color="#000000" loext:opacity="100%" style:font-name="Monospace1" fo:font-size="10pt" style:font-size-asian="10pt"/>
    </style:style>
    <style:style style:name="T54" style:family="text">
      <style:text-properties fo:color="#000000" loext:opacity="100%" style:font-name="Monospace1" fo:font-size="10pt" officeooo:rsid="018c7b7a" style:font-size-asian="10pt"/>
    </style:style>
    <style:style style:name="T55" style:family="text">
      <style:text-properties fo:color="#000000" loext:opacity="100%" style:font-name="Monospace1" fo:font-size="10pt" officeooo:rsid="01aba0a4" style:font-size-asian="10pt"/>
    </style:style>
    <style:style style:name="T56" style:family="text">
      <style:text-properties fo:color="#000000" loext:opacity="100%" style:font-name="Monospace1" fo:font-size="10pt" fo:font-style="italic" style:font-size-asian="10pt" style:font-style-asian="italic"/>
    </style:style>
    <style:style style:name="T57" style:family="text">
      <style:text-properties fo:color="#000000" loext:opacity="100%" style:font-name="Consolas1"/>
    </style:style>
    <style:style style:name="T58" style:family="text">
      <style:text-properties fo:color="#000000" loext:opacity="100%" style:font-name="Consolas1" fo:font-size="10pt" style:font-size-asian="10pt"/>
    </style:style>
    <style:style style:name="T59" style:family="text">
      <style:text-properties fo:color="#000000" loext:opacity="100%" style:font-name="Consolas1" fo:font-size="10pt" fo:background-color="#d4d4d4" loext:char-shading-value="0" style:font-size-asian="10pt"/>
    </style:style>
    <style:style style:name="T60"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1" style:family="text">
      <style:text-properties fo:color="#000000" loext:opacity="100%" style:font-name="Consolas1" fo:background-color="#d4d4d4" loext:char-shading-value="0"/>
    </style:style>
    <style:style style:name="T62" style:family="text">
      <style:text-properties fo:color="#000000" loext:opacity="100%" style:font-name="Consolas1" officeooo:rsid="00ea866e"/>
    </style:style>
    <style:style style:name="T63" style:family="text">
      <style:text-properties fo:color="#000000" loext:opacity="100%" style:font-name="Consolas1" fo:font-weight="bold" style:font-weight-asian="bold" style:font-weight-complex="bold"/>
    </style:style>
    <style:style style:name="T64" style:family="text">
      <style:text-properties fo:color="#000000" loext:opacity="100%" style:font-name="Consolas1" fo:font-style="italic" style:font-style-asian="italic"/>
    </style:style>
    <style:style style:name="T65" style:family="text">
      <style:text-properties fo:color="#000000" loext:opacity="100%" style:font-name="Consolas1" fo:font-size="8pt" style:text-underline-style="none" style:font-size-asian="8pt" style:font-size-complex="8pt"/>
    </style:style>
    <style:style style:name="T66" style:family="text">
      <style:text-properties fo:color="#000000" loext:opacity="100%" style:font-name="Consolas1" fo:font-size="8pt" style:text-underline-style="none" fo:background-color="transparent" loext:char-shading-value="0" style:font-size-asian="8pt" style:font-size-complex="8pt"/>
    </style:style>
    <style:style style:name="T67" style:family="text">
      <style:text-properties fo:color="#000000" loext:opacity="100%" style:font-name="Consolas1" fo:font-size="8pt" fo:background-color="transparent" loext:char-shading-value="0" style:font-size-asian="8pt" style:font-size-complex="8pt"/>
    </style:style>
    <style:style style:name="T68" style:family="text">
      <style:text-properties fo:color="#000000" loext:opacity="100%" style:font-name="Consolas1" fo:font-size="8pt" style:font-size-asian="8pt" style:font-size-complex="8pt"/>
    </style:style>
    <style:style style:name="T69" style:family="text">
      <style:text-properties fo:color="#000000" loext:opacity="100%" style:font-name="Consolas1" fo:font-size="8pt" fo:font-style="italic" style:text-underline-style="none" style:font-size-asian="8pt" style:font-style-asian="italic" style:font-size-complex="8pt"/>
    </style:style>
    <style:style style:name="T70" style:family="text">
      <style:text-properties fo:color="#000000" loext:opacity="100%" style:font-name="Consolas1" officeooo:rsid="00ee64c9"/>
    </style:style>
    <style:style style:name="T71" style:family="text">
      <style:text-properties fo:color="#000000" loext:opacity="100%" style:font-name="Consolas1" fo:background-color="transparent" loext:char-shading-value="0"/>
    </style:style>
    <style:style style:name="T72" style:family="text">
      <style:text-properties fo:color="#000000" loext:opacity="100%" style:font-name="Consolas1" style:text-underline-style="none"/>
    </style:style>
    <style:style style:name="T73" style:family="text">
      <style:text-properties fo:color="#000000" loext:opacity="100%" style:font-name="Consolas1" fo:font-size="9pt" style:font-size-asian="9pt"/>
    </style:style>
    <style:style style:name="T74" style:family="text">
      <style:text-properties fo:color="#000000" loext:opacity="100%" style:font-name="Monospace" fo:font-size="10pt" style:font-size-asian="10pt" style:font-size-complex="10pt"/>
    </style:style>
    <style:style style:name="T75" style:family="text">
      <style:text-properties fo:color="#000000" loext:opacity="100%" style:font-name="Consolas2" fo:font-size="9pt" fo:font-weight="normal" fo:background-color="#dddddd" loext:char-shading-value="0"/>
    </style:style>
    <style:style style:name="T76" style:family="text">
      <style:text-properties fo:color="#0000c0" loext:opacity="100%" style:font-name="Monospace1" fo:font-size="10pt" fo:font-style="italic" fo:font-weight="bold" style:font-size-asian="10pt" style:font-style-asian="italic" style:font-weight-asian="bold"/>
    </style:style>
    <style:style style:name="T77" style:family="text">
      <style:text-properties fo:color="#0000c0" loext:opacity="100%" style:font-name="Consolas1"/>
    </style:style>
    <style:style style:name="T78" style:family="text">
      <style:text-properties fo:color="#0000c0" loext:opacity="100%" style:font-name="Consolas1" fo:font-style="italic" fo:font-weight="bold" style:font-style-asian="italic" style:font-weight-asian="bold"/>
    </style:style>
    <style:style style:name="T79" style:family="text">
      <style:text-properties fo:color="#0000c0" loext:opacity="100%" style:font-name="Consolas1" fo:font-style="italic" fo:font-weight="bold" fo:background-color="transparent" loext:char-shading-value="0" style:font-style-asian="italic" style:font-weight-asian="bold"/>
    </style:style>
    <style:style style:name="T80"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81" style:family="text">
      <style:text-properties fo:color="#6a3e3e" loext:opacity="100%" style:font-name="Monospace1" fo:font-size="10pt" style:font-size-asian="10pt"/>
    </style:style>
    <style:style style:name="T82" style:family="text">
      <style:text-properties fo:color="#6a3e3e" loext:opacity="100%" style:font-name="Monospace1" fo:font-size="10pt" officeooo:rsid="01aba0a4" style:font-size-asian="10pt"/>
    </style:style>
    <style:style style:name="T83" style:family="text">
      <style:text-properties fo:color="#6a3e3e" loext:opacity="100%" style:font-name="Consolas1"/>
    </style:style>
    <style:style style:name="T84" style:family="text">
      <style:text-properties fo:color="#6a3e3e" loext:opacity="100%" style:font-name="Consolas1" fo:font-size="10pt" style:font-size-asian="10pt"/>
    </style:style>
    <style:style style:name="T85" style:family="text">
      <style:text-properties fo:color="#6a3e3e" loext:opacity="100%" style:font-name="Consolas1" fo:background-color="#d4d4d4" loext:char-shading-value="0"/>
    </style:style>
    <style:style style:name="T86" style:family="text">
      <style:text-properties fo:color="#6a3e3e" loext:opacity="100%" style:font-name="Consolas1" fo:font-size="8pt" style:text-underline-style="none" style:font-size-asian="8pt" style:font-size-complex="8pt"/>
    </style:style>
    <style:style style:name="T87"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88" style:family="text">
      <style:text-properties fo:color="#6a3e3e" loext:opacity="100%" style:font-name="Consolas1" fo:font-size="8pt" fo:background-color="transparent" loext:char-shading-value="0" style:font-size-asian="8pt" style:font-size-complex="8pt"/>
    </style:style>
    <style:style style:name="T89" style:family="text">
      <style:text-properties fo:color="#6a3e3e" loext:opacity="100%" style:font-name="Consolas1" fo:font-size="8pt" style:font-size-asian="8pt" style:font-size-complex="8pt"/>
    </style:style>
    <style:style style:name="T90" style:family="text">
      <style:text-properties fo:color="#6a3e3e" loext:opacity="100%" style:font-name="Consolas1" officeooo:rsid="00dbb531"/>
    </style:style>
    <style:style style:name="T91" style:family="text">
      <style:text-properties fo:color="#6a3e3e" loext:opacity="100%" style:font-name="Consolas1" officeooo:rsid="00f0f9b1" fo:background-color="transparent" loext:char-shading-value="0"/>
    </style:style>
    <style:style style:name="T92" style:family="text">
      <style:text-properties fo:color="#6a3e3e" loext:opacity="100%" style:font-name="Consolas1" style:text-underline-style="none"/>
    </style:style>
    <style:style style:name="T93" style:family="text">
      <style:text-properties officeooo:rsid="0086959c"/>
    </style:style>
    <style:style style:name="T94" style:family="text">
      <style:text-properties officeooo:rsid="008b673d"/>
    </style:style>
    <style:style style:name="T95" style:family="text">
      <style:text-properties officeooo:rsid="0090deb7"/>
    </style:style>
    <style:style style:name="T96" style:family="text">
      <style:text-properties officeooo:rsid="0090e737"/>
    </style:style>
    <style:style style:name="T97" style:family="text">
      <style:text-properties officeooo:rsid="00523cb7"/>
    </style:style>
    <style:style style:name="T98" style:family="text">
      <style:text-properties officeooo:rsid="005032ec"/>
    </style:style>
    <style:style style:name="T99" style:family="text">
      <style:text-properties officeooo:rsid="005362e2"/>
    </style:style>
    <style:style style:name="T100" style:family="text">
      <style:text-properties officeooo:rsid="005608e4"/>
    </style:style>
    <style:style style:name="T101" style:family="text">
      <style:text-properties officeooo:rsid="0051440a"/>
    </style:style>
    <style:style style:name="T102" style:family="text">
      <style:text-properties officeooo:rsid="005bb6f5"/>
    </style:style>
    <style:style style:name="T103" style:family="text">
      <style:text-properties officeooo:rsid="00600629"/>
    </style:style>
    <style:style style:name="T104" style:family="text">
      <style:text-properties officeooo:rsid="0062c50e"/>
    </style:style>
    <style:style style:name="T105" style:family="text">
      <style:text-properties officeooo:rsid="009569da"/>
    </style:style>
    <style:style style:name="T106" style:family="text">
      <style:text-properties officeooo:rsid="009bb1cd"/>
    </style:style>
    <style:style style:name="T107" style:family="text">
      <style:text-properties fo:color="#646464" loext:opacity="100%" style:font-name="Consolas1"/>
    </style:style>
    <style:style style:name="T108" style:family="text">
      <style:text-properties officeooo:rsid="00a8be7c"/>
    </style:style>
    <style:style style:name="T109" style:family="text">
      <style:text-properties officeooo:rsid="00a9a467"/>
    </style:style>
    <style:style style:name="T110" style:family="text">
      <style:text-properties officeooo:rsid="003e02b8"/>
    </style:style>
    <style:style style:name="T111" style:family="text">
      <style:text-properties officeooo:rsid="0084ae02"/>
    </style:style>
    <style:style style:name="T112" style:family="text">
      <style:text-properties officeooo:rsid="007ddc84"/>
    </style:style>
    <style:style style:name="T113" style:family="text">
      <style:text-properties officeooo:rsid="00b5a0a7"/>
    </style:style>
    <style:style style:name="T114" style:family="text">
      <style:text-properties officeooo:rsid="00a824e0"/>
    </style:style>
    <style:style style:name="T115" style:family="text">
      <style:text-properties style:font-name="Consolas1"/>
    </style:style>
    <style:style style:name="T116" style:family="text">
      <style:text-properties style:font-name="Consolas1" fo:font-size="9pt" style:font-size-asian="9pt"/>
    </style:style>
    <style:style style:name="T117" style:family="text">
      <style:text-properties officeooo:rsid="00cc0058"/>
    </style:style>
    <style:style style:name="T118" style:family="text">
      <style:text-properties fo:color="#007dc3" loext:opacity="100%" style:font-name="Calibri2" fo:font-size="18pt" officeooo:rsid="00cd0e15" style:font-size-asian="18pt" style:font-size-complex="18pt"/>
    </style:style>
    <style:style style:name="T119" style:family="text">
      <style:text-properties fo:color="#007dc3" loext:opacity="100%" style:font-name="Calibri2" fo:font-size="18pt" officeooo:rsid="00285050" style:font-size-asian="18pt" style:font-size-complex="18pt"/>
    </style:style>
    <style:style style:name="T120" style:family="text">
      <style:text-properties fo:color="#007dc3" loext:opacity="100%" style:font-name="Calibri2" fo:font-size="18pt" officeooo:rsid="01b368bb" style:font-size-asian="18pt" style:font-size-complex="18pt"/>
    </style:style>
    <style:style style:name="T121" style:family="text">
      <style:text-properties fo:color="#007dc3" loext:opacity="100%" style:font-name="Calibri2" fo:font-size="18pt" officeooo:rsid="01b4bedd" style:font-size-asian="18pt" style:font-size-complex="18pt"/>
    </style:style>
    <style:style style:name="T122" style:family="text">
      <style:text-properties fo:color="#007dc3" loext:opacity="100%" style:font-name="Calibri2" fo:font-size="18pt" officeooo:rsid="01b71c80" style:font-size-asian="18pt" style:font-size-complex="18pt"/>
    </style:style>
    <style:style style:name="T123" style:family="text">
      <style:text-properties fo:color="#007dc3" loext:opacity="100%" style:font-name="Calibri2" fo:font-size="18pt" officeooo:rsid="00285050" fo:background-color="transparent" loext:char-shading-value="0" style:font-size-asian="18pt" style:font-size-complex="18pt"/>
    </style:style>
    <style:style style:name="T124" style:family="text">
      <style:text-properties fo:color="#007dc3" loext:opacity="100%" style:font-name="Calibri2" fo:font-size="18pt" officeooo:rsid="01b368bb" fo:background-color="transparent" loext:char-shading-value="0" style:font-size-asian="18pt" style:font-size-complex="18pt"/>
    </style:style>
    <style:style style:name="T125" style:family="text">
      <style:text-properties fo:color="#007dc3" loext:opacity="100%" style:font-name="Calibri2" fo:font-size="18pt" officeooo:rsid="01b4bedd" fo:background-color="transparent" loext:char-shading-value="0" style:font-size-asian="18pt" style:font-size-complex="18pt"/>
    </style:style>
    <style:style style:name="T126" style:family="text">
      <style:text-properties fo:color="#007dc3" loext:opacity="100%" style:font-name="Calibri2" fo:font-size="18pt" officeooo:rsid="01b71c80" fo:background-color="transparent" loext:char-shading-value="0" style:font-size-asian="18pt" style:font-size-complex="18pt"/>
    </style:style>
    <style:style style:name="T127" style:family="text">
      <style:text-properties officeooo:rsid="00d338c0"/>
    </style:style>
    <style:style style:name="T128" style:family="text">
      <style:text-properties officeooo:rsid="00d63ec8"/>
    </style:style>
    <style:style style:name="T129" style:family="text">
      <style:text-properties fo:font-style="italic" style:font-style-asian="italic" style:font-style-complex="italic"/>
    </style:style>
    <style:style style:name="T130" style:family="text">
      <style:text-properties fo:font-style="italic" officeooo:rsid="00d63ec8" style:font-style-asian="italic" style:font-style-complex="italic"/>
    </style:style>
    <style:style style:name="T131" style:family="text">
      <style:text-properties fo:font-style="italic" officeooo:rsid="00db5ce5" style:font-style-asian="italic" style:font-style-complex="italic"/>
    </style:style>
    <style:style style:name="T132" style:family="text">
      <style:text-properties fo:font-style="italic" officeooo:rsid="00e38553" style:font-style-asian="italic" style:font-style-complex="italic"/>
    </style:style>
    <style:style style:name="T133" style:family="text">
      <style:text-properties fo:font-style="italic" officeooo:rsid="00df575f" style:font-style-asian="italic" style:font-style-complex="italic"/>
    </style:style>
    <style:style style:name="T134" style:family="text">
      <style:text-properties fo:font-style="italic" officeooo:rsid="00e07efa" style:font-style-asian="italic" style:font-style-complex="italic"/>
    </style:style>
    <style:style style:name="T135" style:family="text">
      <style:text-properties fo:font-style="italic" officeooo:rsid="00df017d" style:font-style-asian="italic" style:font-style-complex="italic"/>
    </style:style>
    <style:style style:name="T136" style:family="text">
      <style:text-properties fo:font-style="italic" officeooo:rsid="00e16f63" style:font-style-asian="italic" style:font-style-complex="italic"/>
    </style:style>
    <style:style style:name="T137" style:family="text">
      <style:text-properties fo:font-style="italic" officeooo:rsid="00e33a20" style:font-style-asian="italic" style:font-style-complex="italic"/>
    </style:style>
    <style:style style:name="T138" style:family="text">
      <style:text-properties fo:font-style="italic" officeooo:rsid="00e8f23e" style:font-style-asian="italic" style:font-style-complex="italic"/>
    </style:style>
    <style:style style:name="T139" style:family="text">
      <style:text-properties fo:font-style="italic" officeooo:rsid="00d8ffe0" style:font-style-asian="italic" style:font-style-complex="italic"/>
    </style:style>
    <style:style style:name="T140" style:family="text">
      <style:text-properties fo:font-style="italic" officeooo:rsid="01546630" style:font-style-asian="italic" style:font-style-complex="italic"/>
    </style:style>
    <style:style style:name="T141" style:family="text">
      <style:text-properties fo:font-style="italic" fo:font-weight="bold" officeooo:rsid="00db5ce5" style:font-style-asian="italic" style:font-weight-asian="bold" style:font-style-complex="italic" style:font-weight-complex="bold"/>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e440cb" fo:background-color="transparent" loext:char-shading-value="0" style:font-style-asian="italic" style:font-style-complex="italic"/>
    </style:style>
    <style:style style:name="T144" style:family="text">
      <style:text-properties fo:font-style="italic" officeooo:rsid="00df017d" fo:background-color="transparent" loext:char-shading-value="0" style:font-style-asian="italic" style:font-style-complex="italic"/>
    </style:style>
    <style:style style:name="T145" style:family="text">
      <style:text-properties fo:font-style="italic" officeooo:rsid="00e16f63" fo:background-color="transparent" loext:char-shading-value="0" style:font-style-asian="italic" style:font-style-complex="italic"/>
    </style:style>
    <style:style style:name="T146" style:family="text">
      <style:text-properties fo:font-style="italic" officeooo:rsid="00e07efa" fo:background-color="transparent" loext:char-shading-value="0" style:font-style-asian="italic" style:font-style-complex="italic"/>
    </style:style>
    <style:style style:name="T147" style:family="text">
      <style:text-properties fo:font-style="italic" officeooo:rsid="00e33a20" fo:background-color="transparent" loext:char-shading-value="0" style:font-style-asian="italic" style:font-style-complex="italic"/>
    </style:style>
    <style:style style:name="T148" style:family="text">
      <style:text-properties fo:font-style="italic" officeooo:rsid="00dd25a6" fo:background-color="transparent" loext:char-shading-value="0" style:font-style-asian="italic" style:font-style-complex="italic"/>
    </style:style>
    <style:style style:name="T149" style:family="text">
      <style:text-properties fo:font-style="italic" officeooo:rsid="00ee103b" fo:background-color="transparent" loext:char-shading-value="0" style:font-style-asian="italic" style:font-style-complex="italic"/>
    </style:style>
    <style:style style:name="T150" style:family="text">
      <style:text-properties fo:font-style="italic" officeooo:rsid="00dda4cb" fo:background-color="transparent" loext:char-shading-value="0" style:font-style-asian="italic" style:font-style-complex="italic"/>
    </style:style>
    <style:style style:name="T151" style:family="text">
      <style:text-properties fo:font-style="italic" officeooo:rsid="00f0f9b1" fo:background-color="transparent" loext:char-shading-value="0" style:font-style-asian="italic" style:font-style-complex="italic"/>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ea866e" style:font-style-asian="italic" style:font-weight-asian="normal" style:font-style-complex="italic" style:font-weight-complex="normal"/>
    </style:style>
    <style:style style:name="T154" style:family="text">
      <style:text-properties fo:font-style="italic" fo:font-weight="normal" fo:background-color="transparent" loext:char-shading-value="0" style:font-style-asian="italic" style:font-weight-asian="normal" style:font-style-complex="italic" style:font-weight-complex="normal"/>
    </style:style>
    <style:style style:name="T155"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6"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7" style:family="text">
      <style:text-properties fo:font-style="normal" style:font-style-asian="normal" style:font-style-complex="normal"/>
    </style:style>
    <style:style style:name="T158" style:family="text">
      <style:text-properties fo:font-style="normal" officeooo:rsid="00d63ec8" style:font-style-asian="normal" style:font-style-complex="normal"/>
    </style:style>
    <style:style style:name="T159" style:family="text">
      <style:text-properties fo:font-style="normal" officeooo:rsid="00db5ce5" style:font-style-asian="normal" style:font-style-complex="normal"/>
    </style:style>
    <style:style style:name="T160" style:family="text">
      <style:text-properties fo:font-style="normal" officeooo:rsid="00cb38e8" style:font-style-asian="normal" style:font-style-complex="normal"/>
    </style:style>
    <style:style style:name="T161" style:family="text">
      <style:text-properties fo:font-style="normal" officeooo:rsid="00e38553" style:font-style-asian="normal" style:font-style-complex="normal"/>
    </style:style>
    <style:style style:name="T162" style:family="text">
      <style:text-properties fo:font-style="normal" officeooo:rsid="00d87f80" style:font-style-asian="normal" style:font-style-complex="normal"/>
    </style:style>
    <style:style style:name="T163" style:family="text">
      <style:text-properties fo:font-style="normal" officeooo:rsid="00df575f" style:font-style-asian="normal" style:font-style-complex="normal"/>
    </style:style>
    <style:style style:name="T164" style:family="text">
      <style:text-properties fo:font-style="normal" officeooo:rsid="00e07efa" style:font-style-asian="normal" style:font-style-complex="normal"/>
    </style:style>
    <style:style style:name="T165" style:family="text">
      <style:text-properties fo:font-style="normal" officeooo:rsid="00e1e7f8" style:font-style-asian="normal" style:font-style-complex="normal"/>
    </style:style>
    <style:style style:name="T166" style:family="text">
      <style:text-properties fo:font-style="normal" officeooo:rsid="00e2fa38" style:font-style-asian="normal" style:font-style-complex="normal"/>
    </style:style>
    <style:style style:name="T167" style:family="text">
      <style:text-properties fo:font-style="normal" officeooo:rsid="00d8ffe0" style:font-style-asian="normal" style:font-style-complex="normal"/>
    </style:style>
    <style:style style:name="T168" style:family="text">
      <style:text-properties fo:font-style="normal" officeooo:rsid="00e0368e" style:font-style-asian="normal" style:font-style-complex="normal"/>
    </style:style>
    <style:style style:name="T169" style:family="text">
      <style:text-properties fo:font-style="normal" officeooo:rsid="00e16f63" style:font-style-asian="normal" style:font-style-complex="normal"/>
    </style:style>
    <style:style style:name="T170" style:family="text">
      <style:text-properties fo:font-style="normal" officeooo:rsid="00e8f23e" style:font-style-asian="normal" style:font-style-complex="normal"/>
    </style:style>
    <style:style style:name="T171" style:family="text">
      <style:text-properties fo:font-style="normal" officeooo:rsid="00ee103b" style:font-style-asian="normal" style:font-style-complex="normal"/>
    </style:style>
    <style:style style:name="T172" style:family="text">
      <style:text-properties fo:font-style="normal" officeooo:rsid="01546630" style:font-style-asian="normal" style:font-style-complex="normal"/>
    </style:style>
    <style:style style:name="T173" style:family="text">
      <style:text-properties fo:font-style="normal" officeooo:rsid="014f9ade" style:font-style-asian="normal" style:font-style-complex="normal"/>
    </style:style>
    <style:style style:name="T174" style:family="text">
      <style:text-properties fo:font-style="normal" officeooo:rsid="01b4bedd" style:font-style-asian="normal" style:font-style-complex="normal"/>
    </style:style>
    <style:style style:name="T175" style:family="text">
      <style:text-properties fo:font-style="normal" fo:background-color="transparent" loext:char-shading-value="0" style:font-style-asian="normal" style:font-style-complex="normal"/>
    </style:style>
    <style:style style:name="T176" style:family="text">
      <style:text-properties fo:font-style="normal" officeooo:rsid="00d63ec8" fo:background-color="transparent" loext:char-shading-value="0" style:font-style-asian="normal" style:font-style-complex="normal"/>
    </style:style>
    <style:style style:name="T177" style:family="text">
      <style:text-properties fo:font-style="normal" officeooo:rsid="00d81a0e" fo:background-color="transparent" loext:char-shading-value="0" style:font-style-asian="normal" style:font-style-complex="normal"/>
    </style:style>
    <style:style style:name="T178" style:family="text">
      <style:text-properties fo:font-style="normal" officeooo:rsid="00e2fa38" fo:background-color="transparent" loext:char-shading-value="0" style:font-style-asian="normal" style:font-style-complex="normal"/>
    </style:style>
    <style:style style:name="T179" style:family="text">
      <style:text-properties fo:font-style="normal" officeooo:rsid="00e1e7f8" fo:background-color="transparent" loext:char-shading-value="0" style:font-style-asian="normal" style:font-style-complex="normal"/>
    </style:style>
    <style:style style:name="T180" style:family="text">
      <style:text-properties fo:font-style="normal" officeooo:rsid="00e440cb" fo:background-color="transparent" loext:char-shading-value="0" style:font-style-asian="normal" style:font-style-complex="normal"/>
    </style:style>
    <style:style style:name="T181" style:family="text">
      <style:text-properties fo:font-style="normal" officeooo:rsid="00df017d" fo:background-color="transparent" loext:char-shading-value="0" style:font-style-asian="normal" style:font-style-complex="normal"/>
    </style:style>
    <style:style style:name="T182" style:family="text">
      <style:text-properties fo:font-style="normal" officeooo:rsid="00dfc741" fo:background-color="transparent" loext:char-shading-value="0" style:font-style-asian="normal" style:font-style-complex="normal"/>
    </style:style>
    <style:style style:name="T183" style:family="text">
      <style:text-properties fo:font-style="normal" officeooo:rsid="00e0368e" fo:background-color="transparent" loext:char-shading-value="0" style:font-style-asian="normal" style:font-style-complex="normal"/>
    </style:style>
    <style:style style:name="T184" style:family="text">
      <style:text-properties fo:font-style="normal" officeooo:rsid="00dda4cb" fo:background-color="transparent" loext:char-shading-value="0" style:font-style-asian="normal" style:font-style-complex="normal"/>
    </style:style>
    <style:style style:name="T185" style:family="text">
      <style:text-properties fo:font-style="normal" officeooo:rsid="00e16f63" fo:background-color="transparent" loext:char-shading-value="0" style:font-style-asian="normal" style:font-style-complex="normal"/>
    </style:style>
    <style:style style:name="T186" style:family="text">
      <style:text-properties fo:font-style="normal" officeooo:rsid="00e33a20" fo:background-color="transparent" loext:char-shading-value="0" style:font-style-asian="normal" style:font-style-complex="normal"/>
    </style:style>
    <style:style style:name="T187" style:family="text">
      <style:text-properties fo:font-style="normal" officeooo:rsid="00db5ce5" fo:background-color="transparent" loext:char-shading-value="0" style:font-style-asian="normal" style:font-style-complex="normal"/>
    </style:style>
    <style:style style:name="T188" style:family="text">
      <style:text-properties fo:font-style="normal" officeooo:rsid="00e8f23e" fo:background-color="transparent" loext:char-shading-value="0" style:font-style-asian="normal" style:font-style-complex="normal"/>
    </style:style>
    <style:style style:name="T189" style:family="text">
      <style:text-properties fo:font-style="normal" officeooo:rsid="00d87f80" fo:background-color="transparent" loext:char-shading-value="0" style:font-style-asian="normal" style:font-style-complex="normal"/>
    </style:style>
    <style:style style:name="T190" style:family="text">
      <style:text-properties fo:font-style="normal" officeooo:rsid="00dd25a6" fo:background-color="transparent" loext:char-shading-value="0" style:font-style-asian="normal" style:font-style-complex="normal"/>
    </style:style>
    <style:style style:name="T191" style:family="text">
      <style:text-properties fo:font-style="normal" officeooo:rsid="00f0f9b1" fo:background-color="transparent" loext:char-shading-value="0" style:font-style-asian="normal" style:font-style-complex="normal"/>
    </style:style>
    <style:style style:name="T192" style:family="text">
      <style:text-properties fo:font-style="normal" officeooo:rsid="00d8ffe0" fo:background-color="transparent" loext:char-shading-value="0" style:font-style-asian="normal" style:font-style-complex="normal"/>
    </style:style>
    <style:style style:name="T193" style:family="text">
      <style:text-properties fo:font-style="normal" fo:font-weight="normal" officeooo:rsid="00ea866e" style:font-style-asian="normal" style:font-weight-asian="normal" style:font-style-complex="normal" style:font-weight-complex="normal"/>
    </style:style>
    <style:style style:name="T194" style:family="text">
      <style:text-properties fo:font-style="normal" fo:font-weight="normal" fo:background-color="transparent" loext:char-shading-value="0" style:font-style-asian="normal" style:font-weight-asian="normal" style:font-style-complex="normal" style:font-weight-complex="normal"/>
    </style:style>
    <style:style style:name="T195"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6"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7"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8" style:family="text">
      <style:text-properties fo:font-style="normal" fo:font-weight="bold" officeooo:rsid="01546630" style:font-style-asian="normal" style:font-weight-asian="bold" style:font-style-complex="normal" style:font-weight-complex="bold"/>
    </style:style>
    <style:style style:name="T199" style:family="text">
      <style:text-properties officeooo:rsid="00db5ce5"/>
    </style:style>
    <style:style style:name="T200" style:family="text">
      <style:text-properties officeooo:rsid="00d87f80"/>
    </style:style>
    <style:style style:name="T201" style:family="text">
      <style:text-properties officeooo:rsid="00dac55c"/>
    </style:style>
    <style:style style:name="T202" style:family="text">
      <style:text-properties fo:color="#3f5fbf" loext:opacity="100%" style:font-name="Consolas1"/>
    </style:style>
    <style:style style:name="T203" style:family="text">
      <style:text-properties fo:color="#3f5fbf" loext:opacity="100%" style:font-name="Consolas1" fo:font-size="10pt" style:font-size-asian="10pt"/>
    </style:style>
    <style:style style:name="T204" style:family="text">
      <style:text-properties fo:color="#3f5fbf" loext:opacity="100%" style:font-name="Consolas1" fo:font-size="10pt" style:text-underline-style="solid" style:text-underline-width="auto" style:text-underline-color="font-color" style:font-size-asian="10pt"/>
    </style:style>
    <style:style style:name="T205" style:family="text">
      <style:text-properties fo:color="#3f5fbf" loext:opacity="100%" style:font-name="Consolas1" style:text-underline-style="solid" style:text-underline-width="auto" style:text-underline-color="font-color"/>
    </style:style>
    <style:style style:name="T206" style:family="text">
      <style:text-properties fo:color="#7f9fbf" loext:opacity="100%" style:font-name="Consolas1" fo:font-size="10pt" fo:font-weight="bold" style:font-size-asian="10pt" style:font-weight-asian="bold"/>
    </style:style>
    <style:style style:name="T207" style:family="text">
      <style:text-properties fo:color="#7f9fbf" loext:opacity="100%" style:font-name="Consolas1" fo:font-weight="bold" style:font-weight-asian="bold"/>
    </style:style>
    <style:style style:name="T208" style:family="text">
      <style:text-properties fo:color="#7f7f9f" loext:opacity="100%" style:font-name="Consolas1" fo:font-size="10pt" style:font-size-asian="10pt"/>
    </style:style>
    <style:style style:name="T209" style:family="text">
      <style:text-properties officeooo:rsid="00e07efa"/>
    </style:style>
    <style:style style:name="T210" style:family="text">
      <style:text-properties officeooo:rsid="00e85af2"/>
    </style:style>
    <style:style style:name="T211" style:family="text">
      <style:text-properties officeooo:rsid="00ea866e"/>
    </style:style>
    <style:style style:name="T212" style:family="text">
      <style:text-properties fo:font-weight="normal" style:font-weight-asian="normal" style:font-weight-complex="normal"/>
    </style:style>
    <style:style style:name="T213" style:family="text">
      <style:text-properties fo:font-weight="normal" officeooo:rsid="00ea866e" style:font-weight-asian="normal" style:font-weight-complex="normal"/>
    </style:style>
    <style:style style:name="T214" style:family="text">
      <style:text-properties fo:font-weight="normal" officeooo:rsid="0163fbf5" style:font-weight-asian="normal" style:font-weight-complex="normal"/>
    </style:style>
    <style:style style:name="T215" style:family="text">
      <style:text-properties fo:font-weight="normal" officeooo:rsid="016f0584" style:font-weight-asian="normal" style:font-weight-complex="normal"/>
    </style:style>
    <style:style style:name="T216" style:family="text">
      <style:text-properties fo:font-weight="normal" officeooo:rsid="01b0c851" style:font-weight-asian="normal" style:font-weight-complex="normal"/>
    </style:style>
    <style:style style:name="T217" style:family="text">
      <style:text-properties fo:font-weight="normal" officeooo:rsid="00ea866e" fo:background-color="transparent" loext:char-shading-value="0" style:font-weight-asian="normal" style:font-weight-complex="normal"/>
    </style:style>
    <style:style style:name="T218" style:family="text">
      <style:text-properties fo:font-weight="normal" officeooo:rsid="00e54ccf" fo:background-color="transparent" loext:char-shading-value="0" style:font-weight-asian="normal" style:font-weight-complex="normal"/>
    </style:style>
    <style:style style:name="T219" style:family="text">
      <style:text-properties fo:font-weight="normal" officeooo:rsid="00e5f97a" fo:background-color="transparent" loext:char-shading-value="0" style:font-weight-asian="normal" style:font-weight-complex="normal"/>
    </style:style>
    <style:style style:name="T220" style:family="text">
      <style:text-properties fo:color="#3f7f5f" loext:opacity="100%" style:font-name="Consolas1"/>
    </style:style>
    <style:style style:name="T221" style:family="text">
      <style:text-properties fo:color="#3f7f5f" loext:opacity="100%" style:font-name="Consolas1" style:text-underline-style="solid" style:text-underline-width="auto" style:text-underline-color="font-color"/>
    </style:style>
    <style:style style:name="T222" style:family="text">
      <style:text-properties fo:color="#3f7f5f" loext:opacity="100%" style:font-name="Consolas1" style:text-underline-style="none"/>
    </style:style>
    <style:style style:name="T223" style:family="text">
      <style:text-properties fo:color="#3f7f5f" loext:opacity="100%" style:text-underline-style="none"/>
    </style:style>
    <style:style style:name="T224" style:family="text">
      <style:text-properties fo:color="#3f7f5f" loext:opacity="100%" style:font-name="Monospace1" fo:font-size="10pt" style:font-size-asian="10pt"/>
    </style:style>
    <style:style style:name="T225" style:family="text">
      <style:text-properties fo:color="#3f7f5f" loext:opacity="100%" style:font-name="Monospace1" fo:font-size="10pt" officeooo:rsid="018c7b7a" style:font-size-asian="10pt"/>
    </style:style>
    <style:style style:name="T226" style:family="text">
      <style:text-properties fo:color="#3f3fbf" loext:opacity="100%" style:font-name="Consolas1"/>
    </style:style>
    <style:style style:name="T227" style:family="text">
      <style:text-properties officeooo:rsid="00ee64c9"/>
    </style:style>
    <style:style style:name="T228" style:family="text">
      <style:text-properties text:display="none"/>
    </style:style>
    <style:style style:name="T229" style:family="text">
      <style:text-properties officeooo:rsid="00ebb296"/>
    </style:style>
    <style:style style:name="T230"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1"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2"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3"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4" style:family="text">
      <style:text-properties officeooo:rsid="00dda4cb"/>
    </style:style>
    <style:style style:name="T235"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6"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7" style:family="text">
      <style:text-properties officeooo:rsid="00df017d" fo:background-color="transparent" loext:char-shading-value="0"/>
    </style:style>
    <style:style style:name="T238" style:family="text">
      <style:text-properties officeooo:rsid="00e59aa6" fo:background-color="transparent" loext:char-shading-value="0"/>
    </style:style>
    <style:style style:name="T239" style:family="text">
      <style:text-properties officeooo:rsid="00dda4cb" fo:background-color="transparent" loext:char-shading-value="0"/>
    </style:style>
    <style:style style:name="T240" style:family="text">
      <style:text-properties officeooo:rsid="00ee103b" fo:background-color="transparent" loext:char-shading-value="0"/>
    </style:style>
    <style:style style:name="T241" style:family="text">
      <style:text-properties officeooo:rsid="00e16f63"/>
    </style:style>
    <style:style style:name="T242" style:family="text">
      <style:text-properties officeooo:rsid="00e8f23e"/>
    </style:style>
    <style:style style:name="T243" style:family="text">
      <style:text-properties officeooo:rsid="00ec4c44"/>
    </style:style>
    <style:style style:name="T244" style:family="text">
      <style:text-properties officeooo:rsid="00f7036b"/>
    </style:style>
    <style:style style:name="T245" style:family="text">
      <style:text-properties officeooo:rsid="00f8fa7f"/>
    </style:style>
    <style:style style:name="T246" style:family="text">
      <style:text-properties officeooo:rsid="00f9eb5c"/>
    </style:style>
    <style:style style:name="T247" style:family="text">
      <style:text-properties officeooo:rsid="00fa2108"/>
    </style:style>
    <style:style style:name="T248" style:family="text">
      <style:text-properties officeooo:rsid="00fadb7a"/>
    </style:style>
    <style:style style:name="T249" style:family="text">
      <style:text-properties officeooo:rsid="00fb0ac1"/>
    </style:style>
    <style:style style:name="T250" style:family="text">
      <style:text-properties officeooo:rsid="00fc5e61"/>
    </style:style>
    <style:style style:name="T251" style:family="text">
      <style:text-properties officeooo:rsid="00fdedbb"/>
    </style:style>
    <style:style style:name="T252" style:family="text">
      <style:text-properties officeooo:rsid="00ff2832"/>
    </style:style>
    <style:style style:name="T253" style:family="text">
      <style:text-properties officeooo:rsid="010136dd"/>
    </style:style>
    <style:style style:name="T254" style:family="text">
      <style:text-properties officeooo:rsid="0104c9b6"/>
    </style:style>
    <style:style style:name="T255" style:family="text">
      <style:text-properties officeooo:rsid="0105b899"/>
    </style:style>
    <style:style style:name="T256" style:family="text">
      <style:text-properties officeooo:rsid="0106886f"/>
    </style:style>
    <style:style style:name="T257" style:family="text">
      <style:text-properties officeooo:rsid="01073b25"/>
    </style:style>
    <style:style style:name="T258" style:family="text">
      <style:text-properties officeooo:rsid="0108f91b"/>
    </style:style>
    <style:style style:name="T259" style:family="text">
      <style:text-properties officeooo:rsid="010af096"/>
    </style:style>
    <style:style style:name="T260" style:family="text">
      <style:text-properties officeooo:rsid="010e1f55"/>
    </style:style>
    <style:style style:name="T261" style:family="text">
      <style:text-properties officeooo:rsid="010fbae5"/>
    </style:style>
    <style:style style:name="T262" style:family="text">
      <style:text-properties officeooo:rsid="0110d1f4"/>
    </style:style>
    <style:style style:name="T263" style:family="text">
      <style:text-properties officeooo:rsid="011208a6"/>
    </style:style>
    <style:style style:name="T264" style:family="text">
      <style:text-properties officeooo:rsid="011355b4"/>
    </style:style>
    <style:style style:name="T265" style:family="text">
      <style:text-properties officeooo:rsid="0113da63"/>
    </style:style>
    <style:style style:name="T266" style:family="text">
      <style:text-properties style:text-underline-style="none"/>
    </style:style>
    <style:style style:name="T267" style:family="text">
      <style:text-properties officeooo:rsid="01212e12"/>
    </style:style>
    <style:style style:name="T268" style:family="text">
      <style:text-properties officeooo:rsid="0121d8ec"/>
    </style:style>
    <style:style style:name="T269" style:family="text">
      <style:text-properties officeooo:rsid="0124bd62"/>
    </style:style>
    <style:style style:name="T270" style:family="text">
      <style:text-properties officeooo:rsid="01258e96"/>
    </style:style>
    <style:style style:name="T271" style:family="text">
      <style:text-properties officeooo:rsid="0127de30"/>
    </style:style>
    <style:style style:name="T272" style:family="text">
      <style:text-properties officeooo:rsid="01286d0a"/>
    </style:style>
    <style:style style:name="T273" style:family="text">
      <style:text-properties officeooo:rsid="012ada2e"/>
    </style:style>
    <style:style style:name="T274" style:family="text">
      <style:text-properties officeooo:rsid="012ec9b6"/>
    </style:style>
    <style:style style:name="T275" style:family="text">
      <style:text-properties officeooo:rsid="005eebc7"/>
    </style:style>
    <style:style style:name="T276" style:family="text">
      <style:text-properties officeooo:rsid="012ef337"/>
    </style:style>
    <style:style style:name="T277" style:family="text">
      <style:text-properties fo:color="#a41515" loext:opacity="100%" style:font-name="Consolas1" fo:font-size="9pt" style:font-size-asian="9pt"/>
    </style:style>
    <style:style style:name="T278" style:family="text">
      <style:text-properties fo:color="#0451a6" loext:opacity="100%" style:font-name="Consolas1" fo:font-size="9pt" style:font-size-asian="9pt"/>
    </style:style>
    <style:style style:name="T279" style:family="text">
      <style:text-properties officeooo:rsid="0149cec3"/>
    </style:style>
    <style:style style:name="T280" style:family="text">
      <style:text-properties officeooo:rsid="014adc01"/>
    </style:style>
    <style:style style:name="T281" style:family="text">
      <style:text-properties officeooo:rsid="014f9ade"/>
    </style:style>
    <style:style style:name="T282" style:family="text">
      <style:text-properties officeooo:rsid="0151259d"/>
    </style:style>
    <style:style style:name="T283" style:family="text">
      <style:text-properties officeooo:rsid="0151fd2e"/>
    </style:style>
    <style:style style:name="T284" style:family="text">
      <style:text-properties officeooo:rsid="01546630"/>
    </style:style>
    <style:style style:name="T285" style:family="text">
      <style:text-properties officeooo:rsid="01554eb3"/>
    </style:style>
    <style:style style:name="T286" style:family="text">
      <style:text-properties officeooo:rsid="0155bc3d"/>
    </style:style>
    <style:style style:name="T287" style:family="text">
      <style:text-properties officeooo:rsid="015c0e13"/>
    </style:style>
    <style:style style:name="T288" style:family="text">
      <style:text-properties officeooo:rsid="015c4085"/>
    </style:style>
    <style:style style:name="T289" style:family="text">
      <style:text-properties officeooo:rsid="015e4779"/>
    </style:style>
    <style:style style:name="T290" style:family="text">
      <style:text-properties fo:color="#0451a5" loext:opacity="100%" style:font-name="Consolas2" fo:font-size="9pt" fo:font-weight="normal"/>
    </style:style>
    <style:style style:name="T291" style:family="text">
      <style:text-properties fo:color="#0451a5" loext:opacity="100%" style:font-name="Consolas2" fo:font-size="9pt" fo:font-weight="normal" fo:background-color="#fffffe" loext:char-shading-value="0"/>
    </style:style>
    <style:style style:name="T292" style:family="text">
      <style:text-properties fo:color="#0451a5" loext:opacity="100%" style:font-name="Consolas2" fo:font-size="9pt" fo:font-weight="normal" officeooo:rsid="01b5544c"/>
    </style:style>
    <style:style style:name="T293" style:family="text">
      <style:text-properties fo:color="#0451a5" loext:opacity="100%" style:font-name="Consolas2" fo:font-size="9pt" fo:font-weight="normal" officeooo:rsid="01b71c80"/>
    </style:style>
    <style:style style:name="T294" style:family="text">
      <style:text-properties fo:color="#0451a5" loext:opacity="100%" style:font-name="Consolas2" fo:font-size="9pt" fo:font-weight="bold"/>
    </style:style>
    <style:style style:name="T295" style:family="text">
      <style:text-properties officeooo:rsid="015fa555"/>
    </style:style>
    <style:style style:name="T296" style:family="text">
      <style:text-properties style:font-name="Consolas2" fo:font-size="9pt" fo:font-weight="normal"/>
    </style:style>
    <style:style style:name="T297" style:family="text">
      <style:text-properties style:font-name="Consolas2" fo:font-size="9pt" fo:font-weight="normal" officeooo:rsid="015fa555"/>
    </style:style>
    <style:style style:name="T298" style:family="text">
      <style:text-properties fo:color="#a31515" loext:opacity="100%" style:font-name="Consolas2" fo:font-size="9pt" fo:font-weight="normal"/>
    </style:style>
    <style:style style:name="T299" style:family="text">
      <style:text-properties fo:color="#a31515" loext:opacity="100%" style:font-name="Consolas2" fo:font-size="9pt" fo:font-weight="normal" officeooo:rsid="01b5544c"/>
    </style:style>
    <style:style style:name="T300" style:family="text">
      <style:text-properties fo:color="#a31515" loext:opacity="100%" style:font-name="Consolas2" fo:font-size="9pt" fo:font-weight="normal" officeooo:rsid="01b71c80"/>
    </style:style>
    <style:style style:name="T301" style:family="text">
      <style:text-properties fo:color="#098658" loext:opacity="100%" style:font-name="Consolas2" fo:font-size="9pt" fo:font-weight="normal"/>
    </style:style>
    <style:style style:name="T302" style:family="text">
      <style:text-properties officeooo:rsid="0160d5f3"/>
    </style:style>
    <style:style style:name="T303" style:family="text">
      <style:text-properties officeooo:rsid="01622317"/>
    </style:style>
    <style:style style:name="T304" style:family="text">
      <style:text-properties officeooo:rsid="0163fbf5"/>
    </style:style>
    <style:style style:name="T305" style:family="text">
      <style:text-properties officeooo:rsid="016529da"/>
    </style:style>
    <style:style style:name="T306" style:family="text">
      <style:text-properties officeooo:rsid="016cca63"/>
    </style:style>
    <style:style style:name="T307" style:family="text">
      <style:text-properties officeooo:rsid="016e9a6e"/>
    </style:style>
    <style:style style:name="T308" style:family="text">
      <style:text-properties officeooo:rsid="016f0584"/>
    </style:style>
    <style:style style:name="T309" style:family="text">
      <style:text-properties officeooo:rsid="017087d4"/>
    </style:style>
    <style:style style:name="T310" style:family="text">
      <style:text-properties officeooo:rsid="01723150"/>
    </style:style>
    <style:style style:name="T311" style:family="text">
      <style:text-properties officeooo:rsid="0176c9fd"/>
    </style:style>
    <style:style style:name="T312" style:family="text">
      <style:text-properties officeooo:rsid="0177982d"/>
    </style:style>
    <style:style style:name="T313" style:family="text">
      <style:text-properties officeooo:rsid="01794cf9"/>
    </style:style>
    <style:style style:name="T314" style:family="text">
      <style:text-properties officeooo:rsid="017a98da"/>
    </style:style>
    <style:style style:name="T315" style:family="text">
      <style:text-properties officeooo:rsid="017c0014"/>
    </style:style>
    <style:style style:name="T316" style:family="text">
      <style:text-properties officeooo:rsid="01836b49"/>
    </style:style>
    <style:style style:name="T317" style:family="text">
      <style:text-properties officeooo:rsid="007f55bb"/>
    </style:style>
    <style:style style:name="T318" style:family="text">
      <style:text-properties style:rfc-language-tag="es-ES-u-co-trad" fo:language="es" fo:country="ES" fo:font-style="normal" officeooo:rsid="01875821" style:font-style-asian="normal" style:font-style-complex="normal"/>
    </style:style>
    <style:style style:name="T319" style:family="text">
      <style:text-properties style:rfc-language-tag="es-ES-u-co-trad" fo:language="es" fo:country="ES" fo:font-style="normal" officeooo:rsid="01875821" fo:background-color="transparent" loext:char-shading-value="0" style:font-style-asian="normal" style:font-style-complex="normal"/>
    </style:style>
    <style:style style:name="T320" style:family="text">
      <style:text-properties officeooo:rsid="018c7b7a"/>
    </style:style>
    <style:style style:name="T321" style:family="text">
      <style:text-properties officeooo:rsid="018f92fd"/>
    </style:style>
    <style:style style:name="T322" style:family="text">
      <style:text-properties officeooo:rsid="019009d8"/>
    </style:style>
    <style:style style:name="T323" style:family="text">
      <style:text-properties officeooo:rsid="01915c4c"/>
    </style:style>
    <style:style style:name="T324" style:family="text">
      <style:text-properties officeooo:rsid="007af11d"/>
    </style:style>
    <style:style style:name="T325" style:family="text">
      <style:text-properties officeooo:rsid="01949037"/>
    </style:style>
    <style:style style:name="T326" style:family="text">
      <style:text-properties officeooo:rsid="00b37226"/>
    </style:style>
    <style:style style:name="T327" style:family="text">
      <style:text-properties officeooo:rsid="01974b8c"/>
    </style:style>
    <style:style style:name="T328" style:family="text">
      <style:text-properties officeooo:rsid="01985e2b"/>
    </style:style>
    <style:style style:name="T329" style:family="text">
      <style:text-properties officeooo:rsid="01997fee"/>
    </style:style>
    <style:style style:name="T330" style:family="text">
      <style:text-properties officeooo:rsid="019b515e"/>
    </style:style>
    <style:style style:name="T331" style:family="text">
      <style:text-properties officeooo:rsid="019b5d65"/>
    </style:style>
    <style:style style:name="T332" style:family="text">
      <style:text-properties officeooo:rsid="01a00707"/>
    </style:style>
    <style:style style:name="T333" style:family="text">
      <style:text-properties officeooo:rsid="01a3c4fd"/>
    </style:style>
    <style:style style:name="T334" style:family="text">
      <style:text-properties officeooo:rsid="01a794fe"/>
    </style:style>
    <style:style style:name="T335" style:family="text">
      <style:text-properties officeooo:rsid="01a9cdd2"/>
    </style:style>
    <style:style style:name="T336" style:family="text">
      <style:text-properties officeooo:rsid="01aba0a4"/>
    </style:style>
    <style:style style:name="T337" style:family="text">
      <style:text-properties officeooo:rsid="01af45bb"/>
    </style:style>
    <style:style style:name="T338" style:family="text">
      <style:text-properties officeooo:rsid="01b1a3a8"/>
    </style:style>
    <style:style style:name="T339" style:family="text">
      <style:text-properties officeooo:rsid="01b368bb"/>
    </style:style>
    <style:style style:name="T340" style:family="text">
      <style:text-properties officeooo:rsid="01b46b41"/>
    </style:style>
    <style:style style:name="T341" style:family="text">
      <style:text-properties officeooo:rsid="01b4bedd"/>
    </style:style>
    <style:style style:name="T342" style:family="text">
      <style:text-properties officeooo:rsid="01b5e40b"/>
    </style:style>
    <style:style style:name="T343" style:family="text">
      <style:text-properties officeooo:rsid="01b71c80"/>
    </style:style>
    <style:style style:name="T344"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1"/>
      <text:p text:style-name="P21"><draw:g text:anchor-type="as-char" draw:z-index="0" draw:name="Forma2" draw:style-name="gr3"><draw:frame draw:name="Picture 2" draw:style-name="gr4" draw:text-style-name="P458" svg:width="13.553cm" svg:height="2.514cm" svg:x="3.438cm" svg:y="0cm"><draw:image xlink:href="Pictures/10000000000006A400000104C61E4F84145F3308.png" xlink:type="simple" xlink:show="embed" xlink:actuate="onLoad" draw:mime-type="image/png"><text:p/></draw:image></draw:frame><draw:frame draw:name="Picture 3" draw:style-name="gr5" draw:text-style-name="P458" svg:width="3.209cm" svg:height="2.511cm" svg:x="0cm" svg:y="0cm"><draw:image xlink:href="Pictures/10000001000002E6000002BB18D09AEB46C6E810.png" xlink:type="simple" xlink:show="embed" xlink:actuate="onLoad" draw:mime-type="image/png"><text:p/></draw:image></draw:frame></draw:g><text:s text:c="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pan text:style-name="T94">DISTRIBUCIO</text:span>: Manual d’integració </text:p>
      <text:p text:style-name="P20"><text:span text:style-name="T126">16</text:span><text:span text:style-name="T118"> d</text:span><text:span text:style-name="T120">e </text:span><text:span text:style-name="T122">febrer </text:span><text:span text:style-name="T119">de 20</text:span><text:span text:style-name="T123">2</text:span><text:span text:style-name="T126">6</text:span></text:p>
      <text:p text:style-name="P142">Serveis d’Administració Electrònica en el Govern de les Illes Balears</text:p>
      <text:p text:style-name="P141">Lot 3 (Serveis de tramitació d’expedients electrònics)</text:p>
      <text:p text:style-name="P141"/>
      <text:p text:style-name="P141"/>
      <text:p text:style-name="P141"/>
      <text:p text:style-name="P141"/>
      <text:p text:style-name="P4">Oficina Tècnica de Direcció de Projecte</text:p>
      <text:list xml:id="list4142581595" text:style-name="Outline">
        <text:list-header>
          <text:h text:style-name="P392"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36">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3">Modificació del document segons plantilla enviada per la DGDT</text:span>.</text:p>
          </table:table-cell>
        </table:table-row>
        <table:table-row table:style-name="Taula1.1">
          <table:table-cell table:style-name="Taula1.A5" office:value-type="string">
            <text:p text:style-name="P47"><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7">2</text:span></text:p>
          </table:table-cell>
          <table:table-cell table:style-name="Taula1.D5" office:value-type="string">
            <text:p text:style-name="P48"><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49"><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43">3</text:span></text:p>
          </table:table-cell>
          <table:table-cell table:style-name="Taula1.D6" office:value-type="string">
            <text:p text:style-name="P48"><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1">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11">Afegir punts per explicar les APIs REST d'integració per backoffices i per crear regles de distribucio de forma remota. </text:p>
          </table:table-cell>
        </table:table-row>
        <table:table-row table:style-name="Taula1.1">
          <table:table-cell table:style-name="Taula1.A8" office:value-type="string">
            <text:p text:style-name="P211"><text:span text:style-name="T311">05</text:span>/0<text:span text:style-name="T311">7</text:span>/23</text:p>
          </table:table-cell>
          <table:table-cell table:style-name="Taula1.B8" office:value-type="string">
            <text:p text:style-name="P15">Límit Tecnologies</text:p>
          </table:table-cell>
          <table:table-cell table:style-name="Taula1.C8" office:value-type="string">
            <text:p text:style-name="P15">1.<text:span text:style-name="T311">5</text:span></text:p>
          </table:table-cell>
          <table:table-cell table:style-name="Taula1.D8" office:value-type="string">
            <text:p text:style-name="P211"><text:span text:style-name="T311">Revisar documentació i exemples.</text:span> </text:p>
          </table:table-cell>
        </table:table-row>
        <table:table-row table:style-name="Taula1.1">
          <table:table-cell table:style-name="Taula1.A10" office:value-type="string">
            <text:p text:style-name="P212"><text:span text:style-name="T336">12</text:span>/0<text:span text:style-name="T336">4/</text:span>2<text:span text:style-name="T336">4</text:span></text:p>
          </table:table-cell>
          <table:table-cell table:style-name="Taula1.B10" office:value-type="string">
            <text:p text:style-name="P16">Límit Tecnologies</text:p>
          </table:table-cell>
          <table:table-cell table:style-name="Taula1.C10" office:value-type="string">
            <text:p text:style-name="P17">1.6</text:p>
          </table:table-cell>
          <table:table-cell table:style-name="Taula1.D10" office:value-type="string">
            <text:p text:style-name="P251">Revisió per a la versió 1.0<text:span text:style-name="T337">.1</text:span> de l’aplicació.</text:p>
          </table:table-cell>
        </table:table-row>
        <table:table-row table:style-name="Taula1.1">
          <table:table-cell table:style-name="Taula1.A10" office:value-type="string">
            <text:p text:style-name="P212"><text:span text:style-name="T341">09</text:span>/<text:span text:style-name="T339">1</text:span><text:span text:style-name="T341">2</text:span><text:span text:style-name="T336">/</text:span><text:span text:style-name="T339">25</text:span></text:p>
          </table:table-cell>
          <table:table-cell table:style-name="Taula1.B10" office:value-type="string">
            <text:p text:style-name="P16">Límit Tecnologies</text:p>
          </table:table-cell>
          <table:table-cell table:style-name="Taula1.C10" office:value-type="string">
            <text:p text:style-name="P17">1.<text:span text:style-name="T339">7</text:span></text:p>
          </table:table-cell>
          <table:table-cell table:style-name="Taula1.D10" office:value-type="string">
            <text:p text:style-name="P386">Nou paràmetre <text:span text:style-name="T129">tipusSia</text:span><text:span text:style-name="T157"> a l'API de regles.<text:line-break/></text:span><text:span text:style-name="T174">Informació del codi de servei i codi i nom del tràmit en la consulta d'anotacions.</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36">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3"/>
          </table:table-cell>
          <table:table-cell table:style-name="Taula2.B4" office:value-type="string">
            <text:p text:style-name="P143"/>
          </table:table-cell>
          <table:table-cell table:style-name="Taula2.C4" office:value-type="string">
            <text:p text:style-name="P143"/>
          </table:table-cell>
        </table:table-row>
        <table:table-row table:style-name="Taula2.1">
          <table:table-cell table:style-name="Taula2.A5" office:value-type="string">
            <text:p text:style-name="P143"/>
          </table:table-cell>
          <table:table-cell table:style-name="Taula2.B5" office:value-type="string">
            <text:p text:style-name="P143"/>
          </table:table-cell>
          <table:table-cell table:style-name="Taula2.C5" office:value-type="string">
            <text:p text:style-name="P143"/>
          </table:table-cell>
        </table:table-row>
        <table:table-row table:style-name="Taula2.1">
          <table:table-cell table:style-name="Taula2.A6" office:value-type="string">
            <text:p text:style-name="P143"/>
          </table:table-cell>
          <table:table-cell table:style-name="Taula2.B6" office:value-type="string">
            <text:p text:style-name="P143"/>
          </table:table-cell>
          <table:table-cell table:style-name="Taula2.C6" office:value-type="string">
            <text:p text:style-name="P143"/>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36">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3"/>
          </table:table-cell>
          <table:table-cell table:style-name="Taula3.B4" office:value-type="string">
            <text:p text:style-name="P143"/>
          </table:table-cell>
          <table:table-cell table:style-name="Taula3.C4" office:value-type="string">
            <text:p text:style-name="P143"/>
          </table:table-cell>
        </table:table-row>
        <table:table-row table:style-name="Taula3.1">
          <table:table-cell table:style-name="Taula3.A5" office:value-type="string">
            <text:p text:style-name="P143"/>
          </table:table-cell>
          <table:table-cell table:style-name="Taula3.B5" office:value-type="string">
            <text:p text:style-name="P143"/>
          </table:table-cell>
          <table:table-cell table:style-name="Taula3.C5" office:value-type="string">
            <text:p text:style-name="P143"/>
          </table:table-cell>
        </table:table-row>
        <table:table-row table:style-name="Taula3.1">
          <table:table-cell table:style-name="Taula3.A6" office:value-type="string">
            <text:p text:style-name="P143"/>
          </table:table-cell>
          <table:table-cell table:style-name="Taula3.B6" office:value-type="string">
            <text:p text:style-name="P143"/>
          </table:table-cell>
          <table:table-cell table:style-name="Taula3.C6" office:value-type="string">
            <text:p text:style-name="P143"/>
          </table:table-cell>
        </table:table-row>
      </table:table>
      <text:p text:style-name="P2"><text:soft-page-break/></text:p>
      <text:p text:style-name="P2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36">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3"/>
          </table:table-cell>
          <table:table-cell table:style-name="Taula6.B4" office:value-type="string">
            <text:p text:style-name="P143"/>
          </table:table-cell>
          <table:table-cell table:style-name="Taula6.C4" office:value-type="string">
            <text:p text:style-name="P143"/>
          </table:table-cell>
        </table:table-row>
        <table:table-row table:style-name="Taula6.1">
          <table:table-cell table:style-name="Taula6.A5" office:value-type="string">
            <text:p text:style-name="P143"/>
          </table:table-cell>
          <table:table-cell table:style-name="Taula6.B5" office:value-type="string">
            <text:p text:style-name="P143"/>
          </table:table-cell>
          <table:table-cell table:style-name="Taula6.C5" office:value-type="string">
            <text:p text:style-name="P143"/>
          </table:table-cell>
        </table:table-row>
      </table:table>
      <text:p text:style-name="P2"><text:s text:c="5"/></text:p>
      <text:p text:style-name="P2"/>
      <text:p text:style-name="P23">Índex</text:p>
      <text:p text:style-name="P22"/>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1"><text:a xlink:type="simple" xlink:href="#__RefHeading___Toc21421_3940995463" text:style-name="Index_20_Link" text:visited-style-name="Index_20_Link">Control de versions del document<text:tab/>2</text:a></text:p>
          <text:p text:style-name="P221"><text:a xlink:type="simple" xlink:href="#__RefHeading___Toc16768_2313926538" text:style-name="Index_20_Link" text:visited-style-name="Index_20_Link">1. Objecte<text:tab/>5</text:a></text:p>
          <text:p text:style-name="P221"><text:a xlink:type="simple" xlink:href="#__RefHeading___Toc160468_1680181998" text:style-name="Index_20_Link" text:visited-style-name="Index_20_Link">2. Servei d’enviament d'anotacions<text:tab/>6</text:a></text:p>
          <text:p text:style-name="P222"><text:a xlink:type="simple" xlink:href="#__RefHeading___Toc16770_2313926538" text:style-name="Index_20_Link" text:visited-style-name="Index_20_Link">2.1. Diagrames de seqüència<text:tab/>6</text:a></text:p>
          <text:p text:style-name="P223"><text:a xlink:type="simple" xlink:href="#__RefHeading___Toc8043_1716379843" text:style-name="Index_20_Link" text:visited-style-name="Index_20_Link">2.1.1. Processament síncron<text:tab/>6</text:a></text:p>
          <text:p text:style-name="P223"><text:a xlink:type="simple" xlink:href="#__RefHeading___Toc15562_3365326968" text:style-name="Index_20_Link" text:visited-style-name="Index_20_Link">2.1.2. Processament asíncron<text:tab/>7</text:a></text:p>
          <text:p text:style-name="P222"><text:a xlink:type="simple" xlink:href="#__RefHeading___Toc227353_390838441" text:style-name="Index_20_Link" text:visited-style-name="Index_20_Link">2.2. Descripció del servei<text:tab/>8</text:a></text:p>
          <text:p text:style-name="P222"><text:a xlink:type="simple" xlink:href="#__RefHeading___Toc16772_2313926538" text:style-name="Index_20_Link" text:visited-style-name="Index_20_Link">2.3. Model de dades<text:tab/>8</text:a></text:p>
          <text:p text:style-name="P222"><text:a xlink:type="simple" xlink:href="#__RefHeading___Toc227355_390838441" text:style-name="Index_20_Link" text:visited-style-name="Index_20_Link">2.4. Utilització del servei<text:tab/>14</text:a></text:p>
          <text:p text:style-name="P221"><text:a xlink:type="simple" xlink:href="#__RefHeading___Toc52041_2521683781" text:style-name="Index_20_Link" text:visited-style-name="Index_20_Link">3. Servei de backoffice de distribució<text:tab/>15</text:a></text:p>
          <text:p text:style-name="P221"><text:a xlink:type="simple" xlink:href="#__RefHeading___Toc160470_1680181998" text:style-name="Index_20_Link" text:visited-style-name="Index_20_Link">4. Servei de gestió d’anotacions pels backoffices<text:tab/>16</text:a></text:p>
          <text:p text:style-name="P222"><text:a xlink:type="simple" xlink:href="#__RefHeading___Toc227357_390838441" text:style-name="Index_20_Link" text:visited-style-name="Index_20_Link">4.1. Diagrama de seqüència<text:tab/>16</text:a></text:p>
          <text:p text:style-name="P222"><text:a xlink:type="simple" xlink:href="#__RefHeading___Toc227359_390838441" text:style-name="Index_20_Link" text:visited-style-name="Index_20_Link">4.2. Descripció del servei<text:tab/>18</text:a></text:p>
          <text:p text:style-name="P223"><text:a xlink:type="simple" xlink:href="#__RefHeading___Toc53751_2521683781" text:style-name="Index_20_Link" text:visited-style-name="Index_20_Link">4.2.1. Consulta d'una anotació de registre<text:tab/>18</text:a></text:p>
          <text:p text:style-name="P223"><text:a xlink:type="simple" xlink:href="#__RefHeading___Toc53753_2521683781" text:style-name="Index_20_Link" text:visited-style-name="Index_20_Link">4.2.2. Canvi d'estat d'una anotació<text:tab/>20</text:a></text:p>
          <text:p text:style-name="P222"><text:a xlink:type="simple" xlink:href="#__RefHeading___Toc227361_390838441" text:style-name="Index_20_Link" text:visited-style-name="Index_20_Link">4.3. Model de dades<text:tab/>21</text:a></text:p>
          <text:p text:style-name="P222"><text:a xlink:type="simple" xlink:href="#__RefHeading___Toc227363_390838441" text:style-name="Index_20_Link" text:visited-style-name="Index_20_Link">4.4. Utilització del servei<text:tab/>26</text:a></text:p>
          <text:p text:style-name="P221"><text:a xlink:type="simple" xlink:href="#__RefHeading___Toc227365_390838441" text:style-name="Index_20_Link" text:visited-style-name="Index_20_Link">5. Servei de gestió de regles<text:tab/>27</text:a></text:p>
          <text:p text:style-name="P222"><text:a xlink:type="simple" xlink:href="#__RefHeading___Toc227367_390838441" text:style-name="Index_20_Link" text:visited-style-name="Index_20_Link">5.1. Descripció del servei<text:tab/>27</text:a></text:p>
          <text:p text:style-name="P223"><text:a xlink:type="simple" xlink:href="#__RefHeading___Toc227369_390838441" text:style-name="Index_20_Link" text:visited-style-name="Index_20_Link">5.1.1. Crear una regla<text:tab/>28</text:a></text:p>
          <text:p text:style-name="P223"><text:a xlink:type="simple" xlink:href="#__RefHeading___Toc227371_390838441" text:style-name="Index_20_Link" text:visited-style-name="Index_20_Link">5.1.2. Canviar estat d’una regla<text:tab/>28</text:a></text:p>
          <text:p text:style-name="P223"><text:a xlink:type="simple" xlink:href="#__RefHeading___Toc227373_390838441" text:style-name="Index_20_Link" text:visited-style-name="Index_20_Link">5.1.3. Consultar informació d’una regla<text:tab/>29</text:a></text:p>
          <text:p text:style-name="P222"><text:a xlink:type="simple" xlink:href="#__RefHeading___Toc227375_390838441" text:style-name="Index_20_Link" text:visited-style-name="Index_20_Link">5.2. Utilització del servei<text:tab/>30</text:a></text:p>
          <text:p text:style-name="P221"><text:a xlink:type="simple" xlink:href="#__RefHeading___Toc60794_1326387233" text:style-name="Index_20_Link" text:visited-style-name="Index_20_Link">6. Llibreria d'utilitats pels backoffices de DISTRIBUCIO<text:tab/>32</text:a></text:p>
          <text:p text:style-name="P222"><text:a xlink:type="simple" xlink:href="#__RefHeading___Toc50902_2907556958" text:style-name="Index_20_Link" text:visited-style-name="Index_20_Link">6.1. Informació de la llibreria<text:tab/>32</text:a></text:p>
          <text:p text:style-name="P222"><text:a xlink:type="simple" xlink:href="#__RefHeading___Toc50904_2907556958" text:style-name="Index_20_Link" text:visited-style-name="Index_20_Link">6.2. Com incloure la llibreria<text:tab/>33</text:a></text:p>
          <text:p text:style-name="P222"><text:a xlink:type="simple" xlink:href="#__RefHeading___Toc366105_93553639" text:style-name="Index_20_Link" text:visited-style-name="Index_20_Link">6.3. Històric<text:tab/>33</text:a></text:p>
          <text:p text:style-name="P222"><text:a xlink:type="simple" xlink:href="#__RefHeading___Toc366107_93553639" text:style-name="Index_20_Link" text:visited-style-name="Index_20_Link">6.4. Utilitats per l'Arxiu<text:tab/>34</text:a></text:p>
          <text:p text:style-name="P223"><text:a xlink:type="simple" xlink:href="#__RefHeading___Toc50906_2907556958" text:style-name="Index_20_Link" text:visited-style-name="Index_20_Link">6.4.1. Paràmetres<text:tab/>35</text:a></text:p>
          <text:p text:style-name="P223"><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9">B</text:span></text:a><text:a xlink:type="simple" xlink:href="#__RefHeading___Toc50908_2907556958" text:style-name="Index_20_Link" text:visited-style-name="Index_20_Link"><text:span text:style-name="T129">ackofficeArxiuUtils</text:span></text:a><text:a xlink:type="simple" xlink:href="#__RefHeading___Toc50908_2907556958" text:style-name="Index_20_Link" text:visited-style-name="Index_20_Link"><text:tab/>36</text:a></text:p>
          <text:p text:style-name="P223"><text:a xlink:type="simple" xlink:href="#__RefHeading___Toc50910_2907556958" text:style-name="Index_20_Link" text:visited-style-name="Index_20_Link">6.4.3. Exemple Java<text:tab/>37</text:a></text:p>
          <text:p text:style-name="P222"><text:a xlink:type="simple" xlink:href="#__RefHeading___Toc50910_29075569581" text:style-name="Index_20_Link" text:visited-style-name="Index_20_Link">6.5. Utilitats per Sistra2<text:tab/>41</text:a></text:p>
          <text:p text:style-name="P223"><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9">BackofficeSistra2Utils</text:span></text:a><text:a xlink:type="simple" xlink:href="#__RefHeading___Toc366109_93553639" text:style-name="Index_20_Link" text:visited-style-name="Index_20_Link"><text:tab/>42</text:a></text:p>
          <text:p text:style-name="P223"><text:a xlink:type="simple" xlink:href="#__RefHeading___Toc366111_93553639" text:style-name="Index_20_Link" text:visited-style-name="Index_20_Link">6.5.2. Exemple Java<text:tab/>43</text:a></text:p>
          <text:p text:style-name="P221"><text:a xlink:type="simple" xlink:href="#__RefHeading___Toc117515_1680181998" text:style-name="Index_20_Link" text:visited-style-name="Index_20_Link">Annex I: WSDL del backoffice<text:tab/>44</text:a></text:p>
          <text:p text:style-name="P221"><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9">distribucio-backoffice-utils</text:span></text:a><text:a xlink:type="simple" xlink:href="#__RefHeading___Toc60796_1326387233" text:style-name="Index_20_Link" text:visited-style-name="Index_20_Link"><text:tab/>46</text:a></text:p>
        </text:index-body>
      </text:table-of-content>
      <text:p text:style-name="Standard"/>
      <text:p text:style-name="Text_20_body"/>
      <text:list xml:id="list175634674871710" text:continue-numbering="true" text:style-name="Outline">
        <text:list-item>
          <text:h text:style-name="P393" text:outline-level="1"><text:bookmark-start text:name="__RefHeading___Toc16768_2313926538"/>Objecte <text:bookmark-end text:name="__RefHeading___Toc16768_2313926538"/></text:h>
        </text:list-item>
      </text:list>
      <text:p text:style-name="P378"><text:span text:style-name="T312">L'objectiu d'aquest document és proporcionar </text:span>la informació necessària per a la integració amb el<text:span text:style-name="T108">s</text:span> <text:span text:style-name="T323">diferents </text:span>servei<text:span text:style-name="T108">s </text:span><text:span text:style-name="T323">que proporciona l’aplicació</text:span><text:span text:style-name="T108"> DISTRIBUCIÓ.</text:span></text:p>
      <text:p text:style-name="P227">Les aplicacions que s’integren amb distribució pertanyen a un dels següents grups:</text:p>
      <text:list xml:id="list2081351225" text:style-name="L1">
        <text:list-item>
          <text:p text:style-name="P441">Aplicacions de registre: aquestes aplicacions recullen les anotacions del registre d’entrada i les donen d’alta a distribució.</text:p>
        </text:list-item>
        <text:list-item>
          <text:p text:style-name="P441">Backoffices: aquestes aplicacions son les encarregades de processar les anotacions de registre.</text:p>
        </text:list-item>
      </text:list>
      <text:p text:style-name="P227">Les aplicacions de registre fan us del servei d’enviament d’anotacions de registre per a donar-les d’alta a DISTRIBUCIÓ i que comenci el seu processament.</text:p>
      <text:p text:style-name="P227">Per a cada anotació de registre, DISTRIBUCIÓ s’encarrega de calcular el backoffice encarregat del seu processament (mitjançant l’aplicació de regles) i d’informar a aquests backoffices de les anotacions pendents de processar.</text:p>
      <text:p text:style-name="P227">Els backoffices consulten les anotacions de registre a DISTRIBUCIÓ i canvien el seu estat una vegada les han processat.</text:p>
      <text:p text:style-name="P381"><draw:frame draw:style-name="fr4" draw:name="Marc3" text:anchor-type="as-char" svg:width="16.325cm" draw:z-index="65"><draw:text-box fo:min-height="3.678cm"><text:p text:style-name="Figure"><draw:frame draw:style-name="fr7" draw:name="Image8" text:anchor-type="paragraph" svg:width="16.325cm" style:rel-width="100%" svg:height="3.678cm" style:rel-height="scale" draw:z-index="66"><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2"/>
      <text:p text:style-name="P153">A l'apartat <text:bookmark-ref text:reference-format="number" text:ref-name="__RefNumPara__81015_1680181998">2</text:bookmark-ref><text:span text:style-name="T313"><text:s/></text:span>es <text:span text:style-name="T328">descriu el servei d’enviament d’anotacions</text:span> de registre a DISTRIBUCIÓ.</text:p>
      <text:p text:style-name="P154">A l'apartat <text:bookmark-ref text:reference-format="number" text:ref-name="__RefNumPara__52044_2521683781">3</text:bookmark-ref><text:span text:style-name="T313"><text:s/></text:span>es <text:span text:style-name="T328">mostra</text:span> com <text:span text:style-name="T327">implementar el servei dels backoffices que rep la llista d’anotacions pendents de processar de</text:span> DISTRIBUCIÓ.</text:p>
      <text:p text:style-name="P154">A l'apartat <text:bookmark-ref text:reference-format="number" text:ref-name="__RefNumPara__81017_1680181998">4</text:bookmark-ref><text:span text:style-name="T313"><text:s/></text:span>es <text:span text:style-name="T330">descriu el servei </text:span><text:span text:style-name="T329">que permet </text:span><text:span text:style-name="T331">als backoffices </text:span><text:span text:style-name="T330">consultar i </text:span><text:span text:style-name="T329">canviar l’estat de les anotacions</text:span><text:span text:style-name="T330"> </text:span><text:span text:style-name="T331">informades des </text:span><text:span text:style-name="T330">de </text:span>DISTRIBUCIÓ<text:span text:style-name="T314">.</text:span></text:p>
      <text:p text:style-name="P153">A l'apartat <text:bookmark-ref text:reference-format="number" text:ref-name="__RefNumPara__52573_2521683781">5</text:bookmark-ref><text:span text:style-name="T313"><text:s/></text:span>es <text:span text:style-name="T330">descriu el servei que permet gestionar les regles de </text:span>DISTRIBUCIÓ<text:span text:style-name="T314">.</text:span></text:p>
      <text:p text:style-name="P380">A l'apartat <text:bookmark-ref text:reference-format="number-all-superior" text:ref-name="__RefHeading___Toc60794_1326387233">6</text:bookmark-ref><text:s/>es detalla la llibreria d'utilitats comunes de <text:span text:style-name="T109">DISTRIBUCIÓ</text:span> per a backoffices per moure els documents annexos dins de l'Arxiu o per interpretar la informació XML de formularis i pagaments provinents de SISTRA2.</text:p>
      <text:list xml:id="list175633681379223" text:continue-list="list175634674871710" text:style-name="Outline">
        <text:list-item>
          <text:h text:style-name="P394" text:outline-level="1"><text:bookmark-start text:name="__RefHeading___Toc160468_1680181998"/><text:bookmark-start text:name="__RefNumPara__81015_1680181998"/><text:span text:style-name="T320">Servei d’e</text:span>nviament d'anotacions <text:bookmark-end text:name="__RefHeading___Toc160468_1680181998"/><text:bookmark-end text:name="__RefNumPara__81015_1680181998"/></text:h>
        </text:list-item>
      </text:list>
      <text:p text:style-name="P229">Aquest servei permet l’enviament d’anotacions de registre a una de les bústies de distribució. Aquest enviament es pot fer de forma síncrona o de forma asíncrona.</text:p>
      <text:p text:style-name="P229"><text:span text:style-name="T315">En aquest apartat es descriu</text:span>en<text:span text:style-name="T315"> e</text:span>ls casos d’ús<text:span text:style-name="T315">, el model de dades i els detalls i el client per a la seva integració.</text:span></text:p>
      <text:p text:style-name="P236"><draw:frame draw:style-name="fr3" draw:name="Marc2" text:anchor-type="as-char" svg:width="9.895cm" draw:z-index="67"><draw:text-box fo:min-height="6.932cm"><text:p text:style-name="P224"><draw:frame draw:style-name="fr7" draw:name="Imatge6" text:anchor-type="paragraph" svg:width="9.895cm" style:rel-width="100%" svg:height="6.932cm" style:rel-height="scale" draw:z-index="68"><draw:image xlink:href="Pictures/100000010000017600000106CDB180781C1628B8.png" xlink:type="simple" xlink:show="embed" xlink:actuate="onLoad" draw:mime-type="image/png"/></draw:frame>Figura <text:span text:style-name="T109"><text:sequence text:ref-name="refFig.0" text:name="Fig." text:formula="ooow:Fig.+1" style:num-format="1">1</text:sequence></text:span>: <text:s/><text:span text:style-name="T313">Casos d'ús </text:span><text:span text:style-name="T322">de l’enviament</text:span><text:span text:style-name="T315"> d'anotacions a </text:span><text:span text:style-name="T313">DISTRIBUCIO</text:span></text:p></draw:text-box></draw:frame></text:p>
      <text:list xml:id="list175632643210191" text:continue-numbering="true" text:style-name="Outline">
        <text:list-item>
          <text:list>
            <text:list-item>
              <text:h text:style-name="P401" text:outline-level="2"><text:bookmark-start text:name="__RefHeading___Toc16770_2313926538"/>Diagrames d<text:span text:style-name="T322">e seqüència</text:span><text:bookmark-end text:name="__RefHeading___Toc16770_2313926538"/></text:h>
            </text:list-item>
          </text:list>
        </text:list-item>
      </text:list>
      <text:p text:style-name="P147">Segons la configuració de l’aplicació, el processament de l’anotació de registre es <text:span text:style-name="T96">pot dur</text:span> a terme de forma síncrona o de forma asíncrona.</text:p>
      <text:list xml:id="list175633223434644" text:continue-numbering="true" text:style-name="Outline">
        <text:list-item>
          <text:list>
            <text:list-item>
              <text:list>
                <text:list-item>
                  <text:h text:style-name="P414" text:outline-level="3"><text:bookmark-start text:name="__RefHeading___Toc8043_1716379843"/><text:span text:style-name="T321">Processament</text:span> síncron<text:bookmark-end text:name="__RefHeading___Toc8043_1716379843"/></text:h>
                </text:list-item>
              </text:list>
            </text:list-item>
          </text:list>
        </text:list-item>
      </text:list>
      <text:p text:style-name="P149">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45"/>
      <text:p text:style-name="P146"><text:soft-page-break/><text:s text:c="5"/><draw:frame draw:style-name="fr9" draw:name="Imatge2" text:anchor-type="as-char" svg:width="14.526cm" svg:height="7.435cm" draw:z-index="69"><draw:image xlink:href="Pictures/100000010000022500000119CAD32466B41F1941.png" xlink:type="simple" xlink:show="embed" xlink:actuate="onLoad" draw:mime-type="image/png"/></draw:frame><text:s text:c="5"/></text:p>
      <text:p text:style-name="P39"/>
      <text:p text:style-name="P148">La resposta retornada al client podrà retornar un error si alguna de les passes efectuades no s’ha pogut completar correctament.</text:p>
      <text:list xml:id="list175633702192657" text:continue-numbering="true" text:style-name="Outline">
        <text:list-item>
          <text:list>
            <text:list-item>
              <text:list>
                <text:list-item>
                  <text:h text:style-name="P414" text:outline-level="3"><text:bookmark-start text:name="__RefHeading___Toc15562_3365326968"/><text:span text:style-name="T321">Processament</text:span> asíncron<text:bookmark-end text:name="__RefHeading___Toc15562_3365326968"/></text:h>
                </text:list-item>
              </text:list>
            </text:list-item>
          </text:list>
        </text:list-item>
      </text:list>
      <text:p text:style-name="P148">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48"/>
      <text:p text:style-name="P144"><draw:frame draw:style-name="fr9" draw:name="Imatge1" text:anchor-type="as-char" svg:width="14.526cm" svg:height="9.551cm" draw:z-index="70"><draw:image xlink:href="Pictures/1000000100000225000001695E2AE0759B449FC1.png" xlink:type="simple" xlink:show="embed" xlink:actuate="onLoad" draw:mime-type="image/png"/></draw:frame><text:s text:c="5"/></text:p>
      <text:p text:style-name="P148"><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75632927912789" text:continue-numbering="true" text:style-name="Outline">
        <text:list-item>
          <text:list>
            <text:list-item>
              <text:h text:style-name="P402" text:outline-level="2"><text:bookmark-start text:name="Còpia de __RefHeading___Toc16772_2313926538 2"/><text:bookmark-start text:name="__RefHeading___Toc227353_390838441"/><text:bookmark-start text:name="Còpia de __RefNumPara__80988_1680181998 2"/>Descripció del servei<text:bookmark-end text:name="Còpia de __RefHeading___Toc16772_2313926538 2"/><text:bookmark-end text:name="__RefHeading___Toc227353_390838441"/><text:bookmark-end text:name="Còpia de __RefNumPara__80988_1680181998 2"/></text:h>
            </text:list-item>
          </text:list>
        </text:list-item>
      </text:list>
      <text:p text:style-name="P376"><text:span text:style-name="T320">Aquest servei</text:span> <text:span text:style-name="T320">disposa d’un únic mètode</text:span><text:span text:style-name="T106"> </text:span><text:span text:style-name="T41">enviarAnotacioRegistreEntrada</text:span> <text:span text:style-name="T106">que </text:span><text:span text:style-name="T320">permet l’enviament d’</text:span><text:span text:style-name="T106">anotacions provinents del registre d’entrada.</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70">Enviament d’anotacions de registre</text:p>
          </table:table-cell>
          <table:covered-table-cell/>
        </table:table-row>
        <table:table-row table:style-name="Taula12.1">
          <table:table-cell table:style-name="Taula12.A2" office:value-type="string">
            <text:p text:style-name="P38">Adreça</text:p>
          </table:table-cell>
          <table:table-cell table:style-name="Taula12.B2" office:value-type="string">
            <text:p text:style-name="P44">http<text:span text:style-name="T320">s</text:span>://<text:span text:style-name="T320">DISTRIB_HOST</text:span>/distribucio/ws/v1/bustia</text:p>
          </table:table-cell>
        </table:table-row>
        <table:table-row table:style-name="Taula12.1">
          <table:table-cell table:style-name="Taula12.A2" office:value-type="string">
            <text:p text:style-name="P38">Autenticació</text:p>
          </table:table-cell>
          <table:table-cell table:style-name="Taula12.B3" office:value-type="string">
            <text:p text:style-name="P231">HTTP Basic</text:p>
          </table:table-cell>
        </table:table-row>
        <table:table-row table:style-name="Taula12.1">
          <table:table-cell table:style-name="Taula12.A2" office:value-type="string">
            <text:p text:style-name="P38">Rols requerits</text:p>
          </table:table-cell>
          <table:table-cell table:style-name="Taula12.B4" office:value-type="string">
            <text:p text:style-name="P44">DIS_BSTWS</text:p>
          </table:table-cell>
        </table:table-row>
        <table:table-row table:style-name="Taula12.1">
          <table:table-cell table:style-name="Taula12.A2" office:value-type="string">
            <text:p text:style-name="P38">Mètode</text:p>
          </table:table-cell>
          <table:table-cell table:style-name="Taula12.B5" office:value-type="string">
            <text:p text:style-name="P373">enviarAnotacioRegistreEntrada</text:p>
          </table:table-cell>
        </table:table-row>
        <table:table-row table:style-name="Taula12.1">
          <table:table-cell table:style-name="Taula12.A2" office:value-type="string">
            <text:p text:style-name="P38">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31">Nom</text:p>
                </table:table-cell>
                <table:table-cell table:style-name="Taula13.A1" office:value-type="string">
                  <text:p text:style-name="P231">Tipus</text:p>
                </table:table-cell>
                <table:table-cell table:style-name="Taula13.C1" office:value-type="string">
                  <text:p text:style-name="P231">Descripció</text:p>
                </table:table-cell>
              </table:table-row>
              <table:table-row table:style-name="TableLine658977984">
                <table:table-cell table:style-name="Taula13.A2" office:value-type="string">
                  <text:p text:style-name="P44">entitat</text:p>
                </table:table-cell>
                <table:table-cell table:style-name="Taula13.B2" office:value-type="string">
                  <text:p text:style-name="P231">String</text:p>
                </table:table-cell>
                <table:table-cell table:style-name="Taula13.C2" office:value-type="string">
                  <text:p text:style-name="P44">El codi de l’entitat de DISTRIBUCIO a on es vol donar d’alta l’anotació.</text:p>
                </table:table-cell>
              </table:table-row>
              <table:table-row table:style-name="TableLine658974528">
                <table:table-cell table:style-name="Taula13.A3" office:value-type="string">
                  <text:p text:style-name="P44">unitatAdministrativa</text:p>
                </table:table-cell>
                <table:table-cell table:style-name="Taula13.B3" office:value-type="string">
                  <text:p text:style-name="P231">String</text:p>
                </table:table-cell>
                <table:table-cell table:style-name="Taula13.C3" office:value-type="string">
                  <text:p text:style-name="P44">El codi DIR3 de la unitat administrativa destinatària de l’anotació de registre.</text:p>
                </table:table-cell>
              </table:table-row>
              <table:table-row table:style-name="TableLine659052864">
                <table:table-cell table:style-name="Taula13.A4" office:value-type="string">
                  <text:p text:style-name="P44">registreEntrada</text:p>
                </table:table-cell>
                <table:table-cell table:style-name="Taula13.B4" office:value-type="string">
                  <text:p text:style-name="P231">RegistreAnotacio</text:p>
                </table:table-cell>
                <table:table-cell table:style-name="Taula13.C4" office:value-type="string">
                  <text:p text:style-name="P44">objecte amb la informació associada a l’anotació de registre</text:p>
                </table:table-cell>
              </table:table-row>
            </table:table>
            <text:p text:style-name="P44"/>
          </table:table-cell>
        </table:table-row>
        <table:table-row table:style-name="Taula12.1">
          <table:table-cell table:style-name="Taula12.A2" office:value-type="string">
            <text:p text:style-name="P38">Valor retornat</text:p>
          </table:table-cell>
          <table:table-cell table:style-name="Taula12.B7" office:value-type="string">
            <text:p text:style-name="P231">(no retorna cap valor)</text:p>
          </table:table-cell>
        </table:table-row>
      </table:table>
      <text:p text:style-name="P374"/>
      <text:p text:style-name="P377">Per a més informació sobre com emplenar correctament l’objecte de tipus RegistreEntrada es pot consultar el punt <text:bookmark-ref text:reference-format="number" text:ref-name="__RefNumPara__80988_1680181998">2.3</text:bookmark-ref><text:s/>d’aquest mateix document.</text:p>
      <text:p text:style-name="P377">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75633643391027" text:continue-numbering="true" text:style-name="Outline">
        <text:list-item>
          <text:list>
            <text:list-item>
              <text:h text:style-name="P406" text:outline-level="2"><text:bookmark-start text:name="__RefHeading___Toc16772_2313926538"/><text:bookmark-start text:name="__RefNumPara__80988_1680181998"/>Model de <text:span text:style-name="T320">dades</text:span> <text:bookmark-end text:name="__RefHeading___Toc16772_2313926538"/><text:bookmark-end text:name="__RefNumPara__80988_1680181998"/></text:h>
            </text:list-item>
          </text:list>
        </text:list-item>
      </text:list>
      <text:p text:style-name="P375">Aquest és el model de <text:span text:style-name="T320">dades</text:span> del servei d’<text:span text:style-name="T95">enviament d’anotacions de registre</text:span>.</text:p>
      <text:p text:style-name="P375"><draw:frame draw:style-name="fr10" draw:name="Image1" text:anchor-type="paragraph" svg:width="16.669cm" svg:height="23.971cm" draw:z-index="59"><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35"><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659051136">
          <table:table-cell table:style-name="Taula17.A1" table:number-columns-spanned="5" office:value-type="string">
            <text:p text:style-name="P137">RegistreAnotacio</text:p>
          </table:table-cell>
          <table:covered-table-cell/>
          <table:covered-table-cell/>
          <table:covered-table-cell/>
          <table:covered-table-cell/>
        </table:table-row>
        <table:table-row table:style-name="TableLine659090304">
          <table:table-cell table:style-name="Taula17.A2" office:value-type="string">
            <text:p text:style-name="P31">Nom del camp</text:p>
          </table:table-cell>
          <table:table-cell table:style-name="Taula17.A2" office:value-type="string">
            <text:p text:style-name="P31">Tipus</text:p>
          </table:table-cell>
          <table:table-cell table:style-name="Taula17.A2" office:value-type="string">
            <text:p text:style-name="P31">Mult.</text:p>
          </table:table-cell>
          <table:table-cell table:style-name="Taula17.A2" office:value-type="string">
            <text:p text:style-name="P33">Tamany</text:p>
          </table:table-cell>
          <table:table-cell table:style-name="Taula17.E2" office:value-type="string">
            <text:p text:style-name="P33">Descripció</text:p>
          </table:table-cell>
        </table:table-row>
        <table:table-row table:style-name="TableLine659050848">
          <table:table-cell table:style-name="Taula17.A3" office:value-type="string">
            <text:p text:style-name="P252">tipusES</text:p>
          </table:table-cell>
          <table:table-cell table:style-name="Taula17.A3" office:value-type="string">
            <text:p text:style-name="P252">Cadena</text:p>
          </table:table-cell>
          <table:table-cell table:style-name="Taula17.A3" office:value-type="string">
            <text:p text:style-name="P253">0..1</text:p>
          </table:table-cell>
          <table:table-cell table:style-name="Taula17.D3" office:value-type="float" office:value="1">
            <text:p text:style-name="P253">1</text:p>
          </table:table-cell>
          <table:table-cell table:style-name="Taula17.E4" office:value-type="string">
            <text:p text:style-name="P252">Tipus d'assentament registral:<text:line-break/>- "E": entrada<text:line-break/>- "S": sortida<text:line-break/>El camp no és obligatori i si no s'informa es prendrà "E" per defecte.</text:p>
          </table:table-cell>
        </table:table-row>
        <table:table-row table:style-name="TableLine659085408">
          <table:table-cell table:style-name="Taula17.A3" office:value-type="string">
            <text:p text:style-name="P255">numero</text:p>
          </table:table-cell>
          <table:table-cell table:style-name="Taula17.A3" office:value-type="string">
            <text:p text:style-name="P256">Cadena</text:p>
          </table:table-cell>
          <table:table-cell table:style-name="Taula17.D3" office:value-type="float" office:value="1">
            <text:p text:style-name="P257">1</text:p>
          </table:table-cell>
          <table:table-cell table:style-name="Taula17.D3" office:value-type="float" office:value="255">
            <text:p text:style-name="P352"><text:span text:style-name="T245">2</text:span>5<text:span text:style-name="T245">5</text:span></text:p>
          </table:table-cell>
          <table:table-cell table:style-name="Taula17.E4" office:value-type="string">
            <text:p text:style-name="P259">Número identificador de l’assentament registral. És únic.</text:p>
          </table:table-cell>
        </table:table-row>
        <table:table-row table:style-name="TableLine659086848">
          <table:table-cell table:style-name="Taula17.A3" office:value-type="string">
            <text:p text:style-name="P255">data</text:p>
          </table:table-cell>
          <table:table-cell table:style-name="Taula17.A3" office:value-type="string">
            <text:p text:style-name="P261">Data</text:p>
          </table:table-cell>
          <table:table-cell table:style-name="Taula17.A3" office:value-type="string">
            <text:p text:style-name="P257">1</text:p>
          </table:table-cell>
          <table:table-cell table:style-name="Taula17.A3" office:value-type="string">
            <text:p text:style-name="P263">14</text:p>
          </table:table-cell>
          <table:table-cell table:style-name="Taula17.E5" office:value-type="string">
            <text:p text:style-name="P261">Data de <text:span text:style-name="T97">l’assentament.</text:span> </text:p>
          </table:table-cell>
        </table:table-row>
        <table:table-row table:style-name="TableLine659081376">
          <table:table-cell table:style-name="Taula17.A3" office:value-type="string">
            <text:p text:style-name="P255"><text:span text:style-name="T98">d</text:span>ataOrigen</text:p>
          </table:table-cell>
          <table:table-cell table:style-name="Taula17.A3" office:value-type="string">
            <text:p text:style-name="P261">Data</text:p>
          </table:table-cell>
          <table:table-cell table:style-name="Taula17.A3" office:value-type="string">
            <text:p text:style-name="P257">0..1</text:p>
          </table:table-cell>
          <table:table-cell table:style-name="Taula17.A3" office:value-type="string">
            <text:p text:style-name="P264">14</text:p>
          </table:table-cell>
          <table:table-cell table:style-name="Taula17.E6" office:value-type="string">
            <text:p text:style-name="P261">Data <text:span text:style-name="T97">origen </text:span>de l’assentament.</text:p>
          </table:table-cell>
        </table:table-row>
        <table:table-row table:style-name="TableLine659084544">
          <table:table-cell table:style-name="Taula17.A3" office:value-type="string">
            <text:p text:style-name="P266">identificador</text:p>
          </table:table-cell>
          <table:table-cell table:style-name="Taula17.A3" office:value-type="string">
            <text:p text:style-name="P267">Cadena</text:p>
          </table:table-cell>
          <table:table-cell table:style-name="Taula17.A3" office:value-type="string">
            <text:p text:style-name="P268">1</text:p>
          </table:table-cell>
          <table:table-cell table:style-name="Taula17.A3" office:value-type="string">
            <text:p text:style-name="P352">1<text:span text:style-name="T247">00</text:span></text:p>
          </table:table-cell>
          <table:table-cell table:style-name="Taula17.E7" office:value-type="string">
            <text:p text:style-name="P259">Codi identificador de l’assentament registral.</text:p>
          </table:table-cell>
        </table:table-row>
        <table:table-row table:style-name="TableLine659082816">
          <table:table-cell table:style-name="Taula17.A3" office:value-type="string">
            <text:p text:style-name="P266">entitat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4">2<text:span text:style-name="T245">55</text:span></text:p>
          </table:table-cell>
          <table:table-cell table:style-name="Taula17.E8" office:value-type="string">
            <text:p text:style-name="P259">Codi <text:span text:style-name="T99">DIR3 </text:span>de l’entitat governamental a la que va dirigit l’assentament registral.</text:p>
          </table:table-cell>
        </table:table-row>
        <table:table-row table:style-name="TableLine659084256">
          <table:table-cell table:style-name="Taula17.A3" office:value-type="string">
            <text:p text:style-name="P266">entitat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5">2<text:span text:style-name="T245">55</text:span></text:p>
          </table:table-cell>
          <table:table-cell table:style-name="Taula17.E9" office:value-type="string">
            <text:p text:style-name="P259"><text:span text:style-name="T99">Descripció DIR3</text:span> de l’entitat governamental a la que va dirigit l’assentament registral.</text:p>
          </table:table-cell>
        </table:table-row>
        <table:table-row table:style-name="TableLine659082528">
          <table:table-cell table:style-name="Taula17.A3" office:value-type="string">
            <text:p text:style-name="P266">oficinaCodi</text:p>
          </table:table-cell>
          <table:table-cell table:style-name="Taula17.A3" office:value-type="string">
            <text:p text:style-name="P267">Cadena</text:p>
          </table:table-cell>
          <table:table-cell table:style-name="Taula17.A3" office:value-type="string">
            <text:p text:style-name="P268">1</text:p>
          </table:table-cell>
          <table:table-cell table:style-name="Taula17.A3" office:value-type="string">
            <text:p text:style-name="P264">21</text:p>
          </table:table-cell>
          <table:table-cell table:style-name="Taula17.E10" office:value-type="string">
            <text:p text:style-name="P271">Codi DIR3 de l’oficina on es registre.</text:p>
          </table:table-cell>
        </table:table-row>
        <table:table-row table:style-name="TableLine659083680">
          <table:table-cell table:style-name="Taula17.A3" office:value-type="string">
            <text:p text:style-name="P266">oficina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text:span text:style-name="T246">3</text:span>00</text:p>
          </table:table-cell>
          <table:table-cell table:style-name="Taula17.E11" office:value-type="string">
            <text:p text:style-name="P261">Denominació DIR3 de l'entitat registral on es registre l'assentament.</text:p>
          </table:table-cell>
        </table:table-row>
        <table:table-row table:style-name="TableLine659080800">
          <table:table-cell table:style-name="Taula17.A3" office:value-type="string">
            <text:p text:style-name="P266">oficinaOrigen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21</text:p>
          </table:table-cell>
          <table:table-cell table:style-name="Taula17.E12" office:value-type="string">
            <text:p text:style-name="P261"/>
          </table:table-cell>
        </table:table-row>
        <table:table-row table:style-name="TableLine659048832">
          <table:table-cell table:style-name="Taula17.A3" office:value-type="string">
            <text:p text:style-name="P266">oficinaOrigen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100</text:p>
          </table:table-cell>
          <table:table-cell table:style-name="Taula17.E13" office:value-type="string">
            <text:p text:style-name="P261"/>
          </table:table-cell>
        </table:table-row>
        <table:table-row table:style-name="TableLine659072448">
          <table:table-cell table:style-name="Taula17.A3" office:value-type="string">
            <text:p text:style-name="P266">llibreCodi</text:p>
          </table:table-cell>
          <table:table-cell table:style-name="Taula17.A3" office:value-type="string">
            <text:p text:style-name="P267">Cadena</text:p>
          </table:table-cell>
          <table:table-cell table:style-name="Taula17.A3" office:value-type="string">
            <text:p text:style-name="P268">1</text:p>
          </table:table-cell>
          <table:table-cell table:style-name="Taula17.A3" office:value-type="string">
            <text:p text:style-name="P264">4</text:p>
          </table:table-cell>
          <table:table-cell table:style-name="Taula17.E14" office:value-type="string">
            <text:p text:style-name="P271">Codi del llibre al qual s’ha fet l’assentament registral rebut.</text:p>
          </table:table-cell>
        </table:table-row>
        <table:table-row table:style-name="TableLine659070432">
          <table:table-cell table:style-name="Taula17.A3" office:value-type="string">
            <text:p text:style-name="P266">llibre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81">255</text:p>
          </table:table-cell>
          <table:table-cell table:style-name="Taula17.E15" office:value-type="string">
            <text:p text:style-name="P271">Denominació del llibre al qual s’ha fet l’assentament registral rebut.</text:p>
          </table:table-cell>
        </table:table-row>
        <table:table-row table:style-name="TableLine659067840">
          <table:table-cell table:style-name="Taula17.A3" office:value-type="string">
            <text:p text:style-name="P266">extracte</text:p>
          </table:table-cell>
          <table:table-cell table:style-name="Taula17.A3" office:value-type="string">
            <text:p text:style-name="P267">Cadena</text:p>
          </table:table-cell>
          <table:table-cell table:style-name="Taula17.A3" office:value-type="string">
            <text:p text:style-name="P268">1</text:p>
          </table:table-cell>
          <table:table-cell table:style-name="Taula17.A3" office:value-type="string">
            <text:p text:style-name="P273">240</text:p>
          </table:table-cell>
          <table:table-cell table:style-name="Taula17.E16" office:value-type="string">
            <text:p text:style-name="P261">Extracte o resum de l'assentament.</text:p>
          </table:table-cell>
        </table:table-row>
        <table:table-row table:style-name="TableLine659066112">
          <table:table-cell table:style-name="Taula17.A3" office:value-type="string">
            <text:p text:style-name="P266">assumpteTipusCodi</text:p>
          </table:table-cell>
          <table:table-cell table:style-name="Taula17.A3" office:value-type="string">
            <text:p text:style-name="P267">Cadena</text:p>
          </table:table-cell>
          <table:table-cell table:style-name="Taula17.A3" office:value-type="string">
            <text:p text:style-name="P268"><text:span text:style-name="T117">0..</text:span>1</text:p>
          </table:table-cell>
          <table:table-cell table:style-name="Taula17.A3" office:value-type="string">
            <text:p text:style-name="P264">16</text:p>
          </table:table-cell>
          <table:table-cell table:style-name="Taula17.E17" office:value-type="string">
            <text:p text:style-name="P271">Codi del tipus d’assumpte de l’assentament registral.</text:p>
          </table:table-cell>
        </table:table-row>
        <table:table-row table:style-name="TableLine659065248">
          <table:table-cell table:style-name="Taula17.A3" office:value-type="string">
            <text:p text:style-name="P266">assumpteTipus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100</text:p>
          </table:table-cell>
          <table:table-cell table:style-name="Taula17.E18" office:value-type="string">
            <text:p text:style-name="P271">Denominació del tipus d’assumpte de l’assentament registral.</text:p>
          </table:table-cell>
        </table:table-row>
        <table:table-row table:style-name="TableLine659047680">
          <table:table-cell table:style-name="Taula17.A3" office:value-type="string">
            <text:p text:style-name="P266">assumpte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16</text:p>
          </table:table-cell>
          <table:table-cell table:style-name="Taula17.E19" office:value-type="string">
            <text:p text:style-name="P271">Codi de l’assumpte.</text:p>
          </table:table-cell>
        </table:table-row>
        <table:table-row table:style-name="TableLine659047392">
          <table:table-cell table:style-name="Taula17.A3" office:value-type="string">
            <text:p text:style-name="P266"><text:span text:style-name="T99">a</text:span>ssumpte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2">2<text:span text:style-name="T248">55</text:span></text:p>
          </table:table-cell>
          <table:table-cell table:style-name="Taula17.E20" office:value-type="string">
            <text:p text:style-name="P271">Denominació de l’assumpte.</text:p>
          </table:table-cell>
        </table:table-row>
        <table:table-row table:style-name="TableLine659048256">
          <table:table-cell table:style-name="Taula17.A3" office:value-type="string">
            <text:p text:style-name="P266">referencia</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16</text:p>
          </table:table-cell>
          <table:table-cell table:style-name="Taula17.E21" office:value-type="string">
            <text:p text:style-name="P261">Referència externa a qualque element de l'assentament.</text:p>
          </table:table-cell>
        </table:table-row>
        <table:table-row table:style-name="TableLine659048544">
          <table:table-cell table:style-name="Taula17.A3" office:value-type="string">
            <text:p text:style-name="P266">expedientNumer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80</text:p>
          </table:table-cell>
          <table:table-cell table:style-name="Taula17.E22" office:value-type="string">
            <text:p text:style-name="P261">Referència al nombre d'expedient de l'assentament.</text:p>
          </table:table-cell>
        </table:table-row>
        <table:table-row table:style-name="TableLine659052576">
          <table:table-cell table:style-name="Taula17.A3" office:value-type="string">
            <text:p text:style-name="P266">numeroOrigen</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80</text:p>
          </table:table-cell>
          <table:table-cell table:style-name="Taula17.E23" office:value-type="string">
            <text:p text:style-name="P261"/>
          </table:table-cell>
        </table:table-row>
        <table:table-row table:style-name="TableLine659053152">
          <table:table-cell table:style-name="Taula17.A3" office:value-type="string">
            <text:p text:style-name="P266">idiomaCodi</text:p>
          </table:table-cell>
          <table:table-cell table:style-name="Taula17.A3" office:value-type="string">
            <text:p text:style-name="P267">Cadena</text:p>
          </table:table-cell>
          <table:table-cell table:style-name="Taula17.A3" office:value-type="string">
            <text:p text:style-name="P268">1</text:p>
          </table:table-cell>
          <table:table-cell table:style-name="Taula17.A3" office:value-type="string">
            <text:p text:style-name="P264">2</text:p>
          </table:table-cell>
          <table:table-cell table:style-name="Taula17.E24" office:value-type="string">
            <text:p text:style-name="P275">Codi d’idioma amb el que s’ha fet l’assentament.</text:p>
          </table:table-cell>
        </table:table-row>
        <text:soft-page-break/>
        <table:table-row table:style-name="TableLine659094624">
          <table:table-cell table:style-name="Taula17.A3" office:value-type="string">
            <text:p text:style-name="P266">idioma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100</text:p>
          </table:table-cell>
          <table:table-cell table:style-name="Taula17.E25" office:value-type="string">
            <text:p text:style-name="P275">Descripció d’idioma amb el que s’ha fet l’assentament.</text:p>
          </table:table-cell>
        </table:table-row>
        <table:table-row table:style-name="TableLine659092608">
          <table:table-cell table:style-name="Taula17.A3" office:value-type="string">
            <text:p text:style-name="P267">transportTipus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2<text:span text:style-name="T249">0</text:span></text:p>
          </table:table-cell>
          <table:table-cell table:style-name="Taula17.E26" office:value-type="string">
            <text:p text:style-name="P261">Codi SICRES3 del segment internos – tipo transporte.</text:p>
          </table:table-cell>
        </table:table-row>
        <table:table-row table:style-name="TableLine659093472">
          <table:table-cell table:style-name="Taula17.A3" office:value-type="string">
            <text:p text:style-name="P267">transportTipus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100</text:p>
          </table:table-cell>
          <table:table-cell table:style-name="Taula17.E27" office:value-type="string">
            <text:p text:style-name="P261">Descripció SICRES3 del segment internos – tipo transporte.</text:p>
          </table:table-cell>
        </table:table-row>
        <table:table-row table:style-name="TableLine659092896">
          <table:table-cell table:style-name="Taula17.A3" office:value-type="string">
            <text:p text:style-name="P267">transportNumer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20</text:p>
          </table:table-cell>
          <table:table-cell table:style-name="Taula17.E28" office:value-type="string">
            <text:p text:style-name="P261">Número del transport.</text:p>
          </table:table-cell>
        </table:table-row>
        <table:table-row table:style-name="TableLine659092320">
          <table:table-cell table:style-name="Taula17.A3" office:value-type="string">
            <text:p text:style-name="P267">usuari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64">20</text:p>
          </table:table-cell>
          <table:table-cell table:style-name="Taula17.E29" office:value-type="string">
            <text:p text:style-name="P261">Codi de l'usuari que vol realitzar l'operació.</text:p>
          </table:table-cell>
        </table:table-row>
        <table:table-row table:style-name="TableLine659091744">
          <table:table-cell table:style-name="Taula17.A3" office:value-type="string">
            <text:p text:style-name="P267">usuariNom</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4">7<text:span text:style-name="T250">67</text:span></text:p>
          </table:table-cell>
          <table:table-cell table:style-name="Taula17.E30" office:value-type="string">
            <text:p text:style-name="P261"><text:span text:style-name="T100">Nom</text:span> de l'usuari que vol realitzar l'operació.</text:p>
          </table:table-cell>
        </table:table-row>
        <table:table-row table:style-name="TableLine658989216">
          <table:table-cell table:style-name="Taula17.A3" office:value-type="string">
            <text:p text:style-name="P267">usuariContacte</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2">2<text:span text:style-name="T251">55</text:span></text:p>
          </table:table-cell>
          <table:table-cell table:style-name="Taula17.E31" office:value-type="string">
            <text:p text:style-name="P261">Contacte de l'usuari que fa l'assentament. Si és un registre electrònic el responsable del tràmit.</text:p>
          </table:table-cell>
        </table:table-row>
        <table:table-row table:style-name="TableLine659072160">
          <table:table-cell table:style-name="Taula17.A3" office:value-type="string">
            <text:p text:style-name="P267">aplicacio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2">2<text:span text:style-name="T252">55</text:span></text:p>
          </table:table-cell>
          <table:table-cell table:style-name="Taula17.E32" office:value-type="string">
            <text:p text:style-name="P275">Codi de l’aplicació que fa l’enviament de l’assentament registral.</text:p>
          </table:table-cell>
        </table:table-row>
        <table:table-row table:style-name="TableLine659087712">
          <table:table-cell table:style-name="Taula17.A3" office:value-type="string">
            <text:p text:style-name="P267">aplicacioVers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2">2<text:span text:style-name="T252">55</text:span></text:p>
          </table:table-cell>
          <table:table-cell table:style-name="Taula17.E33" office:value-type="string">
            <text:p text:style-name="P275">Versió de l’aplicació que fa l’enviament de l’assentament registral.</text:p>
          </table:table-cell>
        </table:table-row>
        <table:table-row table:style-name="TableLine396764688">
          <table:table-cell table:style-name="Taula17.A3" office:value-type="string">
            <text:p text:style-name="P267">documentacioFisica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7">19</text:p>
          </table:table-cell>
          <table:table-cell table:style-name="Taula17.E34" office:value-type="string">
            <text:p text:style-name="P261">Codi SICRES del segment internos – Documentación física y/o soportes.</text:p>
          </table:table-cell>
        </table:table-row>
        <table:table-row table:style-name="TableLine396765264">
          <table:table-cell table:style-name="Taula17.A3" office:value-type="string">
            <text:p text:style-name="P267">documentacioFisicaDescripcio</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100</text:p>
          </table:table-cell>
          <table:table-cell table:style-name="Taula17.E35" office:value-type="string">
            <text:p text:style-name="P275">Descripció del segment internos – Documentación física y/o soportes</text:p>
          </table:table-cell>
        </table:table-row>
        <table:table-row table:style-name="TableLine396765840">
          <table:table-cell table:style-name="Taula17.A3" office:value-type="string">
            <text:p text:style-name="P267">observacions</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3">50</text:p>
          </table:table-cell>
          <table:table-cell table:style-name="Taula17.E36" office:value-type="string">
            <text:p text:style-name="P275">Observacions de l’assentament.</text:p>
          </table:table-cell>
        </table:table-row>
        <table:table-row table:style-name="TableLine396760080">
          <table:table-cell table:style-name="Taula17.A3" office:value-type="string">
            <text:p text:style-name="P267">exposa</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8">lob</text:p>
          </table:table-cell>
          <table:table-cell table:style-name="Taula17.E37" office:value-type="string">
            <text:p text:style-name="P275">Exposició de fets.</text:p>
          </table:table-cell>
        </table:table-row>
        <table:table-row table:style-name="TableLine396764112">
          <table:table-cell table:style-name="Taula17.A3" office:value-type="string">
            <text:p text:style-name="P267">solicita</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278">lob</text:p>
          </table:table-cell>
          <table:table-cell table:style-name="Taula17.E38" office:value-type="string">
            <text:p text:style-name="P275">Objecte de la sol·licitud si escau.</text:p>
          </table:table-cell>
        </table:table-row>
        <table:table-row table:style-name="TableLine870688112">
          <table:table-cell table:style-name="Taula17.A3" office:value-type="string">
            <text:p text:style-name="P267">interessats</text:p>
          </table:table-cell>
          <table:table-cell table:style-name="Taula17.A3" office:value-type="string">
            <text:p text:style-name="P267">RegistreInteressat</text:p>
          </table:table-cell>
          <table:table-cell table:style-name="Taula17.A3" office:value-type="string">
            <text:p text:style-name="P257">0..<text:span text:style-name="T101">n</text:span> </text:p>
          </table:table-cell>
          <table:table-cell table:style-name="Taula17.A3" office:value-type="string">
            <text:p text:style-name="P273"/>
          </table:table-cell>
          <table:table-cell table:style-name="Taula17.E39" office:value-type="string">
            <text:p text:style-name="P279">Dades que componen els interessats de l’assentament registral si n’hi ha.</text:p>
          </table:table-cell>
        </table:table-row>
        <table:table-row table:style-name="TableLine870684080">
          <table:table-cell table:style-name="Taula17.A3" office:value-type="string">
            <text:p text:style-name="P267">annexos</text:p>
          </table:table-cell>
          <table:table-cell table:style-name="Taula17.A3" office:value-type="string">
            <text:p text:style-name="P267">RegistreAnnex</text:p>
          </table:table-cell>
          <table:table-cell table:style-name="Taula17.A3" office:value-type="string">
            <text:p text:style-name="P257">0..<text:span text:style-name="T101">n</text:span> </text:p>
          </table:table-cell>
          <table:table-cell table:style-name="Taula17.A3" office:value-type="string">
            <text:p text:style-name="P273"/>
          </table:table-cell>
          <table:table-cell table:style-name="Taula17.E40" office:value-type="string">
            <text:p text:style-name="P279">Dades que componen els annexos dels assentaments registrals si n’hi ha.</text:p>
          </table:table-cell>
        </table:table-row>
        <table:table-row table:style-name="TableLine870686960">
          <table:table-cell table:style-name="Taula17.A3" office:value-type="string">
            <text:p text:style-name="P267">justificant</text:p>
          </table:table-cell>
          <table:table-cell table:style-name="Taula17.A3" office:value-type="string">
            <text:p text:style-name="P267">RegistreAnnex</text:p>
          </table:table-cell>
          <table:table-cell table:style-name="Taula17.A3" office:value-type="string">
            <text:p text:style-name="P268">0..1</text:p>
          </table:table-cell>
          <table:table-cell table:style-name="Taula17.A3" office:value-type="string">
            <text:p text:style-name="P281"/>
          </table:table-cell>
          <table:table-cell table:style-name="Taula17.E41" office:value-type="string">
            <text:p text:style-name="P279">Dades que componen el justificant de l’assentament registral si n’hi ha. Es compon de les mateixes dades que un annex.</text:p>
          </table:table-cell>
        </table:table-row>
        <table:table-row table:style-name="TableLine870687248">
          <table:table-cell table:style-name="Taula17.A3" office:value-type="string">
            <text:p text:style-name="P266"><text:span text:style-name="T114">procediment</text:span>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4">6<text:span text:style-name="T253">4</text:span></text:p>
          </table:table-cell>
          <table:table-cell table:style-name="Taula17.E43" office:value-type="string">
            <text:p text:style-name="P271">Codi <text:span text:style-name="T340">SIA </text:span>de<text:span text:style-name="T340">l</text:span> <text:span text:style-name="T114">procediment</text:span>.</text:p>
          </table:table-cell>
        </table:table-row>
        <table:table-row table:style-name="TableLine870685808">
          <table:table-cell table:style-name="Taula17.A3" office:value-type="string">
            <text:p text:style-name="P266"><text:span text:style-name="T340">servei</text:span>Codi</text:p>
          </table:table-cell>
          <table:table-cell table:style-name="Taula17.A3" office:value-type="string">
            <text:p text:style-name="P267">Cadena</text:p>
          </table:table-cell>
          <table:table-cell table:style-name="Taula17.A3" office:value-type="string">
            <text:p text:style-name="P257">0..1</text:p>
          </table:table-cell>
          <table:table-cell table:style-name="Taula17.A3" office:value-type="string">
            <text:p text:style-name="P354">6<text:span text:style-name="T253">4</text:span></text:p>
          </table:table-cell>
          <table:table-cell table:style-name="Taula17.E43" office:value-type="string">
            <text:p text:style-name="P271">Codi <text:span text:style-name="T340">SIA </text:span>de<text:span text:style-name="T340">l servei</text:span>.</text:p>
          </table:table-cell>
        </table:table-row>
        <table:table-row table:style-name="TableLine870686096">
          <table:table-cell table:style-name="Taula17.A3" office:value-type="string">
            <text:p text:style-name="P252">presencial</text:p>
          </table:table-cell>
          <table:table-cell table:style-name="Taula17.A3" office:value-type="string">
            <text:p text:style-name="P252">Boolea</text:p>
          </table:table-cell>
          <table:table-cell table:style-name="Taula17.A3" office:value-type="string">
            <text:p text:style-name="P253">0..1</text:p>
          </table:table-cell>
          <table:table-cell table:style-name="Taula17.A3" office:value-type="string">
            <text:p text:style-name="P282"/>
          </table:table-cell>
          <table:table-cell table:style-name="Taula17.E44" office:value-type="string">
            <text:p text:style-name="P252">Paràmetre booleà per indicar si el registre és prensencial</text:p>
          </table:table-cell>
        </table:table-row>
      </table:table>
      <text:p text:style-name="P246"/>
      <text:p text:style-name="P244"/>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870688400">
          <table:table-cell table:style-name="Taula18.A1" table:number-columns-spanned="5" office:value-type="string">
            <text:p text:style-name="P137">Registre<text:span text:style-name="T105">Annex</text:span> </text:p>
          </table:table-cell>
          <table:covered-table-cell/>
          <table:covered-table-cell/>
          <table:covered-table-cell/>
          <table:covered-table-cell/>
        </table:table-row>
        <table:table-row table:style-name="TableLine691958288">
          <table:table-cell table:style-name="Taula18.A2" office:value-type="string">
            <text:p text:style-name="P31">Nom del camp</text:p>
          </table:table-cell>
          <table:table-cell table:style-name="Taula18.A2" office:value-type="string">
            <text:p text:style-name="P31">Tipus</text:p>
          </table:table-cell>
          <table:table-cell table:style-name="Taula18.A2" office:value-type="string">
            <text:p text:style-name="P31">Mult.</text:p>
          </table:table-cell>
          <table:table-cell table:style-name="Taula18.A2" office:value-type="string">
            <text:p text:style-name="P33">Tamany</text:p>
          </table:table-cell>
          <table:table-cell table:style-name="Taula18.E2" office:value-type="string">
            <text:p text:style-name="P33">Descripció</text:p>
          </table:table-cell>
        </table:table-row>
        <table:table-row table:style-name="TableLine691963184">
          <table:table-cell table:style-name="Taula18.A3" office:value-type="string">
            <text:p text:style-name="P283">titol</text:p>
          </table:table-cell>
          <table:table-cell table:style-name="Taula18.A3" office:value-type="string">
            <text:p text:style-name="P286">Cadena</text:p>
          </table:table-cell>
          <table:table-cell table:style-name="Taula18.A3" office:value-type="string">
            <text:p text:style-name="P287">1</text:p>
          </table:table-cell>
          <table:table-cell table:style-name="Taula18.D3" office:value-type="float" office:value="200">
            <text:p text:style-name="P284">200</text:p>
          </table:table-cell>
          <table:table-cell table:style-name="Taula18.E3" office:value-type="string">
            <text:p text:style-name="P288">Títol del document</text:p>
          </table:table-cell>
        </table:table-row>
        <text:soft-page-break/>
        <table:table-row table:style-name="TableLine691964336">
          <table:table-cell table:style-name="Taula18.A3" office:value-type="string">
            <text:p text:style-name="P283">fitxerNom</text:p>
          </table:table-cell>
          <table:table-cell table:style-name="Taula18.A3" office:value-type="string">
            <text:p text:style-name="P286">Cadena</text:p>
          </table:table-cell>
          <table:table-cell table:style-name="Taula18.D3" office:value-type="float" office:value="1">
            <text:p text:style-name="P287">1</text:p>
          </table:table-cell>
          <table:table-cell table:style-name="Taula18.D3" office:value-type="float" office:value="256">
            <text:p text:style-name="P356">2<text:span text:style-name="T254">56</text:span></text:p>
          </table:table-cell>
          <table:table-cell table:style-name="Taula18.E4" office:value-type="string">
            <text:p text:style-name="P288">Nom del fitxer annexat</text:p>
          </table:table-cell>
        </table:table-row>
        <table:table-row table:style-name="TableLine691968656">
          <table:table-cell table:style-name="Taula18.A3" office:value-type="string">
            <text:p text:style-name="P283">fitxerTamany</text:p>
          </table:table-cell>
          <table:table-cell table:style-name="Taula18.A3" office:value-type="string">
            <text:p text:style-name="P284">Numèric</text:p>
          </table:table-cell>
          <table:table-cell table:style-name="Taula18.A3" office:value-type="string">
            <text:p text:style-name="P287">0..1</text:p>
          </table:table-cell>
          <table:table-cell table:style-name="Taula18.A3" office:value-type="string">
            <text:p text:style-name="P284"/>
          </table:table-cell>
          <table:table-cell table:style-name="Taula18.E5" office:value-type="string">
            <text:p text:style-name="P288">Tamany en <text:span text:style-name="T266">bytes</text:span> del fitxer annexat</text:p>
          </table:table-cell>
        </table:table-row>
        <table:table-row table:style-name="TableLine691967792">
          <table:table-cell table:style-name="Taula18.A3" office:value-type="string">
            <text:p text:style-name="P283">fitxerTipusMime</text:p>
          </table:table-cell>
          <table:table-cell table:style-name="Taula18.A3" office:value-type="string">
            <text:p text:style-name="P286">Cadena</text:p>
          </table:table-cell>
          <table:table-cell table:style-name="Taula18.A3" office:value-type="string">
            <text:p text:style-name="P287">1</text:p>
          </table:table-cell>
          <table:table-cell table:style-name="Taula18.A3" office:value-type="string">
            <text:p text:style-name="P356">3<text:span text:style-name="T254">0</text:span></text:p>
          </table:table-cell>
          <table:table-cell table:style-name="Taula18.E6" office:value-type="string">
            <text:p text:style-name="P288">Tipus MIME del fitxer annexat</text:p>
          </table:table-cell>
        </table:table-row>
        <table:table-row table:style-name="TableLine691976144">
          <table:table-cell table:style-name="Taula18.A3" office:value-type="string">
            <text:p text:style-name="P283">fitxerArxiuUuid</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256">
            <text:p text:style-name="P356">2<text:span text:style-name="T255">56</text:span></text:p>
          </table:table-cell>
          <table:table-cell table:style-name="Taula18.E7" office:value-type="string">
            <text:p text:style-name="P288">Uuid de l’arxiu digital si s’escau</text:p>
          </table:table-cell>
        </table:table-row>
        <table:table-row table:style-name="TableLine691974704">
          <table:table-cell table:style-name="Taula18.A3" office:value-type="string">
            <text:p text:style-name="P283">fitxerContingut</text:p>
          </table:table-cell>
          <table:table-cell table:style-name="Taula18.A3" office:value-type="string">
            <text:p text:style-name="P284">Byte[]</text:p>
          </table:table-cell>
          <table:table-cell table:style-name="Taula18.A3" office:value-type="string">
            <text:p text:style-name="P287">0..1</text:p>
          </table:table-cell>
          <table:table-cell table:style-name="Taula18.A3" office:value-type="string">
            <text:p text:style-name="P284"/>
          </table:table-cell>
          <table:table-cell table:style-name="Taula18.E18" office:value-type="string">
            <text:p text:style-name="P288">Cadena de bytes que compon el contingut del fitxer annexat</text:p>
          </table:table-cell>
        </table:table-row>
        <table:table-row table:style-name="TableLine691974128">
          <table:table-cell table:style-name="Taula18.A3" office:value-type="string">
            <text:p text:style-name="P283">eniDataCaptura</text:p>
          </table:table-cell>
          <table:table-cell table:style-name="Taula18.A3" office:value-type="string">
            <text:p text:style-name="P284">Data</text:p>
          </table:table-cell>
          <table:table-cell table:style-name="Taula18.A3" office:value-type="string">
            <text:p text:style-name="P287">1</text:p>
          </table:table-cell>
          <table:table-cell table:style-name="Taula18.D3" office:value-type="float" office:value="14">
            <text:p text:style-name="P284">14</text:p>
          </table:table-cell>
          <table:table-cell table:style-name="Taula18.E18" office:value-type="string">
            <text:p text:style-name="P288">Data de captura del document</text:p>
          </table:table-cell>
        </table:table-row>
        <table:table-row table:style-name="TableLine691973552">
          <table:table-cell table:style-name="Taula18.A3" office:value-type="string">
            <text:p text:style-name="P283">eniOrigen</text:p>
          </table:table-cell>
          <table:table-cell table:style-name="Taula18.A3" office:value-type="string">
            <text:p text:style-name="P286">Cadena</text:p>
          </table:table-cell>
          <table:table-cell table:style-name="Taula18.A3" office:value-type="string">
            <text:p text:style-name="P287">1</text:p>
          </table:table-cell>
          <table:table-cell table:style-name="Taula18.D3" office:value-type="float" office:value="10">
            <text:p text:style-name="P287">1<text:span text:style-name="T255">0</text:span></text:p>
          </table:table-cell>
          <table:table-cell table:style-name="Taula18.E18" office:value-type="string">
            <text:p text:style-name="P259">Codi de la metadada origen de la NTI de document electrònic</text:p>
          </table:table-cell>
        </table:table-row>
        <table:table-row table:style-name="TableLine691972976">
          <table:table-cell table:style-name="Taula18.A3" office:value-type="string">
            <text:p text:style-name="P283">eniEstatElaboracio</text:p>
          </table:table-cell>
          <table:table-cell table:style-name="Taula18.A3" office:value-type="string">
            <text:p text:style-name="P286">Cadena</text:p>
          </table:table-cell>
          <table:table-cell table:style-name="Taula18.A3" office:value-type="string">
            <text:p text:style-name="P287">1</text:p>
          </table:table-cell>
          <table:table-cell table:style-name="Taula18.D3" office:value-type="float" office:value="4">
            <text:p text:style-name="P287">4</text:p>
          </table:table-cell>
          <table:table-cell table:style-name="Taula18.E18" office:value-type="string">
            <text:p text:style-name="P259">Codi de la metadada <text:span text:style-name="T102">estat elaboració</text:span> de la NTI de document electrònic.</text:p>
          </table:table-cell>
        </table:table-row>
        <table:table-row table:style-name="TableLine691972400">
          <table:table-cell table:style-name="Taula18.A3" office:value-type="string">
            <text:p text:style-name="P283">eniTipusDocumental</text:p>
          </table:table-cell>
          <table:table-cell table:style-name="Taula18.A3" office:value-type="string">
            <text:p text:style-name="P286">Cadena</text:p>
          </table:table-cell>
          <table:table-cell table:style-name="Taula18.A3" office:value-type="string">
            <text:p text:style-name="P287">1</text:p>
          </table:table-cell>
          <table:table-cell table:style-name="Taula18.D3" office:value-type="float" office:value="255">
            <text:p text:style-name="P357">2<text:span text:style-name="T256">55</text:span></text:p>
          </table:table-cell>
          <table:table-cell table:style-name="Taula18.E18" office:value-type="string">
            <text:p text:style-name="P259">Codi de la metadada tipus documental de la NTI de document electrònic.</text:p>
          </table:table-cell>
        </table:table-row>
        <table:table-row table:style-name="TableLine691972112">
          <table:table-cell table:style-name="Taula18.A3" office:value-type="string">
            <text:p text:style-name="P283">sicresTipusDocument</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2">
            <text:p text:style-name="P287">2</text:p>
          </table:table-cell>
          <table:table-cell table:style-name="Taula18.E18" office:value-type="string">
            <text:p text:style-name="P259">Codi SICRES del segment Anexo – tipo de documento</text:p>
          </table:table-cell>
        </table:table-row>
        <table:table-row table:style-name="TableLine691971824">
          <table:table-cell table:style-name="Taula18.A3" office:value-type="string">
            <text:p text:style-name="P283">localitzacio</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80">
            <text:p text:style-name="P287">80</text:p>
          </table:table-cell>
          <table:table-cell table:style-name="Taula18.E18" office:value-type="string">
            <text:p text:style-name="P259"/>
          </table:table-cell>
        </table:table-row>
        <table:table-row table:style-name="TableLine691971248">
          <table:table-cell table:style-name="Taula18.A3" office:value-type="string">
            <text:p text:style-name="P290">metaDades</text:p>
          </table:table-cell>
          <table:table-cell table:style-name="Taula18.A3" office:value-type="string">
            <text:p text:style-name="P291">MetaDades</text:p>
          </table:table-cell>
          <table:table-cell table:style-name="Taula18.A3" office:value-type="string">
            <text:p text:style-name="P291">0..1</text:p>
          </table:table-cell>
          <table:table-cell table:style-name="Taula18.D3">
            <text:p text:style-name="P287"/>
          </table:table-cell>
          <table:table-cell table:style-name="Taula18.E18" office:value-type="string">
            <text:p text:style-name="P290">Camp MetaDada amb entrades de tipus codi i valor per metadades addicionals.</text:p>
          </table:table-cell>
        </table:table-row>
        <table:table-row table:style-name="TableLine691970672">
          <table:table-cell table:style-name="Taula18.A3" office:value-type="string">
            <text:p text:style-name="P283">observacions</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50">
            <text:p text:style-name="P287">50</text:p>
          </table:table-cell>
          <table:table-cell table:style-name="Taula18.E18" office:value-type="string">
            <text:p text:style-name="P292">Observacions a destacar sobre la informació annexada</text:p>
          </table:table-cell>
        </table:table-row>
        <table:table-row table:style-name="TableLine691970096">
          <table:table-cell table:style-name="Taula18.A3" office:value-type="string">
            <text:p text:style-name="P283">firmes</text:p>
          </table:table-cell>
          <table:table-cell table:style-name="Taula18.A3" office:value-type="string">
            <text:p text:style-name="P284">Firma</text:p>
          </table:table-cell>
          <table:table-cell table:style-name="Taula18.A3" office:value-type="string">
            <text:p text:style-name="P287">0..1</text:p>
          </table:table-cell>
          <table:table-cell table:style-name="Taula18.A3" office:value-type="string">
            <text:p text:style-name="P294"/>
          </table:table-cell>
          <table:table-cell table:style-name="Taula18.E18" office:value-type="string">
            <text:p text:style-name="P292">Llista de firmes del fitxer </text:p>
          </table:table-cell>
        </table:table-row>
        <table:table-row table:style-name="TableLine691969808">
          <table:table-cell table:style-name="Taula18.A3" office:value-type="string">
            <text:p text:style-name="P283">timestamp</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100">
            <text:p text:style-name="P287">100</text:p>
          </table:table-cell>
          <table:table-cell table:style-name="Taula18.E18" office:value-type="string">
            <text:p text:style-name="P259">Segell de temps del fitxer annex en base64.</text:p>
          </table:table-cell>
        </table:table-row>
        <table:table-row table:style-name="TableLine691969232">
          <table:table-cell table:style-name="Taula18.A3" office:value-type="string">
            <text:p text:style-name="P283">validacioOCSP</text:p>
          </table:table-cell>
          <table:table-cell table:style-name="Taula18.A3" office:value-type="string">
            <text:p text:style-name="P286">Cadena</text:p>
          </table:table-cell>
          <table:table-cell table:style-name="Taula18.A3" office:value-type="string">
            <text:p text:style-name="P287">0..1</text:p>
          </table:table-cell>
          <table:table-cell table:style-name="Taula18.D3" office:value-type="float" office:value="255">
            <text:p text:style-name="P357">2<text:span text:style-name="T257">55</text:span></text:p>
          </table:table-cell>
          <table:table-cell table:style-name="Taula18.E19" office:value-type="string">
            <text:p text:style-name="P259">Validació OCSP del certificat emprat per signar en base64.</text:p>
          </table:table-cell>
        </table:table-row>
      </table:table>
      <text:p text:style-name="P243"/>
      <text:p text:style-name="P246"/>
      <text:p text:style-name="P244"/>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691965776">
          <table:table-cell table:style-name="Taula19.A1" table:number-columns-spanned="5" office:value-type="string">
            <text:p text:style-name="P137">Registre<text:span text:style-name="T105">Firma</text:span> </text:p>
          </table:table-cell>
          <table:covered-table-cell/>
          <table:covered-table-cell/>
          <table:covered-table-cell/>
          <table:covered-table-cell/>
        </table:table-row>
        <table:table-row table:style-name="TableLine691966640">
          <table:table-cell table:style-name="Taula19.A2" office:value-type="string">
            <text:p text:style-name="P31">Nom del camp</text:p>
          </table:table-cell>
          <table:table-cell table:style-name="Taula19.A2" office:value-type="string">
            <text:p text:style-name="P31">Tipus</text:p>
          </table:table-cell>
          <table:table-cell table:style-name="Taula19.A2" office:value-type="string">
            <text:p text:style-name="P31">Mult.</text:p>
          </table:table-cell>
          <table:table-cell table:style-name="Taula19.A2" office:value-type="string">
            <text:p text:style-name="P33">Tamany</text:p>
          </table:table-cell>
          <table:table-cell table:style-name="Taula19.E2" office:value-type="string">
            <text:p text:style-name="P33">Descripció</text:p>
          </table:table-cell>
        </table:table-row>
        <table:table-row table:style-name="TableLine691990256">
          <table:table-cell table:style-name="Taula19.A3" office:value-type="string">
            <text:p text:style-name="P292">tipus</text:p>
          </table:table-cell>
          <table:table-cell table:style-name="Taula19.A3" office:value-type="string">
            <text:p text:style-name="P286">Cadena</text:p>
          </table:table-cell>
          <table:table-cell table:style-name="Taula19.A3" office:value-type="string">
            <text:p text:style-name="P296">1</text:p>
          </table:table-cell>
          <table:table-cell table:style-name="Taula19.D3" office:value-type="float" office:value="30">
            <text:p text:style-name="P296">30</text:p>
          </table:table-cell>
          <table:table-cell table:style-name="Taula19.E3" office:value-type="string">
            <text:p text:style-name="P299">Codi del tipus de firma</text:p>
          </table:table-cell>
        </table:table-row>
        <table:table-row table:style-name="TableLine691992848">
          <table:table-cell table:style-name="Taula19.A3" office:value-type="string">
            <text:p text:style-name="P292">perfil</text:p>
          </table:table-cell>
          <table:table-cell table:style-name="Taula19.A3" office:value-type="string">
            <text:p text:style-name="P286">Cadena</text:p>
          </table:table-cell>
          <table:table-cell table:style-name="Taula19.A3" office:value-type="string">
            <text:p text:style-name="P296">0..1</text:p>
          </table:table-cell>
          <table:table-cell table:style-name="Taula19.D3" office:value-type="float" office:value="30">
            <text:p text:style-name="P296">30</text:p>
          </table:table-cell>
          <table:table-cell table:style-name="Taula19.E4" office:value-type="string">
            <text:p text:style-name="P299">Codi de perfil de la firma.</text:p>
          </table:table-cell>
        </table:table-row>
        <table:table-row table:style-name="TableLine691991984">
          <table:table-cell table:style-name="Taula19.A3" office:value-type="string">
            <text:p text:style-name="P292">fitxerNom</text:p>
          </table:table-cell>
          <table:table-cell table:style-name="Taula19.A3" office:value-type="string">
            <text:p text:style-name="P286">Cadena</text:p>
          </table:table-cell>
          <table:table-cell table:style-name="Taula19.A3" office:value-type="string">
            <text:p text:style-name="P287">0..1</text:p>
          </table:table-cell>
          <table:table-cell table:style-name="Taula19.A3" office:value-type="string">
            <text:p text:style-name="P358">2<text:span text:style-name="T258">56</text:span></text:p>
          </table:table-cell>
          <table:table-cell table:style-name="Taula19.E5" office:value-type="string">
            <text:p text:style-name="P297">Nom del fitxer de firma de l’annex si n’hi ha. <text:span text:style-name="T103">És obligatori si el tipus de firma és TF04.</text:span> </text:p>
          </table:table-cell>
        </table:table-row>
        <table:table-row table:style-name="TableLine691991120">
          <table:table-cell table:style-name="Taula19.A3" office:value-type="string">
            <text:p text:style-name="P292">contingut</text:p>
          </table:table-cell>
          <table:table-cell table:style-name="Taula19.A3" office:value-type="string">
            <text:p text:style-name="P294">Byte[]</text:p>
          </table:table-cell>
          <table:table-cell table:style-name="Taula19.A3" office:value-type="string">
            <text:p text:style-name="P296">0..1</text:p>
          </table:table-cell>
          <table:table-cell table:style-name="Taula19.A3" office:value-type="string">
            <text:p text:style-name="P296">var</text:p>
          </table:table-cell>
          <table:table-cell table:style-name="Taula19.E6" office:value-type="string">
            <text:p text:style-name="P297">Cadena de bytes que componen el contingut del fitxer de firma annex si n’hi ha. <text:span text:style-name="T103">És obligatori si el tipus de firma és TF04.</text:span> </text:p>
          </table:table-cell>
        </table:table-row>
        <table:table-row table:style-name="TableLine691990544">
          <table:table-cell table:style-name="Taula19.A3" office:value-type="string">
            <text:p text:style-name="P292">tipusMime</text:p>
          </table:table-cell>
          <table:table-cell table:style-name="Taula19.A3" office:value-type="string">
            <text:p text:style-name="P286">Cadena</text:p>
          </table:table-cell>
          <table:table-cell table:style-name="Taula19.A3" office:value-type="string">
            <text:p text:style-name="P287">0..1</text:p>
          </table:table-cell>
          <table:table-cell table:style-name="Taula19.D3" office:value-type="float" office:value="30">
            <text:p text:style-name="P356">3<text:span text:style-name="T258">0</text:span></text:p>
          </table:table-cell>
          <table:table-cell table:style-name="Taula19.E7" office:value-type="string">
            <text:p text:style-name="P297">Tipus MIME del fitxer de firma annexat si n’hi ha. <text:span text:style-name="T103">És obligatori si el tipus de firma és TF04.</text:span> </text:p>
          </table:table-cell>
        </table:table-row>
        <text:soft-page-break/>
        <table:table-row table:style-name="TableLine691989392">
          <table:table-cell table:style-name="Taula19.A3" office:value-type="string">
            <text:p text:style-name="P292">csv</text:p>
          </table:table-cell>
          <table:table-cell table:style-name="Taula19.A3" office:value-type="string">
            <text:p text:style-name="P286">Cadena</text:p>
          </table:table-cell>
          <table:table-cell table:style-name="Taula19.A3" office:value-type="string">
            <text:p text:style-name="P287">0..1</text:p>
          </table:table-cell>
          <table:table-cell table:style-name="Taula19.A3" office:value-type="string">
            <text:p text:style-name="P284"/>
          </table:table-cell>
          <table:table-cell table:style-name="Taula19.E8" office:value-type="string">
            <text:p text:style-name="P288">En cas de que el fitxer es signi amb CSV, contingut del CSV en base64.</text:p>
          </table:table-cell>
        </table:table-row>
        <table:table-row table:style-name="TableLine691988528">
          <table:table-cell table:style-name="Taula19.A3" office:value-type="string">
            <text:p text:style-name="P292">csvRegulacio</text:p>
          </table:table-cell>
          <table:table-cell table:style-name="Taula19.A3" office:value-type="string">
            <text:p text:style-name="P286">Cadena</text:p>
          </table:table-cell>
          <table:table-cell table:style-name="Taula19.A3" office:value-type="string">
            <text:p text:style-name="P287">1</text:p>
          </table:table-cell>
          <table:table-cell table:style-name="Taula19.D3" office:value-type="float" office:value="640">
            <text:p text:style-name="P296">640</text:p>
          </table:table-cell>
          <table:table-cell table:style-name="Taula19.E9" office:value-type="string">
            <text:p text:style-name="P297">Text de regulació CSV.</text:p>
          </table:table-cell>
        </table:table-row>
      </table:table>
      <text:p text:style-name="P243"/>
      <text:p text:style-name="P245"/>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691986512">
          <table:table-cell table:style-name="Taula20.A1" table:number-columns-spanned="5" office:value-type="string">
            <text:p text:style-name="P137">Registre<text:span text:style-name="T105">Interessat</text:span> </text:p>
          </table:table-cell>
          <table:covered-table-cell/>
          <table:covered-table-cell/>
          <table:covered-table-cell/>
          <table:covered-table-cell/>
        </table:table-row>
        <table:table-row table:style-name="TableLine691998032">
          <table:table-cell table:style-name="Taula20.A2" office:value-type="string">
            <text:p text:style-name="P31">Nom del camp</text:p>
          </table:table-cell>
          <table:table-cell table:style-name="Taula20.A2" office:value-type="string">
            <text:p text:style-name="P31">Tipus</text:p>
          </table:table-cell>
          <table:table-cell table:style-name="Taula20.A2" office:value-type="string">
            <text:p text:style-name="P31">Mult.</text:p>
          </table:table-cell>
          <table:table-cell table:style-name="Taula20.A2" office:value-type="string">
            <text:p text:style-name="P33">Tamany</text:p>
          </table:table-cell>
          <table:table-cell table:style-name="Taula20.E2" office:value-type="string">
            <text:p text:style-name="P33">Descripció</text:p>
          </table:table-cell>
        </table:table-row>
        <table:table-row table:style-name="TableLine691999184">
          <table:table-cell table:style-name="Taula20.A3" office:value-type="string">
            <text:p text:style-name="P292">tipus</text:p>
          </table:table-cell>
          <table:table-cell table:style-name="Taula20.A3" office:value-type="string">
            <text:p text:style-name="P286">Cadena</text:p>
          </table:table-cell>
          <table:table-cell table:style-name="Taula20.A3" office:value-type="string">
            <text:p text:style-name="P296">1</text:p>
          </table:table-cell>
          <table:table-cell table:style-name="Taula20.D3" office:value-type="float" office:value="19">
            <text:p text:style-name="P358">1<text:span text:style-name="T259">9</text:span></text:p>
          </table:table-cell>
          <table:table-cell table:style-name="Taula20.E3" office:value-type="string">
            <text:p text:style-name="P299">Figura jurídica de la persona <text:line-break/>'1' = Administració.</text:p>
            <text:p text:style-name="P299">'2' = Persona física.</text:p>
            <text:p text:style-name="P299">'3' = Persona jurídica.</text:p>
          </table:table-cell>
        </table:table-row>
        <table:table-row table:style-name="TableLine691997168">
          <table:table-cell table:style-name="Taula20.A3" office:value-type="string">
            <text:p text:style-name="P301">documentTipus</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1">
            <text:p text:style-name="P359">1</text:p>
          </table:table-cell>
          <table:table-cell table:style-name="Taula20.E4" office:value-type="string">
            <text:p text:style-name="P299">Codi SICRES del segment interesado –</text:p>
            <text:p text:style-name="P299">documento de identificacion de interesado tipo.</text:p>
          </table:table-cell>
        </table:table-row>
        <table:table-row table:style-name="TableLine691996016">
          <table:table-cell table:style-name="Taula20.A3" office:value-type="string">
            <text:p text:style-name="P301">documentNum</text:p>
          </table:table-cell>
          <table:table-cell table:style-name="Taula20.A3" office:value-type="string">
            <text:p text:style-name="P286">Cadena</text:p>
          </table:table-cell>
          <table:table-cell table:style-name="Taula20.A3" office:value-type="string">
            <text:p text:style-name="P306"><text:span text:style-name="T104">0..</text:span>1</text:p>
          </table:table-cell>
          <table:table-cell table:style-name="Taula20.A3" office:value-type="string">
            <text:p text:style-name="P359">1<text:span text:style-name="T260">7</text:span></text:p>
          </table:table-cell>
          <table:table-cell table:style-name="Taula20.E5" office:value-type="string">
            <text:p text:style-name="P304">Número de document identificatiu.</text:p>
          </table:table-cell>
        </table:table-row>
        <table:table-row table:style-name="TableLine691995152">
          <table:table-cell table:style-name="Taula20.A3" office:value-type="string">
            <text:p text:style-name="P301">nom</text:p>
          </table:table-cell>
          <table:table-cell table:style-name="Taula20.A3" office:value-type="string">
            <text:p text:style-name="P294">Cadena</text:p>
          </table:table-cell>
          <table:table-cell table:style-name="Taula20.A3" office:value-type="string">
            <text:p text:style-name="P303">C</text:p>
          </table:table-cell>
          <table:table-cell table:style-name="Taula20.A3" office:value-type="string">
            <text:p text:style-name="P359">2<text:span text:style-name="T260">55</text:span></text:p>
          </table:table-cell>
          <table:table-cell table:style-name="Taula20.E6" office:value-type="string">
            <text:p text:style-name="P307">Nom de l’interessat. Obligatori si és una persona física.</text:p>
          </table:table-cell>
        </table:table-row>
        <table:table-row table:style-name="TableLine691994576">
          <table:table-cell table:style-name="Taula20.A3" office:value-type="string">
            <text:p text:style-name="P301">llinatge1</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255">
            <text:p text:style-name="P359">2<text:span text:style-name="T260">55</text:span></text:p>
          </table:table-cell>
          <table:table-cell table:style-name="Taula20.E7" office:value-type="string">
            <text:p text:style-name="P307">Primer llinatge de l’interessat. Obligatori si és una persona física.</text:p>
          </table:table-cell>
        </table:table-row>
        <table:table-row table:style-name="TableLine692004080">
          <table:table-cell table:style-name="Taula20.A3" office:value-type="string">
            <text:p text:style-name="P301">llinatge2</text:p>
          </table:table-cell>
          <table:table-cell table:style-name="Taula20.A3" office:value-type="string">
            <text:p text:style-name="P286">Cadena</text:p>
          </table:table-cell>
          <table:table-cell table:style-name="Taula20.A3" office:value-type="string">
            <text:p text:style-name="P303">0..1</text:p>
          </table:table-cell>
          <table:table-cell table:style-name="Taula20.A3" office:value-type="string">
            <text:p text:style-name="P359">2<text:span text:style-name="T260">55</text:span></text:p>
          </table:table-cell>
          <table:table-cell table:style-name="Taula20.E8" office:value-type="string">
            <text:p text:style-name="P307">Segon llinatge de l’interessat</text:p>
          </table:table-cell>
        </table:table-row>
        <table:table-row table:style-name="TableLine692006096">
          <table:table-cell table:style-name="Taula20.A3" office:value-type="string">
            <text:p text:style-name="P301">raoSocial</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2000">
            <text:p text:style-name="P359">2<text:span text:style-name="T261">000</text:span></text:p>
          </table:table-cell>
          <table:table-cell table:style-name="Taula20.E21" office:value-type="string">
            <text:p text:style-name="P307">Raó social de l’interessat. Obligatori si és una persona jurídica.</text:p>
          </table:table-cell>
        </table:table-row>
        <table:table-row table:style-name="TableLine692005232">
          <table:table-cell table:style-name="Taula20.A3" office:value-type="string">
            <text:p text:style-name="P301">pais</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100">
            <text:p text:style-name="P359">1<text:span text:style-name="T262">00</text:span></text:p>
          </table:table-cell>
          <table:table-cell table:style-name="Taula20.E21" office:value-type="string">
            <text:p text:style-name="P297">Codi ISO numèric del País de la persona.</text:p>
          </table:table-cell>
        </table:table-row>
        <table:table-row table:style-name="TableLine692004656">
          <table:table-cell table:style-name="Taula20.A3" office:value-type="string">
            <text:p text:style-name="P301">provincia</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100">
            <text:p text:style-name="P359">1<text:span text:style-name="T263">00</text:span></text:p>
          </table:table-cell>
          <table:table-cell table:style-name="Taula20.E21" office:value-type="string">
            <text:p text:style-name="P297">Codi INE de la província de la persona.</text:p>
          </table:table-cell>
        </table:table-row>
        <table:table-row table:style-name="TableLine692002928">
          <table:table-cell table:style-name="Taula20.A3" office:value-type="string">
            <text:p text:style-name="P301">municipi</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100">
            <text:p text:style-name="P303">100</text:p>
          </table:table-cell>
          <table:table-cell table:style-name="Taula20.E21" office:value-type="string">
            <text:p text:style-name="P297">Codi del Municipi de la persona.</text:p>
          </table:table-cell>
        </table:table-row>
        <table:table-row table:style-name="TableLine692003216">
          <table:table-cell table:style-name="Taula20.A3" office:value-type="string">
            <text:p text:style-name="P301">adresa</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160">
            <text:p text:style-name="P359">1<text:span text:style-name="T264">60</text:span></text:p>
          </table:table-cell>
          <table:table-cell table:style-name="Taula20.E21" office:value-type="string">
            <text:p text:style-name="P307">Adreça postal de l’interessat.</text:p>
          </table:table-cell>
        </table:table-row>
        <table:table-row table:style-name="TableLine692002352">
          <table:table-cell table:style-name="Taula20.A3" office:value-type="string">
            <text:p text:style-name="P301">codiPostal</text:p>
          </table:table-cell>
          <table:table-cell table:style-name="Taula20.A3" office:value-type="string">
            <text:p text:style-name="P286">Cadena</text:p>
          </table:table-cell>
          <table:table-cell table:style-name="Taula20.A3" office:value-type="string">
            <text:p text:style-name="P303">C</text:p>
          </table:table-cell>
          <table:table-cell table:style-name="Taula20.D3" office:value-type="float" office:value="5">
            <text:p text:style-name="P359">5</text:p>
          </table:table-cell>
          <table:table-cell table:style-name="Taula20.E21" office:value-type="string">
            <text:p text:style-name="P297"/>
          </table:table-cell>
        </table:table-row>
        <table:table-row table:style-name="TableLine692000624">
          <table:table-cell table:style-name="Taula20.A3" office:value-type="string">
            <text:p text:style-name="P301">email</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160">
            <text:p text:style-name="P359">1<text:span text:style-name="T265">60</text:span></text:p>
          </table:table-cell>
          <table:table-cell table:style-name="Taula20.E21" office:value-type="string">
            <text:p text:style-name="P297"/>
          </table:table-cell>
        </table:table-row>
        <table:table-row table:style-name="TableLine692001200">
          <table:table-cell table:style-name="Taula20.A3" office:value-type="string">
            <text:p text:style-name="P301">telefon</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20">
            <text:p text:style-name="P359">2<text:span text:style-name="T265">0</text:span></text:p>
          </table:table-cell>
          <table:table-cell table:style-name="Taula20.E21" office:value-type="string">
            <text:p text:style-name="P297"/>
          </table:table-cell>
        </table:table-row>
        <table:table-row table:style-name="TableLine692012720">
          <table:table-cell table:style-name="Taula20.A3" office:value-type="string">
            <text:p text:style-name="P301">emailHabilitat</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160">
            <text:p text:style-name="P359">1<text:span text:style-name="T265">60</text:span></text:p>
          </table:table-cell>
          <table:table-cell table:style-name="Taula20.E21" office:value-type="string">
            <text:p text:style-name="P297">En cas de disposar d'adreça electrònica habilitada.</text:p>
          </table:table-cell>
        </table:table-row>
        <table:table-row table:style-name="TableLine692010128">
          <table:table-cell table:style-name="Taula20.A3" office:value-type="string">
            <text:p text:style-name="P301">canalPreferent</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2">
            <text:p text:style-name="P359">2</text:p>
          </table:table-cell>
          <table:table-cell table:style-name="Taula20.E21" office:value-type="string">
            <text:p text:style-name="P297">Codi SICRES del segment interesado – canal</text:p>
            <text:p text:style-name="P297">preferente de notificación del interesado.</text:p>
          </table:table-cell>
        </table:table-row>
        <table:table-row table:style-name="TableLine692012432">
          <table:table-cell table:style-name="Taula20.A3" office:value-type="string">
            <text:p text:style-name="P309">codiDire</text:p>
          </table:table-cell>
          <table:table-cell table:style-name="Taula20.A3" office:value-type="string">
            <text:p text:style-name="P310">cadena</text:p>
          </table:table-cell>
          <table:table-cell table:style-name="Taula20.A3" office:value-type="string">
            <text:p text:style-name="P310">0..1</text:p>
          </table:table-cell>
          <table:table-cell table:style-name="Taula20.D3" office:value-type="float" office:value="20">
            <text:p text:style-name="P310">20</text:p>
          </table:table-cell>
          <table:table-cell table:style-name="Taula20.E21" office:value-type="string">
            <text:p text:style-name="P309">Codi DIRe de l'interessat.</text:p>
          </table:table-cell>
        </table:table-row>
        <table:table-row table:style-name="TableLine692011856">
          <table:table-cell table:style-name="Taula20.A3" office:value-type="string">
            <text:p text:style-name="P301">observacions</text:p>
          </table:table-cell>
          <table:table-cell table:style-name="Taula20.A3" office:value-type="string">
            <text:p text:style-name="P286">Cadena</text:p>
          </table:table-cell>
          <table:table-cell table:style-name="Taula20.A3" office:value-type="string">
            <text:p text:style-name="P303">0..1</text:p>
          </table:table-cell>
          <table:table-cell table:style-name="Taula20.D3" office:value-type="float" office:value="160">
            <text:p text:style-name="P359">1<text:span text:style-name="T265">60</text:span></text:p>
          </table:table-cell>
          <table:table-cell table:style-name="Taula20.E21" office:value-type="string">
            <text:p text:style-name="P297"/>
          </table:table-cell>
        </table:table-row>
        <table:table-row table:style-name="TableLine692011280">
          <table:table-cell table:style-name="Taula20.A3" office:value-type="string">
            <text:p text:style-name="P301">representant</text:p>
          </table:table-cell>
          <table:table-cell table:style-name="Taula20.A3" office:value-type="string">
            <text:p text:style-name="P302">RegistreInteressat</text:p>
          </table:table-cell>
          <table:table-cell table:style-name="Taula20.A3" office:value-type="string">
            <text:p text:style-name="P303">0..1</text:p>
          </table:table-cell>
          <table:table-cell table:style-name="Taula20.A3" office:value-type="string">
            <text:p text:style-name="P303"/>
          </table:table-cell>
          <table:table-cell table:style-name="Taula20.E21" office:value-type="string">
            <text:p text:style-name="P311">Interessat que actua de representant de l’actual.</text:p>
          </table:table-cell>
        </table:table-row>
        <table:table-row table:style-name="TableLine692010992">
          <table:table-cell table:style-name="Taula20.A3" office:value-type="string">
            <text:p text:style-name="P301">representat</text:p>
          </table:table-cell>
          <table:table-cell table:style-name="Taula20.A3" office:value-type="string">
            <text:p text:style-name="P302">RegistreInteressat</text:p>
          </table:table-cell>
          <table:table-cell table:style-name="Taula20.A3" office:value-type="string">
            <text:p text:style-name="P303">0..1</text:p>
          </table:table-cell>
          <table:table-cell table:style-name="Taula20.A3" office:value-type="string">
            <text:p text:style-name="P303"/>
          </table:table-cell>
          <table:table-cell table:style-name="Taula20.E22" office:value-type="string">
            <text:p text:style-name="P311">Interessat que actua com a representat per l’actual.</text:p>
          </table:table-cell>
        </table:table-row>
      </table:table>
      <text:p text:style-name="P243"><text:soft-page-break/></text:p>
      <text:list xml:id="list175634293474504" text:continue-numbering="true" text:style-name="Outline">
        <text:list-item>
          <text:list>
            <text:list-item>
              <text:h text:style-name="P402" text:outline-level="2"><text:bookmark-start text:name="Còpia de __RefHeading___Toc16776_2313926538 1"/><text:bookmark-start text:name="__RefHeading___Toc227355_390838441"/>Utilització del servei<text:bookmark-end text:name="Còpia de __RefHeading___Toc16776_2313926538 1"/><text:bookmark-end text:name="__RefHeading___Toc227355_390838441"/></text:h>
            </text:list-item>
          </text:list>
        </text:list-item>
      </text:list>
      <text:p text:style-name="P232">Aquest servei disposa d’un client que facilita la seva utilització.</text:p>
      <text:p text:style-name="P232">Per a fer ús d’aquest client en una aplicació Java es pot utilitzar la següent dependència Maven:</text:p>
      <text:p text:style-name="P382"/>
      <text:p text:style-name="P241"><text:span text:style-name="T28"><text:s/><text:tab/> </text:span><text:span text:style-name="T15">&lt;</text:span> <text:span text:style-name="T21">dependency</text:span> <text:span text:style-name="T15">&gt;</text:span> </text:p>
      <text:p text:style-name="P54"><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54"><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54"><text:span text:style-name="T28"><text:s/><text:tab/> <text:tab/> </text:span><text:span text:style-name="T15">&lt;</text:span> <text:span text:style-name="T21">version</text:span> <text:span text:style-name="T15">&gt;</text:span> <text:span text:style-name="T29">1.0.1</text:span> <text:span text:style-name="T15">&lt;/</text:span> <text:span text:style-name="T21">version</text:span> <text:span text:style-name="T15">&gt;</text:span> </text:p>
      <text:p text:style-name="P241"><text:span text:style-name="T28"><text:s/><text:tab/> </text:span><text:span text:style-name="T15">&lt;/</text:span> <text:span text:style-name="T21">dependency</text:span> <text:span text:style-name="T15">&gt;</text:span> </text:p>
      <text:p text:style-name="P241"/>
      <text:p text:style-name="P232">Per a utilitzar aquesta dependència és necessari tenir configurat el següent repository:</text:p>
      <text:p text:style-name="P384"/>
      <text:p text:style-name="P239"><text:span text:style-name="T28"><text:s/><text:tab/> </text:span><text:span text:style-name="T15">&lt;</text:span> <text:span text:style-name="T21">repository</text:span> <text:span text:style-name="T15">&gt;</text:span> </text:p>
      <text:p text:style-name="P54"><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54"><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54"><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39"><text:span text:style-name="T28"><text:s/><text:tab/> </text:span><text:span text:style-name="T15">&lt;/</text:span> <text:span text:style-name="T21">repository</text:span> <text:span text:style-name="T15">&gt;</text:span> </text:p>
      <text:p text:style-name="P239"/>
      <text:p text:style-name="P150"/>
      <text:p text:style-name="P232">Aquesta dependència ens dona accés a la classe BustiaV1WsClientFactory que ens permet fer cridades al servei. En el següent fragment de codi es pot veure un exemple de com utilitzar aquesta classe per a fer cridades al servei:</text:p>
      <text:p text:style-name="P104"/>
      <text:p text:style-name="P55"><text:span text:style-name="T53"><text:tab/><text:tab/>BustiaV1 </text:span><text:span text:style-name="T81">bustiaService</text:span><text:span text:style-name="T53"> = BustiaV1WsClientFactory.</text:span><text:span text:style-name="T56">getWsClient</text:span><text:span text:style-name="T53">(</text:span></text:p>
      <text:p text:style-name="P51"><text:span text:style-name="T53"><text:tab/><text:tab/><text:tab/><text:tab/></text:span><text:span text:style-name="T32">"http://DISTRIB_HOST/distribucio/ws/v1/bustia"</text:span><text:span text:style-name="T53">,</text:span></text:p>
      <text:p text:style-name="P51"><text:span text:style-name="T53"><text:tab/><text:tab/><text:tab/><text:tab/></text:span><text:span text:style-name="T32">"USERNAME"</text:span><text:span text:style-name="T53">,</text:span></text:p>
      <text:p text:style-name="P51"><text:span text:style-name="T53"><text:tab/><text:tab/><text:tab/><text:tab/></text:span><text:span text:style-name="T32">"PASSWORD"</text:span><text:span text:style-name="T53">);</text:span></text:p>
      <text:p text:style-name="P51"><text:span text:style-name="T53"><text:tab/><text:tab/>RegistreAnotacio </text:span><text:span text:style-name="T81">registreAnotacio</text:span><text:span text:style-name="T53"> = </text:span><text:span text:style-name="T46">new</text:span><text:span text:style-name="T53"> RegistreAnotacio();</text:span></text:p>
      <text:p text:style-name="P51"><text:span text:style-name="T53"><text:tab/><text:tab/></text:span><text:span text:style-name="T224">// </text:span><text:span text:style-name="T225">TODO e</text:span><text:span text:style-name="T224">mplenar dades de l'anotació de registre</text:span></text:p>
      <text:p text:style-name="P51"><text:span text:style-name="T53"><text:tab/><text:tab/></text:span><text:span text:style-name="T46">try</text:span><text:span text:style-name="T53"> {</text:span></text:p>
      <text:p text:style-name="P51"><text:span text:style-name="T53"><text:tab/><text:tab/><text:tab/></text:span><text:span text:style-name="T81">bustiaService</text:span><text:span text:style-name="T53">.enviarAnotacioRegistreEntrada(</text:span></text:p>
      <text:p text:style-name="P51"><text:span text:style-name="T53"><text:tab/><text:tab/><text:tab/><text:tab/><text:tab/></text:span><text:span text:style-name="T76">ENTITAT_CODI</text:span><text:span text:style-name="T53">,</text:span></text:p>
      <text:p text:style-name="P51"><text:span text:style-name="T53"><text:tab/><text:tab/><text:tab/><text:tab/><text:tab/></text:span><text:span text:style-name="T76">DIR3_CODI</text:span><text:span text:style-name="T53">,</text:span></text:p>
      <text:p text:style-name="P51"><text:span text:style-name="T53"><text:tab/><text:tab/><text:tab/><text:tab/><text:tab/></text:span><text:span text:style-name="T81">registreAnotacio</text:span><text:span text:style-name="T53">);</text:span></text:p>
      <text:p text:style-name="P51"><text:span text:style-name="T53"><text:tab/><text:tab/>} </text:span><text:span text:style-name="T46">catch</text:span><text:span text:style-name="T53"> (Exception </text:span><text:span text:style-name="T81">ex</text:span><text:span text:style-name="T53">) {</text:span></text:p>
      <text:p text:style-name="P51"><text:span text:style-name="T53"><text:tab/><text:tab/><text:tab/></text:span><text:span text:style-name="T224">// </text:span><text:span text:style-name="T225">TODO tractar e</text:span><text:span text:style-name="T224">rrors en l'enviament</text:span></text:p>
      <text:p text:style-name="P51"><text:span text:style-name="T53"><text:tab/><text:tab/><text:tab/></text:span><text:span text:style-name="T81">ex</text:span><text:span text:style-name="T53">.printStackTrace();</text:span></text:p>
      <text:p text:style-name="P107"><text:tab/><text:tab/>}</text:p>
      <text:p text:style-name="P107"/>
      <text:p text:style-name="P45"/>
      <text:list xml:id="list175634784287650" text:continue-numbering="true" text:style-name="Outline">
        <text:list-item>
          <text:h text:style-name="P395" text:outline-level="1"><text:bookmark-start text:name="__RefNumPara__52044_2521683781"/><text:bookmark-start text:name="__RefHeading___Toc52041_2521683781"/><text:span text:style-name="T327">Servei</text:span> d<text:span text:style-name="T327">e</text:span> backoffice de distribució<text:bookmark-end text:name="__RefNumPara__52044_2521683781"/><text:bookmark-end text:name="__RefHeading___Toc52041_2521683781"/></text:h>
        </text:list-item>
      </text:list>
      <text:p text:style-name="P228">Els backoffices son els encarregats de processar les anotacions de registre <text:span text:style-name="T325">que son notificades des de</text:span> <text:span text:style-name="T325">l</text:span>’aplicació <text:span text:style-name="T324">DISTRIBUCIÓ.</text:span></text:p>
      <text:p text:style-name="P379">Aquesta notificació es du a terme mitjançant una cridada un servei que han d’implementar de forma obligatòria tots els backoffices. <text:span text:style-name="T324">La interfície d’aquest servei és la següent:</text:span></text:p>
      <text:p text:style-name="P156"><draw:frame draw:style-name="fr8" draw:name="Còpia de Imatge4 1" text:anchor-type="as-char" svg:width="17cm" svg:height="2.288cm" draw:z-index="71"><draw:image xlink:href="Pictures/10000001000002A40000005B1334E899686238FD.png" xlink:type="simple" xlink:show="embed" xlink:actuate="onLoad" draw:mime-type="image/png"/></draw:frame><text:s text:c="5"/></text:p>
      <text:p text:style-name="P248">Aquest servei es pot implementar com un servei web REST o com un servei web SOAP.</text:p>
      <text:p text:style-name="P248">Per a la implementació REST s’ha d’habilitar una URL que rebi peticions POST a on s’informi d’una llista de les anotacions pendents. Aquesta llista es rebrà en format JSON i tendrà una estructura anàloga a la del següent exemple:</text:p>
      <text:p text:style-name="P95"/>
      <text:p text:style-name="P95">[ {</text:p>
      <text:p text:style-name="P56"><text:span text:style-name="T277">"indetificador" </text:span><text:span text:style-name="T73">: </text:span><text:span text:style-name="T278">"GOIBE1111/2022"</text:span><text:span text:style-name="T73">,</text:span></text:p>
      <text:p text:style-name="P56"><text:span text:style-name="T277">"clauAcces" </text:span><text:span text:style-name="T73">: </text:span><text:span text:style-name="T278">"hv/8hXYRSFYtVEjZyDfEE8KdOIiX3N1UEXGiltl3rbw="</text:span></text:p>
      <text:p text:style-name="P95">}, {</text:p>
      <text:p text:style-name="P56"><text:span text:style-name="T277">"indetificador" </text:span><text:span text:style-name="T73">: </text:span><text:span text:style-name="T278">"GOIBE2222/2022"</text:span><text:span text:style-name="T73">,</text:span></text:p>
      <text:p text:style-name="P247"><text:span text:style-name="T277">"clauAcces" </text:span><text:span text:style-name="T73">: </text:span><text:span text:style-name="T278">"AzRwN0QQV70RR4IxXFZsPj2FYJ2VA7LDiKap19MmA/U="</text:span></text:p>
      <text:p text:style-name="P247"><text:span text:style-name="T278">}</text:span><text:span text:style-name="T116"> ]</text:span></text:p>
      <text:p text:style-name="P247"/>
      <text:p text:style-name="P155"/>
      <text:p text:style-name="P248">Per a <text:s/>la implementació SOAP s’ha de crear un servei que compleixi amb l’estructura descrita a l’<text:span text:style-name="T326"><text:bookmark-ref text:reference-format="text" text:ref-name="__RefHeading___Toc117515_1680181998">Annex I: WSDL del backoffice </text:bookmark-ref></text:span><text:span text:style-name="T326">.</text:span></text:p>
      <text:p text:style-name="P18">En qualsevol d’aquestes implementacions l’autenticació haurà de ser de tipus HTTP Basic.</text:p>
      <text:p text:style-name="P18"/>
      <text:p text:style-name="P249"><text:span text:style-name="T12">Important:</text:span><text:span text:style-name="T11"> Les implementacions REST han de permetre una cridada amb un JSON que representa una llista buida («[]») sense produir cap error.</text:span></text:p>
      <text:p text:style-name="P18"/>
      <text:list xml:id="list175634288101778" text:continue-numbering="true" text:style-name="Outline">
        <text:list-item>
          <text:h text:style-name="P396" text:outline-level="1"><text:bookmark-start text:name="__RefHeading___Toc160470_1680181998"/><text:bookmark-start text:name="__RefNumPara__81017_1680181998"/>Servei de gestió d’anotacions pels backoffices<text:bookmark-end text:name="__RefHeading___Toc160470_1680181998"/><text:bookmark-end text:name="__RefNumPara__81017_1680181998"/></text:h>
        </text:list-item>
      </text:list>
      <text:p text:style-name="P238">Aquest servei permet <text:span text:style-name="T321">als backoffices consultar la informació d’una anotació de registre i canviar el seu estat.</text:span></text:p>
      <text:p text:style-name="P237"><draw:frame draw:style-name="fr3" draw:name="Marc1" text:anchor-type="as-char" svg:width="10.109cm" draw:z-index="72"><draw:text-box fo:min-height="8.481cm"><text:p text:style-name="P224"><draw:frame draw:style-name="fr7" draw:name="Còpia de Imatge6 1" text:anchor-type="paragraph" svg:width="10.109cm" style:rel-width="100%" svg:height="7.08cm" style:rel-height="scale" draw:z-index="73"><draw:image xlink:href="Pictures/100000010000017100000106B187299E55A52A1D.png" xlink:type="simple" xlink:show="embed" xlink:actuate="onLoad" draw:mime-type="image/png"/></draw:frame>Figura <text:span text:style-name="T109"><text:sequence text:ref-name="refFig.1" text:name="Fig." text:formula="ooow:Fig.+1" style:num-format="1">2</text:sequence></text:span>: <text:s/><text:span text:style-name="T313">Casos d'ús </text:span><text:span text:style-name="T334">de gestió </text:span><text:span text:style-name="T315">d'anotacions a </text:span><text:span text:style-name="T313">DISTRIBUCIÓ</text:span></text:p></draw:text-box></draw:frame></text:p>
      <text:list xml:id="list175634219522223" text:continue-numbering="true" text:style-name="Outline">
        <text:list-item>
          <text:list>
            <text:list-item>
              <text:h text:style-name="P407" text:outline-level="2"><text:bookmark-start text:name="Còpia de __RefHeading___Toc16770_2313926538 1"/><text:bookmark-start text:name="__RefHeading___Toc227357_390838441"/><text:span text:style-name="T321">Diagram</text:span><text:span text:style-name="T323">a</text:span><text:span text:style-name="T321"> d</text:span><text:span text:style-name="T322">e seqüència</text:span><text:bookmark-end text:name="Còpia de __RefHeading___Toc16770_2313926538 1"/><text:bookmark-end text:name="__RefHeading___Toc227357_390838441"/></text:h>
            </text:list-item>
          </text:list>
        </text:list-item>
      </text:list>
      <text:p text:style-name="P218">El <text:span text:style-name="T111">detall</text:span> de la comunicació <text:span text:style-name="T111">entre</text:span> l’aplicació DISTRIBUCIÓ <text:span text:style-name="T335">i</text:span><text:span text:style-name="T111"> el backoffice </text:span><text:span text:style-name="T335">per a la gestió de les anotacions </text:span><text:span text:style-name="T111">es pot veure en el següent diagrama.</text:span></text:p>
      <text:p text:style-name="P217"><draw:custom-shape text:anchor-type="paragraph" draw:z-index="60" draw:name="Forma 6" draw:style-name="gr1" draw:text-style-name="P456" svg:width="0.556cm" svg:height="0.454cm" svg:x="8.474cm" svg:y="2.879cm"><text:p text:style-name="P455"><text:span text:style-name="T344">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1" draw:name="Forma 7" draw:style-name="gr1" draw:text-style-name="P456" svg:width="0.556cm" svg:height="0.454cm" svg:x="7.601cm" svg:y="3.487cm"><text:p text:style-name="P455"><text:span text:style-name="T344">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8" draw:style-name="gr1" draw:text-style-name="P456" svg:width="0.556cm" svg:height="0.454cm" svg:x="1.251cm" svg:y="1.873cm"><text:p text:style-name="P455"><text:span text:style-name="T344">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9" draw:style-name="gr1" draw:text-style-name="P456" svg:width="0.556cm" svg:height="0.454cm" svg:x="7.442cm" svg:y="5.048cm"><text:p text:style-name="P455"><text:span text:style-name="T344">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10" draw:style-name="gr1" draw:text-style-name="P456" svg:width="0.556cm" svg:height="0.454cm" svg:x="7.468cm" svg:y="7.165cm"><text:p text:style-name="P455"><text:span text:style-name="T344">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4"><draw:image xlink:href="Pictures/10000001000002590000016909E9884BEDF01561.png" xlink:type="simple" xlink:show="embed" xlink:actuate="onLoad" draw:mime-type="image/png"/></draw:frame></text:p>
      <text:list xml:id="list3051610602" text:style-name="L2">
        <text:list-item>
          <text:p text:style-name="P442">L’aplicació de distribució comunica al backoffice <text:span text:style-name="T113">l'existència</text:span> d’anotacions de registre pendents de processar mitjançant el mètode comunicarAnotacionsPendents del servei DistribucioBackoffice.</text:p>
        </text:list-item>
        <text:list-item>
          <text:p text:style-name="P443">El backoffice <text:span text:style-name="T113">ha de </text:span>guardar en una coa la llista d’anotacions a processar i finalitzar la comunicació.</text:p>
        </text:list-item>
        <text:list-item>
          <text:p text:style-name="P445">El backoffice <text:span text:style-name="T113">ha de processar les anotacions pendents que se li han comunicat.</text:span></text:p>
        </text:list-item>
      </text:list>
      <text:p text:style-name="P214">A mesura que el backoffice vagi processant les anotacions de registre, es requer<text:span text:style-name="T113">eix</text:span> la següent comunicació amb l’aplicació de DISTRIBUCIO:</text:p>
      <text:list xml:id="list175633972932488" text:continue-numbering="true" text:style-name="L2">
        <text:list-item>
          <text:p text:style-name="P443">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43"><text:bookmark-start text:name="__RefNumPara__52573_2521683781"/>Una vegada processada l’anotació, el backoffice haurà de comunicar a l’aplicació de DISTRIBUCIO l’estat d’aquest processament mitjançant el mètode canviEstat<text:span text:style-name="T112"> del servei DistribucioBackoffice.</text:span> Els possibles estats son:<text:bookmark-end text:name="__RefNumPara__52573_2521683781"/></text:p>
        </text:list-item>
      </text:list>
      <text:list xml:id="list980910958" text:style-name="L3">
        <text:list-item>
          <text:list>
            <text:list-item>
              <text:p text:style-name="P446">REBUDA: S'ha rebut la petició al backoffice.</text:p>
            </text:list-item>
            <text:list-item>
              <text:p text:style-name="P444">PENDENT<text:span text:style-name="T316">: L'anotació s'ha rebut i consultat correctament i està pendent de processament.</text:span></text:p>
            </text:list-item>
            <text:list-item>
              <text:p text:style-name="P446">REBUTJADA: Es comunica l'estat i el motiu a DISTRIBUCIO conforme l'anotació es rebutja des del backoffice i per a que quedi com a rebutjada i pendent de processament a DISTRIBUCIO</text:p>
            </text:list-item>
            <text:list-item>
              <text:p text:style-name="P444"><text:soft-page-break/>PROCESSADA<text:span text:style-name="T316">: L'anotació s'ha processat correctament al backoffice.</text:span></text:p>
            </text:list-item>
            <text:list-item>
              <text:p text:style-name="P444">ERROR<text:span text:style-name="T316">: El processament de l'anotació o la consulta ha resultat amb error i es comunica a DISTRIBUCIO per a que reintenti l'enviament o la marqui amb un error.</text:span></text:p>
            </text:list-item>
          </text:list>
        </text:list-item>
      </text:list>
      <text:p text:style-name="P220">Quan el backoffice rep la comunicació d'anotació pendent pot marcar l'estat <text:span text:style-name="T317">«</text:span>REBUDA<text:span text:style-name="T317">»</text:span> conforme ha rebut la petició i si no processa immediatament l'anotació pot posar que està pendent de processament amb l'estat <text:span text:style-name="T317">«</text:span>PENDENT<text:span text:style-name="T317">»</text:span>.</text:p>
      <text:p text:style-name="P214">Si el backoffice ha processat correctament l’anotació de registre l’estat indicat haurà de ser «PROCESSADA». En canvi, si l’anotació ha produït algun tipus d’error de processament, l’estat indicat haurà de ser «ERROR».<text:span text:style-name="T316"> També hi ha la possibilitat de rebutjar les anotacions amb l'estat </text:span>«<text:span text:style-name="T316">REBUTJADA</text:span>»<text:span text:style-name="T316">.</text:span></text:p>
      <text:list xml:id="list175633472280346" text:continue-list="list175634219522223" text:style-name="Outline">
        <text:list-item>
          <text:list>
            <text:list-item>
              <text:h text:style-name="P403" text:outline-level="2"><text:bookmark-start text:name="Còpia de Còpia de __RefHeading___Toc16772_2313926538 2 1"/><text:bookmark-start text:name="__RefHeading___Toc227359_390838441"/><text:bookmark-start text:name="Còpia de Còpia de __RefNumPara__80988_1680181998 2 1"/>Descripció del servei<text:bookmark-end text:name="Còpia de Còpia de __RefHeading___Toc16772_2313926538 2 1"/><text:bookmark-end text:name="__RefHeading___Toc227359_390838441"/><text:bookmark-end text:name="Còpia de Còpia de __RefNumPara__80988_1680181998 2 1"/></text:h>
              <text:list>
                <text:list-item>
                  <text:h text:style-name="Heading_20_3" text:outline-level="3"><text:bookmark-start text:name="__RefHeading___Toc53751_2521683781"/>Consulta d'una anotació <text:span text:style-name="T332">de registre</text:span><text:bookmark-end text:name="__RefHeading___Toc53751_2521683781"/></text:h>
                </text:list-item>
              </text:list>
            </text:list-item>
          </text:list>
        </text:list-item>
      </text:list>
      <text:p text:style-name="P192"/>
      <text:p text:style-name="P198">Aquest mètode és el que permet <text:span text:style-name="T287">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69">Consulta d’una anotació de registre</text:p>
          </table:table-cell>
          <table:covered-table-cell/>
        </table:table-row>
        <table:table-row table:style-name="TableLine692017040">
          <table:table-cell table:style-name="Taula14.A8" office:value-type="string">
            <text:p text:style-name="P35">Mètode</text:p>
          </table:table-cell>
          <table:table-cell table:style-name="Taula14.B8" office:value-type="string">
            <text:p text:style-name="P206">GET</text:p>
          </table:table-cell>
        </table:table-row>
        <table:table-row table:style-name="TableLine692015888">
          <table:table-cell table:style-name="Taula14.A8" office:value-type="string">
            <text:p text:style-name="P29">URL</text:p>
          </table:table-cell>
          <table:table-cell table:style-name="Taula14.B8" office:value-type="string">
            <text:p text:style-name="P193">http<text:span text:style-name="T320">s</text:span>://<text:span text:style-name="T320">DISTRIB_HOST/distribucioapi/interna</text:span>/<text:span text:style-name="T287">backoffice</text:span>/<text:span text:style-name="T287">consulta</text:span></text:p>
          </table:table-cell>
        </table:table-row>
        <table:table-row table:style-name="TableLine692015600">
          <table:table-cell table:style-name="Taula14.A8" office:value-type="string">
            <text:p text:style-name="P28">Descripció</text:p>
          </table:table-cell>
          <table:table-cell table:style-name="Taula14.B8" office:value-type="string">
            <text:p text:style-name="P43"><text:span text:style-name="T287">Consulta les dades d'una anotació i dels seus interessats i annexos a partir de l'identificador i clau comunicada per DISTRIBUCIO</text:span>.<text:span text:style-name="T288"> </text:span></text:p>
          </table:table-cell>
        </table:table-row>
        <table:table-row table:style-name="TableLine692015024">
          <table:table-cell table:style-name="Taula14.A8" office:value-type="string">
            <text:p text:style-name="P35">Autenticació</text:p>
          </table:table-cell>
          <table:table-cell table:style-name="Taula14.B8" office:value-type="string">
            <text:p text:style-name="P367">HTTP Basic</text:p>
          </table:table-cell>
        </table:table-row>
        <table:table-row table:style-name="TableLine692014736">
          <table:table-cell table:style-name="Taula14.A8" office:value-type="string">
            <text:p text:style-name="P35">Rols requerits</text:p>
          </table:table-cell>
          <table:table-cell table:style-name="Taula14.B8" office:value-type="string">
            <text:p text:style-name="P367">DIS_BACKWS</text:p>
          </table:table-cell>
        </table:table-row>
        <table:table-row table:style-name="TableLine692014160">
          <table:table-cell table:style-name="Taula14.A8" office:value-type="string">
            <text:p text:style-name="P28">Paràmetres</text:p>
          </table:table-cell>
          <table:table-cell table:style-name="Taula14.B8" office:value-type="string">
            <text:list xml:id="list3260885523" text:style-name="L4">
              <text:list-item>
                <text:p text:style-name="P423"><text:span text:style-name="T44">identificador</text:span><text:span text:style-name="T281">:</text:span><text:span text:style-name="T288"> És l'identificador de l'anotació comunicada per DISTRIBUCIO. </text:span><text:span text:style-name="T307">Sol coincidir amb </text:span><text:span text:style-name="T288">el número de registre de l'anotació.</text:span></text:p>
              </text:list-item>
              <text:list-item>
                <text:p text:style-name="P423"><text:span text:style-name="T43">clauAcces</text:span><text:span text:style-name="T281">: </text:span><text:span text:style-name="T288">És una clau proporcionada per DISTRIBUCIO en el moment de notificar al backoffice l'anotació de registre que s'ha d'emprar per consultar o canviar l'estat </text:span><text:span text:style-name="T307">de</text:span><text:span text:style-name="T288"> l'anotació.</text:span></text:p>
              </text:list-item>
            </text:list>
            <text:p text:style-name="P43"><text:span text:style-name="T302">Com que és una petició de consulta els paràmetres s'informen en la </text:span><text:span text:style-name="T307">pròpia </text:span><text:span text:style-name="T302">URL. </text:span><text:span text:style-name="T288">Un exemple de petició seria el següent. </text:span><text:span text:style-name="T289">Pels paràmetres identificador: </text:span><text:span text:style-name="T291">"GOIBE715-DEV/2023"</text:span><text:span text:style-name="T289"> i clau d'accés </text:span><text:span text:style-name="T291">"JRwLmCaMES6JKAAnzhd5K9Qi4ppjudiLwd+2b5LNsVo="</text:span><text:span text:style-name="T289"> la petició amb els paràmetres codif</text:span><text:span text:style-name="T307">i</text:span><text:span text:style-name="T289">cats </text:span><text:span text:style-name="T307">és</text:span><text:span text:style-name="T289">:</text:span></text:p>
            <text:p text:style-name="P201">GET <text:soft-page-break/>https://<text:span text:style-name="T307">se</text:span>.caib.es/distribucioapi/interna/backoffice/consulta?indetificador=GOIBE715-DEV%2F2023&amp;clauAcces=JRwLmCaMES6JKAAnzhd5K9Qi4ppjudiLwd%2B2b5LNsVo%3D</text:p>
          </table:table-cell>
        </table:table-row>
        <table:table-row table:style-name="TableLine692013008">
          <table:table-cell table:style-name="Taula14.A8" office:value-type="string">
            <text:p text:style-name="P28">Resultat</text:p>
          </table:table-cell>
          <table:table-cell table:style-name="Taula14.B8" office:value-type="string">
            <text:list xml:id="list1387004001" text:style-name="L5">
              <text:list-item>
                <text:p text:style-name="P426">HTTP 200 i el JSON del detall de l'anotació com a cos de la resposta.</text:p>
              </text:list-item>
              <text:list-item>
                <text:p text:style-name="P428">HTTP <text:span text:style-name="T295">401</text:span> <text:span text:style-name="T295">si l'usuari no té el rol DIS_BACKWS amb un missatge d'error com a cos de la resposta.</text:span></text:p>
              </text:list-item>
              <text:list-item>
                <text:p text:style-name="P431">HTTP 500 si es produe<text:span text:style-name="T307">i</text:span>x un error intern no controlat <text:span text:style-name="T295">consultant l'anotació</text:span>.</text:p>
              </text:list-item>
            </text:list>
            <text:p text:style-name="P207"><text:s/>Un exemple de JSON de resposta, de forma abreujada, seria el següent:</text:p>
            <text:p text:style-name="P207"/>
            <text:p text:style-name="P98">{</text:p>
            <text:p text:style-name="P102">    <text:span text:style-name="T298">"identificador"</text:span><text:span text:style-name="T296">: </text:span><text:span text:style-name="T290">"GOIBE715-DEV/2023"</text:span><text:span text:style-name="T296">,</text:span></text:p>
            <text:p text:style-name="P422">    <text:span text:style-name="T298">"procedimentCodi"</text:span><text:span text:style-name="T296">: </text:span><text:span text:style-name="T290">"703381"</text:span><text:span text:style-name="T296">,</text:span></text:p>
            <text:p text:style-name="P422">    <text:span text:style-name="T298">"</text:span><text:span text:style-name="T300">servei</text:span><text:span text:style-name="T298">Codi"</text:span><text:span text:style-name="T296">: </text:span><text:span text:style-name="T293">null</text:span><text:span text:style-name="T296">,</text:span></text:p>
            <text:p text:style-name="P422">    <text:span text:style-name="T298">"extracte"</text:span><text:span text:style-name="T296">: </text:span><text:span text:style-name="T290">"Solicitud de equivalencia - Equivalencia con los títulos de Graduado en Educación Secundaria Obligatoria y de Bachiller"</text:span><text:span text:style-name="T296">,</text:span></text:p>
            <text:p text:style-name="P102">    <text:span text:style-name="T298">"data"</text:span><text:span text:style-name="T296">: </text:span><text:span text:style-name="T301">1683181017253</text:span><text:span text:style-name="T296">,</text:span></text:p>
            <text:p text:style-name="P99"><text:s text:c="2"/>...</text:p>
            <text:p text:style-name="P102">    <text:span text:style-name="T298">"interessats"</text:span><text:span text:style-name="T296">: [</text:span></text:p>
            <text:p text:style-name="P102">        <text:span text:style-name="T296">{</text:span></text:p>
            <text:p text:style-name="P102">            <text:span text:style-name="T298">"tipus"</text:span><text:span text:style-name="T296">: </text:span><text:span text:style-name="T290">"PERSONA_FISICA"</text:span><text:span text:style-name="T296">,</text:span></text:p>
            <text:p text:style-name="P102">            <text:span text:style-name="T298">"documentTipus"</text:span><text:span text:style-name="T296">: </text:span><text:span text:style-name="T290">"NIF"</text:span><text:span text:style-name="T296">,</text:span></text:p>
            <text:p text:style-name="P102">            <text:span text:style-name="T295">...</text:span></text:p>
            <text:p text:style-name="P102">        <text:span text:style-name="T296">}</text:span></text:p>
            <text:p text:style-name="P102">    <text:span text:style-name="T296">],</text:span></text:p>
            <text:p text:style-name="P102">    <text:span text:style-name="T298">"annexos"</text:span><text:span text:style-name="T296">: [</text:span></text:p>
            <text:p text:style-name="P102">        <text:span text:style-name="T296">{</text:span></text:p>
            <text:p text:style-name="P102">            <text:span text:style-name="T298">"titol"</text:span><text:span text:style-name="T296">: </text:span><text:span text:style-name="T290">"Formulario de identificación del firmante"</text:span><text:span text:style-name="T296">,</text:span></text:p>
            <text:p text:style-name="P102">            <text:span text:style-name="T298">"nom"</text:span><text:span text:style-name="T296">: </text:span><text:span text:style-name="T290">"FORM-1-1.pdf"</text:span><text:span text:style-name="T296">,</text:span></text:p>
            <text:p text:style-name="P102">            <text:span text:style-name="T298">"contingut"</text:span><text:span text:style-name="T296">: </text:span><text:span text:style-name="T294">null</text:span><text:span text:style-name="T296">,</text:span></text:p>
            <text:p text:style-name="P102">            <text:span text:style-name="T298">"uuid"</text:span><text:span text:style-name="T296">: </text:span><text:span text:style-name="T290">"0276698a-d0f9-44f7-84be-841a98881e4a"</text:span><text:span text:style-name="T296">,</text:span></text:p>
            <text:p text:style-name="P102">            <text:span text:style-name="T297">...</text:span></text:p>
            <text:p text:style-name="P102">            <text:span text:style-name="T298">"documentValid"</text:span><text:span text:style-name="T296">: </text:span><text:span text:style-name="T294">true</text:span><text:span text:style-name="T296">,</text:span></text:p>
            <text:p text:style-name="P102">            <text:span text:style-name="T298">"documentError"</text:span><text:span text:style-name="T296">: </text:span><text:span text:style-name="T294">null</text:span><text:span text:style-name="T296">,</text:span></text:p>
            <text:p text:style-name="P102">            <text:span text:style-name="T298">"estat"</text:span><text:span text:style-name="T296">: </text:span><text:span text:style-name="T290">"DEFINITIU"</text:span></text:p>
            <text:p text:style-name="P102">        <text:span text:style-name="T296">}</text:span></text:p>
            <text:p text:style-name="P102">    <text:span text:style-name="T296">],</text:span></text:p>
            <text:p text:style-name="P102">    <text:span text:style-name="T298">"justificantFitxerArxiuUuid"</text:span><text:span text:style-name="T296">: </text:span><text:span text:style-name="T290">"0cd70aa5-77aa-4d2e-8032-d84cad38669b"</text:span><text:span text:style-name="T296">,</text:span></text:p>
            <text:p text:style-name="P102">    <text:span text:style-name="T298">"destiCodi"</text:span><text:span text:style-name="T296">: </text:span><text:span text:style-name="T290">"A04013522"</text:span><text:span text:style-name="T296">,</text:span></text:p>
            <text:p text:style-name="P102">    <text:span text:style-name="T298">"destiDescripcio"</text:span><text:span text:style-name="T296">: </text:span><text:span text:style-name="T290">"Direcció General de Planificació, Ordenació i Centres"</text:span></text:p>
            <text:p text:style-name="P103">    <text:span text:style-name="T298">"</text:span><text:span text:style-name="T299">tramitCodi</text:span><text:span text:style-name="T298">"</text:span><text:span text:style-name="T296">: </text:span><text:span text:style-name="T290">"</text:span><text:span text:style-name="T292">1234</text:span><text:span text:style-name="T290">"</text:span></text:p>
            <text:p text:style-name="P103">    <text:span text:style-name="T298">"</text:span><text:span text:style-name="T299">tramitNom</text:span><text:span text:style-name="T298">"</text:span><text:span text:style-name="T296">: </text:span><text:span text:style-name="T290">"</text:span><text:span text:style-name="T292">Nom del tràmit</text:span><text:span text:style-name="T290">"</text:span></text:p>
            <text:p text:style-name="P100">}</text:p>
            <text:p text:style-name="P200"/>
          </table:table-cell>
        </table:table-row>
      </table:table>
      <text:p text:style-name="P197"/>
      <text:p text:style-name="P208"><text:soft-page-break/>El JSON de la resposta conté les dades de l'anotació, els interessats i dels annexos. És el mapeig a JSON de les classes descrites en el punt anterior del WS d'integració. </text:p>
      <text:list xml:id="list175633782929338" text:continue-list="list175633472280346"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197"><text:span text:style-name="T302">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69">Canvi d'estat d'una anotació</text:p>
          </table:table-cell>
          <table:covered-table-cell/>
        </table:table-row>
        <table:table-row table:style-name="TableLine692022512">
          <table:table-cell table:style-name="Taula15.A2" office:value-type="string">
            <text:p text:style-name="P28">URL</text:p>
          </table:table-cell>
          <table:table-cell table:style-name="Taula15.B2" office:value-type="string">
            <text:p text:style-name="P193">http<text:span text:style-name="T320">s</text:span>://<text:span text:style-name="T320">DISTRIB_HOST/distribucioapi/interna</text:span>/<text:span text:style-name="T287">backoffice</text:span>/<text:span text:style-name="T302">canviEstat</text:span></text:p>
          </table:table-cell>
        </table:table-row>
        <table:table-row table:style-name="TableLine692022800">
          <table:table-cell table:style-name="Taula15.A7" office:value-type="string">
            <text:p text:style-name="P37">Mètode</text:p>
          </table:table-cell>
          <table:table-cell table:style-name="Taula15.B7" office:value-type="string">
            <text:p text:style-name="P209">POST</text:p>
          </table:table-cell>
        </table:table-row>
        <table:table-row table:style-name="TableLine692021648">
          <table:table-cell table:style-name="Taula15.A7" office:value-type="string">
            <text:p text:style-name="P28">Descripció</text:p>
          </table:table-cell>
          <table:table-cell table:style-name="Taula15.B7" office:value-type="string">
            <text:p text:style-name="P43">Canvia l'estat d'una anotació de registre enviada a backoffice.<text:span text:style-name="T288"> </text:span></text:p>
          </table:table-cell>
        </table:table-row>
        <table:table-row table:style-name="TableLine692021360">
          <table:table-cell table:style-name="Taula15.A7" office:value-type="string">
            <text:p text:style-name="P35">Autenticació</text:p>
          </table:table-cell>
          <table:table-cell table:style-name="Taula15.B7" office:value-type="string">
            <text:p text:style-name="P367">HTTP Basic</text:p>
          </table:table-cell>
        </table:table-row>
        <table:table-row table:style-name="TableLine692020784">
          <table:table-cell table:style-name="Taula15.A7" office:value-type="string">
            <text:p text:style-name="P35">Rols requerits</text:p>
          </table:table-cell>
          <table:table-cell table:style-name="Taula15.B7" office:value-type="string">
            <text:p text:style-name="P367">DIS_BACKWS</text:p>
          </table:table-cell>
        </table:table-row>
        <table:table-row table:style-name="TableLine692020496">
          <table:table-cell table:style-name="Taula15.A7" office:value-type="string">
            <text:p text:style-name="P28">Paràmetres</text:p>
          </table:table-cell>
          <table:table-cell table:style-name="Taula15.B7" office:value-type="string">
            <text:p text:style-name="P190"><text:s/>En aquest cas <text:span text:style-name="T303">la petició es passa com a un objecte JSON en el cos de la petició POST on s'ha d</text:span><text:span text:style-name="T308">'</text:span><text:span text:style-name="T303">especificar l'identificador amb la clau, l'estat i les observacions. Els paràmetres serien els següents:</text:span></text:p>
            <text:p text:style-name="P190"/>
            <text:list xml:id="list175634167858724" text:continue-list="list3260885523" text:style-name="L4">
              <text:list-item>
                <text:p text:style-name="P436">id:</text:p>
                <text:list>
                  <text:list-item>
                    <text:p text:style-name="P423"><text:span text:style-name="T44">identificador</text:span><text:span text:style-name="T281">:</text:span><text:span text:style-name="T288"> És l'identificador de l'anotació comunicada per DISTRIBUCIO. Típicament sol ser el número de registre de l'anotació.</text:span><text:span text:style-name="T304"> Format String, dada obligatòria.</text:span></text:p>
                  </text:list-item>
                  <text:list-item>
                    <text:p text:style-name="P423"><text:span text:style-name="T43">clauAcces</text:span><text:span text:style-name="T281">: </text:span><text:span text:style-name="T288">És una clau proporcionada per DISTRIBUCIO en el moment de notificar al backoffice l'anotació de registre que s'ha d'emprar per consultar o canviar l'estat a l'anotació</text:span><text:span text:style-name="T304">. Format String, dada o</text:span><text:span text:style-name="T308">b</text:span><text:span text:style-name="T304">li</text:span><text:span text:style-name="T308">g</text:span><text:span text:style-name="T304">atòria</text:span><text:span text:style-name="T288">.</text:span></text:p>
                  </text:list-item>
                </text:list>
              </text:list-item>
              <text:list-item>
                <text:p text:style-name="P436">estat:<text:span text:style-name="T304"> </text:span><text:span text:style-name="T214">Codi del nou estat a comunicar a DISTRIBUCIO per l'anotació. S'ha d'informar en fo</text:span><text:span text:style-name="T215">r</text:span><text:span text:style-name="T214">mat String i és una dada obligatòria. Els possibles estats són:</text:span></text:p>
                <text:list>
                  <text:list-item>
                    <text:p text:style-name="P438">REBUDA: Indica a DISTRIBUCIO que pot marcar l'anotació com a rebuda al backoffice.</text:p>
                  </text:list-item>
                  <text:list-item>
                    <text:p text:style-name="P438">PROCESSADA: <text:span text:style-name="T308">Marca l'anotació </text:span>l'anotació <text:span text:style-name="T308">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08">n</text:span>t de l'Arxiu de l'expedient del backoffice.</text:p>
                  </text:list-item>
                  <text:list-item>
                    <text:p text:style-name="P438">REBUTJADA: Marca l'anotació com a rebutjada pel backoffice. Aquesta apareixerà com a<text:span text:style-name="T308"> rebutjada pel backoffice </text:span>a DISTRIBUCIO <text:span text:style-name="T308">amb el comentari que s'hagi informat</text:span>.<text:span text:style-name="T308"> </text:span></text:p>
                  </text:list-item>
                  <text:list-item>
                    <text:p text:style-name="P438">ERROR: Marca l'anotació com a processada amb error al BACKOFFICE. Aquestes anotacions apareixeran en el llistat d'anotacions pendents i pot ser que es reenviïn cap al backoffice per reintentar el <text:soft-page-break/>processament.</text:p>
                  </text:list-item>
                </text:list>
              </text:list-item>
              <text:list-item>
                <text:p text:style-name="P436">observacions:<text:span text:style-name="T304"> </text:span><text:span text:style-name="T214">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3"/>
            <text:p text:style-name="P43"><text:span text:style-name="T288"><text:s/>Un exemple de petició seria el següent. </text:span><text:span text:style-name="T289">Pels paràmetres identificador: </text:span><text:span text:style-name="T291">"GOIBE1682590959780/2023"</text:span><text:span text:style-name="T289"> i clau d'accés </text:span><text:span text:style-name="T291">"RfG3stK7Bc7JmuOk+riod/uOnBNGUEPqZt6+1/HiTlc="</text:span><text:span text:style-name="T289"> la petició amb els paràmetres</text:span><text:span text:style-name="T303"> en el cos de la petició POST com a JSON</text:span><text:span text:style-name="T289"> seria:</text:span></text:p>
            <text:p text:style-name="P202">POST</text:p>
            <text:p text:style-name="P97">{</text:p>
            <text:p text:style-name="P101">  <text:span text:style-name="T298">"id"</text:span><text:span text:style-name="T296">: {</text:span></text:p>
            <text:p text:style-name="P101">    <text:span text:style-name="T298">"indetificador"</text:span><text:span text:style-name="T296">: </text:span><text:span text:style-name="T290">"GOIBE1682590959780/2023"</text:span><text:span text:style-name="T296">,</text:span></text:p>
            <text:p text:style-name="P101">    <text:span text:style-name="T298">"clauAcces"</text:span><text:span text:style-name="T296">: </text:span><text:span text:style-name="T290">"RfG3stK7Bc7JmuOk+riod/uOnBNGUEPqZt6+1/HiTlc="</text:span></text:p>
            <text:p text:style-name="P101">  <text:span text:style-name="T296">},</text:span></text:p>
            <text:p text:style-name="P101">  <text:span text:style-name="T298">"estat"</text:span><text:span text:style-name="T296">: </text:span><text:span text:style-name="T290">"PROCESSADA"</text:span><text:span text:style-name="T296">,</text:span></text:p>
            <text:p text:style-name="P101">  <text:span text:style-name="T298">"observacions"</text:span><text:span text:style-name="T296">: </text:span><text:span text:style-name="T290">"S'ha creat l'expedient 123/2023"</text:span></text:p>
            <text:p text:style-name="P96">}</text:p>
            <text:p text:style-name="P199"/>
          </table:table-cell>
        </table:table-row>
        <table:table-row table:style-name="TableLine692019920">
          <table:table-cell table:style-name="Taula15.A8" office:value-type="string">
            <text:p text:style-name="P28">Resultat</text:p>
          </table:table-cell>
          <table:table-cell table:style-name="Taula15.B8" office:value-type="string">
            <text:list xml:id="list2952368555" text:style-name="L6">
              <text:list-item>
                <text:p text:style-name="P427">HTTP 200 <text:span text:style-name="T305">si la petició s'ha processat correctament.</text:span></text:p>
              </text:list-item>
              <text:list-item>
                <text:p text:style-name="P432">HTTP 500 si es produeix un error intern no controlat <text:span text:style-name="T295">consultant l'anotació</text:span>.<text:span text:style-name="T305"> Com a cos de la resposta es retorna el missatge de confirmació.</text:span></text:p>
              </text:list-item>
            </text:list>
          </table:table-cell>
        </table:table-row>
      </table:table>
      <text:p text:style-name="P208"/>
      <text:list xml:id="list175633265423714" text:continue-list="list175633782929338" text:style-name="Outline">
        <text:list-item>
          <text:list>
            <text:list-item>
              <text:h text:style-name="P408" text:outline-level="2"><text:bookmark-start text:name="Còpia de Còpia de Còpia de __RefHeading___Toc16772_2313926538 2 1 3"/><text:bookmark-start text:name="__RefHeading___Toc227361_390838441"/><text:bookmark-start text:name="Còpia de Còpia de Còpia de __RefNumPara__80988_1680181998 2 1 3"/>Model de dades<text:bookmark-end text:name="Còpia de Còpia de Còpia de __RefHeading___Toc16772_2313926538 2 1 3"/><text:bookmark-end text:name="__RefHeading___Toc227361_390838441"/><text:bookmark-end text:name="Còpia de Còpia de Còpia de __RefNumPara__80988_1680181998 2 1 3"/></text:h>
            </text:list-item>
          </text:list>
        </text:list-item>
      </text:list>
      <text:p text:style-name="P219">A continuació es mostra el diagrama de classes amb els detalls de l’objecte AnotacioRegistreEntrada:</text:p>
      <text:p text:style-name="P157"><text:soft-page-break/><draw:frame draw:style-name="fr8" draw:name="Imagen2" text:anchor-type="as-char" svg:width="17cm" svg:height="8.916cm" draw:z-index="75"><draw:image xlink:href="Pictures/10000001000004D90000028BF0E68F0B66FAEA61.png" xlink:type="simple" xlink:show="embed" xlink:actuate="onLoad" draw:mime-type="image/png"/></draw:frame></text:p>
      <text:p text:style-name="P134"/>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692027120">
          <table:table-cell table:style-name="Taula4.A1" table:number-columns-spanned="5" office:value-type="string">
            <text:p text:style-name="P138">annex</text:p>
          </table:table-cell>
          <table:covered-table-cell/>
          <table:covered-table-cell/>
          <table:covered-table-cell/>
          <table:covered-table-cell/>
        </table:table-row>
        <table:table-row table:style-name="TableLine692028272">
          <table:table-cell table:style-name="Taula4.A2" office:value-type="string">
            <text:p text:style-name="P32">Nom del camp</text:p>
          </table:table-cell>
          <table:table-cell table:style-name="Taula4.A2" office:value-type="string">
            <text:p text:style-name="P32">Tipus</text:p>
          </table:table-cell>
          <table:table-cell table:style-name="Taula4.A2" office:value-type="string">
            <text:p text:style-name="P32">Mult.</text:p>
          </table:table-cell>
          <table:table-cell table:style-name="Taula4.A2" office:value-type="string">
            <text:p text:style-name="P34">Tamany</text:p>
          </table:table-cell>
          <table:table-cell table:style-name="Taula4.E2" office:value-type="string">
            <text:p text:style-name="P34">Descripció</text:p>
          </table:table-cell>
        </table:table-row>
        <table:table-row table:style-name="TableLine692026256">
          <table:table-cell table:style-name="Taula4.A3" office:value-type="string">
            <text:p text:style-name="P312">contingut</text:p>
          </table:table-cell>
          <table:table-cell table:style-name="Taula4.A3" office:value-type="string">
            <text:p text:style-name="P295">Byte[]</text:p>
          </table:table-cell>
          <table:table-cell table:style-name="Taula4.A3" office:value-type="string">
            <text:p text:style-name="P254">0..1</text:p>
          </table:table-cell>
          <table:table-cell table:style-name="Taula4.A3" office:value-type="string">
            <text:p text:style-name="P313">var</text:p>
          </table:table-cell>
          <table:table-cell table:style-name="Taula4.E3" office:value-type="string">
            <text:p text:style-name="P298">Cadena de bytes que componen el contingut del fitxer de firma annex si n’hi ha. <text:span text:style-name="T103">És obligatori si el tipus de firma és TF04.</text:span></text:p>
          </table:table-cell>
        </table:table-row>
        <table:table-row table:style-name="TableLine692024240">
          <table:table-cell table:style-name="Taula4.A3" office:value-type="string">
            <text:p text:style-name="P315">firmaContingut</text:p>
          </table:table-cell>
          <table:table-cell table:style-name="Taula4.A3" office:value-type="string">
            <text:p text:style-name="P295">Byte[]</text:p>
          </table:table-cell>
          <table:table-cell table:style-name="Taula4.A3" office:value-type="string">
            <text:p text:style-name="P254">0..1</text:p>
          </table:table-cell>
          <table:table-cell table:style-name="Taula4.A3" office:value-type="string">
            <text:p text:style-name="P360">var</text:p>
          </table:table-cell>
          <table:table-cell table:style-name="Taula4.E3" office:value-type="string">
            <text:p text:style-name="P298">Cadena de bytes que componen el contingut del fitxer de firma annex si n’hi ha. <text:span text:style-name="T103">És obligatori si el tipus de firma és TF04.</text:span> </text:p>
          </table:table-cell>
        </table:table-row>
        <table:table-row table:style-name="TableLine692023952">
          <table:table-cell table:style-name="Taula4.A3" office:value-type="string">
            <text:p text:style-name="P315">firmaNom</text:p>
          </table:table-cell>
          <table:table-cell table:style-name="Taula4.A3" office:value-type="string">
            <text:p text:style-name="P316">Cadena</text:p>
          </table:table-cell>
          <table:table-cell table:style-name="Taula4.A3" office:value-type="string">
            <text:p text:style-name="P254">0..1</text:p>
          </table:table-cell>
          <table:table-cell table:style-name="Taula4.A3" office:value-type="string">
            <text:p text:style-name="P313">256</text:p>
          </table:table-cell>
          <table:table-cell table:style-name="Taula4.E3" office:value-type="string">
            <text:p text:style-name="P262"><text:s/><text:span text:style-name="T272">Nom del fitxer de la firma de l’annex si n’hi ha. És obligatori si el tipus de firma és TF04.</text:span></text:p>
          </table:table-cell>
        </table:table-row>
        <table:table-row table:style-name="TableLine692023664">
          <table:table-cell table:style-name="Taula4.A3" office:value-type="string">
            <text:p text:style-name="P315">firmaPerfil</text:p>
          </table:table-cell>
          <table:table-cell table:style-name="Taula4.A3" office:value-type="string">
            <text:p text:style-name="P316">firmaPerfil</text:p>
          </table:table-cell>
          <table:table-cell table:style-name="Taula4.A3" office:value-type="string">
            <text:p text:style-name="P258">0..1</text:p>
          </table:table-cell>
          <table:table-cell table:style-name="Taula4.A3" office:value-type="string">
            <text:p text:style-name="P313">30</text:p>
          </table:table-cell>
          <table:table-cell table:style-name="Taula4.E3" office:value-type="string">
            <text:p text:style-name="P314">Codi de perfil de la firma. </text:p>
          </table:table-cell>
        </table:table-row>
        <table:table-row table:style-name="TableLine692036048">
          <table:table-cell table:style-name="Taula4.A3" office:value-type="string">
            <text:p text:style-name="P315">firmaTamany</text:p>
          </table:table-cell>
          <table:table-cell table:style-name="Taula4.A3" office:value-type="string">
            <text:p text:style-name="P285">Numèric</text:p>
          </table:table-cell>
          <table:table-cell table:style-name="Taula4.A3" office:value-type="string">
            <text:p text:style-name="P269"/>
          </table:table-cell>
          <table:table-cell table:style-name="Taula4.A3" office:value-type="string">
            <text:p text:style-name="P353"/>
          </table:table-cell>
          <table:table-cell table:style-name="Taula4.E3" office:value-type="string">
            <text:p text:style-name="P260"/>
          </table:table-cell>
        </table:table-row>
        <table:table-row table:style-name="TableLine692032304">
          <table:table-cell table:style-name="Taula4.A3" office:value-type="string">
            <text:p text:style-name="P315">firmaTipus</text:p>
          </table:table-cell>
          <table:table-cell table:style-name="Taula4.A3" office:value-type="string">
            <text:p text:style-name="P316">firmaTipus</text:p>
          </table:table-cell>
          <table:table-cell table:style-name="Taula4.A3" office:value-type="string">
            <text:p text:style-name="P258">0..1</text:p>
          </table:table-cell>
          <table:table-cell table:style-name="Taula4.A3" office:value-type="string">
            <text:p text:style-name="P361">30</text:p>
          </table:table-cell>
          <table:table-cell table:style-name="Taula4.E3" office:value-type="string">
            <text:p text:style-name="P317">Codi del tipus de firma. </text:p>
          </table:table-cell>
        </table:table-row>
        <table:table-row table:style-name="TableLine692032016">
          <table:table-cell table:style-name="Taula4.A3" office:value-type="string">
            <text:p text:style-name="P315">firmaTipusMime</text:p>
          </table:table-cell>
          <table:table-cell table:style-name="Taula4.A3" office:value-type="string">
            <text:p text:style-name="P270">Cadena</text:p>
          </table:table-cell>
          <table:table-cell table:style-name="Taula4.A3" office:value-type="string">
            <text:p text:style-name="P258">0..1</text:p>
          </table:table-cell>
          <table:table-cell table:style-name="Taula4.A3" office:value-type="string">
            <text:p text:style-name="P361">30</text:p>
          </table:table-cell>
          <table:table-cell table:style-name="Taula4.E3" office:value-type="string">
            <text:p text:style-name="P317">Tipus MIME del fitxer de firma annexat si n’hi ha. És obligatori si el tipus de firma és TF04.</text:p>
          </table:table-cell>
        </table:table-row>
        <table:table-row table:style-name="TableLine692030000">
          <table:table-cell table:style-name="Taula4.A3" office:value-type="string">
            <text:p text:style-name="P315">nom</text:p>
          </table:table-cell>
          <table:table-cell table:style-name="Taula4.A3" office:value-type="string">
            <text:p text:style-name="P270">Cadena</text:p>
          </table:table-cell>
          <table:table-cell table:style-name="Taula4.A3" office:value-type="string">
            <text:p text:style-name="P269"><text:span text:style-name="T267">0..</text:span>1</text:p>
          </table:table-cell>
          <table:table-cell table:style-name="Taula4.A3" office:value-type="string">
            <text:p text:style-name="P318">256</text:p>
          </table:table-cell>
          <table:table-cell table:style-name="Taula4.E3" office:value-type="string">
            <text:p text:style-name="P317">Nom del fitxer annexat. </text:p>
          </table:table-cell>
        </table:table-row>
        <table:table-row table:style-name="TableLine692035760">
          <table:table-cell table:style-name="Taula4.A3" office:value-type="string">
            <text:p text:style-name="P315">ntiEstadoElaboracion</text:p>
          </table:table-cell>
          <table:table-cell table:style-name="Taula4.A3" office:value-type="string">
            <text:p text:style-name="P316">ntiEstadoElaboracion</text:p>
          </table:table-cell>
          <table:table-cell table:style-name="Taula4.A3" office:value-type="string">
            <text:p text:style-name="P258">0..1</text:p>
          </table:table-cell>
          <table:table-cell table:style-name="Taula4.A3" office:value-type="string">
            <text:p text:style-name="P318">4</text:p>
          </table:table-cell>
          <table:table-cell table:style-name="Taula4.E3" office:value-type="string">
            <text:p text:style-name="P317">Codi de la metadata estat elaboració de la NTI de document electrònic. </text:p>
          </table:table-cell>
        </table:table-row>
        <table:table-row table:style-name="TableLine692035472">
          <table:table-cell table:style-name="Taula4.A3" office:value-type="string">
            <text:p text:style-name="P315">ntiFechaCaptura</text:p>
          </table:table-cell>
          <table:table-cell table:style-name="Taula4.A3" office:value-type="string">
            <text:p text:style-name="P316">dateTime</text:p>
          </table:table-cell>
          <table:table-cell table:style-name="Taula4.A3" office:value-type="string">
            <text:p text:style-name="P258">0..1</text:p>
          </table:table-cell>
          <table:table-cell table:style-name="Taula4.A3" office:value-type="string">
            <text:p text:style-name="P318">14</text:p>
          </table:table-cell>
          <table:table-cell table:style-name="Taula4.E3" office:value-type="string">
            <text:p text:style-name="P289">Data de captura del document.</text:p>
          </table:table-cell>
        </table:table-row>
        <table:table-row table:style-name="TableLine692035184">
          <table:table-cell table:style-name="Taula4.A3" office:value-type="string">
            <text:p text:style-name="P319">ntiOrigen</text:p>
          </table:table-cell>
          <table:table-cell table:style-name="Taula4.A3" office:value-type="string">
            <text:p text:style-name="P320">ntiOrigen</text:p>
          </table:table-cell>
          <table:table-cell table:style-name="Taula4.A3" office:value-type="string">
            <text:p text:style-name="P258">0..1</text:p>
          </table:table-cell>
          <table:table-cell table:style-name="Taula4.A3" office:value-type="string">
            <text:p text:style-name="P318">10</text:p>
          </table:table-cell>
          <table:table-cell table:style-name="Taula4.E3" office:value-type="string">
            <text:p text:style-name="P260">Codi de la metadada origen de la NTI de document electrònic.</text:p>
          </table:table-cell>
        </table:table-row>
        <table:table-row table:style-name="TableLine692034896">
          <table:table-cell table:style-name="Taula4.A3" office:value-type="string">
            <text:p text:style-name="P319">ntiTipoDocumental</text:p>
          </table:table-cell>
          <table:table-cell table:style-name="Taula4.A3" office:value-type="string">
            <text:p text:style-name="P320">ntiTipoDocumento</text:p>
          </table:table-cell>
          <table:table-cell table:style-name="Taula4.A3" office:value-type="string">
            <text:p text:style-name="P269"><text:span text:style-name="T268">0..</text:span>1</text:p>
          </table:table-cell>
          <table:table-cell table:style-name="Taula4.A3" office:value-type="string">
            <text:p text:style-name="P318">255</text:p>
          </table:table-cell>
          <table:table-cell table:style-name="Taula4.E3" office:value-type="string">
            <text:p text:style-name="P260">Codi de la metadada tipus <text:soft-page-break/>documental de la NTI de document electrònic.</text:p>
          </table:table-cell>
        </table:table-row>
        <table:table-row table:style-name="TableLine692034608">
          <table:table-cell table:style-name="Taula4.A3" office:value-type="string">
            <text:p text:style-name="P319">observacions</text:p>
          </table:table-cell>
          <table:table-cell table:style-name="Taula4.A3" office:value-type="string">
            <text:p text:style-name="P270">Cadena</text:p>
          </table:table-cell>
          <table:table-cell table:style-name="Taula4.A3" office:value-type="string">
            <text:p text:style-name="P258">0..1</text:p>
          </table:table-cell>
          <table:table-cell table:style-name="Taula4.A3" office:value-type="string">
            <text:p text:style-name="P82">50</text:p>
          </table:table-cell>
          <table:table-cell table:style-name="Taula4.E3" office:value-type="string">
            <text:p text:style-name="P293">Observacions a destacar sobre la informació annexada.</text:p>
          </table:table-cell>
        </table:table-row>
        <table:table-row table:style-name="TableLine692034320">
          <table:table-cell table:style-name="Taula4.A3" office:value-type="string">
            <text:p text:style-name="P319">sicresTipoDocumento</text:p>
          </table:table-cell>
          <table:table-cell table:style-name="Taula4.A3" office:value-type="string">
            <text:p text:style-name="P320">sicresTipoDocumento</text:p>
          </table:table-cell>
          <table:table-cell table:style-name="Taula4.A3" office:value-type="string">
            <text:p text:style-name="P269"><text:span text:style-name="T268">0..</text:span>1</text:p>
          </table:table-cell>
          <table:table-cell table:style-name="Taula4.A3" office:value-type="string">
            <text:p text:style-name="P318">2</text:p>
          </table:table-cell>
          <table:table-cell table:style-name="Taula4.E3" office:value-type="string">
            <text:p text:style-name="P260">Codi SICRES del segment Anexo – tipo de documento.</text:p>
          </table:table-cell>
        </table:table-row>
        <table:table-row table:style-name="TableLine692034032">
          <table:table-cell table:style-name="Taula4.A3" office:value-type="string">
            <text:p text:style-name="P319">sicresValidezDocumento</text:p>
          </table:table-cell>
          <table:table-cell table:style-name="Taula4.A3" office:value-type="string">
            <text:p text:style-name="P320">sicresValidezDocumento</text:p>
          </table:table-cell>
          <table:table-cell table:style-name="Taula4.A3" office:value-type="string">
            <text:p text:style-name="P269"><text:span text:style-name="T117">0..</text:span>1</text:p>
          </table:table-cell>
          <table:table-cell table:style-name="Taula4.A3" office:value-type="string">
            <text:p text:style-name="P265"/>
          </table:table-cell>
          <table:table-cell table:style-name="Taula4.E3" office:value-type="string">
            <text:p text:style-name="P272"/>
          </table:table-cell>
        </table:table-row>
        <table:table-row table:style-name="TableLine692033744">
          <table:table-cell table:style-name="Taula4.A3" office:value-type="string">
            <text:p text:style-name="P319">tamany</text:p>
          </table:table-cell>
          <table:table-cell table:style-name="Taula4.A3" office:value-type="string">
            <text:p text:style-name="P320">numèric</text:p>
          </table:table-cell>
          <table:table-cell table:style-name="Taula4.A3" office:value-type="string">
            <text:p text:style-name="P258"/>
          </table:table-cell>
          <table:table-cell table:style-name="Taula4.A3" office:value-type="string">
            <text:p text:style-name="P274"/>
          </table:table-cell>
          <table:table-cell table:style-name="Taula4.E3" office:value-type="string">
            <text:p text:style-name="P317">Tamany en bytes del fitxer annexat. </text:p>
          </table:table-cell>
        </table:table-row>
        <table:table-row table:style-name="TableLine692033456">
          <table:table-cell table:style-name="Taula4.A3" office:value-type="string">
            <text:p text:style-name="P319">tipusMime</text:p>
          </table:table-cell>
          <table:table-cell table:style-name="Taula4.A3" office:value-type="string">
            <text:p text:style-name="P270">Cadena</text:p>
          </table:table-cell>
          <table:table-cell table:style-name="Taula4.A3" office:value-type="string">
            <text:p text:style-name="P258">0..1</text:p>
          </table:table-cell>
          <table:table-cell table:style-name="Taula4.A3" office:value-type="string">
            <text:p text:style-name="P318">30</text:p>
          </table:table-cell>
          <table:table-cell table:style-name="Taula4.E3" office:value-type="string">
            <text:p text:style-name="P289">Tipus MIME del fitxer annexat.</text:p>
          </table:table-cell>
        </table:table-row>
        <table:table-row table:style-name="TableLine692033168">
          <table:table-cell table:style-name="Taula4.A3" office:value-type="string">
            <text:p text:style-name="P319">titol</text:p>
          </table:table-cell>
          <table:table-cell table:style-name="Taula4.A3" office:value-type="string">
            <text:p text:style-name="P270">Cadena</text:p>
          </table:table-cell>
          <table:table-cell table:style-name="Taula4.A3" office:value-type="string">
            <text:p text:style-name="P258">0..1</text:p>
          </table:table-cell>
          <table:table-cell table:style-name="Taula4.A3" office:value-type="string">
            <text:p text:style-name="P361">200</text:p>
          </table:table-cell>
          <table:table-cell table:style-name="Taula4.E3" office:value-type="string">
            <text:p text:style-name="P317">Títol del document. </text:p>
          </table:table-cell>
        </table:table-row>
        <table:table-row table:style-name="TableLine692032880">
          <table:table-cell table:style-name="Taula4.A3" office:value-type="string">
            <text:p text:style-name="P319">uuid</text:p>
          </table:table-cell>
          <table:table-cell table:style-name="Taula4.A3" office:value-type="string">
            <text:p text:style-name="P270">Cadena</text:p>
          </table:table-cell>
          <table:table-cell table:style-name="Taula4.A3" office:value-type="string">
            <text:p text:style-name="P258">0..1</text:p>
          </table:table-cell>
          <table:table-cell table:style-name="Taula4.A3" office:value-type="string">
            <text:p text:style-name="P318">256</text:p>
          </table:table-cell>
          <table:table-cell table:style-name="Taula4.E3" office:value-type="string">
            <text:p text:style-name="P317">Uuid de l’arxiu digital si s’escau. </text:p>
          </table:table-cell>
        </table:table-row>
      </table:table>
      <text:p text:style-name="P134"/>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692032592">
          <table:table-cell table:style-name="Taula7.A1" table:number-columns-spanned="5" office:value-type="string">
            <text:p text:style-name="P139">anotacioRegistreBase</text:p>
          </table:table-cell>
          <table:covered-table-cell/>
          <table:covered-table-cell/>
          <table:covered-table-cell/>
          <table:covered-table-cell/>
        </table:table-row>
        <table:table-row table:style-name="TableLine692031440">
          <table:table-cell table:style-name="Taula7.A2" office:value-type="string">
            <text:p text:style-name="P32">Nom del camp</text:p>
          </table:table-cell>
          <table:table-cell table:style-name="Taula7.A2" office:value-type="string">
            <text:p text:style-name="P32">Tipus</text:p>
          </table:table-cell>
          <table:table-cell table:style-name="Taula7.A2" office:value-type="string">
            <text:p text:style-name="P32">Mult.</text:p>
          </table:table-cell>
          <table:table-cell table:style-name="Taula7.A2" office:value-type="string">
            <text:p text:style-name="P34">Tamany</text:p>
          </table:table-cell>
          <table:table-cell table:style-name="Taula7.E2" office:value-type="string">
            <text:p text:style-name="P34">Descripció</text:p>
          </table:table-cell>
        </table:table-row>
        <table:table-row table:style-name="TableLine691960304">
          <table:table-cell table:style-name="Taula7.A3" office:value-type="string">
            <text:p text:style-name="P319">annexos</text:p>
          </table:table-cell>
          <table:table-cell table:style-name="Taula7.A3" office:value-type="string">
            <text:p text:style-name="P320">annex</text:p>
          </table:table-cell>
          <table:table-cell table:style-name="Taula7.A3" office:value-type="string">
            <text:p text:style-name="P254">0..*</text:p>
          </table:table-cell>
          <table:table-cell table:style-name="Taula7.D3">
            <text:p text:style-name="P254"/>
          </table:table-cell>
          <table:table-cell table:style-name="Taula7.E4" office:value-type="string">
            <text:p text:style-name="P322">Annex al que fa referència amb les seves propietats. </text:p>
          </table:table-cell>
        </table:table-row>
        <table:table-row table:style-name="TableLine692037776">
          <table:table-cell table:style-name="Taula7.A3" office:value-type="string">
            <text:p text:style-name="P319">aplicacioCodi</text:p>
          </table:table-cell>
          <table:table-cell table:style-name="Taula7.A3" office:value-type="string">
            <text:p text:style-name="P320">Cadena</text:p>
          </table:table-cell>
          <table:table-cell table:style-name="Taula7.A3" office:value-type="string">
            <text:p text:style-name="P254">0..1</text:p>
          </table:table-cell>
          <table:table-cell table:style-name="Taula7.D3" office:value-type="float" office:value="255">
            <text:p text:style-name="P362">255</text:p>
          </table:table-cell>
          <table:table-cell table:style-name="Taula7.E4" office:value-type="string">
            <text:p text:style-name="P322">Codi de l’aplicació que fa l’enviament de l’assentament registral. </text:p>
          </table:table-cell>
        </table:table-row>
        <table:table-row table:style-name="TableLine692045264">
          <table:table-cell table:style-name="Taula7.A3" office:value-type="string">
            <text:p text:style-name="P319">aplicacioVersio</text:p>
          </table:table-cell>
          <table:table-cell table:style-name="Taula7.A3" office:value-type="string">
            <text:p text:style-name="P316">Cadena</text:p>
          </table:table-cell>
          <table:table-cell table:style-name="Taula7.A3" office:value-type="string">
            <text:p text:style-name="P254">0..1</text:p>
          </table:table-cell>
          <table:table-cell table:style-name="Taula7.A3" office:value-type="string">
            <text:p text:style-name="P323">255</text:p>
          </table:table-cell>
          <table:table-cell table:style-name="Taula7.E5" office:value-type="string">
            <text:p text:style-name="P262"><text:s/><text:span text:style-name="T100">Versió de l’aplicació que fa l’enviament de l’assentament registral.</text:span></text:p>
          </table:table-cell>
        </table:table-row>
        <table:table-row table:style-name="TableLine692044400">
          <table:table-cell table:style-name="Taula7.A3" office:value-type="string">
            <text:p text:style-name="P319">assumpteCodiCodi</text:p>
          </table:table-cell>
          <table:table-cell table:style-name="Taula7.A3" office:value-type="string">
            <text:p text:style-name="P320">Cadena</text:p>
          </table:table-cell>
          <table:table-cell table:style-name="Taula7.A3" office:value-type="string">
            <text:p text:style-name="P258">0..1</text:p>
          </table:table-cell>
          <table:table-cell table:style-name="Taula7.A3" office:value-type="string">
            <text:p text:style-name="P323">16</text:p>
          </table:table-cell>
          <table:table-cell table:style-name="Taula7.E6" office:value-type="string">
            <text:p text:style-name="P272">Codi de l’ass<text:span text:style-name="T273">umpte</text:span>.</text:p>
          </table:table-cell>
        </table:table-row>
        <table:table-row table:style-name="TableLine692043824">
          <table:table-cell table:style-name="Taula7.A3" office:value-type="string">
            <text:p text:style-name="P319">assumpteCodiDescripcio</text:p>
          </table:table-cell>
          <table:table-cell table:style-name="Taula7.A3" office:value-type="string">
            <text:p text:style-name="P320">Cadena</text:p>
          </table:table-cell>
          <table:table-cell table:style-name="Taula7.A3" office:value-type="string">
            <text:p text:style-name="P321">0..1</text:p>
          </table:table-cell>
          <table:table-cell table:style-name="Taula7.A3" office:value-type="string">
            <text:p text:style-name="P362">255</text:p>
          </table:table-cell>
          <table:table-cell table:style-name="Taula7.E7" office:value-type="string">
            <text:p text:style-name="P272">Denominació de l’assumpte.</text:p>
          </table:table-cell>
        </table:table-row>
        <table:table-row table:style-name="TableLine692043248">
          <table:table-cell table:style-name="Taula7.A3" office:value-type="string">
            <text:p text:style-name="P324">assumpteTipusCodi</text:p>
          </table:table-cell>
          <table:table-cell table:style-name="Taula7.A3" office:value-type="string">
            <text:p text:style-name="P325">Cadena</text:p>
          </table:table-cell>
          <table:table-cell table:style-name="Taula7.A3" office:value-type="string">
            <text:p text:style-name="P258">0..1</text:p>
          </table:table-cell>
          <table:table-cell table:style-name="Taula7.A3" office:value-type="string">
            <text:p text:style-name="P362">16</text:p>
          </table:table-cell>
          <table:table-cell table:style-name="Taula7.E8" office:value-type="string">
            <text:p text:style-name="P322">Codi de l’assumpte. </text:p>
          </table:table-cell>
        </table:table-row>
        <table:table-row table:style-name="TableLine692042672">
          <table:table-cell table:style-name="Taula7.A3" office:value-type="string">
            <text:p text:style-name="P324">assumpteTipusDescripcio</text:p>
          </table:table-cell>
          <table:table-cell table:style-name="Taula7.A3" office:value-type="string">
            <text:p text:style-name="P270">Cadena</text:p>
          </table:table-cell>
          <table:table-cell table:style-name="Taula7.A3" office:value-type="string">
            <text:p text:style-name="P258">0..1</text:p>
          </table:table-cell>
          <table:table-cell table:style-name="Taula7.A3" office:value-type="string">
            <text:p text:style-name="P362">100</text:p>
          </table:table-cell>
          <table:table-cell table:style-name="Taula7.E9" office:value-type="string">
            <text:p text:style-name="P272">Denominació del tipus d’assumpte de l’assentament registral.</text:p>
          </table:table-cell>
        </table:table-row>
        <table:table-row table:style-name="TableLine692042096">
          <table:table-cell table:style-name="Taula7.A3" office:value-type="string">
            <text:p text:style-name="P324">data</text:p>
          </table:table-cell>
          <table:table-cell table:style-name="Taula7.A3" office:value-type="string">
            <text:p text:style-name="P325">dateTime</text:p>
          </table:table-cell>
          <table:table-cell table:style-name="Taula7.A3" office:value-type="string">
            <text:p text:style-name="P269"><text:span text:style-name="T267">0..</text:span>1</text:p>
          </table:table-cell>
          <table:table-cell table:style-name="Taula7.A3" office:value-type="string">
            <text:p text:style-name="P323">14</text:p>
          </table:table-cell>
          <table:table-cell table:style-name="Taula7.E10" office:value-type="string">
            <text:p text:style-name="P322">Data de l’assentament. </text:p>
          </table:table-cell>
        </table:table-row>
        <table:table-row table:style-name="TableLine692041520">
          <table:table-cell table:style-name="Taula7.A3" office:value-type="string">
            <text:p text:style-name="P324">docFisicaCodi</text:p>
          </table:table-cell>
          <table:table-cell table:style-name="Taula7.A3" office:value-type="string">
            <text:p text:style-name="P325">Cadena</text:p>
          </table:table-cell>
          <table:table-cell table:style-name="Taula7.A3" office:value-type="string">
            <text:p text:style-name="P258">0..1</text:p>
          </table:table-cell>
          <table:table-cell table:style-name="Taula7.A3" office:value-type="string">
            <text:p text:style-name="P323">19</text:p>
          </table:table-cell>
          <table:table-cell table:style-name="Taula7.E11" office:value-type="string">
            <text:p text:style-name="P262">Codi SICRES del segment internos – Documentación física y/o soportes.</text:p>
          </table:table-cell>
        </table:table-row>
        <table:table-row table:style-name="TableLine692040944">
          <table:table-cell table:style-name="Taula7.A3" office:value-type="string">
            <text:p text:style-name="P324">docFisicaDescripcio</text:p>
          </table:table-cell>
          <table:table-cell table:style-name="Taula7.A3" office:value-type="string">
            <text:p text:style-name="P325">Cadena</text:p>
          </table:table-cell>
          <table:table-cell table:style-name="Taula7.A3" office:value-type="string">
            <text:p text:style-name="P258">0..1</text:p>
          </table:table-cell>
          <table:table-cell table:style-name="Taula7.A3" office:value-type="string">
            <text:p text:style-name="P323">100</text:p>
          </table:table-cell>
          <table:table-cell table:style-name="Taula7.E12" office:value-type="string">
            <text:p text:style-name="P276">Descripció del segment internos – Documentación física y/o soportes.</text:p>
          </table:table-cell>
        </table:table-row>
        <table:table-row table:style-name="TableLine692040368">
          <table:table-cell table:style-name="Taula7.A3" office:value-type="string">
            <text:p text:style-name="P324">entitatCodi</text:p>
          </table:table-cell>
          <table:table-cell table:style-name="Taula7.A3" office:value-type="string">
            <text:p text:style-name="P325">Cadena</text:p>
          </table:table-cell>
          <table:table-cell table:style-name="Taula7.A3" office:value-type="string">
            <text:p text:style-name="P258">0..1</text:p>
          </table:table-cell>
          <table:table-cell table:style-name="Taula7.A3" office:value-type="string">
            <text:p text:style-name="P323">255</text:p>
          </table:table-cell>
          <table:table-cell table:style-name="Taula7.E13" office:value-type="string">
            <text:p text:style-name="P260">Codi <text:span text:style-name="T99">DIR3 </text:span>de l’entitat governamental a la que va dirigit l’assentament registral.</text:p>
          </table:table-cell>
        </table:table-row>
        <table:table-row table:style-name="TableLine692038640">
          <table:table-cell table:style-name="Taula7.A3" office:value-type="string">
            <text:p text:style-name="P324">entitatDescripcio</text:p>
          </table:table-cell>
          <table:table-cell table:style-name="Taula7.A3" office:value-type="string">
            <text:p text:style-name="P325">Cadena</text:p>
          </table:table-cell>
          <table:table-cell table:style-name="Taula7.A3" office:value-type="string">
            <text:p text:style-name="P269"><text:span text:style-name="T268">0..</text:span>1</text:p>
          </table:table-cell>
          <table:table-cell table:style-name="Taula7.A3" office:value-type="string">
            <text:p text:style-name="P327">255</text:p>
          </table:table-cell>
          <table:table-cell table:style-name="Taula7.E14" office:value-type="string">
            <text:p text:style-name="P260"><text:span text:style-name="T99">Descripció</text:span> de l’entitat governamental a la que va dirigit l’assentament registral.</text:p>
          </table:table-cell>
        </table:table-row>
        <table:table-row table:style-name="TableLine692038928">
          <table:table-cell table:style-name="Taula7.A3" office:value-type="string">
            <text:p text:style-name="P324">expedientNumero</text:p>
          </table:table-cell>
          <table:table-cell table:style-name="Taula7.A3" office:value-type="string">
            <text:p text:style-name="P270">Cadena</text:p>
          </table:table-cell>
          <table:table-cell table:style-name="Taula7.A3" office:value-type="string">
            <text:p text:style-name="P258">0..1</text:p>
          </table:table-cell>
          <table:table-cell table:style-name="Taula7.A3" office:value-type="string">
            <text:p text:style-name="P83">255</text:p>
          </table:table-cell>
          <table:table-cell table:style-name="Taula7.E15" office:value-type="string">
            <text:p text:style-name="P328">Número identificador de l’assentament registral. És únic. </text:p>
          </table:table-cell>
        </table:table-row>
        <table:table-row table:style-name="TableLine692038064">
          <table:table-cell table:style-name="Taula7.A3" office:value-type="string">
            <text:p text:style-name="P324">exposa</text:p>
          </table:table-cell>
          <table:table-cell table:style-name="Taula7.A3" office:value-type="string">
            <text:p text:style-name="P325">Cadena</text:p>
          </table:table-cell>
          <table:table-cell table:style-name="Taula7.A3" office:value-type="string">
            <text:p text:style-name="P269"><text:span text:style-name="T268">0..</text:span>1</text:p>
          </table:table-cell>
          <table:table-cell table:style-name="Taula7.A3" office:value-type="string">
            <text:p text:style-name="P327">lob</text:p>
          </table:table-cell>
          <table:table-cell table:style-name="Taula7.E16" office:value-type="string">
            <text:p text:style-name="P328">Exposició de fets. </text:p>
          </table:table-cell>
        </table:table-row>
        <table:table-row table:style-name="TableLine692036336">
          <table:table-cell table:style-name="Taula7.A3" office:value-type="string">
            <text:p text:style-name="P324">extracte</text:p>
          </table:table-cell>
          <table:table-cell table:style-name="Taula7.A3" office:value-type="string">
            <text:p text:style-name="P325">Cadena</text:p>
          </table:table-cell>
          <table:table-cell table:style-name="Taula7.A3" office:value-type="string">
            <text:p text:style-name="P269"><text:span text:style-name="T117">0..</text:span>1</text:p>
          </table:table-cell>
          <table:table-cell table:style-name="Taula7.A3" office:value-type="string">
            <text:p text:style-name="P327">240</text:p>
          </table:table-cell>
          <table:table-cell table:style-name="Taula7.E17" office:value-type="string">
            <text:p text:style-name="P328">Extracte o resum de l’assentament. </text:p>
          </table:table-cell>
        </table:table-row>
        <table:table-row table:style-name="TableLine692036912">
          <table:table-cell table:style-name="Taula7.A3" office:value-type="string">
            <text:p text:style-name="P324">identificador</text:p>
          </table:table-cell>
          <table:table-cell table:style-name="Taula7.A3" office:value-type="string">
            <text:p text:style-name="P325">Cadena</text:p>
          </table:table-cell>
          <table:table-cell table:style-name="Taula7.A3" office:value-type="string">
            <text:p text:style-name="P326">0..1</text:p>
          </table:table-cell>
          <table:table-cell table:style-name="Taula7.A3" office:value-type="string">
            <text:p text:style-name="P327">100</text:p>
          </table:table-cell>
          <table:table-cell table:style-name="Taula7.E18" office:value-type="string">
            <text:p text:style-name="P328">Codi identificador de l’assentament registral. </text:p>
          </table:table-cell>
        </table:table-row>
        <text:soft-page-break/>
        <table:table-row table:style-name="TableLine692048144">
          <table:table-cell table:style-name="Taula7.A3" office:value-type="string">
            <text:p text:style-name="P324">idiomaCodi</text:p>
          </table:table-cell>
          <table:table-cell table:style-name="Taula7.A3" office:value-type="string">
            <text:p text:style-name="P270">Cadena</text:p>
          </table:table-cell>
          <table:table-cell table:style-name="Taula7.A3" office:value-type="string">
            <text:p text:style-name="P258">0..1</text:p>
          </table:table-cell>
          <table:table-cell table:style-name="Taula7.A3" office:value-type="string">
            <text:p text:style-name="P327">2</text:p>
          </table:table-cell>
          <table:table-cell table:style-name="Taula7.E19" office:value-type="string">
            <text:p text:style-name="P276">Codi d’idioma amb el que s’ha fet l’assentament.</text:p>
          </table:table-cell>
        </table:table-row>
        <table:table-row table:style-name="TableLine692047568">
          <table:table-cell table:style-name="Taula7.A3" office:value-type="string">
            <text:p text:style-name="P324">idiomaDescripcio</text:p>
          </table:table-cell>
          <table:table-cell table:style-name="Taula7.A3" office:value-type="string">
            <text:p text:style-name="P270">Cadena</text:p>
          </table:table-cell>
          <table:table-cell table:style-name="Taula7.A3" office:value-type="string">
            <text:p text:style-name="P258">0..1</text:p>
          </table:table-cell>
          <table:table-cell table:style-name="Taula7.A3" office:value-type="string">
            <text:p text:style-name="P363">100</text:p>
          </table:table-cell>
          <table:table-cell table:style-name="Taula7.E20" office:value-type="string">
            <text:p text:style-name="P276">Descripció d’idioma amb el que s’ha fet l’assentament.</text:p>
          </table:table-cell>
        </table:table-row>
        <table:table-row table:style-name="Taula7.21">
          <table:table-cell table:style-name="Taula7.A3" office:value-type="string">
            <text:p text:style-name="P324">interessats</text:p>
          </table:table-cell>
          <table:table-cell table:style-name="Taula7.A3" office:value-type="string">
            <text:p text:style-name="P325">interessat</text:p>
          </table:table-cell>
          <table:table-cell table:style-name="Taula7.A3" office:value-type="string">
            <text:p text:style-name="P258">0..*</text:p>
          </table:table-cell>
          <table:table-cell table:style-name="Taula7.A3" office:value-type="string">
            <text:p text:style-name="P265"/>
          </table:table-cell>
          <table:table-cell table:style-name="Taula7.E21" office:value-type="string">
            <text:p text:style-name="P280">Dades que componen els interessats de l’assentament registral si n’hi ha.</text:p>
          </table:table-cell>
        </table:table-row>
        <table:table-row table:style-name="Taula7.21">
          <table:table-cell table:style-name="Taula7.A3" office:value-type="string">
            <text:p text:style-name="P329">llibre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4</text:p>
          </table:table-cell>
          <table:table-cell table:style-name="Taula7.E22" office:value-type="string">
            <text:p text:style-name="P272">Codi del llibre al qual s’ha fet l’assentament registral rebut.</text:p>
          </table:table-cell>
        </table:table-row>
        <table:table-row table:style-name="Taula7.21">
          <table:table-cell table:style-name="Taula7.A3" office:value-type="string">
            <text:p text:style-name="P329">llibreDescripcio</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255</text:p>
          </table:table-cell>
          <table:table-cell table:style-name="Taula7.E37" office:value-type="string">
            <text:p text:style-name="P272">Denominació del llibre al qual s’ha fet l’assentament registral rebut.</text:p>
          </table:table-cell>
        </table:table-row>
        <table:table-row table:style-name="Taula7.21">
          <table:table-cell table:style-name="Taula7.A3" office:value-type="string">
            <text:p text:style-name="P329">observacions</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50</text:p>
          </table:table-cell>
          <table:table-cell table:style-name="Taula7.E37" office:value-type="string">
            <text:p text:style-name="P276">Observacions de l’assentament.</text:p>
          </table:table-cell>
        </table:table-row>
        <table:table-row table:style-name="Taula7.21">
          <table:table-cell table:style-name="Taula7.A3" office:value-type="string">
            <text:p text:style-name="P329">oficina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21</text:p>
          </table:table-cell>
          <table:table-cell table:style-name="Taula7.E37" office:value-type="string">
            <text:p text:style-name="P272">Codi DIR3 de l’oficina on es registre.</text:p>
          </table:table-cell>
        </table:table-row>
        <table:table-row table:style-name="Taula7.21">
          <table:table-cell table:style-name="Taula7.A3" office:value-type="string">
            <text:p text:style-name="P329">oficinaDescripcio</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300</text:p>
          </table:table-cell>
          <table:table-cell table:style-name="Taula7.E37" office:value-type="string">
            <text:p text:style-name="P262">Denominació DIR3 de l'entitat registral on es registre l'assentament.</text:p>
          </table:table-cell>
        </table:table-row>
        <table:table-row table:style-name="Taula7.21">
          <table:table-cell table:style-name="Taula7.A3" office:value-type="string">
            <text:p text:style-name="P329">origenData</text:p>
          </table:table-cell>
          <table:table-cell table:style-name="Taula7.A3" office:value-type="string">
            <text:p text:style-name="P330">dateTime</text:p>
          </table:table-cell>
          <table:table-cell table:style-name="Taula7.A3" office:value-type="string">
            <text:p text:style-name="P258">0..1</text:p>
          </table:table-cell>
          <table:table-cell table:style-name="Taula7.A3" office:value-type="string">
            <text:p text:style-name="P331">14</text:p>
          </table:table-cell>
          <table:table-cell table:style-name="Taula7.E37" office:value-type="string">
            <text:p text:style-name="P262">Data <text:span text:style-name="T97">origen </text:span>de l’assentament.</text:p>
          </table:table-cell>
        </table:table-row>
        <table:table-row table:style-name="Taula7.21">
          <table:table-cell table:style-name="Taula7.A3" office:value-type="string">
            <text:p text:style-name="P329">origenRegistreNumero</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80</text:p>
          </table:table-cell>
          <table:table-cell table:style-name="Taula7.E37" office:value-type="string">
            <text:p text:style-name="P262"/>
          </table:table-cell>
        </table:table-row>
        <table:table-row table:style-name="Taula7.21">
          <table:table-cell table:style-name="Taula7.A3" office:value-type="string">
            <text:p text:style-name="P329">procediment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64</text:p>
          </table:table-cell>
          <table:table-cell table:style-name="Taula7.E37" office:value-type="string">
            <text:p text:style-name="P332">Codi <text:span text:style-name="T342">SIA </text:span>de procediment. </text:p>
          </table:table-cell>
        </table:table-row>
        <table:table-row table:style-name="Taula7.21">
          <table:table-cell table:style-name="Taula7.A3" office:value-type="string">
            <text:p text:style-name="P329"><text:span text:style-name="T342">servei</text:span>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64</text:p>
          </table:table-cell>
          <table:table-cell table:style-name="Taula7.E37" office:value-type="string">
            <text:p text:style-name="P332">Codi <text:span text:style-name="T342">SIA </text:span>de<text:span text:style-name="T342">l servei</text:span>. </text:p>
          </table:table-cell>
        </table:table-row>
        <table:table-row table:style-name="Taula7.21">
          <table:table-cell table:style-name="Taula7.A3" office:value-type="string">
            <text:p text:style-name="P329">refExterna</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265"/>
          </table:table-cell>
          <table:table-cell table:style-name="Taula7.E37" office:value-type="string">
            <text:p text:style-name="P262"/>
          </table:table-cell>
        </table:table-row>
        <table:table-row table:style-name="Taula7.21">
          <table:table-cell table:style-name="Taula7.A3" office:value-type="string">
            <text:p text:style-name="P329">solicita</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1">lob</text:p>
          </table:table-cell>
          <table:table-cell table:style-name="Taula7.E37" office:value-type="string">
            <text:p text:style-name="P276">Objecte de la sol·licitud si escau.</text:p>
          </table:table-cell>
        </table:table-row>
        <table:table-row table:style-name="Taula7.21">
          <table:table-cell table:style-name="Taula7.A3" office:value-type="string">
            <text:p text:style-name="P329">transportNumero</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20</text:p>
          </table:table-cell>
          <table:table-cell table:style-name="Taula7.E37" office:value-type="string">
            <text:p text:style-name="P334">Número de transport. </text:p>
          </table:table-cell>
        </table:table-row>
        <table:table-row table:style-name="Taula7.21">
          <table:table-cell table:style-name="Taula7.A3" office:value-type="string">
            <text:p text:style-name="P329">transportTipus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20</text:p>
          </table:table-cell>
          <table:table-cell table:style-name="Taula7.E37" office:value-type="string">
            <text:p text:style-name="P262">Codi SICRES3 del segment internos – tipo transporte.</text:p>
          </table:table-cell>
        </table:table-row>
        <table:table-row table:style-name="Taula7.21">
          <table:table-cell table:style-name="Taula7.A3" office:value-type="string">
            <text:p text:style-name="P329">transportTipusDescripcio</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100</text:p>
          </table:table-cell>
          <table:table-cell table:style-name="Taula7.E37" office:value-type="string">
            <text:p text:style-name="P262">Descripció del segment internos – tipo transporte.</text:p>
          </table:table-cell>
        </table:table-row>
        <table:table-row table:style-name="Taula7.21">
          <table:table-cell table:style-name="Taula7.A3" office:value-type="string">
            <text:p text:style-name="P329">usuariCodi</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20</text:p>
          </table:table-cell>
          <table:table-cell table:style-name="Taula7.E37" office:value-type="string">
            <text:p text:style-name="P262">Codi de l'usuari que vol realitzar l'operació.</text:p>
          </table:table-cell>
        </table:table-row>
        <table:table-row table:style-name="Taula7.21">
          <table:table-cell table:style-name="Taula7.A3" office:value-type="string">
            <text:p text:style-name="P329">usuariNom</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767</text:p>
          </table:table-cell>
          <table:table-cell table:style-name="Taula7.E37" office:value-type="string">
            <text:p text:style-name="P262"><text:span text:style-name="T100">Nom</text:span> de l'usuari que vol realitzar l'operació.</text:p>
          </table:table-cell>
        </table:table-row>
        <table:table-row table:style-name="Taula7.21">
          <table:table-cell table:style-name="Taula7.A3" office:value-type="string">
            <text:p text:style-name="P329">justificantFitxerArxiuUuid</text:p>
          </table:table-cell>
          <table:table-cell table:style-name="Taula7.A3" office:value-type="string">
            <text:p text:style-name="P330">Cadena</text:p>
          </table:table-cell>
          <table:table-cell table:style-name="Taula7.A3" office:value-type="string">
            <text:p text:style-name="P258">0..1</text:p>
          </table:table-cell>
          <table:table-cell table:style-name="Taula7.A3" office:value-type="string">
            <text:p text:style-name="P333">256</text:p>
          </table:table-cell>
          <table:table-cell table:style-name="Taula7.E40" office:value-type="string">
            <text:p text:style-name="P335">Paràmetre que emmagatzema el uuid del justificant. Serveix per recuperar el justificant des del backoffice.</text:p>
          </table:table-cell>
        </table:table-row>
        <table:table-row table:style-name="Taula7.21">
          <table:table-cell table:style-name="Taula7.A3" office:value-type="string">
            <text:p text:style-name="P348">tramitCodi</text:p>
          </table:table-cell>
          <table:table-cell table:style-name="Taula7.A3" office:value-type="string">
            <text:p text:style-name="P349">Cadena</text:p>
          </table:table-cell>
          <table:table-cell table:style-name="Taula7.A3" office:value-type="string">
            <text:p text:style-name="P350">0..1</text:p>
          </table:table-cell>
          <table:table-cell table:style-name="Taula7.A3" office:value-type="string">
            <text:p text:style-name="P351">64</text:p>
          </table:table-cell>
          <table:table-cell table:style-name="Taula7.E40" office:value-type="string">
            <text:p text:style-name="P348">Codi del tràmit.</text:p>
          </table:table-cell>
        </table:table-row>
        <table:table-row table:style-name="Taula7.21">
          <table:table-cell table:style-name="Taula7.A3" office:value-type="string">
            <text:p text:style-name="P348">tramitNom</text:p>
          </table:table-cell>
          <table:table-cell table:style-name="Taula7.A3" office:value-type="string">
            <text:p text:style-name="P349">Cadena</text:p>
          </table:table-cell>
          <table:table-cell table:style-name="Taula7.A3" office:value-type="string">
            <text:p text:style-name="P350">0..1</text:p>
          </table:table-cell>
          <table:table-cell table:style-name="Taula7.A3" office:value-type="string">
            <text:p text:style-name="P351">256</text:p>
          </table:table-cell>
          <table:table-cell table:style-name="Taula7.E40" office:value-type="string">
            <text:p text:style-name="P348">Nom del tràmit.</text:p>
          </table:table-cell>
        </table:table-row>
      </table:table>
      <text:p text:style-name="P134"/>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692050736">
          <table:table-cell table:style-name="Taula9.A1" table:number-columns-spanned="5" office:value-type="string">
            <text:p text:style-name="P139">AnotacioRegistre<text:span text:style-name="T270">Entrada =&gt; tns:anotacioRegistreBase</text:span></text:p>
          </table:table-cell>
          <table:covered-table-cell/>
          <table:covered-table-cell/>
          <table:covered-table-cell/>
          <table:covered-table-cell/>
        </table:table-row>
        <table:table-row table:style-name="TableLine692050448">
          <table:table-cell table:style-name="Taula9.A2" office:value-type="string">
            <text:p text:style-name="P32">Nom del camp</text:p>
          </table:table-cell>
          <table:table-cell table:style-name="Taula9.A2" office:value-type="string">
            <text:p text:style-name="P32">Tipus</text:p>
          </table:table-cell>
          <table:table-cell table:style-name="Taula9.A2" office:value-type="string">
            <text:p text:style-name="P32">Mult.</text:p>
          </table:table-cell>
          <table:table-cell table:style-name="Taula9.A2" office:value-type="string">
            <text:p text:style-name="P34">Tamany</text:p>
          </table:table-cell>
          <table:table-cell table:style-name="Taula9.E2" office:value-type="string">
            <text:p text:style-name="P34">Descripció</text:p>
          </table:table-cell>
        </table:table-row>
        <table:table-row table:style-name="TableLine692048720">
          <table:table-cell table:style-name="Taula9.A3" office:value-type="string">
            <text:p text:style-name="P336">destiCodi</text:p>
          </table:table-cell>
          <table:table-cell table:style-name="Taula9.A3" office:value-type="string">
            <text:p text:style-name="P330">Cadena</text:p>
          </table:table-cell>
          <table:table-cell table:style-name="Taula9.A3" office:value-type="string">
            <text:p text:style-name="P254">0..<text:span text:style-name="T269">1</text:span></text:p>
          </table:table-cell>
          <table:table-cell table:style-name="Taula9.D3" office:value-type="float" office:value="21">
            <text:p text:style-name="P333">21</text:p>
          </table:table-cell>
          <table:table-cell table:style-name="Taula9.E4" office:value-type="string">
            <text:p text:style-name="P334">Codi DIR3 de la oficina destí. </text:p>
          </table:table-cell>
        </table:table-row>
        <table:table-row table:style-name="TableLine692058512">
          <table:table-cell table:style-name="Taula9.A3" office:value-type="string">
            <text:p text:style-name="P336">destiDescripcio</text:p>
          </table:table-cell>
          <table:table-cell table:style-name="Taula9.A3" office:value-type="string">
            <text:p text:style-name="P320">Cadena</text:p>
          </table:table-cell>
          <table:table-cell table:style-name="Taula9.A3" office:value-type="string">
            <text:p text:style-name="P254">0..1</text:p>
          </table:table-cell>
          <table:table-cell table:style-name="Taula9.D3" office:value-type="float" office:value="300">
            <text:p text:style-name="P364">300</text:p>
          </table:table-cell>
          <table:table-cell table:style-name="Taula9.E4" office:value-type="string">
            <text:p text:style-name="P334">Descripció de la oficina destí. </text:p>
          </table:table-cell>
        </table:table-row>
      </table:table>
      <text:p text:style-name="P134"/>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692064560">
          <table:table-cell table:style-name="Taula8.A1" table:number-columns-spanned="5" office:value-type="string">
            <text:p text:style-name="P139">anotacioRegistre<text:span text:style-name="T269">Id</text:span></text:p>
          </table:table-cell>
          <table:covered-table-cell/>
          <table:covered-table-cell/>
          <table:covered-table-cell/>
          <table:covered-table-cell/>
        </table:table-row>
        <table:table-row table:style-name="TableLine692063120">
          <table:table-cell table:style-name="Taula8.A2" office:value-type="string">
            <text:p text:style-name="P32">Nom del camp</text:p>
          </table:table-cell>
          <table:table-cell table:style-name="Taula8.A2" office:value-type="string">
            <text:p text:style-name="P32">Tipus</text:p>
          </table:table-cell>
          <table:table-cell table:style-name="Taula8.A2" office:value-type="string">
            <text:p text:style-name="P32">Mult.</text:p>
          </table:table-cell>
          <table:table-cell table:style-name="Taula8.A2" office:value-type="string">
            <text:p text:style-name="P34">Tamany</text:p>
          </table:table-cell>
          <table:table-cell table:style-name="Taula8.E2" office:value-type="string">
            <text:p text:style-name="P34">Descripció</text:p>
          </table:table-cell>
        </table:table-row>
        <table:table-row table:style-name="TableLine692061392">
          <table:table-cell table:style-name="Taula8.A3" office:value-type="string">
            <text:p text:style-name="P329">clauAcces</text:p>
          </table:table-cell>
          <table:table-cell table:style-name="Taula8.A3" office:value-type="string">
            <text:p text:style-name="P330">Cadena</text:p>
          </table:table-cell>
          <table:table-cell table:style-name="Taula8.A3" office:value-type="string">
            <text:p text:style-name="P254">0..<text:span text:style-name="T269">1</text:span></text:p>
          </table:table-cell>
          <table:table-cell table:style-name="Taula8.D3">
            <text:p text:style-name="P254"/>
          </table:table-cell>
          <table:table-cell table:style-name="Taula8.E4" office:value-type="string">
            <text:p text:style-name="P339">Clau d’accés per accedir a l’informació. </text:p>
          </table:table-cell>
        </table:table-row>
        <table:table-row table:style-name="Taula8.4">
          <table:table-cell table:style-name="Taula8.A3" office:value-type="string">
            <text:p text:style-name="P329">identificador</text:p>
          </table:table-cell>
          <table:table-cell table:style-name="Taula8.A3" office:value-type="string">
            <text:p text:style-name="P320">Cadena</text:p>
          </table:table-cell>
          <table:table-cell table:style-name="Taula8.A3" office:value-type="string">
            <text:p text:style-name="P254">0..1</text:p>
          </table:table-cell>
          <table:table-cell table:style-name="Taula8.D3">
            <text:p text:style-name="P353"/>
          </table:table-cell>
          <table:table-cell table:style-name="Taula8.E4" office:value-type="string">
            <text:p text:style-name="P339">Identificador de l’usuari per poder accedir a l’informació. </text:p>
          </table:table-cell>
        </table:table-row>
      </table:table>
      <text:p text:style-name="P134"/>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692059952">
          <table:table-cell table:style-name="Taula10.A1" table:number-columns-spanned="5" office:value-type="string">
            <text:p text:style-name="P140">interessatBase</text:p>
          </table:table-cell>
          <table:covered-table-cell/>
          <table:covered-table-cell/>
          <table:covered-table-cell/>
          <table:covered-table-cell/>
        </table:table-row>
        <table:table-row table:style-name="TableLine710699312">
          <table:table-cell table:style-name="Taula10.A2" office:value-type="string">
            <text:p text:style-name="P32">Nom del camp</text:p>
          </table:table-cell>
          <table:table-cell table:style-name="Taula10.A2" office:value-type="string">
            <text:p text:style-name="P32">Tipus</text:p>
          </table:table-cell>
          <table:table-cell table:style-name="Taula10.A2" office:value-type="string">
            <text:p text:style-name="P32">Mult.</text:p>
          </table:table-cell>
          <table:table-cell table:style-name="Taula10.A2" office:value-type="string">
            <text:p text:style-name="P34">Tamany</text:p>
          </table:table-cell>
          <table:table-cell table:style-name="Taula10.E2" office:value-type="string">
            <text:p text:style-name="P34">Descripció</text:p>
          </table:table-cell>
        </table:table-row>
        <table:table-row table:style-name="TableLine692057936">
          <table:table-cell table:style-name="Taula10.A3" office:value-type="string">
            <text:p text:style-name="P336">adresa</text:p>
          </table:table-cell>
          <table:table-cell table:style-name="Taula10.A3" office:value-type="string">
            <text:p text:style-name="P337">Cadena</text:p>
          </table:table-cell>
          <table:table-cell table:style-name="Taula10.A3" office:value-type="string">
            <text:p text:style-name="P254">0..1</text:p>
          </table:table-cell>
          <table:table-cell table:style-name="Taula10.D3" office:value-type="float" office:value="160">
            <text:p text:style-name="P341">160</text:p>
          </table:table-cell>
          <table:table-cell table:style-name="Taula10.E4" office:value-type="string">
            <text:p text:style-name="P308">Adreça postal de l’interessat.</text:p>
          </table:table-cell>
        </table:table-row>
        <table:table-row table:style-name="TableLine692069168">
          <table:table-cell table:style-name="Taula10.A3" office:value-type="string">
            <text:p text:style-name="P336">adresaElectronica</text:p>
          </table:table-cell>
          <table:table-cell table:style-name="Taula10.A3" office:value-type="string">
            <text:p text:style-name="P337">Cadena</text:p>
          </table:table-cell>
          <table:table-cell table:style-name="Taula10.A3" office:value-type="string">
            <text:p text:style-name="P254">0..1</text:p>
          </table:table-cell>
          <table:table-cell table:style-name="Taula10.D3" office:value-type="float" office:value="160">
            <text:p text:style-name="P365">160</text:p>
          </table:table-cell>
          <table:table-cell table:style-name="Taula10.E4" office:value-type="string">
            <text:p text:style-name="P308">Adreça <text:span text:style-name="T274">electrònica</text:span> de l’interessat.</text:p>
          </table:table-cell>
        </table:table-row>
        <table:table-row table:style-name="TableLine692068592">
          <table:table-cell table:style-name="Taula10.A3" office:value-type="string">
            <text:p text:style-name="P336">canal</text:p>
          </table:table-cell>
          <table:table-cell table:style-name="Taula10.A3" office:value-type="string">
            <text:p text:style-name="P316">Cadena</text:p>
          </table:table-cell>
          <table:table-cell table:style-name="Taula10.A3" office:value-type="string">
            <text:p text:style-name="P254">0..1</text:p>
          </table:table-cell>
          <table:table-cell table:style-name="Taula10.A3" office:value-type="string">
            <text:p text:style-name="P341">2</text:p>
          </table:table-cell>
          <table:table-cell table:style-name="Taula10.E5" office:value-type="string">
            <text:p text:style-name="P262"><text:s/><text:span text:style-name="T275">Codi SICRES del segment interesado – canal</text:span></text:p>
            <text:p text:style-name="P298">preferente de notificación del interesado.</text:p>
          </table:table-cell>
        </table:table-row>
        <table:table-row table:style-name="TableLine692067440">
          <table:table-cell table:style-name="Taula10.A3" office:value-type="string">
            <text:p text:style-name="P336">cp</text:p>
          </table:table-cell>
          <table:table-cell table:style-name="Taula10.A3" office:value-type="string">
            <text:p text:style-name="P337">Cadena</text:p>
          </table:table-cell>
          <table:table-cell table:style-name="Taula10.A3" office:value-type="string">
            <text:p text:style-name="P258">0..1</text:p>
          </table:table-cell>
          <table:table-cell table:style-name="Taula10.A3" office:value-type="string">
            <text:p text:style-name="P341">5</text:p>
          </table:table-cell>
          <table:table-cell table:style-name="Taula10.E6" office:value-type="string">
            <text:p text:style-name="P342">Codi postal del l’interessat. </text:p>
          </table:table-cell>
        </table:table-row>
        <table:table-row table:style-name="TableLine692067728">
          <table:table-cell table:style-name="Taula10.A3" office:value-type="string">
            <text:p text:style-name="P336">documentNumero</text:p>
          </table:table-cell>
          <table:table-cell table:style-name="Taula10.A3" office:value-type="string">
            <text:p text:style-name="P337">Cadena</text:p>
          </table:table-cell>
          <table:table-cell table:style-name="Taula10.A3" office:value-type="string">
            <text:p text:style-name="P338">0..1</text:p>
          </table:table-cell>
          <table:table-cell table:style-name="Taula10.A3" office:value-type="string">
            <text:p text:style-name="P365">17</text:p>
          </table:table-cell>
          <table:table-cell table:style-name="Taula10.E7" office:value-type="string">
            <text:p text:style-name="P305">Número de document identificatiu.</text:p>
          </table:table-cell>
        </table:table-row>
        <table:table-row table:style-name="TableLine692067152">
          <table:table-cell table:style-name="Taula10.A3" office:value-type="string">
            <text:p text:style-name="P336">documentTipus</text:p>
          </table:table-cell>
          <table:table-cell table:style-name="Taula10.A3" office:value-type="string">
            <text:p text:style-name="P337">documentTipus</text:p>
          </table:table-cell>
          <table:table-cell table:style-name="Taula10.A3" office:value-type="string">
            <text:p text:style-name="P258">0..1</text:p>
          </table:table-cell>
          <table:table-cell table:style-name="Taula10.A3" office:value-type="string">
            <text:p text:style-name="P365">1</text:p>
          </table:table-cell>
          <table:table-cell table:style-name="Taula10.E8" office:value-type="string">
            <text:p text:style-name="P300">Codi SICRES del segment interesado –</text:p>
            <text:p text:style-name="P300">documento de identificacion de interesado tipo.</text:p>
          </table:table-cell>
        </table:table-row>
        <table:table-row table:style-name="TableLine692066576">
          <table:table-cell table:style-name="Taula10.A3" office:value-type="string">
            <text:p text:style-name="P336">email</text:p>
          </table:table-cell>
          <table:table-cell table:style-name="Taula10.A3" office:value-type="string">
            <text:p text:style-name="P270">Cadena</text:p>
          </table:table-cell>
          <table:table-cell table:style-name="Taula10.A3" office:value-type="string">
            <text:p text:style-name="P258">0..1</text:p>
          </table:table-cell>
          <table:table-cell table:style-name="Taula10.A3" office:value-type="string">
            <text:p text:style-name="P365">160</text:p>
          </table:table-cell>
          <table:table-cell table:style-name="Taula10.E9" office:value-type="string">
            <text:p text:style-name="P342">Correu electrònic de l’interessat. </text:p>
          </table:table-cell>
        </table:table-row>
        <table:table-row table:style-name="TableLine692074640">
          <table:table-cell table:style-name="Taula10.A3" office:value-type="string">
            <text:p text:style-name="P336">llinatge1</text:p>
          </table:table-cell>
          <table:table-cell table:style-name="Taula10.A3" office:value-type="string">
            <text:p text:style-name="P270">Cadena</text:p>
          </table:table-cell>
          <table:table-cell table:style-name="Taula10.A3" office:value-type="string">
            <text:p text:style-name="P269"><text:span text:style-name="T267">0..</text:span>1</text:p>
          </table:table-cell>
          <table:table-cell table:style-name="Taula10.A3" office:value-type="string">
            <text:p text:style-name="P341">255</text:p>
          </table:table-cell>
          <table:table-cell table:style-name="Taula10.E10" office:value-type="string">
            <text:p text:style-name="P308">Primer llinatge de l’interessat. Obligatori si és una persona física.</text:p>
          </table:table-cell>
        </table:table-row>
        <table:table-row table:style-name="TableLine692073488">
          <table:table-cell table:style-name="Taula10.A3" office:value-type="string">
            <text:p text:style-name="P336">llinatge2</text:p>
          </table:table-cell>
          <table:table-cell table:style-name="Taula10.A3" office:value-type="string">
            <text:p text:style-name="P337">Cadena</text:p>
          </table:table-cell>
          <table:table-cell table:style-name="Taula10.A3" office:value-type="string">
            <text:p text:style-name="P258">0..1</text:p>
          </table:table-cell>
          <table:table-cell table:style-name="Taula10.A3" office:value-type="string">
            <text:p text:style-name="P341">255</text:p>
          </table:table-cell>
          <table:table-cell table:style-name="Taula10.E11" office:value-type="string">
            <text:p text:style-name="P308">Segon llinatge de l’interessat.</text:p>
          </table:table-cell>
        </table:table-row>
        <table:table-row table:style-name="TableLine692072912">
          <table:table-cell table:style-name="Taula10.A3" office:value-type="string">
            <text:p text:style-name="P336">municipi</text:p>
          </table:table-cell>
          <table:table-cell table:style-name="Taula10.A3" office:value-type="string">
            <text:p text:style-name="P337">Cadena</text:p>
          </table:table-cell>
          <table:table-cell table:style-name="Taula10.A3" office:value-type="string">
            <text:p text:style-name="P258">0..1</text:p>
          </table:table-cell>
          <table:table-cell table:style-name="Taula10.A3" office:value-type="string">
            <text:p text:style-name="P341">100</text:p>
          </table:table-cell>
          <table:table-cell table:style-name="Taula10.E12" office:value-type="string">
            <text:p text:style-name="P342">Nom del municipi de la persona. </text:p>
          </table:table-cell>
        </table:table-row>
        <table:table-row table:style-name="TableLine692073200">
          <table:table-cell table:style-name="Taula10.A3" office:value-type="string">
            <text:p text:style-name="P336">municipiCodi</text:p>
          </table:table-cell>
          <table:table-cell table:style-name="Taula10.A3" office:value-type="string">
            <text:p text:style-name="P337">Cadena</text:p>
          </table:table-cell>
          <table:table-cell table:style-name="Taula10.A3" office:value-type="string">
            <text:p text:style-name="P258">0..1</text:p>
          </table:table-cell>
          <table:table-cell table:style-name="Taula10.A3" office:value-type="string">
            <text:p text:style-name="P341">100</text:p>
          </table:table-cell>
          <table:table-cell table:style-name="Taula10.E13" office:value-type="string">
            <text:p text:style-name="P342">Codi del municipi de la persona. </text:p>
          </table:table-cell>
        </table:table-row>
        <table:table-row table:style-name="TableLine692072336">
          <table:table-cell table:style-name="Taula10.A3" office:value-type="string">
            <text:p text:style-name="P336">nom</text:p>
          </table:table-cell>
          <table:table-cell table:style-name="Taula10.A3" office:value-type="string">
            <text:p text:style-name="P337">Cadena</text:p>
          </table:table-cell>
          <table:table-cell table:style-name="Taula10.A3" office:value-type="string">
            <text:p text:style-name="P269"><text:span text:style-name="T268">0..</text:span>1</text:p>
          </table:table-cell>
          <table:table-cell table:style-name="Taula10.A3" office:value-type="string">
            <text:p text:style-name="P341">255</text:p>
          </table:table-cell>
          <table:table-cell table:style-name="Taula10.E14" office:value-type="string">
            <text:p text:style-name="P308">Nom de l’interessat. Obligatori si és una persona física.</text:p>
          </table:table-cell>
        </table:table-row>
        <table:table-row table:style-name="TableLine692070608">
          <table:table-cell table:style-name="Taula10.A3" office:value-type="string">
            <text:p text:style-name="P319">observacions</text:p>
          </table:table-cell>
          <table:table-cell table:style-name="Taula10.A3" office:value-type="string">
            <text:p text:style-name="P270">Cadena</text:p>
          </table:table-cell>
          <table:table-cell table:style-name="Taula10.A3" office:value-type="string">
            <text:p text:style-name="P258">0..1</text:p>
          </table:table-cell>
          <table:table-cell table:style-name="Taula10.A3" office:value-type="string">
            <text:p text:style-name="P84">160</text:p>
          </table:table-cell>
          <table:table-cell table:style-name="Taula10.E15" office:value-type="string">
            <text:p text:style-name="P342">Observacions a destacar sobre la persona interessada. </text:p>
          </table:table-cell>
        </table:table-row>
        <table:table-row table:style-name="TableLine692071184">
          <table:table-cell table:style-name="Taula10.A3" office:value-type="string">
            <text:p text:style-name="P336">organCodi</text:p>
          </table:table-cell>
          <table:table-cell table:style-name="Taula10.A3" office:value-type="string">
            <text:p text:style-name="P337">Cadena</text:p>
          </table:table-cell>
          <table:table-cell table:style-name="Taula10.A3" office:value-type="string">
            <text:p text:style-name="P269"><text:span text:style-name="T268">0..</text:span>1</text:p>
          </table:table-cell>
          <table:table-cell table:style-name="Taula10.A3" office:value-type="string">
            <text:p text:style-name="P274"/>
          </table:table-cell>
          <table:table-cell table:style-name="Taula10.E16" office:value-type="string">
            <text:p text:style-name="P262"/>
          </table:table-cell>
        </table:table-row>
        <table:table-row table:style-name="TableLine692078672">
          <table:table-cell table:style-name="Taula10.A3" office:value-type="string">
            <text:p text:style-name="P336">pais</text:p>
          </table:table-cell>
          <table:table-cell table:style-name="Taula10.A3" office:value-type="string">
            <text:p text:style-name="P337">Cadena</text:p>
          </table:table-cell>
          <table:table-cell table:style-name="Taula10.A3" office:value-type="string">
            <text:p text:style-name="P269"><text:span text:style-name="T117">0..</text:span>1</text:p>
          </table:table-cell>
          <table:table-cell table:style-name="Taula10.A3" office:value-type="string">
            <text:p text:style-name="P340">100</text:p>
          </table:table-cell>
          <table:table-cell table:style-name="Taula10.E17" office:value-type="string">
            <text:p text:style-name="P298"><text:span text:style-name="T276">Nom</text:span> del País de la persona.</text:p>
          </table:table-cell>
        </table:table-row>
        <table:table-row table:style-name="TableLine692078960">
          <table:table-cell table:style-name="Taula10.A3" office:value-type="string">
            <text:p text:style-name="P336">paisCodi</text:p>
          </table:table-cell>
          <table:table-cell table:style-name="Taula10.A3" office:value-type="string">
            <text:p text:style-name="P337">Cadena</text:p>
          </table:table-cell>
          <table:table-cell table:style-name="Taula10.A3" office:value-type="string">
            <text:p text:style-name="P338">0..1</text:p>
          </table:table-cell>
          <table:table-cell table:style-name="Taula10.A3" office:value-type="string">
            <text:p text:style-name="P340">100</text:p>
          </table:table-cell>
          <table:table-cell table:style-name="Taula10.E18" office:value-type="string">
            <text:p text:style-name="P298">Codi ISO numèric del País de la persona.</text:p>
          </table:table-cell>
        </table:table-row>
        <table:table-row table:style-name="TableLine692078384">
          <table:table-cell table:style-name="Taula10.A3" office:value-type="string">
            <text:p text:style-name="P336">provincia</text:p>
          </table:table-cell>
          <table:table-cell table:style-name="Taula10.A3" office:value-type="string">
            <text:p text:style-name="P270">Cadena</text:p>
          </table:table-cell>
          <table:table-cell table:style-name="Taula10.A3" office:value-type="string">
            <text:p text:style-name="P258">0..1</text:p>
          </table:table-cell>
          <table:table-cell table:style-name="Taula10.A3" office:value-type="string">
            <text:p text:style-name="P340">100</text:p>
          </table:table-cell>
          <table:table-cell table:style-name="Taula10.E19" office:value-type="string">
            <text:p text:style-name="P298"><text:span text:style-name="T276">Nom</text:span> de la província de la persona.</text:p>
          </table:table-cell>
        </table:table-row>
        <table:table-row table:style-name="TableLine692077520">
          <table:table-cell table:style-name="Taula10.A3" office:value-type="string">
            <text:p text:style-name="P336">provinciaCodi</text:p>
          </table:table-cell>
          <table:table-cell table:style-name="Taula10.A3" office:value-type="string">
            <text:p text:style-name="P270">Cadena</text:p>
          </table:table-cell>
          <table:table-cell table:style-name="Taula10.A3" office:value-type="string">
            <text:p text:style-name="P258">0..1</text:p>
          </table:table-cell>
          <table:table-cell table:style-name="Taula10.A3" office:value-type="string">
            <text:p text:style-name="P366">100</text:p>
          </table:table-cell>
          <table:table-cell table:style-name="Taula10.E20" office:value-type="string">
            <text:p text:style-name="P298">Codi INE de la província de la persona.</text:p>
          </table:table-cell>
        </table:table-row>
        <table:table-row table:style-name="TableLine692076944">
          <table:table-cell table:style-name="Taula10.A3" office:value-type="string">
            <text:p text:style-name="P343">raoSocial</text:p>
          </table:table-cell>
          <table:table-cell table:style-name="Taula10.A3" office:value-type="string">
            <text:p text:style-name="P270">Cadena</text:p>
          </table:table-cell>
          <table:table-cell table:style-name="Taula10.A3" office:value-type="string">
            <text:p text:style-name="P258">0..1</text:p>
          </table:table-cell>
          <table:table-cell table:style-name="Taula10.A3" office:value-type="string">
            <text:p text:style-name="P340">2000</text:p>
          </table:table-cell>
          <table:table-cell table:style-name="Taula10.E22" office:value-type="string">
            <text:p text:style-name="P308">Raó social de l’interessat. Obligatori si és una persona jurídica.</text:p>
          </table:table-cell>
        </table:table-row>
        <table:table-row table:style-name="TableLine692076080">
          <table:table-cell table:style-name="Taula10.A3" office:value-type="string">
            <text:p text:style-name="P343">telefon</text:p>
          </table:table-cell>
          <table:table-cell table:style-name="Taula10.A3" office:value-type="string">
            <text:p text:style-name="P344">Cadena</text:p>
          </table:table-cell>
          <table:table-cell table:style-name="Taula10.A3" office:value-type="string">
            <text:p text:style-name="P345">0..1</text:p>
          </table:table-cell>
          <table:table-cell table:style-name="Taula10.A3" office:value-type="string">
            <text:p text:style-name="P340">20</text:p>
          </table:table-cell>
          <table:table-cell table:style-name="Taula10.E22" office:value-type="string">
            <text:p text:style-name="P339">Telèfon de l’interessat. </text:p>
          </table:table-cell>
        </table:table-row>
        <table:table-row table:style-name="TableLine692076656">
          <table:table-cell table:style-name="Taula10.A3" office:value-type="string">
            <text:p text:style-name="P343">tipus</text:p>
          </table:table-cell>
          <table:table-cell table:style-name="Taula10.A3" office:value-type="string">
            <text:p text:style-name="P344">interessatTipus</text:p>
          </table:table-cell>
          <table:table-cell table:style-name="Taula10.A3" office:value-type="string">
            <text:p text:style-name="P345">0..1</text:p>
          </table:table-cell>
          <table:table-cell table:style-name="Taula10.A3" office:value-type="string">
            <text:p text:style-name="P340">19</text:p>
          </table:table-cell>
          <table:table-cell table:style-name="Taula10.E23" office:value-type="string">
            <text:p text:style-name="P300">Figura jurídica de la persona <text:line-break/>'1' = Administració.</text:p>
            <text:p text:style-name="P300"><text:soft-page-break/>'2' = Persona física.</text:p>
            <text:p text:style-name="P300">'3' = Persona jurídica.</text:p>
          </table:table-cell>
        </table:table-row>
      </table:table>
      <text:p text:style-name="P134"/>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692075792">
          <table:table-cell table:style-name="Taula11.A1" table:number-columns-spanned="5" office:value-type="string">
            <text:p text:style-name="P140">Interessa<text:span text:style-name="T271">t =&gt; tns:interessatBase</text:span></text:p>
          </table:table-cell>
          <table:covered-table-cell/>
          <table:covered-table-cell/>
          <table:covered-table-cell/>
          <table:covered-table-cell/>
        </table:table-row>
        <table:table-row table:style-name="TableLine692083856">
          <table:table-cell table:style-name="Taula11.A2" office:value-type="string">
            <text:p text:style-name="P32">Nom del camp</text:p>
          </table:table-cell>
          <table:table-cell table:style-name="Taula11.A2" office:value-type="string">
            <text:p text:style-name="P32">Tipus</text:p>
          </table:table-cell>
          <table:table-cell table:style-name="Taula11.A2" office:value-type="string">
            <text:p text:style-name="P32">Mult.</text:p>
          </table:table-cell>
          <table:table-cell table:style-name="Taula11.A2" office:value-type="string">
            <text:p text:style-name="P34">Tamany</text:p>
          </table:table-cell>
          <table:table-cell table:style-name="Taula11.E2" office:value-type="string">
            <text:p text:style-name="P34">Descripció</text:p>
          </table:table-cell>
        </table:table-row>
        <table:table-row table:style-name="TableLine692082704">
          <table:table-cell table:style-name="Taula11.A3" office:value-type="string">
            <text:p text:style-name="P346">representant</text:p>
          </table:table-cell>
          <table:table-cell table:style-name="Taula11.A3" office:value-type="string">
            <text:p text:style-name="P347">representant</text:p>
          </table:table-cell>
          <table:table-cell table:style-name="Taula11.A3" office:value-type="string">
            <text:p text:style-name="P254">0..1</text:p>
          </table:table-cell>
          <table:table-cell table:style-name="Taula11.D3">
            <text:p text:style-name="P254"/>
          </table:table-cell>
          <table:table-cell table:style-name="Taula11.E3" office:value-type="string">
            <text:p text:style-name="P339">Dades de la persona representant descrites amb les mateixes propietats que els interessats. </text:p>
          </table:table-cell>
        </table:table-row>
      </table:table>
      <text:p text:style-name="P250"/>
      <text:list xml:id="list175634556038526" text:continue-numbering="true" text:style-name="Outline">
        <text:list-item>
          <text:list>
            <text:list-item>
              <text:h text:style-name="P404" text:outline-level="2"><text:bookmark-start text:name="Còpia de Còpia de __RefHeading___Toc16776_2313926538 1 1"/><text:bookmark-start text:name="__RefHeading___Toc227363_390838441"/>Utilització del servei<text:bookmark-end text:name="Còpia de Còpia de __RefHeading___Toc16776_2313926538 1 1"/><text:bookmark-end text:name="__RefHeading___Toc227363_390838441"/></text:h>
            </text:list-item>
          </text:list>
        </text:list-item>
      </text:list>
      <text:p text:style-name="P233">Aquest servei disposa d’un client que facilita la seva utilització.</text:p>
      <text:p text:style-name="P234">Per a fer ús d’aquest client en una aplicació Java es pot utilitzar la següent dependència Maven:</text:p>
      <text:p text:style-name="P383"/>
      <text:p text:style-name="P242"><text:span text:style-name="T28"><text:s/><text:tab/> </text:span><text:span text:style-name="T15">&lt;</text:span><text:span text:style-name="T16">d</text:span><text:span text:style-name="T21">ependency</text:span><text:span text:style-name="T15">&gt;</text:span></text:p>
      <text:p text:style-name="P58"><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8"><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8"><text:span text:style-name="T28"><text:s/><text:tab/> <text:tab/> </text:span><text:span text:style-name="T15">&lt;</text:span><text:span text:style-name="T21">version</text:span><text:span text:style-name="T15">&gt;</text:span><text:span text:style-name="T29">1.0.</text:span><text:span text:style-name="T31">6</text:span><text:span text:style-name="T15">&lt;/</text:span><text:span text:style-name="T21">version</text:span><text:span text:style-name="T15">&gt;</text:span></text:p>
      <text:p text:style-name="P242"><text:span text:style-name="T28"><text:s/><text:tab/> </text:span><text:span text:style-name="T15">&lt;/</text:span><text:span text:style-name="T21">dependency</text:span><text:span text:style-name="T15">&gt;</text:span></text:p>
      <text:p text:style-name="P242"/>
      <text:p text:style-name="P234">Per a utilitzar aquesta dependència és necessari tenir configurat el següent repository:</text:p>
      <text:p text:style-name="P385"/>
      <text:p text:style-name="P240"><text:span text:style-name="T28"><text:s/><text:tab/> </text:span><text:span text:style-name="T15">&lt;</text:span><text:span text:style-name="T21">repository</text:span><text:span text:style-name="T15">&gt;</text:span></text:p>
      <text:p text:style-name="P58"><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8"><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8"><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0"><text:span text:style-name="T28"><text:s/><text:tab/> </text:span><text:span text:style-name="T15">&lt;/</text:span><text:span text:style-name="T21">repository</text:span><text:span text:style-name="T15">&gt;</text:span></text:p>
      <text:p text:style-name="P240"/>
      <text:p text:style-name="P233"/>
      <text:p text:style-name="P233">Aquesta dependència ens dona accés a la classe BackofficeIntegracioRestClient que ens permet fer cridades al servei. En el següent fragment de codi es pot veure un exemple de com utilitzar aquesta classe per a fer cridades al servei:</text:p>
      <text:p text:style-name="P105"/>
      <text:p text:style-name="P57"><text:span text:style-name="T53"><text:tab/><text:tab/></text:span><text:span text:style-name="T54">BackofficeIntegracioRestClient </text:span><text:span text:style-name="T81">restClient</text:span><text:span text:style-name="T53"> = BackofficeIntegracioRestClientFactory.</text:span><text:span text:style-name="T56">getRestClient</text:span><text:span text:style-name="T53">(</text:span></text:p>
      <text:p text:style-name="P52"><text:span text:style-name="T53"><text:tab/><text:tab/><text:tab/><text:tab/></text:span><text:span text:style-name="T32">"http://DISTRIB_HOST/distribucioapi/interna"</text:span><text:span text:style-name="T53">,</text:span></text:p>
      <text:p text:style-name="P52"><text:span text:style-name="T53"><text:tab/><text:tab/><text:tab/><text:tab/></text:span><text:span text:style-name="T32">"USERNAME"</text:span><text:span text:style-name="T53">,</text:span></text:p>
      <text:p text:style-name="P52"><text:span text:style-name="T53"><text:tab/><text:tab/><text:tab/><text:tab/></text:span><text:span text:style-name="T32">"PASSWORD"</text:span><text:span text:style-name="T53">);</text:span></text:p>
      <text:p text:style-name="P52"><text:span text:style-name="T53"><text:tab/><text:tab/>AnotacioRegistreId </text:span><text:span text:style-name="T81">id</text:span><text:span text:style-name="T53"> = </text:span><text:span text:style-name="T46">new</text:span><text:span text:style-name="T53"> AnotacioRegistreId(</text:span></text:p>
      <text:p text:style-name="P52"><text:span text:style-name="T53"><text:tab/><text:tab/><text:tab/><text:tab/></text:span><text:span text:style-name="T32">"GOIBE1708001141307/2024"</text:span><text:span text:style-name="T53">,</text:span></text:p>
      <text:p text:style-name="P52"><text:span text:style-name="T53"><text:tab/><text:tab/><text:tab/><text:tab/></text:span><text:span text:style-name="T32">"BYlMBmFPLGJSytavAH325Yjbwqo9xfXhM+wM0vzHxL4="</text:span><text:span text:style-name="T53">);</text:span></text:p>
      <text:p text:style-name="P57"><text:span text:style-name="T53"><text:tab/><text:tab/>AnotacioRegistreEntrada </text:span><text:span text:style-name="T81">anotacio</text:span><text:span text:style-name="T53"> = </text:span><text:span text:style-name="T81">restClient</text:span><text:span text:style-name="T53">.consulta(</text:span><text:span text:style-name="T81">id</text:span><text:span text:style-name="T53">);</text:span></text:p>
      <text:p text:style-name="P108"/>
      <text:p text:style-name="P46"/>
      <text:list xml:id="list175634087247995" text:continue-numbering="true" text:style-name="Outline">
        <text:list-item>
          <text:h text:style-name="P397" text:outline-level="1"><text:bookmark-start text:name="Còpia de __RefHeading___Toc160470_1680181998 1"/><text:bookmark-start text:name="__RefHeading___Toc227365_390838441"/><text:bookmark-start text:name="Còpia de __RefNumPara__81017_1680181998 1"/>Servei de gestió <text:span text:style-name="T333">de regles</text:span><text:bookmark-end text:name="Còpia de __RefHeading___Toc160470_1680181998 1"/><text:bookmark-end text:name="__RefHeading___Toc227365_390838441"/><text:bookmark-end text:name="Còpia de __RefNumPara__81017_1680181998 1"/></text:h>
        </text:list-item>
      </text:list>
      <text:p text:style-name="P230">Aquest servei permet <text:span text:style-name="T321">als backoffices </text:span><text:span text:style-name="T335">gestionar les regles per a la distribució automàtica de les anotacions de registre.</text:span></text:p>
      <text:p text:style-name="P215"><draw:frame draw:style-name="fr3" draw:name="Marc4" text:anchor-type="as-char" svg:width="9.763cm" draw:z-index="77"><draw:text-box fo:min-height="10.636cm"><text:p text:style-name="P225"><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35">C</text:span><text:span text:style-name="T313">asos d'ús </text:span><text:span text:style-name="T334">de gestió </text:span><text:span text:style-name="T315">d</text:span><text:span text:style-name="T335">e regles</text:span><text:span text:style-name="T315"> a </text:span><text:span text:style-name="T313">DISTRIBUCIÓ</text:span></text:p></draw:text-box></draw:frame></text:p>
      <text:p text:style-name="P213"/>
      <text:list xml:id="list175633193948727" text:continue-numbering="true" text:style-name="Outline">
        <text:list-item>
          <text:list>
            <text:list-item>
              <text:h text:style-name="P405" text:outline-level="2"><text:bookmark-start text:name="Còpia de Còpia de Còpia de __RefHeading___Toc16772_2313926538 2 1 4"/><text:bookmark-start text:name="__RefHeading___Toc227367_390838441"/><text:bookmark-start text:name="Còpia de Còpia de Còpia de __RefNumPara__80988_1680181998 2 1 4"/>Descripció del servei<text:bookmark-end text:name="Còpia de Còpia de Còpia de __RefHeading___Toc16772_2313926538 2 1 4"/><text:bookmark-end text:name="__RefHeading___Toc227367_390838441"/><text:bookmark-end text:name="Còpia de Còpia de Còpia de __RefNumPara__80988_1680181998 2 1 4"/></text:h>
            </text:list-item>
          </text:list>
        </text:list-item>
      </text:list>
      <text:p text:style-name="P205">Per tal de facilitar la creació automàtica de regles de tipus enviar a backoffice segons un codi SIA de procediment <text:span text:style-name="T309">DISTRIBUCIO</text:span> ofereix una API REST de creació, <text:s/>consulta i modificació de regles. Les dades bàsiques d'aquesta API REST de regles són les següents:</text:p>
      <text:list xml:id="list658305045" text:style-name="L7">
        <text:list-item>
          <text:p text:style-name="P447">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06">se</text:span></text:a><text:a xlink:type="simple" xlink:href="https://se.caib.es/distribucioapi/interna/regla" text:style-name="Internet_20_link" text:visited-style-name="Visited_20_Internet_20_Link"><text:span text:style-name="T280">.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80">egla</text:span></text:a></text:p>
        </text:list-item>
        <text:list-item>
          <text:p text:style-name="P448">Documentació Swagger: <text:a xlink:type="simple" xlink:href="https://se.caib.es/distribucioapi/interna/api/rest" text:style-name="Internet_20_link" text:visited-style-name="Visited_20_Internet_20_Link"><text:span text:style-name="T279">https://</text:span></text:a><text:a xlink:type="simple" xlink:href="https://se.caib.es/distribucioapi/interna/api/rest" text:style-name="Internet_20_link" text:visited-style-name="Visited_20_Internet_20_Link"><text:span text:style-name="T306">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79">/distribucioapi/interna</text:span></text:a></text:p>
        </text:list-item>
        <text:list-item>
          <text:p text:style-name="P448">Autenticació: WSBASIC</text:p>
        </text:list-item>
        <text:list-item>
          <text:p text:style-name="P448">Rol necessari: DIS_REGLA</text:p>
        </text:list-item>
      </text:list>
      <text:list xml:id="list175633706241400" text:continue-list="list175633193948727" text:style-name="Outline">
        <text:list-item>
          <text:list>
            <text:list-item>
              <text:list>
                <text:list-item>
                  <text:h text:style-name="P415" text:outline-level="3"><text:bookmark-start text:name="Còpia de __RefHeading___Toc53751_2521683781 1"/><text:bookmark-start text:name="__RefHeading___Toc227369_390838441"/><text:soft-page-break/>Crear una regla<text:bookmark-end text:name="Còpia de __RefHeading___Toc53751_2521683781 1"/><text:bookmark-end text:name="__RefHeading___Toc227369_390838441"/></text:h>
                </text:list-item>
              </text:list>
            </text:list-item>
          </text:list>
        </text:list-item>
      </text:list>
      <text:p text:style-name="P196">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71">Crear una regla</text:p>
          </table:table-cell>
          <table:covered-table-cell/>
        </table:table-row>
        <table:table-row table:style-name="TableLine692086448">
          <table:table-cell table:style-name="Taula26.A2" office:value-type="string">
            <text:p text:style-name="P30">URL</text:p>
          </table:table-cell>
          <table:table-cell table:style-name="Taula26.B2" office:value-type="string">
            <text:p text:style-name="P194">http<text:span text:style-name="T320">s</text:span>://<text:span text:style-name="T320">DISTRIB_HOST/distribucioapi/interna</text:span>/regla/add</text:p>
          </table:table-cell>
        </table:table-row>
        <table:table-row table:style-name="TableLine692085296">
          <table:table-cell table:style-name="Taula26.A7" office:value-type="string">
            <text:p text:style-name="P36">Mètode</text:p>
          </table:table-cell>
          <table:table-cell table:style-name="Taula26.B7" office:value-type="string">
            <text:p text:style-name="P210">POST</text:p>
          </table:table-cell>
        </table:table-row>
        <table:table-row table:style-name="TableLine691985648">
          <table:table-cell table:style-name="Taula26.A7" office:value-type="string">
            <text:p text:style-name="P30">Descripció</text:p>
          </table:table-cell>
          <table:table-cell table:style-name="Taula26.B7" office:value-type="string">
            <text:p text:style-name="P42">Dona d'alta una regla pel backoffice i codi SIA indicat per a l'entitat indicada.</text:p>
          </table:table-cell>
        </table:table-row>
        <table:table-row table:style-name="TableLine691985360">
          <table:table-cell table:style-name="Taula26.A7" office:value-type="string">
            <text:p text:style-name="P36">Autenticació</text:p>
          </table:table-cell>
          <table:table-cell table:style-name="Taula26.B7" office:value-type="string">
            <text:p text:style-name="P368">HTTP Basic</text:p>
          </table:table-cell>
        </table:table-row>
        <table:table-row table:style-name="TableLine691985072">
          <table:table-cell table:style-name="Taula26.A7" office:value-type="string">
            <text:p text:style-name="P36">Rols requerits</text:p>
          </table:table-cell>
          <table:table-cell table:style-name="Taula26.B7" office:value-type="string">
            <text:p text:style-name="P368">DIS_REGLA</text:p>
          </table:table-cell>
        </table:table-row>
        <table:table-row table:style-name="TableLine691984784">
          <table:table-cell table:style-name="Taula26.A7" office:value-type="string">
            <text:p text:style-name="P30">Paràmetres</text:p>
          </table:table-cell>
          <table:table-cell table:style-name="Taula26.B7" office:value-type="string">
            <text:list xml:id="list3576695615" text:style-name="L8">
              <text:list-item>
                <text:p text:style-name="P424"><text:span text:style-name="T40">entitat</text:span><text:span text:style-name="T281">: Codi de l'entitat de DISTRIBUCIO on crear la regla. Típicament per l'entorn del Govern el codi d'entitat és "A04003003".</text:span><text:span text:style-name="T283"> Aquest paràmetre és obligatori.</text:span></text:p>
              </text:list-item>
              <text:list-item>
                <text:p text:style-name="P424"><text:span text:style-name="T40">sia</text:span><text:span text:style-name="T281">: Codi de procediment SIA per crear la regla i aplicar-la a les anotacions que es donin d'alta amb aquest codi</text:span><text:span text:style-name="T310"> </text:span><text:span text:style-name="T281">de procediment.</text:span><text:span text:style-name="T283"> Aquest paràmetre és obligatori.</text:span></text:p>
              </text:list-item>
              <text:list-item>
                <text:p text:style-name="P437">tipusSia<text:span text:style-name="T216">: Codi per indicar si la regla aplica al codi SIA del procediment o del servei. Els possibles valors són 'PROCEDIMENT' i 'SERVEI'. És un paràmetre opcional i per defecte es creen les regles pel SIA del procediment.</text:span></text:p>
              </text:list-item>
              <text:list-item>
                <text:p text:style-name="P424"><text:span text:style-name="T40">backoffice</text:span><text:span text:style-name="T281">: Codi del backoffice pel qual donar d'alta la regla. El backoffice ha d'estar donat d'alta en el manteniment de backoffices a DISTRIBUCIO per l'entitat indicada.</text:span><text:span text:style-name="T283"> Aquest paràmetre és obligatori.</text:span></text:p>
              </text:list-item>
            </text:list>
          </table:table-cell>
        </table:table-row>
        <table:table-row table:style-name="TableLine691984496">
          <table:table-cell table:style-name="Taula26.A8" office:value-type="string">
            <text:p text:style-name="P30">Resultat</text:p>
          </table:table-cell>
          <table:table-cell table:style-name="Taula26.B8" office:value-type="string">
            <text:list xml:id="list2114511456" text:style-name="L9">
              <text:list-item>
                <text:p text:style-name="P429">HTTP 200 <text:span text:style-name="T282">si la regla s'ha creat correctament o ja existia pel mateix backoffice i com a cos <text:s/>de la resposta es retorna el text de missatge de confirmació</text:span>.</text:p>
              </text:list-item>
              <text:list-item>
                <text:p text:style-name="P433">HTTP 404 si l'entitat o el backoffice no es troba per codi.</text:p>
              </text:list-item>
              <text:list-item>
                <text:p text:style-name="P433">HTTP 406 si ja existeix una regla pel mateix codi de procediment però per un altre backoffice.</text:p>
              </text:list-item>
              <text:list-item>
                <text:p text:style-name="P433">HTTP 500 si es produe<text:span text:style-name="T310">i</text:span>x un error intern no controlat creant la regla.</text:p>
              </text:list-item>
            </text:list>
          </table:table-cell>
        </table:table-row>
      </table:table>
      <text:p text:style-name="P195"/>
      <text:list xml:id="list175634003409248" text:continue-list="list175633706241400" text:style-name="Outline">
        <text:list-item>
          <text:list>
            <text:list-item>
              <text:list>
                <text:list-item>
                  <text:h text:style-name="P416" text:outline-level="3"><text:bookmark-start text:name="Còpia de Còpia de __RefHeading___Toc53751_2521683781 1 1"/><text:bookmark-start text:name="__RefHeading___Toc227371_390838441"/>Canviar estat d’una regla<text:bookmark-end text:name="Còpia de Còpia de __RefHeading___Toc53751_2521683781 1 1"/><text:bookmark-end text:name="__RefHeading___Toc227371_390838441"/></text:h>
                </text:list-item>
              </text:list>
            </text:list-item>
          </text:list>
        </text:list-item>
      </text:list>
      <text:p text:style-name="P196">Aquest mètode permet <text:span text:style-name="T335">activar o desactivar una </text:span><text:span text:style-name="T284">regla de tipus enviament a backoffice a partir del codi SIA del procedi</text:span><text:span text:style-name="T310">m</text:span><text:span text:style-name="T284">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71">Canviar estat d’una regla</text:p>
          </table:table-cell>
          <table:covered-table-cell/>
        </table:table-row>
        <table:table-row table:style-name="TableLine691982480">
          <table:table-cell table:style-name="Taula16.A2" office:value-type="string">
            <text:p text:style-name="P30">URL</text:p>
          </table:table-cell>
          <table:table-cell table:style-name="Taula16.B2" office:value-type="string">
            <text:p text:style-name="P194">http<text:span text:style-name="T320">s</text:span>://<text:span text:style-name="T320">DISTRIB_HOST/distribucioapi/interna</text:span>/regla/<text:span text:style-name="T280">canviEstat</text:span></text:p>
          </table:table-cell>
        </table:table-row>
        <table:table-row table:style-name="TableLine691981616">
          <table:table-cell table:style-name="Taula16.A7" office:value-type="string">
            <text:p text:style-name="P36">Mètode</text:p>
          </table:table-cell>
          <table:table-cell table:style-name="Taula16.B7" office:value-type="string">
            <text:p text:style-name="P210">POST</text:p>
          </table:table-cell>
        </table:table-row>
        <table:table-row table:style-name="TableLine691980752">
          <table:table-cell table:style-name="Taula16.A7" office:value-type="string">
            <text:p text:style-name="P30">Descripció</text:p>
          </table:table-cell>
          <table:table-cell table:style-name="Taula16.B7" office:value-type="string">
            <text:p text:style-name="P42"><text:span text:style-name="T335">Canvia l’estat d’una regla donat el codi SIA del procediment</text:span>.</text:p>
          </table:table-cell>
        </table:table-row>
        <table:table-row table:style-name="TableLine691980176">
          <table:table-cell table:style-name="Taula16.A7" office:value-type="string">
            <text:p text:style-name="P36">Autenticació</text:p>
          </table:table-cell>
          <table:table-cell table:style-name="Taula16.B7" office:value-type="string">
            <text:p text:style-name="P368">HTTP Basic</text:p>
          </table:table-cell>
        </table:table-row>
        <text:soft-page-break/>
        <table:table-row table:style-name="TableLine691980464">
          <table:table-cell table:style-name="Taula16.A7" office:value-type="string">
            <text:p text:style-name="P36">Rols requerits</text:p>
          </table:table-cell>
          <table:table-cell table:style-name="Taula16.B7" office:value-type="string">
            <text:p text:style-name="P368">DIS_REGLA</text:p>
          </table:table-cell>
        </table:table-row>
        <table:table-row table:style-name="TableLine691979888">
          <table:table-cell table:style-name="Taula16.A7" office:value-type="string">
            <text:p text:style-name="P30">Paràmetres</text:p>
          </table:table-cell>
          <table:table-cell table:style-name="Taula16.B7" office:value-type="string">
            <text:list xml:id="list175634794148175" text:continue-list="list3576695615" text:style-name="L8">
              <text:list-item>
                <text:p text:style-name="P424"><text:span text:style-name="T40">sia</text:span><text:span text:style-name="T281">: Codi de procediment SIA per </text:span><text:span text:style-name="T284">trobar la regla associada</text:span><text:span text:style-name="T281">.</text:span><text:span text:style-name="T283"> Aquest paràmetre és obligatori.</text:span></text:p>
              </text:list-item>
              <text:list-item>
                <text:p text:style-name="P424"><text:span text:style-name="T45">activa</text:span><text:span text:style-name="T281">: </text:span>Paràmetre opcional <text:span text:style-name="T284">de tipus booleà </text:span>per activar o desactivar la regla. Si on s'especifica es canvia segons el valor que tingui actualment.<text:span text:style-name="T284"> Per exemple </text:span><text:span text:style-name="T140">activa=true</text:span><text:span text:style-name="T172">.</text:span></text:p>
              </text:list-item>
            </text:list>
          </table:table-cell>
        </table:table-row>
        <table:table-row table:style-name="TableLine691979024">
          <table:table-cell table:style-name="Taula16.A8" office:value-type="string">
            <text:p text:style-name="P30">Resultat</text:p>
          </table:table-cell>
          <table:table-cell table:style-name="Taula16.B8" office:value-type="string">
            <text:list xml:id="list2647497557" text:style-name="L10">
              <text:list-item>
                <text:p text:style-name="P430">HTTP 200 <text:span text:style-name="T282">si </text:span><text:span text:style-name="T284">la regla s'ha pogut modificar correctament</text:span>.<text:span text:style-name="T286"> Com a cos del missatge de resposta es retorna el text de confirmació conforme si la regla s'ha activat o desactivat correctament. Per exemple "La regla amb codi 12354 s'ha desactivat correctament.".</text:span></text:p>
              </text:list-item>
              <text:list-item>
                <text:p text:style-name="P434">HTTP <text:span text:style-name="T284">409</text:span> si <text:span text:style-name="T284">no s'ha trobat cap regla el codi de procediment SIA.</text:span></text:p>
              </text:list-item>
              <text:list-item>
                <text:p text:style-name="P434">HTTP 500 si es produe<text:span text:style-name="T310">i</text:span>x un error intern no controlat <text:span text:style-name="T284">modificant</text:span> la regla.</text:p>
              </text:list-item>
            </text:list>
          </table:table-cell>
        </table:table-row>
      </table:table>
      <text:p text:style-name="P196"/>
      <text:list xml:id="list175634346509485" text:continue-list="list175634003409248" text:style-name="Outline">
        <text:list-item>
          <text:list>
            <text:list-item>
              <text:list>
                <text:list-item>
                  <text:h text:style-name="P416" text:outline-level="3"><text:bookmark-start text:name="Còpia de Còpia de Còpia de __RefHeading___Toc53751_2521683781 1 1 1"/><text:bookmark-start text:name="__RefHeading___Toc227373_390838441"/>Consultar informació d’una regla<text:bookmark-end text:name="Còpia de Còpia de Còpia de __RefHeading___Toc53751_2521683781 1 1 1"/><text:bookmark-end text:name="__RefHeading___Toc227373_390838441"/></text:h>
                </text:list-item>
              </text:list>
            </text:list-item>
          </text:list>
        </text:list-item>
      </text:list>
      <text:p text:style-name="P226">Aquest mètode <text:span text:style-name="T284">permet consultar els detalls d'una regla a partir del codi SIA del procediment. En el cos de la respo</text:span><text:span text:style-name="T310">s</text:span><text:span text:style-name="T284">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72"><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691964912">
          <table:table-cell table:style-name="Taula21.A2" office:value-type="string">
            <text:p text:style-name="P30">URL</text:p>
          </table:table-cell>
          <table:table-cell table:style-name="Taula21.B2" office:value-type="string">
            <text:p text:style-name="P194">http<text:span text:style-name="T320">s</text:span>://<text:span text:style-name="T320">DISTRIB_HOST/distribucioapi/interna</text:span>/regla/consultarRegla</text:p>
          </table:table-cell>
        </table:table-row>
        <table:table-row table:style-name="TableLine691958576">
          <table:table-cell table:style-name="Taula21.A7" office:value-type="string">
            <text:p text:style-name="P36">Mètode</text:p>
          </table:table-cell>
          <table:table-cell table:style-name="Taula21.B7" office:value-type="string">
            <text:p text:style-name="P210">POST</text:p>
          </table:table-cell>
        </table:table-row>
        <table:table-row table:style-name="TableLine691961168">
          <table:table-cell table:style-name="Taula21.A7" office:value-type="string">
            <text:p text:style-name="P30">Descripció</text:p>
          </table:table-cell>
          <table:table-cell table:style-name="Taula21.B7" office:value-type="string">
            <text:p text:style-name="P216">Consulta les regles <text:span text:style-name="T335">que coincideixin amb el codi SIA especificat</text:span>. En principi només hi pot haver una regla de tipus backoffice per codi SIA<text:span text:style-name="T286"> però per compatibilitat es retorna una llista de regles que podrien estar creades pel mateix codi SIA de procediment anteriorment.</text:span></text:p>
          </table:table-cell>
        </table:table-row>
        <table:table-row table:style-name="TableLine329250240">
          <table:table-cell table:style-name="Taula21.A7" office:value-type="string">
            <text:p text:style-name="P36">Autenticació</text:p>
          </table:table-cell>
          <table:table-cell table:style-name="Taula21.B7" office:value-type="string">
            <text:p text:style-name="P368">HTTP Basic</text:p>
          </table:table-cell>
        </table:table-row>
        <table:table-row table:style-name="TableLine329249952">
          <table:table-cell table:style-name="Taula21.A7" office:value-type="string">
            <text:p text:style-name="P36">Rols requerits</text:p>
          </table:table-cell>
          <table:table-cell table:style-name="Taula21.B7" office:value-type="string">
            <text:p text:style-name="P368">DIS_REGLA</text:p>
          </table:table-cell>
        </table:table-row>
        <table:table-row table:style-name="TableLine329257152">
          <table:table-cell table:style-name="Taula21.A7" office:value-type="string">
            <text:p text:style-name="P30">Paràmetres</text:p>
          </table:table-cell>
          <table:table-cell table:style-name="Taula21.B7" office:value-type="string">
            <text:list xml:id="list175634881768040" text:continue-list="list175634794148175" text:style-name="L8">
              <text:list-item>
                <text:p text:style-name="P424"><text:span text:style-name="T198">sia</text:span><text:span text:style-name="T173">: </text:span><text:span text:style-name="T172">Codi SIA de la regla que identifica la regla de tipus backoffice.</text:span></text:p>
              </text:list-item>
            </text:list>
          </table:table-cell>
        </table:table-row>
        <table:table-row table:style-name="TableLine329252544">
          <table:table-cell table:style-name="Taula21.A8" office:value-type="string">
            <text:p text:style-name="P30">Resultat</text:p>
          </table:table-cell>
          <table:table-cell table:style-name="Taula21.B8" office:value-type="string">
            <text:list xml:id="list2953440456" text:style-name="L11">
              <text:list-item>
                <text:p text:style-name="P425"><text:span text:style-name="T281">HTTP 200 </text:span><text:span text:style-name="T282">si </text:span><text:span text:style-name="T284">la regla s'ha pogut </text:span><text:span text:style-name="T285">consultar</text:span><text:span text:style-name="T284"> correctament</text:span><text:span text:style-name="T281">.</text:span><text:span text:style-name="T286"> En el cos del missatge hi ha el JSON amb la llista de regles i els seus detalls, per exemple:</text:span></text:p>
                <text:list>
                  <text:list-item>
                    <text:p text:style-name="P439">Petició:</text:p>
                    <text:list>
                      <text:list-item>
                        <text:p text:style-name="P439">GET https://<text:span text:style-name="T306">se</text:span>.caib.es/distribucioapi/interna/regla/consultarRegla?sia=20220429</text:p>
                      </text:list-item>
                    </text:list>
                  </text:list-item>
                  <text:list-item>
                    <text:p text:style-name="P439">Cos de la resposta</text:p>
                  </text:list-item>
                </text:list>
              </text:list-item>
            </text:list>
            <text:p text:style-name="P203">[</text:p>
            <text:p text:style-name="P203"><text:s text:c="4"/>{</text:p>
            <text:p text:style-name="P203"><text:s text:c="8"/>"id": 1485186,</text:p>
            <text:p text:style-name="P203"><text:s text:c="8"/>"entitat": "Govern de les Illes Balears",</text:p>
            <text:p text:style-name="P203"><text:s text:c="8"/>"data": "13/05/2022 16:51:55",</text:p>
            <text:p text:style-name="P203"><text:s text:c="8"/>"activa": true,</text:p>
            <text:p text:style-name="P203"><text:soft-page-break/><text:s text:c="8"/>"nom": "helium 20220429",</text:p>
            <text:p text:style-name="P204"><text:s text:c="8"/>"tipusSia": "PROCEDIMENT",</text:p>
            <text:p text:style-name="P203"><text:s text:c="8"/>"backofficeDesti": "HELIUM DEV"</text:p>
            <text:p text:style-name="P203"><text:s text:c="4"/>}</text:p>
            <text:p text:style-name="P203">]</text:p>
            <text:list xml:id="list3662985587" text:style-name="L12">
              <text:list-item>
                <text:p text:style-name="P440">Els camps de la resposta són els següents:</text:p>
                <text:list>
                  <text:list-item>
                    <text:p text:style-name="P440">id: identificador intern de la regla de tipus long.</text:p>
                  </text:list-item>
                  <text:list-item>
                    <text:p text:style-name="P440">entitat: Descripció de l'entitat de DISTRIBUCIO a la qual pertany la regla. Tipus String.</text:p>
                  </text:list-item>
                  <text:list-item>
                    <text:p text:style-name="P440">data: Data de creació de la regla. String amb format "dd/MM/yyyy HH:mm:ss".</text:p>
                  </text:list-item>
                  <text:list-item>
                    <text:p text:style-name="P440">nom: Nom posat a la regla.</text:p>
                  </text:list-item>
                  <text:list-item>
                    <text:p text:style-name="P440">tipusSia<text:span text:style-name="T338">: Indica si la regla s'aplica pel codi SIA del procediment assignat a l'anotació o pel codi SIA del servei assignat a l'anotació.</text:span><text:span text:style-name="T343"> Els possibles valors són "PROCEDIMENT" o "SERVEI".</text:span></text:p>
                  </text:list-item>
                  <text:list-item>
                    <text:p text:style-name="P440">backofficeDesti: Codi del backoffice al qual es notifiquen les anotacions afectades per la regla.</text:p>
                  </text:list-item>
                </text:list>
              </text:list-item>
              <text:list-item>
                <text:p text:style-name="P435">HTTP <text:span text:style-name="T285">404</text:span> si <text:span text:style-name="T284">no s'ha trobat cap regla el codi de procediment SIA.</text:span></text:p>
              </text:list-item>
            </text:list>
          </table:table-cell>
        </table:table-row>
      </table:table>
      <text:p text:style-name="P196"/>
      <text:list xml:id="list175633930053679" text:continue-list="list175634346509485" text:style-name="Outline">
        <text:list-item>
          <text:list>
            <text:list-item>
              <text:h text:style-name="P405" text:outline-level="2"><text:bookmark-start text:name="Còpia de Còpia de Còpia de __RefHeading___Toc16776_2313926538 1 1 1"/><text:bookmark-start text:name="__RefHeading___Toc227375_390838441"/>Utilització del servei<text:bookmark-end text:name="Còpia de Còpia de Còpia de __RefHeading___Toc16776_2313926538 1 1 1"/><text:bookmark-end text:name="__RefHeading___Toc227375_390838441"/></text:h>
            </text:list-item>
          </text:list>
        </text:list-item>
      </text:list>
      <text:p text:style-name="P234">Aquest servei disposa d’un client que facilita la seva utilització.</text:p>
      <text:p text:style-name="P234">Per a fer ús d’aquest client en una aplicació Java es pot utilitzar la següent dependència Maven:</text:p>
      <text:p text:style-name="P383"/>
      <text:p text:style-name="P242"><text:span text:style-name="T28"><text:s/><text:tab/> </text:span><text:span text:style-name="T15">&lt;</text:span><text:span text:style-name="T16">d</text:span><text:span text:style-name="T21">ependency</text:span><text:span text:style-name="T15">&gt;</text:span></text:p>
      <text:p text:style-name="P58"><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8"><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8"><text:span text:style-name="T28"><text:s/><text:tab/> <text:tab/> </text:span><text:span text:style-name="T15">&lt;</text:span><text:span text:style-name="T21">version</text:span><text:span text:style-name="T15">&gt;</text:span><text:span text:style-name="T29">1.0.</text:span><text:span text:style-name="T31">6</text:span><text:span text:style-name="T15">&lt;/</text:span><text:span text:style-name="T21">version</text:span><text:span text:style-name="T15">&gt;</text:span></text:p>
      <text:p text:style-name="P242"><text:span text:style-name="T28"><text:s/><text:tab/> </text:span><text:span text:style-name="T15">&lt;/</text:span><text:span text:style-name="T21">dependency</text:span><text:span text:style-name="T15">&gt;</text:span></text:p>
      <text:p text:style-name="P242"/>
      <text:p text:style-name="P234">Per a utilitzar aquesta dependència és necessari tenir configurat el següent repository:</text:p>
      <text:p text:style-name="P385"/>
      <text:p text:style-name="P240"><text:span text:style-name="T28"><text:s/><text:tab/> </text:span><text:span text:style-name="T15">&lt;</text:span><text:span text:style-name="T21">repository</text:span><text:span text:style-name="T15">&gt;</text:span></text:p>
      <text:p text:style-name="P58"><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8"><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8"><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40"><text:span text:style-name="T28"><text:s/><text:tab/> </text:span><text:span text:style-name="T15">&lt;/</text:span><text:span text:style-name="T21">repository</text:span><text:span text:style-name="T15">&gt;</text:span></text:p>
      <text:p text:style-name="P240"/>
      <text:p text:style-name="P151"/>
      <text:p text:style-name="P235">Aquesta dependència ens dona accés a la classe ReglesRestClient que ens permet fer cridades al servei. En el següent fragment de codi es pot veure un exemple de com utilitzar aquesta classe per a fer cridades al servei:</text:p>
      <text:p text:style-name="P106"/>
      <text:p text:style-name="P59"><text:span text:style-name="T53"><text:tab/><text:tab/>ReglesRestClient</text:span><text:span text:style-name="T54"> </text:span><text:span text:style-name="T81">restClient</text:span><text:span text:style-name="T53"> = ReglesRestClientFactory.</text:span><text:span text:style-name="T56">getRestClient</text:span><text:span text:style-name="T53">(</text:span></text:p>
      <text:p text:style-name="P59"><text:soft-page-break/><text:span text:style-name="T53"><text:tab/><text:tab/><text:tab/><text:tab/></text:span><text:span text:style-name="T32">"http://DISTRIB_HOST/distribucioapi/interna"</text:span><text:span text:style-name="T53">,</text:span></text:p>
      <text:p text:style-name="P59"><text:span text:style-name="T53"><text:tab/><text:tab/><text:tab/><text:tab/></text:span><text:span text:style-name="T32">"USERNAME"</text:span><text:span text:style-name="T53">,</text:span></text:p>
      <text:p text:style-name="P59"><text:span text:style-name="T53"><text:tab/><text:tab/><text:tab/><text:tab/></text:span><text:span text:style-name="T32">"PASSWORD"</text:span><text:span text:style-name="T53">);</text:span></text:p>
      <text:p text:style-name="P60"><text:span text:style-name="T53"><text:tab/><text:tab/></text:span><text:span text:style-name="T55">Regla</text:span><text:span text:style-name="T53"> </text:span><text:span text:style-name="T82">regla</text:span><text:span text:style-name="T53"> = </text:span><text:span text:style-name="T81">restClient</text:span><text:span text:style-name="T53">.consulta</text:span><text:span text:style-name="T55">Regla</text:span><text:span text:style-name="T53">(</text:span><text:span text:style-name="T32">"</text:span><text:span text:style-name="T33">CODI_SIA</text:span><text:span text:style-name="T32">"</text:span><text:span text:style-name="T53">);</text:span></text:p>
      <text:p text:style-name="P109"/>
      <text:p text:style-name="P191"/>
      <text:list xml:id="list175634545670100" text:continue-numbering="true" text:style-name="Outline">
        <text:list-item>
          <text:h text:style-name="P398" text:outline-level="1"><text:bookmark-start text:name="__RefHeading___Toc60794_1326387233"/>Llibreria d'utilitats pels backoffices de DISTRIBUCIO<text:bookmark-end text:name="__RefHeading___Toc60794_1326387233"/></text:h>
        </text:list-item>
      </text:list>
      <text:p text:style-name="P130"><text:span text:style-name="T128"><text:s/></text:span>Amb l'objectiu de facilitar la integració dels backoffices amb DISTRIBUCIO <text:span text:style-name="T128">s'ha creat la llibreria </text:span><text:span text:style-name="T130">distribucio-backoffice-utils</text:span><text:span text:style-name="T158"> amb mètodes per facilitar </text:span><text:span text:style-name="T167">tasques comunes dels backoffices per a que s'hagi de fer una implementació específica per cada backoffice com, per exemple, </text:span><text:span text:style-name="T158">traspassar la informació des dels expedients de l'Arxiu de Distribució cap als expedients dins l'Arxiu dels backoffices</text:span><text:span text:style-name="T167"> o extreure dades de documents tècnics de Sistra2.</text:span></text:p>
      <text:p text:style-name="P61"/>
      <text:p text:style-name="P128"><text:span text:style-name="T158"><text:s/>La motivació d'aquesta llibreria és unificar la forma en què els backoffices </text:span><text:span text:style-name="T176">mo</text:span><text:span text:style-name="T181">u</text:span><text:span text:style-name="T176">en la informació des dels expedients de DISTRIBUCIO cap als seus propis expedients dins l'Arxiu. </text:span><text:span text:style-name="T177">D'aquesta forma les crides per moure el contingut i els interessats s'encapsula dins d'una funció que ja té en compte els diferents errors que es poden produir o si els annexos o els interessats ja s'han traspassat en un intent anterior.</text:span></text:p>
      <text:p text:style-name="P71"/>
      <text:p text:style-name="P71">En els següents punts des descriu la llibreria, com funciona i com utilitzar-la.</text:p>
      <text:list xml:id="list175634846369072" text:continue-numbering="true" text:style-name="Outline">
        <text:list-item>
          <text:list>
            <text:list-item>
              <text:h text:style-name="P409" text:outline-level="2"><text:bookmark-start text:name="__RefHeading___Toc50902_2907556958"/>Informació de la llibreria<text:bookmark-end text:name="__RefHeading___Toc50902_2907556958"/></text:h>
            </text:list-item>
          </text:list>
        </text:list-item>
      </text:list>
      <text:p text:style-name="P78">La llibreria consisteix en <text:span text:style-name="T242">classes </text:span>interfície<text:span text:style-name="T242">s</text:span> <text:span text:style-name="T157">amb els mètodes de suport pels </text:span><text:span text:style-name="T129">backoffices</text:span><text:span text:style-name="T157"> i classe</text:span><text:span text:style-name="T170">s</text:span><text:span text:style-name="T157"> amb la implementació</text:span><text:span text:style-name="T170">. La llista de classes d'utilitats són les següents:</text:span></text:p>
      <text:p text:style-name="P64"/>
      <text:list xml:id="list2849575029" text:style-name="L13">
        <text:list-item>
          <text:p text:style-name="P420"><text:span text:style-name="T138">BackofficeArxiuUtils</text:span><text:span text:style-name="T170">: Aquesta classe d'uilitats conté mètodes per tractar les anotacions i crear un expedient a l'Arxiu del backoffice. </text:span><text:span text:style-name="T187"><text:s/></text:span><text:span text:style-name="T188">C</text:span><text:span text:style-name="T159">onté una referència a la instància del plugin de l'Arxiu </text:span><text:span text:style-name="T131">IArxiuPlugin</text:span><text:span text:style-name="T159"> que emprarà per fer les diferents crides i moure la informació dels expedients de DISTRIBUCIO</text:span><text:span text:style-name="T131"> </text:span><text:span text:style-name="T159">cap a un expedient propi. Així mateix, la llibreria </text:span><text:span text:style-name="T131">distribucio-backoffice-utils.jar</text:span><text:span text:style-name="T159"> utilitza les classes definides en la llibreria client de WS de DISTRIBUCIO</text:span><text:span text:style-name="T131"> distribucio-ws-client.jar.</text:span><text:span text:style-name="T159"> </text:span></text:p>
        </text:list-item>
        <text:list-item>
          <text:p text:style-name="P421">BackofficeSistra2Utils<text:span text:style-name="T157">: Aquesta classe d'utilitats té mètodes per tractar els annexos corresponents a documents tècnics de Sistra2 i extreure'n la informació dels formularis o pagaments.</text:span></text:p>
        </text:list-item>
      </text:list>
      <text:p text:style-name="P64"/>
      <text:p text:style-name="P131"><text:span text:style-name="T157">Com que les utilitats de l'Arxiu empren el plugin d'Arxiu la llibreria té dependències del plugin d'Arxiu </text:span>plugin-arxiu-api.jar<text:span text:style-name="T157"> i de la llibreria de Distribució </text:span><text:span text:style-name="T138">distribucio-ws-client.jar</text:span><text:span text:style-name="T170">. A continuació es mostra el diagrama de blocs de les llibreries relacionades i el </text:span><text:span text:style-name="T138">backoffice</text:span><text:span text:style-name="T170"> que empra la llibreria d'utilitats.</text:span></text:p>
      <text:p text:style-name="P62"/>
      <text:p text:style-name="P158"><draw:frame draw:style-name="fr1" draw:name="Frame1" text:anchor-type="paragraph" svg:width="17cm" draw:z-index="56"><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8"><text:line-break/></text:span>Fig. <text:sequence text:ref-name="refFig.2" text:name="Fig." text:formula="ooow:Fig.+1" style:num-format="1">3</text:sequence>: Diagrama de blocks de la llibreria</text:p></draw:text-box></draw:frame><text:soft-page-break/></text:p>
      <text:list xml:id="list175633662131143" text:continue-list="list175634846369072" text:style-name="Outline">
        <text:list-item>
          <text:list>
            <text:list-item>
              <text:h text:style-name="P411" text:outline-level="2"><text:bookmark-start text:name="__RefHeading___Toc50904_2907556958"/>Com incloure la llibreria<text:bookmark-end text:name="__RefHeading___Toc50904_2907556958"/></text:h>
            </text:list-item>
          </text:list>
        </text:list-item>
      </text:list>
      <text:p text:style-name="P65">La llibreria es pot incloure com una dependència maven dins del codi del backoffice de la mateixa forma que s'inclouen les dependències del client del WS de DISTRIBUCIO o de l' API de l'Arxiu.</text:p>
      <text:p text:style-name="P159"><text:span text:style-name="T157">S'ha de tenir en compte la versió específica de la llibreria </text:span><text:span text:style-name="T129">distribucio-backoffice-utils</text:span><text:span text:style-name="T157">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9">maven</text:span><text:span text:style-name="T157">:</text:span></text:p>
      <table:table table:name="Table2" table:style-name="Table2">
        <table:table-column table:style-name="Table2.A"/>
        <table:table-row table:style-name="TableLine645023088">
          <table:table-cell table:style-name="Table2.A1" office:value-type="string">
            <text:p text:style-name="P40"><text:span text:style-name="T18">&lt;</text:span><text:span text:style-name="T23">dependency</text:span><text:span text:style-name="T18">&gt;</text:span></text:p>
            <text:p text:style-name="P53"><text:span text:style-name="T58"><text:tab/></text:span><text:span text:style-name="T18">&lt;</text:span><text:span text:style-name="T23">groupId</text:span><text:span text:style-name="T18">&gt;</text:span><text:span text:style-name="T58">es.caib.distribucio</text:span><text:span text:style-name="T18">&lt;/</text:span><text:span text:style-name="T23">groupId</text:span><text:span text:style-name="T18">&gt;</text:span></text:p>
            <text:p text:style-name="P53"><text:span text:style-name="T58"><text:tab/></text:span><text:span text:style-name="T18">&lt;</text:span><text:span text:style-name="T23">artifactId</text:span><text:span text:style-name="T18">&gt;</text:span><text:span text:style-name="T58">distribucio-backoffice-utils</text:span><text:span text:style-name="T18">&lt;/</text:span><text:span text:style-name="T23">artifactId</text:span><text:span text:style-name="T18">&gt;</text:span></text:p>
            <text:p text:style-name="P53"><text:span text:style-name="T58"><text:tab/></text:span><text:span text:style-name="T18">&lt;</text:span><text:span text:style-name="T23">version</text:span><text:span text:style-name="T18">&gt;</text:span><text:span text:style-name="T58">0.9.</text:span><text:span text:style-name="T60">50</text:span><text:span text:style-name="T18">&lt;/</text:span><text:span text:style-name="T23">version</text:span><text:span text:style-name="T18">&gt;</text:span></text:p>
            <text:p text:style-name="P40"><text:span text:style-name="T18">&lt;/</text:span><text:span text:style-name="T23">dependency</text:span><text:span text:style-name="T18">&gt;</text:span></text:p>
          </table:table-cell>
        </table:table-row>
      </table:table>
      <text:p text:style-name="P65"/>
      <text:p text:style-name="P66">Aquesta llibreria depèn de la llibreria client del WS de DISTRIBUCIO per tractar la informació de DISTRIBUCIO i del plugin d'Arxiu per fer les diferents crides a l'Arxiu.</text:p>
      <text:list xml:id="list175632957688709" text:continue-numbering="true" text:style-name="Outline">
        <text:list-item>
          <text:list>
            <text:list-item>
              <text:h text:style-name="P412" text:outline-level="2"><text:bookmark-start text:name="__RefHeading___Toc366105_93553639"/>Històric<text:bookmark-end text:name="__RefHeading___Toc366105_93553639"/></text:h>
            </text:list-item>
          </text:list>
        </text:list-item>
      </text:list>
      <text:p text:style-name="P169">La llibreria està pensada per anar incorporant noves utilitats i en principi se cercarà la compatibilitat cap a versions anteriors. <text:span text:style-name="T244">La versió de la llibreria coincideix amb la versió de Distribucio en la que es van introduir els canvis. </text:span>L'històric de versions actual és el següent:</text:p>
      <text:list xml:id="list1026654043" text:style-name="L14">
        <text:list-item>
          <text:p text:style-name="P451">0.9.26 Versió inicial de la llibreria amb la classe <text:span text:style-name="T129">BackofficeUtils</text:span><text:span text:style-name="T157"> per traspassar arxius.</text:span></text:p>
        </text:list-item>
        <text:list-item>
          <text:p text:style-name="P449"><text:span text:style-name="T167">0.9.2</text:span><text:span text:style-name="T192">8</text:span><text:span text:style-name="T167"> S'afegeix la classe </text:span><text:span text:style-name="T139">BackofficeSistra2Utils</text:span><text:span text:style-name="T167"> per extreure dades de documents tècnics i es reanomena la classe anterior </text:span><text:span text:style-name="T139">BackofficeUtils </text:span><text:span text:style-name="T167">a</text:span><text:span text:style-name="T139"> BackofficeArxiuUtils</text:span><text:span text:style-name="T167">.</text:span></text:p>
        </text:list-item>
        <text:list-item>
          <text:p text:style-name="P450"><text:soft-page-break/><text:span text:style-name="T167">0.9.</text:span><text:span text:style-name="T319">50</text:span><text:span text:style-name="T167"> </text:span><text:span text:style-name="T318">Modificació per llegir els valors de tipus llista de l'XML de formularis de Sistra2.</text:span><text:span text:style-name="T167">a</text:span><text:span text:style-name="T139"> BackofficeArxiuUtils</text:span><text:span text:style-name="T167">.</text:span></text:p>
        </text:list-item>
      </text:list>
      <text:list xml:id="list175634037780370" text:continue-list="list175632957688709" text:style-name="Outline">
        <text:list-item>
          <text:list>
            <text:list-item>
              <text:h text:style-name="P413" text:outline-level="2"><text:bookmark-start text:name="__RefHeading___Toc366107_93553639"/>Utilitats per l'Arxiu<text:bookmark-end text:name="__RefHeading___Toc366107_93553639"/></text:h>
            </text:list-item>
          </text:list>
        </text:list-item>
      </text:list>
      <text:p text:style-name="P132">La llibreria d'utilitats inclou la classe <text:span text:style-name="T129">BackofficeArxiuUtils</text:span><text:span text:style-name="T157"> amb els mètodes per fer les tasques de crear un expedient a l'Arxiu i </text:span><text:span text:style-name="T182">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1"><text:span text:style-name="T199"><text:s/>La idea és poder crear i moure la informació de l'expedient a l'Arxiu de DISTRIBUCIO cap a l'expedient a l'Arxiu del </text:span><text:span text:style-name="T131">backoffice</text:span><text:span text:style-name="T159"> a partir de la informació consultada amb el client del WS de DISTRIBUCIO quan el </text:span><text:span text:style-name="T131">backoffice</text:span><text:span text:style-name="T159"> rebi una petició d'anotació pendent. D'aquesta forma la interfície </text:span><text:span text:style-name="T131">BackofficeArxiuUtils</text:span><text:span text:style-name="T159"> defineix el mètode </text:span><text:span text:style-name="T141">crearExpedientAmbAnotacioDeRegistre</text:span><text:span text:style-name="T159"> per a fer el seguit de crides necessàries i retornar un resultat que permeti saber com ha anat el resultat. </text:span></text:p>
      <text:p text:style-name="P63"/>
      <text:p text:style-name="P189"><text:span text:style-name="T160">E</text:span><text:span text:style-name="T157">l mètode </text:span><text:span text:style-name="T129">crearExpedientAmbAnotacioRegistre</text:span><text:span text:style-name="T157"> s'encarrergarà, mitjançant la informació proporcionada, de realitzar les següents crides a l'Arxiu:</text:span></text:p>
      <text:list xml:id="list3547005573" text:style-name="L15">
        <text:list-item>
          <text:p text:style-name="P390"><text:span text:style-name="T161">Si no s'informa la propietat o paràmetre </text:span><text:span text:style-name="T132">identificador </text:span><text:span text:style-name="T161">llavors es c</text:span><text:span text:style-name="T157">rear</text:span><text:span text:style-name="T161">à</text:span><text:span text:style-name="T157"> el nou expedient a l'arxiu fent una cridada al mètode </text:span><text:span text:style-name="T129">expedientCrear</text:span><text:span text:style-name="T132"> </text:span><text:span text:style-name="T161">amb la infomració de l'expedient passada com a paràmetre</text:span><text:span text:style-name="T157">.</text:span><text:span text:style-name="T162"> Si es detecta que ja està creat llavors continua.</text:span></text:p>
        </text:list-item>
        <text:list-item>
          <text:p text:style-name="P391">Crear els interessats en l'expedient de l'arxiu fent una cridada al mètode <text:span text:style-name="T129">expedientModificar</text:span>.<text:span text:style-name="T200"> Es comprovarà si l'expedient ja conté els interessats.</text:span></text:p>
        </text:list-item>
        <text:list-item>
          <text:p text:style-name="P391">Crear una nova carpeta a dins l'expedient de destí que contendrà tots els annexos de l'anotació de registre (aquesta passa és opcional i només es fa si hi ha un paràmetre activat).<text:span text:style-name="T200"> Primer es comprova si la carpeta ja està creada.</text:span></text:p>
        </text:list-item>
        <text:list-item>
          <text:p text:style-name="P390"><text:span text:style-name="T157">Moure el document annex des de l'expedient de l'anotació de registre cap al nou expedient creat emprant el mètode </text:span><text:span text:style-name="T129">documentMoure</text:span><text:span text:style-name="T157">. Com que l'expedient d'origen i el de destí pertanyen a sèries documentals diferents això provocarà una cridada al servei dispatchDocument de l'API REST de l'arxiu.</text:span><text:span text:style-name="T162"> S'ha de comprovar si l'annex s'ha mogut prèviament.</text:span></text:p>
        </text:list-item>
      </text:list>
      <text:p text:style-name="P133"><text:span text:style-name="T187">Com que el mètode pot haver produït un error en el transcurs de les crides anteriors </text:span><text:span text:style-name="T189">internament </text:span><text:span text:style-name="T187">es faran les comprovacions necessàries en cada pas per rependre l'execució del mètode.</text:span><text:span text:style-name="T189"> Així doncs, el backoffice integrador podrà reintentar el processament de l'anotació tornant a invocar el mètode amb els mateixos paràmetres amb l'excepció de la creació de l'expedient, ja que el </text:span><text:span text:style-name="T148">backoffice </text:span><text:span text:style-name="T190">ha de guardar l'identificador dins l'Arxiu de l'expedient per continuar amb el traspàs de la informació de manera que no es creïn nous expedients en cada intent.</text:span></text:p>
      <text:p text:style-name="P73"><text:s/>En els següents apartats es descriuen els possibles paràmetres de configuració i es mostra codi d'exemple per al seu ús.</text:p>
      <text:list xml:id="list175634473030372" text:continue-list="list175634037780370" text:style-name="Outline">
        <text:list-item>
          <text:list>
            <text:list-item>
              <text:list>
                <text:list-item>
                  <text:h text:style-name="P417" text:outline-level="3"><text:bookmark-start text:name="__RefHeading___Toc50906_2907556958"/><text:soft-page-break/><text:span text:style-name="T201">P</text:span>aràmetres<text:bookmark-end text:name="__RefHeading___Toc50906_2907556958"/></text:h>
                </text:list-item>
              </text:list>
            </text:list-item>
          </text:list>
        </text:list-item>
      </text:list>
      <text:p text:style-name="P160">La classe <text:span text:style-name="T129">BackofficeArxiuUtils</text:span><text:span text:style-name="T157"> es pot configurar a través dels seus mètodes. Els paràmetres són els següents:</text:span></text:p>
      <text:list xml:id="list3678850687" text:style-name="L16">
        <text:list-item>
          <text:p text:style-name="P452">iArxiuPlugin: </text:p>
          <text:p text:style-name="P453"><text:span text:style-name="T157">És un paràmetre obligatori que s'ha d'especificar a través del constructor </text:span><text:span text:style-name="T129">BackofficeArxiuUtilsImpl(IArxiuPlugin)</text:span><text:span text:style-name="T157"> o a través del métode </text:span><text:span text:style-name="T129">setIArxiuPlugin(IArxiuPlugin)</text:span><text:span text:style-name="T157">. Serveix per tenir referència a la instància de l'API de l'Arxiu i poder fer les crides necessàries per a la creació, modificació i consulta de la informació de l'Arxiu.</text:span></text:p>
        </text:list-item>
        <text:list-item>
          <text:p text:style-name="P452">carpeta:</text:p>
          <text:p text:style-name="P453"><text:span text:style-name="T157">La definició de la carpeta és opcional. Si es fixa un valor per a la carpeta llavors durant les crides es crearà una carpeta on guardar els annexos de l'anotació de registre. És útil quan l'expedient del </text:span><text:span text:style-name="T129">backoffice</text:span><text:span text:style-name="T157"> pot estar relacionat amb diferents anotacions de registre i es vol separar els annexos de les diferents anotacions. Per fixar el nom de la carpeta es pot fer mitjançant el métode </text:span><text:span text:style-name="T129">setCarpeta(String)</text:span><text:span text:style-name="T157">.</text:span></text:p>
        </text:list-item>
        <text:list-item>
          <text:p text:style-name="P452">arxiuPluginListener:</text:p>
          <text:p text:style-name="P453"><text:span text:style-name="T157">A fi de poder controlar les diferents crides que es fan a l'Arxiu la interfície </text:span><text:span text:style-name="T129">BackofficeArxiuUtils</text:span><text:span text:style-name="T157"> permet</text:span><text:span text:style-name="T168"> opcionament</text:span><text:span text:style-name="T157"> fixar una instància que implementi la interfície </text:span><text:span text:style-name="T129">ArxiuPluginListener</text:span><text:span text:style-name="T157">. Cada cop que es cridi a l'Arxiu s'invocarà al mètode </text:span><text:span text:style-name="T129">event</text:span><text:span text:style-name="T157"> de la instància per a que l'aplicació del </text:span><text:span text:style-name="T129">backoffice </text:span><text:span text:style-name="T157">pugui monitoritzar la integració amb l'Arxiu amb la informació dels mètodes invocats, els paràmetres més descriptius, si hi ha hagut error i el temps total de processament en ms. El métode per fixar la instància és </text:span><text:span text:style-name="T133">setArxiuPluginListener(ArxiuPluginListener) </text:span><text:span text:style-name="T163">i l</text:span><text:span text:style-name="T157">a interfície que ha d'implementar la instància és la següent:</text:span></text:p>
        </text:list-item>
      </text:list>
      <table:table table:name="Table3" table:style-name="Table3">
        <table:table-column table:style-name="Table3.A"/>
        <table:table-row table:style-name="TableLine645021072">
          <table:table-cell table:style-name="Table3.A1" office:value-type="string">
            <text:p text:style-name="P40"><text:span text:style-name="T48">package</text:span><text:span text:style-name="T58"> es.caib.distribucio.backoffice.utils;</text:span></text:p>
            <text:p text:style-name="P178"/>
            <text:p text:style-name="P53"><text:span text:style-name="T48">import</text:span><text:span text:style-name="T58"> java.util.Map;</text:span></text:p>
            <text:p text:style-name="P178"/>
            <text:p text:style-name="P53"><text:span text:style-name="T203">/** </text:span><text:span text:style-name="T204">Interfície</text:span><text:span text:style-name="T203"> a </text:span><text:span text:style-name="T204">implementar</text:span><text:span text:style-name="T203"> </text:span><text:span text:style-name="T204">si</text:span><text:span text:style-name="T203"> </text:span><text:span text:style-name="T204">es</text:span><text:span text:style-name="T203"> </text:span><text:span text:style-name="T204">vol</text:span><text:span text:style-name="T203"> </text:span><text:span text:style-name="T204">estar</text:span><text:span text:style-name="T203"> </text:span><text:span text:style-name="T204">informat</text:span><text:span text:style-name="T203"> </text:span><text:span text:style-name="T204">de</text:span><text:span text:style-name="T203"> </text:span><text:span text:style-name="T204">les</text:span><text:span text:style-name="T203"> </text:span><text:span text:style-name="T204">peticions</text:span><text:span text:style-name="T203"> </text:span><text:span text:style-name="T204">que</text:span><text:span text:style-name="T203"> </text:span><text:span text:style-name="T204">es</text:span><text:span text:style-name="T203"> fan a l'Arxiu</text:span></text:p>
            <text:p text:style-name="P127"><text:s/>* </text:p>
            <text:p text:style-name="P127"><text:s/>*/</text:p>
            <text:p text:style-name="P53"><text:span text:style-name="T48">public</text:span><text:span text:style-name="T58"> </text:span><text:span text:style-name="T48">interface</text:span><text:span text:style-name="T58"> </text:span><text:span text:style-name="T59">ArxiuPluginListener</text:span><text:span text:style-name="T58"> {<text:tab/></text:span></text:p>
            <text:p text:style-name="P80"><text:tab/></text:p>
            <text:p text:style-name="P53"><text:span text:style-name="T58"><text:tab/></text:span><text:span text:style-name="T203">/** </text:span><text:span text:style-name="T204">Mètode</text:span><text:span text:style-name="T203"> per </text:span><text:span text:style-name="T204">notificar</text:span><text:span text:style-name="T203"> </text:span><text:span text:style-name="T204">les</text:span><text:span text:style-name="T203"> </text:span><text:span text:style-name="T204">crides</text:span><text:span text:style-name="T203"> </text:span><text:span text:style-name="T204">fetes</text:span><text:span text:style-name="T203"> a l'arxiu, els </text:span><text:span text:style-name="T204">paràmetres</text:span><text:span text:style-name="T203">, el </text:span><text:span text:style-name="T204">resultat</text:span><text:span text:style-name="T203"> i el </text:span><text:span text:style-name="T204">temps</text:span><text:span text:style-name="T203"> </text:span><text:span text:style-name="T204">de</text:span><text:span text:style-name="T203"> </text:span><text:span text:style-name="T204">la</text:span><text:span text:style-name="T203"> </text:span><text:span text:style-name="T204">petició</text:span></text:p>
            <text:p text:style-name="P127"><text:tab/> * </text:p>
            <text:p text:style-name="P53"><text:span text:style-name="T203"><text:tab/> * </text:span><text:span text:style-name="T206">@param</text:span><text:span text:style-name="T203"> metode</text:span></text:p>
            <text:p text:style-name="P53"><text:span text:style-name="T203"><text:tab/> * <text:tab/><text:tab/><text:tab/></text:span><text:span text:style-name="T204">Mètode</text:span><text:span text:style-name="T203"> </text:span><text:span text:style-name="T204">invocat</text:span></text:p>
            <text:p text:style-name="P53"><text:span text:style-name="T203"><text:tab/> * </text:span><text:span text:style-name="T206">@param</text:span><text:span text:style-name="T203"> parametres</text:span></text:p>
            <text:p text:style-name="P53"><text:span text:style-name="T203"><text:tab/> * <text:tab/><text:tab/><text:tab/></text:span><text:span text:style-name="T204">Paràmetres</text:span><text:span text:style-name="T203"> </text:span><text:span text:style-name="T204">més</text:span><text:span text:style-name="T203"> </text:span><text:span text:style-name="T204">representatius</text:span></text:p>
            <text:p text:style-name="P53"><text:span text:style-name="T203"><text:tab/> * </text:span><text:span text:style-name="T206">@param</text:span><text:span text:style-name="T203"> correcte</text:span></text:p>
            <text:p text:style-name="P53"><text:span text:style-name="T203"><text:tab/> * <text:tab/><text:tab/><text:tab/></text:span><text:span text:style-name="T204">Resultat</text:span><text:span text:style-name="T203"> </text:span><text:span text:style-name="T204">correcte</text:span></text:p>
            <text:p text:style-name="P53"><text:span text:style-name="T203"><text:tab/> * </text:span><text:span text:style-name="T206">@param</text:span><text:span text:style-name="T203"> error</text:span></text:p>
            <text:p text:style-name="P53"><text:soft-page-break/><text:span text:style-name="T203"><text:tab/> * <text:tab/><text:tab/><text:tab/></text:span><text:span text:style-name="T204">Descripció</text:span><text:span text:style-name="T203"> </text:span><text:span text:style-name="T204">de</text:span><text:span text:style-name="T203"> l'error </text:span><text:span text:style-name="T204">en</text:span><text:span text:style-name="T203"> </text:span><text:span text:style-name="T204">cas</text:span><text:span text:style-name="T203"> d'error</text:span></text:p>
            <text:p text:style-name="P53"><text:span text:style-name="T203"><text:tab/> * </text:span><text:span text:style-name="T206">@param</text:span><text:span text:style-name="T203"> e</text:span></text:p>
            <text:p text:style-name="P53"><text:span text:style-name="T203"><text:tab/> * <text:tab/><text:tab/><text:tab/></text:span><text:span text:style-name="T204">Excepció</text:span><text:span text:style-name="T203"> </text:span><text:span text:style-name="T204">en</text:span><text:span text:style-name="T203"> </text:span><text:span text:style-name="T204">cas</text:span><text:span text:style-name="T203"> </text:span><text:span text:style-name="T204">de</text:span><text:span text:style-name="T203"> </text:span><text:span text:style-name="T204">produir</text:span><text:span text:style-name="T208">-</text:span><text:span text:style-name="T204">se</text:span><text:span text:style-name="T203"> </text:span><text:span text:style-name="T204">una</text:span><text:span text:style-name="T203"> </text:span><text:span text:style-name="T204">excepció</text:span></text:p>
            <text:p text:style-name="P53"><text:span text:style-name="T203"><text:tab/> * </text:span><text:span text:style-name="T206">@param</text:span><text:span text:style-name="T203"> timeMs</text:span></text:p>
            <text:p text:style-name="P53"><text:span text:style-name="T203"><text:tab/> * <text:tab/><text:tab/><text:tab/></text:span><text:span text:style-name="T204">Temps</text:span><text:span text:style-name="T203"> </text:span><text:span text:style-name="T204">en</text:span><text:span text:style-name="T203"> </text:span><text:span text:style-name="T204">ms</text:span><text:span text:style-name="T203"> </text:span><text:span text:style-name="T204">transcorreguts</text:span><text:span text:style-name="T203"> </text:span><text:span text:style-name="T204">en</text:span><text:span text:style-name="T203"> </text:span><text:span text:style-name="T204">la</text:span><text:span text:style-name="T203"> </text:span><text:span text:style-name="T204">crida</text:span></text:p>
            <text:p text:style-name="P127"><text:tab/> */</text:p>
            <text:p text:style-name="P53"><text:span text:style-name="T58"><text:tab/></text:span><text:span text:style-name="T48">public</text:span><text:span text:style-name="T58"> </text:span><text:span text:style-name="T48">void</text:span><text:span text:style-name="T58"> event(String </text:span><text:span text:style-name="T84">metode</text:span><text:span text:style-name="T58">, Map&lt;String, String&gt; </text:span><text:span text:style-name="T84">parametres</text:span><text:span text:style-name="T58">, </text:span><text:span text:style-name="T48">boolean</text:span><text:span text:style-name="T58"> </text:span><text:span text:style-name="T84">correcte</text:span><text:span text:style-name="T58">, String </text:span><text:span text:style-name="T84">error</text:span><text:span text:style-name="T58">, Exception </text:span><text:span text:style-name="T84">e</text:span><text:span text:style-name="T58">, </text:span><text:span text:style-name="T48">long</text:span><text:span text:style-name="T58"> </text:span><text:span text:style-name="T84">timeMs</text:span><text:span text:style-name="T58">);</text:span></text:p>
            <text:p text:style-name="P178"/>
            <text:p text:style-name="P79">}</text:p>
          </table:table-cell>
        </table:table-row>
      </table:table>
      <text:p text:style-name="P67"/>
      <text:list xml:id="list175634854890409" text:continue-list="list175634473030372" text:style-name="Outline">
        <text:list-item>
          <text:list>
            <text:list-item>
              <text:list>
                <text:list-item>
                  <text:h text:style-name="P417" text:outline-level="3"><text:bookmark-start text:name="__RefHeading___Toc50908_2907556958"/><text:span text:style-name="T201">Ús de </text:span><text:span text:style-name="T235">B</text:span><text:span text:style-name="T236">ackofficeArxiuUtils</text:span><text:bookmark-end text:name="__RefHeading___Toc50908_2907556958"/></text:h>
                </text:list-item>
              </text:list>
            </text:list-item>
          </text:list>
        </text:list-item>
      </text:list>
      <text:p text:style-name="P129"><text:span text:style-name="T209">Per utilitzar la </text:span><text:span text:style-name="T237">classe</text:span><text:span text:style-name="T144"> BackofficeArxiuUtils</text:span><text:span text:style-name="T181"> amb les u</text:span><text:span text:style-name="T185">t</text:span><text:span text:style-name="T181">ilitats per l'A</text:span><text:span text:style-name="T183">r</text:span><text:span text:style-name="T181">xiu</text:span><text:span text:style-name="T134"> </text:span><text:span text:style-name="T209">s'ha de crear un objecte de la classe </text:span><text:span text:style-name="T134">BackofficeArxiuUtilsImpl</text:span><text:span text:style-name="T164"> amb la referència al plugin d'Arxiu </text:span><text:span text:style-name="T134">IPluginArxiu</text:span><text:span text:style-name="T164">, consultar el detall de l'anotació de registre mitjançant la llibreria del client de WS de DISTRIBUCIO </text:span><text:span text:style-name="T134">distribucio-ws-client</text:span><text:span text:style-name="T164"> i invocar el mètode <text:s/></text:span><text:span text:style-name="T141">crearExpedientAmbAnotacioDeRegistre</text:span><text:span text:style-name="T134"> </text:span><text:span text:style-name="T165">amb la informació de l'expedient a crear o a modificar.</text:span><text:span text:style-name="T166">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8">passades com a paràmetres</text:span><text:span text:style-name="T166">.</text:span><text:span text:style-name="T165">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1"><text:span text:style-name="T165">A</text:span><text:span text:style-name="T157"> continuació es mostra el diagrama de classes pel resultat de la crida.</text:span></text:p>
      <text:p text:style-name="P68"><draw:frame draw:style-name="fr2" draw:name="Frame2" text:anchor-type="paragraph" svg:x="0cm" svg:y="0.153cm" svg:width="17cm" draw:z-index="57"><draw:text-box fo:min-height="9.454cm"><text:p text:style-name="Fig."><draw:frame draw:style-name="fr6" draw:name="Image3" text:anchor-type="as-char" svg:width="17cm" style:rel-width="100%" svg:height="9.454cm" style:rel-height="scale" draw:z-index="76"><draw:image xlink:href="Pictures/10000001000002A400000178D62A6DD28F96FC43.png" xlink:type="simple" xlink:show="embed" xlink:actuate="onLoad" draw:mime-type="image/png"/></draw:frame><text:span text:style-name="T228"><text:line-break/></text:span>Fig. <text:sequence text:ref-name="refFig.3" text:name="Fig." text:formula="ooow:Fig.+1" style:num-format="1">4</text:sequence>: Classes per contenir el resultat de la crida al mètode crearExpedientAmbAnotacioDeRegistre.</text:p></draw:text-box></draw:frame><text:soft-page-break/></text:p>
      <text:p text:style-name="P129"><text:span text:style-name="T179">S</text:span><text:span text:style-name="T180">i el mètode falla en la creació de l'expedient o el traspàs dels interessats llavors el resultat contindrà l'error i els annexos no s'hauran traspassat.</text:span></text:p>
      <text:p text:style-name="P129"><text:span text:style-name="T180">Quan es traspassin els diferents annexos s'anirà informant el resultat per cada annex. L'usuari de la llibreria podrà consultar el resultat a partir del seu identificador d'Arxiu uuid original a partir del mètode </text:span><text:span text:style-name="T143">ArxiuResultat.getResultatAnnex(String uuid) </text:span><text:span text:style-name="T180">i obtenir el nou per en l'objecte</text:span><text:span text:style-name="T143"> ArxiuResultatAnnex</text:span><text:span text:style-name="T180"> amb el mètode getIdentificador</text:span><text:span text:style-name="T143">()</text:span><text:span text:style-name="T180">. L'objecte de tipus </text:span><text:span text:style-name="T143">ArxiuResultatAnnex</text:span><text:span text:style-name="T180"> conté l'identificador de l'arxiu si s'ha mogut o existia, l'acció realitzada o la descripció de l'error en el cas que no s'hagi pogut moure. </text:span></text:p>
      <text:p text:style-name="P162"><text:span text:style-name="T175">L'aplicació </text:span><text:span text:style-name="T142">backoffice </text:span><text:span text:style-name="T175">ha d'implementar la seva lògica pròpia per incorporar la informació dels annexos en el seu propi sistema.</text:span></text:p>
      <text:list xml:id="list175635014044723" text:continue-numbering="true" text:style-name="Outline">
        <text:list-item>
          <text:list>
            <text:list-item>
              <text:list>
                <text:list-item>
                  <text:h text:style-name="P417" text:outline-level="3"><text:bookmark-start text:name="__RefHeading___Toc50910_2907556958"/>Exemple Java<text:bookmark-end text:name="__RefHeading___Toc50910_2907556958"/></text:h>
                </text:list-item>
              </text:list>
            </text:list-item>
          </text:list>
        </text:list-item>
      </text:list>
      <text:p text:style-name="P163">En el següent exemple de codi es mostra una imlementació del WS <text:span text:style-name="T210">de backoffice de DISTRIBUCIO que rep peticions d'anotacions pendents des de DISTRIBUCIO i les processa amb la llibreria d'utilitats. El codi sencer es pot consultar a l' </text:span><text:span text:style-name="T210"><text:bookmark-ref text:reference-format="text" text:ref-name="__RefHeading___Toc60796_1326387233">Annex II: Exemple d'ús de la llibreria de distribucio-backoffice-utils</text:bookmark-ref></text:span><text:span text:style-name="T210">.</text:span></text:p>
      <text:p text:style-name="P164">La classe per a l'exemple és la implementació del WS que rep<text:span text:style-name="T211"> anotacions pendents de registre i té una referència al client del WS d'integració de DISTRIBUCIO per consultar anotacions i una instància del plugin de l'API de l'Arxiu.</text:span></text:p>
      <text:p text:style-name="P26">taula.<text:span text:style-name="T212"> Classe de proves per rebre peticions de WS en el mètode </text:span><text:span text:style-name="T152">comunicarAnotacionsPendents</text:span><text:span text:style-name="T212">.</text:span></text:p>
      <table:table table:name="Table5" table:style-name="Table5">
        <table:table-column table:style-name="Table5.A"/>
        <text:soft-page-break/>
        <table:table-row table:style-name="TableLine645021360">
          <table:table-cell table:style-name="Table5.A1" office:value-type="string">
            <text:p text:style-name="P110">@Component</text:p>
            <text:p text:style-name="P114"><text:span text:style-name="T107">@WebService</text:span><text:span text:style-name="T57">(</text:span></text:p>
            <text:p text:style-name="P114"><text:span text:style-name="T57"><text:tab/><text:tab/>name = </text:span><text:span text:style-name="T34">"Backoffice"</text:span><text:span text:style-name="T57">,</text:span></text:p>
            <text:p text:style-name="P114"><text:span text:style-name="T57"><text:tab/><text:tab/>serviceName = </text:span><text:span text:style-name="T34">"BackofficeService"</text:span><text:span text:style-name="T57">,</text:span></text:p>
            <text:p text:style-name="P114"><text:span text:style-name="T57"><text:tab/><text:tab/>portName = </text:span><text:span text:style-name="T34">"BackofficeServicePort"</text:span><text:span text:style-name="T57">,</text:span></text:p>
            <text:p text:style-name="P114"><text:span text:style-name="T57"><text:tab/><text:tab/>endpointInterface = </text:span><text:span text:style-name="T34">"es.caib.ripea.core.api.service.ws.BackofficeWsServiceBean"</text:span><text:span text:style-name="T57">,</text:span></text:p>
            <text:p text:style-name="P114"><text:span text:style-name="T57"><text:tab/><text:tab/>targetNamespace = </text:span><text:span text:style-name="T34">"http://www.caib.es/distribucio/ws/backoffice"</text:span><text:span text:style-name="T57">)</text:span></text:p>
            <text:p text:style-name="P114"><text:span text:style-name="T49">public</text:span><text:span text:style-name="T57"> </text:span><text:span text:style-name="T49">class</text:span><text:span text:style-name="T57"> BackofficeWsServiceImpl </text:span><text:span text:style-name="T49">implements</text:span><text:span text:style-name="T57"> BackofficeWsService, </text:span></text:p>
            <text:p text:style-name="P89"><text:tab/><text:tab/><text:tab/><text:tab/><text:tab/><text:tab/><text:tab/><text:tab/><text:tab/><text:tab/><text:tab/><text:tab/>ArxiuPluginListener {</text:p>
            <text:p text:style-name="P89"><text:tab/></text:p>
            <text:p text:style-name="P114"><text:span text:style-name="T57"><text:tab/></text:span><text:span text:style-name="T202">/** </text:span><text:span text:style-name="T205">Instància</text:span><text:span text:style-name="T202"> </text:span><text:span text:style-name="T205">del</text:span><text:span text:style-name="T202"> </text:span><text:span text:style-name="T205">plugin</text:span><text:span text:style-name="T202"> d'Arxiu */</text:span></text:p>
            <text:p text:style-name="P114"><text:span text:style-name="T57"><text:tab/></text:span><text:span text:style-name="T49">private</text:span><text:span text:style-name="T57"> IArxiuPlugin </text:span><text:span text:style-name="T77">arxiuPlugin</text:span><text:span text:style-name="T57"> = </text:span><text:span text:style-name="T49">null</text:span><text:span text:style-name="T57">;</text:span></text:p>
            <text:p text:style-name="P89"><text:tab/><text:tab/></text:p>
            <text:p text:style-name="P114"><text:span text:style-name="T57"><text:tab/></text:span><text:span text:style-name="T202">/** </text:span><text:span text:style-name="T205">Mètode</text:span><text:span text:style-name="T202"> </text:span><text:span text:style-name="T205">del</text:span><text:span text:style-name="T202"> WS </text:span><text:span text:style-name="T205">que</text:span><text:span text:style-name="T202"> </text:span><text:span text:style-name="T205">rep</text:span><text:span text:style-name="T202"> </text:span><text:span text:style-name="T205">les</text:span><text:span text:style-name="T202"> </text:span><text:span text:style-name="T205">comunicacions</text:span><text:span text:style-name="T202"> d'anotacions </text:span><text:span text:style-name="T205">pendents</text:span><text:span text:style-name="T202">. */</text:span></text:p>
            <text:p text:style-name="P114"><text:span text:style-name="T57"><text:tab/></text:span><text:span text:style-name="T107">@Override</text:span></text:p>
            <text:p text:style-name="P112"><text:span text:style-name="T57"><text:tab/></text:span><text:span text:style-name="T49">public</text:span><text:span text:style-name="T57"> </text:span><text:span text:style-name="T49">void</text:span><text:span text:style-name="T57"> </text:span><text:span text:style-name="T61">comunicarAnotacionsPendents</text:span><text:span text:style-name="T57">(List&lt;AnotacioRegistreId&gt; </text:span><text:span text:style-name="T83">ids</text:span><text:span text:style-name="T57">) {</text:span></text:p>
            <text:p text:style-name="P112"><text:span text:style-name="T57"><text:tab/><text:tab/></text:span><text:span text:style-name="T62">....</text:span></text:p>
            <text:p text:style-name="P85"><text:tab/>}</text:p>
            <text:p text:style-name="P85"><text:tab/>...</text:p>
            <text:p text:style-name="P85">}</text:p>
          </table:table-cell>
        </table:table-row>
      </table:table>
      <text:p text:style-name="P164"/>
      <text:p text:style-name="P129"><text:span text:style-name="T211">Dins del mètode <text:s/></text:span><text:span text:style-name="T153">comunicarAnotacionsPendents</text:span><text:span text:style-name="T193"> instancia el client del WS d'integració amb el Backoffice i el plugin de l'API de l'Arxiu</text:span><text:span text:style-name="T195"> i consulta l'anotació del registre d'entrada. En la següent porció de codi es pot veure com es crea l'objecte per a la llibreria d'utilitats del backoffice amb la referència al plugin d'Arxiu.</text:span></text:p>
      <text:p text:style-name="P26"><text:span text:style-name="T175">taula.</text:span><text:span text:style-name="T194"> Creació de l'objecte passant l'API d'Arxiu al constructor.</text:span></text:p>
      <table:table table:name="Table6" table:style-name="Table6">
        <table:table-column table:style-name="Table6.A"/>
        <table:table-row table:style-name="TableLine645118128">
          <table:table-cell table:style-name="Table6.A1" office:value-type="string">
            <text:p text:style-name="P116"><text:span text:style-name="T220">// </text:span><text:span text:style-name="T221">Prepara</text:span><text:span text:style-name="T220"> </text:span><text:span text:style-name="T221">la</text:span><text:span text:style-name="T220"> </text:span><text:span text:style-name="T221">cria</text:span><text:span text:style-name="T220"> a </text:span><text:span text:style-name="T221">la</text:span><text:span text:style-name="T220"> </text:span><text:span text:style-name="T221">llibreria</text:span><text:span text:style-name="T220"> d'utilitats </text:span><text:span text:style-name="T221">pel</text:span><text:span text:style-name="T220"> </text:span><text:span text:style-name="T221">backoffice</text:span><text:span text:style-name="T220"> </text:span><text:span text:style-name="T221">de</text:span><text:span text:style-name="T220"> DISTRIBUCIO</text:span></text:p>
            <text:p text:style-name="P117"><text:span text:style-name="T220">// Constructor </text:span><text:span text:style-name="T221">amb</text:span><text:span text:style-name="T220"> </text:span><text:span text:style-name="T221">la</text:span><text:span text:style-name="T220"> </text:span><text:span text:style-name="T221">referència</text:span><text:span text:style-name="T220"> </text:span><text:span text:style-name="T221">al</text:span><text:span text:style-name="T220"> </text:span><text:span text:style-name="T221">plugin</text:span><text:span text:style-name="T220"> d'Arxiu</text:span></text:p>
            <text:p text:style-name="P117"><text:span text:style-name="T57">BackofficeArxiuUtils </text:span><text:span text:style-name="T83">backoffice</text:span><text:span text:style-name="T90">Arxiu</text:span><text:span text:style-name="T83">Utils</text:span><text:span text:style-name="T57"> = </text:span><text:span text:style-name="T47">new</text:span><text:span text:style-name="T57"> BackofficeArxiuUtilsImpl(getArxiuPlugin());</text:span></text:p>
          </table:table-cell>
        </table:table-row>
      </table:table>
      <text:p text:style-name="P75"/>
      <text:p text:style-name="P74">La llibreria permet fixar el nom de la carpeta on es guardaran els annexos i un objecte de tipus <text:span text:style-name="T129">ArxiuPluginListener</text:span> si es volen rebre notificacions cada cop que es realitzi una acció d'integració amb l'Arxiu. </text:p>
      <text:p text:style-name="P74"/>
      <text:p text:style-name="P129"><text:span text:style-name="T197">taula.</text:span><text:span text:style-name="T195"> Propietat per fixar el nom de la carpeta i l'objecte </text:span><text:span text:style-name="T155">ArxiuPluginListener</text:span><text:span text:style-name="T195">.</text:span></text:p>
      <table:table table:name="Table7" table:style-name="Table7">
        <table:table-column table:style-name="Table7.A"/>
        <table:table-row table:style-name="TableLine645080112">
          <table:table-cell table:style-name="Table7.A1" office:value-type="string">
            <text:p text:style-name="P117"><text:span text:style-name="T220">// </text:span><text:span text:style-name="T221">Afegeix</text:span><text:span text:style-name="T220"> </text:span><text:span text:style-name="T221">la</text:span><text:span text:style-name="T220"> </text:span><text:span text:style-name="T221">instància</text:span><text:span text:style-name="T220"> </text:span><text:span text:style-name="T221">de</text:span><text:span text:style-name="T220"> </text:span><text:span text:style-name="T221">la</text:span><text:span text:style-name="T220"> </text:span><text:span text:style-name="T221">classe</text:span><text:span text:style-name="T220"> </text:span><text:span text:style-name="T221">com</text:span><text:span text:style-name="T220"> a </text:span><text:span text:style-name="T221">escoltador</text:span><text:span text:style-name="T220"> d'events</text:span></text:p>
            <text:p text:style-name="P117"><text:span text:style-name="T83">backofficeArxiuUtils</text:span><text:span text:style-name="T57">.setArxiuPluginListener(</text:span><text:span text:style-name="T47">this</text:span><text:span text:style-name="T57">);</text:span></text:p>
            <text:p text:style-name="P117"><text:span text:style-name="T220">// </text:span><text:span text:style-name="T221">Estableix</text:span><text:span text:style-name="T220"> </text:span><text:span text:style-name="T221">la</text:span><text:span text:style-name="T220"> </text:span><text:span text:style-name="T221">carpeta</text:span><text:span text:style-name="T220"> on </text:span><text:span text:style-name="T221">guardar</text:span><text:span text:style-name="T220"> els </text:span><text:span text:style-name="T221">annexos</text:span><text:span text:style-name="T220"> </text:span><text:span text:style-name="T221">de</text:span><text:span text:style-name="T220"> l'anotació</text:span></text:p>
            <text:p text:style-name="P116"><text:span text:style-name="T83">backoffice</text:span><text:span text:style-name="T90">Arxiu</text:span><text:span text:style-name="T83">Utils</text:span><text:span text:style-name="T57">.setCarpeta(</text:span><text:span text:style-name="T85">anotacio</text:span><text:span text:style-name="T57">.getIdentificador());</text:span></text:p>
          </table:table-cell>
        </table:table-row>
      </table:table>
      <text:p text:style-name="P75"/>
      <text:p text:style-name="P166"><text:span text:style-name="T194">En el cas de l'exemple, la classe que implementa el WS també implementa </text:span><text:span text:style-name="T196">la interfície </text:span><text:span text:style-name="T156">ArxiuPluginListener</text:span><text:span text:style-name="T196"> amb el mètode </text:span><text:span text:style-name="T156">event</text:span><text:span text:style-name="T196"> per obtenir la informació de la crida al plugin de l'API de l'Arxiu.</text:span></text:p>
      <table:table table:name="Table8" table:style-name="Table8">
        <table:table-column table:style-name="Table8.A"/>
        <table:table-row table:style-name="TableLine645044688">
          <table:table-cell table:style-name="Table8.A1" office:value-type="string">
            <text:p text:style-name="P112"><text:span text:style-name="T49">public</text:span><text:span text:style-name="T57"> </text:span><text:span text:style-name="T49">class</text:span><text:span text:style-name="T57"> BackofficeWsServiceImpl </text:span><text:span text:style-name="T49">implements</text:span><text:span text:style-name="T57"> BackofficeWsService, , <text:tab/><text:tab/><text:tab/><text:tab/><text:tab/><text:tab/><text:tab/><text:tab/><text:tab/><text:tab/><text:tab/></text:span><text:span text:style-name="T63">ArxiuPluginListener</text:span><text:span text:style-name="T57"> {</text:span></text:p>
            <text:p text:style-name="P86">...</text:p>
            <text:p text:style-name="P124"><text:tab/> /** Mètode que la llibreria del backoffice de distribució crida si es </text:p>
            <text:p text:style-name="P118"><text:span text:style-name="T202"><text:tab/> fixa una instància que implementa </text:span><text:span text:style-name="T226">{@link ArxiuPluginListener}</text:span><text:span text:style-name="T202">.</text:span></text:p>
            <text:p text:style-name="P125"><text:tab/> * </text:p>
            <text:p text:style-name="P125"><text:tab/> */</text:p>
            <text:p text:style-name="P114"><text:span text:style-name="T57"><text:tab/></text:span><text:span text:style-name="T107">@Override</text:span></text:p>
            <text:p text:style-name="P114"><text:span text:style-name="T57"><text:tab/></text:span><text:span text:style-name="T49">public</text:span><text:span text:style-name="T57"> </text:span><text:span text:style-name="T49">void</text:span><text:span text:style-name="T57"> </text:span><text:span text:style-name="T61">event</text:span><text:span text:style-name="T57">(</text:span></text:p>
            <text:p text:style-name="P114"><text:span text:style-name="T57"><text:tab/><text:tab/><text:tab/>String </text:span><text:span text:style-name="T83">metode</text:span><text:span text:style-name="T57">, </text:span></text:p>
            <text:p text:style-name="P114"><text:soft-page-break/><text:span text:style-name="T57"><text:tab/><text:tab/><text:tab/>Map&lt;String, String&gt; </text:span><text:span text:style-name="T83">parametres</text:span><text:span text:style-name="T57">, </text:span></text:p>
            <text:p text:style-name="P114"><text:span text:style-name="T57"><text:tab/><text:tab/><text:tab/></text:span><text:span text:style-name="T49">boolean</text:span><text:span text:style-name="T57"> </text:span><text:span text:style-name="T83">correcte</text:span><text:span text:style-name="T57">, </text:span></text:p>
            <text:p text:style-name="P114"><text:span text:style-name="T57"><text:tab/><text:tab/><text:tab/>String </text:span><text:span text:style-name="T83">error</text:span><text:span text:style-name="T57">, </text:span></text:p>
            <text:p text:style-name="P114"><text:span text:style-name="T57"><text:tab/><text:tab/><text:tab/>Exception </text:span><text:span text:style-name="T83">e</text:span><text:span text:style-name="T57">,</text:span></text:p>
            <text:p text:style-name="P114"><text:span text:style-name="T57"><text:tab/><text:tab/><text:tab/></text:span><text:span text:style-name="T49">long</text:span><text:span text:style-name="T57"> </text:span><text:span text:style-name="T83">timeMs</text:span><text:span text:style-name="T57">) {</text:span></text:p>
            <text:p text:style-name="P114"><text:span text:style-name="T57"><text:tab/><text:tab/>StringBuilder </text:span><text:span text:style-name="T83">str</text:span><text:span text:style-name="T57"> = </text:span><text:span text:style-name="T49">new</text:span><text:span text:style-name="T57"> StringBuilder()</text:span></text:p>
            <text:p text:style-name="P114"><text:span text:style-name="T57"><text:tab/><text:tab/><text:tab/><text:tab/>.append(</text:span><text:span text:style-name="T34">"S'ha invocat el mètode \""</text:span><text:span text:style-name="T57">)</text:span></text:p>
            <text:p text:style-name="P114"><text:span text:style-name="T57"><text:tab/><text:tab/><text:tab/><text:tab/>.append(</text:span><text:span text:style-name="T83">metode</text:span><text:span text:style-name="T57">)</text:span></text:p>
            <text:p text:style-name="P114"><text:span text:style-name="T57"><text:tab/><text:tab/><text:tab/><text:tab/>.append(</text:span><text:span text:style-name="T34">"\" amb els paràmetres {"</text:span><text:span text:style-name="T57">);</text:span></text:p>
            <text:p text:style-name="P114"><text:span text:style-name="T57"><text:tab/><text:tab/></text:span><text:span text:style-name="T49">int</text:span><text:span text:style-name="T57"> </text:span><text:span text:style-name="T83">i</text:span><text:span text:style-name="T57"> = 0;</text:span></text:p>
            <text:p text:style-name="P114"><text:span text:style-name="T57"><text:tab/><text:tab/></text:span><text:span text:style-name="T49">for</text:span><text:span text:style-name="T57"> (String </text:span><text:span text:style-name="T83">key</text:span><text:span text:style-name="T57"> : </text:span><text:span text:style-name="T83">parametres</text:span><text:span text:style-name="T57">.keySet()) {</text:span></text:p>
            <text:p text:style-name="P114"><text:span text:style-name="T57"><text:tab/><text:tab/><text:tab/></text:span><text:span text:style-name="T83">str</text:span><text:span text:style-name="T57">.append(</text:span><text:span text:style-name="T83">key</text:span><text:span text:style-name="T57">).append(</text:span><text:span text:style-name="T34">"="</text:span><text:span text:style-name="T57">).append(</text:span><text:span text:style-name="T83">parametres</text:span><text:span text:style-name="T57">.get(</text:span><text:span text:style-name="T83">key</text:span><text:span text:style-name="T57">));</text:span></text:p>
            <text:p text:style-name="P114"><text:span text:style-name="T57"><text:tab/><text:tab/><text:tab/></text:span><text:span text:style-name="T83">i</text:span><text:span text:style-name="T57">++;</text:span></text:p>
            <text:p text:style-name="P114"><text:span text:style-name="T57"><text:tab/><text:tab/><text:tab/></text:span><text:span text:style-name="T49">if</text:span><text:span text:style-name="T57"> (</text:span><text:span text:style-name="T83">i</text:span><text:span text:style-name="T57">&lt;</text:span><text:span text:style-name="T83">parametres</text:span><text:span text:style-name="T57">.size())</text:span></text:p>
            <text:p text:style-name="P114"><text:span text:style-name="T57"><text:tab/><text:tab/><text:tab/><text:tab/></text:span><text:span text:style-name="T83">str</text:span><text:span text:style-name="T57">.append(</text:span><text:span text:style-name="T34">", "</text:span><text:span text:style-name="T57">);</text:span></text:p>
            <text:p text:style-name="P89"><text:tab/><text:tab/>}</text:p>
            <text:p text:style-name="P114"><text:span text:style-name="T57"><text:tab/><text:tab/></text:span><text:span text:style-name="T83">str</text:span><text:span text:style-name="T57">.append(</text:span><text:span text:style-name="T34">"} amb resultat "</text:span><text:span text:style-name="T57">).append(</text:span><text:span text:style-name="T83">correcte</text:span><text:span text:style-name="T57"> ? </text:span><text:span text:style-name="T34">"OK"</text:span><text:span text:style-name="T57"> : </text:span><text:span text:style-name="T34">"KO"</text:span><text:span text:style-name="T57">);</text:span></text:p>
            <text:p text:style-name="P114"><text:span text:style-name="T57"><text:tab/><text:tab/></text:span><text:span text:style-name="T49">if</text:span><text:span text:style-name="T57"> (</text:span><text:span text:style-name="T83">error</text:span><text:span text:style-name="T57"> != </text:span><text:span text:style-name="T49">null</text:span><text:span text:style-name="T57">)</text:span></text:p>
            <text:p text:style-name="P114"><text:span text:style-name="T57"><text:tab/><text:tab/><text:tab/></text:span><text:span text:style-name="T83">str</text:span><text:span text:style-name="T57">.append(</text:span><text:span text:style-name="T34">": "</text:span><text:span text:style-name="T57">).append(</text:span><text:span text:style-name="T83">error</text:span><text:span text:style-name="T57">);</text:span></text:p>
            <text:p text:style-name="P114"><text:span text:style-name="T57"><text:tab/><text:tab/></text:span><text:span text:style-name="T49">if</text:span><text:span text:style-name="T57"> (</text:span><text:span text:style-name="T83">e</text:span><text:span text:style-name="T57"> != </text:span><text:span text:style-name="T49">null</text:span><text:span text:style-name="T57">)</text:span></text:p>
            <text:p text:style-name="P114"><text:span text:style-name="T57"><text:tab/><text:tab/><text:tab/></text:span><text:span text:style-name="T83">str</text:span><text:span text:style-name="T57">.append(</text:span><text:span text:style-name="T34">" "</text:span><text:span text:style-name="T57">).append(</text:span><text:span text:style-name="T83">e</text:span><text:span text:style-name="T57">.getClass()).append(</text:span><text:span text:style-name="T34">" "</text:span><text:span text:style-name="T57">).append(</text:span><text:span text:style-name="T83">e</text:span><text:span text:style-name="T57">.getMessage());</text:span></text:p>
            <text:p text:style-name="P114"><text:span text:style-name="T57"><text:tab/><text:tab/></text:span><text:span text:style-name="T83">str</text:span><text:span text:style-name="T57">.append(</text:span><text:span text:style-name="T34">" "</text:span><text:span text:style-name="T57">).append(</text:span><text:span text:style-name="T83">timeMs</text:span><text:span text:style-name="T57">).append(</text:span><text:span text:style-name="T34">"ms"</text:span><text:span text:style-name="T57">);</text:span></text:p>
            <text:p text:style-name="P89"><text:tab/><text:tab/></text:p>
            <text:p text:style-name="P114"><text:span text:style-name="T57"><text:tab/><text:tab/></text:span><text:span text:style-name="T78">logger</text:span><text:span text:style-name="T57">.debug(</text:span><text:span text:style-name="T83">str</text:span><text:span text:style-name="T57">.toString());</text:span></text:p>
            <text:p text:style-name="P86"><text:tab/>}</text:p>
            <text:p text:style-name="P86">...</text:p>
            <text:p text:style-name="P86">}</text:p>
          </table:table-cell>
        </table:table-row>
      </table:table>
      <text:p text:style-name="P76"/>
      <text:p text:style-name="P167"><text:span text:style-name="T196">E</text:span><text:span text:style-name="T194">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7"><text:span text:style-name="T175">taula.</text:span><text:span text:style-name="T194"> Crida al mètode </text:span><text:span text:style-name="T154">crearExpedientAmbAnotacioRegistre</text:span><text:span text:style-name="T194">.</text:span></text:p>
      <table:table table:name="Table9" table:style-name="Table9">
        <table:table-column table:style-name="Table9.A"/>
        <table:table-row table:style-name="TableLine645005808">
          <table:table-cell table:style-name="Table9.A1" office:value-type="string">
            <text:p text:style-name="P112"><text:span text:style-name="T220">/</text:span><text:span text:style-name="T222">/ Crida a la creació de l'expedient</text:span></text:p>
            <text:p text:style-name="P121"><text:span text:style-name="T57">String </text:span><text:span text:style-name="T83">SERIE_DOCUMENTAL</text:span><text:span text:style-name="T57"> = </text:span><text:span text:style-name="T34">"S0002"</text:span><text:span text:style-name="T57">; </text:span></text:p>
            <text:p text:style-name="P121"><text:span text:style-name="T57">String </text:span><text:span text:style-name="T83">CLASSIFICACIO</text:span><text:span text:style-name="T57"> = </text:span><text:span text:style-name="T34">"000000"</text:span><text:span text:style-name="T57">;</text:span></text:p>
            <text:p text:style-name="P121"><text:span text:style-name="T57">ArxiuResultat </text:span><text:span text:style-name="T83">arxiuResultat</text:span><text:span text:style-name="T57">;</text:span></text:p>
            <text:p text:style-name="P121"><text:span text:style-name="T49">int</text:span><text:span text:style-name="T57"> </text:span><text:span text:style-name="T83">intent</text:span><text:span text:style-name="T57"> = 0;</text:span></text:p>
            <text:p text:style-name="P121"><text:span text:style-name="T57">String </text:span><text:span text:style-name="T83">expedientUuid</text:span><text:span text:style-name="T57"> = </text:span><text:span text:style-name="T49">null</text:span><text:span text:style-name="T57">;</text:span></text:p>
            <text:p text:style-name="P121"><text:span text:style-name="T49">do</text:span><text:span text:style-name="T57"> {</text:span></text:p>
            <text:p text:style-name="P121"><text:span text:style-name="T57"><text:tab/></text:span><text:span text:style-name="T220">// Crida al mètode de creació de la llibreria</text:span></text:p>
            <text:p text:style-name="P121"><text:span text:style-name="T57"><text:tab/></text:span><text:span text:style-name="T83">arxiuResultat</text:span><text:span text:style-name="T57"> = </text:span><text:span text:style-name="T83">BackofficeArxiuUtils</text:span><text:span text:style-name="T57">.crearExpedientAmbAnotacioRegistre(</text:span></text:p>
            <text:p text:style-name="P121"><text:span text:style-name="T57"><text:tab/><text:tab/><text:tab/><text:tab/><text:tab/><text:tab/><text:tab/><text:tab/></text:span><text:span text:style-name="T83">expedientUuid</text:span><text:span text:style-name="T57">,</text:span></text:p>
            <text:p text:style-name="P121"><text:span text:style-name="T57"><text:tab/><text:tab/><text:tab/><text:tab/><text:tab/><text:tab/><text:tab/><text:tab/></text:span><text:span text:style-name="T83">anotacio</text:span><text:span text:style-name="T57">.getIdentificador(),</text:span></text:p>
            <text:p text:style-name="P121"><text:span text:style-name="T57"><text:tab/><text:tab/><text:tab/><text:tab/><text:tab/><text:tab/><text:tab/><text:tab/></text:span><text:span text:style-name="T49">null</text:span><text:span text:style-name="T57">,</text:span></text:p>
            <text:p text:style-name="P121"><text:span text:style-name="T57"><text:tab/><text:tab/><text:tab/><text:tab/><text:tab/><text:tab/><text:tab/><text:tab/>Arrays.</text:span><text:span text:style-name="T64">asList</text:span><text:span text:style-name="T57">(</text:span><text:span text:style-name="T34">"A04019281"</text:span><text:span text:style-name="T57">),</text:span></text:p>
            <text:p text:style-name="P121"><text:span text:style-name="T57"><text:tab/><text:tab/><text:tab/><text:tab/><text:tab/><text:tab/><text:tab/><text:tab/></text:span><text:span text:style-name="T49">new</text:span><text:span text:style-name="T57"> Date(),</text:span></text:p>
            <text:p text:style-name="P121"><text:span text:style-name="T57"><text:tab/><text:tab/><text:tab/><text:tab/><text:tab/><text:tab/><text:tab/><text:tab/></text:span><text:span text:style-name="T83">CLASSIFICACIO</text:span><text:span text:style-name="T57">,</text:span></text:p>
            <text:p text:style-name="P121"><text:span text:style-name="T57"><text:tab/><text:tab/><text:tab/><text:tab/><text:tab/><text:tab/><text:tab/><text:tab/>ExpedientEstatEnumDto.</text:span><text:span text:style-name="T78">OBERT</text:span><text:span text:style-name="T57">,</text:span></text:p>
            <text:p text:style-name="P121"><text:span text:style-name="T57"><text:tab/><text:tab/><text:tab/><text:tab/><text:tab/><text:tab/><text:tab/><text:tab/></text:span><text:span text:style-name="T83">SERIE_DOCUMENTAL</text:span><text:span text:style-name="T57">,</text:span></text:p>
            <text:p text:style-name="P121"><text:span text:style-name="T57"><text:tab/><text:tab/><text:tab/><text:tab/><text:tab/><text:tab/><text:tab/><text:tab/></text:span><text:span text:style-name="T83">anotacio</text:span><text:span text:style-name="T57">);</text:span></text:p>
            <text:p text:style-name="P121"><text:span text:style-name="T57"><text:tab/></text:span><text:span text:style-name="T83">expedientUuid</text:span><text:span text:style-name="T57"> = </text:span><text:span text:style-name="T83">arxiuResultat</text:span><text:span text:style-name="T57">.getIdentificadorExpedient();</text:span></text:p>
            <text:p text:style-name="P121"><text:span text:style-name="T57"><text:tab/></text:span><text:span text:style-name="T220">// Imprimeix el resultat per pantalla</text:span></text:p>
            <text:p text:style-name="P121"><text:span text:style-name="T57"><text:tab/></text:span><text:span text:style-name="T49">this</text:span><text:span text:style-name="T57">.logResultat(</text:span></text:p>
            <text:p text:style-name="P121"><text:span text:style-name="T57"><text:tab/><text:tab/><text:tab/></text:span><text:span text:style-name="T34">"Resultat de la crida "</text:span><text:span text:style-name="T57"> + </text:span><text:span text:style-name="T83">intent</text:span><text:span text:style-name="T57">++ + </text:span><text:span text:style-name="T34">" crearExpedientAmbAnotacioRegistre per l'expedient"</text:span><text:span text:style-name="T57"> + </text:span><text:span text:style-name="T83">anotacio</text:span><text:span text:style-name="T57">.getExpedientNumero(),</text:span></text:p>
            <text:p text:style-name="P121"><text:span text:style-name="T57"><text:tab/><text:tab/><text:tab/></text:span><text:span text:style-name="T83">arxiuResultat</text:span><text:span text:style-name="T57">);<text:tab/><text:tab/><text:tab/><text:tab/><text:tab/></text:span></text:p>
            <text:p text:style-name="P40"><text:span text:style-name="T65">} </text:span><text:span text:style-name="T50">while</text:span><text:span text:style-name="T65">(</text:span><text:span text:style-name="T86">arxiuResultat</text:span><text:span text:style-name="T65">.getErrorCodi() !=</text:span><text:span text:style-name="T66"> Distri</text:span><text:span text:style-name="T67">bucioArxiuError.</text:span><text:span text:style-name="T80">NO_ERROR</text:span><text:span text:style-name="T67"> &amp;&amp; </text:span><text:span text:style-name="T88">in</text:span><text:span text:style-name="T89">tent</text:span><text:span text:style-name="T68"> &lt; 10);<text:tab/></text:span></text:p>
          </table:table-cell>
        </table:table-row>
      </table:table>
      <text:p text:style-name="P77"/>
      <text:p text:style-name="P167"><text:span text:style-name="T194">A mode informatiu a l'exemple s'imprimeix als logs el contingut de l'objecte </text:span><text:span text:style-name="T154">arxiuResultat</text:span><text:span text:style-name="T194"> amb el mètode </text:span><text:span text:style-name="T154">logResultat</text:span><text:span text:style-name="T194">.</text:span></text:p>
      <table:table table:name="Table10" table:style-name="Table10">
        <table:table-column table:style-name="Table10.A"/>
        <text:soft-page-break/>
        <table:table-row table:style-name="TableLine645004944">
          <table:table-cell table:style-name="Table10.A1" office:value-type="string">
            <text:p text:style-name="P119"><text:span text:style-name="T49">private</text:span><text:span text:style-name="T57"> </text:span><text:span text:style-name="T49">void</text:span><text:span text:style-name="T57"> </text:span><text:span text:style-name="T61">logResultat</text:span><text:span text:style-name="T57">(String </text:span><text:span text:style-name="T83">descripcio</text:span><text:span text:style-name="T57">, ArxiuResultat </text:span><text:span text:style-name="T83">arxiuResultat</text:span><text:span text:style-name="T57">) {</text:span></text:p>
            <text:p text:style-name="P121"><text:span text:style-name="T57"><text:tab/></text:span><text:span text:style-name="T78">logger</text:span><text:span text:style-name="T57">.debug(</text:span><text:span text:style-name="T83">descripcio</text:span><text:span text:style-name="T57">);</text:span></text:p>
            <text:p text:style-name="P121"><text:span text:style-name="T57"><text:tab/></text:span><text:span text:style-name="T220">// Resultat a nivell d'expedient</text:span></text:p>
            <text:p text:style-name="P121"><text:span text:style-name="T57"><text:tab/></text:span><text:span text:style-name="T78">logger</text:span><text:span text:style-name="T57">.debug(</text:span><text:span text:style-name="T34">"- uuid: "</text:span><text:span text:style-name="T57"> + </text:span><text:span text:style-name="T83">arxiuResultat</text:span><text:span text:style-name="T57">.getIdentificadorExpedient());</text:span></text:p>
            <text:p text:style-name="P121"><text:span text:style-name="T57"><text:tab/></text:span><text:span text:style-name="T78">logger</text:span><text:span text:style-name="T57">.debug(</text:span><text:span text:style-name="T34">"- accio: "</text:span><text:span text:style-name="T57"> + </text:span><text:span text:style-name="T83">arxiuResultat</text:span><text:span text:style-name="T57">.getAccio());</text:span></text:p>
            <text:p text:style-name="P121"><text:span text:style-name="T57"><text:tab/></text:span><text:span text:style-name="T78">logger</text:span><text:span text:style-name="T57">.debug(</text:span><text:span text:style-name="T34">"- errorCodi: "</text:span><text:span text:style-name="T57"> + </text:span><text:span text:style-name="T83">arxiuResultat</text:span><text:span text:style-name="T57">.getErrorCodi());</text:span></text:p>
            <text:p text:style-name="P121"><text:span text:style-name="T57"><text:tab/></text:span><text:span text:style-name="T78">logger</text:span><text:span text:style-name="T57">.debug(</text:span><text:span text:style-name="T34">"- errorMessage: "</text:span><text:span text:style-name="T57"> + </text:span><text:span text:style-name="T83">arxiuResultat</text:span><text:span text:style-name="T57">.getErrorMessage());</text:span></text:p>
            <text:p text:style-name="P121"><text:span text:style-name="T57"><text:tab/></text:span><text:span text:style-name="T78">logger</text:span><text:span text:style-name="T57">.debug(</text:span><text:span text:style-name="T34">"- excepcio: "</text:span><text:span text:style-name="T57"> + (</text:span><text:span text:style-name="T83">arxiuResultat</text:span><text:span text:style-name="T57">.getException() != </text:span><text:span text:style-name="T49">null</text:span><text:span text:style-name="T57">? </text:span><text:span text:style-name="T83">arxiuResultat</text:span><text:span text:style-name="T57">.getException().getClass() + </text:span><text:span text:style-name="T34">" "</text:span><text:span text:style-name="T57"> + </text:span><text:span text:style-name="T83">arxiuResultat</text:span><text:span text:style-name="T57">.getException().getMessage() : <text:s/></text:span><text:span text:style-name="T34">" - "</text:span><text:span text:style-name="T57">));</text:span></text:p>
            <text:p text:style-name="P180"/>
            <text:p text:style-name="P121"><text:span text:style-name="T57"><text:tab/></text:span><text:span text:style-name="T220">// Resultat pels annexos</text:span></text:p>
            <text:p text:style-name="P121"><text:span text:style-name="T57"><text:tab/>List&lt;ArxiuResultatAnnex&gt; </text:span><text:span text:style-name="T83">resultatAnnexos</text:span><text:span text:style-name="T57"> = </text:span><text:span text:style-name="T83">arxiuResultat</text:span><text:span text:style-name="T57">.getResultatAnnexos(); </text:span></text:p>
            <text:p text:style-name="P121"><text:span text:style-name="T57"><text:tab/></text:span><text:span text:style-name="T78">logger</text:span><text:span text:style-name="T57">.debug(</text:span><text:span text:style-name="T34">" - Resultat dels "</text:span><text:span text:style-name="T57"> + </text:span><text:span text:style-name="T83">resultatAnnexos</text:span><text:span text:style-name="T57">.size() + </text:span><text:span text:style-name="T34">" annexos:"</text:span><text:span text:style-name="T57">);</text:span></text:p>
            <text:p text:style-name="P121"><text:span text:style-name="T57"><text:tab/></text:span><text:span text:style-name="T49">for</text:span><text:span text:style-name="T57"> (ArxiuResultatAnnex </text:span><text:span text:style-name="T83">resultatAnnex</text:span><text:span text:style-name="T57"> : </text:span><text:span text:style-name="T83">resultatAnnexos</text:span><text:span text:style-name="T57">) {</text:span></text:p>
            <text:p text:style-name="P121"><text:span text:style-name="T57"><text:tab/><text:tab/></text:span><text:span text:style-name="T78">logger</text:span><text:span text:style-name="T57">.debug(</text:span><text:span text:style-name="T34">"\b- uuid: "</text:span><text:span text:style-name="T57"> + </text:span><text:span text:style-name="T83">resultatAnnex</text:span><text:span text:style-name="T57">.getIdentificadorAnnex());</text:span></text:p>
            <text:p text:style-name="P121"><text:span text:style-name="T57"><text:tab/><text:tab/></text:span><text:span text:style-name="T78">logger</text:span><text:span text:style-name="T57">.debug(</text:span><text:span text:style-name="T34">"\\b- accio: "</text:span><text:span text:style-name="T57"> + </text:span><text:span text:style-name="T83">resultatAnnex</text:span><text:span text:style-name="T57">.getAccio());</text:span></text:p>
            <text:p text:style-name="P121"><text:span text:style-name="T57"><text:tab/><text:tab/></text:span><text:span text:style-name="T78">logger</text:span><text:span text:style-name="T57">.debug(</text:span><text:span text:style-name="T34">"\\b- errorCodi: "</text:span><text:span text:style-name="T57"> + </text:span><text:span text:style-name="T83">resultatAnnex</text:span><text:span text:style-name="T57">.getErrorCodi());</text:span></text:p>
            <text:p text:style-name="P121"><text:span text:style-name="T57"><text:tab/><text:tab/></text:span><text:span text:style-name="T78">logger</text:span><text:span text:style-name="T57">.debug(</text:span><text:span text:style-name="T34">"\\b- errorMessage: "</text:span><text:span text:style-name="T57"> + </text:span><text:span text:style-name="T83">resultatAnnex</text:span><text:span text:style-name="T57">.getErrorMessage());</text:span></text:p>
            <text:p text:style-name="P121"><text:span text:style-name="T57"><text:tab/><text:tab/></text:span><text:span text:style-name="T78">logger</text:span><text:span text:style-name="T57">.debug(</text:span><text:span text:style-name="T34">"\\b- excepcio: "</text:span><text:span text:style-name="T57"> + (</text:span><text:span text:style-name="T83">resultatAnnex</text:span><text:span text:style-name="T57">.getException() != </text:span><text:span text:style-name="T49">null</text:span><text:span text:style-name="T57">? </text:span><text:span text:style-name="T83">resultatAnnex</text:span><text:span text:style-name="T57">.getException().getClass() + </text:span><text:span text:style-name="T34">" "</text:span><text:span text:style-name="T57"> + </text:span><text:span text:style-name="T83">resultatAnnex</text:span><text:span text:style-name="T57">.getException().getMessage() : <text:s/></text:span><text:span text:style-name="T34">" - "</text:span><text:span text:style-name="T57">));</text:span></text:p>
            <text:p text:style-name="P94"><text:tab/>}</text:p>
            <text:p text:style-name="P92">}</text:p>
          </table:table-cell>
        </table:table-row>
      </table:table>
      <text:p text:style-name="P77"/>
      <text:p text:style-name="P77">En aquest punt ja s'ha utilitzat la llibreria d'integració per moure continguts i a l'Arxiu s'haurien de poder veure els expedients d'origen i final</text:p>
      <text:p text:style-name="P77"/>
      <text:p text:style-name="P77"><draw:frame draw:style-name="fr1" draw:name="Frame3" text:anchor-type="paragraph" svg:width="17cm" draw:z-index="54"><draw:text-box fo:min-height="9.73cm"><text:p text:style-name="Fig."><draw:frame draw:style-name="fr6" draw:name="Image4" text:anchor-type="as-char" svg:width="17cm" style:rel-width="100%" svg:height="9.73cm" style:rel-height="scale" draw:z-index="55"><draw:image xlink:href="Pictures/100000000000042F000002651464A6ADC9A970F9.png" xlink:type="simple" xlink:show="embed" xlink:actuate="onLoad" draw:mime-type="image/png"/></draw:frame><text:span text:style-name="T228"><text:line-break/></text:span>Fig. <text:sequence text:ref-name="refFig.4" text:name="Fig." text:formula="ooow:Fig.+1" style:num-format="1">5</text:sequence>: Expedient origen a l'Arxiu.</text:p></draw:text-box></draw:frame></text:p>
      <text:p text:style-name="P77"><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CF3198E9D454B4E5.png" xlink:type="simple" xlink:show="embed" xlink:actuate="onLoad" draw:mime-type="image/png"/></draw:frame><text:span text:style-name="T228"><text:line-break/></text:span>Fig. <text:sequence text:ref-name="refFig.5" text:name="Fig." text:formula="ooow:Fig.+1" style:num-format="1">6</text:sequence>: Expedient després de la crida al mètode de la llibreria d'utilitats<text:span text:style-name="T229">.</text:span></text:p></draw:text-box></draw:frame><text:soft-page-break/></text:p>
      <text:p text:style-name="P168">Per acabar es mostra la porció de codi que consulta el nou expedient i comunica l'estat a l'aplicació de DISTRIBUCIO<text:span text:style-name="T227"> segons el codi del resultat.</text:span></text:p>
      <table:table table:name="Table11" table:style-name="Table11">
        <table:table-column table:style-name="Table11.A"/>
        <table:table-row table:style-name="TableLine645004080">
          <table:table-cell table:style-name="Table11.A1" office:value-type="string">
            <text:p text:style-name="P112"><text:span text:style-name="T220">// </text:span><text:span text:style-name="T221">Consultem</text:span><text:span text:style-name="T220"> el </text:span><text:span text:style-name="T221">nou</text:span><text:span text:style-name="T220"> expedient a l'Arxiu</text:span></text:p>
            <text:p text:style-name="P114"><text:span text:style-name="T49">if</text:span><text:span text:style-name="T57"> (</text:span><text:span text:style-name="T83">expedientUuid</text:span><text:span text:style-name="T57"> != </text:span><text:span text:style-name="T49">null</text:span><text:span text:style-name="T57">) {</text:span></text:p>
            <text:p text:style-name="P114"><text:span text:style-name="T57"><text:tab/>Expedient </text:span><text:span text:style-name="T83">expedientDetalls</text:span><text:span text:style-name="T57"> = getArxiuPlugin().expedientDetalls(</text:span><text:span text:style-name="T83">arxiuResultat</text:span><text:span text:style-name="T57">.getIdentificadorExpedient(), </text:span><text:span text:style-name="T49">null</text:span><text:span text:style-name="T57">);</text:span></text:p>
            <text:p text:style-name="P114"><text:span text:style-name="T57"><text:tab/></text:span><text:span text:style-name="T78">logger</text:span><text:span text:style-name="T57">.debug(</text:span><text:span text:style-name="T34">"S'ha creat l'expedient \""</text:span><text:span text:style-name="T57"> + </text:span><text:span text:style-name="T83">expedientDetalls</text:span><text:span text:style-name="T57">.getNom() + </text:span><text:span text:style-name="T34">"\" amb id="</text:span><text:span text:style-name="T57"> + </text:span><text:span text:style-name="T83">expedientDetalls</text:span><text:span text:style-name="T57">.getIdentificador() + </text:span><text:span text:style-name="T34">" per l'anotació "</text:span><text:span text:style-name="T57"> + </text:span><text:span text:style-name="T83">anotacio</text:span><text:span text:style-name="T57">.getIdentificador() + </text:span><text:span text:style-name="T34">" amb els següents continguts:"</text:span><text:span text:style-name="T57">);</text:span></text:p>
            <text:p text:style-name="P114"><text:span text:style-name="T57"><text:tab/></text:span><text:span text:style-name="T49">for</text:span><text:span text:style-name="T57"> (ContingutArxiu </text:span><text:span text:style-name="T83">contingut</text:span><text:span text:style-name="T57"> : </text:span><text:span text:style-name="T83">expedientDetalls</text:span><text:span text:style-name="T57">.getContinguts()) {</text:span></text:p>
            <text:p text:style-name="P114"><text:span text:style-name="T57"><text:tab/><text:tab/></text:span><text:span text:style-name="T78">logger</text:span><text:span text:style-name="T57">.debug(</text:span><text:span text:style-name="T34">"- "</text:span><text:span text:style-name="T57"> + </text:span><text:span text:style-name="T83">contingut</text:span><text:span text:style-name="T57">.getIdentificador() + </text:span><text:span text:style-name="T34">" "</text:span><text:span text:style-name="T57"> + </text:span><text:span text:style-name="T83">contingut</text:span><text:span text:style-name="T57">.getNom() + </text:span><text:span text:style-name="T34">" amb "</text:span><text:span text:style-name="T57"> + (</text:span><text:span text:style-name="T83">contingut</text:span><text:span text:style-name="T57">.getFirmes() != </text:span><text:span text:style-name="T49">null</text:span><text:span text:style-name="T57">? </text:span><text:span text:style-name="T83">contingut</text:span><text:span text:style-name="T57">.getFirmes().size() : 0) + </text:span><text:span text:style-name="T34">" firmes."</text:span><text:span text:style-name="T57">);</text:span></text:p>
            <text:p text:style-name="P89"><text:tab/>}</text:p>
            <text:p text:style-name="P114"><text:span text:style-name="T57">} </text:span><text:span text:style-name="T49">else</text:span><text:span text:style-name="T57"> {</text:span></text:p>
            <text:p text:style-name="P114"><text:span text:style-name="T57"><text:tab/></text:span><text:span text:style-name="T78">logger</text:span><text:span text:style-name="T57">.warn(</text:span><text:span text:style-name="T34">"L'expedient no s'ha pogut crear per l'anotació "</text:span><text:span text:style-name="T57"> + </text:span><text:span text:style-name="T83">anotacio</text:span><text:span text:style-name="T57">.getIdentificador());</text:span></text:p>
            <text:p text:style-name="P89">}</text:p>
            <text:p text:style-name="P114"><text:span text:style-name="T220">// </text:span><text:span text:style-name="T221">Es</text:span><text:span text:style-name="T220"> </text:span><text:span text:style-name="T221">comunica</text:span><text:span text:style-name="T220"> el </text:span><text:span text:style-name="T221">resultat</text:span><text:span text:style-name="T220"> a DISTRIBUCIO</text:span></text:p>
            <text:p text:style-name="P114"><text:span text:style-name="T49">switch</text:span><text:span text:style-name="T57">(</text:span><text:span text:style-name="T83">arxiuResultat</text:span><text:span text:style-name="T57">.getErrorCodi()) {</text:span></text:p>
            <text:p text:style-name="P114"><text:span text:style-name="T57"><text:tab/></text:span><text:span text:style-name="T49">case</text:span><text:span text:style-name="T57"> 0:</text:span></text:p>
            <text:p text:style-name="P114"><text:span text:style-name="T57"><text:tab/><text:tab/></text:span><text:span text:style-name="T83">backofficeClient</text:span><text:span text:style-name="T57">.canviEstat(</text:span><text:span text:style-name="T83">idWs</text:span><text:span text:style-name="T57">, es.caib.distribucio.ws.backofficeintegracio.Estat.</text:span><text:span text:style-name="T78">PROCESSADA</text:span><text:span text:style-name="T57">, </text:span><text:span text:style-name="T34">"Processada"</text:span><text:span text:style-name="T57">);</text:span></text:p>
            <text:p text:style-name="P114"><text:span text:style-name="T57"><text:tab/><text:tab/></text:span><text:span text:style-name="T49">break</text:span><text:span text:style-name="T57">;</text:span></text:p>
            <text:p text:style-name="P114"><text:span text:style-name="T57"><text:tab/></text:span><text:span text:style-name="T49">default</text:span><text:span text:style-name="T57">:</text:span></text:p>
            <text:p text:style-name="P114"><text:span text:style-name="T57"><text:tab/><text:tab/></text:span><text:span text:style-name="T83">backofficeClient</text:span><text:span text:style-name="T57">.canviEstat(</text:span><text:span text:style-name="T83">idWs</text:span><text:span text:style-name="T57">, es.caib.distribucio.ws.backofficeintegracio.Estat.</text:span><text:span text:style-name="T78">ERROR</text:span><text:span text:style-name="T57">, </text:span><text:span text:style-name="T83">arxiuResultat</text:span><text:span text:style-name="T57">.getErrorCodi()</text:span><text:span text:style-name="T70"> + </text:span><text:span text:style-name="T36">" "</text:span><text:span text:style-name="T70"> + </text:span><text:span text:style-name="T83">arxiuResultat</text:span><text:span text:style-name="T57">.getErrorMessage());</text:span></text:p>
            <text:p text:style-name="P114"><text:span text:style-name="T57"><text:tab/><text:tab/></text:span><text:span text:style-name="T49">break</text:span><text:span text:style-name="T57">;</text:span></text:p>
            <text:p text:style-name="P87">}</text:p>
          </table:table-cell>
        </table:table-row>
      </table:table>
      <text:p text:style-name="P72"/>
      <text:list xml:id="list175634094737933" text:continue-numbering="true" text:style-name="Outline">
        <text:list-item>
          <text:list>
            <text:list-item>
              <text:h text:style-name="P410" text:outline-level="2"><text:bookmark-start text:name="__RefHeading___Toc50910_29075569581"/>Utilitats per Sistra2<text:bookmark-end text:name="__RefHeading___Toc50910_29075569581"/></text:h>
            </text:list-item>
          </text:list>
        </text:list-item>
      </text:list>
      <text:p text:style-name="P176"><text:span text:style-name="T238">S</text:span><text:span text:style-name="T239">erà un cas comú que els tràmits telemàtics de Sistra2 arribin als backoffices de Distribucio amb documents tècnics de pagaments o formularis com annexos. Aquests documents contenen un XML </text:span><text:soft-page-break/><text:span text:style-name="T239">definit pels esquemes XSD corresponents de Sistra2 i contenen les dades d'un formulari o d'un pagament. A fi de facilitar el l</text:span><text:span text:style-name="T240">a </text:span><text:span text:style-name="T239">interpretació </text:span><text:span text:style-name="T240">del </text:span><text:span text:style-name="T239">contingut per part dels backoffices de Distribucio s'ha creat la classe d'utilitats </text:span><text:span text:style-name="T150">BackofficeSistra2Utils</text:span><text:span text:style-name="T184"> amb els mètodes per extreure la informació dels documents tècnics XML. En aquest apartat es descriu l'ús de la llibreria per aquest cas i un exemple Java.</text:span></text:p>
      <text:list xml:id="list175633970852776" text:continue-numbering="true" text:style-name="Outline">
        <text:list-item>
          <text:list>
            <text:list-item>
              <text:list>
                <text:list-item>
                  <text:h text:style-name="P418" text:outline-level="3"><text:bookmark-start text:name="__RefHeading___Toc366109_93553639"/><text:span text:style-name="T234">Ús de </text:span><text:span text:style-name="T135">BackofficeSistra2Utils</text:span><text:bookmark-end text:name="__RefHeading___Toc366109_93553639"/></text:h>
                </text:list-item>
              </text:list>
            </text:list-item>
          </text:list>
        </text:list-item>
      </text:list>
      <text:p text:style-name="P170"><text:span text:style-name="T209">Per utilitzar la </text:span><text:span text:style-name="T237">classe</text:span><text:span text:style-name="T144"> BackofficeS</text:span><text:span text:style-name="T145">istra2U</text:span><text:span text:style-name="T144">tils</text:span><text:span text:style-name="T181"> amb les u</text:span><text:span text:style-name="T185">t</text:span><text:span text:style-name="T181">ilitats</text:span><text:span text:style-name="T185"> per Sistra2</text:span><text:span text:style-name="T181"> </text:span><text:span text:style-name="T241">s'ha de crear un objecte de la classe </text:span><text:span text:style-name="T134">Backoffice</text:span><text:span text:style-name="T146">S</text:span><text:span text:style-name="T145">istra2</text:span><text:span text:style-name="T134">UtilsImpl</text:span><text:span text:style-name="T165">.</text:span><text:span text:style-name="T169"> Aquesta classe no precisa de configurar i conté 2 mètodes per llegir el contingut d'un </text:span><text:span text:style-name="T171">document </text:span><text:span text:style-name="T169">annex i retornar la informació d'un formulari o d'un pagament. Els mètodes que conté són:</text:span></text:p>
      <text:list xml:id="list942016691" text:style-name="L17">
        <text:list-item>
          <text:p text:style-name="P454"><text:span text:style-name="T145">F</text:span><text:span text:style-name="T147">ormulario</text:span><text:span text:style-name="T136"> parseXml</text:span><text:span text:style-name="T137">Formulario</text:span><text:span text:style-name="T136">(</text:span><text:span text:style-name="T145">b</text:span><text:span text:style-name="T149">yte[]</text:span><text:span text:style-name="T136">) </text:span><text:span text:style-name="T169">: Processa el contingut </text:span><text:span text:style-name="T171">en bytes </text:span><text:span text:style-name="T169">de</text:span><text:span text:style-name="T171">l document annex del formulari </text:span><text:span text:style-name="T169">i retorna les dades del pagament en forma d'objecte</text:span><text:span text:style-name="T136"> </text:span><text:span text:style-name="T147">Formulario</text:span><text:span text:style-name="T169">.</text:span></text:p>
        </text:list-item>
        <text:list-item>
          <text:p text:style-name="P454"><text:span text:style-name="T136">Pago parseXmlPago(</text:span><text:span text:style-name="T145">b</text:span><text:span text:style-name="T149">yte[]</text:span><text:span text:style-name="T136">) </text:span><text:span text:style-name="T169">: Processa el contingut </text:span><text:span text:style-name="T171">en bytes del document</text:span><text:span text:style-name="T185"> </text:span><text:span text:style-name="T169">annex </text:span><text:span text:style-name="T171">del pagament </text:span><text:span text:style-name="T169">i retorna les dades del pagament en forma d'objecte</text:span><text:span text:style-name="T136"> Pago</text:span><text:span text:style-name="T169">.</text:span><text:span text:style-name="T136"> </text:span></text:p>
        </text:list-item>
      </text:list>
      <text:p text:style-name="P170"><text:span text:style-name="T179">T</text:span><text:span text:style-name="T186">ant la classe </text:span><text:span text:style-name="T147">Formulario</text:span><text:span text:style-name="T186"> com la classe </text:span><text:span text:style-name="T147">Pago</text:span><text:span text:style-name="T186"> estan generades a partir dels esquemes XSD de les dades XML provinents de Sistra i els mètodes serveixen per transformar les dades XML a objectes que puguin ser tractats pel backoffice</text:span><text:span text:style-name="T166">.</text:span></text:p>
      <text:p text:style-name="P69"><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8"><text:line-break/></text:span>Fig. <text:sequence text:ref-name="refFig.6" text:name="Fig." text:formula="ooow:Fig.+1" style:num-format="1">7</text:sequence>: Diagrama de classes de BackofficeSistra2Utils i les classes de Formulario i Pago que retorna.</text:p></draw:text-box></draw:frame></text:p>
      <text:p text:style-name="P171"><text:soft-page-break/><text:span text:style-name="T184">E</text:span><text:span text:style-name="T175">ls mètodes reben </text:span><text:span text:style-name="T191">el contingut en </text:span><text:span text:style-name="T151">byte[]</text:span><text:span text:style-name="T175"> com a paràmetre d'entrada i retornen un objecte </text:span><text:span text:style-name="T142">Formulario</text:span><text:span text:style-name="T175"> o </text:span><text:span text:style-name="T142">Pago</text:span><text:span text:style-name="T175"> segons el mètode invocat. Cal controlar qualsevol excepció que es pugui produir quan el contingut de l'annex no és vàlid i el parseig de l'XML falla.</text:span></text:p>
      <text:list xml:id="list175634348235299" text:continue-list="list175633970852776" text:style-name="Outline">
        <text:list-item>
          <text:list>
            <text:list-item>
              <text:list>
                <text:list-item>
                  <text:h text:style-name="P419" text:outline-level="3"><text:bookmark-start text:name="__RefHeading___Toc366111_93553639"/>Exemple Java<text:bookmark-end text:name="__RefHeading___Toc366111_93553639"/></text:h>
                </text:list-item>
              </text:list>
            </text:list-item>
          </text:list>
        </text:list-item>
      </text:list>
      <text:p text:style-name="P175">En el següent exemple de codi es mostra un exemple de crida al mètode de conversió de l'annex a dades de formulari.</text:p>
      <text:p text:style-name="P172"><text:span text:style-name="T42">taula.</text:span><text:span text:style-name="T213"> </text:span><text:span text:style-name="T217">C</text:span><text:span text:style-name="T218">onversió d'un annex corresponent a un document tècnic d'un formulari XML</text:span><text:span text:style-name="T213">.</text:span></text:p>
      <table:table table:name="Table12" table:style-name="Table12">
        <table:table-column table:style-name="Table12.A"/>
        <table:table-row table:style-name="TableLine645002352">
          <table:table-cell table:style-name="Table12.A1" office:value-type="string">
            <text:p text:style-name="P90"/>
            <text:p text:style-name="P184">// Inicialitza la classe d'utilitats de Sistra2</text:p>
            <text:p text:style-name="P120"><text:span text:style-name="T57">BackofficeSistra2Utils </text:span><text:span text:style-name="T83">sistraUtils</text:span><text:span text:style-name="T57"> = </text:span><text:span text:style-name="T49">new</text:span><text:span text:style-name="T57"> BackofficeSistra2UtilsImpl();</text:span></text:p>
            <text:p text:style-name="P179"/>
            <text:p text:style-name="P183">// Simula l'annex</text:p>
            <text:p text:style-name="P50"><text:span text:style-name="T50">byte</text:span><text:span text:style-name="T65">[] </text:span><text:span text:style-name="T87">contingut</text:span><text:span text:style-name="T65"> = Files.</text:span><text:span text:style-name="T69">readAllBytes</text:span><text:span text:style-name="T65">(Paths.</text:span><text:span text:style-name="T69">get</text:span><text:span text:style-name="T65">(</text:span><text:span text:style-name="T50">this</text:span><text:span text:style-name="T65">.getClass().getClassLoader().getResource(</text:span><text:span text:style-name="T38">"formulario.xml"</text:span><text:span text:style-name="T65">).toURI()));</text:span></text:p>
            <text:p text:style-name="P183">// Llegeix el formulari</text:p>
            <text:p text:style-name="P120"><text:span text:style-name="T57">Formulario </text:span><text:span text:style-name="T83">formulario</text:span><text:span text:style-name="T57"> = </text:span><text:span text:style-name="T49">null</text:span><text:span text:style-name="T57">;</text:span></text:p>
            <text:p text:style-name="P120"><text:span text:style-name="T49">try</text:span><text:span text:style-name="T57"> {</text:span></text:p>
            <text:p text:style-name="P122"><text:span text:style-name="T57"><text:tab/></text:span><text:span text:style-name="T83">formulario</text:span><text:span text:style-name="T57"> = </text:span><text:span text:style-name="T83">sistraUtils</text:span><text:span text:style-name="T57">.parseXmlFormulario(</text:span><text:span text:style-name="T91">contingut</text:span><text:span text:style-name="T57">);</text:span></text:p>
            <text:p text:style-name="P120"><text:span text:style-name="T57">} </text:span><text:span text:style-name="T49">catch</text:span><text:span text:style-name="T57"> (Exception </text:span><text:span text:style-name="T83">e</text:span><text:span text:style-name="T57">) {</text:span></text:p>
            <text:p text:style-name="P120"><text:span text:style-name="T57"><text:tab/></text:span><text:span text:style-name="T49">throw</text:span><text:span text:style-name="T57"> </text:span><text:span text:style-name="T49">new</text:span><text:span text:style-name="T57"> Exception(</text:span><text:span text:style-name="T34">"Error llegint l'annex : "</text:span><text:span text:style-name="T57"> + </text:span><text:span text:style-name="T83">e</text:span><text:span text:style-name="T57">.getMessage());</text:span></text:p>
            <text:p text:style-name="P93">}</text:p>
            <text:p text:style-name="P120"><text:span text:style-name="T57">System.</text:span><text:span text:style-name="T78">out</text:span><text:span text:style-name="T57">.println(</text:span><text:span text:style-name="T34">"Llegit el fornmulari, formulario.accion="</text:span><text:span text:style-name="T57"> + </text:span><text:span text:style-name="T83">formulario</text:span><text:span text:style-name="T57">.getAccion());</text:span></text:p>
            <text:p text:style-name="P90"/>
          </table:table-cell>
        </table:table-row>
      </table:table>
      <text:p text:style-name="P165"/>
      <text:p text:style-name="P173">Per a l'exemple s'ha creat l'arxiu <text:span text:style-name="T129">formulario.xml</text:span><text:span text:style-name="T157"> amb l' XML d'exemple per a la lectura. A continuació es mostra aquest XML d'exemple.</text:span></text:p>
      <text:p text:style-name="P174"><text:span text:style-name="T42">taula.</text:span><text:span text:style-name="T213"> </text:span><text:span text:style-name="T217">E</text:span><text:span text:style-name="T219">xemple d' </text:span><text:span text:style-name="T218">XML</text:span><text:span text:style-name="T219"> pel formulari</text:span><text:span text:style-name="T213">.</text:span></text:p>
      <table:table table:name="Table13" table:style-name="Table13">
        <table:table-column table:style-name="Table13.A"/>
        <table:table-row table:style-name="TableLine645001200">
          <table:table-cell table:style-name="Table13.A1" office:value-type="string">
            <text:p text:style-name="P91"><text:span text:style-name="T14">&lt;?</text:span><text:span text:style-name="T20">xml</text:span> <text:span text:style-name="T25">version</text:span>=<text:span text:style-name="T39">"1.0"</text:span> <text:span text:style-name="T25">encoding</text:span>=<text:span text:style-name="T39">"UTF-8"</text:span> <text:span text:style-name="T25">standalone</text:span>=<text:span text:style-name="T39">"yes"</text:span><text:span text:style-name="T14">?&gt;</text:span></text:p>
            <text:p text:style-name="P115"><text:span text:style-name="T17">&lt;</text:span><text:span text:style-name="T22">ns2:FORMULARIO</text:span><text:span text:style-name="T115"> </text:span><text:span text:style-name="T26">accion</text:span><text:span text:style-name="T57">=</text:span><text:span text:style-name="T37">"accion"</text:span><text:span text:style-name="T115"> </text:span><text:span text:style-name="T26">xmlns:ns2</text:span><text:span text:style-name="T57">=</text:span><text:span text:style-name="T37">"urn:es:caib:sistra2:xml:formulario:v1:model"</text:span><text:span text:style-name="T17">&gt;</text:span></text:p>
            <text:p text:style-name="P115"><text:span text:style-name="T57"><text:tab/></text:span><text:span text:style-name="T17">&lt;</text:span><text:span text:style-name="T22">CAMPO</text:span><text:span text:style-name="T115"> </text:span><text:span text:style-name="T26">id</text:span><text:span text:style-name="T57">=</text:span><text:span text:style-name="T37">"campo_0"</text:span><text:span text:style-name="T17">&gt;</text:span></text:p>
            <text:p text:style-name="P115"><text:span text:style-name="T57"><text:tab/><text:tab/></text:span><text:span text:style-name="T17">&lt;</text:span><text:span text:style-name="T22">VALOR</text:span><text:span text:style-name="T115"> </text:span><text:span text:style-name="T26">codigo</text:span><text:span text:style-name="T57">=</text:span><text:span text:style-name="T37">"cod_0"</text:span><text:span text:style-name="T17">&gt;</text:span><text:span text:style-name="T57">valor_i</text:span><text:span text:style-name="T17">&lt;/</text:span><text:span text:style-name="T22">VALOR</text:span><text:span text:style-name="T17">&gt;</text:span></text:p>
            <text:p text:style-name="P115"><text:span text:style-name="T57"><text:tab/><text:tab/></text:span><text:span text:style-name="T17">&lt;</text:span><text:span text:style-name="T22">VALOR</text:span><text:span text:style-name="T115"> </text:span><text:span text:style-name="T26">codigo</text:span><text:span text:style-name="T57">=</text:span><text:span text:style-name="T37">"cod_0"</text:span><text:span text:style-name="T17">&gt;</text:span><text:span text:style-name="T57">valor_i</text:span><text:span text:style-name="T17">&lt;/</text:span><text:span text:style-name="T22">VALOR</text:span><text:span text:style-name="T17">&gt;</text:span></text:p>
            <text:p text:style-name="P115"><text:span text:style-name="T57"><text:tab/></text:span><text:span text:style-name="T17">&lt;/</text:span><text:span text:style-name="T22">CAMPO</text:span><text:span text:style-name="T17">&gt;</text:span></text:p>
            <text:p text:style-name="P115"><text:span text:style-name="T57"><text:tab/></text:span><text:span text:style-name="T17">&lt;</text:span><text:span text:style-name="T22">CAMPO</text:span><text:span text:style-name="T115"> </text:span><text:span text:style-name="T26">id</text:span><text:span text:style-name="T57">=</text:span><text:span text:style-name="T37">"campo_1"</text:span><text:span text:style-name="T17">&gt;</text:span></text:p>
            <text:p text:style-name="P115"><text:span text:style-name="T57"><text:tab/><text:tab/></text:span><text:span text:style-name="T17">&lt;</text:span><text:span text:style-name="T22">VALOR</text:span><text:span text:style-name="T115"> </text:span><text:span text:style-name="T26">codigo</text:span><text:span text:style-name="T57">=</text:span><text:span text:style-name="T37">"cod_1"</text:span><text:span text:style-name="T17">&gt;</text:span><text:span text:style-name="T57">valor_i</text:span><text:span text:style-name="T17">&lt;/</text:span><text:span text:style-name="T22">VALOR</text:span><text:span text:style-name="T17">&gt;</text:span></text:p>
            <text:p text:style-name="P115"><text:span text:style-name="T57"><text:tab/><text:tab/></text:span><text:span text:style-name="T17">&lt;</text:span><text:span text:style-name="T22">VALOR</text:span><text:span text:style-name="T115"> </text:span><text:span text:style-name="T26">codigo</text:span><text:span text:style-name="T57">=</text:span><text:span text:style-name="T37">"cod_1"</text:span><text:span text:style-name="T17">&gt;</text:span><text:span text:style-name="T57">valor_i</text:span><text:span text:style-name="T17">&lt;/</text:span><text:span text:style-name="T22">VALOR</text:span><text:span text:style-name="T17">&gt;</text:span></text:p>
            <text:p text:style-name="P115"><text:span text:style-name="T57"><text:tab/></text:span><text:span text:style-name="T17">&lt;/</text:span><text:span text:style-name="T22">CAMPO</text:span><text:span text:style-name="T17">&gt;</text:span></text:p>
            <text:p text:style-name="P91"><text:span text:style-name="T14">&lt;/</text:span><text:span text:style-name="T20">ns2:FORMULARIO</text:span><text:span text:style-name="T14">&gt;</text:span></text:p>
          </table:table-cell>
        </table:table-row>
      </table:table>
      <text:p text:style-name="P70"/>
      <text:p text:style-name="P172"/>
      <text:list xml:id="list175633609526069" text:continue-numbering="true" text:style-name="Outline">
        <text:list-header>
          <text:h text:style-name="P399" text:outline-level="1" text:is-list-header="true"><text:bookmark-start text:name="__RefHeading___Toc117515_1680181998"/><text:span text:style-name="T110">Annex I: WSDL del backoffice</text:span> <text:bookmark-end text:name="__RefHeading___Toc117515_1680181998"/></text:h>
        </text:list-header>
      </text:list>
      <text:p text:style-name="P187"><text:span text:style-name="T18">&lt;?</text:span> <text:span text:style-name="T23">xml</text:span> <text:span text:style-name="T27">version</text:span> <text:span text:style-name="T58">= </text:span><text:span text:style-name="T35">'1.0'</text:span> <text:span text:style-name="T27">encoding</text:span> <text:span text:style-name="T58">= </text:span><text:span text:style-name="T35">'UTF-8'</text:span> <text:span text:style-name="T18">?&gt;&lt;</text:span> <text:span text:style-name="T23">wsdl:definitions</text:span> <text:span text:style-name="T27">name</text:span> <text:span text:style-name="T58">= </text:span><text:span text:style-name="T35">"BackofficeService"</text:span> <text:span text:style-name="T27">targetNamespace</text:span> <text:span text:style-name="T58">= </text:span><text:span text:style-name="T35">"http://www.caib.es/distribucio/ws/backoffice"</text:span> <text:span text:style-name="T27">xmlns:ns1</text:span> <text:span text:style-name="T58">= </text:span><text:span text:style-name="T35">"http://schemas.xmlsoap.org/wsdl/soap/http"</text:span> <text:span text:style-name="T27">xmlns:soap</text:span> <text:span text:style-name="T58">= </text:span><text:span text:style-name="T35">"http://schemas.xmlsoap.org/wsdl/soap/"</text:span> <text:span text:style-name="T27">xmlns:tns</text:span> <text:span text:style-name="T58">= </text:span><text:span text:style-name="T35">"http://www.caib.es/distribucio/ws/backoffice"</text:span> <text:span text:style-name="T58"><text:s text:c="3"/></text:span><text:span text:style-name="T27">xmlns:wsdl</text:span> <text:span text:style-name="T58">= </text:span><text:span text:style-name="T35">"http://schemas.xmlsoap.org/wsdl/"</text:span> <text:span text:style-name="T27">xmlns:xsd</text:span> <text:span text:style-name="T58">= </text:span><text:span text:style-name="T35">"http://www.w3.org/2001/XMLSchema"</text:span> <text:span text:style-name="T18">&gt;</text:span> </text:p>
      <text:p text:style-name="P188"><text:span text:style-name="T58"><text:s text:c="4"/></text:span><text:span text:style-name="T74"><text:s text:c="3"/></text:span><text:span text:style-name="T19">&lt;</text:span> <text:span text:style-name="T24">wsdl:types</text:span> <text:span text:style-name="T19">&gt;</text:span> </text:p>
      <text:p text:style-name="P185"><text:span text:style-name="T14">&lt;</text:span> <text:span text:style-name="T20">xs:schema</text:span> <text:span text:style-name="T25">elementFormDefault</text:span> <text:span text:style-name="T52">=</text:span> <text:span text:style-name="T39">"unqualified"</text:span> <text:span text:style-name="T25">targetNamespace</text:span> <text:span text:style-name="T52">=</text:span> <text:span text:style-name="T39">"http://www.caib.es/distribucio/ws/backoffice"</text:span> <text:span text:style-name="T25">version</text:span> <text:span text:style-name="T52">=</text:span> <text:span text:style-name="T39">"1.0"</text:span> <text:span text:style-name="T25">xmlns:tns</text:span> <text:span text:style-name="T52">=</text:span> <text:span text:style-name="T39">"http://www.caib.es/distribucio/ws/backoffice"</text:span> <text:span text:style-name="T25">xmlns:xs</text:span> <text:span text:style-name="T52">=</text:span> <text:span text:style-name="T39">"http://www.w3.org/2001/XMLSchema"</text:span> <text:span text:style-name="T14">&gt;</text:span> </text:p>
      <text:p text:style-name="P185"><text:span text:style-name="T14">&lt;</text:span> <text:span text:style-name="T20">xs:element</text:span> <text:span text:style-name="T25">name</text:span> <text:span text:style-name="T52">=</text:span> <text:span text:style-name="T39">"comunicarAnotacionsPendents"</text:span> <text:span text:style-name="T25">type</text:span> <text:span text:style-name="T52">=</text:span> <text:span text:style-name="T39">"tns:comunicarAnotacionsPendents"</text:span> <text:span text:style-name="T14">/&gt;</text:span> </text:p>
      <text:p text:style-name="P185"><text:span text:style-name="T14">&lt;</text:span> <text:span text:style-name="T20">xs:element</text:span> <text:span text:style-name="T25">name</text:span> <text:span text:style-name="T52">=</text:span> <text:span text:style-name="T39">"comunicarAnotacionsPendentsResponse"</text:span> <text:span text:style-name="T25">type</text:span> <text:span text:style-name="T52">=</text:span> <text:span text:style-name="T39">"tns:comunicarAnotacionsPendentsResponse"</text:span> <text:span text:style-name="T14">/&gt;</text:span> </text:p>
      <text:p text:style-name="P185"><text:span text:style-name="T14">&lt;</text:span> <text:span text:style-name="T20">xs:complexType</text:span> <text:span text:style-name="T25">name</text:span> <text:span text:style-name="T52">=</text:span> <text:span text:style-name="T39">"comunicarAnotacionsPendents"</text:span> <text:span text:style-name="T14">&gt;</text:span> </text:p>
      <text:p text:style-name="P185"><text:span text:style-name="T14">&lt;</text:span> <text:span text:style-name="T20">xs:sequence</text:span> <text:span text:style-name="T14">&gt;</text:span> </text:p>
      <text:p text:style-name="P185"><text:span text:style-name="T14">&lt;</text:span> <text:span text:style-name="T20">xs:element</text:span> <text:span text:style-name="T25">maxOccurs</text:span> <text:span text:style-name="T52">=</text:span> <text:span text:style-name="T39">"unbounded"</text:span> <text:span text:style-name="T25">name</text:span> <text:span text:style-name="T52">=</text:span> <text:span text:style-name="T39">"ids"</text:span> <text:span text:style-name="T25">type</text:span> <text:span text:style-name="T52">=</text:span> <text:span text:style-name="T39">"tns:anotacioRegistreId"</text:span> <text:span text:style-name="T14">/&gt;</text:span> </text:p>
      <text:p text:style-name="P185"><text:span text:style-name="T14">&lt;/</text:span> <text:span text:style-name="T20">xs:sequence</text:span> <text:span text:style-name="T14">&gt;</text:span> </text:p>
      <text:p text:style-name="P185"><text:span text:style-name="T14">&lt;/</text:span> <text:span text:style-name="T20">xs:complexType</text:span> <text:span text:style-name="T14">&gt;</text:span> </text:p>
      <text:p text:style-name="P185"><text:span text:style-name="T14">&lt;</text:span> <text:span text:style-name="T20">xs:complexType</text:span> <text:span text:style-name="T25">name</text:span> <text:span text:style-name="T52">=</text:span> <text:span text:style-name="T39">"anotacioRegistreId"</text:span> <text:span text:style-name="T14">&gt;</text:span> </text:p>
      <text:p text:style-name="P185"><text:span text:style-name="T14">&lt;</text:span> <text:span text:style-name="T20">xs:sequence</text:span> <text:span text:style-name="T14">&gt;</text:span> </text:p>
      <text:p text:style-name="P185"><text:span text:style-name="T14">&lt;</text:span> <text:span text:style-name="T20">xs:element</text:span> <text:span text:style-name="T25">minOccurs</text:span> <text:span text:style-name="T52">=</text:span> <text:span text:style-name="T39">"0"</text:span> <text:span text:style-name="T25">name</text:span> <text:span text:style-name="T52">=</text:span> <text:span text:style-name="T39">"clauAcces"</text:span> <text:span text:style-name="T25">type</text:span> <text:span text:style-name="T52">=</text:span> <text:span text:style-name="T39">"xs:string"</text:span> <text:span text:style-name="T14">/&gt;</text:span> </text:p>
      <text:p text:style-name="P185"><text:span text:style-name="T14">&lt;</text:span> <text:span text:style-name="T20">xs:element</text:span> <text:span text:style-name="T25">minOccurs</text:span> <text:span text:style-name="T52">=</text:span> <text:span text:style-name="T39">"0"</text:span> <text:span text:style-name="T25">name</text:span> <text:span text:style-name="T52">=</text:span> <text:span text:style-name="T39">"indetificador"</text:span> <text:span text:style-name="T25">type</text:span> <text:span text:style-name="T52">=</text:span> <text:span text:style-name="T39">"xs:string"</text:span> <text:span text:style-name="T14">/&gt;</text:span> </text:p>
      <text:p text:style-name="P185"><text:span text:style-name="T14">&lt;/</text:span> <text:span text:style-name="T20">xs:sequence</text:span> <text:span text:style-name="T14">&gt;</text:span> </text:p>
      <text:p text:style-name="P185"><text:span text:style-name="T14">&lt;/</text:span> <text:span text:style-name="T20">xs:complexType</text:span> <text:span text:style-name="T14">&gt;</text:span> </text:p>
      <text:p text:style-name="P185"><text:span text:style-name="T14">&lt;</text:span> <text:span text:style-name="T20">xs:complexType</text:span> <text:span text:style-name="T25">name</text:span> <text:span text:style-name="T52">=</text:span> <text:span text:style-name="T39">"comunicarAnotacionsPendentsResponse"</text:span> <text:span text:style-name="T14">&gt;</text:span> </text:p>
      <text:p text:style-name="P185"><text:span text:style-name="T14">&lt;</text:span> <text:span text:style-name="T20">xs:sequence</text:span> <text:span text:style-name="T14">/&gt;</text:span> </text:p>
      <text:p text:style-name="P185"><text:span text:style-name="T14">&lt;/</text:span> <text:span text:style-name="T20">xs:complexType</text:span> <text:span text:style-name="T14">&gt;</text:span> </text:p>
      <text:p text:style-name="P185"><text:span text:style-name="T14">&lt;/</text:span> <text:span text:style-name="T20">xs:schema</text:span> <text:span text:style-name="T14">&gt;</text:span> </text:p>
      <text:p text:style-name="P185"><text:span text:style-name="T52"><text:s text:c="5"/></text:span><text:span text:style-name="T14">&lt;/</text:span> <text:span text:style-name="T20">wsdl:types</text:span> <text:span text:style-name="T14">&gt;</text:span> </text:p>
      <text:p text:style-name="P185"><text:span text:style-name="T52"><text:s text:c="5"/></text:span><text:span text:style-name="T14">&lt;</text:span> <text:span text:style-name="T20">wsdl:message</text:span> <text:span text:style-name="T25">name</text:span> <text:span text:style-name="T52">=</text:span> <text:span text:style-name="T39">"comunicarAnotacionsPendents"</text:span> <text:span text:style-name="T14">&gt;</text:span> </text:p>
      <text:p text:style-name="P185"><text:span text:style-name="T52"><text:s text:c="7"/></text:span><text:span text:style-name="T14">&lt;</text:span> <text:span text:style-name="T20">wsdl:part</text:span> <text:span text:style-name="T25">element</text:span> <text:span text:style-name="T52">=</text:span> <text:span text:style-name="T39">"tns:comunicarAnotacionsPendents"</text:span> <text:span text:style-name="T25">name</text:span> <text:span text:style-name="T52">=</text:span> <text:span text:style-name="T39">"parameters"</text:span> <text:span text:style-name="T14">&gt;</text:span> </text:p>
      <text:p text:style-name="P185"><text:span text:style-name="T52"><text:s text:c="7"/></text:span><text:span text:style-name="T14">&lt;/</text:span> <text:span text:style-name="T20">wsdl:part</text:span> <text:span text:style-name="T14">&gt;</text:span> </text:p>
      <text:p text:style-name="P185"><text:span text:style-name="T52"><text:s text:c="5"/></text:span><text:span text:style-name="T14">&lt;/</text:span> <text:span text:style-name="T20">wsdl:message</text:span> <text:span text:style-name="T14">&gt;</text:span> </text:p>
      <text:p text:style-name="P185"><text:span text:style-name="T52"><text:s text:c="5"/></text:span><text:span text:style-name="T14">&lt;</text:span> <text:span text:style-name="T20">wsdl:message</text:span> <text:span text:style-name="T25">name</text:span> <text:span text:style-name="T52">=</text:span> <text:span text:style-name="T39">"comunicarAnotacionsPendentsResponse"</text:span> <text:span text:style-name="T14">&gt;</text:span> </text:p>
      <text:p text:style-name="P185"><text:span text:style-name="T52"><text:s text:c="7"/></text:span><text:span text:style-name="T14">&lt;</text:span> <text:span text:style-name="T20">wsdl:part</text:span> <text:span text:style-name="T25">element</text:span> <text:span text:style-name="T52">=</text:span> <text:span text:style-name="T39">"tns:comunicarAnotacionsPendentsResponse"</text:span> <text:span text:style-name="T25">name</text:span> <text:span text:style-name="T52">=</text:span> <text:span text:style-name="T39">"parameters"</text:span> <text:span text:style-name="T14">&gt;</text:span> </text:p>
      <text:p text:style-name="P185"><text:span text:style-name="T52"><text:s text:c="7"/></text:span><text:span text:style-name="T14">&lt;/</text:span> <text:span text:style-name="T20">wsdl:part</text:span> <text:span text:style-name="T14">&gt;</text:span> </text:p>
      <text:p text:style-name="P185"><text:span text:style-name="T52"><text:s text:c="5"/></text:span><text:span text:style-name="T14">&lt;/</text:span> <text:span text:style-name="T20">wsdl:message</text:span> <text:span text:style-name="T14">&gt;</text:span> </text:p>
      <text:p text:style-name="P185"><text:span text:style-name="T52"><text:s text:c="5"/></text:span><text:span text:style-name="T14">&lt;</text:span> <text:span text:style-name="T20">wsdl:portType</text:span> <text:span text:style-name="T25">name</text:span> <text:span text:style-name="T52">=</text:span> <text:span text:style-name="T39">"Backoffice"</text:span> <text:span text:style-name="T14">&gt;</text:span> </text:p>
      <text:p text:style-name="P185"><text:span text:style-name="T52"><text:s text:c="7"/></text:span><text:span text:style-name="T14">&lt;</text:span> <text:span text:style-name="T20">wsdl:operation</text:span> <text:span text:style-name="T25">name</text:span> <text:span text:style-name="T52">=</text:span> <text:span text:style-name="T39">"comunicarAnotacionsPendents"</text:span> <text:span text:style-name="T14">&gt;</text:span> </text:p>
      <text:p text:style-name="P185"><text:span text:style-name="T52"><text:s text:c="9"/></text:span><text:span text:style-name="T14">&lt;</text:span> <text:span text:style-name="T20">wsdl:input</text:span> <text:span text:style-name="T25">message</text:span> <text:span text:style-name="T52">=</text:span> <text:span text:style-name="T39">"tns:comunicarAnotacionsPendents"</text:span> <text:span text:style-name="T25">name</text:span> <text:span text:style-name="T52">=</text:span> <text:span text:style-name="T39">"comunicarAnotacionsPendents"</text:span> <text:span text:style-name="T14">&gt;</text:span> </text:p>
      <text:p text:style-name="P185"><text:span text:style-name="T52"><text:s text:c="7"/></text:span><text:span text:style-name="T14">&lt;/</text:span> <text:span text:style-name="T20">wsdl:input</text:span> <text:span text:style-name="T14">&gt;</text:span> </text:p>
      <text:p text:style-name="P185"><text:soft-page-break/><text:s/><text:span text:style-name="T52"><text:s text:c="9"/></text:span><text:span text:style-name="T14">&lt;</text:span> <text:span text:style-name="T20">wsdl:output</text:span> <text:span text:style-name="T25">message</text:span> <text:span text:style-name="T52">=</text:span> <text:span text:style-name="T39">"tns:comunicarAnotacionsPendentsResponse"</text:span> <text:span text:style-name="T25">name</text:span> <text:span text:style-name="T52">=</text:span> <text:span text:style-name="T39">"comunicarAnotacionsPendentsResponse"</text:span> <text:span text:style-name="T14">&gt;</text:span> </text:p>
      <text:p text:style-name="P185"><text:span text:style-name="T52"><text:s text:c="7"/></text:span><text:span text:style-name="T14">&lt;/</text:span> <text:span text:style-name="T20">wsdl:output</text:span> <text:span text:style-name="T14">&gt;</text:span> </text:p>
      <text:p text:style-name="P185"><text:s text:c="2"/><text:span text:style-name="T52"><text:s text:c="7"/></text:span><text:span text:style-name="T14">&lt;/</text:span> <text:span text:style-name="T20">wsdl:operation</text:span> <text:span text:style-name="T14">&gt;</text:span> </text:p>
      <text:p text:style-name="P185"><text:span text:style-name="T52"><text:s text:c="5"/></text:span><text:span text:style-name="T14">&lt;/</text:span> <text:span text:style-name="T20">wsdl:portType</text:span> <text:span text:style-name="T14">&gt;</text:span> </text:p>
      <text:p text:style-name="P185"><text:span text:style-name="T52"><text:s text:c="5"/></text:span><text:span text:style-name="T14">&lt;</text:span> <text:span text:style-name="T20">wsdl:binding</text:span> <text:span text:style-name="T25">name</text:span> <text:span text:style-name="T52">=</text:span> <text:span text:style-name="T39">"BackofficeServiceSoapBinding"</text:span> <text:span text:style-name="T25">type</text:span> <text:span text:style-name="T52">=</text:span> <text:span text:style-name="T39">"tns:Backoffice"</text:span> <text:span text:style-name="T14">&gt;</text:span> </text:p>
      <text:p text:style-name="P185"><text:span text:style-name="T52"><text:s text:c="7"/></text:span><text:span text:style-name="T14">&lt;</text:span> <text:span text:style-name="T20">soap:binding</text:span> <text:span text:style-name="T25">style</text:span> <text:span text:style-name="T52">=</text:span> <text:span text:style-name="T39">"document"</text:span> <text:span text:style-name="T25">transport</text:span> <text:span text:style-name="T52">=</text:span> <text:span text:style-name="T39">"http://schemas.xmlsoap.org/soap/http"</text:span> <text:span text:style-name="T14">/&gt;</text:span> </text:p>
      <text:p text:style-name="P185"><text:span text:style-name="T52"><text:s text:c="7"/></text:span><text:span text:style-name="T14">&lt;</text:span> <text:span text:style-name="T20">wsdl:operation</text:span> <text:span text:style-name="T25">name</text:span> <text:span text:style-name="T52">=</text:span> <text:span text:style-name="T39">"comunicarAnotacionsPendents"</text:span> <text:span text:style-name="T14">&gt;</text:span> </text:p>
      <text:p text:style-name="P185"><text:span text:style-name="T52"><text:s text:c="9"/></text:span><text:span text:style-name="T14">&lt;</text:span> <text:span text:style-name="T20">soap:operation</text:span> <text:span text:style-name="T25">soapAction</text:span> <text:span text:style-name="T52">=</text:span> <text:span text:style-name="T39">""</text:span> <text:span text:style-name="T25">style</text:span> <text:span text:style-name="T52">=</text:span> <text:span text:style-name="T39">"document"</text:span> <text:span text:style-name="T14">/&gt;</text:span> </text:p>
      <text:p text:style-name="P185"><text:span text:style-name="T52"><text:s text:c="9"/></text:span><text:span text:style-name="T14">&lt;</text:span> <text:span text:style-name="T20">wsdl:input</text:span> <text:span text:style-name="T25">name</text:span> <text:span text:style-name="T52">=</text:span> <text:span text:style-name="T39">"comunicarAnotacionsPendents"</text:span> <text:span text:style-name="T14">&gt;</text:span> </text:p>
      <text:p text:style-name="P185"><text:span text:style-name="T52"><text:s text:c="11"/></text:span><text:span text:style-name="T14">&lt;</text:span> <text:span text:style-name="T20">soap:body</text:span> <text:span text:style-name="T25">use</text:span> <text:span text:style-name="T52">=</text:span> <text:span text:style-name="T39">"literal"</text:span> <text:span text:style-name="T14">/&gt;</text:span> </text:p>
      <text:p text:style-name="P185"><text:span text:style-name="T52"><text:s text:c="9"/></text:span><text:span text:style-name="T14">&lt;/</text:span> <text:span text:style-name="T20">wsdl:input</text:span> <text:span text:style-name="T14">&gt;</text:span> </text:p>
      <text:p text:style-name="P185"><text:span text:style-name="T52"><text:s text:c="9"/></text:span><text:span text:style-name="T14">&lt;</text:span> <text:span text:style-name="T20">wsdl:output</text:span> <text:span text:style-name="T25">name</text:span> <text:span text:style-name="T52">=</text:span> <text:span text:style-name="T39">"comunicarAnotacionsPendentsResponse"</text:span> <text:span text:style-name="T14">&gt;</text:span> </text:p>
      <text:p text:style-name="P185"><text:span text:style-name="T52"><text:s text:c="11"/></text:span><text:span text:style-name="T14">&lt;</text:span> <text:span text:style-name="T20">soap:body</text:span> <text:span text:style-name="T25">use</text:span> <text:span text:style-name="T52">=</text:span> <text:span text:style-name="T39">"literal"</text:span> <text:span text:style-name="T14">/&gt;</text:span> </text:p>
      <text:p text:style-name="P185"><text:span text:style-name="T52"><text:s text:c="9"/></text:span><text:span text:style-name="T14">&lt;/</text:span> <text:span text:style-name="T20">wsdl:output</text:span> <text:span text:style-name="T14">&gt;</text:span> </text:p>
      <text:p text:style-name="P185"><text:span text:style-name="T52"><text:s text:c="7"/></text:span><text:span text:style-name="T14">&lt;/</text:span> <text:span text:style-name="T20">wsdl:operation</text:span> <text:span text:style-name="T14">&gt;</text:span> </text:p>
      <text:p text:style-name="P185"><text:span text:style-name="T52"><text:s text:c="5"/></text:span><text:span text:style-name="T14">&lt;/</text:span> <text:span text:style-name="T20">wsdl:binding</text:span> <text:span text:style-name="T14">&gt;</text:span> </text:p>
      <text:p text:style-name="P185"><text:span text:style-name="T52"><text:s text:c="5"/></text:span><text:span text:style-name="T14">&lt;</text:span> <text:span text:style-name="T20">wsdl:service</text:span> <text:span text:style-name="T25">name</text:span> <text:span text:style-name="T52">=</text:span> <text:span text:style-name="T39">"BackofficeService"</text:span> <text:span text:style-name="T14">&gt;</text:span> </text:p>
      <text:p text:style-name="P185"><text:s text:c="3"/><text:span text:style-name="T52"><text:s text:c="7"/></text:span><text:span text:style-name="T14">&lt;</text:span> <text:span text:style-name="T20">wsdl:port</text:span> <text:span text:style-name="T25">binding</text:span> <text:span text:style-name="T52">=</text:span> <text:span text:style-name="T39">"tns:BackofficeServiceSoapBinding"</text:span> <text:span text:style-name="T25">name</text:span> <text:span text:style-name="T52">=</text:span> <text:span text:style-name="T39">"BackofficeServicePort"</text:span> <text:span text:style-name="T14">&gt;</text:span> </text:p>
      <text:p text:style-name="P185"><text:span text:style-name="T52"><text:s text:c="9"/></text:span><text:span text:style-name="T14">&lt;</text:span> <text:span text:style-name="T20">soap:address</text:span> <text:span text:style-name="T25">location</text:span> <text:span text:style-name="T52">=</text:span> <text:span text:style-name="T39">"http://localhost:8080/distribucio/ws/backoffice"</text:span> <text:span text:style-name="T14">/&gt;</text:span> </text:p>
      <text:p text:style-name="P185"><text:span text:style-name="T52"><text:s text:c="7"/></text:span><text:span text:style-name="T14">&lt;/</text:span> <text:span text:style-name="T20">wsdl:port</text:span> <text:span text:style-name="T14">&gt;</text:span> </text:p>
      <text:p text:style-name="P185"><text:span text:style-name="T52"><text:s text:c="5"/></text:span><text:span text:style-name="T14">&lt;/</text:span> <text:span text:style-name="T20">wsdl:service</text:span> <text:span text:style-name="T14">&gt;</text:span> </text:p>
      <text:p text:style-name="P186"><text:span text:style-name="T14">&lt;/</text:span> <text:span text:style-name="T20">wsdl:definitions</text:span> <text:span text:style-name="T14">&gt;</text:span> </text:p>
      <text:p text:style-name="P41"><text:s text:c="3"/></text:p>
      <text:list xml:id="list175634856171850" text:continue-numbering="true" text:style-name="Outline">
        <text:list-header>
          <text:h text:style-name="P400" text:outline-level="1" text:is-list-header="true"><text:bookmark-start text:name="__RefHeading___Toc60796_1326387233"/><text:span text:style-name="T110">Annex </text:span><text:span text:style-name="T232">II</text:span><text:span text:style-name="T110">: </text:span><text:span text:style-name="T230">E</text:span><text:span text:style-name="T231">xemple d'ús de la llibreria de </text:span><text:span text:style-name="T233">distribucio-backoffice-utils</text:span><text:bookmark-end text:name="__RefHeading___Toc60796_1326387233"/></text:h>
        </text:list-header>
      </text:list>
      <table:table table:name="Table4" table:style-name="Table4">
        <table:table-column table:style-name="Table4.A"/>
        <table:table-row table:style-name="TableLine644998896">
          <table:table-cell table:style-name="Table4.A1" office:value-type="string">
            <text:p text:style-name="P113"><text:span text:style-name="T49">package</text:span><text:span text:style-name="T57"> es.caib.distribucio.core.service.ws.backoffice;</text:span></text:p>
            <text:p text:style-name="P181"/>
            <text:p text:style-name="P115"><text:span text:style-name="T49">import</text:span><text:span text:style-name="T57"> java.util.Arrays;</text:span></text:p>
            <text:p text:style-name="P115"><text:span text:style-name="T49">import</text:span><text:span text:style-name="T57"> java.util.Date;</text:span></text:p>
            <text:p text:style-name="P115"><text:span text:style-name="T49">import</text:span><text:span text:style-name="T57"> java.util.List;</text:span></text:p>
            <text:p text:style-name="P115"><text:span text:style-name="T49">import</text:span><text:span text:style-name="T57"> java.util.Map;</text:span></text:p>
            <text:p text:style-name="P115"><text:span text:style-name="T49">import</text:span><text:span text:style-name="T57"> java.util.Properties;</text:span></text:p>
            <text:p text:style-name="P181"/>
            <text:p text:style-name="P115"><text:span text:style-name="T49">import</text:span><text:span text:style-name="T57"> javax.jws.WebService;</text:span></text:p>
            <text:p text:style-name="P181"/>
            <text:p text:style-name="P115"><text:span text:style-name="T49">import</text:span><text:span text:style-name="T57"> org.apache.commons.lang.builder.ToStringBuilder;</text:span></text:p>
            <text:p text:style-name="P115"><text:span text:style-name="T49">import</text:span><text:span text:style-name="T57"> org.slf4j.Logger;</text:span></text:p>
            <text:p text:style-name="P115"><text:span text:style-name="T49">import</text:span><text:span text:style-name="T57"> org.slf4j.LoggerFactory;</text:span></text:p>
            <text:p text:style-name="P115"><text:span text:style-name="T49">import</text:span><text:span text:style-name="T57"> org.springframework.stereotype.Component;</text:span></text:p>
            <text:p text:style-name="P181"/>
            <text:p text:style-name="P115"><text:span text:style-name="T49">import</text:span><text:span text:style-name="T57"> es.caib.distribucio.backoffice.utils.arxiu.ArxiuPluginListener;</text:span></text:p>
            <text:p text:style-name="P115"><text:span text:style-name="T49">import</text:span><text:span text:style-name="T57"> es.caib.distribucio.backoffice.utils.arxiu.ArxiuResultat;</text:span></text:p>
            <text:p text:style-name="P115"><text:span text:style-name="T49">import</text:span><text:span text:style-name="T57"> es.caib.distribucio.backoffice.utils.arxiu.ArxiuResultatAnnex;</text:span></text:p>
            <text:p text:style-name="P115"><text:span text:style-name="T49">import</text:span><text:span text:style-name="T57"> es.caib.distribucio.backoffice.utils.arxiu.BackofficeArxiuUtils;</text:span></text:p>
            <text:p text:style-name="P115"><text:span text:style-name="T49">import</text:span><text:span text:style-name="T57"> es.caib.distribucio.backoffice.utils.arxiu.BackofficeArxiuUtilsImpl;</text:span></text:p>
            <text:p text:style-name="P115"><text:span text:style-name="T49">import</text:span><text:span text:style-name="T57"> es.caib.distribucio.backoffice.utils.arxiu.DistribucioArxiuError;</text:span></text:p>
            <text:p text:style-name="P115"><text:span text:style-name="T49">import</text:span><text:span text:style-name="T57"> es.caib.distribucio.backoffice.utils.sistra.BackofficeSistra2Utils;</text:span></text:p>
            <text:p text:style-name="P115"><text:span text:style-name="T49">import</text:span><text:span text:style-name="T57"> es.caib.distribucio.backoffice.utils.sistra.BackofficeSistra2UtilsImpl;</text:span></text:p>
            <text:p text:style-name="P115"><text:span text:style-name="T49">import</text:span><text:span text:style-name="T57"> es.caib.distribucio.backoffice.utils.sistra.formulario.Formulario;</text:span></text:p>
            <text:p text:style-name="P115"><text:span text:style-name="T49">import</text:span><text:span text:style-name="T57"> es.caib.distribucio.backoffice.utils.sistra.pago.Pago;</text:span></text:p>
            <text:p text:style-name="P115"><text:span text:style-name="T49">import</text:span><text:span text:style-name="T57"> es.caib.distribucio.core.api.dto.ExpedientEstatEnumDto;</text:span></text:p>
            <text:p text:style-name="P115"><text:span text:style-name="T49">import</text:span><text:span text:style-name="T57"> es.caib.distribucio.core.api.service.ws.backoffice.AnotacioRegistreId;</text:span></text:p>
            <text:p text:style-name="P115"><text:span text:style-name="T49">import</text:span><text:span text:style-name="T57"> es.caib.distribucio.core.api.service.ws.backoffice.BackofficeWsService;</text:span></text:p>
            <text:p text:style-name="P115"><text:span text:style-name="T49">import</text:span><text:span text:style-name="T57"> es.caib.distribucio.core.helper.IntegracioHelper;</text:span></text:p>
            <text:p text:style-name="P115"><text:span text:style-name="T49">import</text:span><text:span text:style-name="T57"> es.caib.distribucio.core.helper.PropertiesHelper;</text:span></text:p>
            <text:p text:style-name="P115"><text:span text:style-name="T49">import</text:span><text:span text:style-name="T57"> es.caib.distribucio.core.helper.RegistreHelper;</text:span></text:p>
            <text:p text:style-name="P115"><text:span text:style-name="T49">import</text:span><text:span text:style-name="T57"> es.caib.distribucio.plugin.SistemaExternException;</text:span></text:p>
            <text:p text:style-name="P115"><text:span text:style-name="T49">import</text:span><text:span text:style-name="T57"> es.caib.distribucio.ws.backofficeintegracio.Annex;</text:span></text:p>
            <text:p text:style-name="P115"><text:span text:style-name="T49">import</text:span><text:span text:style-name="T57"> es.caib.distribucio.ws.backofficeintegracio.AnotacioRegistreEntrada;</text:span></text:p>
            <text:p text:style-name="P115"><text:span text:style-name="T49">import</text:span><text:span text:style-name="T57"> es.caib.distribucio.ws.backofficeintegracio.BackofficeIntegracio;</text:span></text:p>
            <text:p text:style-name="P115"><text:span text:style-name="T49">import</text:span><text:span text:style-name="T57"> es.caib.distribucio.ws.client.BackofficeIntegracioWsClientFactory;</text:span></text:p>
            <text:p text:style-name="P115"><text:span text:style-name="T49">import</text:span><text:span text:style-name="T57"> es.caib.plugins.arxiu.api.ContingutArxiu;</text:span></text:p>
            <text:p text:style-name="P115"><text:span text:style-name="T49">import</text:span><text:span text:style-name="T57"> es.caib.plugins.arxiu.api.Document;</text:span></text:p>
            <text:p text:style-name="P115"><text:span text:style-name="T49">import</text:span><text:span text:style-name="T57"> es.caib.plugins.arxiu.api.Expedient;</text:span></text:p>
            <text:p text:style-name="P113"><text:span text:style-name="T49">import</text:span><text:span text:style-name="T57"> es.caib.plugins.arxiu.api.IArxiuPlugin;</text:span></text:p>
            <text:p text:style-name="P182"/>
            <text:p text:style-name="P126">/**</text:p>
            <text:p text:style-name="P114"><text:span text:style-name="T202"><text:s/>* </text:span><text:span text:style-name="T205">Exemple</text:span><text:span text:style-name="T202"> </text:span><text:span text:style-name="T205">de</text:span><text:span text:style-name="T202"> WS </text:span><text:span text:style-name="T205">Backoffice</text:span><text:span text:style-name="T202"> </text:span><text:span text:style-name="T205">Distribucio</text:span><text:span text:style-name="T202"> per </text:span><text:span text:style-name="T205">rebre</text:span><text:span text:style-name="T202"> </text:span><text:span text:style-name="T205">peticions</text:span><text:span text:style-name="T202"> d'anotacions </text:span><text:span text:style-name="T205">pendents</text:span></text:p>
            <text:p text:style-name="P126"><text:s/>* </text:p>
            <text:p text:style-name="P114"><text:span text:style-name="T202"><text:s/>* </text:span><text:span text:style-name="T207">@author</text:span><text:span text:style-name="T202"> Limit </text:span><text:span text:style-name="T205">Tecnologies</text:span><text:span text:style-name="T202"> &lt;limit</text:span><text:span text:style-name="T205">@limit.es</text:span><text:span text:style-name="T202">&gt;</text:span></text:p>
            <text:p text:style-name="P126"><text:s/>*/</text:p>
            <text:p text:style-name="P111">@Component</text:p>
            <text:p text:style-name="P114"><text:span text:style-name="T107">@WebService</text:span><text:span text:style-name="T57">(</text:span></text:p>
            <text:p text:style-name="P114"><text:span text:style-name="T57"><text:tab/><text:tab/>name = </text:span><text:span text:style-name="T34">"Backoffice"</text:span><text:span text:style-name="T57">,</text:span></text:p>
            <text:p text:style-name="P114"><text:span text:style-name="T57"><text:tab/><text:tab/>serviceName = </text:span><text:span text:style-name="T34">"BackofficeService"</text:span><text:span text:style-name="T57">,</text:span></text:p>
            <text:p text:style-name="P114"><text:span text:style-name="T57"><text:tab/><text:tab/>portName = </text:span><text:span text:style-name="T34">"BackofficeServicePort"</text:span><text:span text:style-name="T57">,</text:span></text:p>
            <text:p text:style-name="P114"><text:span text:style-name="T57"><text:tab/><text:tab/>endpointInterface = </text:span><text:span text:style-name="T34">"es.caib.ripea.core.api.service.ws.BackofficeWsServiceBean"</text:span><text:span text:style-name="T57">,</text:span></text:p>
            <text:p text:style-name="P114"><text:span text:style-name="T57"><text:tab/><text:tab/>targetNamespace = </text:span><text:span text:style-name="T34">"http://www.caib.es/distribucio/ws/backoffice"</text:span><text:span text:style-name="T57">)</text:span></text:p>
            <text:p text:style-name="P114"><text:span text:style-name="T49">public</text:span><text:span text:style-name="T57"> </text:span><text:span text:style-name="T49">class</text:span><text:span text:style-name="T57"> BackofficeWsServiceImpl </text:span><text:span text:style-name="T49">implements</text:span><text:span text:style-name="T57"> BackofficeWsService, </text:span></text:p>
            <text:p text:style-name="P89"><text:tab/><text:tab/><text:tab/><text:tab/><text:tab/><text:tab/><text:tab/><text:tab/><text:tab/><text:tab/><text:tab/><text:tab/>ArxiuPluginListener {</text:p>
            <text:p text:style-name="P89"><text:tab/></text:p>
            <text:p text:style-name="P114"><text:span text:style-name="T57"><text:tab/></text:span><text:span text:style-name="T202">/** </text:span><text:span text:style-name="T205">Instància</text:span><text:span text:style-name="T202"> </text:span><text:span text:style-name="T205">del</text:span><text:span text:style-name="T202"> </text:span><text:span text:style-name="T205">plugin</text:span><text:span text:style-name="T202"> d'Arxiu */</text:span></text:p>
            <text:p text:style-name="P114"><text:span text:style-name="T57"><text:tab/></text:span><text:span text:style-name="T49">private</text:span><text:span text:style-name="T57"> IArxiuPlugin </text:span><text:span text:style-name="T77">arxiuPlugin</text:span><text:span text:style-name="T57"> = </text:span><text:span text:style-name="T49">null</text:span><text:span text:style-name="T57">;</text:span></text:p>
            <text:p text:style-name="P89"><text:tab/><text:tab/></text:p>
            <text:p text:style-name="P114"><text:span text:style-name="T57"><text:tab/></text:span><text:span text:style-name="T202">/** </text:span><text:span text:style-name="T205">Mètode</text:span><text:span text:style-name="T202"> </text:span><text:span text:style-name="T205">del</text:span><text:span text:style-name="T202"> WS </text:span><text:span text:style-name="T205">que</text:span><text:span text:style-name="T202"> </text:span><text:span text:style-name="T205">rep</text:span><text:span text:style-name="T202"> </text:span><text:span text:style-name="T205">les</text:span><text:span text:style-name="T202"> </text:span><text:span text:style-name="T205">comunicacions</text:span><text:span text:style-name="T202"> d'anotacions </text:span><text:span text:style-name="T205">pendents</text:span><text:span text:style-name="T202">. */</text:span></text:p>
            <text:p text:style-name="P114"><text:span text:style-name="T57"><text:tab/></text:span><text:span text:style-name="T107">@Override</text:span></text:p>
            <text:p text:style-name="P114"><text:span text:style-name="T57"><text:tab/></text:span><text:span text:style-name="T49">public</text:span><text:span text:style-name="T57"> </text:span><text:span text:style-name="T49">void</text:span><text:span text:style-name="T57"> comunicarAnotacionsPendents(List&lt;AnotacioRegistreId&gt; </text:span><text:span text:style-name="T83">ids</text:span><text:span text:style-name="T57">) {</text:span></text:p>
            <text:p text:style-name="P182"/>
            <text:p text:style-name="P114"><text:span text:style-name="T57"><text:tab/><text:tab/></text:span><text:span text:style-name="T49">try</text:span><text:span text:style-name="T57"> {</text:span></text:p>
            <text:p text:style-name="P114"><text:span text:style-name="T57"><text:tab/><text:tab/><text:tab/></text:span><text:span text:style-name="T220">// Client </text:span><text:span text:style-name="T221">dels</text:span><text:span text:style-name="T220"> </text:span><text:span text:style-name="T221">serveis</text:span><text:span text:style-name="T220"> web </text:span><text:span text:style-name="T221">de</text:span><text:span text:style-name="T220"> </text:span><text:span text:style-name="T221">backoffice</text:span><text:span text:style-name="T220"> per </text:span><text:span text:style-name="T221">consultar</text:span><text:span text:style-name="T220"> </text:span><text:span text:style-name="T221">anotacions</text:span></text:p>
            <text:p text:style-name="P114"><text:span text:style-name="T57"><text:tab/><text:tab/><text:tab/>BackofficeIntegracio </text:span><text:span text:style-name="T83">backofficeClient</text:span><text:span text:style-name="T57"> = getBackofficeIntegracioServicePort();</text:span></text:p>
            <text:p text:style-name="P114"><text:span text:style-name="T57"><text:tab/><text:tab/><text:tab/>es.caib.distribucio.ws.backofficeintegracio.AnotacioRegistreId </text:span><text:span text:style-name="T83">idWs</text:span><text:span text:style-name="T57">;</text:span></text:p>
            <text:p text:style-name="P123"><text:span text:style-name="T57"><text:tab/><text:tab/><text:tab/></text:span><text:span text:style-name="T49">for</text:span><text:span text:style-name="T57"> (AnotacioRegistreId </text:span><text:span text:style-name="T83">id</text:span><text:span text:style-name="T57"> : </text:span><text:span text:style-name="T83">ids</text:span><text:span text:style-name="T57">) {</text:span></text:p>
            <text:p text:style-name="P114"><text:soft-page-break/><text:span text:style-name="T57"><text:tab/><text:tab/><text:tab/><text:tab/></text:span><text:span text:style-name="T49">try</text:span><text:span text:style-name="T57"> {</text:span></text:p>
            <text:p text:style-name="P114"><text:span text:style-name="T57"><text:tab/><text:tab/><text:tab/><text:tab/><text:tab/></text:span><text:span text:style-name="T220">// </text:span><text:span text:style-name="T221">Construeix</text:span><text:span text:style-name="T220"> l'identificador </text:span><text:span text:style-name="T221">pel</text:span><text:span text:style-name="T220"> WS </text:span><text:span text:style-name="T221">del</text:span><text:span text:style-name="T220"> </text:span><text:span text:style-name="T221">backoffice</text:span><text:span text:style-name="T220"> </text:span><text:span text:style-name="T221">de</text:span><text:span text:style-name="T220"> DISTRIBUCIO</text:span></text:p>
            <text:p text:style-name="P114"><text:span text:style-name="T57"><text:tab/><text:tab/><text:tab/><text:tab/><text:tab/></text:span><text:span text:style-name="T83">idWs</text:span><text:span text:style-name="T57"> = </text:span><text:span text:style-name="T49">new</text:span><text:span text:style-name="T57"> es.caib.distribucio.ws.backofficeintegracio.AnotacioRegistreId();</text:span></text:p>
            <text:p text:style-name="P114"><text:span text:style-name="T57"><text:tab/><text:tab/><text:tab/><text:tab/><text:tab/></text:span><text:span text:style-name="T83">idWs</text:span><text:span text:style-name="T57">.setClauAcces(</text:span><text:span text:style-name="T83">id</text:span><text:span text:style-name="T57">.getClauAcces());</text:span></text:p>
            <text:p text:style-name="P114"><text:span text:style-name="T57"><text:tab/><text:tab/><text:tab/><text:tab/><text:tab/></text:span><text:span text:style-name="T83">idWs</text:span><text:span text:style-name="T57">.setIndetificador(</text:span><text:span text:style-name="T83">id</text:span><text:span text:style-name="T57">.getIndetificador());</text:span></text:p>
            <text:p text:style-name="P89"><text:tab/><text:tab/></text:p>
            <text:p text:style-name="P114"><text:span text:style-name="T57"><text:tab/><text:tab/><text:tab/><text:tab/><text:tab/></text:span><text:span text:style-name="T220">// </text:span><text:span text:style-name="T221">Consulta</text:span><text:span text:style-name="T220"> l'anotació</text:span></text:p>
            <text:p text:style-name="P114"><text:span text:style-name="T57"><text:tab/><text:tab/><text:tab/><text:tab/><text:tab/>AnotacioRegistreEntrada </text:span><text:span text:style-name="T83">anotacio</text:span><text:span text:style-name="T57"> = </text:span><text:span text:style-name="T83">backofficeClient</text:span><text:span text:style-name="T57">.consulta(</text:span><text:span text:style-name="T83">idWs</text:span><text:span text:style-name="T57">);</text:span></text:p>
            <text:p text:style-name="P114"><text:span text:style-name="T57"><text:tab/><text:tab/><text:tab/><text:tab/><text:tab/></text:span><text:span text:style-name="T220">// </text:span><text:span text:style-name="T221">Canvia</text:span><text:span text:style-name="T220"> l'estat a </text:span><text:span text:style-name="T221">Rebuda</text:span></text:p>
            <text:p text:style-name="P114"><text:span text:style-name="T57"><text:tab/><text:tab/><text:tab/><text:tab/><text:tab/></text:span><text:span text:style-name="T83">backofficeClient</text:span><text:span text:style-name="T57">.canviEstat(</text:span></text:p>
            <text:p text:style-name="P114"><text:span text:style-name="T57"><text:tab/><text:tab/><text:tab/><text:tab/><text:tab/><text:tab/><text:tab/></text:span><text:span text:style-name="T83">idWs</text:span><text:span text:style-name="T57">,</text:span></text:p>
            <text:p text:style-name="P114"><text:span text:style-name="T57"><text:tab/><text:tab/><text:tab/><text:tab/><text:tab/><text:tab/><text:tab/>es.caib.distribucio.ws.backofficeintegracio.Estat.</text:span><text:span text:style-name="T78">REBUDA</text:span><text:span text:style-name="T57">,</text:span></text:p>
            <text:p text:style-name="P114"><text:span text:style-name="T57"><text:tab/><text:tab/><text:tab/><text:tab/><text:tab/><text:tab/><text:tab/></text:span><text:span text:style-name="T34">"Canviar l'estat a rebuda"</text:span><text:span text:style-name="T57">);</text:span></text:p>
            <text:p text:style-name="P89"><text:tab/><text:tab/><text:tab/><text:tab/><text:tab/></text:p>
            <text:p text:style-name="P114"><text:span text:style-name="T57"><text:tab/><text:tab/><text:tab/><text:tab/><text:tab/></text:span><text:span text:style-name="T220">// </text:span><text:span text:style-name="T221">Prepara</text:span><text:span text:style-name="T220"> </text:span><text:span text:style-name="T221">la</text:span><text:span text:style-name="T220"> </text:span><text:span text:style-name="T221">cria</text:span><text:span text:style-name="T220"> a </text:span><text:span text:style-name="T221">la</text:span><text:span text:style-name="T220"> </text:span><text:span text:style-name="T221">llibreria</text:span><text:span text:style-name="T220"> d'utilitats </text:span><text:span text:style-name="T221">pel</text:span><text:span text:style-name="T220"> </text:span><text:span text:style-name="T221">backoffice</text:span><text:span text:style-name="T220"> </text:span><text:span text:style-name="T221">de</text:span><text:span text:style-name="T220"> DISTRIBUCIO</text:span></text:p>
            <text:p text:style-name="P114"><text:span text:style-name="T57"><text:tab/><text:tab/><text:tab/><text:tab/><text:tab/></text:span><text:span text:style-name="T220">// Constructor </text:span><text:span text:style-name="T221">amb</text:span><text:span text:style-name="T220"> </text:span><text:span text:style-name="T221">la</text:span><text:span text:style-name="T220"> </text:span><text:span text:style-name="T221">referència</text:span><text:span text:style-name="T220"> </text:span><text:span text:style-name="T221">al</text:span><text:span text:style-name="T220"> </text:span><text:span text:style-name="T221">plugin</text:span><text:span text:style-name="T220"> d'Arxiu</text:span></text:p>
            <text:p text:style-name="P114"><text:span text:style-name="T57"><text:tab/><text:tab/><text:tab/><text:tab/><text:tab/>BackofficeArxiuUtils </text:span><text:span text:style-name="T83">backoffice</text:span><text:span text:style-name="T90">Arxiu</text:span><text:span text:style-name="T83">Utils</text:span><text:span text:style-name="T57"> = </text:span><text:span text:style-name="T49">new</text:span><text:span text:style-name="T57"> BackofficeArxiuUtilsImpl(getArxiuPlugin());</text:span></text:p>
            <text:p text:style-name="P114"><text:span text:style-name="T57"><text:tab/><text:tab/><text:tab/><text:tab/><text:tab/></text:span><text:span text:style-name="T220">// </text:span><text:span text:style-name="T221">Afegeix</text:span><text:span text:style-name="T220"> </text:span><text:span text:style-name="T221">la</text:span><text:span text:style-name="T220"> </text:span><text:span text:style-name="T221">instància</text:span><text:span text:style-name="T220"> </text:span><text:span text:style-name="T221">de</text:span><text:span text:style-name="T220"> </text:span><text:span text:style-name="T221">la</text:span><text:span text:style-name="T220"> </text:span><text:span text:style-name="T221">classe</text:span><text:span text:style-name="T220"> </text:span><text:span text:style-name="T221">com</text:span><text:span text:style-name="T220"> a </text:span><text:span text:style-name="T221">escoltador</text:span><text:span text:style-name="T220"> d'events</text:span></text:p>
            <text:p text:style-name="P114"><text:span text:style-name="T57"><text:tab/><text:tab/><text:tab/><text:tab/><text:tab/></text:span><text:span text:style-name="T83">backoffice</text:span><text:span text:style-name="T90">Arxiu</text:span><text:span text:style-name="T83">Utils</text:span><text:span text:style-name="T57">.setArxiuPluginListener(</text:span><text:span text:style-name="T49">this</text:span><text:span text:style-name="T57">);</text:span></text:p>
            <text:p text:style-name="P114"><text:span text:style-name="T57"><text:tab/><text:tab/><text:tab/><text:tab/><text:tab/></text:span><text:span text:style-name="T220">// </text:span><text:span text:style-name="T221">Estableix</text:span><text:span text:style-name="T220"> </text:span><text:span text:style-name="T221">la</text:span><text:span text:style-name="T220"> </text:span><text:span text:style-name="T221">carpeta</text:span><text:span text:style-name="T220"> on </text:span><text:span text:style-name="T221">guardar</text:span><text:span text:style-name="T220"> els </text:span><text:span text:style-name="T221">annexos</text:span><text:span text:style-name="T220"> </text:span><text:span text:style-name="T221">de</text:span><text:span text:style-name="T220"> l'anotació</text:span></text:p>
            <text:p text:style-name="P114"><text:span text:style-name="T57"><text:tab/><text:tab/><text:tab/><text:tab/><text:tab/></text:span><text:span text:style-name="T83">backoffice</text:span><text:span text:style-name="T90">Arxiu</text:span><text:span text:style-name="T83">Utils</text:span><text:span text:style-name="T57">.setCarpeta(</text:span><text:span text:style-name="T83">anotacio</text:span><text:span text:style-name="T57">.getIdentificador());</text:span></text:p>
            <text:p text:style-name="P89"><text:tab/><text:tab/></text:p>
            <text:p text:style-name="P114"><text:span text:style-name="T57"><text:tab/><text:tab/><text:tab/><text:tab/><text:tab/></text:span><text:span text:style-name="T220">// </text:span><text:span text:style-name="T221">Crida</text:span><text:span text:style-name="T220"> a </text:span><text:span text:style-name="T221">la</text:span><text:span text:style-name="T220"> </text:span><text:span text:style-name="T221">creació</text:span><text:span text:style-name="T220"> </text:span><text:span text:style-name="T221">de</text:span><text:span text:style-name="T220"> l'expedient</text:span></text:p>
            <text:p text:style-name="P114"><text:span text:style-name="T57"><text:tab/><text:tab/><text:tab/><text:tab/><text:tab/>String </text:span><text:span text:style-name="T83">SERIE_DOCUMENTAL</text:span><text:span text:style-name="T57"> = </text:span><text:span text:style-name="T34">"S0002"</text:span><text:span text:style-name="T57">; </text:span></text:p>
            <text:p text:style-name="P114"><text:span text:style-name="T57"><text:tab/><text:tab/><text:tab/><text:tab/><text:tab/>String </text:span><text:span text:style-name="T83">CLASSIFICACIO</text:span><text:span text:style-name="T57"> = </text:span><text:span text:style-name="T34">"000000"</text:span><text:span text:style-name="T57">;</text:span></text:p>
            <text:p text:style-name="P114"><text:span text:style-name="T57"><text:tab/><text:tab/><text:tab/><text:tab/><text:tab/>ArxiuResultat </text:span><text:span text:style-name="T83">arxiuResultat</text:span><text:span text:style-name="T57">;</text:span></text:p>
            <text:p text:style-name="P114"><text:span text:style-name="T57"><text:tab/><text:tab/><text:tab/><text:tab/><text:tab/></text:span><text:span text:style-name="T49">int</text:span><text:span text:style-name="T57"> </text:span><text:span text:style-name="T83">intent</text:span><text:span text:style-name="T57"> = 0;</text:span></text:p>
            <text:p text:style-name="P114"><text:span text:style-name="T57"><text:tab/><text:tab/><text:tab/><text:tab/><text:tab/>String </text:span><text:span text:style-name="T83">expedientUuid</text:span><text:span text:style-name="T57"> = </text:span><text:span text:style-name="T49">null</text:span><text:span text:style-name="T57">;</text:span></text:p>
            <text:p text:style-name="P114"><text:span text:style-name="T57"><text:tab/><text:tab/><text:tab/><text:tab/><text:tab/></text:span><text:span text:style-name="T49">do</text:span><text:span text:style-name="T57"> {</text:span></text:p>
            <text:p text:style-name="P114"><text:span text:style-name="T57"><text:tab/><text:tab/><text:tab/><text:tab/><text:tab/><text:tab/></text:span><text:span text:style-name="T220">// </text:span><text:span text:style-name="T221">Crida</text:span><text:span text:style-name="T220"> </text:span><text:span text:style-name="T221">al</text:span><text:span text:style-name="T220"> </text:span><text:span text:style-name="T221">mètode</text:span><text:span text:style-name="T220"> </text:span><text:span text:style-name="T221">de</text:span><text:span text:style-name="T220"> </text:span><text:span text:style-name="T221">creació</text:span><text:span text:style-name="T220"> </text:span><text:span text:style-name="T221">de</text:span><text:span text:style-name="T220"> </text:span><text:span text:style-name="T221">la</text:span><text:span text:style-name="T220"> </text:span><text:span text:style-name="T221">llibreria</text:span></text:p>
            <text:p text:style-name="P114"><text:span text:style-name="T57"><text:tab/><text:tab/><text:tab/><text:tab/><text:tab/><text:tab/></text:span><text:span text:style-name="T83">arxiuResultat</text:span><text:span text:style-name="T57"> = </text:span><text:span text:style-name="T83">backoffice</text:span><text:span text:style-name="T90">Arxiu</text:span><text:span text:style-name="T83">Utils</text:span><text:span text:style-name="T57">.crearExpedientAmbAnotacioRegistre(</text:span></text:p>
            <text:p text:style-name="P114"><text:span text:style-name="T57"><text:tab/><text:tab/><text:tab/><text:tab/><text:tab/><text:tab/><text:tab/><text:tab/></text:span><text:span text:style-name="T83">expedientUuid</text:span><text:span text:style-name="T57">,</text:span></text:p>
            <text:p text:style-name="P114"><text:span text:style-name="T57"><text:tab/><text:tab/><text:tab/><text:tab/><text:tab/><text:tab/><text:tab/><text:tab/></text:span><text:span text:style-name="T83">anotacio</text:span><text:span text:style-name="T57">.getIdentificador(),</text:span></text:p>
            <text:p text:style-name="P114"><text:span text:style-name="T57"><text:tab/><text:tab/><text:tab/><text:tab/><text:tab/><text:tab/><text:tab/><text:tab/></text:span><text:span text:style-name="T49">null</text:span><text:span text:style-name="T57">,</text:span></text:p>
            <text:p text:style-name="P114"><text:span text:style-name="T57"><text:tab/><text:tab/><text:tab/><text:tab/><text:tab/><text:tab/><text:tab/><text:tab/>Arrays.</text:span><text:span text:style-name="T64">asList</text:span><text:span text:style-name="T57">(</text:span><text:span text:style-name="T34">"A04019281"</text:span><text:span text:style-name="T57">),</text:span></text:p>
            <text:p text:style-name="P114"><text:span text:style-name="T57"><text:tab/><text:tab/><text:tab/><text:tab/><text:tab/><text:tab/><text:tab/><text:tab/></text:span><text:span text:style-name="T49">new</text:span><text:span text:style-name="T57"> Date(),</text:span></text:p>
            <text:p text:style-name="P114"><text:span text:style-name="T57"><text:tab/><text:tab/><text:tab/><text:tab/><text:tab/><text:tab/><text:tab/><text:tab/></text:span><text:span text:style-name="T83">CLASSIFICACIO</text:span><text:span text:style-name="T57">,</text:span></text:p>
            <text:p text:style-name="P114"><text:span text:style-name="T57"><text:tab/><text:tab/><text:tab/><text:tab/><text:tab/><text:tab/><text:tab/><text:tab/>ExpedientEstatEnumDto.</text:span><text:span text:style-name="T78">OBERT</text:span><text:span text:style-name="T57">,</text:span></text:p>
            <text:p text:style-name="P114"><text:span text:style-name="T57"><text:tab/><text:tab/><text:tab/><text:tab/><text:tab/><text:tab/><text:tab/><text:tab/></text:span><text:span text:style-name="T83">SERIE_DOCUMENTAL</text:span><text:span text:style-name="T57">,</text:span></text:p>
            <text:p text:style-name="P114"><text:span text:style-name="T57"><text:tab/><text:tab/><text:tab/><text:tab/><text:tab/><text:tab/><text:tab/><text:tab/></text:span><text:span text:style-name="T83">anotacio</text:span><text:span text:style-name="T57">);</text:span></text:p>
            <text:p text:style-name="P114"><text:span text:style-name="T57"><text:tab/><text:tab/><text:tab/><text:tab/><text:tab/><text:tab/></text:span><text:span text:style-name="T83">expedientUuid</text:span><text:span text:style-name="T57"> = </text:span><text:span text:style-name="T83">arxiuResultat</text:span><text:span text:style-name="T57">.getIdentificadorExpedient();</text:span></text:p>
            <text:p text:style-name="P114"><text:span text:style-name="T57"><text:tab/><text:tab/><text:tab/><text:tab/><text:tab/><text:tab/></text:span><text:span text:style-name="T220">// </text:span><text:span text:style-name="T221">Imprimeix</text:span><text:span text:style-name="T220"> el </text:span><text:span text:style-name="T221">resultat</text:span><text:span text:style-name="T220"> per </text:span><text:span text:style-name="T221">pantalla</text:span></text:p>
            <text:p text:style-name="P114"><text:span text:style-name="T57"><text:tab/><text:tab/><text:tab/><text:tab/><text:tab/><text:tab/></text:span><text:span text:style-name="T49">this</text:span><text:span text:style-name="T57">.logResultat(</text:span></text:p>
            <text:p text:style-name="P114"><text:span text:style-name="T57"><text:tab/><text:tab/><text:tab/><text:tab/><text:tab/><text:tab/><text:tab/><text:tab/></text:span><text:span text:style-name="T34">"Resultat de la crida "</text:span><text:span text:style-name="T57"> + </text:span><text:span text:style-name="T83">intent</text:span><text:span text:style-name="T57">++ + </text:span><text:span text:style-name="T34">" crearExpedientAmbAnotacioRegistre per l'expedient"</text:span><text:span text:style-name="T57"> + </text:span><text:span text:style-name="T83">anotacio</text:span><text:span text:style-name="T57">.getExpedientNumero(),</text:span></text:p>
            <text:p text:style-name="P114"><text:span text:style-name="T57"><text:tab/><text:tab/><text:tab/><text:tab/><text:tab/><text:tab/><text:tab/><text:tab/></text:span><text:span text:style-name="T83">arxiuResultat</text:span><text:span text:style-name="T57">);<text:tab/><text:tab/><text:tab/><text:tab/><text:tab/></text:span></text:p>
            <text:p text:style-name="P114"><text:span text:style-name="T57"><text:tab/><text:tab/><text:tab/><text:tab/><text:tab/>} </text:span><text:span text:style-name="T49">while</text:span><text:span text:style-name="T57">(</text:span><text:span text:style-name="T83">arxiuResultat</text:span><text:span text:style-name="T57">.getErrorCodi() != </text:span><text:span text:style-name="T71">DistribucioArxiuError.</text:span><text:span text:style-name="T79">NO_ERROR</text:span><text:span text:style-name="T57"> &amp;&amp; </text:span><text:span text:style-name="T83">intent</text:span><text:span text:style-name="T57"> &lt; 10);<text:tab/></text:span></text:p>
            <text:p text:style-name="P182"/>
            <text:p text:style-name="P114"><text:span text:style-name="T57"><text:tab/><text:tab/><text:tab/><text:tab/><text:tab/></text:span><text:span text:style-name="T220">// </text:span><text:span text:style-name="T221">Consultem</text:span><text:span text:style-name="T220"> el </text:span><text:span text:style-name="T221">nou</text:span><text:span text:style-name="T220"> expedient a l'Arxiu</text:span></text:p>
            <text:p text:style-name="P114"><text:span text:style-name="T57"><text:tab/><text:tab/><text:tab/><text:tab/><text:tab/></text:span><text:span text:style-name="T49">if</text:span><text:span text:style-name="T57"> (</text:span><text:span text:style-name="T83">expedientUuid</text:span><text:span text:style-name="T57"> != </text:span><text:span text:style-name="T49">null</text:span><text:span text:style-name="T57">) {</text:span></text:p>
            <text:p text:style-name="P114"><text:span text:style-name="T57"><text:tab/><text:tab/><text:tab/><text:tab/><text:tab/><text:tab/>Expedient </text:span><text:span text:style-name="T83">expedientDetalls</text:span><text:span text:style-name="T57"> = getArxiuPlugin().expedientDetalls(</text:span><text:span text:style-name="T83">arxiuResultat</text:span><text:span text:style-name="T57">.getIdentificadorExpedient(), </text:span><text:span text:style-name="T49">null</text:span><text:span text:style-name="T57">);</text:span></text:p>
            <text:p text:style-name="P114"><text:span text:style-name="T57"><text:tab/><text:tab/><text:tab/><text:tab/><text:tab/><text:tab/></text:span><text:span text:style-name="T78">logger</text:span><text:span text:style-name="T57">.debug(</text:span><text:span text:style-name="T34">"S'ha creat l'expedient \""</text:span><text:span text:style-name="T57"> + </text:span><text:span text:style-name="T83">expedientDetalls</text:span><text:span text:style-name="T57">.getNom() + </text:span><text:span text:style-name="T34">"\" amb id="</text:span><text:span text:style-name="T57"> + </text:span><text:span text:style-name="T83">expedientDetalls</text:span><text:span text:style-name="T57">.getIdentificador() + </text:span><text:span text:style-name="T34">" per l'anotació "</text:span><text:span text:style-name="T57"> + </text:span><text:span text:style-name="T83">anotacio</text:span><text:span text:style-name="T57">.getIdentificador() + </text:span><text:span text:style-name="T34">" amb els següents continguts:"</text:span><text:span text:style-name="T57">);</text:span></text:p>
            <text:p text:style-name="P114"><text:span text:style-name="T57"><text:tab/><text:tab/><text:tab/><text:tab/><text:tab/><text:tab/></text:span><text:span text:style-name="T49">for</text:span><text:span text:style-name="T57"> (ContingutArxiu </text:span><text:span text:style-name="T83">contingut</text:span><text:span text:style-name="T57"> : </text:span><text:span text:style-name="T83">expedientDetalls</text:span><text:span text:style-name="T57">.getContinguts()) {</text:span></text:p>
            <text:p text:style-name="P114"><text:span text:style-name="T57"><text:tab/><text:tab/><text:tab/><text:tab/><text:tab/><text:tab/><text:tab/></text:span><text:span text:style-name="T78">logger</text:span><text:span text:style-name="T57">.debug(</text:span><text:span text:style-name="T34">"- "</text:span><text:span text:style-name="T57"> + </text:span><text:span text:style-name="T83">contingut</text:span><text:span text:style-name="T57">.getIdentificador() + </text:span><text:span text:style-name="T34">" "</text:span><text:span text:style-name="T57"> + </text:span><text:span text:style-name="T83">contingut</text:span><text:span text:style-name="T57">.getNom() + </text:span><text:span text:style-name="T34">" amb "</text:span><text:span text:style-name="T57"> + (</text:span><text:span text:style-name="T83">contingut</text:span><text:span text:style-name="T57">.getFirmes() != </text:span><text:span text:style-name="T49">null</text:span><text:span text:style-name="T57">? </text:span><text:span text:style-name="T83">contingut</text:span><text:span text:style-name="T57">.getFirmes().size() : 0) + </text:span><text:span text:style-name="T34">" firmes."</text:span><text:span text:style-name="T57">);</text:span></text:p>
            <text:p text:style-name="P89"><text:tab/><text:tab/><text:tab/><text:tab/><text:tab/><text:tab/>}</text:p>
            <text:p text:style-name="P114"><text:span text:style-name="T57"><text:tab/><text:tab/><text:tab/><text:tab/><text:tab/>} </text:span><text:span text:style-name="T49">else</text:span><text:span text:style-name="T57"> {</text:span></text:p>
            <text:p text:style-name="P114"><text:span text:style-name="T57"><text:tab/><text:tab/><text:tab/><text:tab/><text:tab/><text:tab/></text:span><text:span text:style-name="T78">logger</text:span><text:span text:style-name="T57">.warn(</text:span><text:span text:style-name="T34">"L'expedient no s'ha pogut crear per l'anotació "</text:span><text:span text:style-name="T57"> + </text:span><text:span text:style-name="T83">anotacio</text:span><text:span text:style-name="T57">.getIdentificador());</text:span></text:p>
            <text:p text:style-name="P89"><text:tab/><text:tab/><text:tab/><text:tab/><text:tab/>}</text:p>
            <text:p text:style-name="P89"><text:tab/><text:tab/><text:tab/><text:tab/><text:tab/><text:span text:style-name="T223">// Processament dels annexos de documents tècnics segons el títol</text:span></text:p>
            <text:p text:style-name="P120"><text:span text:style-name="T57"><text:tab/><text:tab/><text:tab/><text:tab/><text:tab/>String </text:span><text:span text:style-name="T83">titol</text:span><text:span text:style-name="T57">;</text:span></text:p>
            <text:p text:style-name="P120"><text:soft-page-break/><text:span text:style-name="T57"><text:tab/><text:tab/><text:tab/><text:tab/><text:tab/></text:span><text:span text:style-name="T49">for</text:span><text:span text:style-name="T57"> (Annex </text:span><text:span text:style-name="T83">annex</text:span><text:span text:style-name="T57"> : </text:span><text:span text:style-name="T83">anotacio</text:span><text:span text:style-name="T57">.getAnnexos()) {</text:span></text:p>
            <text:p text:style-name="P120"><text:span text:style-name="T57"><text:tab/><text:tab/><text:tab/><text:tab/><text:tab/><text:tab/></text:span><text:span text:style-name="T83">titol</text:span><text:span text:style-name="T57"> = </text:span><text:span text:style-name="T83">annex</text:span><text:span text:style-name="T57">.getTitol();</text:span></text:p>
            <text:p text:style-name="P120"><text:span text:style-name="T57"><text:tab/><text:tab/><text:tab/><text:tab/><text:tab/><text:tab/></text:span><text:span text:style-name="T49">if</text:span><text:span text:style-name="T57"> (</text:span><text:span text:style-name="T83">titol</text:span><text:span text:style-name="T57"> != </text:span><text:span text:style-name="T49">null</text:span><text:span text:style-name="T57"> </text:span></text:p>
            <text:p text:style-name="P120"><text:span text:style-name="T57"><text:tab/><text:tab/><text:tab/><text:tab/><text:tab/><text:tab/><text:tab/><text:tab/>&amp;&amp; (</text:span><text:span text:style-name="T34">"FORMULARIO"</text:span><text:span text:style-name="T57">.equals(</text:span><text:span text:style-name="T83">titol</text:span><text:span text:style-name="T57">) </text:span></text:p>
            <text:p text:style-name="P120"><text:span text:style-name="T57"><text:tab/><text:tab/><text:tab/><text:tab/><text:tab/><text:tab/><text:tab/><text:tab/><text:tab/><text:tab/>|| </text:span><text:span text:style-name="T34">"PAGO"</text:span><text:span text:style-name="T57">.equals(</text:span><text:span text:style-name="T83">titol</text:span><text:span text:style-name="T57">))) {</text:span></text:p>
            <text:p text:style-name="P120"><text:span text:style-name="T57"><text:tab/><text:tab/><text:tab/><text:tab/><text:tab/><text:tab/><text:tab/></text:span><text:span text:style-name="T220">// Recupera el contingut de l'annex</text:span></text:p>
            <text:p text:style-name="P120"><text:span text:style-name="T57"><text:tab/><text:tab/><text:tab/><text:tab/><text:tab/><text:tab/><text:tab/>Document </text:span><text:span text:style-name="T83">document</text:span><text:span text:style-name="T57"> = getArxiuPlugin().documentDetalls(</text:span><text:span text:style-name="T83">annex</text:span><text:span text:style-name="T57">.getUuid(), </text:span><text:span text:style-name="T49">null</text:span><text:span text:style-name="T57">, </text:span><text:span text:style-name="T49">true</text:span><text:span text:style-name="T57">);<text:tab/><text:tab/><text:tab/><text:tab/><text:tab/><text:tab/><text:tab/></text:span></text:p>
            <text:p text:style-name="P120"><text:span text:style-name="T57"><text:tab/><text:tab/><text:tab/><text:tab/><text:tab/><text:tab/><text:tab/></text:span><text:span text:style-name="T49">byte</text:span><text:span text:style-name="T57">[] </text:span><text:span text:style-name="T83">contingut</text:span><text:span text:style-name="T57"> = </text:span><text:span text:style-name="T83">document</text:span><text:span text:style-name="T57">.getContingut().getContingut();</text:span></text:p>
            <text:p text:style-name="P120"><text:span text:style-name="T57"><text:tab/><text:tab/><text:tab/><text:tab/><text:tab/><text:tab/><text:tab/></text:span><text:span text:style-name="T220">// Interpreta el contingut amb la classe BackofficeSistra2Utils</text:span></text:p>
            <text:p text:style-name="P120"><text:span text:style-name="T57"><text:tab/><text:tab/><text:tab/><text:tab/><text:tab/><text:tab/><text:tab/>BackofficeSistra2Utils </text:span><text:span text:style-name="T83">sistra2Utils</text:span><text:span text:style-name="T57"> = </text:span><text:span text:style-name="T49">new</text:span><text:span text:style-name="T57"> BackofficeSistra2UtilsImpl();</text:span></text:p>
            <text:p text:style-name="P120"><text:span text:style-name="T57"><text:tab/><text:tab/><text:tab/><text:tab/><text:tab/><text:tab/><text:tab/></text:span><text:span text:style-name="T78">logger</text:span><text:span text:style-name="T57">.debug(</text:span><text:span text:style-name="T34">" <text:s/>Document tècnic \""</text:span><text:span text:style-name="T57"> + </text:span><text:span text:style-name="T83">titol</text:span><text:span text:style-name="T57"> + </text:span><text:span text:style-name="T34">"\". Dades:"</text:span><text:span text:style-name="T57">);</text:span></text:p>
            <text:p text:style-name="P120"><text:span text:style-name="T57"><text:tab/><text:tab/><text:tab/><text:tab/><text:tab/><text:tab/><text:tab/></text:span><text:span text:style-name="T49">try</text:span><text:span text:style-name="T57"> {</text:span></text:p>
            <text:p text:style-name="P120"><text:span text:style-name="T57"><text:tab/><text:tab/><text:tab/><text:tab/><text:tab/><text:tab/><text:tab/><text:tab/></text:span><text:span text:style-name="T49">if</text:span><text:span text:style-name="T57"> (</text:span><text:span text:style-name="T34">"FORMULARIO"</text:span><text:span text:style-name="T57">.equals(</text:span><text:span text:style-name="T83">titol</text:span><text:span text:style-name="T57">)) {</text:span></text:p>
            <text:p text:style-name="P120"><text:span text:style-name="T57"><text:tab/><text:tab/><text:tab/><text:tab/><text:tab/><text:tab/><text:tab/><text:tab/><text:tab/>Formulario </text:span><text:span text:style-name="T83">formulario</text:span><text:span text:style-name="T57"> = </text:span><text:span text:style-name="T83">sistra2Utils</text:span><text:span text:style-name="T57">.parseXmlFormulario(</text:span><text:span text:style-name="T83">contingut</text:span><text:span text:style-name="T57">);</text:span></text:p>
            <text:p text:style-name="P120"><text:span text:style-name="T57"><text:tab/><text:tab/><text:tab/><text:tab/><text:tab/><text:tab/><text:tab/><text:tab/><text:tab/></text:span><text:span text:style-name="T78">logger</text:span><text:span text:style-name="T57">.debug(</text:span><text:span text:style-name="T34">" <text:s/>formulario: "</text:span><text:span text:style-name="T57"> + ToStringBuilder.</text:span><text:span text:style-name="T64">reflectionToString</text:span><text:span text:style-name="T57">(</text:span><text:span text:style-name="T83">formulario</text:span><text:span text:style-name="T57">));<text:tab/><text:tab/><text:tab/><text:tab/><text:tab/><text:tab/><text:tab/><text:tab/></text:span></text:p>
            <text:p text:style-name="P120"><text:span text:style-name="T57"><text:tab/><text:tab/><text:tab/><text:tab/><text:tab/><text:tab/><text:tab/><text:tab/>} </text:span><text:span text:style-name="T49">else</text:span><text:span text:style-name="T57"> </text:span><text:span text:style-name="T49">if</text:span><text:span text:style-name="T57"> (</text:span><text:span text:style-name="T34">"PAGO"</text:span><text:span text:style-name="T57">.equals(</text:span><text:span text:style-name="T83">titol</text:span><text:span text:style-name="T57">)) {</text:span></text:p>
            <text:p text:style-name="P120"><text:span text:style-name="T57"><text:tab/><text:tab/><text:tab/><text:tab/><text:tab/><text:tab/><text:tab/><text:tab/><text:tab/>Pago </text:span><text:span text:style-name="T83">pago</text:span><text:span text:style-name="T57"> = </text:span><text:span text:style-name="T83">sistra2Utils</text:span><text:span text:style-name="T57">.parseXmlPago(</text:span><text:span text:style-name="T83">contingut</text:span><text:span text:style-name="T57">);</text:span></text:p>
            <text:p text:style-name="P120"><text:span text:style-name="T57"><text:tab/><text:tab/><text:tab/><text:tab/><text:tab/><text:tab/><text:tab/><text:tab/><text:tab/></text:span><text:span text:style-name="T78">logger</text:span><text:span text:style-name="T57">.debug(</text:span><text:span text:style-name="T34">" <text:s/>pago: "</text:span><text:span text:style-name="T57"> + ToStringBuilder.</text:span><text:span text:style-name="T64">reflectionToString</text:span><text:span text:style-name="T57">(</text:span><text:span text:style-name="T83">pago</text:span><text:span text:style-name="T57">));<text:tab/><text:tab/><text:tab/><text:tab/><text:tab/><text:tab/><text:tab/><text:tab/></text:span></text:p>
            <text:p text:style-name="P93"><text:tab/><text:tab/><text:tab/><text:tab/><text:tab/><text:tab/><text:tab/><text:tab/>}</text:p>
            <text:p text:style-name="P120"><text:span text:style-name="T57"><text:tab/><text:tab/><text:tab/><text:tab/><text:tab/><text:tab/><text:tab/>} </text:span><text:span text:style-name="T49">catch</text:span><text:span text:style-name="T57">(Exception </text:span><text:span text:style-name="T83">e</text:span><text:span text:style-name="T57">) {<text:tab/><text:tab/><text:tab/><text:tab/><text:tab/><text:tab/><text:tab/><text:tab/></text:span></text:p>
            <text:p text:style-name="P120"><text:span text:style-name="T57"><text:tab/><text:tab/><text:tab/><text:tab/><text:tab/><text:tab/><text:tab/><text:tab/></text:span><text:span text:style-name="T78">logger</text:span><text:span text:style-name="T57">.error(</text:span><text:span text:style-name="T34">"Error obtenint la informació del document tècnic "</text:span><text:span text:style-name="T57"> + </text:span><text:span text:style-name="T83">titol</text:span><text:span text:style-name="T57"> + </text:span><text:span text:style-name="T34">":"</text:span><text:span text:style-name="T57"> + </text:span><text:span text:style-name="T83">e</text:span><text:span text:style-name="T57">.getMessage(), </text:span><text:span text:style-name="T83">e</text:span><text:span text:style-name="T57">);</text:span></text:p>
            <text:p text:style-name="P93"><text:tab/><text:tab/><text:tab/><text:tab/><text:tab/><text:tab/><text:tab/>}</text:p>
            <text:p text:style-name="P93"><text:tab/><text:tab/><text:tab/><text:tab/><text:tab/><text:tab/>}</text:p>
            <text:p text:style-name="P179"/>
            <text:p text:style-name="P93"><text:tab/><text:tab/><text:tab/><text:tab/><text:tab/>}</text:p>
            <text:p text:style-name="P121"><text:span text:style-name="T57"><text:tab/><text:tab/><text:tab/><text:tab/><text:tab/></text:span><text:span text:style-name="T220">// Es comunica el resultat a DISTRIBUCIO</text:span></text:p>
            <text:p text:style-name="P114"><text:span text:style-name="T72"><text:tab/><text:tab/><text:tab/><text:tab/><text:tab/></text:span><text:span text:style-name="T51">switch</text:span><text:span text:style-name="T72">(</text:span><text:span text:style-name="T92">arxiuResultat</text:span><text:span text:style-name="T72">.ge</text:span><text:span text:style-name="T57">tErrorCodi()) {</text:span></text:p>
            <text:p text:style-name="P114"><text:span text:style-name="T57"><text:tab/><text:tab/><text:tab/><text:tab/><text:tab/><text:tab/></text:span><text:span text:style-name="T49">case</text:span><text:span text:style-name="T57"> 0:</text:span></text:p>
            <text:p text:style-name="P114"><text:span text:style-name="T57"><text:tab/><text:tab/><text:tab/><text:tab/><text:tab/><text:tab/><text:tab/></text:span><text:span text:style-name="T83">backofficeClient</text:span><text:span text:style-name="T57">.canviEstat(</text:span><text:span text:style-name="T83">idWs</text:span><text:span text:style-name="T57">, es.caib.distribucio.ws.backofficeintegracio.Estat.</text:span><text:span text:style-name="T78">PROCESSADA</text:span><text:span text:style-name="T57">, </text:span><text:span text:style-name="T34">"Processada"</text:span><text:span text:style-name="T57">);</text:span></text:p>
            <text:p text:style-name="P114"><text:span text:style-name="T57"><text:tab/><text:tab/><text:tab/><text:tab/><text:tab/><text:tab/><text:tab/></text:span><text:span text:style-name="T49">break</text:span><text:span text:style-name="T57">;</text:span></text:p>
            <text:p text:style-name="P114"><text:span text:style-name="T57"><text:tab/><text:tab/><text:tab/><text:tab/><text:tab/><text:tab/></text:span><text:span text:style-name="T49">default</text:span><text:span text:style-name="T57">:</text:span></text:p>
            <text:p text:style-name="P114"><text:span text:style-name="T57"><text:tab/><text:tab/><text:tab/><text:tab/><text:tab/><text:tab/><text:tab/></text:span><text:span text:style-name="T83">backofficeClient</text:span><text:span text:style-name="T57">.canviEstat(</text:span><text:span text:style-name="T83">idWs</text:span><text:span text:style-name="T57">, es.caib.distribucio.ws.backofficeintegracio.Estat.</text:span><text:span text:style-name="T78">ERROR</text:span><text:span text:style-name="T57">, </text:span><text:span text:style-name="T83">arxiuResultat</text:span><text:span text:style-name="T57">.getErrorCodi()</text:span><text:span text:style-name="T70"> + </text:span><text:span text:style-name="T36">" "</text:span><text:span text:style-name="T70"> + </text:span><text:span text:style-name="T83">arxiuResultat</text:span><text:span text:style-name="T57">.getErrorMessage());</text:span></text:p>
            <text:p text:style-name="P114"><text:span text:style-name="T57"><text:tab/><text:tab/><text:tab/><text:tab/><text:tab/><text:tab/><text:tab/></text:span><text:span text:style-name="T49">break</text:span><text:span text:style-name="T57">;</text:span></text:p>
            <text:p text:style-name="P89"><text:tab/><text:tab/><text:tab/><text:tab/><text:tab/>}</text:p>
            <text:p text:style-name="P114"><text:span text:style-name="T57"><text:tab/><text:tab/><text:tab/><text:tab/>} </text:span><text:span text:style-name="T49">catch</text:span><text:span text:style-name="T57"> (Throwable </text:span><text:span text:style-name="T83">ex</text:span><text:span text:style-name="T57">) {</text:span></text:p>
            <text:p text:style-name="P114"><text:span text:style-name="T57"><text:tab/><text:tab/><text:tab/><text:tab/><text:tab/></text:span><text:span text:style-name="T78">logger</text:span><text:span text:style-name="T57">.error(</text:span><text:span text:style-name="T34">"Error al processant la petició d'anotació amb id "</text:span><text:span text:style-name="T57"> + </text:span><text:span text:style-name="T83">id</text:span><text:span text:style-name="T57">.getIndetificador(), </text:span><text:span text:style-name="T83">ex</text:span><text:span text:style-name="T57">);</text:span></text:p>
            <text:p text:style-name="P89"><text:tab/><text:tab/><text:tab/><text:tab/>}</text:p>
            <text:p text:style-name="P89"><text:tab/><text:tab/><text:tab/>}<text:tab/><text:tab/><text:tab/></text:p>
            <text:p text:style-name="P114"><text:span text:style-name="T57"><text:tab/><text:tab/>} </text:span><text:span text:style-name="T49">catch</text:span><text:span text:style-name="T57"> (Exception </text:span><text:span text:style-name="T83">e</text:span><text:span text:style-name="T57">) {</text:span></text:p>
            <text:p text:style-name="P114"><text:span text:style-name="T57"><text:tab/><text:tab/><text:tab/></text:span><text:span text:style-name="T78">logger</text:span><text:span text:style-name="T57">.error(</text:span><text:span text:style-name="T34">"Error no controlat en el mètode de comunicació d'anotacions pendents: "</text:span><text:span text:style-name="T57"> + </text:span><text:span text:style-name="T83">e</text:span><text:span text:style-name="T57">.getMessage(), </text:span><text:span text:style-name="T83">e</text:span><text:span text:style-name="T57">);</text:span></text:p>
            <text:p text:style-name="P89"><text:tab/><text:tab/>}</text:p>
            <text:p text:style-name="P89"><text:tab/>}</text:p>
            <text:p text:style-name="P182"/>
            <text:p text:style-name="P182"/>
            <text:p text:style-name="P89"><text:tab/></text:p>
            <text:p text:style-name="P89"><text:tab/></text:p>
            <text:p text:style-name="P114"><text:span text:style-name="T57"><text:tab/></text:span><text:span text:style-name="T49">private</text:span><text:span text:style-name="T57"> </text:span><text:span text:style-name="T49">void</text:span><text:span text:style-name="T57"> logResultat(String </text:span><text:span text:style-name="T83">descripcio</text:span><text:span text:style-name="T57">, ArxiuResultat </text:span><text:span text:style-name="T83">arxiuResultat</text:span><text:span text:style-name="T57">) {</text:span></text:p>
            <text:p text:style-name="P114"><text:span text:style-name="T57"><text:tab/><text:tab/></text:span><text:span text:style-name="T78">logger</text:span><text:span text:style-name="T57">.debug(</text:span><text:span text:style-name="T83">descripcio</text:span><text:span text:style-name="T57">);</text:span></text:p>
            <text:p text:style-name="P114"><text:span text:style-name="T57"><text:tab/><text:tab/></text:span><text:span text:style-name="T220">// </text:span><text:span text:style-name="T221">Resultat</text:span><text:span text:style-name="T220"> a </text:span><text:span text:style-name="T221">nivell</text:span><text:span text:style-name="T220"> d'expedient</text:span></text:p>
            <text:p text:style-name="P114"><text:span text:style-name="T57"><text:tab/><text:tab/></text:span><text:span text:style-name="T78">logger</text:span><text:span text:style-name="T57">.debug(</text:span><text:span text:style-name="T34">"- uuid: "</text:span><text:span text:style-name="T57"> + </text:span><text:span text:style-name="T83">arxiuResultat</text:span><text:span text:style-name="T57">.getIdentificadorExpedient());</text:span></text:p>
            <text:p text:style-name="P114"><text:span text:style-name="T57"><text:tab/><text:tab/></text:span><text:span text:style-name="T78">logger</text:span><text:span text:style-name="T57">.debug(</text:span><text:span text:style-name="T34">"- accio: "</text:span><text:span text:style-name="T57"> + </text:span><text:span text:style-name="T83">arxiuResultat</text:span><text:span text:style-name="T57">.getAccio());</text:span></text:p>
            <text:p text:style-name="P114"><text:span text:style-name="T57"><text:tab/><text:tab/></text:span><text:span text:style-name="T78">logger</text:span><text:span text:style-name="T57">.debug(</text:span><text:span text:style-name="T34">"- errorCodi: "</text:span><text:span text:style-name="T57"> + </text:span><text:span text:style-name="T83">arxiuResultat</text:span><text:span text:style-name="T57">.getErrorCodi());</text:span></text:p>
            <text:p text:style-name="P114"><text:span text:style-name="T57"><text:tab/><text:tab/></text:span><text:span text:style-name="T78">logger</text:span><text:span text:style-name="T57">.debug(</text:span><text:span text:style-name="T34">"- errorMessage: "</text:span><text:span text:style-name="T57"> + </text:span><text:span text:style-name="T83">arxiuResultat</text:span><text:span text:style-name="T57">.getErrorMessage());</text:span></text:p>
            <text:p text:style-name="P114"><text:span text:style-name="T57"><text:tab/><text:tab/></text:span><text:span text:style-name="T78">logger</text:span><text:span text:style-name="T57">.debug(</text:span><text:span text:style-name="T34">"- excepcio: "</text:span><text:span text:style-name="T57"> + (</text:span><text:span text:style-name="T83">arxiuResultat</text:span><text:span text:style-name="T57">.getException() != </text:span><text:span text:style-name="T49">null</text:span><text:span text:style-name="T57">? </text:span><text:span text:style-name="T83">arxiuResultat</text:span><text:span text:style-name="T57">.getException().getClass() + </text:span><text:span text:style-name="T34">" "</text:span><text:span text:style-name="T57"> + </text:span><text:span text:style-name="T83">arxiuResultat</text:span><text:span text:style-name="T57">.getException().getMessage() : <text:s/></text:span><text:span text:style-name="T34">" - "</text:span><text:span text:style-name="T57">));</text:span></text:p>
            <text:p text:style-name="P182"/>
            <text:p text:style-name="P114"><text:soft-page-break/><text:span text:style-name="T57"><text:tab/><text:tab/></text:span><text:span text:style-name="T220">// </text:span><text:span text:style-name="T221">Resultat</text:span><text:span text:style-name="T220"> </text:span><text:span text:style-name="T221">pels</text:span><text:span text:style-name="T220"> </text:span><text:span text:style-name="T221">annexos</text:span></text:p>
            <text:p text:style-name="P114"><text:span text:style-name="T57"><text:tab/><text:tab/>List&lt;ArxiuResultatAnnex&gt; </text:span><text:span text:style-name="T83">resultatAnnexos</text:span><text:span text:style-name="T57"> = </text:span><text:span text:style-name="T83">arxiuResultat</text:span><text:span text:style-name="T57">.getResultatAnnexos(); </text:span></text:p>
            <text:p text:style-name="P114"><text:span text:style-name="T57"><text:tab/><text:tab/></text:span><text:span text:style-name="T78">logger</text:span><text:span text:style-name="T57">.debug(</text:span><text:span text:style-name="T34">" - Resultat dels "</text:span><text:span text:style-name="T57"> + </text:span><text:span text:style-name="T83">resultatAnnexos</text:span><text:span text:style-name="T57">.size() + </text:span><text:span text:style-name="T34">" annexos:"</text:span><text:span text:style-name="T57">);</text:span></text:p>
            <text:p text:style-name="P114"><text:span text:style-name="T57"><text:tab/><text:tab/></text:span><text:span text:style-name="T49">for</text:span><text:span text:style-name="T57"> (ArxiuResultatAnnex </text:span><text:span text:style-name="T83">resultatAnnex</text:span><text:span text:style-name="T57"> : </text:span><text:span text:style-name="T83">resultatAnnexos</text:span><text:span text:style-name="T57">) {</text:span></text:p>
            <text:p text:style-name="P114"><text:span text:style-name="T57"><text:tab/><text:tab/><text:tab/></text:span><text:span text:style-name="T78">logger</text:span><text:span text:style-name="T57">.debug(</text:span><text:span text:style-name="T34">"\b- uuid: "</text:span><text:span text:style-name="T57"> + </text:span><text:span text:style-name="T83">resultatAnnex</text:span><text:span text:style-name="T57">.getIdentificadorAnnex());</text:span></text:p>
            <text:p text:style-name="P114"><text:span text:style-name="T57"><text:tab/><text:tab/><text:tab/></text:span><text:span text:style-name="T78">logger</text:span><text:span text:style-name="T57">.debug(</text:span><text:span text:style-name="T34">"\\b- accio: "</text:span><text:span text:style-name="T57"> + </text:span><text:span text:style-name="T83">resultatAnnex</text:span><text:span text:style-name="T57">.getAccio());</text:span></text:p>
            <text:p text:style-name="P114"><text:span text:style-name="T57"><text:tab/><text:tab/><text:tab/></text:span><text:span text:style-name="T78">logger</text:span><text:span text:style-name="T57">.debug(</text:span><text:span text:style-name="T34">"\\b- errorCodi: "</text:span><text:span text:style-name="T57"> + </text:span><text:span text:style-name="T83">resultatAnnex</text:span><text:span text:style-name="T57">.getErrorCodi());</text:span></text:p>
            <text:p text:style-name="P114"><text:span text:style-name="T57"><text:tab/><text:tab/><text:tab/></text:span><text:span text:style-name="T78">logger</text:span><text:span text:style-name="T57">.debug(</text:span><text:span text:style-name="T34">"\\b- errorMessage: "</text:span><text:span text:style-name="T57"> + </text:span><text:span text:style-name="T83">resultatAnnex</text:span><text:span text:style-name="T57">.getErrorMessage());</text:span></text:p>
            <text:p text:style-name="P114"><text:span text:style-name="T57"><text:tab/><text:tab/><text:tab/></text:span><text:span text:style-name="T78">logger</text:span><text:span text:style-name="T57">.debug(</text:span><text:span text:style-name="T34">"\\b- excepcio: "</text:span><text:span text:style-name="T57"> + (</text:span><text:span text:style-name="T83">resultatAnnex</text:span><text:span text:style-name="T57">.getException() != </text:span><text:span text:style-name="T49">null</text:span><text:span text:style-name="T57">? </text:span><text:span text:style-name="T83">resultatAnnex</text:span><text:span text:style-name="T57">.getException().getClass() + </text:span><text:span text:style-name="T34">" "</text:span><text:span text:style-name="T57"> + </text:span><text:span text:style-name="T83">resultatAnnex</text:span><text:span text:style-name="T57">.getException().getMessage() : <text:s/></text:span><text:span text:style-name="T34">" - "</text:span><text:span text:style-name="T57">));</text:span></text:p>
            <text:p text:style-name="P89"><text:tab/><text:tab/>}</text:p>
            <text:p text:style-name="P89"><text:tab/>}</text:p>
            <text:p text:style-name="P182"/>
            <text:p text:style-name="P114"><text:span text:style-name="T57"><text:tab/></text:span><text:span text:style-name="T49">private</text:span><text:span text:style-name="T57"> IArxiuPlugin getArxiuPlugin() </text:span><text:span text:style-name="T49">throws</text:span><text:span text:style-name="T57"> SistemaExternException {</text:span></text:p>
            <text:p text:style-name="P114"><text:span text:style-name="T57"><text:tab/><text:tab/></text:span><text:span text:style-name="T49">if</text:span><text:span text:style-name="T57"> (</text:span><text:span text:style-name="T77">arxiuPlugin</text:span><text:span text:style-name="T57"> == </text:span><text:span text:style-name="T49">null</text:span><text:span text:style-name="T57">) {</text:span></text:p>
            <text:p text:style-name="P114"><text:span text:style-name="T57"><text:tab/><text:tab/><text:tab/>String </text:span><text:span text:style-name="T83">pluginClass</text:span><text:span text:style-name="T57"> = getPropertyPluginArxiu();</text:span></text:p>
            <text:p text:style-name="P114"><text:span text:style-name="T57"><text:tab/><text:tab/><text:tab/></text:span><text:span text:style-name="T49">if</text:span><text:span text:style-name="T57"> (</text:span><text:span text:style-name="T83">pluginClass</text:span><text:span text:style-name="T57"> != </text:span><text:span text:style-name="T49">null</text:span><text:span text:style-name="T57"> &amp;&amp; </text:span><text:span text:style-name="T83">pluginClass</text:span><text:span text:style-name="T57">.length() &gt; 0) {</text:span></text:p>
            <text:p text:style-name="P114"><text:span text:style-name="T57"><text:tab/><text:tab/><text:tab/><text:tab/></text:span><text:span text:style-name="T49">try</text:span><text:span text:style-name="T57"> {</text:span></text:p>
            <text:p text:style-name="P114"><text:span text:style-name="T57"><text:tab/><text:tab/><text:tab/><text:tab/><text:tab/>Class&lt;?&gt; </text:span><text:span text:style-name="T83">clazz</text:span><text:span text:style-name="T57"> = Class.</text:span><text:span text:style-name="T64">forName</text:span><text:span text:style-name="T57">(</text:span><text:span text:style-name="T83">pluginClass</text:span><text:span text:style-name="T57">);</text:span></text:p>
            <text:p text:style-name="P114"><text:span text:style-name="T57"><text:tab/><text:tab/><text:tab/><text:tab/><text:tab/></text:span><text:span text:style-name="T49">if</text:span><text:span text:style-name="T57"> (PropertiesHelper.</text:span><text:span text:style-name="T64">getProperties</text:span><text:span text:style-name="T57">().isLlegirSystem()) {</text:span></text:p>
            <text:p text:style-name="P114"><text:span text:style-name="T57"><text:tab/><text:tab/><text:tab/><text:tab/><text:tab/><text:tab/></text:span><text:span text:style-name="T77">arxiuPlugin</text:span><text:span text:style-name="T57"> = (IArxiuPlugin)</text:span><text:span text:style-name="T83">clazz</text:span><text:span text:style-name="T57">.getDeclaredConstructor(</text:span></text:p>
            <text:p text:style-name="P114"><text:span text:style-name="T57"><text:tab/><text:tab/><text:tab/><text:tab/><text:tab/><text:tab/><text:tab/><text:tab/>String.</text:span><text:span text:style-name="T49">class</text:span><text:span text:style-name="T57">).newInstance(</text:span></text:p>
            <text:p text:style-name="P114"><text:span text:style-name="T57"><text:tab/><text:tab/><text:tab/><text:tab/><text:tab/><text:tab/><text:tab/><text:tab/></text:span><text:span text:style-name="T34">"es.caib.distribucio."</text:span><text:span text:style-name="T57">);</text:span></text:p>
            <text:p text:style-name="P114"><text:span text:style-name="T57"><text:tab/><text:tab/><text:tab/><text:tab/><text:tab/>} </text:span><text:span text:style-name="T49">else</text:span><text:span text:style-name="T57"> {</text:span></text:p>
            <text:p text:style-name="P114"><text:span text:style-name="T57"><text:tab/><text:tab/><text:tab/><text:tab/><text:tab/><text:tab/></text:span><text:span text:style-name="T77">arxiuPlugin</text:span><text:span text:style-name="T57"> = (IArxiuPlugin)</text:span><text:span text:style-name="T83">clazz</text:span><text:span text:style-name="T57">.getDeclaredConstructor(</text:span></text:p>
            <text:p text:style-name="P114"><text:span text:style-name="T57"><text:tab/><text:tab/><text:tab/><text:tab/><text:tab/><text:tab/><text:tab/><text:tab/>String.</text:span><text:span text:style-name="T49">class</text:span><text:span text:style-name="T57">,</text:span></text:p>
            <text:p text:style-name="P114"><text:span text:style-name="T57"><text:tab/><text:tab/><text:tab/><text:tab/><text:tab/><text:tab/><text:tab/><text:tab/>Properties.</text:span><text:span text:style-name="T49">class</text:span><text:span text:style-name="T57">).newInstance(</text:span></text:p>
            <text:p text:style-name="P114"><text:span text:style-name="T57"><text:tab/><text:tab/><text:tab/><text:tab/><text:tab/><text:tab/><text:tab/><text:tab/></text:span><text:span text:style-name="T34">"es.caib.distribucio."</text:span><text:span text:style-name="T57">,</text:span></text:p>
            <text:p text:style-name="P114"><text:span text:style-name="T57"><text:tab/><text:tab/><text:tab/><text:tab/><text:tab/><text:tab/><text:tab/><text:tab/>PropertiesHelper.</text:span><text:span text:style-name="T64">getProperties</text:span><text:span text:style-name="T57">().findAll());</text:span></text:p>
            <text:p text:style-name="P89"><text:tab/><text:tab/><text:tab/><text:tab/><text:tab/>}</text:p>
            <text:p text:style-name="P114"><text:span text:style-name="T57"><text:tab/><text:tab/><text:tab/><text:tab/>} </text:span><text:span text:style-name="T49">catch</text:span><text:span text:style-name="T57"> (Exception </text:span><text:span text:style-name="T83">ex</text:span><text:span text:style-name="T57">) {</text:span></text:p>
            <text:p text:style-name="P114"><text:span text:style-name="T57"><text:tab/><text:tab/><text:tab/><text:tab/><text:tab/></text:span><text:span text:style-name="T49">throw</text:span><text:span text:style-name="T57"> </text:span><text:span text:style-name="T49">new</text:span><text:span text:style-name="T57"> SistemaExternException(</text:span></text:p>
            <text:p text:style-name="P114"><text:span text:style-name="T57"><text:tab/><text:tab/><text:tab/><text:tab/><text:tab/><text:tab/><text:tab/>IntegracioHelper.</text:span><text:span text:style-name="T78">INTCODI_ARXIU</text:span><text:span text:style-name="T57">,</text:span></text:p>
            <text:p text:style-name="P114"><text:span text:style-name="T57"><text:tab/><text:tab/><text:tab/><text:tab/><text:tab/><text:tab/><text:tab/></text:span><text:span text:style-name="T34">"Error al crear la instància del plugin d'arxiu digital"</text:span><text:span text:style-name="T57">,</text:span></text:p>
            <text:p text:style-name="P114"><text:span text:style-name="T57"><text:tab/><text:tab/><text:tab/><text:tab/><text:tab/><text:tab/><text:tab/></text:span><text:span text:style-name="T83">ex</text:span><text:span text:style-name="T57">);</text:span></text:p>
            <text:p text:style-name="P89"><text:tab/><text:tab/><text:tab/><text:tab/>}</text:p>
            <text:p text:style-name="P114"><text:span text:style-name="T57"><text:tab/><text:tab/><text:tab/>} </text:span><text:span text:style-name="T49">else</text:span><text:span text:style-name="T57"> {</text:span></text:p>
            <text:p text:style-name="P114"><text:span text:style-name="T57"><text:tab/><text:tab/><text:tab/><text:tab/></text:span><text:span text:style-name="T49">throw</text:span><text:span text:style-name="T57"> </text:span><text:span text:style-name="T49">new</text:span><text:span text:style-name="T57"> SistemaExternException(</text:span></text:p>
            <text:p text:style-name="P114"><text:span text:style-name="T57"><text:tab/><text:tab/><text:tab/><text:tab/><text:tab/><text:tab/>IntegracioHelper.</text:span><text:span text:style-name="T78">INTCODI_ARXIU</text:span><text:span text:style-name="T57">,</text:span></text:p>
            <text:p text:style-name="P114"><text:span text:style-name="T57"><text:tab/><text:tab/><text:tab/><text:tab/><text:tab/><text:tab/></text:span><text:span text:style-name="T34">"No està configurada la classe per al plugin d'arxiu digital"</text:span><text:span text:style-name="T57">);</text:span></text:p>
            <text:p text:style-name="P89"><text:tab/><text:tab/><text:tab/>}</text:p>
            <text:p text:style-name="P89"><text:tab/><text:tab/>}</text:p>
            <text:p text:style-name="P114"><text:span text:style-name="T57"><text:tab/><text:tab/></text:span><text:span text:style-name="T49">return</text:span><text:span text:style-name="T57"> </text:span><text:span text:style-name="T77">arxiuPlugin</text:span><text:span text:style-name="T57">;</text:span></text:p>
            <text:p text:style-name="P89"><text:tab/>}</text:p>
            <text:p text:style-name="P114"><text:span text:style-name="T57"><text:tab/></text:span><text:span text:style-name="T49">private</text:span><text:span text:style-name="T57"> String getPropertyPluginArxiu() {</text:span></text:p>
            <text:p text:style-name="P114"><text:span text:style-name="T57"><text:tab/><text:tab/></text:span><text:span text:style-name="T49">return</text:span><text:span text:style-name="T57"> PropertiesHelper.</text:span><text:span text:style-name="T64">getProperties</text:span><text:span text:style-name="T57">().getProperty(</text:span></text:p>
            <text:p text:style-name="P114"><text:span text:style-name="T57"><text:tab/><text:tab/><text:tab/><text:tab/></text:span><text:span text:style-name="T34">"es.caib.distribucio.plugin.arxiu.class"</text:span><text:span text:style-name="T57">);</text:span></text:p>
            <text:p text:style-name="P89"><text:tab/>}</text:p>
            <text:p text:style-name="P89"><text:tab/></text:p>
            <text:p text:style-name="P114"><text:span text:style-name="T57"><text:tab/></text:span><text:span text:style-name="T49">private</text:span><text:span text:style-name="T57"> BackofficeIntegracio getBackofficeIntegracioServicePort() </text:span><text:span text:style-name="T49">throws</text:span><text:span text:style-name="T57"> Exception {</text:span></text:p>
            <text:p text:style-name="P114"><text:span text:style-name="T57"><text:tab/><text:tab/>BackofficeIntegracio </text:span><text:span text:style-name="T83">wsClient</text:span><text:span text:style-name="T57"> = </text:span><text:span text:style-name="T49">null</text:span><text:span text:style-name="T57">;</text:span></text:p>
            <text:p text:style-name="P114"><text:span text:style-name="T57"><text:tab/><text:tab/>String </text:span><text:span text:style-name="T83">url</text:span><text:span text:style-name="T57"> = PropertiesHelper.</text:span><text:span text:style-name="T64">getProperties</text:span><text:span text:style-name="T57">().getProperty(</text:span><text:span text:style-name="T34">"es.caib.distribucio.backoffice.test.backofficeIntegracio.url"</text:span><text:span text:style-name="T57">);</text:span></text:p>
            <text:p text:style-name="P114"><text:span text:style-name="T57"><text:tab/><text:tab/>String </text:span><text:span text:style-name="T83">usuari</text:span><text:span text:style-name="T57"> = PropertiesHelper.</text:span><text:span text:style-name="T64">getProperties</text:span><text:span text:style-name="T57">().getProperty(</text:span><text:span text:style-name="T34">"es.caib.distribucio.backoffice.test.backofficeIntegracio.usuari"</text:span><text:span text:style-name="T57">);</text:span></text:p>
            <text:p text:style-name="P114"><text:span text:style-name="T57"><text:tab/><text:tab/>String </text:span><text:span text:style-name="T83">contrasenya</text:span><text:span text:style-name="T57"> = PropertiesHelper.</text:span><text:span text:style-name="T64">getProperties</text:span><text:span text:style-name="T57">().getProperty(</text:span><text:span text:style-name="T34">"es.caib.distribucio.backoffice.test.backofficeIntegracio.contrasenya"</text:span><text:span text:style-name="T57">);</text:span></text:p>
            <text:p text:style-name="P114"><text:span text:style-name="T57"><text:tab/><text:tab/></text:span><text:span text:style-name="T49">if</text:span><text:span text:style-name="T57"> (</text:span><text:span text:style-name="T83">url</text:span><text:span text:style-name="T57"> != </text:span><text:span text:style-name="T49">null</text:span><text:span text:style-name="T57"> &amp;&amp; </text:span><text:span text:style-name="T83">usuari</text:span><text:span text:style-name="T57"> != </text:span><text:span text:style-name="T49">null</text:span><text:span text:style-name="T57"> &amp;&amp; </text:span><text:span text:style-name="T83">contrasenya</text:span><text:span text:style-name="T57"> != </text:span><text:span text:style-name="T49">null</text:span><text:span text:style-name="T57">) {</text:span></text:p>
            <text:p text:style-name="P114"><text:span text:style-name="T57"><text:tab/><text:tab/><text:tab/></text:span><text:span text:style-name="T78">logger</text:span><text:span text:style-name="T57">.debug(</text:span><text:span text:style-name="T34">"&gt;&gt;&gt; Creant el client BackofficeIntegracio WS"</text:span><text:span text:style-name="T57">);</text:span></text:p>
            <text:p text:style-name="P114"><text:span text:style-name="T57"><text:tab/><text:tab/><text:tab/></text:span><text:span text:style-name="T83">wsClient</text:span><text:span text:style-name="T57"> = BackofficeIntegracioWsClientFactory.</text:span><text:span text:style-name="T64">getWsClient</text:span><text:span text:style-name="T57">(</text:span></text:p>
            <text:p text:style-name="P114"><text:span text:style-name="T57"><text:tab/><text:tab/><text:tab/><text:tab/><text:tab/></text:span><text:span text:style-name="T83">url</text:span><text:span text:style-name="T57">,</text:span></text:p>
            <text:p text:style-name="P114"><text:span text:style-name="T57"><text:tab/><text:tab/><text:tab/><text:tab/><text:tab/></text:span><text:span text:style-name="T83">usuari</text:span><text:span text:style-name="T57">,</text:span></text:p>
            <text:p text:style-name="P114"><text:span text:style-name="T57"><text:tab/><text:tab/><text:tab/><text:tab/><text:tab/></text:span><text:span text:style-name="T83">contrasenya</text:span><text:span text:style-name="T57">);</text:span></text:p>
            <text:p text:style-name="P114"><text:span text:style-name="T57"><text:tab/><text:tab/>} </text:span><text:span text:style-name="T49">else</text:span><text:span text:style-name="T57"> {</text:span></text:p>
            <text:p text:style-name="P114"><text:span text:style-name="T57"><text:tab/><text:tab/><text:tab/></text:span><text:span text:style-name="T49">throw</text:span><text:span text:style-name="T57"> </text:span><text:span text:style-name="T49">new</text:span><text:span text:style-name="T57"> RuntimeException(</text:span><text:span text:style-name="T34">"Falta configurar les propietats pel client de Backoffice de DISTRIBUCIO <text:s/>es.caib.distribucio.backoffice.test.backofficeIntegracio.*"</text:span><text:span text:style-name="T57">);</text:span></text:p>
            <text:p text:style-name="P89"><text:tab/><text:tab/>}</text:p>
            <text:p text:style-name="P114"><text:soft-page-break/><text:span text:style-name="T57"><text:tab/><text:tab/></text:span><text:span text:style-name="T49">return</text:span><text:span text:style-name="T57"> </text:span><text:span text:style-name="T83">wsClient</text:span><text:span text:style-name="T57">;</text:span></text:p>
            <text:p text:style-name="P89"><text:tab/>}</text:p>
            <text:p text:style-name="P182"/>
            <text:p text:style-name="P114"><text:span text:style-name="T57"><text:tab/></text:span><text:span text:style-name="T49">private</text:span><text:span text:style-name="T57"> </text:span><text:span text:style-name="T49">static</text:span><text:span text:style-name="T57"> </text:span><text:span text:style-name="T49">final</text:span><text:span text:style-name="T57"> Logger </text:span><text:span text:style-name="T78">logger</text:span><text:span text:style-name="T57"> = LoggerFactory.</text:span><text:span text:style-name="T64">getLogger</text:span><text:span text:style-name="T57">(RegistreHelper.</text:span><text:span text:style-name="T49">class</text:span><text:span text:style-name="T57">);</text:span></text:p>
            <text:p text:style-name="P182"/>
            <text:p text:style-name="P114"><text:span text:style-name="T57"><text:tab/></text:span><text:span text:style-name="T202">/** </text:span><text:span text:style-name="T205">Mètode</text:span><text:span text:style-name="T202"> </text:span><text:span text:style-name="T205">que</text:span><text:span text:style-name="T202"> </text:span><text:span text:style-name="T205">la</text:span><text:span text:style-name="T202"> </text:span><text:span text:style-name="T205">llibreria</text:span><text:span text:style-name="T202"> </text:span><text:span text:style-name="T205">del</text:span><text:span text:style-name="T202"> </text:span><text:span text:style-name="T205">backoffice</text:span><text:span text:style-name="T202"> </text:span><text:span text:style-name="T205">de</text:span><text:span text:style-name="T202"> </text:span><text:span text:style-name="T205">distribució</text:span><text:span text:style-name="T202"> </text:span><text:span text:style-name="T205">crida</text:span><text:span text:style-name="T202"> </text:span><text:span text:style-name="T205">si</text:span><text:span text:style-name="T202"> </text:span><text:span text:style-name="T205">es</text:span><text:span text:style-name="T202"> </text:span><text:span text:style-name="T205">fixa</text:span><text:span text:style-name="T202"> </text:span><text:span text:style-name="T205">una</text:span><text:span text:style-name="T202"> </text:span><text:span text:style-name="T205">instància</text:span><text:span text:style-name="T202"> </text:span><text:span text:style-name="T205">que</text:span><text:span text:style-name="T202"> </text:span><text:span text:style-name="T205">implementa</text:span><text:span text:style-name="T202"> </text:span><text:span text:style-name="T226">{@link ArxiuPluginListener}</text:span><text:span text:style-name="T202">.</text:span></text:p>
            <text:p text:style-name="P126"><text:tab/> * </text:p>
            <text:p text:style-name="P126"><text:tab/> */</text:p>
            <text:p text:style-name="P114"><text:span text:style-name="T57"><text:tab/></text:span><text:span text:style-name="T107">@Override</text:span></text:p>
            <text:p text:style-name="P114"><text:span text:style-name="T57"><text:tab/></text:span><text:span text:style-name="T49">public</text:span><text:span text:style-name="T57"> </text:span><text:span text:style-name="T49">void</text:span><text:span text:style-name="T57"> event(</text:span></text:p>
            <text:p text:style-name="P114"><text:span text:style-name="T57"><text:tab/><text:tab/><text:tab/>String </text:span><text:span text:style-name="T83">metode</text:span><text:span text:style-name="T57">, </text:span></text:p>
            <text:p text:style-name="P114"><text:span text:style-name="T57"><text:tab/><text:tab/><text:tab/>Map&lt;String, String&gt; </text:span><text:span text:style-name="T83">parametres</text:span><text:span text:style-name="T57">, </text:span></text:p>
            <text:p text:style-name="P114"><text:span text:style-name="T57"><text:tab/><text:tab/><text:tab/></text:span><text:span text:style-name="T49">boolean</text:span><text:span text:style-name="T57"> </text:span><text:span text:style-name="T83">correcte</text:span><text:span text:style-name="T57">, </text:span></text:p>
            <text:p text:style-name="P114"><text:span text:style-name="T57"><text:tab/><text:tab/><text:tab/>String </text:span><text:span text:style-name="T83">error</text:span><text:span text:style-name="T57">, </text:span></text:p>
            <text:p text:style-name="P114"><text:span text:style-name="T57"><text:tab/><text:tab/><text:tab/>Exception </text:span><text:span text:style-name="T83">e</text:span><text:span text:style-name="T57">,</text:span></text:p>
            <text:p text:style-name="P114"><text:span text:style-name="T57"><text:tab/><text:tab/><text:tab/></text:span><text:span text:style-name="T49">long</text:span><text:span text:style-name="T57"> </text:span><text:span text:style-name="T83">timeMs</text:span><text:span text:style-name="T57">) {</text:span></text:p>
            <text:p text:style-name="P114"><text:span text:style-name="T57"><text:tab/><text:tab/>StringBuilder </text:span><text:span text:style-name="T83">str</text:span><text:span text:style-name="T57"> = </text:span><text:span text:style-name="T49">new</text:span><text:span text:style-name="T57"> StringBuilder()</text:span></text:p>
            <text:p text:style-name="P114"><text:span text:style-name="T57"><text:tab/><text:tab/><text:tab/><text:tab/>.append(</text:span><text:span text:style-name="T34">"S'ha invocat el mètode \""</text:span><text:span text:style-name="T57">)</text:span></text:p>
            <text:p text:style-name="P114"><text:span text:style-name="T57"><text:tab/><text:tab/><text:tab/><text:tab/>.append(</text:span><text:span text:style-name="T83">metode</text:span><text:span text:style-name="T57">)</text:span></text:p>
            <text:p text:style-name="P114"><text:span text:style-name="T57"><text:tab/><text:tab/><text:tab/><text:tab/>.append(</text:span><text:span text:style-name="T34">"\" amb els paràmetres {"</text:span><text:span text:style-name="T57">);</text:span></text:p>
            <text:p text:style-name="P114"><text:span text:style-name="T57"><text:tab/><text:tab/></text:span><text:span text:style-name="T49">int</text:span><text:span text:style-name="T57"> </text:span><text:span text:style-name="T83">i</text:span><text:span text:style-name="T57"> = 0;</text:span></text:p>
            <text:p text:style-name="P114"><text:span text:style-name="T57"><text:tab/><text:tab/></text:span><text:span text:style-name="T49">for</text:span><text:span text:style-name="T57"> (String </text:span><text:span text:style-name="T83">key</text:span><text:span text:style-name="T57"> : </text:span><text:span text:style-name="T83">parametres</text:span><text:span text:style-name="T57">.keySet()) {</text:span></text:p>
            <text:p text:style-name="P114"><text:span text:style-name="T57"><text:tab/><text:tab/><text:tab/></text:span><text:span text:style-name="T83">str</text:span><text:span text:style-name="T57">.append(</text:span><text:span text:style-name="T83">key</text:span><text:span text:style-name="T57">).append(</text:span><text:span text:style-name="T34">"="</text:span><text:span text:style-name="T57">).append(</text:span><text:span text:style-name="T83">parametres</text:span><text:span text:style-name="T57">.get(</text:span><text:span text:style-name="T83">key</text:span><text:span text:style-name="T57">));</text:span></text:p>
            <text:p text:style-name="P114"><text:span text:style-name="T57"><text:tab/><text:tab/><text:tab/></text:span><text:span text:style-name="T83">i</text:span><text:span text:style-name="T57">++;</text:span></text:p>
            <text:p text:style-name="P114"><text:span text:style-name="T57"><text:tab/><text:tab/><text:tab/></text:span><text:span text:style-name="T49">if</text:span><text:span text:style-name="T57"> (</text:span><text:span text:style-name="T83">i</text:span><text:span text:style-name="T57">&lt;</text:span><text:span text:style-name="T83">parametres</text:span><text:span text:style-name="T57">.size())</text:span></text:p>
            <text:p text:style-name="P114"><text:span text:style-name="T57"><text:tab/><text:tab/><text:tab/><text:tab/></text:span><text:span text:style-name="T83">str</text:span><text:span text:style-name="T57">.append(</text:span><text:span text:style-name="T34">", "</text:span><text:span text:style-name="T57">);</text:span></text:p>
            <text:p text:style-name="P89"><text:tab/><text:tab/>}</text:p>
            <text:p text:style-name="P114"><text:span text:style-name="T57"><text:tab/><text:tab/></text:span><text:span text:style-name="T83">str</text:span><text:span text:style-name="T57">.append(</text:span><text:span text:style-name="T34">"} amb resultat "</text:span><text:span text:style-name="T57">).append(</text:span><text:span text:style-name="T83">correcte</text:span><text:span text:style-name="T57"> ? </text:span><text:span text:style-name="T34">"OK"</text:span><text:span text:style-name="T57"> : </text:span><text:span text:style-name="T34">"KO"</text:span><text:span text:style-name="T57">);</text:span></text:p>
            <text:p text:style-name="P114"><text:span text:style-name="T57"><text:tab/><text:tab/></text:span><text:span text:style-name="T49">if</text:span><text:span text:style-name="T57"> (</text:span><text:span text:style-name="T83">error</text:span><text:span text:style-name="T57"> != </text:span><text:span text:style-name="T49">null</text:span><text:span text:style-name="T57">)</text:span></text:p>
            <text:p text:style-name="P114"><text:span text:style-name="T57"><text:tab/><text:tab/><text:tab/></text:span><text:span text:style-name="T83">str</text:span><text:span text:style-name="T57">.append(</text:span><text:span text:style-name="T34">": "</text:span><text:span text:style-name="T57">).append(</text:span><text:span text:style-name="T83">error</text:span><text:span text:style-name="T57">);</text:span></text:p>
            <text:p text:style-name="P114"><text:span text:style-name="T57"><text:tab/><text:tab/></text:span><text:span text:style-name="T49">if</text:span><text:span text:style-name="T57"> (</text:span><text:span text:style-name="T83">e</text:span><text:span text:style-name="T57"> != </text:span><text:span text:style-name="T49">null</text:span><text:span text:style-name="T57">)</text:span></text:p>
            <text:p text:style-name="P114"><text:span text:style-name="T57"><text:tab/><text:tab/><text:tab/></text:span><text:span text:style-name="T83">str</text:span><text:span text:style-name="T57">.append(</text:span><text:span text:style-name="T34">" "</text:span><text:span text:style-name="T57">).append(</text:span><text:span text:style-name="T83">e</text:span><text:span text:style-name="T57">.getClass()).append(</text:span><text:span text:style-name="T34">" "</text:span><text:span text:style-name="T57">).append(</text:span><text:span text:style-name="T83">e</text:span><text:span text:style-name="T57">.getMessage());</text:span></text:p>
            <text:p text:style-name="P114"><text:span text:style-name="T57"><text:tab/><text:tab/></text:span><text:span text:style-name="T83">str</text:span><text:span text:style-name="T57">.append(</text:span><text:span text:style-name="T34">" "</text:span><text:span text:style-name="T57">).append(</text:span><text:span text:style-name="T83">timeMs</text:span><text:span text:style-name="T57">).append(</text:span><text:span text:style-name="T34">"ms"</text:span><text:span text:style-name="T57">);</text:span></text:p>
            <text:p text:style-name="P89"><text:tab/><text:tab/></text:p>
            <text:p text:style-name="P114"><text:span text:style-name="T57"><text:tab/><text:tab/></text:span><text:span text:style-name="T78">logger</text:span><text:span text:style-name="T57">.debug(</text:span><text:span text:style-name="T83">str</text:span><text:span text:style-name="T57">.toString());</text:span></text:p>
            <text:p text:style-name="P89"><text:tab/>}</text:p>
            <text:p text:style-name="P88">}</text:p>
          </table:table-cell>
        </table:table-row>
      </table:table>
      <text:p text:style-name="P177"><draw:frame text:anchor-type="paragraph" draw:z-index="58" draw:name="Forma4" draw:style-name="gr2" draw:text-style-name="P457" svg:width="18.058cm" svg:height="5.181cm" svg:x="0.43cm" svg:y="0.766cm"><draw:text-box><text:p/></draw:text-box></draw:frame></text:p>
      <text:p text:style-name="P177"/>
      <text:p text:style-name="P17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10671664">
            <table:table-cell office:value-type="string">
              <text:p text:style-name="MP2"><draw:g text:anchor-type="as-char" draw:z-index="53"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50</text:page-number></text:span><text:span text:style-name="MT1"><text:s/>/ </text:span><text:span text:style-name="MT1"><text:page-count>50</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6-02-16T17:56:32.405999894">16/02/2026</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10H57S</meta:editing-duration>
    <meta:editing-cycles>287</meta:editing-cycles>
    <meta:generator>LibreOffice/7.3.5.2$Windows_X86_64 LibreOffice_project/184fe81b8c8c30d8b5082578aee2fed2ea847c01</meta:generator>
    <dc:date>2026-02-16T17:56:32.283000000</dc:date>
    <dc:creator>Daniel Moreno Linares</dc:creator>
    <meta:document-statistic meta:table-count="35" meta:image-count="15" meta:object-count="0" meta:page-count="50" meta:paragraph-count="1914" meta:word-count="10036" meta:character-count="75750" meta:non-whitespace-character-count="65376"/>
  </office:meta>
</office:document-meta>
</file>