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20000009000006B5000000E7BB9094263DA40C4C.svm" manifest:media-type="image/x-svm"/>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JetBrains Mono" svg:font-family="'JetBrains Mono'"/>
    <style:font-face style:name="JetBrains Mono1" svg:font-family="'JetBrains Mono'" style:font-family-generic="swiss"/>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5"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text-properties style:font-name="Calibri1"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c6bac5"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margin-top="0cm" fo:margin-bottom="0.212cm" style:contextual-spacing="false" fo:text-align="start" style:justify-single-word="false"/>
      <style:text-properties style:font-name="Calibri1" fo:language="ca" fo:country="ES" officeooo:rsid="01c6bac5" officeooo:paragraph-rsid="01c6bac5" style:font-name-complex="Arial Narrow1"/>
    </style:style>
    <style:style style:name="P21"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2" style:family="paragraph" style:parent-style-name="Standard">
      <style:paragraph-properties fo:text-align="end" style:justify-single-word="false"/>
      <style:text-properties officeooo:paragraph-rsid="001dc238"/>
    </style:style>
    <style:style style:name="P23" style:family="paragraph" style:parent-style-name="Standard">
      <style:paragraph-properties fo:margin-top="0.499cm" fo:margin-bottom="0.199cm" style:contextual-spacing="false" fo:text-align="end" style:justify-single-word="false"/>
      <style:text-properties officeooo:paragraph-rsid="01b9c3b2"/>
    </style:style>
    <style:style style:name="P24" style:family="paragraph" style:parent-style-name="Standard">
      <style:text-properties fo:font-size="2pt" officeooo:paragraph-rsid="001dc238" style:font-size-asian="1.75pt" style:font-size-complex="2pt"/>
    </style:style>
    <style:style style:name="P25" style:family="paragraph" style:parent-style-name="Standard">
      <style:text-properties officeooo:paragraph-rsid="001bba47"/>
    </style:style>
    <style:style style:name="P26"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7"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9" style:family="paragraph" style:parent-style-name="Standard">
      <style:text-properties fo:font-weight="bold" officeooo:paragraph-rsid="001d1802" style:font-weight-asian="bold" style:font-weight-complex="bold"/>
    </style:style>
    <style:style style:name="P30" style:family="paragraph" style:parent-style-name="Text_20_body">
      <style:text-properties fo:font-weight="bold" officeooo:rsid="00ea866e" officeooo:paragraph-rsid="00d673d7" style:font-weight-asian="bold" style:font-weight-complex="bold"/>
    </style:style>
    <style:style style:name="P31" style:family="paragraph" style:parent-style-name="Text_20_body">
      <style:text-properties fo:font-weight="bold" officeooo:rsid="00ebb296" officeooo:paragraph-rsid="00d673d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3"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4"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5"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7"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8"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40"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41"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2"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3" style:family="paragraph" style:parent-style-name="Standard">
      <style:paragraph-properties fo:text-align="justify" style:justify-single-word="false"/>
      <style:text-properties officeooo:paragraph-rsid="008ce69e"/>
    </style:style>
    <style:style style:name="P44" style:family="paragraph" style:parent-style-name="Standard">
      <style:paragraph-properties fo:text-align="justify" style:justify-single-word="false"/>
      <style:text-properties officeooo:paragraph-rsid="00d673d7"/>
    </style:style>
    <style:style style:name="P45"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6" style:family="paragraph" style:parent-style-name="Table_20_Contents">
      <style:paragraph-properties fo:text-align="justify" style:justify-single-word="false"/>
      <style:text-properties officeooo:paragraph-rsid="01a9cdd2"/>
    </style:style>
    <style:style style:name="P47" style:family="paragraph" style:parent-style-name="Table_20_Contents">
      <style:paragraph-properties fo:text-align="justify" style:justify-single-word="false"/>
      <style:text-properties officeooo:paragraph-rsid="019cebf9"/>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1a3408a"/>
    </style:style>
    <style:style style:name="P50" style:family="paragraph" style:parent-style-name="Standard">
      <style:paragraph-properties fo:text-align="justify" style:justify-single-word="false"/>
      <style:text-properties officeooo:paragraph-rsid="01bdb140"/>
    </style:style>
    <style:style style:name="P51" style:family="paragraph" style:parent-style-name="Table_20_Contents">
      <style:paragraph-properties fo:text-align="justify" style:justify-single-word="false"/>
      <style:text-properties officeooo:paragraph-rsid="01b79999"/>
    </style:style>
    <style:style style:name="P52" style:family="paragraph" style:parent-style-name="Text_20_body">
      <style:paragraph-properties fo:text-align="justify" style:justify-single-word="false"/>
      <style:text-properties officeooo:paragraph-rsid="01c100af"/>
    </style:style>
    <style:style style:name="P53" style:family="paragraph" style:parent-style-name="Standard">
      <style:paragraph-properties fo:margin-top="0cm" fo:margin-bottom="0.212cm" style:contextual-spacing="false" fo:text-align="start" style:justify-single-word="false"/>
      <style:text-properties officeooo:paragraph-rsid="001d1802"/>
    </style:style>
    <style:style style:name="P54" style:family="paragraph" style:parent-style-name="Standard">
      <style:paragraph-properties fo:margin-top="0cm" fo:margin-bottom="0.212cm" style:contextual-spacing="false" fo:text-align="start" style:justify-single-word="false"/>
      <style:text-properties officeooo:paragraph-rsid="00649479"/>
    </style:style>
    <style:style style:name="P55" style:family="paragraph" style:parent-style-name="Standard">
      <style:paragraph-properties fo:margin-top="0cm" fo:margin-bottom="0.212cm" style:contextual-spacing="false" fo:text-align="start" style:justify-single-word="false"/>
      <style:text-properties officeooo:paragraph-rsid="00ec4c44"/>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8" style:family="paragraph" style:parent-style-name="Standard">
      <style:paragraph-properties fo:margin-left="0cm" fo:margin-right="0cm" fo:text-align="start" style:justify-single-word="false" fo:text-indent="0cm" style:auto-text-indent="false"/>
      <style:text-properties officeooo:paragraph-rsid="00d673d7"/>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60" style:family="paragraph" style:parent-style-name="Standard">
      <style:paragraph-properties fo:text-align="start" style:justify-single-word="false" fo:padding="0.049cm" fo:border="0.06pt solid #000000" style:shadow="#000000 0cm 0cm"/>
      <style:text-properties officeooo:paragraph-rsid="0195481e"/>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4"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6" style:family="paragraph" style:parent-style-name="Standard">
      <style:paragraph-properties fo:margin-left="0cm" fo:margin-right="0cm" fo:text-align="start" style:justify-single-word="false" fo:text-indent="0cm" style:auto-text-indent="false"/>
      <style:text-properties officeooo:paragraph-rsid="01bdb140"/>
    </style:style>
    <style:style style:name="P6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c100af"/>
    </style:style>
    <style:style style:name="P68" style:family="paragraph" style:parent-style-name="Standard">
      <style:text-properties fo:font-style="normal" officeooo:rsid="00d63ec8" officeooo:paragraph-rsid="00d673d7" style:font-style-asian="normal" style:font-style-complex="normal"/>
    </style:style>
    <style:style style:name="P69" style:family="paragraph" style:parent-style-name="Standard">
      <style:text-properties fo:font-style="normal" officeooo:rsid="00db5ce5" officeooo:paragraph-rsid="00d673d7" style:font-style-asian="normal" style:font-style-complex="normal"/>
    </style:style>
    <style:style style:name="P70" style:family="paragraph" style:parent-style-name="Standard">
      <style:text-properties fo:font-style="normal" officeooo:rsid="00db5ce5" officeooo:paragraph-rsid="00e8f23e" style:font-style-asian="normal" style:font-style-complex="normal"/>
    </style:style>
    <style:style style:name="P71" style:family="paragraph" style:parent-style-name="Standard">
      <style:text-properties fo:font-style="normal" officeooo:rsid="00e8f23e" officeooo:paragraph-rsid="00e8f23e" style:font-style-asian="normal" style:font-style-complex="normal"/>
    </style:style>
    <style:style style:name="P72" style:family="paragraph" style:parent-style-name="Text_20_body">
      <style:text-properties fo:font-style="normal" officeooo:rsid="00d81a0e" officeooo:paragraph-rsid="00d673d7" style:font-style-asian="normal" style:font-style-complex="normal"/>
    </style:style>
    <style:style style:name="P73" style:family="paragraph" style:parent-style-name="Text_20_body">
      <style:text-properties fo:font-style="normal" officeooo:rsid="00d81a0e" officeooo:paragraph-rsid="01bdb140" style:font-style-asian="normal" style:font-style-complex="normal"/>
    </style:style>
    <style:style style:name="P74" style:family="paragraph" style:parent-style-name="Text_20_body">
      <style:text-properties fo:font-style="normal" officeooo:rsid="00d901df" officeooo:paragraph-rsid="00d673d7" style:font-style-asian="normal" style:font-style-complex="normal"/>
    </style:style>
    <style:style style:name="P75" style:family="paragraph" style:parent-style-name="Text_20_body">
      <style:text-properties fo:font-style="normal" officeooo:rsid="00de9e71" officeooo:paragraph-rsid="00d673d7" style:font-style-asian="normal" style:font-style-complex="normal"/>
    </style:style>
    <style:style style:name="P76" style:family="paragraph" style:parent-style-name="Text_20_body">
      <style:text-properties fo:font-style="normal" officeooo:rsid="00e1e7f8" officeooo:paragraph-rsid="00d673d7" style:font-style-asian="normal" style:font-style-complex="normal"/>
    </style:style>
    <style:style style:name="P77" style:family="paragraph" style:parent-style-name="Text_20_body">
      <style:text-properties fo:font-style="normal" officeooo:rsid="00e1e7f8" officeooo:paragraph-rsid="00e16f63" style:font-style-asian="normal" style:font-style-complex="normal"/>
    </style:style>
    <style:style style:name="P78" style:family="paragraph" style:parent-style-name="Text_20_body">
      <style:text-properties fo:font-style="normal" officeooo:rsid="00ea10cf" officeooo:paragraph-rsid="00e5f97a" style:font-style-asian="normal" style:font-style-complex="normal"/>
    </style:style>
    <style:style style:name="P79" style:family="paragraph" style:parent-style-name="Standard">
      <style:text-properties fo:font-style="normal" officeooo:rsid="00d63ec8" officeooo:paragraph-rsid="00d673d7" fo:background-color="transparent" style:font-style-asian="normal" style:font-style-complex="normal"/>
    </style:style>
    <style:style style:name="P80" style:family="paragraph" style:parent-style-name="Standard">
      <style:text-properties fo:font-style="normal" officeooo:rsid="00e440cb" officeooo:paragraph-rsid="00dda4cb" fo:background-color="transparent" style:font-style-asian="normal" style:font-style-complex="normal"/>
    </style:style>
    <style:style style:name="P81" style:family="paragraph" style:parent-style-name="Text_20_body">
      <style:text-properties fo:font-style="normal" officeooo:rsid="00dfc741" officeooo:paragraph-rsid="00e8f23e" fo:background-color="transparent" style:font-style-asian="normal" style:font-style-complex="normal"/>
    </style:style>
    <style:style style:name="P82"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3"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4"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6" style:family="paragraph" style:parent-style-name="Standard">
      <style:text-properties officeooo:rsid="00db5ce5" officeooo:paragraph-rsid="00e8f23e"/>
    </style:style>
    <style:style style:name="P87"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9"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90"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91"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92"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93"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4"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8"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1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101"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102"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3"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4"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5"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6"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7" style:family="paragraph" style:parent-style-name="Standard">
      <style:paragraph-properties style:line-height-at-least="0.476cm"/>
      <style:text-properties fo:color="#000000" loext:opacity="100%" officeooo:paragraph-rsid="019cebf9" fo:background-color="#fffffe"/>
    </style:style>
    <style:style style:name="P108" style:family="paragraph" style:parent-style-name="Standard">
      <style:paragraph-properties style:line-height-at-least="0.476cm"/>
      <style:text-properties fo:color="#000000" loext:opacity="100%" officeooo:paragraph-rsid="01b8b77e" fo:background-color="#fffffe"/>
    </style:style>
    <style:style style:name="P109" style:family="paragraph" style:parent-style-name="Standard">
      <style:paragraph-properties style:line-height-at-least="0.476cm"/>
      <style:text-properties fo:color="#000000" loext:opacity="100%" officeooo:paragraph-rsid="019cebf9" fo:background-color="#dddddd"/>
    </style:style>
    <style:style style:name="P110" style:family="paragraph" style:parent-style-name="Standard">
      <style:paragraph-properties style:line-height-at-least="0.476cm"/>
      <style:text-properties fo:color="#000000" loext:opacity="100%" officeooo:paragraph-rsid="01b5544c" fo:background-color="#dddddd"/>
    </style:style>
    <style:style style:name="P111" style:family="paragraph" style:parent-style-name="Standard">
      <style:paragraph-properties style:line-height-at-least="0.476cm"/>
      <style:text-properties fo:color="#000000" loext:opacity="100%" officeooo:paragraph-rsid="01b71c80" fo:background-color="#dddddd"/>
    </style:style>
    <style:style style:name="P112"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3"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c100af" style:font-size-asian="10pt"/>
    </style:style>
    <style:style style:name="P115"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6"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7"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c100af" style:font-size-asian="10pt"/>
    </style:style>
    <style:style style:name="P118" style:family="paragraph" style:parent-style-name="Standard">
      <style:paragraph-properties fo:text-align="justify"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1" style:family="paragraph" style:parent-style-name="Standard">
      <style:text-properties officeooo:paragraph-rsid="00d673d7"/>
    </style:style>
    <style:style style:name="P132" style:family="paragraph" style:parent-style-name="Text_20_body">
      <style:text-properties officeooo:paragraph-rsid="00d673d7"/>
    </style:style>
    <style:style style:name="P133" style:family="paragraph" style:parent-style-name="Standard">
      <style:text-properties officeooo:rsid="00d4e88a" officeooo:paragraph-rsid="00d8ffe0"/>
    </style:style>
    <style:style style:name="P134" style:family="paragraph" style:parent-style-name="Standard">
      <style:text-properties officeooo:paragraph-rsid="00e8f23e"/>
    </style:style>
    <style:style style:name="P135" style:family="paragraph" style:parent-style-name="Text_20_body">
      <style:text-properties officeooo:paragraph-rsid="00e8f23e"/>
    </style:style>
    <style:style style:name="P136" style:family="paragraph" style:parent-style-name="Fig.">
      <style:text-properties officeooo:paragraph-rsid="00e8f23e"/>
    </style:style>
    <style:style style:name="P137" style:family="paragraph" style:parent-style-name="Standard">
      <style:paragraph-properties fo:text-align="justify" style:justify-single-word="false"/>
      <style:text-properties officeooo:rsid="00931a7c" officeooo:paragraph-rsid="019c96f9"/>
    </style:style>
    <style:style style:name="P138" style:family="paragraph" style:parent-style-name="Text_20_body">
      <style:paragraph-properties fo:text-align="justify" style:justify-single-word="false"/>
      <style:text-properties officeooo:rsid="00931a7c" officeooo:paragraph-rsid="018c7b7a"/>
    </style:style>
    <style:style style:name="P139"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0"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2"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4"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7" style:family="paragraph" style:parent-style-name="Text_20_body">
      <style:paragraph-properties fo:text-align="justify" style:justify-single-word="false"/>
      <style:text-properties officeooo:rsid="0052b05f" officeooo:paragraph-rsid="0074fa21"/>
    </style:style>
    <style:style style:name="P148" style:family="paragraph" style:parent-style-name="Text_20_body">
      <style:paragraph-properties fo:text-align="justify" style:justify-single-word="false"/>
      <style:text-properties officeooo:rsid="00771bf9" officeooo:paragraph-rsid="00771bf9"/>
    </style:style>
    <style:style style:name="P149" style:family="paragraph" style:parent-style-name="Text_20_body">
      <style:paragraph-properties fo:text-align="center" style:justify-single-word="false"/>
      <style:text-properties officeooo:rsid="00771bf9" officeooo:paragraph-rsid="00771bf9"/>
    </style:style>
    <style:style style:name="P150" style:family="paragraph" style:parent-style-name="Text_20_body">
      <style:text-properties officeooo:rsid="008ce69e" officeooo:paragraph-rsid="008ce69e"/>
    </style:style>
    <style:style style:name="P151" style:family="paragraph" style:parent-style-name="Text_20_body">
      <style:paragraph-properties fo:text-align="justify" style:justify-single-word="false"/>
      <style:text-properties officeooo:rsid="008ce69e" officeooo:paragraph-rsid="008ce69e"/>
    </style:style>
    <style:style style:name="P152" style:family="paragraph" style:parent-style-name="Text_20_body">
      <style:paragraph-properties fo:text-align="justify" style:justify-single-word="false"/>
      <style:text-properties officeooo:rsid="008ce69e" officeooo:paragraph-rsid="00771bf9"/>
    </style:style>
    <style:style style:name="P153" style:family="paragraph" style:parent-style-name="Text_20_body">
      <style:paragraph-properties fo:text-align="justify" style:justify-single-word="false"/>
      <style:text-properties officeooo:rsid="008ce69e" officeooo:paragraph-rsid="018c7b7a"/>
    </style:style>
    <style:style style:name="P154" style:family="paragraph" style:parent-style-name="Text_20_body">
      <style:paragraph-properties fo:text-align="justify" style:justify-single-word="false"/>
      <style:text-properties officeooo:rsid="008ce69e" officeooo:paragraph-rsid="01a9cdd2"/>
    </style:style>
    <style:style style:name="P155" style:family="paragraph" style:parent-style-name="Text_20_body">
      <style:text-properties officeooo:rsid="00a9a467" officeooo:paragraph-rsid="00a9a467"/>
    </style:style>
    <style:style style:name="P156" style:family="paragraph" style:parent-style-name="Text_20_body">
      <style:text-properties officeooo:rsid="00a9a467" officeooo:paragraph-rsid="019b515e"/>
    </style:style>
    <style:style style:name="P157" style:family="paragraph" style:parent-style-name="Text_20_body">
      <style:text-properties officeooo:rsid="00a9a467" officeooo:paragraph-rsid="019b5d65"/>
    </style:style>
    <style:style style:name="P158" style:family="paragraph" style:parent-style-name="Text_20_body">
      <style:text-properties officeooo:rsid="00aeb4b4" officeooo:paragraph-rsid="0195481e"/>
    </style:style>
    <style:style style:name="P159" style:family="paragraph" style:parent-style-name="Text_20_body">
      <style:paragraph-properties fo:text-align="center" style:justify-single-word="false"/>
      <style:text-properties officeooo:rsid="007af11d" officeooo:paragraph-rsid="01949037"/>
    </style:style>
    <style:style style:name="P160" style:family="paragraph" style:parent-style-name="Text_20_body">
      <style:paragraph-properties fo:text-align="center" style:justify-single-word="false"/>
      <style:text-properties officeooo:rsid="007af11d" officeooo:paragraph-rsid="019c96f9"/>
    </style:style>
    <style:style style:name="P161"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2" style:family="paragraph" style:parent-style-name="Text_20_body">
      <style:text-properties officeooo:rsid="00de9e71" officeooo:paragraph-rsid="00d673d7"/>
    </style:style>
    <style:style style:name="P163" style:family="paragraph" style:parent-style-name="Text_20_body">
      <style:text-properties officeooo:rsid="00e2fa38" officeooo:paragraph-rsid="00d673d7"/>
    </style:style>
    <style:style style:name="P164" style:family="paragraph" style:parent-style-name="Text_20_body">
      <style:text-properties officeooo:rsid="00e440cb" officeooo:paragraph-rsid="00d673d7"/>
    </style:style>
    <style:style style:name="P165" style:family="paragraph" style:parent-style-name="Text_20_body">
      <style:text-properties officeooo:rsid="00e59aa6" officeooo:paragraph-rsid="00d673d7"/>
    </style:style>
    <style:style style:name="P166" style:family="paragraph" style:parent-style-name="Text_20_body">
      <style:text-properties officeooo:rsid="00ea10cf" officeooo:paragraph-rsid="00d673d7"/>
    </style:style>
    <style:style style:name="P167" style:family="paragraph" style:parent-style-name="Text_20_body">
      <style:text-properties officeooo:rsid="00ea10cf" officeooo:paragraph-rsid="00e54ccf"/>
    </style:style>
    <style:style style:name="P168" style:family="paragraph" style:parent-style-name="Text_20_body">
      <style:text-properties officeooo:rsid="00ea866e" officeooo:paragraph-rsid="00d673d7"/>
    </style:style>
    <style:style style:name="P169" style:family="paragraph" style:parent-style-name="Text_20_body">
      <style:text-properties officeooo:rsid="00ebb296" officeooo:paragraph-rsid="00d673d7"/>
    </style:style>
    <style:style style:name="P170" style:family="paragraph" style:parent-style-name="Text_20_body">
      <style:text-properties officeooo:rsid="00ecdaee" officeooo:paragraph-rsid="00d673d7"/>
    </style:style>
    <style:style style:name="P171" style:family="paragraph" style:parent-style-name="Text_20_body">
      <style:text-properties officeooo:rsid="00d8ffe0" officeooo:paragraph-rsid="00d8ffe0"/>
    </style:style>
    <style:style style:name="P172" style:family="paragraph" style:parent-style-name="Text_20_body">
      <style:text-properties officeooo:paragraph-rsid="00e16f63"/>
    </style:style>
    <style:style style:name="P173" style:family="paragraph" style:parent-style-name="Text_20_body">
      <style:text-properties officeooo:rsid="00e54ccf" officeooo:paragraph-rsid="00e54ccf"/>
    </style:style>
    <style:style style:name="P174" style:family="paragraph" style:parent-style-name="Text_20_body">
      <style:text-properties officeooo:paragraph-rsid="00e54ccf"/>
    </style:style>
    <style:style style:name="P175" style:family="paragraph" style:parent-style-name="Text_20_body">
      <style:text-properties officeooo:rsid="00e5f97a" officeooo:paragraph-rsid="00e5f97a"/>
    </style:style>
    <style:style style:name="P176" style:family="paragraph" style:parent-style-name="Text_20_body">
      <style:text-properties officeooo:paragraph-rsid="00e5f97a"/>
    </style:style>
    <style:style style:name="P177" style:family="paragraph" style:parent-style-name="Text_20_body">
      <style:text-properties officeooo:rsid="00e54ccf" officeooo:paragraph-rsid="00e54ccf" fo:background-color="transparent"/>
    </style:style>
    <style:style style:name="P178" style:family="paragraph" style:parent-style-name="Text_20_body">
      <style:text-properties officeooo:paragraph-rsid="00dda4cb"/>
    </style:style>
    <style:style style:name="P179"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9" style:family="paragraph" style:parent-style-name="Fig.">
      <style:text-properties officeooo:rsid="00ccb8e2" officeooo:paragraph-rsid="00e8f23e"/>
    </style:style>
    <style:style style:name="P190"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1"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2"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3" style:family="paragraph" style:parent-style-name="Table_20_Contents">
      <style:paragraph-properties fo:text-align="justify" style:justify-single-word="false"/>
      <style:text-properties officeooo:rsid="014c5388" officeooo:paragraph-rsid="01a1cb29"/>
    </style:style>
    <style:style style:name="P194" style:family="paragraph" style:parent-style-name="Table_20_Contents">
      <style:paragraph-properties fo:text-align="justify" style:justify-single-word="false"/>
      <style:text-properties officeooo:rsid="014c5388" officeooo:paragraph-rsid="01a9cdd2"/>
    </style:style>
    <style:style style:name="P195" style:family="paragraph" style:parent-style-name="Standard">
      <style:text-properties officeooo:rsid="014c5388" officeooo:paragraph-rsid="01a9cdd2"/>
    </style:style>
    <style:style style:name="P196" style:family="paragraph" style:parent-style-name="Text_20_body">
      <style:text-properties officeooo:rsid="014c5388" officeooo:paragraph-rsid="01a9cdd2"/>
    </style:style>
    <style:style style:name="P197" style:family="paragraph" style:parent-style-name="Text_20_body">
      <style:text-properties officeooo:rsid="014c5388" officeooo:paragraph-rsid="019cebf9"/>
    </style:style>
    <style:style style:name="P198" style:family="paragraph" style:parent-style-name="Text_20_body">
      <style:text-properties officeooo:rsid="014c5388" officeooo:paragraph-rsid="01a1cb29"/>
    </style:style>
    <style:style style:name="P199" style:family="paragraph" style:parent-style-name="Text_20_body">
      <style:text-properties officeooo:rsid="014c5388" officeooo:paragraph-rsid="01b79797"/>
    </style:style>
    <style:style style:name="P200" style:family="paragraph" style:parent-style-name="Table_20_Contents">
      <style:paragraph-properties fo:text-align="justify" style:justify-single-word="false"/>
      <style:text-properties style:font-name="Consolas" officeooo:paragraph-rsid="019cebf9"/>
    </style:style>
    <style:style style:name="P201"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2" style:family="paragraph" style:parent-style-name="Table_20_Contents">
      <style:paragraph-properties fo:text-align="justify" style:justify-single-word="false"/>
      <style:text-properties style:font-name="Consolas" officeooo:rsid="015e4779" officeooo:paragraph-rsid="019cebf9"/>
    </style:style>
    <style:style style:name="P203" style:family="paragraph" style:parent-style-name="Table_20_Contents">
      <style:paragraph-properties fo:text-align="justify" style:justify-single-word="false"/>
      <style:text-properties style:font-name="Consolas" officeooo:rsid="01622317" officeooo:paragraph-rsid="019cebf9"/>
    </style:style>
    <style:style style:name="P204"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5"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6" style:family="paragraph" style:parent-style-name="Text_20_body">
      <style:text-properties officeooo:rsid="0149cec3" officeooo:paragraph-rsid="01a9cdd2"/>
    </style:style>
    <style:style style:name="P207" style:family="paragraph" style:parent-style-name="Table_20_Contents">
      <style:paragraph-properties fo:text-align="justify" style:justify-single-word="false"/>
      <style:text-properties officeooo:rsid="015c0e13" officeooo:paragraph-rsid="019cebf9"/>
    </style:style>
    <style:style style:name="P208" style:family="paragraph" style:parent-style-name="Table_20_Contents">
      <style:paragraph-properties fo:text-align="justify" style:justify-single-word="false"/>
      <style:text-properties officeooo:rsid="015fa555" officeooo:paragraph-rsid="019cebf9"/>
    </style:style>
    <style:style style:name="P209" style:family="paragraph" style:parent-style-name="Text_20_body">
      <style:text-properties officeooo:rsid="015fa555" officeooo:paragraph-rsid="019cebf9"/>
    </style:style>
    <style:style style:name="P210" style:family="paragraph" style:parent-style-name="Table_20_Contents">
      <style:paragraph-properties fo:text-align="justify" style:justify-single-word="false"/>
      <style:text-properties officeooo:rsid="0160d5f3" officeooo:paragraph-rsid="019cebf9"/>
    </style:style>
    <style:style style:name="P211" style:family="paragraph" style:parent-style-name="Table_20_Contents">
      <style:paragraph-properties fo:text-align="justify" style:justify-single-word="false"/>
      <style:text-properties officeooo:rsid="0160d5f3" officeooo:paragraph-rsid="01a9cdd2"/>
    </style:style>
    <style:style style:name="P212"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3"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4" style:family="paragraph" style:parent-style-name="Standard">
      <style:text-properties officeooo:rsid="007f55bb" officeooo:paragraph-rsid="01a9cdd2"/>
    </style:style>
    <style:style style:name="P215" style:family="paragraph" style:parent-style-name="Text_20_body">
      <style:text-properties officeooo:rsid="007f55bb" officeooo:paragraph-rsid="01915c4c"/>
    </style:style>
    <style:style style:name="P216" style:family="paragraph" style:parent-style-name="Text_20_body">
      <style:paragraph-properties fo:text-align="center" style:justify-single-word="false"/>
      <style:text-properties officeooo:rsid="007f55bb" officeooo:paragraph-rsid="01915c4c"/>
    </style:style>
    <style:style style:name="P217" style:family="paragraph" style:parent-style-name="Table_20_Contents">
      <style:paragraph-properties fo:text-align="justify" style:justify-single-word="false"/>
      <style:text-properties officeooo:rsid="01546630" officeooo:paragraph-rsid="01a9cdd2"/>
    </style:style>
    <style:style style:name="P218" style:family="paragraph" style:parent-style-name="Text_20_body">
      <style:paragraph-properties fo:text-align="center" style:justify-single-word="false"/>
      <style:text-properties officeooo:rsid="007ddc84" officeooo:paragraph-rsid="01915c4c"/>
    </style:style>
    <style:style style:name="P219" style:family="paragraph" style:parent-style-name="Text_20_body">
      <style:text-properties officeooo:rsid="007ddc84" officeooo:paragraph-rsid="01915c4c"/>
    </style:style>
    <style:style style:name="P220" style:family="paragraph" style:parent-style-name="Text_20_body">
      <style:text-properties officeooo:rsid="007ddc84" officeooo:paragraph-rsid="019c96f9"/>
    </style:style>
    <style:style style:name="P221" style:family="paragraph" style:parent-style-name="Text_20_body">
      <style:text-properties officeooo:rsid="01836b49" officeooo:paragraph-rsid="01915c4c"/>
    </style:style>
    <style:style style:name="P222" style:family="paragraph" style:parent-style-name="Figure">
      <style:text-properties officeooo:paragraph-rsid="018d9a1e"/>
    </style:style>
    <style:style style:name="P223" style:family="paragraph" style:parent-style-name="Figure">
      <style:text-properties officeooo:paragraph-rsid="01a9cdd2"/>
    </style:style>
    <style:style style:name="P224" style:family="paragraph" style:parent-style-name="Text_20_body">
      <style:text-properties officeooo:paragraph-rsid="01a9cdd2"/>
    </style:style>
    <style:style style:name="P225" style:family="paragraph" style:parent-style-name="Text_20_body">
      <style:text-properties officeooo:rsid="01915c4c" officeooo:paragraph-rsid="01915c4c"/>
    </style:style>
    <style:style style:name="P226" style:family="paragraph" style:parent-style-name="Text_20_body">
      <style:paragraph-properties fo:margin-left="0cm" fo:margin-right="0cm" fo:text-indent="0cm" style:auto-text-indent="false"/>
      <style:text-properties officeooo:rsid="01915c4c" officeooo:paragraph-rsid="01949037"/>
    </style:style>
    <style:style style:name="P227" style:family="paragraph" style:parent-style-name="Text_20_body">
      <style:text-properties officeooo:rsid="018c7b7a" officeooo:paragraph-rsid="018c7b7a"/>
    </style:style>
    <style:style style:name="P228" style:family="paragraph" style:parent-style-name="Text_20_body">
      <style:text-properties officeooo:rsid="018c7b7a" officeooo:paragraph-rsid="01a9cdd2"/>
    </style:style>
    <style:style style:name="P229" style:family="paragraph" style:parent-style-name="Table_20_Contents">
      <style:paragraph-properties fo:text-align="justify" style:justify-single-word="false"/>
      <style:text-properties officeooo:rsid="018c7b7a" officeooo:paragraph-rsid="018c7b7a"/>
    </style:style>
    <style:style style:name="P230" style:family="paragraph" style:parent-style-name="Text_20_body">
      <style:paragraph-properties fo:text-align="justify" style:justify-single-word="false"/>
      <style:text-properties officeooo:rsid="018c7b7a" officeooo:paragraph-rsid="01a3408a"/>
    </style:style>
    <style:style style:name="P231" style:family="paragraph" style:parent-style-name="Text_20_body">
      <style:paragraph-properties fo:text-align="justify" style:justify-single-word="false"/>
      <style:text-properties officeooo:rsid="018c7b7a" officeooo:paragraph-rsid="01a9cdd2"/>
    </style:style>
    <style:style style:name="P232" style:family="paragraph" style:parent-style-name="Text_20_body">
      <style:paragraph-properties fo:text-align="justify" style:justify-single-word="false"/>
      <style:text-properties officeooo:rsid="018c7b7a" officeooo:paragraph-rsid="01aba0a4"/>
    </style:style>
    <style:style style:name="P233" style:family="paragraph" style:parent-style-name="Text_20_body">
      <style:paragraph-properties fo:text-align="justify" style:justify-single-word="false"/>
      <style:text-properties officeooo:rsid="018c7b7a" officeooo:paragraph-rsid="01b79999"/>
    </style:style>
    <style:style style:name="P234" style:family="paragraph" style:parent-style-name="Text_20_body">
      <style:paragraph-properties fo:text-align="justify" style:justify-single-word="false"/>
      <style:text-properties officeooo:rsid="018c7b7a" officeooo:paragraph-rsid="01c100af"/>
    </style:style>
    <style:style style:name="P235" style:family="paragraph" style:parent-style-name="Text_20_body">
      <style:paragraph-properties fo:text-align="center" style:justify-single-word="false"/>
      <style:text-properties officeooo:rsid="018c7b7a" officeooo:paragraph-rsid="018c7b7a"/>
    </style:style>
    <style:style style:name="P236" style:family="paragraph" style:parent-style-name="Text_20_body">
      <style:paragraph-properties fo:text-align="center" style:justify-single-word="false"/>
      <style:text-properties officeooo:rsid="018c7b7a" officeooo:paragraph-rsid="018f92fd"/>
    </style:style>
    <style:style style:name="P237" style:family="paragraph" style:parent-style-name="Text_20_body">
      <style:text-properties officeooo:rsid="018c7b7a" officeooo:paragraph-rsid="018f92fd"/>
    </style:style>
    <style:style style:name="P238"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39"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0"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1"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42"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3" style:family="paragraph" style:parent-style-name="Standard">
      <style:text-properties fo:language="ca" fo:country="ES" officeooo:rsid="003dd471" officeooo:paragraph-rsid="018c7b7a"/>
    </style:style>
    <style:style style:name="P244"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5" style:family="paragraph" style:parent-style-name="Standard">
      <style:text-properties style:font-name="Calibri" fo:language="ca" fo:country="ES" officeooo:paragraph-rsid="018c7b7a"/>
    </style:style>
    <style:style style:name="P246" style:family="paragraph" style:parent-style-name="Standard">
      <style:paragraph-properties fo:padding="0.049cm" fo:border="0.06pt solid #000000" style:shadow="#000000 0cm 0cm"/>
      <style:text-properties officeooo:paragraph-rsid="0195481e"/>
    </style:style>
    <style:style style:name="P247" style:family="paragraph" style:parent-style-name="Text_20_body">
      <style:text-properties officeooo:rsid="0195481e" officeooo:paragraph-rsid="0195481e"/>
    </style:style>
    <style:style style:name="P248"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49"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0"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1"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2"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3"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4"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8"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1"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0"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2"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5"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7"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19"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0"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5"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8"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3"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6"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7"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8"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3"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4"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5"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6"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49"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0"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1"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4"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62"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6" style:family="paragraph" style:parent-style-name="Table_20_Contents">
      <style:paragraph-properties fo:text-align="justify" style:justify-single-word="false"/>
      <style:text-properties officeooo:rsid="01a00707" officeooo:paragraph-rsid="01a00707"/>
    </style:style>
    <style:style style:name="P367" style:family="paragraph" style:parent-style-name="Table_20_Contents">
      <style:paragraph-properties fo:text-align="justify" style:justify-single-word="false"/>
      <style:text-properties officeooo:rsid="01a00707" officeooo:paragraph-rsid="01a9cdd2"/>
    </style:style>
    <style:style style:name="P368"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69"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1"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72"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73" style:family="paragraph" style:parent-style-name="Text_20_body">
      <style:paragraph-properties fo:text-align="justify" style:justify-single-word="false"/>
      <style:text-properties officeooo:rsid="009dea99" officeooo:paragraph-rsid="018c7b7a"/>
    </style:style>
    <style:style style:name="P374" style:family="paragraph" style:parent-style-name="Text_20_body">
      <style:paragraph-properties fo:text-align="justify" style:justify-single-word="false"/>
      <style:text-properties officeooo:rsid="007e0567" officeooo:paragraph-rsid="018c7b7a"/>
    </style:style>
    <style:style style:name="P375" style:family="paragraph" style:parent-style-name="Text_20_body">
      <style:paragraph-properties fo:text-align="justify" style:justify-single-word="false"/>
      <style:text-properties officeooo:rsid="009edb4e" officeooo:paragraph-rsid="018c7b7a"/>
    </style:style>
    <style:style style:name="P376" style:family="paragraph" style:parent-style-name="Text_20_body">
      <style:text-properties officeooo:rsid="00675fb3" officeooo:paragraph-rsid="00a8be7c"/>
    </style:style>
    <style:style style:name="P377" style:family="paragraph" style:parent-style-name="Text_20_body">
      <style:paragraph-properties fo:margin-left="0cm" fo:margin-right="0cm" fo:text-indent="0cm" style:auto-text-indent="false"/>
      <style:text-properties officeooo:rsid="01949037" officeooo:paragraph-rsid="01949037"/>
    </style:style>
    <style:style style:name="P378" style:family="paragraph" style:parent-style-name="Text_20_body">
      <style:text-properties officeooo:rsid="017c0014" officeooo:paragraph-rsid="019b515e"/>
    </style:style>
    <style:style style:name="P379" style:family="paragraph" style:parent-style-name="Fig.">
      <style:paragraph-properties fo:text-align="center" style:justify-single-word="false"/>
      <style:text-properties officeooo:rsid="017e73c9" officeooo:paragraph-rsid="01794cf9"/>
    </style:style>
    <style:style style:name="P38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8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8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4"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86" style:family="paragraph" style:parent-style-name="Text_20_body">
      <style:paragraph-properties fo:text-align="justify" style:justify-single-word="false"/>
      <style:text-properties officeooo:rsid="002cbdf3" officeooo:paragraph-rsid="01b79999"/>
    </style:style>
    <style:style style:name="P387" style:family="paragraph" style:parent-style-name="Text_20_body">
      <style:text-properties officeooo:rsid="00d81a0e" officeooo:paragraph-rsid="01bdb140"/>
    </style:style>
    <style:style style:name="P388" style:family="paragraph" style:parent-style-name="Contents_20_1">
      <style:paragraph-properties>
        <style:tab-stops>
          <style:tab-stop style:position="17cm" style:type="right" style:leader-style="dotted" style:leader-text="."/>
        </style:tab-stops>
      </style:paragraph-properties>
    </style:style>
    <style:style style:name="P389" style:family="paragraph" style:parent-style-name="Contents_20_2">
      <style:paragraph-properties>
        <style:tab-stops>
          <style:tab-stop style:position="17cm" style:type="right" style:leader-style="dotted" style:leader-text="."/>
        </style:tab-stops>
      </style:paragraph-properties>
    </style:style>
    <style:style style:name="P390" style:family="paragraph" style:parent-style-name="Contents_20_3">
      <style:paragraph-properties>
        <style:tab-stops>
          <style:tab-stop style:position="17cm" style:type="right" style:leader-style="dotted" style:leader-text="."/>
        </style:tab-stops>
      </style:paragraph-properties>
    </style:style>
    <style:style style:name="P391" style:family="paragraph" style:parent-style-name="Standard">
      <style:paragraph-properties fo:margin-top="0cm" fo:margin-bottom="0.212cm" style:contextual-spacing="false" fo:text-align="start" style:justify-single-word="false"/>
      <style:text-properties officeooo:rsid="01c6bac5" officeooo:paragraph-rsid="01c6bac5"/>
    </style:style>
    <style:style style:name="P392" style:family="paragraph" style:parent-style-name="Standard">
      <style:text-properties officeooo:paragraph-rsid="01c8f747"/>
    </style:style>
    <style:style style:name="P393" style:family="paragraph" style:parent-style-name="Standard">
      <style:text-properties officeooo:paragraph-rsid="01c9808c"/>
    </style:style>
    <style:style style:name="P394" style:family="paragraph" style:parent-style-name="Fig." style:list-style-name="L15">
      <style:text-properties officeooo:rsid="00ccb8e2" officeooo:paragraph-rsid="00e8f23e"/>
    </style:style>
    <style:style style:name="P395" style:family="paragraph" style:parent-style-name="Fig." style:list-style-name="L15">
      <style:text-properties fo:font-style="normal" officeooo:rsid="00ccb8e2" officeooo:paragraph-rsid="00e8f23e" style:font-style-asian="normal" style:font-style-complex="normal"/>
    </style:style>
    <style:style style:name="P396" style:family="paragraph" style:parent-style-name="Heading_20_1" style:master-page-name="Cos">
      <style:paragraph-properties fo:margin-left="0cm" fo:margin-right="0cm" fo:text-align="center" style:justify-single-word="false" fo:text-indent="0cm" style:auto-text-indent="false" style:page-number="auto"/>
    </style:style>
    <style:style style:name="P397" style:family="paragraph" style:parent-style-name="Heading_20_1">
      <style:paragraph-properties fo:margin-left="0cm" fo:margin-right="0cm" fo:text-indent="0cm" style:auto-text-indent="false" fo:break-before="page"/>
      <style:text-properties officeooo:rsid="0065d6d8" officeooo:paragraph-rsid="0065d6d8"/>
    </style:style>
    <style:style style:name="P398" style:family="paragraph" style:parent-style-name="Heading_20_1">
      <style:paragraph-properties fo:margin-left="0cm" fo:margin-right="0cm" fo:text-indent="0cm" style:auto-text-indent="false" fo:break-before="page"/>
      <style:text-properties officeooo:rsid="00a8be7c" officeooo:paragraph-rsid="00a9a467"/>
    </style:style>
    <style:style style:name="P399" style:family="paragraph" style:parent-style-name="Heading_20_1">
      <style:paragraph-properties fo:margin-left="0cm" fo:margin-right="0cm" fo:text-indent="0cm" style:auto-text-indent="false" fo:break-before="page"/>
      <style:text-properties officeooo:rsid="018d9a1e" officeooo:paragraph-rsid="018d9a1e"/>
    </style:style>
    <style:style style:name="P400" style:family="paragraph" style:parent-style-name="Heading_20_1">
      <style:paragraph-properties fo:margin-left="0cm" fo:margin-right="0cm" fo:text-indent="0cm" style:auto-text-indent="false" fo:break-before="page"/>
      <style:text-properties officeooo:rsid="018d9a1e" officeooo:paragraph-rsid="01a3c4fd"/>
    </style:style>
    <style:style style:name="P401"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4" style:family="paragraph" style:parent-style-name="Heading_20_2">
      <style:paragraph-properties fo:margin-left="1.9cm" fo:margin-right="0cm" fo:text-indent="-1.3cm" style:auto-text-indent="false"/>
      <style:text-properties officeooo:rsid="018f92fd" officeooo:paragraph-rsid="018f92fd"/>
    </style:style>
    <style:style style:name="P405" style:family="paragraph" style:parent-style-name="Heading_20_2">
      <style:paragraph-properties fo:margin-left="1.9cm" fo:margin-right="0cm" fo:text-indent="-1.3cm" style:auto-text-indent="false"/>
      <style:text-properties officeooo:rsid="018c7b7a" officeooo:paragraph-rsid="018c7b7a"/>
    </style:style>
    <style:style style:name="P406" style:family="paragraph" style:parent-style-name="Heading_20_2">
      <style:paragraph-properties fo:margin-left="1.9cm" fo:margin-right="0cm" fo:text-indent="-1.3cm" style:auto-text-indent="false"/>
      <style:text-properties officeooo:rsid="018c7b7a" officeooo:paragraph-rsid="019c96f9"/>
    </style:style>
    <style:style style:name="P407" style:family="paragraph" style:parent-style-name="Heading_20_2">
      <style:paragraph-properties fo:margin-left="1.9cm" fo:margin-right="0cm" fo:text-indent="-1.3cm" style:auto-text-indent="false"/>
      <style:text-properties officeooo:rsid="018c7b7a" officeooo:paragraph-rsid="01a3408a"/>
    </style:style>
    <style:style style:name="P408" style:family="paragraph" style:parent-style-name="Heading_20_2">
      <style:paragraph-properties fo:margin-left="1.9cm" fo:margin-right="0cm" fo:text-indent="-1.3cm" style:auto-text-indent="false"/>
      <style:text-properties officeooo:rsid="018c7b7a" officeooo:paragraph-rsid="01a9cdd2"/>
    </style:style>
    <style:style style:name="P409" style:family="paragraph" style:parent-style-name="Heading_20_2">
      <style:paragraph-properties fo:margin-left="1.9cm" fo:margin-right="0cm" fo:text-indent="-1.3cm" style:auto-text-indent="false"/>
      <style:text-properties officeooo:paragraph-rsid="018c7b7a"/>
    </style:style>
    <style:style style:name="P410" style:family="paragraph" style:parent-style-name="Heading_20_2">
      <style:paragraph-properties fo:margin-left="1.9cm" fo:margin-right="0cm" fo:text-indent="-1.3cm" style:auto-text-indent="false"/>
      <style:text-properties officeooo:paragraph-rsid="01915c4c"/>
    </style:style>
    <style:style style:name="P411" style:family="paragraph" style:parent-style-name="Heading_20_2">
      <style:paragraph-properties fo:margin-left="1.9cm" fo:margin-right="0cm" fo:text-indent="-1.3cm" style:auto-text-indent="false"/>
      <style:text-properties officeooo:rsid="019c96f9" officeooo:paragraph-rsid="019c96f9"/>
    </style:style>
    <style:style style:name="P412"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3"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4"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5" style:family="paragraph" style:parent-style-name="Heading_20_2">
      <style:paragraph-properties fo:margin-left="1.9cm" fo:margin-right="0cm" fo:text-indent="-1.3cm" style:auto-text-indent="false"/>
      <style:text-properties officeooo:rsid="00d8ffe0" officeooo:paragraph-rsid="00d8ffe0"/>
    </style:style>
    <style:style style:name="P416" style:family="paragraph" style:parent-style-name="Heading_20_2">
      <style:paragraph-properties fo:margin-left="1.9cm" fo:margin-right="0cm" fo:text-indent="-1.3cm" style:auto-text-indent="false"/>
      <style:text-properties officeooo:rsid="00dbb531" officeooo:paragraph-rsid="00dbb531"/>
    </style:style>
    <style:style style:name="P417" style:family="paragraph" style:parent-style-name="Heading_20_3">
      <style:paragraph-properties fo:margin-left="1.9cm" fo:margin-right="0cm" fo:text-indent="-1.3cm" style:auto-text-indent="false"/>
      <style:text-properties officeooo:rsid="018c7b7a" officeooo:paragraph-rsid="018c7b7a"/>
    </style:style>
    <style:style style:name="P418" style:family="paragraph" style:parent-style-name="Heading_20_3">
      <style:paragraph-properties fo:margin-left="1.9cm" fo:margin-right="0cm" fo:text-indent="-1.3cm" style:auto-text-indent="false"/>
    </style:style>
    <style:style style:name="P419" style:family="paragraph" style:parent-style-name="Heading_20_3">
      <style:paragraph-properties fo:margin-left="1.9cm" fo:margin-right="0cm" fo:text-indent="-1.3cm" style:auto-text-indent="false"/>
      <style:text-properties officeooo:rsid="01a9cdd2" officeooo:paragraph-rsid="01a9cdd2"/>
    </style:style>
    <style:style style:name="P420" style:family="paragraph" style:parent-style-name="Heading_20_3">
      <style:paragraph-properties fo:margin-left="1.9cm" fo:margin-right="0cm" fo:text-indent="-1.3cm" style:auto-text-indent="false"/>
      <style:text-properties fo:font-style="italic" fo:font-weight="bold" officeooo:rsid="01a9cdd2" officeooo:paragraph-rsid="01a9cdd2" style:font-style-asian="italic" style:font-weight-asian="bold" style:font-style-complex="italic" style:font-weight-complex="bold"/>
    </style:style>
    <style:style style:name="P421" style:family="paragraph" style:parent-style-name="Heading_20_3">
      <style:paragraph-properties fo:margin-left="1.9cm" fo:margin-right="0cm" fo:text-indent="-1.3cm" style:auto-text-indent="false"/>
      <style:text-properties officeooo:paragraph-rsid="00d673d7"/>
    </style:style>
    <style:style style:name="P422" style:family="paragraph" style:parent-style-name="Heading_20_3">
      <style:paragraph-properties fo:margin-left="1.9cm" fo:margin-right="0cm" fo:text-indent="-1.3cm" style:auto-text-indent="false"/>
      <style:text-properties officeooo:paragraph-rsid="00dda4cb"/>
    </style:style>
    <style:style style:name="P423" style:family="paragraph" style:parent-style-name="Heading_20_3">
      <style:paragraph-properties fo:margin-left="1.9cm" fo:margin-right="0cm" fo:text-indent="-1.3cm" style:auto-text-indent="false"/>
      <style:text-properties officeooo:rsid="00dda4cb" officeooo:paragraph-rsid="00dda4cb"/>
    </style:style>
    <style:style style:name="P424"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425" style:family="paragraph" style:parent-style-name="Standard" style:list-style-name="L13">
      <style:text-properties officeooo:paragraph-rsid="00e8f23e"/>
    </style:style>
    <style:style style:name="P426" style:family="paragraph" style:parent-style-name="Standard" style:list-style-name="L13">
      <style:text-properties fo:font-style="italic" officeooo:rsid="00e8f23e" officeooo:paragraph-rsid="00e8f23e" style:font-style-asian="italic" style:font-style-complex="italic"/>
    </style:style>
    <style:style style:name="P427" style:family="paragraph" style:parent-style-name="Standard">
      <style:text-properties fo:color="#b3ae60" loext:opacity="100%" style:font-name="JetBrains Mono1" fo:font-size="10pt" fo:font-style="normal" fo:font-weight="normal" officeooo:paragraph-rsid="01c8f747" fo:background-color="transparent" style:font-size-asian="10pt" style:font-style-asian="normal" style:font-weight-asian="normal"/>
    </style:style>
    <style:style style:name="P428"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fo:background-color="transparent" style:font-size-asian="10pt"/>
    </style:style>
    <style:style style:name="P429" style:family="paragraph" style:parent-style-name="Standard">
      <style:text-properties style:text-underline-style="none" officeooo:paragraph-rsid="01d7ca8c" fo:background-color="transparent"/>
    </style:style>
    <style:style style:name="P430" style:family="paragraph" style:parent-style-name="Standard">
      <style:paragraph-properties fo:margin-left="0cm" fo:margin-right="0cm" fo:text-align="start" style:justify-single-word="false" fo:text-indent="0cm" style:auto-text-indent="false"/>
      <style:text-properties style:text-underline-style="none" fo:background-color="transparent"/>
    </style:style>
    <style:style style:name="P431" style:family="paragraph" style:parent-style-name="Table_20_Contents" style:list-style-name="L4">
      <style:paragraph-properties fo:text-align="justify" style:justify-single-word="false"/>
      <style:text-properties officeooo:paragraph-rsid="019cebf9"/>
    </style:style>
    <style:style style:name="P432" style:family="paragraph" style:parent-style-name="Table_20_Contents" style:list-style-name="L8">
      <style:paragraph-properties fo:text-align="justify" style:justify-single-word="false"/>
      <style:text-properties officeooo:paragraph-rsid="01a9cdd2"/>
    </style:style>
    <style:style style:name="P433" style:family="paragraph" style:parent-style-name="Table_20_Contents" style:list-style-name="L11">
      <style:paragraph-properties fo:text-align="justify" style:justify-single-word="false"/>
      <style:text-properties officeooo:paragraph-rsid="01a9cdd2"/>
    </style:style>
    <style:style style:name="P434" style:family="paragraph" style:parent-style-name="Table_20_Contents" style:list-style-name="L5">
      <style:paragraph-properties fo:text-align="justify" style:justify-single-word="false"/>
      <style:text-properties officeooo:rsid="015fa555" officeooo:paragraph-rsid="019cebf9"/>
    </style:style>
    <style:style style:name="P435" style:family="paragraph" style:parent-style-name="Table_20_Contents" style:list-style-name="L6">
      <style:paragraph-properties fo:text-align="justify" style:justify-single-word="false"/>
      <style:text-properties officeooo:rsid="015fa555" officeooo:paragraph-rsid="019cebf9"/>
    </style:style>
    <style:style style:name="P436" style:family="paragraph" style:parent-style-name="Table_20_Contents" style:list-style-name="L5">
      <style:paragraph-properties fo:text-align="justify" style:justify-single-word="false"/>
      <style:text-properties officeooo:rsid="014f9ade" officeooo:paragraph-rsid="019cebf9"/>
    </style:style>
    <style:style style:name="P437" style:family="paragraph" style:parent-style-name="Table_20_Contents" style:list-style-name="L9">
      <style:paragraph-properties fo:text-align="justify" style:justify-single-word="false"/>
      <style:text-properties officeooo:rsid="014f9ade" officeooo:paragraph-rsid="01a9cdd2"/>
    </style:style>
    <style:style style:name="P438" style:family="paragraph" style:parent-style-name="Table_20_Contents" style:list-style-name="L10">
      <style:paragraph-properties fo:text-align="justify" style:justify-single-word="false"/>
      <style:text-properties officeooo:rsid="014f9ade" officeooo:paragraph-rsid="01a9cdd2"/>
    </style:style>
    <style:style style:name="P439" style:family="paragraph" style:parent-style-name="Table_20_Contents" style:list-style-name="L5">
      <style:paragraph-properties fo:text-align="justify" style:justify-single-word="false"/>
      <style:text-properties officeooo:rsid="0151259d" officeooo:paragraph-rsid="019cebf9"/>
    </style:style>
    <style:style style:name="P440" style:family="paragraph" style:parent-style-name="Table_20_Contents" style:list-style-name="L6">
      <style:paragraph-properties fo:text-align="justify" style:justify-single-word="false"/>
      <style:text-properties officeooo:rsid="0151259d" officeooo:paragraph-rsid="019cebf9"/>
    </style:style>
    <style:style style:name="P441" style:family="paragraph" style:parent-style-name="Table_20_Contents" style:list-style-name="L9">
      <style:paragraph-properties fo:text-align="justify" style:justify-single-word="false"/>
      <style:text-properties officeooo:rsid="0151259d" officeooo:paragraph-rsid="01a9cdd2"/>
    </style:style>
    <style:style style:name="P442" style:family="paragraph" style:parent-style-name="Table_20_Contents" style:list-style-name="L10">
      <style:paragraph-properties fo:text-align="justify" style:justify-single-word="false"/>
      <style:text-properties officeooo:rsid="0151259d" officeooo:paragraph-rsid="01a9cdd2"/>
    </style:style>
    <style:style style:name="P443" style:family="paragraph" style:parent-style-name="Table_20_Contents" style:list-style-name="L12">
      <style:paragraph-properties fo:text-align="justify" style:justify-single-word="false"/>
      <style:text-properties officeooo:rsid="0151259d" officeooo:paragraph-rsid="01a9cdd2"/>
    </style:style>
    <style:style style:name="P444"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45"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46" style:family="paragraph" style:parent-style-name="Table_20_Contents" style:list-style-name="L8">
      <style:paragraph-properties fo:text-align="justify" style:justify-single-word="false"/>
      <style:text-properties fo:font-weight="bold" officeooo:rsid="01cfc38e" officeooo:paragraph-rsid="01cfc38e" style:font-weight-asian="bold" style:font-weight-complex="bold"/>
    </style:style>
    <style:style style:name="P447"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48" style:family="paragraph" style:parent-style-name="Table_20_Contents" style:list-style-name="L8">
      <style:paragraph-properties fo:text-align="justify" style:justify-single-word="false"/>
      <style:text-properties fo:font-weight="normal" officeooo:rsid="01b0c851" officeooo:paragraph-rsid="01a9cdd2" fo:background-color="transparent" style:font-weight-asian="normal" style:font-weight-complex="normal"/>
    </style:style>
    <style:style style:name="P449" style:family="paragraph" style:parent-style-name="Table_20_Contents" style:list-style-name="L11">
      <style:paragraph-properties fo:text-align="justify" style:justify-single-word="false"/>
      <style:text-properties officeooo:rsid="0156bbc2" officeooo:paragraph-rsid="01a9cdd2"/>
    </style:style>
    <style:style style:name="P450" style:family="paragraph" style:parent-style-name="Table_20_Contents" style:list-style-name="L12">
      <style:paragraph-properties fo:text-align="justify" style:justify-single-word="false"/>
      <style:text-properties officeooo:rsid="015ba97b" officeooo:paragraph-rsid="01a9cdd2"/>
    </style:style>
    <style:style style:name="P451"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cfc38e" fo:background-color="#eeeeee"/>
    </style:style>
    <style:style style:name="P452"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d10a4a" fo:background-color="#eeeeee"/>
    </style:style>
    <style:style style:name="P453" style:family="paragraph" style:parent-style-name="Table_20_Contents" style:list-style-name="L12">
      <style:paragraph-properties fo:text-align="justify" style:justify-single-word="false"/>
      <style:text-properties officeooo:rsid="01d29f90" officeooo:paragraph-rsid="01d29f90"/>
    </style:style>
    <style:style style:name="P454" style:family="paragraph" style:parent-style-name="Text_20_body" style:list-style-name="L1">
      <style:text-properties officeooo:rsid="01915c4c" officeooo:paragraph-rsid="01915c4c"/>
    </style:style>
    <style:style style:name="P455" style:family="paragraph" style:parent-style-name="Text_20_body" style:list-style-name="L2">
      <style:text-properties officeooo:rsid="007ddc84" officeooo:paragraph-rsid="01915c4c"/>
    </style:style>
    <style:style style:name="P456" style:family="paragraph" style:parent-style-name="Text_20_body" style:list-style-name="L2">
      <style:text-properties officeooo:rsid="007f55bb" officeooo:paragraph-rsid="01915c4c"/>
    </style:style>
    <style:style style:name="P457" style:family="paragraph" style:parent-style-name="Text_20_body" style:list-style-name="L3">
      <style:text-properties officeooo:rsid="007f55bb" officeooo:paragraph-rsid="01915c4c"/>
    </style:style>
    <style:style style:name="P458" style:family="paragraph" style:parent-style-name="Text_20_body" style:list-style-name="L2">
      <style:text-properties officeooo:rsid="0084ae02" officeooo:paragraph-rsid="01915c4c"/>
    </style:style>
    <style:style style:name="P459" style:family="paragraph" style:parent-style-name="Text_20_body" style:list-style-name="L3">
      <style:text-properties officeooo:rsid="01836b49" officeooo:paragraph-rsid="01915c4c"/>
    </style:style>
    <style:style style:name="P460" style:family="paragraph" style:parent-style-name="Text_20_body" style:list-style-name="L7">
      <style:text-properties officeooo:rsid="0149cec3" officeooo:paragraph-rsid="01a9cdd2"/>
    </style:style>
    <style:style style:name="P461" style:family="paragraph" style:parent-style-name="Text_20_body" style:list-style-name="L7">
      <style:text-properties officeooo:rsid="014adc01" officeooo:paragraph-rsid="01a9cdd2"/>
    </style:style>
    <style:style style:name="P462" style:family="paragraph" style:parent-style-name="Text_20_body" style:list-style-name="L14">
      <style:text-properties officeooo:paragraph-rsid="00d8ffe0"/>
    </style:style>
    <style:style style:name="P463" style:family="paragraph" style:parent-style-name="Text_20_body" style:list-style-name="L14">
      <style:text-properties officeooo:paragraph-rsid="01875821"/>
    </style:style>
    <style:style style:name="P464" style:family="paragraph" style:parent-style-name="Text_20_body" style:list-style-name="L14">
      <style:text-properties officeooo:rsid="00d8ffe0" officeooo:paragraph-rsid="00d8ffe0"/>
    </style:style>
    <style:style style:name="P465" style:family="paragraph" style:parent-style-name="Text_20_body" style:list-style-name="L14">
      <style:text-properties officeooo:rsid="01bf53e5" officeooo:paragraph-rsid="01bf53e5"/>
    </style:style>
    <style:style style:name="P466" style:family="paragraph" style:parent-style-name="Text_20_body" style:list-style-name="L16">
      <style:text-properties fo:font-style="normal" officeooo:rsid="00de9e71" officeooo:paragraph-rsid="00d673d7" style:font-style-asian="normal" style:font-style-complex="normal"/>
    </style:style>
    <style:style style:name="P467" style:family="paragraph" style:parent-style-name="Text_20_body" style:list-style-name="L16">
      <style:text-properties officeooo:rsid="00de9e71" officeooo:paragraph-rsid="01c60b1f"/>
    </style:style>
    <style:style style:name="P468" style:family="paragraph" style:parent-style-name="Text_20_body" style:list-style-name="L16">
      <style:text-properties officeooo:rsid="00de9e71" officeooo:paragraph-rsid="00d673d7"/>
    </style:style>
    <style:style style:name="P469" style:family="paragraph" style:parent-style-name="Text_20_body" style:list-style-name="L17">
      <style:text-properties officeooo:paragraph-rsid="00e16f63"/>
    </style:style>
    <style:style style:name="P470" style:family="paragraph" style:parent-style-name="Text_20_body" style:list-style-name="L14">
      <style:text-properties officeooo:rsid="01d66995" officeooo:paragraph-rsid="01d66995"/>
    </style:style>
    <style:style style:name="P471" style:family="paragraph">
      <style:paragraph-properties fo:text-align="center" style:writing-mode="lr-tb"/>
      <style:text-properties fo:color="#ffffff" loext:opacity="100%"/>
    </style:style>
    <style:style style:name="P472" style:family="paragraph">
      <loext:graphic-properties draw:fill="solid" draw:fill-color="#ed1c24"/>
      <style:paragraph-properties fo:text-align="center" style:writing-mode="lr-tb"/>
      <style:text-properties fo:color="#ffffff" loext:opacity="100%"/>
    </style:style>
    <style:style style:name="P473" style:family="paragraph">
      <loext:graphic-properties draw:fill="none" draw:fill-color="#ffffff"/>
    </style:style>
    <style:style style:name="P474"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Consolas1" fo:font-size="10pt" officeooo:rsid="01bdb140" style:font-size-asian="10pt"/>
    </style:style>
    <style:style style:name="T20" style:family="text">
      <style:text-properties fo:color="#008080" loext:opacity="100%" style:font-name="Monospace" fo:font-size="10pt" style:font-size-asian="10pt" style:font-size-complex="10pt"/>
    </style:style>
    <style:style style:name="T21" style:family="text">
      <style:text-properties fo:color="#3f7f7f" loext:opacity="100%"/>
    </style:style>
    <style:style style:name="T22" style:family="text">
      <style:text-properties fo:color="#3f7f7f" loext:opacity="100%" style:font-name="Monospace1" fo:font-size="10pt" style:font-size-asian="10pt"/>
    </style:style>
    <style:style style:name="T23" style:family="text">
      <style:text-properties fo:color="#3f7f7f" loext:opacity="100%" style:font-name="Consolas1"/>
    </style:style>
    <style:style style:name="T24" style:family="text">
      <style:text-properties fo:color="#3f7f7f" loext:opacity="100%" style:font-name="Consolas1" fo:font-size="10pt" style:font-size-asian="10pt"/>
    </style:style>
    <style:style style:name="T25" style:family="text">
      <style:text-properties fo:color="#3f7f7f" loext:opacity="100%" style:font-name="Monospace" fo:font-size="10pt" style:font-size-asian="10pt" style:font-size-complex="10pt"/>
    </style:style>
    <style:style style:name="T26" style:family="text">
      <style:text-properties fo:color="#7f007f" loext:opacity="100%"/>
    </style:style>
    <style:style style:name="T27" style:family="text">
      <style:text-properties fo:color="#7f007f" loext:opacity="100%" style:font-name="Consolas1"/>
    </style:style>
    <style:style style:name="T28" style:family="text">
      <style:text-properties fo:color="#7f007f" loext:opacity="100%" style:font-name="Consolas1" fo:font-size="10pt" style:font-size-asian="10pt"/>
    </style:style>
    <style:style style:name="T29" style:family="text">
      <style:text-properties fo:color="#3c3c3c" loext:opacity="100%" style:font-name="Monospace1" fo:font-size="10pt" style:font-size-asian="10pt"/>
    </style:style>
    <style:style style:name="T30" style:family="text">
      <style:text-properties fo:color="#3c3c3c" loext:opacity="100%" style:font-name="Monospace1" fo:font-size="10pt" officeooo:rsid="018c7b7a" style:font-size-asian="10pt"/>
    </style:style>
    <style:style style:name="T31" style:family="text">
      <style:text-properties fo:color="#3c3c3c" loext:opacity="100%" style:font-name="Monospace1" fo:font-size="10pt" officeooo:rsid="01a3408a" style:font-size-asian="10pt"/>
    </style:style>
    <style:style style:name="T32" style:family="text">
      <style:text-properties fo:color="#3c3c3c" loext:opacity="100%" style:font-name="Monospace1" fo:font-size="10pt" officeooo:rsid="01bbecb4" style:font-size-asian="10pt"/>
    </style:style>
    <style:style style:name="T33" style:family="text">
      <style:text-properties fo:color="#3c3c3c" loext:opacity="100%" style:font-name="Monospace1" fo:font-size="10pt" officeooo:rsid="01b902f5" style:font-size-asian="10pt"/>
    </style:style>
    <style:style style:name="T34" style:family="text">
      <style:text-properties fo:color="#3c3c3c" loext:opacity="100%" style:font-name="Monospace1" fo:font-size="10pt" officeooo:rsid="01cdc65f" style:font-size-asian="10pt"/>
    </style:style>
    <style:style style:name="T35" style:family="text">
      <style:text-properties fo:color="#3c3c3c" loext:opacity="100%" style:font-name="Monospace1" fo:font-size="10pt" officeooo:rsid="01d40035" style:font-size-asian="10pt"/>
    </style:style>
    <style:style style:name="T36" style:family="text">
      <style:text-properties fo:color="#2a00ff" loext:opacity="100%" style:font-name="Monospace1" fo:font-size="10pt" style:font-size-asian="10pt"/>
    </style:style>
    <style:style style:name="T37" style:family="text">
      <style:text-properties fo:color="#2a00ff" loext:opacity="100%" style:font-name="Monospace1" fo:font-size="10pt" officeooo:rsid="01aba0a4" style:font-size-asian="10pt"/>
    </style:style>
    <style:style style:name="T38" style:family="text">
      <style:text-properties fo:color="#2a00ff" loext:opacity="100%" style:font-name="Consolas1"/>
    </style:style>
    <style:style style:name="T39" style:family="text">
      <style:text-properties fo:color="#2a00ff" loext:opacity="100%" style:font-name="Consolas1" fo:font-size="10pt" fo:font-style="italic" style:font-size-asian="10pt" style:font-style-asian="italic"/>
    </style:style>
    <style:style style:name="T40" style:family="text">
      <style:text-properties fo:color="#2a00ff" loext:opacity="100%" style:font-name="Consolas1" fo:font-size="10pt" style:font-size-asian="10pt"/>
    </style:style>
    <style:style style:name="T41" style:family="text">
      <style:text-properties fo:color="#2a00ff" loext:opacity="100%" style:font-name="Consolas1" officeooo:rsid="00ee64c9"/>
    </style:style>
    <style:style style:name="T42" style:family="text">
      <style:text-properties fo:color="#2a00ff" loext:opacity="100%" style:font-name="Consolas1" fo:font-style="italic" style:font-style-asian="italic"/>
    </style:style>
    <style:style style:name="T43" style:family="text">
      <style:text-properties fo:color="#2a00ff" loext:opacity="100%" style:font-name="Consolas1" fo:font-size="8pt" style:text-underline-style="none" style:font-size-asian="8pt" style:font-size-complex="8pt"/>
    </style:style>
    <style:style style:name="T44" style:family="text">
      <style:text-properties fo:color="#2a00ff" loext:opacity="100%" fo:font-style="italic" style:font-style-asian="italic"/>
    </style:style>
    <style:style style:name="T45" style:family="text">
      <style:text-properties fo:font-weight="bold" style:font-weight-asian="bold" style:font-weight-complex="bold"/>
    </style:style>
    <style:style style:name="T46" style:family="text">
      <style:text-properties fo:font-weight="bold" officeooo:rsid="009bb1cd" style:font-weight-asian="bold" style:font-weight-complex="bold"/>
    </style:style>
    <style:style style:name="T47" style:family="text">
      <style:text-properties fo:font-weight="bold" officeooo:rsid="00ea866e" style:font-weight-asian="bold" style:font-weight-complex="bold"/>
    </style:style>
    <style:style style:name="T48" style:family="text">
      <style:text-properties fo:font-weight="bold" officeooo:rsid="014f9ade" style:font-weight-asian="bold" style:font-weight-complex="bold"/>
    </style:style>
    <style:style style:name="T49" style:family="text">
      <style:text-properties fo:font-weight="bold" officeooo:rsid="015c4085" style:font-weight-asian="bold" style:font-weight-complex="bold"/>
    </style:style>
    <style:style style:name="T50" style:family="text">
      <style:text-properties fo:font-weight="bold" officeooo:rsid="01546630" style:font-weight-asian="bold" style:font-weight-complex="bold"/>
    </style:style>
    <style:style style:name="T51" style:family="text">
      <style:text-properties fo:color="#7f0055" loext:opacity="100%" style:font-name="Monospace1" fo:font-size="10pt" fo:font-weight="bold" style:font-size-asian="10pt" style:font-weight-asian="bold"/>
    </style:style>
    <style:style style:name="T52" style:family="text">
      <style:text-properties fo:color="#7f0055" loext:opacity="100%" style:font-name="Consolas1"/>
    </style:style>
    <style:style style:name="T53" style:family="text">
      <style:text-properties fo:color="#7f0055" loext:opacity="100%" style:font-name="Consolas1" fo:font-size="10pt" fo:font-weight="bold" style:font-size-asian="10pt" style:font-weight-asian="bold"/>
    </style:style>
    <style:style style:name="T54" style:family="text">
      <style:text-properties fo:color="#7f0055" loext:opacity="100%" style:font-name="Consolas1" fo:font-size="10pt" fo:font-weight="bold" style:font-size-asian="10pt" style:font-weight-asian="bold"/>
    </style:style>
    <style:style style:name="T55" style:family="text">
      <style:text-properties fo:color="#7f0055" loext:opacity="100%" style:font-name="Consolas1" fo:font-size="10pt" fo:font-weight="bold" style:font-size-asian="10pt" style:font-weight-asian="bold"/>
    </style:style>
    <style:style style:name="T56" style:family="text">
      <style:text-properties fo:color="#7f0055" loext:opacity="100%" style:font-name="Consolas1" fo:font-size="10pt" fo:font-weight="bold" fo:background-color="#e8f2fe" loext:char-shading-value="0" style:font-size-asian="10pt" style:font-weight-asian="bold"/>
    </style:style>
    <style:style style:name="T57" style:family="text">
      <style:text-properties fo:color="#7f0055" loext:opacity="100%" style:font-name="Consolas1" fo:font-size="10pt" fo:font-style="normal" fo:font-weight="bold" style:font-size-asian="10pt" style:font-style-asian="normal" style:font-weight-asian="bold"/>
    </style:style>
    <style:style style:name="T58" style:family="text">
      <style:text-properties fo:color="#7f0055" loext:opacity="100%" style:font-name="Consolas1" fo:font-size="10pt" fo:font-style="normal" fo:font-weight="bold" style:font-size-asian="10pt" style:font-style-asian="normal" style:font-weight-asian="bold"/>
    </style:style>
    <style:style style:name="T59" style:family="text">
      <style:text-properties fo:color="#7f0055" loext:opacity="100%" style:font-name="Consolas1" fo:font-size="10pt" fo:font-style="normal" fo:font-weight="bold" fo:background-color="transparent" loext:char-shading-value="0" style:font-size-asian="10pt" style:font-style-asian="normal" style:font-weight-asian="bold"/>
    </style:style>
    <style:style style:name="T60" style:family="text">
      <style:text-properties fo:color="#7f0055" loext:opacity="100%" style:font-name="Consolas1" fo:font-size="10pt" fo:font-style="normal" fo:font-weight="bold" fo:background-color="#e8f2fe" loext:char-shading-value="0" style:font-size-asian="10pt" style:font-style-asian="normal" style:font-weight-asian="bold"/>
    </style:style>
    <style:style style:name="T61" style:family="text">
      <style:text-properties fo:color="#7f0055" loext:opacity="100%" style:font-name="Consolas1" fo:font-weight="bold" style:font-weight-asian="bold"/>
    </style:style>
    <style:style style:name="T62" style:family="text">
      <style:text-properties fo:color="#7f0055" loext:opacity="100%" style:font-name="Consolas1" fo:font-size="8pt" style:text-underline-style="none" fo:font-weight="bold" style:font-size-asian="8pt" style:font-weight-asian="bold" style:font-size-complex="8pt"/>
    </style:style>
    <style:style style:name="T63" style:family="text">
      <style:text-properties fo:color="#000000" loext:opacity="100%"/>
    </style:style>
    <style:style style:name="T64" style:family="text">
      <style:text-properties fo:color="#000000" loext:opacity="100%" style:font-name="Monospace1" fo:font-size="10pt" style:font-size-asian="10pt"/>
    </style:style>
    <style:style style:name="T65" style:family="text">
      <style:text-properties fo:color="#000000" loext:opacity="100%" style:font-name="Monospace1" fo:font-size="10pt" officeooo:rsid="018c7b7a" style:font-size-asian="10pt"/>
    </style:style>
    <style:style style:name="T66" style:family="text">
      <style:text-properties fo:color="#000000" loext:opacity="100%" style:font-name="Monospace1" fo:font-size="10pt" officeooo:rsid="01aba0a4" style:font-size-asian="10pt"/>
    </style:style>
    <style:style style:name="T67" style:family="text">
      <style:text-properties fo:color="#000000" loext:opacity="100%" style:font-name="Monospace1" fo:font-size="10pt" officeooo:rsid="01c100af" style:font-size-asian="10pt"/>
    </style:style>
    <style:style style:name="T68" style:family="text">
      <style:text-properties fo:color="#000000" loext:opacity="100%" style:font-name="Monospace1" fo:font-size="10pt" fo:font-style="italic" style:font-size-asian="10pt" style:font-style-asian="italic"/>
    </style:style>
    <style:style style:name="T69" style:family="text">
      <style:text-properties fo:color="#000000" loext:opacity="100%" style:font-name="Consolas1"/>
    </style:style>
    <style:style style:name="T70" style:family="text">
      <style:text-properties fo:color="#000000" loext:opacity="100%" style:font-name="Consolas1" fo:font-size="10pt" style:font-size-asian="10pt"/>
    </style:style>
    <style:style style:name="T71" style:family="text">
      <style:text-properties fo:color="#000000" loext:opacity="100%" style:font-name="Consolas1" fo:font-size="10pt" officeooo:rsid="01bdb140" style:font-size-asian="10pt"/>
    </style:style>
    <style:style style:name="T72" style:family="text">
      <style:text-properties fo:color="#000000" loext:opacity="100%" style:font-name="Consolas1" fo:font-size="10pt" style:font-size-asian="10pt"/>
    </style:style>
    <style:style style:name="T73" style:family="text">
      <style:text-properties fo:color="#000000" loext:opacity="100%" style:font-name="Consolas1" fo:font-size="10pt" style:font-size-asian="10pt"/>
    </style:style>
    <style:style style:name="T74" style:family="text">
      <style:text-properties fo:color="#000000" loext:opacity="100%" style:font-name="Consolas1" fo:font-size="10pt" fo:background-color="#d4d4d4" loext:char-shading-value="0" style:font-size-asian="10pt"/>
    </style:style>
    <style:style style:name="T75"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76" style:family="text">
      <style:text-properties fo:color="#000000" loext:opacity="100%" style:font-name="Consolas1" fo:font-size="10pt" style:rfc-language-tag="es-ES-u-co-trad" fo:language="es" fo:country="ES" officeooo:rsid="01bdb140" fo:background-color="transparent" loext:char-shading-value="0" style:font-size-asian="10pt"/>
    </style:style>
    <style:style style:name="T77" style:family="text">
      <style:text-properties fo:color="#000000" loext:opacity="100%" style:font-name="Consolas1" fo:font-size="10pt" style:rfc-language-tag="es-ES-u-co-trad" fo:language="es" fo:country="ES" officeooo:rsid="01d4df39" fo:background-color="transparent" loext:char-shading-value="0" style:font-size-asian="10pt"/>
    </style:style>
    <style:style style:name="T78" style:family="text">
      <style:text-properties fo:color="#000000" loext:opacity="100%" style:font-name="Consolas1" fo:font-size="10pt" fo:background-color="#e8f2fe" loext:char-shading-value="0" style:font-size-asian="10pt"/>
    </style:style>
    <style:style style:name="T79" style:family="text">
      <style:text-properties fo:color="#000000" loext:opacity="100%" style:font-name="Consolas1" fo:font-size="10pt" fo:font-style="normal" fo:font-weight="normal" style:font-size-asian="10pt" style:font-style-asian="normal" style:font-weight-asian="normal"/>
    </style:style>
    <style:style style:name="T80" style:family="text">
      <style:text-properties fo:color="#000000" loext:opacity="100%" style:font-name="Consolas1" fo:font-size="10pt" fo:font-style="italic" style:font-size-asian="10pt" style:font-style-asian="italic"/>
    </style:style>
    <style:style style:name="T81" style:family="text">
      <style:text-properties fo:color="#000000" loext:opacity="100%" style:font-name="Consolas1" fo:background-color="#d4d4d4" loext:char-shading-value="0"/>
    </style:style>
    <style:style style:name="T82" style:family="text">
      <style:text-properties fo:color="#000000" loext:opacity="100%" style:font-name="Consolas1" fo:font-weight="bold" style:font-weight-asian="bold" style:font-weight-complex="bold"/>
    </style:style>
    <style:style style:name="T83" style:family="text">
      <style:text-properties fo:color="#000000" loext:opacity="100%" style:font-name="Consolas1" fo:font-style="italic" style:font-style-asian="italic"/>
    </style:style>
    <style:style style:name="T84" style:family="text">
      <style:text-properties fo:color="#000000" loext:opacity="100%" style:font-name="Consolas1" fo:font-size="8pt" style:text-underline-style="none" style:font-size-asian="8pt" style:font-size-complex="8pt"/>
    </style:style>
    <style:style style:name="T85" style:family="text">
      <style:text-properties fo:color="#000000" loext:opacity="100%" style:font-name="Consolas1" fo:font-size="8pt" style:text-underline-style="none" fo:background-color="transparent" loext:char-shading-value="0" style:font-size-asian="8pt" style:font-size-complex="8pt"/>
    </style:style>
    <style:style style:name="T86" style:family="text">
      <style:text-properties fo:color="#000000" loext:opacity="100%" style:font-name="Consolas1" fo:font-size="8pt" fo:background-color="transparent" loext:char-shading-value="0" style:font-size-asian="8pt" style:font-size-complex="8pt"/>
    </style:style>
    <style:style style:name="T87" style:family="text">
      <style:text-properties fo:color="#000000" loext:opacity="100%" style:font-name="Consolas1" fo:font-size="8pt" style:font-size-asian="8pt" style:font-size-complex="8pt"/>
    </style:style>
    <style:style style:name="T88" style:family="text">
      <style:text-properties fo:color="#000000" loext:opacity="100%" style:font-name="Consolas1" fo:font-size="8pt" fo:font-style="italic" style:text-underline-style="none" style:font-size-asian="8pt" style:font-style-asian="italic" style:font-size-complex="8pt"/>
    </style:style>
    <style:style style:name="T89" style:family="text">
      <style:text-properties fo:color="#000000" loext:opacity="100%" style:font-name="Consolas1" officeooo:rsid="00ee64c9"/>
    </style:style>
    <style:style style:name="T90" style:family="text">
      <style:text-properties fo:color="#000000" loext:opacity="100%" style:font-name="Consolas1" fo:font-size="9pt" style:font-size-asian="9pt"/>
    </style:style>
    <style:style style:name="T91" style:family="text">
      <style:text-properties fo:color="#000000" loext:opacity="100%" style:font-name="Monospace" fo:font-size="10pt" style:font-size-asian="10pt" style:font-size-complex="10pt"/>
    </style:style>
    <style:style style:name="T92" style:family="text">
      <style:text-properties fo:color="#000000" loext:opacity="100%" style:font-name="Monospace" fo:font-size="10pt" fo:font-style="normal" fo:font-weight="normal" style:font-size-asian="10pt" style:font-style-asian="normal" style:font-weight-asian="normal" style:font-style-complex="normal"/>
    </style:style>
    <style:style style:name="T93" style:family="text">
      <style:text-properties fo:color="#000000" loext:opacity="100%" style:font-name="JetBrains Mono1" fo:font-size="10pt" fo:font-style="normal" fo:font-weight="normal" fo:background-color="transparent" loext:char-shading-value="0" style:font-size-asian="10pt" style:font-style-asian="normal" style:font-weight-asian="normal"/>
    </style:style>
    <style:style style:name="T94" style:family="text">
      <style:text-properties fo:color="#000000" loext:opacity="100%" style:font-name="JetBrains Mono1" fo:font-size="10pt" fo:font-style="normal" fo:font-weight="normal" officeooo:rsid="01c9808c" fo:background-color="transparent" loext:char-shading-value="0" style:font-size-asian="10pt" style:font-style-asian="normal" style:font-weight-asian="normal"/>
    </style:style>
    <style:style style:name="T95" style:family="text">
      <style:text-properties fo:color="#000000" loext:opacity="100%" style:font-name="JetBrains Mono1" fo:font-size="10pt" fo:font-style="normal" fo:font-weight="normal" style:font-size-asian="10pt" style:font-style-asian="normal" style:font-weight-asian="normal"/>
    </style:style>
    <style:style style:name="T96" style:family="text">
      <style:text-properties fo:color="#000000" loext:opacity="100%" style:font-name="JetBrains Mono1" fo:font-size="10pt" fo:font-style="normal" fo:font-weight="normal" officeooo:rsid="01d7ca8c" style:font-size-asian="10pt" style:font-style-asian="normal" style:font-weight-asian="normal"/>
    </style:style>
    <style:style style:name="T97" style:family="text">
      <style:text-properties fo:color="#000000" loext:opacity="100%" style:font-name="JetBrains Mono1" fo:font-size="10pt" fo:font-style="italic" fo:font-weight="normal" style:font-size-asian="10pt" style:font-style-asian="italic" style:font-weight-asian="normal"/>
    </style:style>
    <style:style style:name="T98" style:family="text">
      <style:text-properties fo:color="#0000c0" loext:opacity="100%" style:font-name="Monospace1" fo:font-size="10pt" fo:font-style="italic" fo:font-weight="bold" style:font-size-asian="10pt" style:font-style-asian="italic" style:font-weight-asian="bold"/>
    </style:style>
    <style:style style:name="T99" style:family="text">
      <style:text-properties fo:color="#0000c0" loext:opacity="100%" style:font-name="Monospace1" fo:font-size="10pt" fo:font-style="italic" fo:font-weight="bold" officeooo:rsid="01c100af" style:font-size-asian="10pt" style:font-style-asian="italic" style:font-weight-asian="bold"/>
    </style:style>
    <style:style style:name="T100" style:family="text">
      <style:text-properties fo:color="#0000c0" loext:opacity="100%" style:font-name="Consolas1" fo:font-style="italic" fo:font-weight="bold" style:font-style-asian="italic" style:font-weight-asian="bold"/>
    </style:style>
    <style:style style:name="T101"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102" style:family="text">
      <style:text-properties fo:color="#0000c0" loext:opacity="100%" style:font-name="Consolas1" fo:font-size="10pt" fo:font-style="italic" style:font-size-asian="10pt" style:font-style-asian="italic"/>
    </style:style>
    <style:style style:name="T103" style:family="text">
      <style:text-properties fo:color="#0000c0" loext:opacity="100%" style:font-name="Consolas1" fo:font-size="10pt" fo:font-style="italic" fo:font-weight="bold" style:font-size-asian="10pt" style:font-style-asian="italic" style:font-weight-asian="bold"/>
    </style:style>
    <style:style style:name="T104" style:family="text">
      <style:text-properties fo:color="#6a3e3e" loext:opacity="100%" style:font-name="Monospace1" fo:font-size="10pt" style:font-size-asian="10pt"/>
    </style:style>
    <style:style style:name="T105" style:family="text">
      <style:text-properties fo:color="#6a3e3e" loext:opacity="100%" style:font-name="Monospace1" fo:font-size="10pt" officeooo:rsid="01aba0a4" style:font-size-asian="10pt"/>
    </style:style>
    <style:style style:name="T106" style:family="text">
      <style:text-properties fo:color="#6a3e3e" loext:opacity="100%" style:font-name="Monospace1" fo:font-size="10pt" officeooo:rsid="01c100af" style:font-size-asian="10pt"/>
    </style:style>
    <style:style style:name="T107" style:family="text">
      <style:text-properties fo:color="#6a3e3e" loext:opacity="100%" style:font-name="Consolas1"/>
    </style:style>
    <style:style style:name="T108" style:family="text">
      <style:text-properties fo:color="#6a3e3e" loext:opacity="100%" style:font-name="Consolas1" fo:font-size="10pt" style:font-size-asian="10pt"/>
    </style:style>
    <style:style style:name="T109" style:family="text">
      <style:text-properties fo:color="#6a3e3e" loext:opacity="100%" style:font-name="Consolas1" fo:font-size="10pt" style:font-size-asian="10pt"/>
    </style:style>
    <style:style style:name="T110" style:family="text">
      <style:text-properties fo:color="#6a3e3e" loext:opacity="100%" style:font-name="Consolas1" fo:background-color="#d4d4d4" loext:char-shading-value="0"/>
    </style:style>
    <style:style style:name="T111" style:family="text">
      <style:text-properties fo:color="#6a3e3e" loext:opacity="100%" style:font-name="Consolas1" fo:font-size="8pt" style:text-underline-style="none" style:font-size-asian="8pt" style:font-size-complex="8pt"/>
    </style:style>
    <style:style style:name="T112"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113" style:family="text">
      <style:text-properties fo:color="#6a3e3e" loext:opacity="100%" style:font-name="Consolas1" fo:font-size="8pt" fo:background-color="transparent" loext:char-shading-value="0" style:font-size-asian="8pt" style:font-size-complex="8pt"/>
    </style:style>
    <style:style style:name="T114" style:family="text">
      <style:text-properties fo:color="#6a3e3e" loext:opacity="100%" style:font-name="Consolas1" fo:font-size="8pt" style:font-size-asian="8pt" style:font-size-complex="8pt"/>
    </style:style>
    <style:style style:name="T115" style:family="text">
      <style:text-properties fo:color="#6a3e3e" loext:opacity="100%" style:font-name="Consolas1" officeooo:rsid="00dbb531"/>
    </style:style>
    <style:style style:name="T116" style:family="text">
      <style:text-properties fo:color="#6a3e3e" loext:opacity="100%" style:font-name="Consolas1" officeooo:rsid="00f0f9b1" fo:background-color="transparent" loext:char-shading-value="0"/>
    </style:style>
    <style:style style:name="T117" style:family="text">
      <style:text-properties officeooo:rsid="0086959c"/>
    </style:style>
    <style:style style:name="T118" style:family="text">
      <style:text-properties officeooo:rsid="008b673d"/>
    </style:style>
    <style:style style:name="T119" style:family="text">
      <style:text-properties officeooo:rsid="0090deb7"/>
    </style:style>
    <style:style style:name="T120" style:family="text">
      <style:text-properties officeooo:rsid="0090e737"/>
    </style:style>
    <style:style style:name="T121" style:family="text">
      <style:text-properties officeooo:rsid="00523cb7"/>
    </style:style>
    <style:style style:name="T122" style:family="text">
      <style:text-properties officeooo:rsid="005032ec"/>
    </style:style>
    <style:style style:name="T123" style:family="text">
      <style:text-properties officeooo:rsid="005362e2"/>
    </style:style>
    <style:style style:name="T124" style:family="text">
      <style:text-properties officeooo:rsid="005608e4"/>
    </style:style>
    <style:style style:name="T125" style:family="text">
      <style:text-properties officeooo:rsid="0051440a"/>
    </style:style>
    <style:style style:name="T126" style:family="text">
      <style:text-properties officeooo:rsid="005bb6f5"/>
    </style:style>
    <style:style style:name="T127" style:family="text">
      <style:text-properties officeooo:rsid="00600629"/>
    </style:style>
    <style:style style:name="T128" style:family="text">
      <style:text-properties officeooo:rsid="0062c50e"/>
    </style:style>
    <style:style style:name="T129" style:family="text">
      <style:text-properties officeooo:rsid="009569da"/>
    </style:style>
    <style:style style:name="T130" style:family="text">
      <style:text-properties officeooo:rsid="009bb1cd"/>
    </style:style>
    <style:style style:name="T131" style:family="text">
      <style:text-properties fo:color="#646464" loext:opacity="100%" style:font-name="Consolas1"/>
    </style:style>
    <style:style style:name="T132" style:family="text">
      <style:text-properties fo:color="#646464" loext:opacity="100%" style:font-name="Consolas1" fo:font-size="10pt" style:font-size-asian="10pt"/>
    </style:style>
    <style:style style:name="T133" style:family="text">
      <style:text-properties officeooo:rsid="00a8be7c"/>
    </style:style>
    <style:style style:name="T134" style:family="text">
      <style:text-properties officeooo:rsid="00a9a467"/>
    </style:style>
    <style:style style:name="T135" style:family="text">
      <style:text-properties officeooo:rsid="003e02b8"/>
    </style:style>
    <style:style style:name="T136" style:family="text">
      <style:text-properties officeooo:rsid="0084ae02"/>
    </style:style>
    <style:style style:name="T137" style:family="text">
      <style:text-properties officeooo:rsid="007ddc84"/>
    </style:style>
    <style:style style:name="T138" style:family="text">
      <style:text-properties officeooo:rsid="00b5a0a7"/>
    </style:style>
    <style:style style:name="T139" style:family="text">
      <style:text-properties officeooo:rsid="00a824e0"/>
    </style:style>
    <style:style style:name="T140" style:family="text">
      <style:text-properties style:font-name="Consolas1"/>
    </style:style>
    <style:style style:name="T141" style:family="text">
      <style:text-properties style:font-name="Consolas1" fo:font-size="9pt" style:font-size-asian="9pt"/>
    </style:style>
    <style:style style:name="T142" style:family="text">
      <style:text-properties officeooo:rsid="00cc0058"/>
    </style:style>
    <style:style style:name="T143" style:family="text">
      <style:text-properties fo:color="#007dc3" loext:opacity="100%" style:font-name="Calibri2" fo:font-size="18pt" officeooo:rsid="00285050" fo:background-color="transparent" loext:char-shading-value="0" style:font-size-asian="18pt" style:font-size-complex="18pt"/>
    </style:style>
    <style:style style:name="T144" style:family="text">
      <style:text-properties fo:color="#007dc3" loext:opacity="100%" style:font-name="Calibri2" fo:font-size="18pt" officeooo:rsid="00cd0e15" fo:background-color="transparent" loext:char-shading-value="0" style:font-size-asian="18pt" style:font-size-complex="18pt"/>
    </style:style>
    <style:style style:name="T145" style:family="text">
      <style:text-properties fo:color="#007dc3" loext:opacity="100%" style:font-name="Calibri2" fo:font-size="18pt" officeooo:rsid="015aa6d9" fo:background-color="transparent" loext:char-shading-value="0" style:font-size-asian="18pt" style:font-size-complex="18pt"/>
    </style:style>
    <style:style style:name="T146" style:family="text">
      <style:text-properties fo:color="#007dc3" loext:opacity="100%" style:font-name="Calibri2" fo:font-size="18pt" officeooo:rsid="01bf6626" fo:background-color="transparent" loext:char-shading-value="0" style:font-size-asian="18pt" style:font-size-complex="18pt"/>
    </style:style>
    <style:style style:name="T147" style:family="text">
      <style:text-properties fo:color="#007dc3" loext:opacity="100%" style:font-name="Calibri2" fo:font-size="18pt" officeooo:rsid="01cdc65f" fo:background-color="transparent" loext:char-shading-value="0" style:font-size-asian="18pt" style:font-size-complex="18pt"/>
    </style:style>
    <style:style style:name="T148" style:family="text">
      <style:text-properties officeooo:rsid="00d338c0"/>
    </style:style>
    <style:style style:name="T149" style:family="text">
      <style:text-properties officeooo:rsid="00d63ec8"/>
    </style:style>
    <style:style style:name="T150" style:family="text">
      <style:text-properties fo:font-style="italic" style:font-style-asian="italic" style:font-style-complex="italic"/>
    </style:style>
    <style:style style:name="T151" style:family="text">
      <style:text-properties fo:font-style="italic" officeooo:rsid="00d63ec8" style:font-style-asian="italic" style:font-style-complex="italic"/>
    </style:style>
    <style:style style:name="T152" style:family="text">
      <style:text-properties fo:font-style="italic" officeooo:rsid="00db5ce5" style:font-style-asian="italic" style:font-style-complex="italic"/>
    </style:style>
    <style:style style:name="T153" style:family="text">
      <style:text-properties fo:font-style="italic" officeooo:rsid="00e38553" style:font-style-asian="italic" style:font-style-complex="italic"/>
    </style:style>
    <style:style style:name="T154" style:family="text">
      <style:text-properties fo:font-style="italic" officeooo:rsid="00df575f" style:font-style-asian="italic" style:font-style-complex="italic"/>
    </style:style>
    <style:style style:name="T155" style:family="text">
      <style:text-properties fo:font-style="italic" officeooo:rsid="00e07efa" style:font-style-asian="italic" style:font-style-complex="italic"/>
    </style:style>
    <style:style style:name="T156" style:family="text">
      <style:text-properties fo:font-style="italic" officeooo:rsid="00df017d" style:font-style-asian="italic" style:font-style-complex="italic"/>
    </style:style>
    <style:style style:name="T157" style:family="text">
      <style:text-properties fo:font-style="italic" officeooo:rsid="00e16f63" style:font-style-asian="italic" style:font-style-complex="italic"/>
    </style:style>
    <style:style style:name="T158" style:family="text">
      <style:text-properties fo:font-style="italic" officeooo:rsid="00e33a20" style:font-style-asian="italic" style:font-style-complex="italic"/>
    </style:style>
    <style:style style:name="T159" style:family="text">
      <style:text-properties fo:font-style="italic" officeooo:rsid="00e8f23e" style:font-style-asian="italic" style:font-style-complex="italic"/>
    </style:style>
    <style:style style:name="T160" style:family="text">
      <style:text-properties fo:font-style="italic" officeooo:rsid="00d8ffe0" style:font-style-asian="italic" style:font-style-complex="italic"/>
    </style:style>
    <style:style style:name="T161" style:family="text">
      <style:text-properties fo:font-style="italic" officeooo:rsid="01546630" style:font-style-asian="italic" style:font-style-complex="italic"/>
    </style:style>
    <style:style style:name="T162" style:family="text">
      <style:text-properties fo:font-style="italic" fo:font-weight="bold" officeooo:rsid="00db5ce5" style:font-style-asian="italic" style:font-weight-asian="bold" style:font-style-complex="italic" style:font-weight-complex="bold"/>
    </style:style>
    <style:style style:name="T163" style:family="text">
      <style:text-properties fo:font-style="italic" fo:background-color="transparent" loext:char-shading-value="0" style:font-style-asian="italic" style:font-style-complex="italic"/>
    </style:style>
    <style:style style:name="T164" style:family="text">
      <style:text-properties fo:font-style="italic" officeooo:rsid="00e440cb" fo:background-color="transparent" loext:char-shading-value="0" style:font-style-asian="italic" style:font-style-complex="italic"/>
    </style:style>
    <style:style style:name="T165" style:family="text">
      <style:text-properties fo:font-style="italic" officeooo:rsid="00df017d" fo:background-color="transparent" loext:char-shading-value="0" style:font-style-asian="italic" style:font-style-complex="italic"/>
    </style:style>
    <style:style style:name="T166" style:family="text">
      <style:text-properties fo:font-style="italic" officeooo:rsid="00e16f63" fo:background-color="transparent" loext:char-shading-value="0" style:font-style-asian="italic" style:font-style-complex="italic"/>
    </style:style>
    <style:style style:name="T167" style:family="text">
      <style:text-properties fo:font-style="italic" officeooo:rsid="00e07efa" fo:background-color="transparent" loext:char-shading-value="0" style:font-style-asian="italic" style:font-style-complex="italic"/>
    </style:style>
    <style:style style:name="T168" style:family="text">
      <style:text-properties fo:font-style="italic" officeooo:rsid="00e33a20" fo:background-color="transparent" loext:char-shading-value="0" style:font-style-asian="italic" style:font-style-complex="italic"/>
    </style:style>
    <style:style style:name="T169" style:family="text">
      <style:text-properties fo:font-style="italic" officeooo:rsid="00dd25a6" fo:background-color="transparent" loext:char-shading-value="0" style:font-style-asian="italic" style:font-style-complex="italic"/>
    </style:style>
    <style:style style:name="T170" style:family="text">
      <style:text-properties fo:font-style="italic" officeooo:rsid="00ee103b" fo:background-color="transparent" loext:char-shading-value="0" style:font-style-asian="italic" style:font-style-complex="italic"/>
    </style:style>
    <style:style style:name="T171" style:family="text">
      <style:text-properties fo:font-style="italic" officeooo:rsid="00dda4cb" fo:background-color="transparent" loext:char-shading-value="0" style:font-style-asian="italic" style:font-style-complex="italic"/>
    </style:style>
    <style:style style:name="T172" style:family="text">
      <style:text-properties fo:font-style="italic" officeooo:rsid="00f0f9b1" fo:background-color="transparent" loext:char-shading-value="0"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0ea866e" style:font-style-asian="italic" style:font-weight-asian="normal" style:font-style-complex="italic" style:font-weight-complex="normal"/>
    </style:style>
    <style:style style:name="T175" style:family="text">
      <style:text-properties fo:font-style="italic" fo:font-weight="normal" fo:background-color="transparent" loext:char-shading-value="0" style:font-style-asian="italic" style:font-weight-asian="normal" style:font-style-complex="italic" style:font-weight-complex="normal"/>
    </style:style>
    <style:style style:name="T176"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77"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78" style:family="text">
      <style:text-properties fo:font-style="normal" style:font-style-asian="normal" style:font-style-complex="normal"/>
    </style:style>
    <style:style style:name="T179" style:family="text">
      <style:text-properties fo:font-style="normal" officeooo:rsid="00d63ec8" style:font-style-asian="normal" style:font-style-complex="normal"/>
    </style:style>
    <style:style style:name="T180" style:family="text">
      <style:text-properties fo:font-style="normal" officeooo:rsid="00db5ce5" style:font-style-asian="normal" style:font-style-complex="normal"/>
    </style:style>
    <style:style style:name="T181" style:family="text">
      <style:text-properties fo:font-style="normal" officeooo:rsid="00cb38e8" style:font-style-asian="normal" style:font-style-complex="normal"/>
    </style:style>
    <style:style style:name="T182" style:family="text">
      <style:text-properties fo:font-style="normal" officeooo:rsid="00e38553" style:font-style-asian="normal" style:font-style-complex="normal"/>
    </style:style>
    <style:style style:name="T183" style:family="text">
      <style:text-properties fo:font-style="normal" officeooo:rsid="00d87f80" style:font-style-asian="normal" style:font-style-complex="normal"/>
    </style:style>
    <style:style style:name="T184" style:family="text">
      <style:text-properties fo:font-style="normal" officeooo:rsid="00df575f" style:font-style-asian="normal" style:font-style-complex="normal"/>
    </style:style>
    <style:style style:name="T185" style:family="text">
      <style:text-properties fo:font-style="normal" officeooo:rsid="00e07efa" style:font-style-asian="normal" style:font-style-complex="normal"/>
    </style:style>
    <style:style style:name="T186" style:family="text">
      <style:text-properties fo:font-style="normal" officeooo:rsid="00e1e7f8" style:font-style-asian="normal" style:font-style-complex="normal"/>
    </style:style>
    <style:style style:name="T187" style:family="text">
      <style:text-properties fo:font-style="normal" officeooo:rsid="00e2fa38" style:font-style-asian="normal" style:font-style-complex="normal"/>
    </style:style>
    <style:style style:name="T188" style:family="text">
      <style:text-properties fo:font-style="normal" officeooo:rsid="00d8ffe0" style:font-style-asian="normal" style:font-style-complex="normal"/>
    </style:style>
    <style:style style:name="T189" style:family="text">
      <style:text-properties fo:font-style="normal" officeooo:rsid="00e0368e" style:font-style-asian="normal" style:font-style-complex="normal"/>
    </style:style>
    <style:style style:name="T190" style:family="text">
      <style:text-properties fo:font-style="normal" officeooo:rsid="00e16f63" style:font-style-asian="normal" style:font-style-complex="normal"/>
    </style:style>
    <style:style style:name="T191" style:family="text">
      <style:text-properties fo:font-style="normal" officeooo:rsid="00e8f23e" style:font-style-asian="normal" style:font-style-complex="normal"/>
    </style:style>
    <style:style style:name="T192" style:family="text">
      <style:text-properties fo:font-style="normal" officeooo:rsid="00ee103b" style:font-style-asian="normal" style:font-style-complex="normal"/>
    </style:style>
    <style:style style:name="T193" style:family="text">
      <style:text-properties fo:font-style="normal" officeooo:rsid="01546630" style:font-style-asian="normal" style:font-style-complex="normal"/>
    </style:style>
    <style:style style:name="T194" style:family="text">
      <style:text-properties fo:font-style="normal" officeooo:rsid="014f9ade" style:font-style-asian="normal" style:font-style-complex="normal"/>
    </style:style>
    <style:style style:name="T195" style:family="text">
      <style:text-properties fo:font-style="normal" officeooo:rsid="01b4bedd" style:font-style-asian="normal" style:font-style-complex="normal"/>
    </style:style>
    <style:style style:name="T196" style:family="text">
      <style:text-properties fo:font-style="normal" officeooo:rsid="01bdb140" style:font-style-asian="normal" style:font-style-complex="normal"/>
    </style:style>
    <style:style style:name="T197" style:family="text">
      <style:text-properties fo:font-style="normal" fo:background-color="transparent" loext:char-shading-value="0" style:font-style-asian="normal" style:font-style-complex="normal"/>
    </style:style>
    <style:style style:name="T198" style:family="text">
      <style:text-properties fo:font-style="normal" officeooo:rsid="00d63ec8" fo:background-color="transparent" loext:char-shading-value="0" style:font-style-asian="normal" style:font-style-complex="normal"/>
    </style:style>
    <style:style style:name="T199" style:family="text">
      <style:text-properties fo:font-style="normal" officeooo:rsid="00d81a0e" fo:background-color="transparent" loext:char-shading-value="0" style:font-style-asian="normal" style:font-style-complex="normal"/>
    </style:style>
    <style:style style:name="T200" style:family="text">
      <style:text-properties fo:font-style="normal" officeooo:rsid="00e2fa38" fo:background-color="transparent" loext:char-shading-value="0" style:font-style-asian="normal" style:font-style-complex="normal"/>
    </style:style>
    <style:style style:name="T201" style:family="text">
      <style:text-properties fo:font-style="normal" officeooo:rsid="00e1e7f8" fo:background-color="transparent" loext:char-shading-value="0" style:font-style-asian="normal" style:font-style-complex="normal"/>
    </style:style>
    <style:style style:name="T202" style:family="text">
      <style:text-properties fo:font-style="normal" officeooo:rsid="00e440cb" fo:background-color="transparent" loext:char-shading-value="0" style:font-style-asian="normal" style:font-style-complex="normal"/>
    </style:style>
    <style:style style:name="T203" style:family="text">
      <style:text-properties fo:font-style="normal" officeooo:rsid="00df017d" fo:background-color="transparent" loext:char-shading-value="0" style:font-style-asian="normal" style:font-style-complex="normal"/>
    </style:style>
    <style:style style:name="T204" style:family="text">
      <style:text-properties fo:font-style="normal" officeooo:rsid="00dfc741" fo:background-color="transparent" loext:char-shading-value="0" style:font-style-asian="normal" style:font-style-complex="normal"/>
    </style:style>
    <style:style style:name="T205" style:family="text">
      <style:text-properties fo:font-style="normal" officeooo:rsid="00e0368e" fo:background-color="transparent" loext:char-shading-value="0" style:font-style-asian="normal" style:font-style-complex="normal"/>
    </style:style>
    <style:style style:name="T206" style:family="text">
      <style:text-properties fo:font-style="normal" officeooo:rsid="00dda4cb" fo:background-color="transparent" loext:char-shading-value="0" style:font-style-asian="normal" style:font-style-complex="normal"/>
    </style:style>
    <style:style style:name="T207" style:family="text">
      <style:text-properties fo:font-style="normal" officeooo:rsid="00e16f63" fo:background-color="transparent" loext:char-shading-value="0" style:font-style-asian="normal" style:font-style-complex="normal"/>
    </style:style>
    <style:style style:name="T208" style:family="text">
      <style:text-properties fo:font-style="normal" officeooo:rsid="00e33a20" fo:background-color="transparent" loext:char-shading-value="0" style:font-style-asian="normal" style:font-style-complex="normal"/>
    </style:style>
    <style:style style:name="T209" style:family="text">
      <style:text-properties fo:font-style="normal" officeooo:rsid="00db5ce5" fo:background-color="transparent" loext:char-shading-value="0" style:font-style-asian="normal" style:font-style-complex="normal"/>
    </style:style>
    <style:style style:name="T210" style:family="text">
      <style:text-properties fo:font-style="normal" officeooo:rsid="00e8f23e" fo:background-color="transparent" loext:char-shading-value="0" style:font-style-asian="normal" style:font-style-complex="normal"/>
    </style:style>
    <style:style style:name="T211" style:family="text">
      <style:text-properties fo:font-style="normal" officeooo:rsid="00d87f80" fo:background-color="transparent" loext:char-shading-value="0" style:font-style-asian="normal" style:font-style-complex="normal"/>
    </style:style>
    <style:style style:name="T212" style:family="text">
      <style:text-properties fo:font-style="normal" officeooo:rsid="00dd25a6" fo:background-color="transparent" loext:char-shading-value="0" style:font-style-asian="normal" style:font-style-complex="normal"/>
    </style:style>
    <style:style style:name="T213" style:family="text">
      <style:text-properties fo:font-style="normal" officeooo:rsid="00f0f9b1" fo:background-color="transparent" loext:char-shading-value="0" style:font-style-asian="normal" style:font-style-complex="normal"/>
    </style:style>
    <style:style style:name="T214" style:family="text">
      <style:text-properties fo:font-style="normal" officeooo:rsid="00d8ffe0" fo:background-color="transparent" loext:char-shading-value="0" style:font-style-asian="normal" style:font-style-complex="normal"/>
    </style:style>
    <style:style style:name="T215" style:family="text">
      <style:text-properties fo:font-style="normal" fo:font-weight="normal" officeooo:rsid="00ea866e" style:font-style-asian="normal" style:font-weight-asian="normal" style:font-style-complex="normal" style:font-weight-complex="normal"/>
    </style:style>
    <style:style style:name="T216" style:family="text">
      <style:text-properties fo:font-style="normal" fo:font-weight="normal" fo:background-color="transparent" loext:char-shading-value="0" style:font-style-asian="normal" style:font-weight-asian="normal" style:font-style-complex="normal" style:font-weight-complex="normal"/>
    </style:style>
    <style:style style:name="T217"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18"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19"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20" style:family="text">
      <style:text-properties fo:font-style="normal" fo:font-weight="bold" officeooo:rsid="01546630" style:font-style-asian="normal" style:font-weight-asian="bold" style:font-style-complex="normal" style:font-weight-complex="bold"/>
    </style:style>
    <style:style style:name="T221" style:family="text">
      <style:text-properties officeooo:rsid="00db5ce5"/>
    </style:style>
    <style:style style:name="T222" style:family="text">
      <style:text-properties officeooo:rsid="00d87f80"/>
    </style:style>
    <style:style style:name="T223" style:family="text">
      <style:text-properties officeooo:rsid="00dac55c"/>
    </style:style>
    <style:style style:name="T224" style:family="text">
      <style:text-properties fo:color="#3f5fbf" loext:opacity="100%" style:font-name="Consolas1"/>
    </style:style>
    <style:style style:name="T225" style:family="text">
      <style:text-properties fo:color="#3f5fbf" loext:opacity="100%" style:font-name="Consolas1" fo:font-size="10pt" style:font-size-asian="10pt"/>
    </style:style>
    <style:style style:name="T226" style:family="text">
      <style:text-properties fo:color="#3f5fbf" loext:opacity="100%" style:font-name="Consolas1" fo:font-size="10pt" style:font-size-asian="10pt"/>
    </style:style>
    <style:style style:name="T227" style:family="text">
      <style:text-properties fo:color="#3f5fbf" loext:opacity="100%" style:font-name="Consolas1" fo:font-size="10pt" style:text-underline-style="solid" style:text-underline-width="auto" style:text-underline-color="font-color" style:font-size-asian="10pt"/>
    </style:style>
    <style:style style:name="T228" style:family="text">
      <style:text-properties fo:color="#3f5fbf" loext:opacity="100%" style:font-name="Consolas1" fo:font-size="10pt" style:text-underline-style="solid" style:text-underline-width="auto" style:text-underline-color="font-color" style:font-size-asian="10pt"/>
    </style:style>
    <style:style style:name="T229" style:family="text">
      <style:text-properties fo:color="#7f9fbf" loext:opacity="100%" style:font-name="Consolas1" fo:font-size="10pt" fo:font-weight="bold" style:font-size-asian="10pt" style:font-weight-asian="bold"/>
    </style:style>
    <style:style style:name="T230" style:family="text">
      <style:text-properties fo:color="#7f7f9f" loext:opacity="100%" style:font-name="Consolas1" fo:font-size="10pt" style:font-size-asian="10pt"/>
    </style:style>
    <style:style style:name="T231" style:family="text">
      <style:text-properties officeooo:rsid="00e07efa"/>
    </style:style>
    <style:style style:name="T232" style:family="text">
      <style:text-properties officeooo:rsid="00e85af2"/>
    </style:style>
    <style:style style:name="T233" style:family="text">
      <style:text-properties officeooo:rsid="00ea866e"/>
    </style:style>
    <style:style style:name="T234" style:family="text">
      <style:text-properties fo:font-weight="normal" style:font-weight-asian="normal" style:font-weight-complex="normal"/>
    </style:style>
    <style:style style:name="T235" style:family="text">
      <style:text-properties fo:font-weight="normal" officeooo:rsid="00ea866e" style:font-weight-asian="normal" style:font-weight-complex="normal"/>
    </style:style>
    <style:style style:name="T236" style:family="text">
      <style:text-properties fo:font-weight="normal" officeooo:rsid="0163fbf5" style:font-weight-asian="normal" style:font-weight-complex="normal"/>
    </style:style>
    <style:style style:name="T237" style:family="text">
      <style:text-properties fo:font-weight="normal" officeooo:rsid="016f0584" style:font-weight-asian="normal" style:font-weight-complex="normal"/>
    </style:style>
    <style:style style:name="T238" style:family="text">
      <style:text-properties fo:font-weight="normal" officeooo:rsid="01b0c851" style:font-weight-asian="normal" style:font-weight-complex="normal"/>
    </style:style>
    <style:style style:name="T239" style:family="text">
      <style:text-properties fo:font-weight="normal" officeooo:rsid="01cdc65f" style:font-weight-asian="normal" style:font-weight-complex="normal"/>
    </style:style>
    <style:style style:name="T240" style:family="text">
      <style:text-properties fo:font-weight="normal" officeooo:rsid="00ea866e" fo:background-color="transparent" loext:char-shading-value="0" style:font-weight-asian="normal" style:font-weight-complex="normal"/>
    </style:style>
    <style:style style:name="T241" style:family="text">
      <style:text-properties fo:font-weight="normal" officeooo:rsid="00e54ccf" fo:background-color="transparent" loext:char-shading-value="0" style:font-weight-asian="normal" style:font-weight-complex="normal"/>
    </style:style>
    <style:style style:name="T242" style:family="text">
      <style:text-properties fo:font-weight="normal" officeooo:rsid="00e5f97a" fo:background-color="transparent" loext:char-shading-value="0" style:font-weight-asian="normal" style:font-weight-complex="normal"/>
    </style:style>
    <style:style style:name="T243" style:family="text">
      <style:text-properties fo:color="#3f7f5f" loext:opacity="100%" style:font-name="Consolas1"/>
    </style:style>
    <style:style style:name="T244" style:family="text">
      <style:text-properties fo:color="#3f7f5f" loext:opacity="100%" style:font-name="Consolas1" style:text-underline-style="solid" style:text-underline-width="auto" style:text-underline-color="font-color"/>
    </style:style>
    <style:style style:name="T245" style:family="text">
      <style:text-properties fo:color="#3f7f5f" loext:opacity="100%" style:font-name="Consolas1" style:text-underline-style="none"/>
    </style:style>
    <style:style style:name="T246" style:family="text">
      <style:text-properties fo:color="#3f7f5f" loext:opacity="100%" style:font-name="Consolas1" fo:font-size="10pt" style:font-size-asian="10pt"/>
    </style:style>
    <style:style style:name="T247" style:family="text">
      <style:text-properties fo:color="#3f7f5f" loext:opacity="100%" style:font-name="Consolas1" fo:font-size="10pt" style:text-underline-style="solid" style:text-underline-width="auto" style:text-underline-color="font-color" style:font-size-asian="10pt"/>
    </style:style>
    <style:style style:name="T248" style:family="text">
      <style:text-properties fo:color="#3f7f5f" loext:opacity="100%" style:font-name="Monospace1" fo:font-size="10pt" style:font-size-asian="10pt"/>
    </style:style>
    <style:style style:name="T249" style:family="text">
      <style:text-properties fo:color="#3f7f5f" loext:opacity="100%" style:font-name="Monospace1" fo:font-size="10pt" officeooo:rsid="018c7b7a" style:font-size-asian="10pt"/>
    </style:style>
    <style:style style:name="T250" style:family="text">
      <style:text-properties fo:color="#3f3fbf" loext:opacity="100%" style:font-name="Consolas1"/>
    </style:style>
    <style:style style:name="T251" style:family="text">
      <style:text-properties fo:color="#3f3fbf" loext:opacity="100%" style:font-name="Consolas1" fo:font-size="10pt" style:font-size-asian="10pt"/>
    </style:style>
    <style:style style:name="T252" style:family="text">
      <style:text-properties officeooo:rsid="00ee64c9"/>
    </style:style>
    <style:style style:name="T253" style:family="text">
      <style:text-properties text:display="none"/>
    </style:style>
    <style:style style:name="T254" style:family="text">
      <style:text-properties officeooo:rsid="00ebb296"/>
    </style:style>
    <style:style style:name="T255"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56"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57"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58"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59" style:family="text">
      <style:text-properties officeooo:rsid="00dda4cb"/>
    </style:style>
    <style:style style:name="T260"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61"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62" style:family="text">
      <style:text-properties officeooo:rsid="00df017d" fo:background-color="transparent" loext:char-shading-value="0"/>
    </style:style>
    <style:style style:name="T263" style:family="text">
      <style:text-properties officeooo:rsid="00e59aa6" fo:background-color="transparent" loext:char-shading-value="0"/>
    </style:style>
    <style:style style:name="T264" style:family="text">
      <style:text-properties officeooo:rsid="00dda4cb" fo:background-color="transparent" loext:char-shading-value="0"/>
    </style:style>
    <style:style style:name="T265" style:family="text">
      <style:text-properties officeooo:rsid="00ee103b" fo:background-color="transparent" loext:char-shading-value="0"/>
    </style:style>
    <style:style style:name="T266" style:family="text">
      <style:text-properties officeooo:rsid="00e16f63"/>
    </style:style>
    <style:style style:name="T267" style:family="text">
      <style:text-properties officeooo:rsid="00e8f23e"/>
    </style:style>
    <style:style style:name="T268" style:family="text">
      <style:text-properties officeooo:rsid="00ec4c44"/>
    </style:style>
    <style:style style:name="T269" style:family="text">
      <style:text-properties officeooo:rsid="00f7036b"/>
    </style:style>
    <style:style style:name="T270" style:family="text">
      <style:text-properties officeooo:rsid="00f8fa7f"/>
    </style:style>
    <style:style style:name="T271" style:family="text">
      <style:text-properties officeooo:rsid="00f9eb5c"/>
    </style:style>
    <style:style style:name="T272" style:family="text">
      <style:text-properties officeooo:rsid="00fa2108"/>
    </style:style>
    <style:style style:name="T273" style:family="text">
      <style:text-properties officeooo:rsid="00fadb7a"/>
    </style:style>
    <style:style style:name="T274" style:family="text">
      <style:text-properties officeooo:rsid="00fb0ac1"/>
    </style:style>
    <style:style style:name="T275" style:family="text">
      <style:text-properties officeooo:rsid="00fc5e61"/>
    </style:style>
    <style:style style:name="T276" style:family="text">
      <style:text-properties officeooo:rsid="00fdedbb"/>
    </style:style>
    <style:style style:name="T277" style:family="text">
      <style:text-properties officeooo:rsid="00ff2832"/>
    </style:style>
    <style:style style:name="T278" style:family="text">
      <style:text-properties officeooo:rsid="010136dd"/>
    </style:style>
    <style:style style:name="T279" style:family="text">
      <style:text-properties officeooo:rsid="0104c9b6"/>
    </style:style>
    <style:style style:name="T280" style:family="text">
      <style:text-properties officeooo:rsid="0105b899"/>
    </style:style>
    <style:style style:name="T281" style:family="text">
      <style:text-properties officeooo:rsid="0106886f"/>
    </style:style>
    <style:style style:name="T282" style:family="text">
      <style:text-properties officeooo:rsid="01073b25"/>
    </style:style>
    <style:style style:name="T283" style:family="text">
      <style:text-properties officeooo:rsid="0108f91b"/>
    </style:style>
    <style:style style:name="T284" style:family="text">
      <style:text-properties officeooo:rsid="010af096"/>
    </style:style>
    <style:style style:name="T285" style:family="text">
      <style:text-properties officeooo:rsid="010e1f55"/>
    </style:style>
    <style:style style:name="T286" style:family="text">
      <style:text-properties officeooo:rsid="010fbae5"/>
    </style:style>
    <style:style style:name="T287" style:family="text">
      <style:text-properties officeooo:rsid="0110d1f4"/>
    </style:style>
    <style:style style:name="T288" style:family="text">
      <style:text-properties officeooo:rsid="011208a6"/>
    </style:style>
    <style:style style:name="T289" style:family="text">
      <style:text-properties officeooo:rsid="011355b4"/>
    </style:style>
    <style:style style:name="T290" style:family="text">
      <style:text-properties officeooo:rsid="0113da63"/>
    </style:style>
    <style:style style:name="T291" style:family="text">
      <style:text-properties style:text-underline-style="none"/>
    </style:style>
    <style:style style:name="T292" style:family="text">
      <style:text-properties officeooo:rsid="01212e12"/>
    </style:style>
    <style:style style:name="T293" style:family="text">
      <style:text-properties officeooo:rsid="0121d8ec"/>
    </style:style>
    <style:style style:name="T294" style:family="text">
      <style:text-properties officeooo:rsid="0124bd62"/>
    </style:style>
    <style:style style:name="T295" style:family="text">
      <style:text-properties officeooo:rsid="01258e96"/>
    </style:style>
    <style:style style:name="T296" style:family="text">
      <style:text-properties officeooo:rsid="0127de30"/>
    </style:style>
    <style:style style:name="T297" style:family="text">
      <style:text-properties officeooo:rsid="01286d0a"/>
    </style:style>
    <style:style style:name="T298" style:family="text">
      <style:text-properties officeooo:rsid="012ada2e"/>
    </style:style>
    <style:style style:name="T299" style:family="text">
      <style:text-properties officeooo:rsid="012ec9b6"/>
    </style:style>
    <style:style style:name="T300" style:family="text">
      <style:text-properties officeooo:rsid="005eebc7"/>
    </style:style>
    <style:style style:name="T301" style:family="text">
      <style:text-properties officeooo:rsid="012ef337"/>
    </style:style>
    <style:style style:name="T302" style:family="text">
      <style:text-properties fo:color="#a41515" loext:opacity="100%" style:font-name="Consolas1" fo:font-size="9pt" style:font-size-asian="9pt"/>
    </style:style>
    <style:style style:name="T303" style:family="text">
      <style:text-properties fo:color="#a41515" loext:opacity="100%" style:font-name="Consolas1" fo:font-size="9pt" officeooo:rsid="01bb9662" style:font-size-asian="9pt"/>
    </style:style>
    <style:style style:name="T304" style:family="text">
      <style:text-properties fo:color="#0451a6" loext:opacity="100%" style:font-name="Consolas1" fo:font-size="9pt" style:font-size-asian="9pt"/>
    </style:style>
    <style:style style:name="T305" style:family="text">
      <style:text-properties officeooo:rsid="0149cec3"/>
    </style:style>
    <style:style style:name="T306" style:family="text">
      <style:text-properties officeooo:rsid="014adc01"/>
    </style:style>
    <style:style style:name="T307" style:family="text">
      <style:text-properties officeooo:rsid="014f9ade"/>
    </style:style>
    <style:style style:name="T308" style:family="text">
      <style:text-properties officeooo:rsid="0151259d"/>
    </style:style>
    <style:style style:name="T309" style:family="text">
      <style:text-properties officeooo:rsid="0151fd2e"/>
    </style:style>
    <style:style style:name="T310" style:family="text">
      <style:text-properties officeooo:rsid="01546630"/>
    </style:style>
    <style:style style:name="T311" style:family="text">
      <style:text-properties officeooo:rsid="01554eb3"/>
    </style:style>
    <style:style style:name="T312" style:family="text">
      <style:text-properties officeooo:rsid="0155bc3d"/>
    </style:style>
    <style:style style:name="T313" style:family="text">
      <style:text-properties officeooo:rsid="015c0e13"/>
    </style:style>
    <style:style style:name="T314" style:family="text">
      <style:text-properties officeooo:rsid="015c4085"/>
    </style:style>
    <style:style style:name="T315" style:family="text">
      <style:text-properties officeooo:rsid="015e4779"/>
    </style:style>
    <style:style style:name="T316" style:family="text">
      <style:text-properties fo:color="#0451a5" loext:opacity="100%" style:font-name="Consolas2" fo:font-size="9pt" fo:font-weight="normal"/>
    </style:style>
    <style:style style:name="T317" style:family="text">
      <style:text-properties fo:color="#0451a5" loext:opacity="100%" style:font-name="Consolas2" fo:font-size="9pt" fo:font-weight="normal" fo:background-color="#fffffe" loext:char-shading-value="0"/>
    </style:style>
    <style:style style:name="T318" style:family="text">
      <style:text-properties fo:color="#0451a5" loext:opacity="100%" style:font-name="Consolas2" fo:font-size="9pt" fo:font-weight="normal" officeooo:rsid="01b5544c"/>
    </style:style>
    <style:style style:name="T319" style:family="text">
      <style:text-properties fo:color="#0451a5" loext:opacity="100%" style:font-name="Consolas2" fo:font-size="9pt" fo:font-weight="normal" officeooo:rsid="01b71c80"/>
    </style:style>
    <style:style style:name="T320" style:family="text">
      <style:text-properties fo:color="#0451a5" loext:opacity="100%" style:font-name="Consolas2" fo:font-size="9pt" fo:font-weight="bold"/>
    </style:style>
    <style:style style:name="T321" style:family="text">
      <style:text-properties officeooo:rsid="015fa555"/>
    </style:style>
    <style:style style:name="T322" style:family="text">
      <style:text-properties style:font-name="Consolas2" fo:font-size="9pt" fo:font-weight="normal"/>
    </style:style>
    <style:style style:name="T323" style:family="text">
      <style:text-properties style:font-name="Consolas2" fo:font-size="9pt" fo:font-weight="normal" officeooo:rsid="015fa555"/>
    </style:style>
    <style:style style:name="T324" style:family="text">
      <style:text-properties fo:color="#a31515" loext:opacity="100%" style:font-name="Consolas2" fo:font-size="9pt" fo:font-weight="normal"/>
    </style:style>
    <style:style style:name="T325" style:family="text">
      <style:text-properties fo:color="#a31515" loext:opacity="100%" style:font-name="Consolas2" fo:font-size="9pt" fo:font-weight="normal" officeooo:rsid="01b5544c"/>
    </style:style>
    <style:style style:name="T326" style:family="text">
      <style:text-properties fo:color="#a31515" loext:opacity="100%" style:font-name="Consolas2" fo:font-size="9pt" fo:font-weight="normal" officeooo:rsid="01b71c80"/>
    </style:style>
    <style:style style:name="T327" style:family="text">
      <style:text-properties fo:color="#098658" loext:opacity="100%" style:font-name="Consolas2" fo:font-size="9pt" fo:font-weight="normal"/>
    </style:style>
    <style:style style:name="T328" style:family="text">
      <style:text-properties officeooo:rsid="0160d5f3"/>
    </style:style>
    <style:style style:name="T329" style:family="text">
      <style:text-properties officeooo:rsid="01622317"/>
    </style:style>
    <style:style style:name="T330" style:family="text">
      <style:text-properties officeooo:rsid="0163fbf5"/>
    </style:style>
    <style:style style:name="T331" style:family="text">
      <style:text-properties officeooo:rsid="016529da"/>
    </style:style>
    <style:style style:name="T332" style:family="text">
      <style:text-properties officeooo:rsid="016cca63"/>
    </style:style>
    <style:style style:name="T333" style:family="text">
      <style:text-properties officeooo:rsid="016e9a6e"/>
    </style:style>
    <style:style style:name="T334" style:family="text">
      <style:text-properties officeooo:rsid="016f0584"/>
    </style:style>
    <style:style style:name="T335" style:family="text">
      <style:text-properties officeooo:rsid="017087d4"/>
    </style:style>
    <style:style style:name="T336" style:family="text">
      <style:text-properties officeooo:rsid="01723150"/>
    </style:style>
    <style:style style:name="T337" style:family="text">
      <style:text-properties officeooo:rsid="0176c9fd"/>
    </style:style>
    <style:style style:name="T338" style:family="text">
      <style:text-properties officeooo:rsid="0177982d"/>
    </style:style>
    <style:style style:name="T339" style:family="text">
      <style:text-properties officeooo:rsid="01794cf9"/>
    </style:style>
    <style:style style:name="T340" style:family="text">
      <style:text-properties officeooo:rsid="017a98da"/>
    </style:style>
    <style:style style:name="T341" style:family="text">
      <style:text-properties officeooo:rsid="017c0014"/>
    </style:style>
    <style:style style:name="T342" style:family="text">
      <style:text-properties officeooo:rsid="01836b49"/>
    </style:style>
    <style:style style:name="T343" style:family="text">
      <style:text-properties officeooo:rsid="007f55bb"/>
    </style:style>
    <style:style style:name="T344" style:family="text">
      <style:text-properties style:rfc-language-tag="es-ES-u-co-trad" fo:language="es" fo:country="ES" fo:font-style="normal" officeooo:rsid="01875821" style:font-style-asian="normal" style:font-style-complex="normal"/>
    </style:style>
    <style:style style:name="T345" style:family="text">
      <style:text-properties style:rfc-language-tag="es-ES-u-co-trad" fo:language="es" fo:country="ES" fo:font-style="normal" officeooo:rsid="01875821" fo:background-color="transparent" loext:char-shading-value="0" style:font-style-asian="normal" style:font-style-complex="normal"/>
    </style:style>
    <style:style style:name="T346" style:family="text">
      <style:text-properties officeooo:rsid="018c7b7a"/>
    </style:style>
    <style:style style:name="T347" style:family="text">
      <style:text-properties officeooo:rsid="018f92fd"/>
    </style:style>
    <style:style style:name="T348" style:family="text">
      <style:text-properties officeooo:rsid="019009d8"/>
    </style:style>
    <style:style style:name="T349" style:family="text">
      <style:text-properties officeooo:rsid="01915c4c"/>
    </style:style>
    <style:style style:name="T350" style:family="text">
      <style:text-properties officeooo:rsid="007af11d"/>
    </style:style>
    <style:style style:name="T351" style:family="text">
      <style:text-properties officeooo:rsid="01949037"/>
    </style:style>
    <style:style style:name="T352" style:family="text">
      <style:text-properties officeooo:rsid="01974b8c"/>
    </style:style>
    <style:style style:name="T353" style:family="text">
      <style:text-properties officeooo:rsid="01985e2b"/>
    </style:style>
    <style:style style:name="T354" style:family="text">
      <style:text-properties officeooo:rsid="01997fee"/>
    </style:style>
    <style:style style:name="T355" style:family="text">
      <style:text-properties officeooo:rsid="019b515e"/>
    </style:style>
    <style:style style:name="T356" style:family="text">
      <style:text-properties officeooo:rsid="019b5d65"/>
    </style:style>
    <style:style style:name="T357" style:family="text">
      <style:text-properties officeooo:rsid="01a00707"/>
    </style:style>
    <style:style style:name="T358" style:family="text">
      <style:text-properties officeooo:rsid="01a3c4fd"/>
    </style:style>
    <style:style style:name="T359" style:family="text">
      <style:text-properties officeooo:rsid="01a794fe"/>
    </style:style>
    <style:style style:name="T360" style:family="text">
      <style:text-properties officeooo:rsid="01a9cdd2"/>
    </style:style>
    <style:style style:name="T361" style:family="text">
      <style:text-properties officeooo:rsid="01aba0a4"/>
    </style:style>
    <style:style style:name="T362" style:family="text">
      <style:text-properties officeooo:rsid="01af45bb"/>
    </style:style>
    <style:style style:name="T363" style:family="text">
      <style:text-properties officeooo:rsid="01b1a3a8"/>
    </style:style>
    <style:style style:name="T364" style:family="text">
      <style:text-properties officeooo:rsid="01b368bb"/>
    </style:style>
    <style:style style:name="T365" style:family="text">
      <style:text-properties officeooo:rsid="01b46b41"/>
    </style:style>
    <style:style style:name="T366" style:family="text">
      <style:text-properties officeooo:rsid="01b4bedd"/>
    </style:style>
    <style:style style:name="T367" style:family="text">
      <style:text-properties officeooo:rsid="01b5e40b"/>
    </style:style>
    <style:style style:name="T368" style:family="text">
      <style:text-properties officeooo:rsid="01b71c80"/>
    </style:style>
    <style:style style:name="T369" style:family="text">
      <style:text-properties officeooo:rsid="01bbecb4"/>
    </style:style>
    <style:style style:name="T370" style:family="text">
      <style:text-properties officeooo:rsid="01b77b84"/>
    </style:style>
    <style:style style:name="T371" style:family="text">
      <style:text-properties officeooo:rsid="01b8b2cf"/>
    </style:style>
    <style:style style:name="T372" style:family="text">
      <style:text-properties officeooo:rsid="01bb17a7"/>
    </style:style>
    <style:style style:name="T373" style:family="text">
      <style:text-properties officeooo:rsid="01b902f5"/>
    </style:style>
    <style:style style:name="T374" style:family="text">
      <style:text-properties officeooo:rsid="01bd1247"/>
    </style:style>
    <style:style style:name="T375" style:family="text">
      <style:text-properties officeooo:rsid="01bdb140"/>
    </style:style>
    <style:style style:name="T376" style:family="text">
      <style:text-properties officeooo:rsid="01bf6626"/>
    </style:style>
    <style:style style:name="T377" style:family="text">
      <style:text-properties fo:color="#cf8e6d" loext:opacity="100%" style:font-name="JetBrains Mono1" fo:font-size="10pt" fo:font-style="normal" fo:font-weight="normal" style:font-size-asian="10pt" style:font-style-asian="normal" style:font-weight-asian="normal"/>
    </style:style>
    <style:style style:name="T378" style:family="text">
      <style:text-properties fo:color="#cf8e6d" loext:opacity="100%" style:font-name="JetBrains Mono1" fo:font-size="10pt" fo:font-style="normal" fo:font-weight="normal" fo:background-color="transparent" loext:char-shading-value="0" style:font-size-asian="10pt" style:font-style-asian="normal" style:font-weight-asian="normal"/>
    </style:style>
    <style:style style:name="T379" style:family="text">
      <style:text-properties fo:color="#cf8e6d" loext:opacity="100%" style:font-name="JetBrains Mono1" fo:font-size="10pt" fo:font-style="normal" fo:font-weight="normal" officeooo:rsid="01c9808c" fo:background-color="transparent" loext:char-shading-value="0" style:font-size-asian="10pt" style:font-style-asian="normal" style:font-weight-asian="normal"/>
    </style:style>
    <style:style style:name="T380" style:family="text">
      <style:text-properties fo:color="#cf8e6d" loext:opacity="100%" style:font-name="JetBrains Mono1" fo:font-size="10pt" fo:font-style="normal" fo:font-weight="normal" officeooo:rsid="01d7ca8c" fo:background-color="transparent" loext:char-shading-value="0" style:font-size-asian="10pt" style:font-style-asian="normal" style:font-weight-asian="normal"/>
    </style:style>
    <style:style style:name="T381" style:family="text">
      <style:text-properties fo:color="#cf8e6d" loext:opacity="100%" style:font-name="Monospace" fo:font-size="10pt" fo:font-style="normal" fo:font-weight="normal" style:font-size-asian="10pt" style:font-style-asian="normal" style:font-weight-asian="normal" style:font-style-complex="normal"/>
    </style:style>
    <style:style style:name="T382" style:family="text">
      <style:text-properties fo:color="#bcbec4" loext:opacity="100%" style:font-name="JetBrains Mono1" fo:font-size="10pt" fo:font-style="normal" fo:font-weight="normal" style:font-size-asian="10pt" style:font-style-asian="normal" style:font-weight-asian="normal"/>
    </style:style>
    <style:style style:name="T383" style:family="text">
      <style:text-properties fo:color="#bcbec4" loext:opacity="100%" style:font-name="JetBrains Mono1" fo:font-size="10pt" fo:font-style="normal" fo:font-weight="normal" officeooo:rsid="01d7ca8c" style:font-size-asian="10pt" style:font-style-asian="normal" style:font-weight-asian="normal"/>
    </style:style>
    <style:style style:name="T384" style:family="text">
      <style:text-properties fo:color="#bcbec4" loext:opacity="100%" style:font-name="JetBrains Mono1" fo:font-size="10pt" fo:font-style="normal" fo:font-weight="normal" fo:background-color="transparent" loext:char-shading-value="0" style:font-size-asian="10pt" style:font-style-asian="normal" style:font-weight-asian="normal"/>
    </style:style>
    <style:style style:name="T385" style:family="text">
      <style:text-properties fo:color="#c77dbb" loext:opacity="100%" style:font-name="JetBrains Mono1" fo:font-size="10pt" fo:font-style="normal" fo:font-weight="normal" style:font-size-asian="10pt" style:font-style-asian="normal" style:font-weight-asian="normal"/>
    </style:style>
    <style:style style:name="T386" style:family="text">
      <style:text-properties fo:color="#c77dbb" loext:opacity="100%" style:font-name="JetBrains Mono1" fo:font-size="10pt" fo:font-style="normal" fo:font-weight="normal" fo:background-color="transparent" loext:char-shading-value="0" style:font-size-asian="10pt" style:font-style-asian="normal" style:font-weight-asian="normal"/>
    </style:style>
    <style:style style:name="T387" style:family="text">
      <style:text-properties fo:color="#c77dbb" loext:opacity="100%" style:font-name="JetBrains Mono1" fo:font-size="10pt" fo:font-style="italic" fo:font-weight="normal" style:font-size-asian="10pt" style:font-style-asian="italic" style:font-weight-asian="normal"/>
    </style:style>
    <style:style style:name="T388" style:family="text">
      <style:text-properties fo:color="#c77dbb" loext:opacity="100%" style:font-name="JetBrains Mono1" fo:font-size="10pt" fo:font-style="italic" fo:font-weight="normal" fo:background-color="transparent" loext:char-shading-value="0" style:font-size-asian="10pt" style:font-style-asian="italic" style:font-weight-asian="normal"/>
    </style:style>
    <style:style style:name="T389" style:family="text">
      <style:text-properties fo:color="#6aab73" loext:opacity="100%" style:font-name="JetBrains Mono1" fo:font-size="10pt" fo:font-style="normal" fo:font-weight="normal" style:font-size-asian="10pt" style:font-style-asian="normal" style:font-weight-asian="normal"/>
    </style:style>
    <style:style style:name="T390" style:family="text">
      <style:text-properties fo:color="#6aab73" loext:opacity="100%" style:font-name="JetBrains Mono1" fo:font-size="10pt" fo:font-style="normal" fo:font-weight="normal" officeooo:rsid="01d7ca8c" style:font-size-asian="10pt" style:font-style-asian="normal" style:font-weight-asian="normal"/>
    </style:style>
    <style:style style:name="T391" style:family="text">
      <style:text-properties fo:color="#6aab73" loext:opacity="100%" style:font-name="JetBrains Mono1" fo:font-size="10pt" fo:font-style="normal" fo:font-weight="normal" fo:background-color="transparent" loext:char-shading-value="0" style:font-size-asian="10pt" style:font-style-asian="normal" style:font-weight-asian="normal"/>
    </style:style>
    <style:style style:name="T392" style:family="text">
      <style:text-properties officeooo:rsid="01c18745"/>
    </style:style>
    <style:style style:name="T393" style:family="text">
      <style:text-properties officeooo:rsid="01c47d22"/>
    </style:style>
    <style:style style:name="T394" style:family="text">
      <style:text-properties fo:color="#5f826b" loext:opacity="100%" style:font-name="JetBrains Mono1" fo:font-size="10pt" fo:font-style="italic" fo:font-weight="normal" style:font-size-asian="10pt" style:font-style-asian="italic" style:font-weight-asian="normal"/>
    </style:style>
    <style:style style:name="T395" style:family="text">
      <style:text-properties fo:color="#b3ae60" loext:opacity="100%" style:font-name="JetBrains Mono1" fo:font-size="10pt" fo:font-style="normal" fo:font-weight="normal" style:font-size-asian="10pt" style:font-style-asian="normal" style:font-weight-asian="normal"/>
    </style:style>
    <style:style style:name="T396" style:family="text">
      <style:text-properties fo:color="#b3ae60" loext:opacity="100%" style:font-name="JetBrains Mono1" fo:font-size="10pt" fo:font-style="normal" fo:font-weight="normal" officeooo:rsid="01ca54b2" style:font-size-asian="10pt" style:font-style-asian="normal" style:font-weight-asian="normal"/>
    </style:style>
    <style:style style:name="T397" style:family="text">
      <style:text-properties fo:color="#b3ae60" loext:opacity="100%" style:font-name="JetBrains Mono1" fo:font-size="10pt" fo:font-style="normal" fo:font-weight="normal" fo:background-color="transparent" loext:char-shading-value="0" style:font-size-asian="10pt" style:font-style-asian="normal" style:font-weight-asian="normal"/>
    </style:style>
    <style:style style:name="T398" style:family="text">
      <style:text-properties fo:color="#b3ae60" loext:opacity="100%" style:font-name="JetBrains Mono1" fo:font-size="10pt" fo:font-style="normal" fo:font-weight="normal" officeooo:rsid="01c8f747" fo:background-color="transparent" loext:char-shading-value="0" style:font-size-asian="10pt" style:font-style-asian="normal" style:font-weight-asian="normal"/>
    </style:style>
    <style:style style:name="T399" style:family="text">
      <style:text-properties fo:color="#67a37c" loext:opacity="100%" style:font-name="JetBrains Mono1" fo:font-size="10pt" fo:font-style="italic" fo:font-weight="normal" style:font-size-asian="10pt" style:font-style-asian="italic" style:font-weight-asian="normal"/>
    </style:style>
    <style:style style:name="T400" style:family="text">
      <style:text-properties fo:color="#68a67e" loext:opacity="100%" style:font-name="JetBrains Mono1" fo:font-size="10pt" fo:font-style="italic" fo:font-weight="normal" style:font-size-asian="10pt" style:font-style-asian="italic" style:font-weight-asian="normal"/>
    </style:style>
    <style:style style:name="T401" style:family="text">
      <style:text-properties fo:color="#7a7e85" loext:opacity="100%" style:font-name="JetBrains Mono1" fo:font-size="10pt" fo:font-style="normal" fo:font-weight="normal" style:font-size-asian="10pt" style:font-style-asian="normal" style:font-weight-asian="normal"/>
    </style:style>
    <style:style style:name="T402" style:family="text">
      <style:text-properties fo:color="#7a7e85" loext:opacity="100%" style:font-name="JetBrains Mono1" fo:font-size="10pt" fo:font-style="normal" fo:font-weight="normal" fo:background-color="transparent" loext:char-shading-value="0" style:font-size-asian="10pt" style:font-style-asian="normal" style:font-weight-asian="normal"/>
    </style:style>
    <style:style style:name="T403" style:family="text">
      <style:text-properties fo:color="#56a8f5" loext:opacity="100%" style:font-name="JetBrains Mono1" fo:font-size="10pt" fo:font-style="normal" fo:font-weight="normal" style:font-size-asian="10pt" style:font-style-asian="normal" style:font-weight-asian="normal"/>
    </style:style>
    <style:style style:name="T404" style:family="text">
      <style:text-properties fo:color="#56a8f5" loext:opacity="100%" style:font-name="JetBrains Mono1" fo:font-size="10pt" fo:font-style="normal" fo:font-weight="normal" fo:background-color="transparent" loext:char-shading-value="0" style:font-size-asian="10pt" style:font-style-asian="normal" style:font-weight-asian="normal"/>
    </style:style>
    <style:style style:name="T405" style:family="text">
      <style:text-properties officeooo:rsid="01cdc65f"/>
    </style:style>
    <style:style style:name="T406" style:family="text">
      <style:text-properties officeooo:rsid="01cfc38e"/>
    </style:style>
    <style:style style:name="T407" style:family="text">
      <style:text-properties style:font-name="Consolas" officeooo:rsid="014f9ade" fo:background-color="#eeeeee" loext:char-shading-value="0"/>
    </style:style>
    <style:style style:name="T408" style:family="text">
      <style:text-properties officeooo:rsid="01d10a4a"/>
    </style:style>
    <style:style style:name="T409"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5"/>
      <text:p text:style-name="P25"><draw:g text:anchor-type="as-char" draw:z-index="0" draw:name="Forma2" draw:style-name="gr3"><draw:frame draw:name="Picture 2" draw:style-name="gr4" draw:text-style-name="P474" svg:width="13.553cm" svg:height="2.514cm" svg:x="3.438cm" svg:y="0cm"><draw:image xlink:href="Pictures/10000000000006A400000104C61E4F84145F3308.png" xlink:type="simple" xlink:show="embed" xlink:actuate="onLoad" draw:mime-type="image/png"><text:p/></draw:image></draw:frame><draw:frame draw:name="Picture 3" draw:style-name="gr5" draw:text-style-name="P474" svg:width="3.209cm" svg:height="2.511cm" svg:x="0cm" svg:y="0cm"><draw:image xlink:href="Pictures/10000001000002E6000002BB18D09AEB46C6E810.png" xlink:type="simple" xlink:show="embed" xlink:actuate="onLoad" draw:mime-type="image/png"><text:p/></draw:image></draw:frame></draw:g><text:s text:c="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pan text:style-name="T118">DISTRIBUCIO</text:span>: Manual d’integració </text:p>
      <text:p text:style-name="P23"><text:span text:style-name="T147">30</text:span><text:span text:style-name="T144"> d</text:span><text:span text:style-name="T146">e juny</text:span><text:span text:style-name="T145"> </text:span><text:span text:style-name="T143">de 202</text:span><text:span text:style-name="T146">6</text:span></text:p>
      <text:p text:style-name="P145">Serveis d’Administració Electrònica en el Govern de les Illes Balears</text:p>
      <text:p text:style-name="P144">Lot 3 (Serveis de tramitació d’expedients electrònics)</text:p>
      <text:p text:style-name="P144"/>
      <text:p text:style-name="P144"/>
      <text:p text:style-name="P144"/>
      <text:p text:style-name="P144"/>
      <text:p text:style-name="P3">Oficina Tècnica de Direcció de Projecte</text:p>
      <text:list xml:id="list2436586321" text:style-name="Outline">
        <text:list-header>
          <text:h text:style-name="P396"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9">Control de Canvis</text:p>
          </table:table-cell>
          <table:covered-table-cell/>
          <table:covered-table-cell/>
          <table:covered-table-cell/>
        </table:table-row>
        <table:table-row table:style-name="Taula1.1">
          <table:table-cell table:style-name="Taula1.A2" office:value-type="string">
            <text:p text:style-name="P8">Data</text:p>
          </table:table-cell>
          <table:table-cell table:style-name="Taula1.B2" office:value-type="string">
            <text:p text:style-name="P9">Autor</text:p>
          </table:table-cell>
          <table:table-cell table:style-name="Taula1.B2" office:value-type="string">
            <text:p text:style-name="P9">Versió</text:p>
          </table:table-cell>
          <table:table-cell table:style-name="Taula1.D2" office:value-type="string">
            <text:p text:style-name="P9">Canvis</text:p>
          </table:table-cell>
        </table:table-row>
        <table:table-row table:style-name="Taula1.1">
          <table:table-cell table:style-name="Taula1.A3" office:value-type="string">
            <text:p text:style-name="P10"><text:date style:data-style-name="N104" text:date-value="2018-10-08T11:38:43.397268354" text:fixed="true" text:date-adjust="-PT48H00M00S">6.10.18</text:date><text:s text:c="5"/></text:p>
          </table:table-cell>
          <table:table-cell table:style-name="Taula1.B3" office:value-type="string">
            <text:p text:style-name="P11">Límit Tecnologies</text:p>
          </table:table-cell>
          <table:table-cell table:style-name="Taula1.C3" office:value-type="string">
            <text:p text:style-name="P10">1.0</text:p>
          </table:table-cell>
          <table:table-cell table:style-name="Taula1.D3" office:value-type="string">
            <text:p text:style-name="P10">Versió inicial</text:p>
          </table:table-cell>
        </table:table-row>
        <table:table-row table:style-name="Taula1.1">
          <table:table-cell table:style-name="Taula1.A4" office:value-type="string">
            <text:p text:style-name="P10"><text:date style:data-style-name="N104" text:date-value="2018-12-03T10:56:48.484972687" text:fixed="true">3.12.18</text:date><text:s text:c="5"/></text:p>
          </table:table-cell>
          <table:table-cell table:style-name="Taula1.B4" office:value-type="string">
            <text:p text:style-name="P12">Límit Tecnologies</text:p>
          </table:table-cell>
          <table:table-cell table:style-name="Taula1.C4" office:value-type="string">
            <text:p text:style-name="P13">1.1</text:p>
          </table:table-cell>
          <table:table-cell table:style-name="Taula1.D4" office:value-type="string">
            <text:p text:style-name="P13"><text:span text:style-name="T117">Modificació del document segons plantilla enviada per la DGDT</text:span>.</text:p>
          </table:table-cell>
        </table:table-row>
        <table:table-row table:style-name="Taula1.1">
          <table:table-cell table:style-name="Taula1.A5" office:value-type="string">
            <text:p text:style-name="P53"><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2">Límit Tecnologies</text:p>
          </table:table-cell>
          <table:table-cell table:style-name="Taula1.C5" office:value-type="string">
            <text:p text:style-name="P13">1.<text:span text:style-name="T148">2</text:span></text:p>
          </table:table-cell>
          <table:table-cell table:style-name="Taula1.D5" office:value-type="string">
            <text:p text:style-name="P54"><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5"><text:span text:style-name="T5">2</text:span><text:span text:style-name="T6">4</text:span><text:span text:style-name="T10">/06/20</text:span></text:p>
          </table:table-cell>
          <table:table-cell table:style-name="Taula1.B6" office:value-type="string">
            <text:p text:style-name="P12">Límit Tecnologies</text:p>
          </table:table-cell>
          <table:table-cell table:style-name="Taula1.C6" office:value-type="string">
            <text:p text:style-name="P13">1.<text:span text:style-name="T268">3</text:span></text:p>
          </table:table-cell>
          <table:table-cell table:style-name="Taula1.D6" office:value-type="string">
            <text:p text:style-name="P54"><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2">10/05/23</text:p>
          </table:table-cell>
          <table:table-cell table:style-name="Taula1.B7" office:value-type="string">
            <text:p text:style-name="P14">Límit Tecnologies</text:p>
          </table:table-cell>
          <table:table-cell table:style-name="Taula1.C7" office:value-type="string">
            <text:p text:style-name="P14">1.4</text:p>
          </table:table-cell>
          <table:table-cell table:style-name="Taula1.D7" office:value-type="string">
            <text:p text:style-name="P212">Afegir punts per explicar les APIs REST d'integració per backoffices i per crear regles de distribucio de forma remota. </text:p>
          </table:table-cell>
        </table:table-row>
        <table:table-row table:style-name="Taula1.1">
          <table:table-cell table:style-name="Taula1.A8" office:value-type="string">
            <text:p text:style-name="P212"><text:span text:style-name="T337">05</text:span>/0<text:span text:style-name="T337">7</text:span>/23</text:p>
          </table:table-cell>
          <table:table-cell table:style-name="Taula1.B8" office:value-type="string">
            <text:p text:style-name="P14">Límit Tecnologies</text:p>
          </table:table-cell>
          <table:table-cell table:style-name="Taula1.C8" office:value-type="string">
            <text:p text:style-name="P14">1.<text:span text:style-name="T337">5</text:span></text:p>
          </table:table-cell>
          <table:table-cell table:style-name="Taula1.D8" office:value-type="string">
            <text:p text:style-name="P212"><text:span text:style-name="T337">Revisar documentació i exemples.</text:span> </text:p>
          </table:table-cell>
        </table:table-row>
        <table:table-row table:style-name="Taula1.1">
          <table:table-cell table:style-name="Taula1.A12" office:value-type="string">
            <text:p text:style-name="P213"><text:span text:style-name="T361">12</text:span>/0<text:span text:style-name="T361">4/</text:span>2<text:span text:style-name="T361">4</text:span></text:p>
          </table:table-cell>
          <table:table-cell table:style-name="Taula1.B12" office:value-type="string">
            <text:p text:style-name="P15">Límit Tecnologies</text:p>
          </table:table-cell>
          <table:table-cell table:style-name="Taula1.C12" office:value-type="string">
            <text:p text:style-name="P16">1.6</text:p>
          </table:table-cell>
          <table:table-cell table:style-name="Taula1.D12" office:value-type="string">
            <text:p text:style-name="P250">Revisió per a la versió 1.0<text:span text:style-name="T362">.1</text:span> de l’aplicació.</text:p>
          </table:table-cell>
        </table:table-row>
        <table:table-row table:style-name="Taula1.1">
          <table:table-cell table:style-name="Taula1.A12" office:value-type="string">
            <text:p text:style-name="P213"><text:span text:style-name="T366">09</text:span>/<text:span text:style-name="T364">1</text:span><text:span text:style-name="T366">2</text:span><text:span text:style-name="T361">/</text:span><text:span text:style-name="T364">25</text:span></text:p>
          </table:table-cell>
          <table:table-cell table:style-name="Taula1.B12" office:value-type="string">
            <text:p text:style-name="P15">Límit Tecnologies</text:p>
          </table:table-cell>
          <table:table-cell table:style-name="Taula1.C12" office:value-type="string">
            <text:p text:style-name="P16">1.<text:span text:style-name="T364">7</text:span></text:p>
          </table:table-cell>
          <table:table-cell table:style-name="Taula1.D12" office:value-type="string">
            <text:p text:style-name="P384">Nou paràmetre <text:span text:style-name="T150">tipusSia</text:span><text:span text:style-name="T178"> a l'API de regles.<text:line-break/></text:span><text:span text:style-name="T195">Informació del codi de servei i codi i nom del tràmit en la consulta d'anotacions.</text:span></text:p>
          </table:table-cell>
        </table:table-row>
        <table:table-row table:style-name="Taula1.1">
          <table:table-cell table:style-name="Taula1.A12" office:value-type="string">
            <text:p text:style-name="P385"><text:span text:style-name="T376">05</text:span>/<text:span text:style-name="T376">06</text:span>/2<text:span text:style-name="T369">6</text:span></text:p>
          </table:table-cell>
          <table:table-cell table:style-name="Taula1.B12" office:value-type="string">
            <text:p text:style-name="P17">Límit Tecnologies</text:p>
          </table:table-cell>
          <table:table-cell table:style-name="Taula1.C12" office:value-type="string">
            <text:p text:style-name="P19">1.<text:span text:style-name="T370">8</text:span></text:p>
          </table:table-cell>
          <table:table-cell table:style-name="Taula1.D12" office:value-type="string">
            <text:p text:style-name="P385"><text:span text:style-name="T369">Actualització versions llibreries client. </text:span>Revisió del Servei de gestió d<text:span text:style-name="T371">'</text:span>anotacions pels backoffices.</text:p>
          </table:table-cell>
        </table:table-row>
        <table:table-row table:style-name="Taula1.1">
          <table:table-cell table:style-name="Taula1.A12" office:value-type="string">
            <text:p text:style-name="P391"><text:span text:style-name="T405">30</text:span>/06/26</text:p>
          </table:table-cell>
          <table:table-cell table:style-name="Taula1.B12" office:value-type="string">
            <text:p text:style-name="P18">Límit Tecnologies</text:p>
          </table:table-cell>
          <table:table-cell table:style-name="Taula1.C12" office:value-type="string">
            <text:p text:style-name="P20">1.9</text:p>
          </table:table-cell>
          <table:table-cell table:style-name="Taula1.D12" office:value-type="string">
            <text:p text:style-name="P391">Actualitzar versió REST y revisar les referencies SOAP</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9">Revisat per</text:p>
          </table:table-cell>
          <table:covered-table-cell/>
          <table:covered-table-cell/>
        </table:table-row>
        <table:table-row table:style-name="Taula2.1">
          <table:table-cell table:style-name="Taula2.A2" office:value-type="string">
            <text:p text:style-name="P8">Nom</text:p>
          </table:table-cell>
          <table:table-cell table:style-name="Taula2.B2" office:value-type="string">
            <text:p text:style-name="P9">Data</text:p>
          </table:table-cell>
          <table:table-cell table:style-name="Taula2.C2" office:value-type="string">
            <text:p text:style-name="P9">Àrea, departament o empresa</text:p>
          </table:table-cell>
        </table:table-row>
        <table:table-row table:style-name="Taula2.1">
          <table:table-cell table:style-name="Taula2.A3" office:value-type="string">
            <text:p text:style-name="P10"/>
          </table:table-cell>
          <table:table-cell table:style-name="Taula2.B3" office:value-type="string">
            <text:p text:style-name="P10"/>
          </table:table-cell>
          <table:table-cell table:style-name="Taula2.C3" office:value-type="string">
            <text:p text:style-name="P10"/>
          </table:table-cell>
        </table:table-row>
        <table:table-row table:style-name="Taula2.1">
          <table:table-cell table:style-name="Taula2.A4" office:value-type="string">
            <text:p text:style-name="P146"/>
          </table:table-cell>
          <table:table-cell table:style-name="Taula2.B4" office:value-type="string">
            <text:p text:style-name="P146"/>
          </table:table-cell>
          <table:table-cell table:style-name="Taula2.C4" office:value-type="string">
            <text:p text:style-name="P146"/>
          </table:table-cell>
        </table:table-row>
        <table:table-row table:style-name="Taula2.1">
          <table:table-cell table:style-name="Taula2.A5" office:value-type="string">
            <text:p text:style-name="P146"/>
          </table:table-cell>
          <table:table-cell table:style-name="Taula2.B5" office:value-type="string">
            <text:p text:style-name="P146"/>
          </table:table-cell>
          <table:table-cell table:style-name="Taula2.C5" office:value-type="string">
            <text:p text:style-name="P146"/>
          </table:table-cell>
        </table:table-row>
        <table:table-row table:style-name="Taula2.1">
          <table:table-cell table:style-name="Taula2.A6" office:value-type="string">
            <text:p text:style-name="P146"/>
          </table:table-cell>
          <table:table-cell table:style-name="Taula2.B6" office:value-type="string">
            <text:p text:style-name="P146"/>
          </table:table-cell>
          <table:table-cell table:style-name="Taula2.C6" office:value-type="string">
            <text:p text:style-name="P14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9">Aprovat per</text:p>
          </table:table-cell>
          <table:covered-table-cell/>
          <table:covered-table-cell/>
        </table:table-row>
        <table:table-row table:style-name="Taula3.1">
          <table:table-cell table:style-name="Taula3.A2" office:value-type="string">
            <text:p text:style-name="P8">Nom</text:p>
          </table:table-cell>
          <table:table-cell table:style-name="Taula3.B2" office:value-type="string">
            <text:p text:style-name="P9">Data</text:p>
          </table:table-cell>
          <table:table-cell table:style-name="Taula3.C2" office:value-type="string">
            <text:p text:style-name="P9">Àrea, departament o empresa</text:p>
          </table:table-cell>
        </table:table-row>
        <text:soft-page-break/>
        <table:table-row table:style-name="Taula3.1">
          <table:table-cell table:style-name="Taula3.A3" office:value-type="string">
            <text:p text:style-name="P10"/>
          </table:table-cell>
          <table:table-cell table:style-name="Taula3.B3" office:value-type="string">
            <text:p text:style-name="P10"/>
          </table:table-cell>
          <table:table-cell table:style-name="Taula3.C3" office:value-type="string">
            <text:p text:style-name="P10"/>
          </table:table-cell>
        </table:table-row>
        <table:table-row table:style-name="Taula3.1">
          <table:table-cell table:style-name="Taula3.A4" office:value-type="string">
            <text:p text:style-name="P146"/>
          </table:table-cell>
          <table:table-cell table:style-name="Taula3.B4" office:value-type="string">
            <text:p text:style-name="P146"/>
          </table:table-cell>
          <table:table-cell table:style-name="Taula3.C4" office:value-type="string">
            <text:p text:style-name="P146"/>
          </table:table-cell>
        </table:table-row>
        <table:table-row table:style-name="Taula3.1">
          <table:table-cell table:style-name="Taula3.A5" office:value-type="string">
            <text:p text:style-name="P146"/>
          </table:table-cell>
          <table:table-cell table:style-name="Taula3.B5" office:value-type="string">
            <text:p text:style-name="P146"/>
          </table:table-cell>
          <table:table-cell table:style-name="Taula3.C5" office:value-type="string">
            <text:p text:style-name="P146"/>
          </table:table-cell>
        </table:table-row>
        <table:table-row table:style-name="Taula3.1">
          <table:table-cell table:style-name="Taula3.A6" office:value-type="string">
            <text:p text:style-name="P146"/>
          </table:table-cell>
          <table:table-cell table:style-name="Taula3.B6" office:value-type="string">
            <text:p text:style-name="P146"/>
          </table:table-cell>
          <table:table-cell table:style-name="Taula3.C6" office:value-type="string">
            <text:p text:style-name="P146"/>
          </table:table-cell>
        </table:table-row>
      </table:table>
      <text:p text:style-name="P1"/>
      <text:p text:style-name="P2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9">Llista de distribució</text:p>
          </table:table-cell>
          <table:covered-table-cell/>
          <table:covered-table-cell/>
        </table:table-row>
        <table:table-row table:style-name="Taula6.1">
          <table:table-cell table:style-name="Taula6.A2" office:value-type="string">
            <text:p text:style-name="P8">Nom</text:p>
          </table:table-cell>
          <table:table-cell table:style-name="Taula6.B2" office:value-type="string">
            <text:p text:style-name="P9">Àrea, departament o empresa</text:p>
          </table:table-cell>
          <table:table-cell table:style-name="Taula6.C2" office:value-type="string">
            <text:p text:style-name="P9">Correu electrònic</text:p>
          </table:table-cell>
        </table:table-row>
        <table:table-row table:style-name="Taula6.1">
          <table:table-cell table:style-name="Taula6.A3" office:value-type="string">
            <text:p text:style-name="P10"/>
          </table:table-cell>
          <table:table-cell table:style-name="Taula6.B3" office:value-type="string">
            <text:p text:style-name="P10"/>
          </table:table-cell>
          <table:table-cell table:style-name="Taula6.C3" office:value-type="string">
            <text:p text:style-name="P10"/>
          </table:table-cell>
        </table:table-row>
        <table:table-row table:style-name="Taula6.1">
          <table:table-cell table:style-name="Taula6.A4" office:value-type="string">
            <text:p text:style-name="P146"/>
          </table:table-cell>
          <table:table-cell table:style-name="Taula6.B4" office:value-type="string">
            <text:p text:style-name="P146"/>
          </table:table-cell>
          <table:table-cell table:style-name="Taula6.C4" office:value-type="string">
            <text:p text:style-name="P146"/>
          </table:table-cell>
        </table:table-row>
        <table:table-row table:style-name="Taula6.1">
          <table:table-cell table:style-name="Taula6.A5" office:value-type="string">
            <text:p text:style-name="P146"/>
          </table:table-cell>
          <table:table-cell table:style-name="Taula6.B5" office:value-type="string">
            <text:p text:style-name="P146"/>
          </table:table-cell>
          <table:table-cell table:style-name="Taula6.C5" office:value-type="string">
            <text:p text:style-name="P146"/>
          </table:table-cell>
        </table:table-row>
      </table:table>
      <text:p text:style-name="P1"><text:s text:c="5"/></text:p>
      <text:p text:style-name="P1"/>
      <text:p text:style-name="P27">Índex</text:p>
      <text:p text:style-name="P26"/>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8"><text:a xlink:type="simple" xlink:href="#__RefHeading___Toc21421_3940995463" text:style-name="Index_20_Link" text:visited-style-name="Index_20_Link">Control de versions del document<text:tab/>2</text:a></text:p>
          <text:p text:style-name="P388"><text:a xlink:type="simple" xlink:href="#__RefHeading___Toc16768_2313926538" text:style-name="Index_20_Link" text:visited-style-name="Index_20_Link">1. Objecte<text:tab/>5</text:a></text:p>
          <text:p text:style-name="P388"><text:a xlink:type="simple" xlink:href="#__RefHeading___Toc160468_1680181998" text:style-name="Index_20_Link" text:visited-style-name="Index_20_Link">2. Servei d’enviament d'anotacions<text:tab/>6</text:a></text:p>
          <text:p text:style-name="P389"><text:a xlink:type="simple" xlink:href="#__RefHeading___Toc16770_2313926538" text:style-name="Index_20_Link" text:visited-style-name="Index_20_Link">2.1. Diagrames de seqüència<text:tab/>6</text:a></text:p>
          <text:p text:style-name="P390"><text:a xlink:type="simple" xlink:href="#__RefHeading___Toc8043_1716379843" text:style-name="Index_20_Link" text:visited-style-name="Index_20_Link">2.1.1. Processament síncron<text:tab/>6</text:a></text:p>
          <text:p text:style-name="P390"><text:a xlink:type="simple" xlink:href="#__RefHeading___Toc15562_3365326968" text:style-name="Index_20_Link" text:visited-style-name="Index_20_Link">2.1.2. Processament asíncron<text:tab/>7</text:a></text:p>
          <text:p text:style-name="P389"><text:a xlink:type="simple" xlink:href="#__RefHeading___Toc227353_390838441" text:style-name="Index_20_Link" text:visited-style-name="Index_20_Link">2.2. Descripció del servei<text:tab/>8</text:a></text:p>
          <text:p text:style-name="P389"><text:a xlink:type="simple" xlink:href="#__RefHeading___Toc16772_2313926538" text:style-name="Index_20_Link" text:visited-style-name="Index_20_Link">2.3. Model de dades<text:tab/>8</text:a></text:p>
          <text:p text:style-name="P389"><text:a xlink:type="simple" xlink:href="#__RefHeading___Toc227355_390838441" text:style-name="Index_20_Link" text:visited-style-name="Index_20_Link">2.4. Utilització del servei<text:tab/>14</text:a></text:p>
          <text:p text:style-name="P388"><text:a xlink:type="simple" xlink:href="#__RefHeading___Toc160470_1680181998" text:style-name="Index_20_Link" text:visited-style-name="Index_20_Link">3. Servei de gestió d’anotacions pels backoffices<text:tab/>16</text:a></text:p>
          <text:p text:style-name="P389"><text:a xlink:type="simple" xlink:href="#__RefHeading___Toc227357_390838441" text:style-name="Index_20_Link" text:visited-style-name="Index_20_Link">3.1. Diagrama de seqüència<text:tab/>16</text:a></text:p>
          <text:p text:style-name="P389"><text:a xlink:type="simple" xlink:href="#__RefHeading___Toc227359_390838441" text:style-name="Index_20_Link" text:visited-style-name="Index_20_Link">3.2. Descripció del servei<text:tab/>18</text:a></text:p>
          <text:p text:style-name="P390"><text:a xlink:type="simple" xlink:href="#__RefHeading___Toc53751_2521683781" text:style-name="Index_20_Link" text:visited-style-name="Index_20_Link">3.2.1. Consulta d'una anotació de registre<text:tab/>18</text:a></text:p>
          <text:p text:style-name="P390"><text:a xlink:type="simple" xlink:href="#__RefHeading___Toc53753_2521683781" text:style-name="Index_20_Link" text:visited-style-name="Index_20_Link">3.2.2. Canvi d'estat d'una anotació<text:tab/>20</text:a></text:p>
          <text:p text:style-name="P389"><text:a xlink:type="simple" xlink:href="#__RefHeading___Toc227361_390838441" text:style-name="Index_20_Link" text:visited-style-name="Index_20_Link">3.3. Model de dades<text:tab/>21</text:a></text:p>
          <text:p text:style-name="P389"><text:a xlink:type="simple" xlink:href="#__RefHeading___Toc227363_390838441" text:style-name="Index_20_Link" text:visited-style-name="Index_20_Link">3.4. Utilització del servei<text:tab/>26</text:a></text:p>
          <text:p text:style-name="P388"><text:a xlink:type="simple" xlink:href="#__RefHeading___Toc227365_390838441" text:style-name="Index_20_Link" text:visited-style-name="Index_20_Link">4. Servei de gestió de regles<text:tab/>27</text:a></text:p>
          <text:p text:style-name="P389"><text:a xlink:type="simple" xlink:href="#__RefHeading___Toc227367_390838441" text:style-name="Index_20_Link" text:visited-style-name="Index_20_Link">4.1. Descripció del servei<text:tab/>27</text:a></text:p>
          <text:p text:style-name="P390"><text:a xlink:type="simple" xlink:href="#__RefHeading___Toc227369_390838441" text:style-name="Index_20_Link" text:visited-style-name="Index_20_Link">4.1.1. Crear una regla<text:tab/>28</text:a></text:p>
          <text:p text:style-name="P390"><text:a xlink:type="simple" xlink:href="#__RefHeading___Toc227371_390838441" text:style-name="Index_20_Link" text:visited-style-name="Index_20_Link">4.1.2. Canviar estat d’una regla<text:tab/>28</text:a></text:p>
          <text:p text:style-name="P390"><text:a xlink:type="simple" xlink:href="#__RefHeading___Toc227373_390838441" text:style-name="Index_20_Link" text:visited-style-name="Index_20_Link">4.1.3. Consultar informació d’una regla<text:tab/>29</text:a></text:p>
          <text:p text:style-name="P389"><text:a xlink:type="simple" xlink:href="#__RefHeading___Toc227375_390838441" text:style-name="Index_20_Link" text:visited-style-name="Index_20_Link">4.2. Utilització del servei<text:tab/>30</text:a></text:p>
          <text:p text:style-name="P388"><text:a xlink:type="simple" xlink:href="#__RefHeading___Toc60794_1326387233" text:style-name="Index_20_Link" text:visited-style-name="Index_20_Link">5. Llibreria d'utilitats pels backoffices de DISTRIBUCIO<text:tab/>32</text:a></text:p>
          <text:p text:style-name="P389"><text:a xlink:type="simple" xlink:href="#__RefHeading___Toc50902_2907556958" text:style-name="Index_20_Link" text:visited-style-name="Index_20_Link">5.1. Informació de la llibreria<text:tab/>32</text:a></text:p>
          <text:p text:style-name="P389"><text:a xlink:type="simple" xlink:href="#__RefHeading___Toc50904_2907556958" text:style-name="Index_20_Link" text:visited-style-name="Index_20_Link">5.2. Com incloure la llibreria<text:tab/>33</text:a></text:p>
          <text:p text:style-name="P389"><text:a xlink:type="simple" xlink:href="#__RefHeading___Toc366105_93553639" text:style-name="Index_20_Link" text:visited-style-name="Index_20_Link">5.3. Històric<text:tab/>34</text:a></text:p>
          <text:p text:style-name="P389"><text:a xlink:type="simple" xlink:href="#__RefHeading___Toc366107_93553639" text:style-name="Index_20_Link" text:visited-style-name="Index_20_Link">5.4. Utilitats per l'Arxiu<text:tab/>34</text:a></text:p>
          <text:p text:style-name="P390"><text:a xlink:type="simple" xlink:href="#__RefHeading___Toc50906_2907556958" text:style-name="Index_20_Link" text:visited-style-name="Index_20_Link">5.4.1. Paràmetres<text:tab/>35</text:a></text:p>
          <text:p text:style-name="P390"><text:a xlink:type="simple" xlink:href="#__RefHeading___Toc50908_2907556958" text:style-name="Index_20_Link" text:visited-style-name="Index_20_Link">5.4.2. Ús de </text:a><text:a xlink:type="simple" xlink:href="#__RefHeading___Toc50908_2907556958" text:style-name="Index_20_Link" text:visited-style-name="Index_20_Link"><text:span text:style-name="T150">BackofficeArxiuUtils</text:span></text:a><text:a xlink:type="simple" xlink:href="#__RefHeading___Toc50908_2907556958" text:style-name="Index_20_Link" text:visited-style-name="Index_20_Link"><text:tab/>36</text:a></text:p>
          <text:p text:style-name="P390"><text:a xlink:type="simple" xlink:href="#__RefHeading___Toc50910_2907556958" text:style-name="Index_20_Link" text:visited-style-name="Index_20_Link">5.4.3. Exemple Java<text:tab/>37</text:a></text:p>
          <text:p text:style-name="P389"><text:a xlink:type="simple" xlink:href="#__RefHeading___Toc50910_29075569581" text:style-name="Index_20_Link" text:visited-style-name="Index_20_Link">5.5. Utilitats per Sistra2<text:tab/>41</text:a></text:p>
          <text:p text:style-name="P390"><text:a xlink:type="simple" xlink:href="#__RefHeading___Toc366109_93553639" text:style-name="Index_20_Link" text:visited-style-name="Index_20_Link">5.5.1. Ús de </text:a><text:a xlink:type="simple" xlink:href="#__RefHeading___Toc366109_93553639" text:style-name="Index_20_Link" text:visited-style-name="Index_20_Link"><text:span text:style-name="T150">BackofficeSistra2Utils</text:span></text:a><text:a xlink:type="simple" xlink:href="#__RefHeading___Toc366109_93553639" text:style-name="Index_20_Link" text:visited-style-name="Index_20_Link"><text:tab/>42</text:a></text:p>
          <text:p text:style-name="P390"><text:a xlink:type="simple" xlink:href="#__RefHeading___Toc366111_93553639" text:style-name="Index_20_Link" text:visited-style-name="Index_20_Link">5.5.2. Exemple Java<text:tab/>43</text:a></text:p>
          <text:p text:style-name="P388"><text:a xlink:type="simple" xlink:href="#__RefHeading___Toc117515_1680181998" text:style-name="Index_20_Link" text:visited-style-name="Index_20_Link">Annex I: WSDL del backoffice<text:tab/>44</text:a></text:p>
          <text:p text:style-name="P388"><text:a xlink:type="simple" xlink:href="#__RefHeading___Toc60796_1326387233" text:style-name="Index_20_Link" text:visited-style-name="Index_20_Link">Annex II: Exemple d'ús de la llibreria de </text:a><text:a xlink:type="simple" xlink:href="#__RefHeading___Toc60796_1326387233" text:style-name="Index_20_Link" text:visited-style-name="Index_20_Link"><text:span text:style-name="T150">distribucio-backoffice-utils</text:span></text:a><text:a xlink:type="simple" xlink:href="#__RefHeading___Toc60796_1326387233" text:style-name="Index_20_Link" text:visited-style-name="Index_20_Link"><text:tab/>46</text:a></text:p>
        </text:index-body>
      </text:table-of-content>
      <text:p text:style-name="Standard"/>
      <text:p text:style-name="Text_20_body"/>
      <text:list xml:id="list181519974022717" text:continue-numbering="true" text:style-name="Outline">
        <text:list-item>
          <text:h text:style-name="P397" text:outline-level="1"><text:bookmark-start text:name="__RefHeading___Toc16768_2313926538"/>Objecte <text:bookmark-end text:name="__RefHeading___Toc16768_2313926538"/></text:h>
        </text:list-item>
      </text:list>
      <text:p text:style-name="P376"><text:span text:style-name="T338">L'objectiu d'aquest document és proporcionar </text:span>la informació necessària per a la integració amb el<text:span text:style-name="T133">s</text:span> <text:span text:style-name="T349">diferents </text:span>servei<text:span text:style-name="T133">s </text:span><text:span text:style-name="T349">que proporciona l’aplicació</text:span><text:span text:style-name="T133"> DISTRIBUCIÓ.</text:span></text:p>
      <text:p text:style-name="P225">Les aplicacions que s’integren amb distribució pertanyen a un dels següents grups:</text:p>
      <text:list xml:id="list2453536782" text:style-name="L1">
        <text:list-item>
          <text:p text:style-name="P454">Aplicacions de registre: aquestes aplicacions recullen les anotacions del registre d’entrada i les donen d’alta a distribució.</text:p>
        </text:list-item>
        <text:list-item>
          <text:p text:style-name="P454">Backoffices: aquestes aplicacions son les encarregades de processar les anotacions de registre.</text:p>
        </text:list-item>
      </text:list>
      <text:p text:style-name="P225">Les aplicacions de registre fan us del servei d’enviament d’anotacions de registre per a donar-les d’alta a DISTRIBUCIÓ i que comenci el seu processament.</text:p>
      <text:p text:style-name="P225">Per a cada anotació de registre, DISTRIBUCIÓ s’encarrega de calcular el backoffice encarregat del seu processament (mitjançant l’aplicació de regles) i d’informar a aquests backoffices de les anotacions pendents de processar.</text:p>
      <text:p text:style-name="P225">Els backoffices consulten les anotacions de registre a DISTRIBUCIÓ i canvien el seu estat una vegada les han processat.</text:p>
      <text:p text:style-name="P379"><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5"/>
      <text:p text:style-name="P156">A l'apartat <text:bookmark-ref text:reference-format="number" text:ref-name="__RefNumPara__81015_1680181998">2</text:bookmark-ref><text:span text:style-name="T339"><text:s/></text:span>es <text:span text:style-name="T353">descriu el servei d’enviament d’anotacions</text:span> de registre a DISTRIBUCIÓ.</text:p>
      <text:p text:style-name="P157">A l'apartat <text:bookmark-ref text:reference-format="number" text:ref-name="__RefNumPara__52044_2521683781">Error: Reference source not found</text:bookmark-ref><text:span text:style-name="T339"><text:s/></text:span>es <text:span text:style-name="T353">mostra</text:span> com <text:span text:style-name="T352">implementar el servei dels backoffices que rep la llista d’anotacions pendents de processar de</text:span> DISTRIBUCIÓ.</text:p>
      <text:p text:style-name="P157">A l'apartat <text:bookmark-ref text:reference-format="number" text:ref-name="__RefNumPara__81017_1680181998">3</text:bookmark-ref><text:span text:style-name="T339"><text:s/></text:span>es <text:span text:style-name="T355">descriu el servei </text:span><text:span text:style-name="T354">que permet </text:span><text:span text:style-name="T356">als backoffices </text:span><text:span text:style-name="T355">consultar i </text:span><text:span text:style-name="T354">canviar l’estat de les anotacions</text:span><text:span text:style-name="T355"> </text:span><text:span text:style-name="T356">informades des </text:span><text:span text:style-name="T355">de </text:span>DISTRIBUCIÓ<text:span text:style-name="T340">.</text:span></text:p>
      <text:p text:style-name="P156">A l'apartat <text:bookmark-ref text:reference-format="number" text:ref-name="__RefNumPara__52573_2521683781">5</text:bookmark-ref><text:span text:style-name="T339"><text:s/></text:span>es <text:span text:style-name="T355">descriu el servei que permet gestionar les regles de </text:span>DISTRIBUCIÓ<text:span text:style-name="T340">.</text:span></text:p>
      <text:p text:style-name="P378">A l'apartat <text:bookmark-ref text:reference-format="number-all-superior" text:ref-name="__RefHeading___Toc60794_1326387233">5</text:bookmark-ref><text:s/>es detalla la llibreria d'utilitats comunes de <text:span text:style-name="T134">DISTRIBUCIÓ</text:span> per a backoffices per moure els documents annexos dins de l'Arxiu o per interpretar la informació XML de formularis i pagaments provinents de SISTRA2.</text:p>
      <text:list xml:id="list181521305605783" text:continue-list="list181519974022717" text:style-name="Outline">
        <text:list-item>
          <text:h text:style-name="P398" text:outline-level="1"><text:bookmark-start text:name="__RefNumPara__81015_1680181998"/><text:bookmark-start text:name="__RefHeading___Toc160468_1680181998"/><text:span text:style-name="T346">Servei d’e</text:span>nviament d'anotacions <text:bookmark-end text:name="__RefNumPara__81015_1680181998"/><text:bookmark-end text:name="__RefHeading___Toc160468_1680181998"/></text:h>
        </text:list-item>
      </text:list>
      <text:p text:style-name="P227">Aquest servei permet l’enviament d’anotacions de registre a una de les bústies de distribució. Aquest enviament es pot fer de forma síncrona o de forma asíncrona.</text:p>
      <text:p text:style-name="P227"><text:span text:style-name="T341">En aquest apartat es descriu</text:span>en<text:span text:style-name="T341"> e</text:span>ls casos d’ús<text:span text:style-name="T341">, el model de dades i els detalls i el client per a la seva integració.</text:span></text:p>
      <text:p text:style-name="P235"><draw:frame draw:style-name="fr3" draw:name="Marc2" text:anchor-type="as-char" svg:width="9.895cm" draw:z-index="68"><draw:text-box fo:min-height="6.932cm"><text:p text:style-name="P222"><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34"><text:sequence text:ref-name="refFig.0" text:name="Fig." text:formula="ooow:Fig.+1" style:num-format="1">1</text:sequence></text:span>: <text:s/><text:span text:style-name="T339">Casos d'ús </text:span><text:span text:style-name="T348">de l’enviament</text:span><text:span text:style-name="T341"> d'anotacions a </text:span><text:span text:style-name="T339">DISTRIBUCIO</text:span></text:p></draw:text-box></draw:frame></text:p>
      <text:list xml:id="list181521168198386" text:continue-numbering="true" text:style-name="Outline">
        <text:list-item>
          <text:list>
            <text:list-item>
              <text:h text:style-name="P404" text:outline-level="2"><text:bookmark-start text:name="__RefHeading___Toc16770_2313926538"/>Diagrames d<text:span text:style-name="T348">e seqüència</text:span><text:bookmark-end text:name="__RefHeading___Toc16770_2313926538"/></text:h>
            </text:list-item>
          </text:list>
        </text:list-item>
      </text:list>
      <text:p text:style-name="P150">Segons la configuració de l’aplicació, el processament de l’anotació de registre es <text:span text:style-name="T120">pot dur</text:span> a terme de forma síncrona o de forma asíncrona.</text:p>
      <text:list xml:id="list181520034827014" text:continue-numbering="true" text:style-name="Outline">
        <text:list-item>
          <text:list>
            <text:list-item>
              <text:list>
                <text:list-item>
                  <text:h text:style-name="P417" text:outline-level="3"><text:bookmark-start text:name="__RefHeading___Toc8043_1716379843"/><text:span text:style-name="T347">Processament</text:span> síncron<text:bookmark-end text:name="__RefHeading___Toc8043_1716379843"/></text:h>
                </text:list-item>
              </text:list>
            </text:list-item>
          </text:list>
        </text:list-item>
      </text:list>
      <text:p text:style-name="P152">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8"/>
      <text:p text:style-name="P149"><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3"/>
      <text:p text:style-name="P151">La resposta retornada al client podrà retornar un error si alguna de les passes efectuades no s’ha pogut completar correctament.</text:p>
      <text:list xml:id="list181520521270479" text:continue-numbering="true" text:style-name="Outline">
        <text:list-item>
          <text:list>
            <text:list-item>
              <text:list>
                <text:list-item>
                  <text:h text:style-name="P417" text:outline-level="3"><text:bookmark-start text:name="__RefHeading___Toc15562_3365326968"/><text:span text:style-name="T347">Processament</text:span> asíncron<text:bookmark-end text:name="__RefHeading___Toc15562_3365326968"/></text:h>
                </text:list-item>
              </text:list>
            </text:list-item>
          </text:list>
        </text:list-item>
      </text:list>
      <text:p text:style-name="P151">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1"/>
      <text:p text:style-name="P147"><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1"><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81520793627064" text:continue-numbering="true" text:style-name="Outline">
        <text:list-item>
          <text:list>
            <text:list-item>
              <text:h text:style-name="P405"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86"><text:span text:style-name="T346">Aquest servei</text:span> <text:span text:style-name="T346">disposa d’un únic mètode</text:span><text:span text:style-name="T130"> </text:span><text:span text:style-name="T46">enviarAnotacioRegistreEntrada</text:span> <text:span text:style-name="T130">que </text:span><text:span text:style-name="T346">permet l’enviament d’</text:span><text:span text:style-name="T130">anotacions provinents del registre d’entrada.</text:span><text:span text:style-name="T372">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69">Enviament d’anotacions de registre</text:p>
          </table:table-cell>
          <table:covered-table-cell/>
        </table:table-row>
        <table:table-row table:style-name="Taula12.1">
          <table:table-cell table:style-name="Taula12.A2" office:value-type="string">
            <text:p text:style-name="P42">Adreça</text:p>
          </table:table-cell>
          <table:table-cell table:style-name="Taula12.B2" office:value-type="string">
            <text:p text:style-name="P51">http<text:span text:style-name="T346">s</text:span>://<text:span text:style-name="T346">DISTRIB_HOST</text:span>/distribucio<text:span text:style-name="T372">api</text:span>/<text:span text:style-name="T372">interna/</text:span>bustia<text:span text:style-name="T372">/alta</text:span></text:p>
          </table:table-cell>
        </table:table-row>
        <table:table-row table:style-name="Taula12.1">
          <table:table-cell table:style-name="Taula12.A2" office:value-type="string">
            <text:p text:style-name="P42">Autenticació</text:p>
          </table:table-cell>
          <table:table-cell table:style-name="Taula12.B3" office:value-type="string">
            <text:p text:style-name="P229">HTTP Basic</text:p>
          </table:table-cell>
        </table:table-row>
        <table:table-row table:style-name="Taula12.1">
          <table:table-cell table:style-name="Taula12.A2" office:value-type="string">
            <text:p text:style-name="P42">Rols requerits</text:p>
          </table:table-cell>
          <table:table-cell table:style-name="Taula12.B4" office:value-type="string">
            <text:p text:style-name="P48">DIS_BSTWS</text:p>
          </table:table-cell>
        </table:table-row>
        <table:table-row table:style-name="Taula12.1">
          <table:table-cell table:style-name="Taula12.A2" office:value-type="string">
            <text:p text:style-name="P42">Mètode</text:p>
          </table:table-cell>
          <table:table-cell table:style-name="Taula12.B5" office:value-type="string">
            <text:p text:style-name="P372">enviarAnotacioRegistreEntrada</text:p>
          </table:table-cell>
        </table:table-row>
        <table:table-row table:style-name="Taula12.1">
          <table:table-cell table:style-name="Taula12.A2" office:value-type="string">
            <text:p text:style-name="P42">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29">Nom</text:p>
                </table:table-cell>
                <table:table-cell table:style-name="Taula13.A1" office:value-type="string">
                  <text:p text:style-name="P229">Tipus</text:p>
                </table:table-cell>
                <table:table-cell table:style-name="Taula13.C1" office:value-type="string">
                  <text:p text:style-name="P229">Descripció</text:p>
                </table:table-cell>
              </table:table-row>
              <table:table-row table:style-name="TableLine776774176">
                <table:table-cell table:style-name="Taula13.A2" office:value-type="string">
                  <text:p text:style-name="P48">entitat</text:p>
                </table:table-cell>
                <table:table-cell table:style-name="Taula13.B2" office:value-type="string">
                  <text:p text:style-name="P229">String</text:p>
                </table:table-cell>
                <table:table-cell table:style-name="Taula13.C2" office:value-type="string">
                  <text:p text:style-name="P48">El codi de l’entitat de DISTRIBUCIO a on es vol donar d’alta l’anotació.</text:p>
                </table:table-cell>
              </table:table-row>
              <table:table-row table:style-name="TableLine776798944">
                <table:table-cell table:style-name="Taula13.A3" office:value-type="string">
                  <text:p text:style-name="P48">unitatAdministrativa</text:p>
                </table:table-cell>
                <table:table-cell table:style-name="Taula13.B3" office:value-type="string">
                  <text:p text:style-name="P229">String</text:p>
                </table:table-cell>
                <table:table-cell table:style-name="Taula13.C3" office:value-type="string">
                  <text:p text:style-name="P48">El codi DIR3 de la unitat administrativa destinatària de l’anotació de registre.</text:p>
                </table:table-cell>
              </table:table-row>
              <table:table-row table:style-name="TableLine776760640">
                <table:table-cell table:style-name="Taula13.A4" office:value-type="string">
                  <text:p text:style-name="P48">registreEntrada</text:p>
                </table:table-cell>
                <table:table-cell table:style-name="Taula13.B4" office:value-type="string">
                  <text:p text:style-name="P229">RegistreAnotacio</text:p>
                </table:table-cell>
                <table:table-cell table:style-name="Taula13.C4" office:value-type="string">
                  <text:p text:style-name="P48">objecte amb la informació associada a l’anotació de registre</text:p>
                </table:table-cell>
              </table:table-row>
            </table:table>
            <text:p text:style-name="P48"/>
          </table:table-cell>
        </table:table-row>
        <table:table-row table:style-name="Taula12.1">
          <table:table-cell table:style-name="Taula12.A2" office:value-type="string">
            <text:p text:style-name="P42">Valor retornat</text:p>
          </table:table-cell>
          <table:table-cell table:style-name="Taula12.B7" office:value-type="string">
            <text:p text:style-name="P229">(no retorna cap valor)</text:p>
          </table:table-cell>
        </table:table-row>
      </table:table>
      <text:p text:style-name="P373"/>
      <text:p text:style-name="P375">Per a més informació sobre com emplenar correctament l’objecte de tipus RegistreEntrada es pot consultar el punt <text:bookmark-ref text:reference-format="number" text:ref-name="__RefNumPara__80988_1680181998">2.3</text:bookmark-ref><text:s/>d’aquest mateix document.</text:p>
      <text:p text:style-name="P375">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81520580963937" text:continue-numbering="true" text:style-name="Outline">
        <text:list-item>
          <text:list>
            <text:list-item>
              <text:h text:style-name="P409" text:outline-level="2"><text:bookmark-start text:name="__RefNumPara__80988_1680181998"/><text:bookmark-start text:name="__RefHeading___Toc16772_2313926538"/>Model de <text:span text:style-name="T346">dades</text:span> <text:bookmark-end text:name="__RefNumPara__80988_1680181998"/><text:bookmark-end text:name="__RefHeading___Toc16772_2313926538"/></text:h>
            </text:list-item>
          </text:list>
        </text:list-item>
      </text:list>
      <text:p text:style-name="P374">Aquest és el model de <text:span text:style-name="T346">dades</text:span> del servei d’<text:span text:style-name="T119">enviament d’anotacions de registre</text:span>.</text:p>
      <text:p text:style-name="P374"><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8"><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776788000">
          <table:table-cell table:style-name="Taula17.A1" table:number-columns-spanned="5" office:value-type="string">
            <text:p text:style-name="P140">RegistreAnotacio</text:p>
          </table:table-cell>
          <table:covered-table-cell/>
          <table:covered-table-cell/>
          <table:covered-table-cell/>
          <table:covered-table-cell/>
        </table:table-row>
        <table:table-row table:style-name="TableLine776769568">
          <table:table-cell table:style-name="Taula17.A2" office:value-type="string">
            <text:p text:style-name="P35">Nom del camp</text:p>
          </table:table-cell>
          <table:table-cell table:style-name="Taula17.A2" office:value-type="string">
            <text:p text:style-name="P35">Tipus</text:p>
          </table:table-cell>
          <table:table-cell table:style-name="Taula17.A2" office:value-type="string">
            <text:p text:style-name="P35">Mult.</text:p>
          </table:table-cell>
          <table:table-cell table:style-name="Taula17.A2" office:value-type="string">
            <text:p text:style-name="P37">Tamany</text:p>
          </table:table-cell>
          <table:table-cell table:style-name="Taula17.E2" office:value-type="string">
            <text:p text:style-name="P37">Descripció</text:p>
          </table:table-cell>
        </table:table-row>
        <table:table-row table:style-name="TableLine776809888">
          <table:table-cell table:style-name="Taula17.A3" office:value-type="string">
            <text:p text:style-name="P251">tipusES</text:p>
          </table:table-cell>
          <table:table-cell table:style-name="Taula17.A3" office:value-type="string">
            <text:p text:style-name="P251">Cadena</text:p>
          </table:table-cell>
          <table:table-cell table:style-name="Taula17.A3" office:value-type="string">
            <text:p text:style-name="P252">0..1</text:p>
          </table:table-cell>
          <table:table-cell table:style-name="Taula17.D3" office:value-type="float" office:value="1">
            <text:p text:style-name="P252">1</text:p>
          </table:table-cell>
          <table:table-cell table:style-name="Taula17.E4" office:value-type="string">
            <text:p text:style-name="P251">Tipus d'assentament registral:<text:line-break/>- "E": entrada<text:line-break/>- "S": sortida<text:line-break/>El camp no és obligatori i si no s'informa es prendrà "E" per defecte.</text:p>
          </table:table-cell>
        </table:table-row>
        <table:table-row table:style-name="TableLine776744800">
          <table:table-cell table:style-name="Taula17.A3" office:value-type="string">
            <text:p text:style-name="P254">numero</text:p>
          </table:table-cell>
          <table:table-cell table:style-name="Taula17.A3" office:value-type="string">
            <text:p text:style-name="P255">Cadena</text:p>
          </table:table-cell>
          <table:table-cell table:style-name="Taula17.D3" office:value-type="float" office:value="1">
            <text:p text:style-name="P256">1</text:p>
          </table:table-cell>
          <table:table-cell table:style-name="Taula17.D3" office:value-type="float" office:value="255">
            <text:p text:style-name="P351"><text:span text:style-name="T270">2</text:span>5<text:span text:style-name="T270">5</text:span></text:p>
          </table:table-cell>
          <table:table-cell table:style-name="Taula17.E4" office:value-type="string">
            <text:p text:style-name="P258">Número identificador de l’assentament registral. És únic.</text:p>
          </table:table-cell>
        </table:table-row>
        <table:table-row table:style-name="TableLine776743648">
          <table:table-cell table:style-name="Taula17.A3" office:value-type="string">
            <text:p text:style-name="P254">data</text:p>
          </table:table-cell>
          <table:table-cell table:style-name="Taula17.A3" office:value-type="string">
            <text:p text:style-name="P260">Data</text:p>
          </table:table-cell>
          <table:table-cell table:style-name="Taula17.A3" office:value-type="string">
            <text:p text:style-name="P256">1</text:p>
          </table:table-cell>
          <table:table-cell table:style-name="Taula17.A3" office:value-type="string">
            <text:p text:style-name="P262">14</text:p>
          </table:table-cell>
          <table:table-cell table:style-name="Taula17.E5" office:value-type="string">
            <text:p text:style-name="P260">Data de <text:span text:style-name="T121">l’assentament.</text:span> </text:p>
          </table:table-cell>
        </table:table-row>
        <table:table-row table:style-name="TableLine776742784">
          <table:table-cell table:style-name="Taula17.A3" office:value-type="string">
            <text:p text:style-name="P254"><text:span text:style-name="T122">d</text:span>ataOrigen</text:p>
          </table:table-cell>
          <table:table-cell table:style-name="Taula17.A3" office:value-type="string">
            <text:p text:style-name="P260">Data</text:p>
          </table:table-cell>
          <table:table-cell table:style-name="Taula17.A3" office:value-type="string">
            <text:p text:style-name="P256">0..1</text:p>
          </table:table-cell>
          <table:table-cell table:style-name="Taula17.A3" office:value-type="string">
            <text:p text:style-name="P263">14</text:p>
          </table:table-cell>
          <table:table-cell table:style-name="Taula17.E6" office:value-type="string">
            <text:p text:style-name="P260">Data <text:span text:style-name="T121">origen </text:span>de l’assentament.</text:p>
          </table:table-cell>
        </table:table-row>
        <table:table-row table:style-name="TableLine776743360">
          <table:table-cell table:style-name="Taula17.A3" office:value-type="string">
            <text:p text:style-name="P265">identificador</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351">1<text:span text:style-name="T272">00</text:span></text:p>
          </table:table-cell>
          <table:table-cell table:style-name="Taula17.E7" office:value-type="string">
            <text:p text:style-name="P258">Codi identificador de l’assentament registral.</text:p>
          </table:table-cell>
        </table:table-row>
        <table:table-row table:style-name="TableLine776762080">
          <table:table-cell table:style-name="Taula17.A3" office:value-type="string">
            <text:p text:style-name="P265">entitat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3">2<text:span text:style-name="T270">55</text:span></text:p>
          </table:table-cell>
          <table:table-cell table:style-name="Taula17.E8" office:value-type="string">
            <text:p text:style-name="P258">Codi <text:span text:style-name="T123">DIR3 </text:span>de l’entitat governamental a la que va dirigit l’assentament registral.</text:p>
          </table:table-cell>
        </table:table-row>
        <table:table-row table:style-name="TableLine776740768">
          <table:table-cell table:style-name="Taula17.A3" office:value-type="string">
            <text:p text:style-name="P265">entitat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4">2<text:span text:style-name="T270">55</text:span></text:p>
          </table:table-cell>
          <table:table-cell table:style-name="Taula17.E9" office:value-type="string">
            <text:p text:style-name="P258"><text:span text:style-name="T123">Descripció DIR3</text:span> de l’entitat governamental a la que va dirigit l’assentament registral.</text:p>
          </table:table-cell>
        </table:table-row>
        <table:table-row table:style-name="TableLine776741344">
          <table:table-cell table:style-name="Taula17.A3" office:value-type="string">
            <text:p text:style-name="P265">oficina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21</text:p>
          </table:table-cell>
          <table:table-cell table:style-name="Taula17.E10" office:value-type="string">
            <text:p text:style-name="P270">Codi DIR3 de l’oficina on es registre.</text:p>
          </table:table-cell>
        </table:table-row>
        <table:table-row table:style-name="TableLine776772736">
          <table:table-cell table:style-name="Taula17.A3" office:value-type="string">
            <text:p text:style-name="P265">oficin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text:span text:style-name="T271">3</text:span>00</text:p>
          </table:table-cell>
          <table:table-cell table:style-name="Taula17.E11" office:value-type="string">
            <text:p text:style-name="P260">Denominació DIR3 de l'entitat registral on es registre l'assentament.</text:p>
          </table:table-cell>
        </table:table-row>
        <table:table-row table:style-name="TableLine776739040">
          <table:table-cell table:style-name="Taula17.A3" office:value-type="string">
            <text:p text:style-name="P265">oficinaOrige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1</text:p>
          </table:table-cell>
          <table:table-cell table:style-name="Taula17.E12" office:value-type="string">
            <text:p text:style-name="P260"/>
          </table:table-cell>
        </table:table-row>
        <table:table-row table:style-name="TableLine776739616">
          <table:table-cell table:style-name="Taula17.A3" office:value-type="string">
            <text:p text:style-name="P265">oficinaOrigen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13" office:value-type="string">
            <text:p text:style-name="P260"/>
          </table:table-cell>
        </table:table-row>
        <table:table-row table:style-name="TableLine776766112">
          <table:table-cell table:style-name="Taula17.A3" office:value-type="string">
            <text:p text:style-name="P265">llibre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4</text:p>
          </table:table-cell>
          <table:table-cell table:style-name="Taula17.E14" office:value-type="string">
            <text:p text:style-name="P270">Codi del llibre al qual s’ha fet l’assentament registral rebut.</text:p>
          </table:table-cell>
        </table:table-row>
        <table:table-row table:style-name="TableLine776745664">
          <table:table-cell table:style-name="Taula17.A3" office:value-type="string">
            <text:p text:style-name="P265">llibre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89">255</text:p>
          </table:table-cell>
          <table:table-cell table:style-name="Taula17.E15" office:value-type="string">
            <text:p text:style-name="P270">Denominació del llibre al qual s’ha fet l’assentament registral rebut.</text:p>
          </table:table-cell>
        </table:table-row>
        <table:table-row table:style-name="TableLine776745088">
          <table:table-cell table:style-name="Taula17.A3" office:value-type="string">
            <text:p text:style-name="P265">extracte</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72">240</text:p>
          </table:table-cell>
          <table:table-cell table:style-name="Taula17.E16" office:value-type="string">
            <text:p text:style-name="P260">Extracte o resum de l'assentament.</text:p>
          </table:table-cell>
        </table:table-row>
        <table:table-row table:style-name="TableLine776743072">
          <table:table-cell table:style-name="Taula17.A3" office:value-type="string">
            <text:p text:style-name="P265">assumpteTipusCodi</text:p>
          </table:table-cell>
          <table:table-cell table:style-name="Taula17.A3" office:value-type="string">
            <text:p text:style-name="P266">Cadena</text:p>
          </table:table-cell>
          <table:table-cell table:style-name="Taula17.A3" office:value-type="string">
            <text:p text:style-name="P267"><text:span text:style-name="T142">0..</text:span>1</text:p>
          </table:table-cell>
          <table:table-cell table:style-name="Taula17.A3" office:value-type="string">
            <text:p text:style-name="P263">16</text:p>
          </table:table-cell>
          <table:table-cell table:style-name="Taula17.E17" office:value-type="string">
            <text:p text:style-name="P270">Codi del tipus d’assumpte de l’assentament registral.</text:p>
          </table:table-cell>
        </table:table-row>
        <table:table-row table:style-name="TableLine776747680">
          <table:table-cell table:style-name="Taula17.A3" office:value-type="string">
            <text:p text:style-name="P265">assumpteTipus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18" office:value-type="string">
            <text:p text:style-name="P270">Denominació del tipus d’assumpte de l’assentament registral.</text:p>
          </table:table-cell>
        </table:table-row>
        <table:table-row table:style-name="TableLine776747104">
          <table:table-cell table:style-name="Taula17.A3" office:value-type="string">
            <text:p text:style-name="P265">assumpte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16</text:p>
          </table:table-cell>
          <table:table-cell table:style-name="Taula17.E19" office:value-type="string">
            <text:p text:style-name="P270">Codi de l’assumpte.</text:p>
          </table:table-cell>
        </table:table-row>
        <table:table-row table:style-name="TableLine776741056">
          <table:table-cell table:style-name="Taula17.A3" office:value-type="string">
            <text:p text:style-name="P265"><text:span text:style-name="T123">a</text:span>ssumpte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1">2<text:span text:style-name="T273">55</text:span></text:p>
          </table:table-cell>
          <table:table-cell table:style-name="Taula17.E20" office:value-type="string">
            <text:p text:style-name="P270">Denominació de l’assumpte.</text:p>
          </table:table-cell>
        </table:table-row>
        <table:table-row table:style-name="TableLine776750272">
          <table:table-cell table:style-name="Taula17.A3" office:value-type="string">
            <text:p text:style-name="P265">referenci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16</text:p>
          </table:table-cell>
          <table:table-cell table:style-name="Taula17.E21" office:value-type="string">
            <text:p text:style-name="P260">Referència externa a qualque element de l'assentament.</text:p>
          </table:table-cell>
        </table:table-row>
        <table:table-row table:style-name="TableLine776749984">
          <table:table-cell table:style-name="Taula17.A3" office:value-type="string">
            <text:p text:style-name="P265">expedientNumer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80</text:p>
          </table:table-cell>
          <table:table-cell table:style-name="Taula17.E22" office:value-type="string">
            <text:p text:style-name="P260">Referència al nombre d'expedient de l'assentament.</text:p>
          </table:table-cell>
        </table:table-row>
        <table:table-row table:style-name="TableLine776739328">
          <table:table-cell table:style-name="Taula17.A3" office:value-type="string">
            <text:p text:style-name="P265">numeroOrigen</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80</text:p>
          </table:table-cell>
          <table:table-cell table:style-name="Taula17.E23" office:value-type="string">
            <text:p text:style-name="P260"/>
          </table:table-cell>
        </table:table-row>
        <table:table-row table:style-name="TableLine776752864">
          <table:table-cell table:style-name="Taula17.A3" office:value-type="string">
            <text:p text:style-name="P265">idioma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2</text:p>
          </table:table-cell>
          <table:table-cell table:style-name="Taula17.E24" office:value-type="string">
            <text:p text:style-name="P274">Codi d’idioma amb el que s’ha fet l’assentament.</text:p>
          </table:table-cell>
        </table:table-row>
        <text:soft-page-break/>
        <table:table-row table:style-name="TableLine776751712">
          <table:table-cell table:style-name="Taula17.A3" office:value-type="string">
            <text:p text:style-name="P265">idiom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25" office:value-type="string">
            <text:p text:style-name="P274">Descripció d’idioma amb el que s’ha fet l’assentament.</text:p>
          </table:table-cell>
        </table:table-row>
        <table:table-row table:style-name="TableLine776745376">
          <table:table-cell table:style-name="Taula17.A3" office:value-type="string">
            <text:p text:style-name="P266">transportTipus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text:span text:style-name="T274">0</text:span></text:p>
          </table:table-cell>
          <table:table-cell table:style-name="Taula17.E26" office:value-type="string">
            <text:p text:style-name="P260">Codi SICRES3 del segment internos – tipo transporte.</text:p>
          </table:table-cell>
        </table:table-row>
        <table:table-row table:style-name="TableLine776754304">
          <table:table-cell table:style-name="Taula17.A3" office:value-type="string">
            <text:p text:style-name="P266">transportTipus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27" office:value-type="string">
            <text:p text:style-name="P260">Descripció SICRES3 del segment internos – tipo transporte.</text:p>
          </table:table-cell>
        </table:table-row>
        <table:table-row table:style-name="TableLine776753728">
          <table:table-cell table:style-name="Taula17.A3" office:value-type="string">
            <text:p text:style-name="P266">transportNumer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0</text:p>
          </table:table-cell>
          <table:table-cell table:style-name="Taula17.E28" office:value-type="string">
            <text:p text:style-name="P260">Número del transport.</text:p>
          </table:table-cell>
        </table:table-row>
        <table:table-row table:style-name="TableLine776747392">
          <table:table-cell table:style-name="Taula17.A3" office:value-type="string">
            <text:p text:style-name="P266">usuari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0</text:p>
          </table:table-cell>
          <table:table-cell table:style-name="Taula17.E29" office:value-type="string">
            <text:p text:style-name="P260">Codi de l'usuari que vol realitzar l'operació.</text:p>
          </table:table-cell>
        </table:table-row>
        <table:table-row table:style-name="TableLine776756320">
          <table:table-cell table:style-name="Taula17.A3" office:value-type="string">
            <text:p text:style-name="P266">usuariNom</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3">7<text:span text:style-name="T275">67</text:span></text:p>
          </table:table-cell>
          <table:table-cell table:style-name="Taula17.E30" office:value-type="string">
            <text:p text:style-name="P260"><text:span text:style-name="T124">Nom</text:span> de l'usuari que vol realitzar l'operació.</text:p>
          </table:table-cell>
        </table:table-row>
        <table:table-row table:style-name="TableLine776755744">
          <table:table-cell table:style-name="Taula17.A3" office:value-type="string">
            <text:p text:style-name="P266">usuariContacte</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1">2<text:span text:style-name="T276">55</text:span></text:p>
          </table:table-cell>
          <table:table-cell table:style-name="Taula17.E31" office:value-type="string">
            <text:p text:style-name="P260">Contacte de l'usuari que fa l'assentament. Si és un registre electrònic el responsable del tràmit.</text:p>
          </table:table-cell>
        </table:table-row>
        <table:table-row table:style-name="TableLine776749120">
          <table:table-cell table:style-name="Taula17.A3" office:value-type="string">
            <text:p text:style-name="P266">aplicacio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1">2<text:span text:style-name="T277">55</text:span></text:p>
          </table:table-cell>
          <table:table-cell table:style-name="Taula17.E32" office:value-type="string">
            <text:p text:style-name="P274">Codi de l’aplicació que fa l’enviament de l’assentament registral.</text:p>
          </table:table-cell>
        </table:table-row>
        <table:table-row table:style-name="TableLine776759488">
          <table:table-cell table:style-name="Taula17.A3" office:value-type="string">
            <text:p text:style-name="P266">aplicacioVers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1">2<text:span text:style-name="T277">55</text:span></text:p>
          </table:table-cell>
          <table:table-cell table:style-name="Taula17.E33" office:value-type="string">
            <text:p text:style-name="P274">Versió de l’aplicació que fa l’enviament de l’assentament registral.</text:p>
          </table:table-cell>
        </table:table-row>
        <table:table-row table:style-name="TableLine776758048">
          <table:table-cell table:style-name="Taula17.A3" office:value-type="string">
            <text:p text:style-name="P266">documentacioFisica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6">19</text:p>
          </table:table-cell>
          <table:table-cell table:style-name="Taula17.E34" office:value-type="string">
            <text:p text:style-name="P260">Codi SICRES del segment internos – Documentación física y/o soportes.</text:p>
          </table:table-cell>
        </table:table-row>
        <table:table-row table:style-name="TableLine776752288">
          <table:table-cell table:style-name="Taula17.A3" office:value-type="string">
            <text:p text:style-name="P266">documentacioFisic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35" office:value-type="string">
            <text:p text:style-name="P274">Descripció del segment internos – Documentación física y/o soportes</text:p>
          </table:table-cell>
        </table:table-row>
        <table:table-row table:style-name="TableLine776762368">
          <table:table-cell table:style-name="Taula17.A3" office:value-type="string">
            <text:p text:style-name="P266">observacions</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50</text:p>
          </table:table-cell>
          <table:table-cell table:style-name="Taula17.E36" office:value-type="string">
            <text:p text:style-name="P274">Observacions de l’assentament.</text:p>
          </table:table-cell>
        </table:table-row>
        <table:table-row table:style-name="TableLine776761504">
          <table:table-cell table:style-name="Taula17.A3" office:value-type="string">
            <text:p text:style-name="P266">expos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7">lob</text:p>
          </table:table-cell>
          <table:table-cell table:style-name="Taula17.E37" office:value-type="string">
            <text:p text:style-name="P274">Exposició de fets.</text:p>
          </table:table-cell>
        </table:table-row>
        <table:table-row table:style-name="TableLine776754592">
          <table:table-cell table:style-name="Taula17.A3" office:value-type="string">
            <text:p text:style-name="P266">solicit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7">lob</text:p>
          </table:table-cell>
          <table:table-cell table:style-name="Taula17.E38" office:value-type="string">
            <text:p text:style-name="P274">Objecte de la sol·licitud si escau.</text:p>
          </table:table-cell>
        </table:table-row>
        <table:table-row table:style-name="TableLine776793760">
          <table:table-cell table:style-name="Taula17.A3" office:value-type="string">
            <text:p text:style-name="P266">interessats</text:p>
          </table:table-cell>
          <table:table-cell table:style-name="Taula17.A3" office:value-type="string">
            <text:p text:style-name="P266">RegistreInteressat</text:p>
          </table:table-cell>
          <table:table-cell table:style-name="Taula17.A3" office:value-type="string">
            <text:p text:style-name="P256">0..<text:span text:style-name="T125">n</text:span> </text:p>
          </table:table-cell>
          <table:table-cell table:style-name="Taula17.A3" office:value-type="string">
            <text:p text:style-name="P272"/>
          </table:table-cell>
          <table:table-cell table:style-name="Taula17.E39" office:value-type="string">
            <text:p text:style-name="P278">Dades que componen els interessats de l’assentament registral si n’hi ha.</text:p>
          </table:table-cell>
        </table:table-row>
        <table:table-row table:style-name="TableLine776794336">
          <table:table-cell table:style-name="Taula17.A3" office:value-type="string">
            <text:p text:style-name="P266">annexos</text:p>
          </table:table-cell>
          <table:table-cell table:style-name="Taula17.A3" office:value-type="string">
            <text:p text:style-name="P266">RegistreAnnex</text:p>
          </table:table-cell>
          <table:table-cell table:style-name="Taula17.A3" office:value-type="string">
            <text:p text:style-name="P256">0..<text:span text:style-name="T125">n</text:span> </text:p>
          </table:table-cell>
          <table:table-cell table:style-name="Taula17.A3" office:value-type="string">
            <text:p text:style-name="P272"/>
          </table:table-cell>
          <table:table-cell table:style-name="Taula17.E40" office:value-type="string">
            <text:p text:style-name="P278">Dades que componen els annexos dels assentaments registrals si n’hi ha.</text:p>
          </table:table-cell>
        </table:table-row>
        <table:table-row table:style-name="TableLine776756032">
          <table:table-cell table:style-name="Taula17.A3" office:value-type="string">
            <text:p text:style-name="P266">justificant</text:p>
          </table:table-cell>
          <table:table-cell table:style-name="Taula17.A3" office:value-type="string">
            <text:p text:style-name="P266">RegistreAnnex</text:p>
          </table:table-cell>
          <table:table-cell table:style-name="Taula17.A3" office:value-type="string">
            <text:p text:style-name="P267">0..1</text:p>
          </table:table-cell>
          <table:table-cell table:style-name="Taula17.A3" office:value-type="string">
            <text:p text:style-name="P280"/>
          </table:table-cell>
          <table:table-cell table:style-name="Taula17.E41" office:value-type="string">
            <text:p text:style-name="P278">Dades que componen el justificant de l’assentament registral si n’hi ha. Es compon de les mateixes dades que un annex.</text:p>
          </table:table-cell>
        </table:table-row>
        <table:table-row table:style-name="TableLine776783392">
          <table:table-cell table:style-name="Taula17.A3" office:value-type="string">
            <text:p text:style-name="P265"><text:span text:style-name="T139">procediment</text:spa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3">6<text:span text:style-name="T278">4</text:span></text:p>
          </table:table-cell>
          <table:table-cell table:style-name="Taula17.E43" office:value-type="string">
            <text:p text:style-name="P270">Codi <text:span text:style-name="T365">SIA </text:span>de<text:span text:style-name="T365">l</text:span> <text:span text:style-name="T139">procediment</text:span>.</text:p>
          </table:table-cell>
        </table:table-row>
        <table:table-row table:style-name="TableLine776783968">
          <table:table-cell table:style-name="Taula17.A3" office:value-type="string">
            <text:p text:style-name="P265"><text:span text:style-name="T365">servei</text:spa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3">6<text:span text:style-name="T278">4</text:span></text:p>
          </table:table-cell>
          <table:table-cell table:style-name="Taula17.E43" office:value-type="string">
            <text:p text:style-name="P270">Codi <text:span text:style-name="T365">SIA </text:span>de<text:span text:style-name="T365">l servei</text:span>.</text:p>
          </table:table-cell>
        </table:table-row>
        <table:table-row table:style-name="TableLine776777920">
          <table:table-cell table:style-name="Taula17.A3" office:value-type="string">
            <text:p text:style-name="P251">presencial</text:p>
          </table:table-cell>
          <table:table-cell table:style-name="Taula17.A3" office:value-type="string">
            <text:p text:style-name="P251">Boolea</text:p>
          </table:table-cell>
          <table:table-cell table:style-name="Taula17.A3" office:value-type="string">
            <text:p text:style-name="P252">0..1</text:p>
          </table:table-cell>
          <table:table-cell table:style-name="Taula17.A3" office:value-type="string">
            <text:p text:style-name="P281"/>
          </table:table-cell>
          <table:table-cell table:style-name="Taula17.E44" office:value-type="string">
            <text:p text:style-name="P251">Paràmetre booleà per indicar si el registre és prensencial</text:p>
          </table:table-cell>
        </table:table-row>
      </table:table>
      <text:p text:style-name="P245"/>
      <text:p text:style-name="P243"/>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776781088">
          <table:table-cell table:style-name="Taula18.A1" table:number-columns-spanned="5" office:value-type="string">
            <text:p text:style-name="P140">Registre<text:span text:style-name="T129">Annex</text:span> </text:p>
          </table:table-cell>
          <table:covered-table-cell/>
          <table:covered-table-cell/>
          <table:covered-table-cell/>
          <table:covered-table-cell/>
        </table:table-row>
        <table:table-row table:style-name="TableLine776777632">
          <table:table-cell table:style-name="Taula18.A2" office:value-type="string">
            <text:p text:style-name="P35">Nom del camp</text:p>
          </table:table-cell>
          <table:table-cell table:style-name="Taula18.A2" office:value-type="string">
            <text:p text:style-name="P35">Tipus</text:p>
          </table:table-cell>
          <table:table-cell table:style-name="Taula18.A2" office:value-type="string">
            <text:p text:style-name="P35">Mult.</text:p>
          </table:table-cell>
          <table:table-cell table:style-name="Taula18.A2" office:value-type="string">
            <text:p text:style-name="P37">Tamany</text:p>
          </table:table-cell>
          <table:table-cell table:style-name="Taula18.E2" office:value-type="string">
            <text:p text:style-name="P37">Descripció</text:p>
          </table:table-cell>
        </table:table-row>
        <table:table-row table:style-name="TableLine776768416">
          <table:table-cell table:style-name="Taula18.A3" office:value-type="string">
            <text:p text:style-name="P282">titol</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200">
            <text:p text:style-name="P283">200</text:p>
          </table:table-cell>
          <table:table-cell table:style-name="Taula18.E3" office:value-type="string">
            <text:p text:style-name="P287">Títol del document</text:p>
          </table:table-cell>
        </table:table-row>
        <text:soft-page-break/>
        <table:table-row table:style-name="TableLine776801824">
          <table:table-cell table:style-name="Taula18.A3" office:value-type="string">
            <text:p text:style-name="P282">fitxerNom</text:p>
          </table:table-cell>
          <table:table-cell table:style-name="Taula18.A3" office:value-type="string">
            <text:p text:style-name="P285">Cadena</text:p>
          </table:table-cell>
          <table:table-cell table:style-name="Taula18.D3" office:value-type="float" office:value="1">
            <text:p text:style-name="P286">1</text:p>
          </table:table-cell>
          <table:table-cell table:style-name="Taula18.D3" office:value-type="float" office:value="256">
            <text:p text:style-name="P355">2<text:span text:style-name="T279">56</text:span></text:p>
          </table:table-cell>
          <table:table-cell table:style-name="Taula18.E4" office:value-type="string">
            <text:p text:style-name="P287">Nom del fitxer annexat</text:p>
          </table:table-cell>
        </table:table-row>
        <table:table-row table:style-name="TableLine776802112">
          <table:table-cell table:style-name="Taula18.A3" office:value-type="string">
            <text:p text:style-name="P282">fitxerTamany</text:p>
          </table:table-cell>
          <table:table-cell table:style-name="Taula18.A3" office:value-type="string">
            <text:p text:style-name="P283">Numèric</text:p>
          </table:table-cell>
          <table:table-cell table:style-name="Taula18.A3" office:value-type="string">
            <text:p text:style-name="P286">0..1</text:p>
          </table:table-cell>
          <table:table-cell table:style-name="Taula18.A3" office:value-type="string">
            <text:p text:style-name="P283"/>
          </table:table-cell>
          <table:table-cell table:style-name="Taula18.E5" office:value-type="string">
            <text:p text:style-name="P287">Tamany en <text:span text:style-name="T291">bytes</text:span> del fitxer annexat</text:p>
          </table:table-cell>
        </table:table-row>
        <table:table-row table:style-name="TableLine776820544">
          <table:table-cell table:style-name="Taula18.A3" office:value-type="string">
            <text:p text:style-name="P282">fitxerTipusMime</text:p>
          </table:table-cell>
          <table:table-cell table:style-name="Taula18.A3" office:value-type="string">
            <text:p text:style-name="P285">Cadena</text:p>
          </table:table-cell>
          <table:table-cell table:style-name="Taula18.A3" office:value-type="string">
            <text:p text:style-name="P286">1</text:p>
          </table:table-cell>
          <table:table-cell table:style-name="Taula18.A3" office:value-type="string">
            <text:p text:style-name="P355">3<text:span text:style-name="T279">0</text:span></text:p>
          </table:table-cell>
          <table:table-cell table:style-name="Taula18.E6" office:value-type="string">
            <text:p text:style-name="P287">Tipus MIME del fitxer annexat</text:p>
          </table:table-cell>
        </table:table-row>
        <table:table-row table:style-name="TableLine776808736">
          <table:table-cell table:style-name="Taula18.A3" office:value-type="string">
            <text:p text:style-name="P282">fitxerArxiuUuid</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56">
            <text:p text:style-name="P355">2<text:span text:style-name="T280">56</text:span></text:p>
          </table:table-cell>
          <table:table-cell table:style-name="Taula18.E7" office:value-type="string">
            <text:p text:style-name="P287">Uuid de l’arxiu digital si s’escau</text:p>
          </table:table-cell>
        </table:table-row>
        <table:table-row table:style-name="TableLine776819392">
          <table:table-cell table:style-name="Taula18.A3" office:value-type="string">
            <text:p text:style-name="P282">fitxerContingut</text:p>
          </table:table-cell>
          <table:table-cell table:style-name="Taula18.A3" office:value-type="string">
            <text:p text:style-name="P283">Byte[]</text:p>
          </table:table-cell>
          <table:table-cell table:style-name="Taula18.A3" office:value-type="string">
            <text:p text:style-name="P286">0..1</text:p>
          </table:table-cell>
          <table:table-cell table:style-name="Taula18.A3" office:value-type="string">
            <text:p text:style-name="P283"/>
          </table:table-cell>
          <table:table-cell table:style-name="Taula18.E18" office:value-type="string">
            <text:p text:style-name="P287">Cadena de bytes que compon el contingut del fitxer annexat</text:p>
          </table:table-cell>
        </table:table-row>
        <table:table-row table:style-name="TableLine776724064">
          <table:table-cell table:style-name="Taula18.A3" office:value-type="string">
            <text:p text:style-name="P282">eniDataCaptura</text:p>
          </table:table-cell>
          <table:table-cell table:style-name="Taula18.A3" office:value-type="string">
            <text:p text:style-name="P283">Data</text:p>
          </table:table-cell>
          <table:table-cell table:style-name="Taula18.A3" office:value-type="string">
            <text:p text:style-name="P286">1</text:p>
          </table:table-cell>
          <table:table-cell table:style-name="Taula18.D3" office:value-type="float" office:value="14">
            <text:p text:style-name="P283">14</text:p>
          </table:table-cell>
          <table:table-cell table:style-name="Taula18.E18" office:value-type="string">
            <text:p text:style-name="P287">Data de captura del document</text:p>
          </table:table-cell>
        </table:table-row>
        <table:table-row table:style-name="TableLine776779360">
          <table:table-cell table:style-name="Taula18.A3" office:value-type="string">
            <text:p text:style-name="P282">eniOrigen</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10">
            <text:p text:style-name="P286">1<text:span text:style-name="T280">0</text:span></text:p>
          </table:table-cell>
          <table:table-cell table:style-name="Taula18.E18" office:value-type="string">
            <text:p text:style-name="P258">Codi de la metadada origen de la NTI de document electrònic</text:p>
          </table:table-cell>
        </table:table-row>
        <table:table-row table:style-name="TableLine776779936">
          <table:table-cell table:style-name="Taula18.A3" office:value-type="string">
            <text:p text:style-name="P282">eniEstatElaboracio</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4">
            <text:p text:style-name="P286">4</text:p>
          </table:table-cell>
          <table:table-cell table:style-name="Taula18.E18" office:value-type="string">
            <text:p text:style-name="P258">Codi de la metadada <text:span text:style-name="T126">estat elaboració</text:span> de la NTI de document electrònic.</text:p>
          </table:table-cell>
        </table:table-row>
        <table:table-row table:style-name="TableLine776800672">
          <table:table-cell table:style-name="Taula18.A3" office:value-type="string">
            <text:p text:style-name="P282">eniTipusDocumental</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255">
            <text:p text:style-name="P356">2<text:span text:style-name="T281">55</text:span></text:p>
          </table:table-cell>
          <table:table-cell table:style-name="Taula18.E18" office:value-type="string">
            <text:p text:style-name="P258">Codi de la metadada tipus documental de la NTI de document electrònic.</text:p>
          </table:table-cell>
        </table:table-row>
        <table:table-row table:style-name="TableLine776798656">
          <table:table-cell table:style-name="Taula18.A3" office:value-type="string">
            <text:p text:style-name="P282">sicresTipusDocument</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
            <text:p text:style-name="P286">2</text:p>
          </table:table-cell>
          <table:table-cell table:style-name="Taula18.E18" office:value-type="string">
            <text:p text:style-name="P258">Codi SICRES del segment Anexo – tipo de documento</text:p>
          </table:table-cell>
        </table:table-row>
        <table:table-row table:style-name="TableLine776788288">
          <table:table-cell table:style-name="Taula18.A3" office:value-type="string">
            <text:p text:style-name="P282">localitzacio</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80">
            <text:p text:style-name="P286">80</text:p>
          </table:table-cell>
          <table:table-cell table:style-name="Taula18.E18" office:value-type="string">
            <text:p text:style-name="P258"/>
          </table:table-cell>
        </table:table-row>
        <table:table-row table:style-name="TableLine776785984">
          <table:table-cell table:style-name="Taula18.A3" office:value-type="string">
            <text:p text:style-name="P289">metaDades</text:p>
          </table:table-cell>
          <table:table-cell table:style-name="Taula18.A3" office:value-type="string">
            <text:p text:style-name="P290">MetaDades</text:p>
          </table:table-cell>
          <table:table-cell table:style-name="Taula18.A3" office:value-type="string">
            <text:p text:style-name="P290">0..1</text:p>
          </table:table-cell>
          <table:table-cell table:style-name="Taula18.D3">
            <text:p text:style-name="P286"/>
          </table:table-cell>
          <table:table-cell table:style-name="Taula18.E18" office:value-type="string">
            <text:p text:style-name="P289">Camp MetaDada amb entrades de tipus codi i valor per metadades addicionals.</text:p>
          </table:table-cell>
        </table:table-row>
        <table:table-row table:style-name="TableLine776781664">
          <table:table-cell table:style-name="Taula18.A3" office:value-type="string">
            <text:p text:style-name="P282">observacions</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50">
            <text:p text:style-name="P286">50</text:p>
          </table:table-cell>
          <table:table-cell table:style-name="Taula18.E18" office:value-type="string">
            <text:p text:style-name="P291">Observacions a destacar sobre la informació annexada</text:p>
          </table:table-cell>
        </table:table-row>
        <table:table-row table:style-name="TableLine776782528">
          <table:table-cell table:style-name="Taula18.A3" office:value-type="string">
            <text:p text:style-name="P282">firmes</text:p>
          </table:table-cell>
          <table:table-cell table:style-name="Taula18.A3" office:value-type="string">
            <text:p text:style-name="P283">Firma</text:p>
          </table:table-cell>
          <table:table-cell table:style-name="Taula18.A3" office:value-type="string">
            <text:p text:style-name="P286">0..1</text:p>
          </table:table-cell>
          <table:table-cell table:style-name="Taula18.A3" office:value-type="string">
            <text:p text:style-name="P293"/>
          </table:table-cell>
          <table:table-cell table:style-name="Taula18.E18" office:value-type="string">
            <text:p text:style-name="P291">Llista de firmes del fitxer </text:p>
          </table:table-cell>
        </table:table-row>
        <table:table-row table:style-name="TableLine776777344">
          <table:table-cell table:style-name="Taula18.A3" office:value-type="string">
            <text:p text:style-name="P282">timestamp</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100">
            <text:p text:style-name="P286">100</text:p>
          </table:table-cell>
          <table:table-cell table:style-name="Taula18.E18" office:value-type="string">
            <text:p text:style-name="P258">Segell de temps del fitxer annex en base64.</text:p>
          </table:table-cell>
        </table:table-row>
        <table:table-row table:style-name="TableLine776776192">
          <table:table-cell table:style-name="Taula18.A3" office:value-type="string">
            <text:p text:style-name="P282">validacioOCSP</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55">
            <text:p text:style-name="P356">2<text:span text:style-name="T282">55</text:span></text:p>
          </table:table-cell>
          <table:table-cell table:style-name="Taula18.E19" office:value-type="string">
            <text:p text:style-name="P258">Validació OCSP del certificat emprat per signar en base64.</text:p>
          </table:table-cell>
        </table:table-row>
      </table:table>
      <text:p text:style-name="P242"/>
      <text:p text:style-name="P245"/>
      <text:p text:style-name="P243"/>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776795488">
          <table:table-cell table:style-name="Taula19.A1" table:number-columns-spanned="5" office:value-type="string">
            <text:p text:style-name="P140">Registre<text:span text:style-name="T129">Firma</text:span> </text:p>
          </table:table-cell>
          <table:covered-table-cell/>
          <table:covered-table-cell/>
          <table:covered-table-cell/>
          <table:covered-table-cell/>
        </table:table-row>
        <table:table-row table:style-name="TableLine776726080">
          <table:table-cell table:style-name="Taula19.A2" office:value-type="string">
            <text:p text:style-name="P35">Nom del camp</text:p>
          </table:table-cell>
          <table:table-cell table:style-name="Taula19.A2" office:value-type="string">
            <text:p text:style-name="P35">Tipus</text:p>
          </table:table-cell>
          <table:table-cell table:style-name="Taula19.A2" office:value-type="string">
            <text:p text:style-name="P35">Mult.</text:p>
          </table:table-cell>
          <table:table-cell table:style-name="Taula19.A2" office:value-type="string">
            <text:p text:style-name="P37">Tamany</text:p>
          </table:table-cell>
          <table:table-cell table:style-name="Taula19.E2" office:value-type="string">
            <text:p text:style-name="P37">Descripció</text:p>
          </table:table-cell>
        </table:table-row>
        <table:table-row table:style-name="TableLine776766976">
          <table:table-cell table:style-name="Taula19.A3" office:value-type="string">
            <text:p text:style-name="P291">tipus</text:p>
          </table:table-cell>
          <table:table-cell table:style-name="Taula19.A3" office:value-type="string">
            <text:p text:style-name="P285">Cadena</text:p>
          </table:table-cell>
          <table:table-cell table:style-name="Taula19.A3" office:value-type="string">
            <text:p text:style-name="P295">1</text:p>
          </table:table-cell>
          <table:table-cell table:style-name="Taula19.D3" office:value-type="float" office:value="30">
            <text:p text:style-name="P295">30</text:p>
          </table:table-cell>
          <table:table-cell table:style-name="Taula19.E3" office:value-type="string">
            <text:p text:style-name="P298">Codi del tipus de firma</text:p>
          </table:table-cell>
        </table:table-row>
        <table:table-row table:style-name="TableLine776763808">
          <table:table-cell table:style-name="Taula19.A3" office:value-type="string">
            <text:p text:style-name="P291">perfil</text:p>
          </table:table-cell>
          <table:table-cell table:style-name="Taula19.A3" office:value-type="string">
            <text:p text:style-name="P285">Cadena</text:p>
          </table:table-cell>
          <table:table-cell table:style-name="Taula19.A3" office:value-type="string">
            <text:p text:style-name="P295">0..1</text:p>
          </table:table-cell>
          <table:table-cell table:style-name="Taula19.D3" office:value-type="float" office:value="30">
            <text:p text:style-name="P295">30</text:p>
          </table:table-cell>
          <table:table-cell table:style-name="Taula19.E4" office:value-type="string">
            <text:p text:style-name="P298">Codi de perfil de la firma.</text:p>
          </table:table-cell>
        </table:table-row>
        <table:table-row table:style-name="TableLine776758336">
          <table:table-cell table:style-name="Taula19.A3" office:value-type="string">
            <text:p text:style-name="P291">fitxerNom</text:p>
          </table:table-cell>
          <table:table-cell table:style-name="Taula19.A3" office:value-type="string">
            <text:p text:style-name="P285">Cadena</text:p>
          </table:table-cell>
          <table:table-cell table:style-name="Taula19.A3" office:value-type="string">
            <text:p text:style-name="P286">0..1</text:p>
          </table:table-cell>
          <table:table-cell table:style-name="Taula19.A3" office:value-type="string">
            <text:p text:style-name="P357">2<text:span text:style-name="T283">56</text:span></text:p>
          </table:table-cell>
          <table:table-cell table:style-name="Taula19.E5" office:value-type="string">
            <text:p text:style-name="P296">Nom del fitxer de firma de l’annex si n’hi ha. <text:span text:style-name="T127">És obligatori si el tipus de firma és TF04.</text:span> </text:p>
          </table:table-cell>
        </table:table-row>
        <table:table-row table:style-name="TableLine776761216">
          <table:table-cell table:style-name="Taula19.A3" office:value-type="string">
            <text:p text:style-name="P291">contingut</text:p>
          </table:table-cell>
          <table:table-cell table:style-name="Taula19.A3" office:value-type="string">
            <text:p text:style-name="P293">Byte[]</text:p>
          </table:table-cell>
          <table:table-cell table:style-name="Taula19.A3" office:value-type="string">
            <text:p text:style-name="P295">0..1</text:p>
          </table:table-cell>
          <table:table-cell table:style-name="Taula19.A3" office:value-type="string">
            <text:p text:style-name="P295">var</text:p>
          </table:table-cell>
          <table:table-cell table:style-name="Taula19.E6" office:value-type="string">
            <text:p text:style-name="P296">Cadena de bytes que componen el contingut del fitxer de firma annex si n’hi ha. <text:span text:style-name="T127">És obligatori si el tipus de firma és TF04.</text:span> </text:p>
          </table:table-cell>
        </table:table-row>
        <table:table-row table:style-name="TableLine776756896">
          <table:table-cell table:style-name="Taula19.A3" office:value-type="string">
            <text:p text:style-name="P291">tipusMime</text:p>
          </table:table-cell>
          <table:table-cell table:style-name="Taula19.A3" office:value-type="string">
            <text:p text:style-name="P285">Cadena</text:p>
          </table:table-cell>
          <table:table-cell table:style-name="Taula19.A3" office:value-type="string">
            <text:p text:style-name="P286">0..1</text:p>
          </table:table-cell>
          <table:table-cell table:style-name="Taula19.D3" office:value-type="float" office:value="30">
            <text:p text:style-name="P355">3<text:span text:style-name="T283">0</text:span></text:p>
          </table:table-cell>
          <table:table-cell table:style-name="Taula19.E7" office:value-type="string">
            <text:p text:style-name="P296">Tipus MIME del fitxer de firma annexat si n’hi ha. <text:span text:style-name="T127">És obligatori si el tipus de firma és TF04.</text:span> </text:p>
          </table:table-cell>
        </table:table-row>
        <text:soft-page-break/>
        <table:table-row table:style-name="TableLine776767552">
          <table:table-cell table:style-name="Taula19.A3" office:value-type="string">
            <text:p text:style-name="P291">csv</text:p>
          </table:table-cell>
          <table:table-cell table:style-name="Taula19.A3" office:value-type="string">
            <text:p text:style-name="P285">Cadena</text:p>
          </table:table-cell>
          <table:table-cell table:style-name="Taula19.A3" office:value-type="string">
            <text:p text:style-name="P286">0..1</text:p>
          </table:table-cell>
          <table:table-cell table:style-name="Taula19.A3" office:value-type="string">
            <text:p text:style-name="P283"/>
          </table:table-cell>
          <table:table-cell table:style-name="Taula19.E8" office:value-type="string">
            <text:p text:style-name="P287">En cas de que el fitxer es signi amb CSV, contingut del CSV en base64.</text:p>
          </table:table-cell>
        </table:table-row>
        <table:table-row table:style-name="TableLine776792608">
          <table:table-cell table:style-name="Taula19.A3" office:value-type="string">
            <text:p text:style-name="P291">csvRegulacio</text:p>
          </table:table-cell>
          <table:table-cell table:style-name="Taula19.A3" office:value-type="string">
            <text:p text:style-name="P285">Cadena</text:p>
          </table:table-cell>
          <table:table-cell table:style-name="Taula19.A3" office:value-type="string">
            <text:p text:style-name="P286">1</text:p>
          </table:table-cell>
          <table:table-cell table:style-name="Taula19.D3" office:value-type="float" office:value="640">
            <text:p text:style-name="P295">640</text:p>
          </table:table-cell>
          <table:table-cell table:style-name="Taula19.E9" office:value-type="string">
            <text:p text:style-name="P296">Text de regulació CSV.</text:p>
          </table:table-cell>
        </table:table-row>
      </table:table>
      <text:p text:style-name="P242"/>
      <text:p text:style-name="P244"/>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776774464">
          <table:table-cell table:style-name="Taula20.A1" table:number-columns-spanned="5" office:value-type="string">
            <text:p text:style-name="P140">Registre<text:span text:style-name="T129">Interessat</text:span> </text:p>
          </table:table-cell>
          <table:covered-table-cell/>
          <table:covered-table-cell/>
          <table:covered-table-cell/>
          <table:covered-table-cell/>
        </table:table-row>
        <table:table-row table:style-name="TableLine776765248">
          <table:table-cell table:style-name="Taula20.A2" office:value-type="string">
            <text:p text:style-name="P35">Nom del camp</text:p>
          </table:table-cell>
          <table:table-cell table:style-name="Taula20.A2" office:value-type="string">
            <text:p text:style-name="P35">Tipus</text:p>
          </table:table-cell>
          <table:table-cell table:style-name="Taula20.A2" office:value-type="string">
            <text:p text:style-name="P35">Mult.</text:p>
          </table:table-cell>
          <table:table-cell table:style-name="Taula20.A2" office:value-type="string">
            <text:p text:style-name="P37">Tamany</text:p>
          </table:table-cell>
          <table:table-cell table:style-name="Taula20.E2" office:value-type="string">
            <text:p text:style-name="P37">Descripció</text:p>
          </table:table-cell>
        </table:table-row>
        <table:table-row table:style-name="TableLine776819968">
          <table:table-cell table:style-name="Taula20.A3" office:value-type="string">
            <text:p text:style-name="P291">tipus</text:p>
          </table:table-cell>
          <table:table-cell table:style-name="Taula20.A3" office:value-type="string">
            <text:p text:style-name="P285">Cadena</text:p>
          </table:table-cell>
          <table:table-cell table:style-name="Taula20.A3" office:value-type="string">
            <text:p text:style-name="P295">1</text:p>
          </table:table-cell>
          <table:table-cell table:style-name="Taula20.D3" office:value-type="float" office:value="19">
            <text:p text:style-name="P357">1<text:span text:style-name="T284">9</text:span></text:p>
          </table:table-cell>
          <table:table-cell table:style-name="Taula20.E3" office:value-type="string">
            <text:p text:style-name="P298">Figura jurídica de la persona <text:line-break/>'1' = Administració.</text:p>
            <text:p text:style-name="P298">'2' = Persona física.</text:p>
            <text:p text:style-name="P298">'3' = Persona jurídica.</text:p>
          </table:table-cell>
        </table:table-row>
        <table:table-row table:style-name="TableLine776813344">
          <table:table-cell table:style-name="Taula20.A3" office:value-type="string">
            <text:p text:style-name="P300">documentTipus</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
            <text:p text:style-name="P358">1</text:p>
          </table:table-cell>
          <table:table-cell table:style-name="Taula20.E4" office:value-type="string">
            <text:p text:style-name="P298">Codi SICRES del segment interesado –</text:p>
            <text:p text:style-name="P298">documento de identificacion de interesado tipo.</text:p>
          </table:table-cell>
        </table:table-row>
        <table:table-row table:style-name="TableLine776811904">
          <table:table-cell table:style-name="Taula20.A3" office:value-type="string">
            <text:p text:style-name="P300">documentNum</text:p>
          </table:table-cell>
          <table:table-cell table:style-name="Taula20.A3" office:value-type="string">
            <text:p text:style-name="P285">Cadena</text:p>
          </table:table-cell>
          <table:table-cell table:style-name="Taula20.A3" office:value-type="string">
            <text:p text:style-name="P305"><text:span text:style-name="T128">0..</text:span>1</text:p>
          </table:table-cell>
          <table:table-cell table:style-name="Taula20.A3" office:value-type="string">
            <text:p text:style-name="P358">1<text:span text:style-name="T285">7</text:span></text:p>
          </table:table-cell>
          <table:table-cell table:style-name="Taula20.E5" office:value-type="string">
            <text:p text:style-name="P303">Número de document identificatiu.</text:p>
          </table:table-cell>
        </table:table-row>
        <table:table-row table:style-name="TableLine776807296">
          <table:table-cell table:style-name="Taula20.A3" office:value-type="string">
            <text:p text:style-name="P300">nom</text:p>
          </table:table-cell>
          <table:table-cell table:style-name="Taula20.A3" office:value-type="string">
            <text:p text:style-name="P293">Cadena</text:p>
          </table:table-cell>
          <table:table-cell table:style-name="Taula20.A3" office:value-type="string">
            <text:p text:style-name="P302">C</text:p>
          </table:table-cell>
          <table:table-cell table:style-name="Taula20.A3" office:value-type="string">
            <text:p text:style-name="P358">2<text:span text:style-name="T285">55</text:span></text:p>
          </table:table-cell>
          <table:table-cell table:style-name="Taula20.E6" office:value-type="string">
            <text:p text:style-name="P306">Nom de l’interessat. Obligatori si és una persona física.</text:p>
          </table:table-cell>
        </table:table-row>
        <table:table-row table:style-name="TableLine776806144">
          <table:table-cell table:style-name="Taula20.A3" office:value-type="string">
            <text:p text:style-name="P300">llinatge1</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255">
            <text:p text:style-name="P358">2<text:span text:style-name="T285">55</text:span></text:p>
          </table:table-cell>
          <table:table-cell table:style-name="Taula20.E7" office:value-type="string">
            <text:p text:style-name="P306">Primer llinatge de l’interessat. Obligatori si és una persona física.</text:p>
          </table:table-cell>
        </table:table-row>
        <table:table-row table:style-name="TableLine776805568">
          <table:table-cell table:style-name="Taula20.A3" office:value-type="string">
            <text:p text:style-name="P300">llinatge2</text:p>
          </table:table-cell>
          <table:table-cell table:style-name="Taula20.A3" office:value-type="string">
            <text:p text:style-name="P285">Cadena</text:p>
          </table:table-cell>
          <table:table-cell table:style-name="Taula20.A3" office:value-type="string">
            <text:p text:style-name="P302">0..1</text:p>
          </table:table-cell>
          <table:table-cell table:style-name="Taula20.A3" office:value-type="string">
            <text:p text:style-name="P358">2<text:span text:style-name="T285">55</text:span></text:p>
          </table:table-cell>
          <table:table-cell table:style-name="Taula20.E8" office:value-type="string">
            <text:p text:style-name="P306">Segon llinatge de l’interessat</text:p>
          </table:table-cell>
        </table:table-row>
        <table:table-row table:style-name="TableLine776804416">
          <table:table-cell table:style-name="Taula20.A3" office:value-type="string">
            <text:p text:style-name="P300">raoSocial</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2000">
            <text:p text:style-name="P358">2<text:span text:style-name="T286">000</text:span></text:p>
          </table:table-cell>
          <table:table-cell table:style-name="Taula20.E21" office:value-type="string">
            <text:p text:style-name="P306">Raó social de l’interessat. Obligatori si és una persona jurídica.</text:p>
          </table:table-cell>
        </table:table-row>
        <table:table-row table:style-name="TableLine776803840">
          <table:table-cell table:style-name="Taula20.A3" office:value-type="string">
            <text:p text:style-name="P300">pais</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58">1<text:span text:style-name="T287">00</text:span></text:p>
          </table:table-cell>
          <table:table-cell table:style-name="Taula20.E21" office:value-type="string">
            <text:p text:style-name="P296">Codi ISO numèric del País de la persona.</text:p>
          </table:table-cell>
        </table:table-row>
        <table:table-row table:style-name="TableLine776803264">
          <table:table-cell table:style-name="Taula20.A3" office:value-type="string">
            <text:p text:style-name="P300">provincia</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58">1<text:span text:style-name="T288">00</text:span></text:p>
          </table:table-cell>
          <table:table-cell table:style-name="Taula20.E21" office:value-type="string">
            <text:p text:style-name="P296">Codi INE de la província de la persona.</text:p>
          </table:table-cell>
        </table:table-row>
        <table:table-row table:style-name="TableLine776800960">
          <table:table-cell table:style-name="Taula20.A3" office:value-type="string">
            <text:p text:style-name="P300">municipi</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02">100</text:p>
          </table:table-cell>
          <table:table-cell table:style-name="Taula20.E21" office:value-type="string">
            <text:p text:style-name="P296">Codi del Municipi de la persona.</text:p>
          </table:table-cell>
        </table:table-row>
        <table:table-row table:style-name="TableLine776800096">
          <table:table-cell table:style-name="Taula20.A3" office:value-type="string">
            <text:p text:style-name="P300">adresa</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60">
            <text:p text:style-name="P358">1<text:span text:style-name="T289">60</text:span></text:p>
          </table:table-cell>
          <table:table-cell table:style-name="Taula20.E21" office:value-type="string">
            <text:p text:style-name="P306">Adreça postal de l’interessat.</text:p>
          </table:table-cell>
        </table:table-row>
        <table:table-row table:style-name="TableLine776797792">
          <table:table-cell table:style-name="Taula20.A3" office:value-type="string">
            <text:p text:style-name="P300">codiPostal</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5">
            <text:p text:style-name="P358">5</text:p>
          </table:table-cell>
          <table:table-cell table:style-name="Taula20.E21" office:value-type="string">
            <text:p text:style-name="P296"/>
          </table:table-cell>
        </table:table-row>
        <table:table-row table:style-name="TableLine776693536">
          <table:table-cell table:style-name="Taula20.A3" office:value-type="string">
            <text:p text:style-name="P300">email</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8">1<text:span text:style-name="T290">60</text:span></text:p>
          </table:table-cell>
          <table:table-cell table:style-name="Taula20.E21" office:value-type="string">
            <text:p text:style-name="P296"/>
          </table:table-cell>
        </table:table-row>
        <table:table-row table:style-name="TableLine776693824">
          <table:table-cell table:style-name="Taula20.A3" office:value-type="string">
            <text:p text:style-name="P300">telefon</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20">
            <text:p text:style-name="P358">2<text:span text:style-name="T290">0</text:span></text:p>
          </table:table-cell>
          <table:table-cell table:style-name="Taula20.E21" office:value-type="string">
            <text:p text:style-name="P296"/>
          </table:table-cell>
        </table:table-row>
        <table:table-row table:style-name="TableLine776692672">
          <table:table-cell table:style-name="Taula20.A3" office:value-type="string">
            <text:p text:style-name="P300">emailHabilitat</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8">1<text:span text:style-name="T290">60</text:span></text:p>
          </table:table-cell>
          <table:table-cell table:style-name="Taula20.E21" office:value-type="string">
            <text:p text:style-name="P296">En cas de disposar d'adreça electrònica habilitada.</text:p>
          </table:table-cell>
        </table:table-row>
        <table:table-row table:style-name="TableLine776715712">
          <table:table-cell table:style-name="Taula20.A3" office:value-type="string">
            <text:p text:style-name="P300">canalPreferent</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2">
            <text:p text:style-name="P358">2</text:p>
          </table:table-cell>
          <table:table-cell table:style-name="Taula20.E21" office:value-type="string">
            <text:p text:style-name="P296">Codi SICRES del segment interesado – canal</text:p>
            <text:p text:style-name="P296">preferente de notificación del interesado.</text:p>
          </table:table-cell>
        </table:table-row>
        <table:table-row table:style-name="TableLine776716000">
          <table:table-cell table:style-name="Taula20.A3" office:value-type="string">
            <text:p text:style-name="P308">codiDire</text:p>
          </table:table-cell>
          <table:table-cell table:style-name="Taula20.A3" office:value-type="string">
            <text:p text:style-name="P309">cadena</text:p>
          </table:table-cell>
          <table:table-cell table:style-name="Taula20.A3" office:value-type="string">
            <text:p text:style-name="P309">0..1</text:p>
          </table:table-cell>
          <table:table-cell table:style-name="Taula20.D3" office:value-type="float" office:value="20">
            <text:p text:style-name="P309">20</text:p>
          </table:table-cell>
          <table:table-cell table:style-name="Taula20.E21" office:value-type="string">
            <text:p text:style-name="P308">Codi DIRe de l'interessat.</text:p>
          </table:table-cell>
        </table:table-row>
        <table:table-row table:style-name="TableLine776718016">
          <table:table-cell table:style-name="Taula20.A3" office:value-type="string">
            <text:p text:style-name="P300">observacions</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8">1<text:span text:style-name="T290">60</text:span></text:p>
          </table:table-cell>
          <table:table-cell table:style-name="Taula20.E21" office:value-type="string">
            <text:p text:style-name="P296"/>
          </table:table-cell>
        </table:table-row>
        <table:table-row table:style-name="TableLine776717440">
          <table:table-cell table:style-name="Taula20.A3" office:value-type="string">
            <text:p text:style-name="P300">representant</text:p>
          </table:table-cell>
          <table:table-cell table:style-name="Taula20.A3" office:value-type="string">
            <text:p text:style-name="P301">RegistreInteressat</text:p>
          </table:table-cell>
          <table:table-cell table:style-name="Taula20.A3" office:value-type="string">
            <text:p text:style-name="P302">0..1</text:p>
          </table:table-cell>
          <table:table-cell table:style-name="Taula20.A3" office:value-type="string">
            <text:p text:style-name="P302"/>
          </table:table-cell>
          <table:table-cell table:style-name="Taula20.E21" office:value-type="string">
            <text:p text:style-name="P310">Interessat que actua de representant de l’actual.</text:p>
          </table:table-cell>
        </table:table-row>
        <table:table-row table:style-name="TableLine776717728">
          <table:table-cell table:style-name="Taula20.A3" office:value-type="string">
            <text:p text:style-name="P300">representat</text:p>
          </table:table-cell>
          <table:table-cell table:style-name="Taula20.A3" office:value-type="string">
            <text:p text:style-name="P301">RegistreInteressat</text:p>
          </table:table-cell>
          <table:table-cell table:style-name="Taula20.A3" office:value-type="string">
            <text:p text:style-name="P302">0..1</text:p>
          </table:table-cell>
          <table:table-cell table:style-name="Taula20.A3" office:value-type="string">
            <text:p text:style-name="P302"/>
          </table:table-cell>
          <table:table-cell table:style-name="Taula20.E22" office:value-type="string">
            <text:p text:style-name="P310">Interessat que actua com a representat per l’actual.</text:p>
          </table:table-cell>
        </table:table-row>
      </table:table>
      <text:p text:style-name="P242"><text:soft-page-break/></text:p>
      <text:list xml:id="list181520814172307" text:continue-numbering="true" text:style-name="Outline">
        <text:list-item>
          <text:list>
            <text:list-item>
              <text:h text:style-name="P405"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33"><text:span text:style-name="T372">Per donar d'alta anotacions de a Distribucio des del Registre es disposa </text:span>d’un client<text:span text:style-name="T372"> pel WS SOAP i un altre client per l'API REST </text:span><text:s/>que facilit<text:span text:style-name="T372">en</text:span> la seva utilització.</text:p>
      <text:p text:style-name="P233">Per a fer ús <text:span text:style-name="T372">del client </text:span><text:span text:style-name="T369">API REST </text:span><text:span text:style-name="T372">per Java </text:span><text:span text:style-name="T374">11</text:span><text:span text:style-name="T372"> </text:span>es pot utilitzar la següent dependència Maven:</text:p>
      <text:p text:style-name="P381"/>
      <text:p text:style-name="P241"><text:span text:style-name="T29"><text:s/><text:tab/> </text:span><text:span text:style-name="T15">&lt;</text:span> <text:span text:style-name="T22">dependency</text:span> <text:span text:style-name="T15">&gt;</text:span> </text:p>
      <text:p text:style-name="P65"><text:span text:style-name="T29"><text:s/><text:tab/> <text:tab/> </text:span><text:span text:style-name="T15">&lt;</text:span> <text:span text:style-name="T22">groupId</text:span> <text:span text:style-name="T15">&gt;</text:span> <text:span text:style-name="T29">es.caib.distribucio</text:span> <text:span text:style-name="T15">&lt;/</text:span> <text:span text:style-name="T22">groupId</text:span> <text:span text:style-name="T15">&gt;</text:span> </text:p>
      <text:p text:style-name="P65"><text:span text:style-name="T29"><text:s/><text:tab/> <text:tab/> </text:span><text:span text:style-name="T15">&lt;</text:span> <text:span text:style-name="T22">artifactId</text:span> <text:span text:style-name="T15">&gt;</text:span> <text:span text:style-name="T29">distribucio-</text:span><text:span text:style-name="T32">rest</text:span><text:span text:style-name="T29">-client</text:span> <text:span text:style-name="T15">&lt;/</text:span> <text:span text:style-name="T22">artifactId</text:span> <text:span text:style-name="T15">&gt;</text:span> </text:p>
      <text:p text:style-name="P65"><text:span text:style-name="T29"><text:s/><text:tab/> <text:tab/> </text:span><text:span text:style-name="T15">&lt;</text:span> <text:span text:style-name="T22">version</text:span> <text:span text:style-name="T15">&gt;</text:span> <text:span text:style-name="T30">1.0.</text:span><text:span text:style-name="T34">10</text:span> <text:span text:style-name="T15">&lt;/</text:span> <text:span text:style-name="T22">version</text:span> <text:span text:style-name="T15">&gt;</text:span> </text:p>
      <text:p text:style-name="P241"><text:span text:style-name="T29"><text:s/><text:tab/> </text:span><text:span text:style-name="T15">&lt;/</text:span> <text:span text:style-name="T22">dependency</text:span> <text:span text:style-name="T15">&gt;</text:span> </text:p>
      <text:p text:style-name="P241"/>
      <text:p text:style-name="P233"/>
      <text:p text:style-name="P233">Per a utilitzar aquesta dependència és necessari tenir configurat el següent repository:</text:p>
      <text:p text:style-name="P382"/>
      <text:p text:style-name="P238"><text:span text:style-name="T29"><text:s/><text:tab/> </text:span><text:span text:style-name="T15">&lt;</text:span> <text:span text:style-name="T22">repository</text:span> <text:span text:style-name="T15">&gt;</text:span> </text:p>
      <text:p text:style-name="P59"><text:span text:style-name="T29"><text:s/><text:tab/> <text:tab/> </text:span><text:span text:style-name="T15">&lt;</text:span> <text:span text:style-name="T22">id</text:span> <text:span text:style-name="T15">&gt;</text:span> <text:span text:style-name="T29">github-governib-maven-repo</text:span> <text:span text:style-name="T15">&lt;/</text:span> <text:span text:style-name="T22">id</text:span> <text:span text:style-name="T15">&gt;</text:span> </text:p>
      <text:p text:style-name="P59"><text:span text:style-name="T29"><text:s/><text:tab/> <text:tab/> </text:span><text:span text:style-name="T15">&lt;</text:span> <text:span text:style-name="T22">name</text:span> <text:span text:style-name="T15">&gt;</text:span> <text:span text:style-name="T29">GitHub GovernIB Maven Repository</text:span> <text:span text:style-name="T15">&lt;/</text:span> <text:span text:style-name="T22">name</text:span> <text:span text:style-name="T15">&gt;</text:span> </text:p>
      <text:p text:style-name="P59"><text:span text:style-name="T29"><text:s/><text:tab/> <text:tab/> </text:span><text:span text:style-name="T15">&lt;</text:span> <text:span text:style-name="T22">url</text:span> <text:span text:style-name="T15">&gt;</text:span> <text:span text:style-name="T29">http://GovernIB.github.io/maven/maven/</text:span> <text:span text:style-name="T15">&lt;/</text:span> <text:span text:style-name="T22">url</text:span> <text:span text:style-name="T15">&gt;</text:span> </text:p>
      <text:p text:style-name="P238"><text:span text:style-name="T29"><text:s/><text:tab/> </text:span><text:span text:style-name="T15">&lt;/</text:span> <text:span text:style-name="T22">repository</text:span> <text:span text:style-name="T15">&gt;</text:span> </text:p>
      <text:p text:style-name="P238"/>
      <text:p text:style-name="P153"/>
      <text:p text:style-name="P234">Aquesta dependència ens dona accés a la classe B<text:span text:style-name="T392">ustia</text:span>RestClient que ens permet fer cridades al servei. En el següent fragment de codi es pot veure un exemple de com utilitzar aquesta classe per a fer cridades al servei:</text:p>
      <text:p text:style-name="P114"/>
      <text:p text:style-name="P67"><text:span text:style-name="T64"><text:tab/><text:tab/>Busti</text:span><text:span text:style-name="T67">aRestClient</text:span><text:span text:style-name="T64"> </text:span><text:span text:style-name="T104">bustia</text:span><text:span text:style-name="T106">RestClient</text:span><text:span text:style-name="T64"> = </text:span><text:span text:style-name="T51">new</text:span><text:span text:style-name="T381"> </text:span><text:span text:style-name="T92">BustiaRestClient(</text:span></text:p>
      <text:p text:style-name="P67"><text:span text:style-name="T64"><text:tab/><text:tab/><text:tab/></text:span><text:span text:style-name="T36">"http://DISTRIB_HOST/distribucioapi/interna/bustia/alta"</text:span><text:span text:style-name="T64">,</text:span></text:p>
      <text:p text:style-name="P67"><text:span text:style-name="T64"><text:tab/><text:tab/><text:tab/><text:tab/></text:span><text:span text:style-name="T36">"USERNAME"</text:span><text:span text:style-name="T64">,</text:span></text:p>
      <text:p text:style-name="P67"><text:span text:style-name="T64"><text:tab/><text:tab/><text:tab/><text:tab/></text:span><text:span text:style-name="T36">"PASSWORD"</text:span><text:span text:style-name="T64">);</text:span></text:p>
      <text:p text:style-name="P67"><text:span text:style-name="T64"><text:tab/><text:tab/>RegistreAnotacio </text:span><text:span text:style-name="T106">a</text:span><text:span text:style-name="T104">notacio</text:span><text:span text:style-name="T64"> = </text:span><text:span text:style-name="T51">new</text:span><text:span text:style-name="T64"> RegistreAnotacio();</text:span></text:p>
      <text:p text:style-name="P67"><text:span text:style-name="T64"><text:tab/><text:tab/></text:span><text:span text:style-name="T248">// </text:span><text:span text:style-name="T249">TODO e</text:span><text:span text:style-name="T248">mplenar dades de l'anotació de registre</text:span></text:p>
      <text:p text:style-name="P67"><text:span text:style-name="T64"><text:tab/><text:tab/></text:span><text:span text:style-name="T51">try</text:span><text:span text:style-name="T64"> {</text:span></text:p>
      <text:p text:style-name="P67"><text:span text:style-name="T64"><text:tab/><text:tab/><text:tab/></text:span><text:span text:style-name="T104">bustia</text:span><text:span text:style-name="T106">RestClient</text:span><text:span text:style-name="T64">.</text:span><text:span text:style-name="T67">alta</text:span><text:span text:style-name="T64">(</text:span></text:p>
      <text:p text:style-name="P67"><text:span text:style-name="T64"><text:tab/><text:tab/><text:tab/><text:tab/><text:tab/></text:span><text:span text:style-name="T98">ENTITAT</text:span><text:span text:style-name="T99">_DIST</text:span><text:span text:style-name="T98">_CODI</text:span><text:span text:style-name="T64">,</text:span></text:p>
      <text:p text:style-name="P67"><text:span text:style-name="T64"><text:tab/><text:tab/><text:tab/><text:tab/><text:tab/></text:span><text:span text:style-name="T99">UNITAT_ADM</text:span><text:span text:style-name="T98">_CODI</text:span><text:span text:style-name="T64">,</text:span></text:p>
      <text:p text:style-name="P67"><text:span text:style-name="T64"><text:tab/><text:tab/><text:tab/><text:tab/><text:tab/></text:span><text:span text:style-name="T106">a</text:span><text:span text:style-name="T104">notacio</text:span><text:span text:style-name="T64">);</text:span></text:p>
      <text:p text:style-name="P67"><text:span text:style-name="T64"><text:tab/><text:tab/>} </text:span><text:span text:style-name="T51">catch</text:span><text:span text:style-name="T64"> (Exception </text:span><text:span text:style-name="T104">ex</text:span><text:span text:style-name="T64">) {</text:span></text:p>
      <text:p text:style-name="P67"><text:span text:style-name="T64"><text:tab/><text:tab/><text:tab/></text:span><text:span text:style-name="T248">// </text:span><text:span text:style-name="T249">TODO tractar e</text:span><text:span text:style-name="T248">rrors en l'enviament</text:span></text:p>
      <text:p text:style-name="P67"><text:span text:style-name="T64"><text:tab/><text:tab/><text:tab/></text:span><text:span text:style-name="T104">ex</text:span><text:span text:style-name="T64">.printStackTrace();</text:span></text:p>
      <text:p text:style-name="P117"><text:tab/><text:tab/>}</text:p>
      <text:p text:style-name="P117"/>
      <text:p text:style-name="P52"/>
      <text:p text:style-name="Standard"><text:soft-page-break/><text:tab/>Servei de backoffice de distribució</text:p>
      <text:p text:style-name="P226">Els backoffices son els encarregats de processar les anotacions de registre <text:span text:style-name="T351">que son notificades des de</text:span> <text:span text:style-name="T351">l</text:span>’aplicació <text:span text:style-name="T350">DISTRIBUCIÓ.</text:span></text:p>
      <text:p text:style-name="P377">Aquesta notificació es du a terme mitjançant una cridada un servei que han d’implementar de forma obligatòria tots els backoffices. <text:span text:style-name="T350">La interfície d’aquest servei és la següent:</text:span></text:p>
      <text:p text:style-name="P159"><draw:frame draw:style-name="fr8" draw:name="Còpia de Imatge4 1" text:anchor-type="as-char" svg:width="17cm" svg:height="2.288cm" draw:z-index="72"><draw:image xlink:href="Pictures/20000009000006B5000000E7BB9094263DA40C4C.svm" xlink:type="simple" xlink:show="embed" xlink:actuate="onLoad" draw:mime-type="image/x-svm"/><draw:image xlink:href="Pictures/20000009000006B5000000E7BB9094263DA40C4C.svm" xlink:type="simple" xlink:show="embed" xlink:actuate="onLoad" draw:mime-type="image/x-svm"/></draw:frame><text:s text:c="5"/></text:p>
      <text:p text:style-name="P247">Per a la implementació REST s’ha d’habilitar una URL que rebi peticions POST a on s’informi d’una llista de les anotacions pendents. Aquesta llista es rebrà en format JSON i tendrà una estructura anàloga a la del següent exemple:</text:p>
      <text:p text:style-name="P101"/>
      <text:p text:style-name="P101">[ {</text:p>
      <text:p text:style-name="P60"><text:span text:style-name="T302">"i</text:span><text:span text:style-name="T303">n</text:span><text:span text:style-name="T302">detificador" </text:span><text:span text:style-name="T90">: </text:span><text:span text:style-name="T304">"GOIBE1111/2022"</text:span><text:span text:style-name="T90">,</text:span></text:p>
      <text:p text:style-name="P60"><text:span text:style-name="T302">"clauAcces" </text:span><text:span text:style-name="T90">: </text:span><text:span text:style-name="T304">"hv/8hXYRSFYtVEjZyDfEE8KdOIiX3N1UEXGiltl3rbw="</text:span></text:p>
      <text:p text:style-name="P101">}, {</text:p>
      <text:p text:style-name="P60"><text:span text:style-name="T302">"i</text:span><text:span text:style-name="T303">n</text:span><text:span text:style-name="T302">d</text:span><text:span text:style-name="T303">e</text:span><text:span text:style-name="T302">tificador" </text:span><text:span text:style-name="T90">: </text:span><text:span text:style-name="T304">"GOIBE2222/2022"</text:span><text:span text:style-name="T90">,</text:span></text:p>
      <text:p text:style-name="P246"><text:span text:style-name="T302">"clauAcces" </text:span><text:span text:style-name="T90">: </text:span><text:span text:style-name="T304">"AzRwN0QQV70RR4IxXFZsPj2FYJ2VA7LDiKap19MmA/U="</text:span></text:p>
      <text:p text:style-name="P246"><text:span text:style-name="T304">}</text:span><text:span text:style-name="T141"> ]</text:span></text:p>
      <text:p text:style-name="P246"/>
      <text:p text:style-name="P158"/>
      <text:p text:style-name="P21">En qualsevol d’aquestes implementacions l’autenticació haurà de ser de tipus HTTP Basic.</text:p>
      <text:p text:style-name="P21"/>
      <text:p text:style-name="P248"><text:span text:style-name="T12">Important:</text:span><text:span text:style-name="T11"> Les implementacions REST han de permetre una cridada amb un JSON que representa una llista buida («[]») sense produir cap error.</text:span></text:p>
      <text:p text:style-name="P21"/>
      <text:list xml:id="list181521203555778" text:continue-numbering="true" text:style-name="Outline">
        <text:list-item>
          <text:h text:style-name="P399"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37">Aquest servei permet <text:span text:style-name="T347">als backoffices consultar la informació d’una anotació de registre i canviar el seu estat.</text:span></text:p>
      <text:p text:style-name="P236"><draw:frame draw:style-name="fr3" draw:name="Marc1" text:anchor-type="as-char" svg:width="10.109cm" draw:z-index="73"><draw:text-box fo:min-height="8.481cm"><text:p text:style-name="P222"><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34"><text:sequence text:ref-name="refFig.1" text:name="Fig." text:formula="ooow:Fig.+1" style:num-format="1">2</text:sequence></text:span>: <text:s/><text:span text:style-name="T339">Casos d'ús </text:span><text:span text:style-name="T359">de gestió </text:span><text:span text:style-name="T341">d'anotacions a </text:span><text:span text:style-name="T339">DISTRIBUCIÓ</text:span></text:p></draw:text-box></draw:frame></text:p>
      <text:list xml:id="list181521260678177" text:continue-numbering="true" text:style-name="Outline">
        <text:list-item>
          <text:list>
            <text:list-item>
              <text:h text:style-name="P410" text:outline-level="2"><text:bookmark-start text:name="__RefHeading___Toc227357_390838441"/><text:bookmark-start text:name="Còpia de __RefHeading___Toc16770_2313926538 1"/><text:span text:style-name="T347">Diagram</text:span><text:span text:style-name="T349">a</text:span><text:span text:style-name="T347"> d</text:span><text:span text:style-name="T348">e seqüència</text:span><text:bookmark-end text:name="__RefHeading___Toc227357_390838441"/><text:bookmark-end text:name="Còpia de __RefHeading___Toc16770_2313926538 1"/></text:h>
            </text:list-item>
          </text:list>
        </text:list-item>
      </text:list>
      <text:p text:style-name="P219">El <text:span text:style-name="T136">detall</text:span> de la comunicació <text:span text:style-name="T136">entre</text:span> l’aplicació DISTRIBUCIÓ <text:span text:style-name="T360">i</text:span><text:span text:style-name="T136"> el backoffice </text:span><text:span text:style-name="T360">per a la gestió de les anotacions </text:span><text:span text:style-name="T136">es pot veure en el següent diagrama.</text:span></text:p>
      <text:p text:style-name="P218"><draw:custom-shape text:anchor-type="paragraph" draw:z-index="61" draw:name="Forma 6" draw:style-name="gr1" draw:text-style-name="P472" svg:width="0.556cm" svg:height="0.454cm" svg:x="8.474cm" svg:y="2.879cm"><text:p text:style-name="P471"><text:span text:style-name="T409">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72" svg:width="0.556cm" svg:height="0.454cm" svg:x="7.601cm" svg:y="3.487cm"><text:p text:style-name="P471"><text:span text:style-name="T409">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72" svg:width="0.556cm" svg:height="0.454cm" svg:x="1.251cm" svg:y="1.873cm"><text:p text:style-name="P471"><text:span text:style-name="T409">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72" svg:width="0.556cm" svg:height="0.454cm" svg:x="7.442cm" svg:y="5.048cm"><text:p text:style-name="P471"><text:span text:style-name="T409">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72" svg:width="0.556cm" svg:height="0.454cm" svg:x="7.468cm" svg:y="7.165cm"><text:p text:style-name="P471"><text:span text:style-name="T409">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810724487" text:style-name="L2">
        <text:list-item>
          <text:p text:style-name="P455">L’aplicació de distribució comunica al backoffice <text:span text:style-name="T138">l'existència</text:span> d’anotacions de registre pendents de processar mitjançant el mètode comunicarAnotacionsPendents del servei DistribucioBackoffice.</text:p>
        </text:list-item>
        <text:list-item>
          <text:p text:style-name="P456">El backoffice <text:span text:style-name="T138">ha de </text:span>guardar en una coa la llista d’anotacions a processar i finalitzar la comunicació.</text:p>
        </text:list-item>
        <text:list-item>
          <text:p text:style-name="P458">El backoffice <text:span text:style-name="T138">ha de processar les anotacions pendents que se li han comunicat.</text:span></text:p>
        </text:list-item>
      </text:list>
      <text:p text:style-name="P215">A mesura que el backoffice vagi processant les anotacions de registre, es requer<text:span text:style-name="T138">eix</text:span> la següent comunicació amb l’aplicació de DISTRIBUCIO:</text:p>
      <text:list xml:id="list181520678090566" text:continue-numbering="true" text:style-name="L2">
        <text:list-item>
          <text:p text:style-name="P45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6"><text:bookmark-start text:name="__RefNumPara__52573_2521683781"/>Una vegada processada l’anotació, el backoffice haurà de comunicar a l’aplicació de DISTRIBUCIO l’estat d’aquest processament mitjançant el mètode canviEstat<text:span text:style-name="T137"> del servei DistribucioBackoffice.</text:span> Els possibles estats son:<text:bookmark-end text:name="__RefNumPara__52573_2521683781"/></text:p>
        </text:list-item>
      </text:list>
      <text:list xml:id="list517597567" text:style-name="L3">
        <text:list-item>
          <text:list>
            <text:list-item>
              <text:p text:style-name="P459">REBUDA: S'ha rebut la petició al backoffice.</text:p>
            </text:list-item>
            <text:list-item>
              <text:p text:style-name="P457">PENDENT<text:span text:style-name="T342">: L'anotació s'ha rebut i consultat correctament i està pendent de processament.</text:span></text:p>
            </text:list-item>
            <text:list-item>
              <text:p text:style-name="P459">REBUTJADA: Es comunica l'estat i el motiu a DISTRIBUCIO conforme l'anotació es rebutja des del backoffice i per a que quedi com a rebutjada i pendent de processament a DISTRIBUCIO</text:p>
            </text:list-item>
            <text:list-item>
              <text:p text:style-name="P457"><text:soft-page-break/>PROCESSADA<text:span text:style-name="T342">: L'anotació s'ha processat correctament al backoffice.</text:span></text:p>
            </text:list-item>
            <text:list-item>
              <text:p text:style-name="P457">ERROR<text:span text:style-name="T342">: El processament de l'anotació o la consulta ha resultat amb error i es comunica a DISTRIBUCIO per a que reintenti l'enviament o la marqui amb un error.</text:span></text:p>
            </text:list-item>
          </text:list>
        </text:list-item>
      </text:list>
      <text:p text:style-name="P221">Quan el backoffice rep la comunicació d'anotació pendent pot marcar l'estat <text:span text:style-name="T343">«</text:span>REBUDA<text:span text:style-name="T343">»</text:span> conforme ha rebut la petició i si no processa immediatament l'anotació pot posar que està pendent de processament amb l'estat <text:span text:style-name="T343">«</text:span>PENDENT<text:span text:style-name="T343">»</text:span>.</text:p>
      <text:p text:style-name="P215">Si el backoffice ha processat correctament l’anotació de registre l’estat indicat haurà de ser «PROCESSADA». En canvi, si l’anotació ha produït algun tipus d’error de processament, l’estat indicat haurà de ser «ERROR».<text:span text:style-name="T342"> També hi ha la possibilitat de rebutjar les anotacions amb l'estat </text:span>«<text:span text:style-name="T342">REBUTJADA</text:span>»<text:span text:style-name="T342">.</text:span></text:p>
      <text:list xml:id="list181521152349715" text:continue-list="list181521260678177" text:style-name="Outline">
        <text:list-item>
          <text:list>
            <text:list-item>
              <text:h text:style-name="P406"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P418" text:outline-level="3"><text:bookmark-start text:name="__RefHeading___Toc53751_2521683781"/>Consulta d'una anotació <text:span text:style-name="T357">de registre</text:span><text:bookmark-end text:name="__RefHeading___Toc53751_2521683781"/></text:h>
                </text:list-item>
              </text:list>
            </text:list-item>
          </text:list>
        </text:list-item>
      </text:list>
      <text:p text:style-name="P192"/>
      <text:p text:style-name="P198">Aquest mètode és el que permet <text:span text:style-name="T313">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199">Els backoffices d’integració hauran de sol·licitar la creació d’un usuari d’integració específic que disposi del rol <text:span text:style-name="Strong_20_Emphasis"><text:span text:style-name="T150">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8">Consulta d’una anotació de registre</text:p>
          </table:table-cell>
          <table:covered-table-cell/>
        </table:table-row>
        <table:table-row table:style-name="TableLine776710528">
          <table:table-cell table:style-name="Taula14.A8" office:value-type="string">
            <text:p text:style-name="P39">Mètode</text:p>
          </table:table-cell>
          <table:table-cell table:style-name="Taula14.B8" office:value-type="string">
            <text:p text:style-name="P207">GET</text:p>
          </table:table-cell>
        </table:table-row>
        <table:table-row table:style-name="TableLine776710240">
          <table:table-cell table:style-name="Taula14.A8" office:value-type="string">
            <text:p text:style-name="P33">URL</text:p>
          </table:table-cell>
          <table:table-cell table:style-name="Taula14.B8" office:value-type="string">
            <text:p text:style-name="P193">http<text:span text:style-name="T346">s</text:span>://<text:span text:style-name="T346">DISTRIB_HOST/distribucioapi/interna</text:span>/<text:span text:style-name="T313">backoffice</text:span>/<text:span text:style-name="T313">consulta</text:span></text:p>
          </table:table-cell>
        </table:table-row>
        <table:table-row table:style-name="TableLine776703328">
          <table:table-cell table:style-name="Taula14.A8" office:value-type="string">
            <text:p text:style-name="P32">Descripció</text:p>
          </table:table-cell>
          <table:table-cell table:style-name="Taula14.B8" office:value-type="string">
            <text:p text:style-name="P47"><text:span text:style-name="T313">Consulta les dades d'una anotació i dels seus interessats i annexos a partir de l'identificador i clau comunicada per DISTRIBUCIO</text:span>.<text:span text:style-name="T314"> </text:span></text:p>
          </table:table-cell>
        </table:table-row>
        <table:table-row table:style-name="TableLine776707648">
          <table:table-cell table:style-name="Taula14.A8" office:value-type="string">
            <text:p text:style-name="P39">Autenticació</text:p>
          </table:table-cell>
          <table:table-cell table:style-name="Taula14.B8" office:value-type="string">
            <text:p text:style-name="P366">HTTP Basic</text:p>
          </table:table-cell>
        </table:table-row>
        <table:table-row table:style-name="TableLine776709664">
          <table:table-cell table:style-name="Taula14.A8" office:value-type="string">
            <text:p text:style-name="P39">Rols requerits</text:p>
          </table:table-cell>
          <table:table-cell table:style-name="Taula14.B8" office:value-type="string">
            <text:p text:style-name="P366">DIS_BACKWS</text:p>
          </table:table-cell>
        </table:table-row>
        <table:table-row table:style-name="TableLine776709952">
          <table:table-cell table:style-name="Taula14.A8" office:value-type="string">
            <text:p text:style-name="P32">Paràmetres</text:p>
          </table:table-cell>
          <table:table-cell table:style-name="Taula14.B8" office:value-type="string">
            <text:list xml:id="list2493554583" text:style-name="L4">
              <text:list-item>
                <text:p text:style-name="P431"><text:span text:style-name="T49">identificador</text:span><text:span text:style-name="T307">:</text:span><text:span text:style-name="T314"> És l'identificador de l'anotació comunicada per DISTRIBUCIO. </text:span><text:span text:style-name="T333">Sol coincidir amb </text:span><text:span text:style-name="T314">el número de registre de l'anotació.</text:span></text:p>
              </text:list-item>
              <text:list-item>
                <text:p text:style-name="P431"><text:span text:style-name="T48">clauAcces</text:span><text:span text:style-name="T307">: </text:span><text:span text:style-name="T314">És una clau proporcionada per DISTRIBUCIO en el moment de notificar al backoffice l'anotació de registre que s'ha d'emprar per consultar o canviar l'estat </text:span><text:span text:style-name="T333">de</text:span><text:span text:style-name="T314"> l'anotació.</text:span></text:p>
              </text:list-item>
            </text:list>
            <text:p text:style-name="P47"><text:span text:style-name="T328">Com que és una petició de consulta els paràmetres s'informen en la </text:span><text:span text:style-name="T333">pròpia </text:span><text:span text:style-name="T328">URL. </text:span><text:soft-page-break/><text:span text:style-name="T314">Un exemple de petició seria el següent. </text:span><text:span text:style-name="T315">Pels paràmetres identificador: </text:span><text:span text:style-name="T317">"GOIBE715-DEV/2023"</text:span><text:span text:style-name="T315"> i clau d'accés </text:span><text:span text:style-name="T317">"JRwLmCaMES6JKAAnzhd5K9Qi4ppjudiLwd+2b5LNsVo="</text:span><text:span text:style-name="T315"> la petició amb els paràmetres codif</text:span><text:span text:style-name="T333">i</text:span><text:span text:style-name="T315">cats </text:span><text:span text:style-name="T333">és</text:span><text:span text:style-name="T315">:</text:span></text:p>
            <text:p text:style-name="P202">GET https://<text:span text:style-name="T333">se</text:span>.caib.es/distribucioapi/interna/backoffice/consulta?ide<text:span text:style-name="T373">n</text:span>tificador=GOIBE715-DEV%2F2023&amp;clauAcces=JRwLmCaMES6JKAAnzhd5K9Qi4ppjudiLwd%2B2b5LNsVo%3D</text:p>
          </table:table-cell>
        </table:table-row>
        <table:table-row table:style-name="TableLine776708512">
          <table:table-cell table:style-name="Taula14.A8" office:value-type="string">
            <text:p text:style-name="P32">Resultat</text:p>
          </table:table-cell>
          <table:table-cell table:style-name="Taula14.B8" office:value-type="string">
            <text:list xml:id="list3343350067" text:style-name="L5">
              <text:list-item>
                <text:p text:style-name="P434">HTTP 200 i el JSON del detall de l'anotació com a cos de la resposta.</text:p>
              </text:list-item>
              <text:list-item>
                <text:p text:style-name="P436">HTTP <text:span text:style-name="T321">401</text:span> <text:span text:style-name="T321">si l'usuari no té el rol DIS_BACKWS amb un missatge d'error com a cos de la resposta.</text:span></text:p>
              </text:list-item>
              <text:list-item>
                <text:p text:style-name="P439">HTTP 500 si es produe<text:span text:style-name="T333">i</text:span>x un error intern no controlat <text:span text:style-name="T321">consultant l'anotació</text:span>.</text:p>
              </text:list-item>
            </text:list>
            <text:p text:style-name="P208"><text:s/>Un exemple de JSON de resposta, de forma abreujada, seria el següent:</text:p>
            <text:p text:style-name="P208"/>
            <text:p text:style-name="P104">{</text:p>
            <text:p text:style-name="P109">    <text:span text:style-name="T324">"identificador"</text:span><text:span text:style-name="T322">: </text:span><text:span text:style-name="T316">"GOIBE715-DEV/2023"</text:span><text:span text:style-name="T322">,</text:span></text:p>
            <text:p text:style-name="P111">    <text:span text:style-name="T324">"procedimentCodi"</text:span><text:span text:style-name="T322">: </text:span><text:span text:style-name="T316">"703381"</text:span><text:span text:style-name="T322">,</text:span></text:p>
            <text:p text:style-name="P111">    <text:span text:style-name="T324">"</text:span><text:span text:style-name="T326">servei</text:span><text:span text:style-name="T324">Codi"</text:span><text:span text:style-name="T322">: </text:span><text:span text:style-name="T319">null</text:span><text:span text:style-name="T322">,</text:span></text:p>
            <text:p text:style-name="P111">    <text:span text:style-name="T324">"extracte"</text:span><text:span text:style-name="T322">: </text:span><text:span text:style-name="T316">"Solicitud de equivalencia - Equivalencia con los títulos de Graduado en Educación Secundaria Obligatoria y de Bachiller"</text:span><text:span text:style-name="T322">,</text:span></text:p>
            <text:p text:style-name="P109">    <text:span text:style-name="T324">"data"</text:span><text:span text:style-name="T322">: </text:span><text:span text:style-name="T327">1683181017253</text:span><text:span text:style-name="T322">,</text:span></text:p>
            <text:p text:style-name="P105"><text:s text:c="2"/>...</text:p>
            <text:p text:style-name="P109">    <text:span text:style-name="T324">"interessats"</text:span><text:span text:style-name="T322">: [</text:span></text:p>
            <text:p text:style-name="P109">        <text:span text:style-name="T322">{</text:span></text:p>
            <text:p text:style-name="P109">            <text:span text:style-name="T324">"tipus"</text:span><text:span text:style-name="T322">: </text:span><text:span text:style-name="T316">"PERSONA_FISICA"</text:span><text:span text:style-name="T322">,</text:span></text:p>
            <text:p text:style-name="P109">            <text:span text:style-name="T324">"documentTipus"</text:span><text:span text:style-name="T322">: </text:span><text:span text:style-name="T316">"NIF"</text:span><text:span text:style-name="T322">,</text:span></text:p>
            <text:p text:style-name="P109">            <text:span text:style-name="T321">...</text:span></text:p>
            <text:p text:style-name="P109">        <text:span text:style-name="T322">}</text:span></text:p>
            <text:p text:style-name="P109">    <text:span text:style-name="T322">],</text:span></text:p>
            <text:p text:style-name="P109">    <text:span text:style-name="T324">"annexos"</text:span><text:span text:style-name="T322">: [</text:span></text:p>
            <text:p text:style-name="P109">        <text:span text:style-name="T322">{</text:span></text:p>
            <text:p text:style-name="P109">            <text:span text:style-name="T324">"titol"</text:span><text:span text:style-name="T322">: </text:span><text:span text:style-name="T316">"Formulario de identificación del firmante"</text:span><text:span text:style-name="T322">,</text:span></text:p>
            <text:p text:style-name="P109">            <text:span text:style-name="T324">"nom"</text:span><text:span text:style-name="T322">: </text:span><text:span text:style-name="T316">"FORM-1-1.pdf"</text:span><text:span text:style-name="T322">,</text:span></text:p>
            <text:p text:style-name="P109">            <text:span text:style-name="T324">"contingut"</text:span><text:span text:style-name="T322">: </text:span><text:span text:style-name="T320">null</text:span><text:span text:style-name="T322">,</text:span></text:p>
            <text:p text:style-name="P109">            <text:span text:style-name="T324">"uuid"</text:span><text:span text:style-name="T322">: </text:span><text:span text:style-name="T316">"0276698a-d0f9-44f7-84be-841a98881e4a"</text:span><text:span text:style-name="T322">,</text:span></text:p>
            <text:p text:style-name="P109">            <text:span text:style-name="T323">...</text:span></text:p>
            <text:p text:style-name="P109">            <text:span text:style-name="T324">"documentValid"</text:span><text:span text:style-name="T322">: </text:span><text:span text:style-name="T320">true</text:span><text:span text:style-name="T322">,</text:span></text:p>
            <text:p text:style-name="P109">            <text:span text:style-name="T324">"documentError"</text:span><text:span text:style-name="T322">: </text:span><text:span text:style-name="T320">null</text:span><text:span text:style-name="T322">,</text:span></text:p>
            <text:p text:style-name="P109">            <text:span text:style-name="T324">"estat"</text:span><text:span text:style-name="T322">: </text:span><text:span text:style-name="T316">"DEFINITIU"</text:span></text:p>
            <text:p text:style-name="P109">        <text:span text:style-name="T322">}</text:span></text:p>
            <text:p text:style-name="P109">    <text:span text:style-name="T322">],</text:span></text:p>
            <text:p text:style-name="P109">    <text:span text:style-name="T324">"justificantFitxerArxiuUuid"</text:span><text:span text:style-name="T322">: </text:span><text:span text:style-name="T316">"0cd70aa5-77aa-4d2e-8032-d84cad38669b"</text:span><text:span text:style-name="T322">,</text:span></text:p>
            <text:p text:style-name="P109">    <text:span text:style-name="T324">"destiCodi"</text:span><text:span text:style-name="T322">: </text:span><text:span text:style-name="T316">"A04013522"</text:span><text:span text:style-name="T322">,</text:span></text:p>
            <text:p text:style-name="P109">    <text:span text:style-name="T324">"destiDescripcio"</text:span><text:span text:style-name="T322">: </text:span><text:span text:style-name="T316">"Direcció General de Planificació, Ordenació i Centres"</text:span></text:p>
            <text:p text:style-name="P110">    <text:span text:style-name="T324">"</text:span><text:span text:style-name="T325">tramitCodi</text:span><text:span text:style-name="T324">"</text:span><text:span text:style-name="T322">: </text:span><text:span text:style-name="T316">"</text:span><text:span text:style-name="T318">1234</text:span><text:span text:style-name="T316">"</text:span></text:p>
            <text:p text:style-name="P110"><text:soft-page-break/>    <text:span text:style-name="T324">"</text:span><text:span text:style-name="T325">tramitNom</text:span><text:span text:style-name="T324">"</text:span><text:span text:style-name="T322">: </text:span><text:span text:style-name="T316">"</text:span><text:span text:style-name="T318">Nom del tràmit</text:span><text:span text:style-name="T316">"</text:span></text:p>
            <text:p text:style-name="P106">}</text:p>
            <text:p text:style-name="P201"/>
          </table:table-cell>
        </table:table-row>
      </table:table>
      <text:p text:style-name="P197"/>
      <text:p text:style-name="P209">El JSON de la resposta conté les dades de l'anotació, els interessats i dels annexos. És el mapeig a JSON de les classes descrites en el punt anterior del WS d'integració. </text:p>
      <text:list xml:id="list181520802875812" text:continue-list="list181521152349715" text:style-name="Outline">
        <text:list-item>
          <text:list>
            <text:list-item>
              <text:list>
                <text:list-item>
                  <text:h text:style-name="P418" text:outline-level="3"><text:bookmark-start text:name="__RefHeading___Toc53753_2521683781"/>Canvi d'estat d'una anotació<text:bookmark-end text:name="__RefHeading___Toc53753_2521683781"/></text:h>
                </text:list-item>
              </text:list>
            </text:list-item>
          </text:list>
        </text:list-item>
      </text:list>
      <text:p text:style-name="P197"><text:span text:style-name="T328">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8">Canvi d'estat d'una anotació</text:p>
          </table:table-cell>
          <table:covered-table-cell/>
        </table:table-row>
        <table:table-row table:style-name="TableLine776703616">
          <table:table-cell table:style-name="Taula15.A2" office:value-type="string">
            <text:p text:style-name="P32">URL</text:p>
          </table:table-cell>
          <table:table-cell table:style-name="Taula15.B2" office:value-type="string">
            <text:p text:style-name="P193">http<text:span text:style-name="T346">s</text:span>://<text:span text:style-name="T346">DISTRIB_HOST/distribucioapi/interna</text:span>/<text:span text:style-name="T313">backoffice</text:span>/<text:span text:style-name="T328">canviEstat</text:span></text:p>
          </table:table-cell>
        </table:table-row>
        <table:table-row table:style-name="TableLine776706496">
          <table:table-cell table:style-name="Taula15.A7" office:value-type="string">
            <text:p text:style-name="P41">Mètode</text:p>
          </table:table-cell>
          <table:table-cell table:style-name="Taula15.B7" office:value-type="string">
            <text:p text:style-name="P210">POST</text:p>
          </table:table-cell>
        </table:table-row>
        <table:table-row table:style-name="TableLine776705344">
          <table:table-cell table:style-name="Taula15.A7" office:value-type="string">
            <text:p text:style-name="P32">Descripció</text:p>
          </table:table-cell>
          <table:table-cell table:style-name="Taula15.B7" office:value-type="string">
            <text:p text:style-name="P47">Canvia l'estat d'una anotació de registre enviada a backoffice.<text:span text:style-name="T314"> </text:span></text:p>
          </table:table-cell>
        </table:table-row>
        <table:table-row table:style-name="TableLine776705056">
          <table:table-cell table:style-name="Taula15.A7" office:value-type="string">
            <text:p text:style-name="P39">Autenticació</text:p>
          </table:table-cell>
          <table:table-cell table:style-name="Taula15.B7" office:value-type="string">
            <text:p text:style-name="P366">HTTP Basic</text:p>
          </table:table-cell>
        </table:table-row>
        <table:table-row table:style-name="TableLine776704480">
          <table:table-cell table:style-name="Taula15.A7" office:value-type="string">
            <text:p text:style-name="P39">Rols requerits</text:p>
          </table:table-cell>
          <table:table-cell table:style-name="Taula15.B7" office:value-type="string">
            <text:p text:style-name="P366">DIS_BACKWS</text:p>
          </table:table-cell>
        </table:table-row>
        <table:table-row table:style-name="TableLine776704192">
          <table:table-cell table:style-name="Taula15.A7" office:value-type="string">
            <text:p text:style-name="P32">Paràmetres</text:p>
          </table:table-cell>
          <table:table-cell table:style-name="Taula15.B7" office:value-type="string">
            <text:p text:style-name="P190"><text:s/>En aquest cas <text:span text:style-name="T329">la petició es passa com a un objecte JSON en el cos de la petició POST on s'ha d</text:span><text:span text:style-name="T334">'</text:span><text:span text:style-name="T329">especificar l'identificador amb la clau, l'estat i les observacions. Els paràmetres serien els següents:</text:span></text:p>
            <text:p text:style-name="P190"/>
            <text:list xml:id="list181520314913277" text:continue-list="list2493554583" text:style-name="L4">
              <text:list-item>
                <text:p text:style-name="P444">id:</text:p>
                <text:list>
                  <text:list-item>
                    <text:p text:style-name="P431"><text:span text:style-name="T49">identificador</text:span><text:span text:style-name="T307">:</text:span><text:span text:style-name="T314"> És l'identificador de l'anotació comunicada per DISTRIBUCIO. Típicament sol ser el número de registre de l'anotació.</text:span><text:span text:style-name="T330"> Format String, dada obligatòria.</text:span></text:p>
                  </text:list-item>
                  <text:list-item>
                    <text:p text:style-name="P431"><text:span text:style-name="T48">clauAcces</text:span><text:span text:style-name="T307">: </text:span><text:span text:style-name="T314">És una clau proporcionada per DISTRIBUCIO en el moment de notificar al backoffice l'anotació de registre que s'ha d'emprar per consultar o canviar l'estat a l'anotació</text:span><text:span text:style-name="T330">. Format String, dada o</text:span><text:span text:style-name="T334">b</text:span><text:span text:style-name="T330">li</text:span><text:span text:style-name="T334">g</text:span><text:span text:style-name="T330">atòria</text:span><text:span text:style-name="T314">.</text:span></text:p>
                  </text:list-item>
                </text:list>
              </text:list-item>
              <text:list-item>
                <text:p text:style-name="P444">estat:<text:span text:style-name="T330"> </text:span><text:span text:style-name="T236">Codi del nou estat a comunicar a DISTRIBUCIO per l'anotació. S'ha d'informar en fo</text:span><text:span text:style-name="T237">r</text:span><text:span text:style-name="T236">mat String i és una dada obligatòria. Els possibles estats són:</text:span></text:p>
                <text:list>
                  <text:list-item>
                    <text:p text:style-name="P447">REBUDA: Indica a DISTRIBUCIO que pot marcar l'anotació com a rebuda al backoffice.</text:p>
                  </text:list-item>
                  <text:list-item>
                    <text:p text:style-name="P447">PROCESSADA: <text:span text:style-name="T334">Marca l'anotació </text:span>l'anotació <text:span text:style-name="T334">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34">n</text:span>t de l'Arxiu de l'expedient del backoffice.</text:p>
                  </text:list-item>
                  <text:list-item>
                    <text:p text:style-name="P447">REBUTJADA: Marca l'anotació com a rebutjada pel backoffice. <text:soft-page-break/>Aquesta apareixerà com a<text:span text:style-name="T334"> rebutjada pel backoffice </text:span>a DISTRIBUCIO <text:span text:style-name="T334">amb el comentari que s'hagi informat</text:span>.<text:span text:style-name="T334"> </text:span></text:p>
                  </text:list-item>
                  <text:list-item>
                    <text:p text:style-name="P447">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4">observacions:<text:span text:style-name="T330"> </text:span><text:span text:style-name="T236">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7"/>
            <text:p text:style-name="P47"><text:span text:style-name="T314"><text:s/>Un exemple de petició seria el següent. </text:span><text:span text:style-name="T315">Pels paràmetres identificador: </text:span><text:span text:style-name="T317">"GOIBE1682590959780/2023"</text:span><text:span text:style-name="T315"> i clau d'accés </text:span><text:span text:style-name="T317">"RfG3stK7Bc7JmuOk+riod/uOnBNGUEPqZt6+1/HiTlc="</text:span><text:span text:style-name="T315"> la petició amb els paràmetres</text:span><text:span text:style-name="T329"> en el cos de la petició POST com a JSON</text:span><text:span text:style-name="T315"> seria:</text:span></text:p>
            <text:p text:style-name="P203">POST</text:p>
            <text:p text:style-name="P103">{</text:p>
            <text:p text:style-name="P107">  <text:span text:style-name="T324">"id"</text:span><text:span text:style-name="T322">: {</text:span></text:p>
            <text:p text:style-name="P108">    <text:span text:style-name="T324">"identificador"</text:span><text:span text:style-name="T322">: </text:span><text:span text:style-name="T316">"GOIBE1682590959780/2023"</text:span><text:span text:style-name="T322">,</text:span></text:p>
            <text:p text:style-name="P107">    <text:span text:style-name="T324">"clauAcces"</text:span><text:span text:style-name="T322">: </text:span><text:span text:style-name="T316">"RfG3stK7Bc7JmuOk+riod/uOnBNGUEPqZt6+1/HiTlc="</text:span></text:p>
            <text:p text:style-name="P107">  <text:span text:style-name="T322">},</text:span></text:p>
            <text:p text:style-name="P107">  <text:span text:style-name="T324">"estat"</text:span><text:span text:style-name="T322">: </text:span><text:span text:style-name="T316">"PROCESSADA"</text:span><text:span text:style-name="T322">,</text:span></text:p>
            <text:p text:style-name="P107">  <text:span text:style-name="T324">"observacions"</text:span><text:span text:style-name="T322">: </text:span><text:span text:style-name="T316">"S'ha creat l'expedient 123/2023"</text:span></text:p>
            <text:p text:style-name="P102">}</text:p>
            <text:p text:style-name="P200"/>
          </table:table-cell>
        </table:table-row>
        <table:table-row table:style-name="TableLine776703904">
          <table:table-cell table:style-name="Taula15.A8" office:value-type="string">
            <text:p text:style-name="P32">Resultat</text:p>
          </table:table-cell>
          <table:table-cell table:style-name="Taula15.B8" office:value-type="string">
            <text:list xml:id="list4194468399" text:style-name="L6">
              <text:list-item>
                <text:p text:style-name="P435">HTTP 200 <text:span text:style-name="T331">si la petició s'ha processat correctament.</text:span></text:p>
              </text:list-item>
              <text:list-item>
                <text:p text:style-name="P440">HTTP 500 si es produeix un error intern no controlat <text:span text:style-name="T321">consultant l'anotació</text:span>.<text:span text:style-name="T331"> Com a cos de la resposta es retorna el missatge de confirmació.</text:span></text:p>
              </text:list-item>
            </text:list>
          </table:table-cell>
        </table:table-row>
      </table:table>
      <text:p text:style-name="P209"/>
      <text:list xml:id="list181520267436760" text:continue-list="list181520802875812" text:style-name="Outline">
        <text:list-item>
          <text:list>
            <text:list-item>
              <text:h text:style-name="P411"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20">A continuació es mostra el diagrama de classes amb els detalls de l’objecte AnotacioRegistreEntrada:</text:p>
      <text:p text:style-name="P160"><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7"/>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87862960">
          <table:table-cell table:style-name="Taula4.A1" table:number-columns-spanned="5" office:value-type="string">
            <text:p text:style-name="P141">annex</text:p>
          </table:table-cell>
          <table:covered-table-cell/>
          <table:covered-table-cell/>
          <table:covered-table-cell/>
          <table:covered-table-cell/>
        </table:table-row>
        <table:table-row table:style-name="TableLine776700736">
          <table:table-cell table:style-name="Taula4.A2" office:value-type="string">
            <text:p text:style-name="P36">Nom del camp</text:p>
          </table:table-cell>
          <table:table-cell table:style-name="Taula4.A2" office:value-type="string">
            <text:p text:style-name="P36">Tipus</text:p>
          </table:table-cell>
          <table:table-cell table:style-name="Taula4.A2" office:value-type="string">
            <text:p text:style-name="P36">Mult.</text:p>
          </table:table-cell>
          <table:table-cell table:style-name="Taula4.A2" office:value-type="string">
            <text:p text:style-name="P38">Tamany</text:p>
          </table:table-cell>
          <table:table-cell table:style-name="Taula4.E2" office:value-type="string">
            <text:p text:style-name="P38">Descripció</text:p>
          </table:table-cell>
        </table:table-row>
        <table:table-row table:style-name="TableLine776696416">
          <table:table-cell table:style-name="Taula4.A3" office:value-type="string">
            <text:p text:style-name="P311">contingut</text:p>
          </table:table-cell>
          <table:table-cell table:style-name="Taula4.A3" office:value-type="string">
            <text:p text:style-name="P294">Byte[]</text:p>
          </table:table-cell>
          <table:table-cell table:style-name="Taula4.A3" office:value-type="string">
            <text:p text:style-name="P253">0..1</text:p>
          </table:table-cell>
          <table:table-cell table:style-name="Taula4.A3" office:value-type="string">
            <text:p text:style-name="P312">var</text:p>
          </table:table-cell>
          <table:table-cell table:style-name="Taula4.E3" office:value-type="string">
            <text:p text:style-name="P297">Cadena de bytes que componen el contingut del fitxer de firma annex si n’hi ha. <text:span text:style-name="T127">És obligatori si el tipus de firma és TF04.</text:span></text:p>
          </table:table-cell>
        </table:table-row>
        <table:table-row table:style-name="TableLine776698432">
          <table:table-cell table:style-name="Taula4.A3" office:value-type="string">
            <text:p text:style-name="P314">firmaContingut</text:p>
          </table:table-cell>
          <table:table-cell table:style-name="Taula4.A3" office:value-type="string">
            <text:p text:style-name="P294">Byte[]</text:p>
          </table:table-cell>
          <table:table-cell table:style-name="Taula4.A3" office:value-type="string">
            <text:p text:style-name="P253">0..1</text:p>
          </table:table-cell>
          <table:table-cell table:style-name="Taula4.A3" office:value-type="string">
            <text:p text:style-name="P359">var</text:p>
          </table:table-cell>
          <table:table-cell table:style-name="Taula4.E3" office:value-type="string">
            <text:p text:style-name="P297">Cadena de bytes que componen el contingut del fitxer de firma annex si n’hi ha. <text:span text:style-name="T127">És obligatori si el tipus de firma és TF04.</text:span> </text:p>
          </table:table-cell>
        </table:table-row>
        <table:table-row table:style-name="TableLine776698144">
          <table:table-cell table:style-name="Taula4.A3" office:value-type="string">
            <text:p text:style-name="P314">firmaNom</text:p>
          </table:table-cell>
          <table:table-cell table:style-name="Taula4.A3" office:value-type="string">
            <text:p text:style-name="P315">Cadena</text:p>
          </table:table-cell>
          <table:table-cell table:style-name="Taula4.A3" office:value-type="string">
            <text:p text:style-name="P253">0..1</text:p>
          </table:table-cell>
          <table:table-cell table:style-name="Taula4.A3" office:value-type="string">
            <text:p text:style-name="P312">256</text:p>
          </table:table-cell>
          <table:table-cell table:style-name="Taula4.E3" office:value-type="string">
            <text:p text:style-name="P261"><text:s/><text:span text:style-name="T297">Nom del fitxer de la firma de l’annex si n’hi ha. És obligatori si el tipus de firma és TF04.</text:span></text:p>
          </table:table-cell>
        </table:table-row>
        <table:table-row table:style-name="TableLine776697856">
          <table:table-cell table:style-name="Taula4.A3" office:value-type="string">
            <text:p text:style-name="P314">firmaPerfil</text:p>
          </table:table-cell>
          <table:table-cell table:style-name="Taula4.A3" office:value-type="string">
            <text:p text:style-name="P315">firmaPerfil</text:p>
          </table:table-cell>
          <table:table-cell table:style-name="Taula4.A3" office:value-type="string">
            <text:p text:style-name="P257">0..1</text:p>
          </table:table-cell>
          <table:table-cell table:style-name="Taula4.A3" office:value-type="string">
            <text:p text:style-name="P312">30</text:p>
          </table:table-cell>
          <table:table-cell table:style-name="Taula4.E3" office:value-type="string">
            <text:p text:style-name="P313">Codi de perfil de la firma. </text:p>
          </table:table-cell>
        </table:table-row>
        <table:table-row table:style-name="TableLine776697568">
          <table:table-cell table:style-name="Taula4.A3" office:value-type="string">
            <text:p text:style-name="P314">firmaTamany</text:p>
          </table:table-cell>
          <table:table-cell table:style-name="Taula4.A3" office:value-type="string">
            <text:p text:style-name="P284">Numèric</text:p>
          </table:table-cell>
          <table:table-cell table:style-name="Taula4.A3" office:value-type="string">
            <text:p text:style-name="P268"/>
          </table:table-cell>
          <table:table-cell table:style-name="Taula4.A3" office:value-type="string">
            <text:p text:style-name="P352"/>
          </table:table-cell>
          <table:table-cell table:style-name="Taula4.E3" office:value-type="string">
            <text:p text:style-name="P259"/>
          </table:table-cell>
        </table:table-row>
        <table:table-row table:style-name="TableLine776698720">
          <table:table-cell table:style-name="Taula4.A3" office:value-type="string">
            <text:p text:style-name="P314">firmaTipus</text:p>
          </table:table-cell>
          <table:table-cell table:style-name="Taula4.A3" office:value-type="string">
            <text:p text:style-name="P315">firmaTipus</text:p>
          </table:table-cell>
          <table:table-cell table:style-name="Taula4.A3" office:value-type="string">
            <text:p text:style-name="P257">0..1</text:p>
          </table:table-cell>
          <table:table-cell table:style-name="Taula4.A3" office:value-type="string">
            <text:p text:style-name="P360">30</text:p>
          </table:table-cell>
          <table:table-cell table:style-name="Taula4.E3" office:value-type="string">
            <text:p text:style-name="P316">Codi del tipus de firma. </text:p>
          </table:table-cell>
        </table:table-row>
        <table:table-row table:style-name="TableLine776814496">
          <table:table-cell table:style-name="Taula4.A3" office:value-type="string">
            <text:p text:style-name="P314">firmaTipusMime</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60">30</text:p>
          </table:table-cell>
          <table:table-cell table:style-name="Taula4.E3" office:value-type="string">
            <text:p text:style-name="P316">Tipus MIME del fitxer de firma annexat si n’hi ha. És obligatori si el tipus de firma és TF04.</text:p>
          </table:table-cell>
        </table:table-row>
        <table:table-row table:style-name="TableLine776812768">
          <table:table-cell table:style-name="Taula4.A3" office:value-type="string">
            <text:p text:style-name="P314">nom</text:p>
          </table:table-cell>
          <table:table-cell table:style-name="Taula4.A3" office:value-type="string">
            <text:p text:style-name="P269">Cadena</text:p>
          </table:table-cell>
          <table:table-cell table:style-name="Taula4.A3" office:value-type="string">
            <text:p text:style-name="P268"><text:span text:style-name="T292">0..</text:span>1</text:p>
          </table:table-cell>
          <table:table-cell table:style-name="Taula4.A3" office:value-type="string">
            <text:p text:style-name="P317">256</text:p>
          </table:table-cell>
          <table:table-cell table:style-name="Taula4.E3" office:value-type="string">
            <text:p text:style-name="P316">Nom del fitxer annexat. </text:p>
          </table:table-cell>
        </table:table-row>
        <table:table-row table:style-name="TableLine776696128">
          <table:table-cell table:style-name="Taula4.A3" office:value-type="string">
            <text:p text:style-name="P314">ntiEstadoElaboracion</text:p>
          </table:table-cell>
          <table:table-cell table:style-name="Taula4.A3" office:value-type="string">
            <text:p text:style-name="P315">ntiEstadoElaboracion</text:p>
          </table:table-cell>
          <table:table-cell table:style-name="Taula4.A3" office:value-type="string">
            <text:p text:style-name="P257">0..1</text:p>
          </table:table-cell>
          <table:table-cell table:style-name="Taula4.A3" office:value-type="string">
            <text:p text:style-name="P317">4</text:p>
          </table:table-cell>
          <table:table-cell table:style-name="Taula4.E3" office:value-type="string">
            <text:p text:style-name="P316">Codi de la metadata estat elaboració de la NTI de document electrònic. </text:p>
          </table:table-cell>
        </table:table-row>
        <table:table-row table:style-name="TableLine776722912">
          <table:table-cell table:style-name="Taula4.A3" office:value-type="string">
            <text:p text:style-name="P314">ntiFechaCaptura</text:p>
          </table:table-cell>
          <table:table-cell table:style-name="Taula4.A3" office:value-type="string">
            <text:p text:style-name="P315">dateTime</text:p>
          </table:table-cell>
          <table:table-cell table:style-name="Taula4.A3" office:value-type="string">
            <text:p text:style-name="P257">0..1</text:p>
          </table:table-cell>
          <table:table-cell table:style-name="Taula4.A3" office:value-type="string">
            <text:p text:style-name="P317">14</text:p>
          </table:table-cell>
          <table:table-cell table:style-name="Taula4.E3" office:value-type="string">
            <text:p text:style-name="P288">Data de captura del document.</text:p>
          </table:table-cell>
        </table:table-row>
        <table:table-row table:style-name="TableLine776788576">
          <table:table-cell table:style-name="Taula4.A3" office:value-type="string">
            <text:p text:style-name="P318">ntiOrigen</text:p>
          </table:table-cell>
          <table:table-cell table:style-name="Taula4.A3" office:value-type="string">
            <text:p text:style-name="P319">ntiOrigen</text:p>
          </table:table-cell>
          <table:table-cell table:style-name="Taula4.A3" office:value-type="string">
            <text:p text:style-name="P257">0..1</text:p>
          </table:table-cell>
          <table:table-cell table:style-name="Taula4.A3" office:value-type="string">
            <text:p text:style-name="P317">10</text:p>
          </table:table-cell>
          <table:table-cell table:style-name="Taula4.E3" office:value-type="string">
            <text:p text:style-name="P259">Codi de la metadada origen de la NTI de document electrònic.</text:p>
          </table:table-cell>
        </table:table-row>
        <table:table-row table:style-name="TableLine776780224">
          <table:table-cell table:style-name="Taula4.A3" office:value-type="string">
            <text:p text:style-name="P318">ntiTipoDocumental</text:p>
          </table:table-cell>
          <table:table-cell table:style-name="Taula4.A3" office:value-type="string">
            <text:p text:style-name="P319">ntiTipoDocumento</text:p>
          </table:table-cell>
          <table:table-cell table:style-name="Taula4.A3" office:value-type="string">
            <text:p text:style-name="P268"><text:span text:style-name="T293">0..</text:span>1</text:p>
          </table:table-cell>
          <table:table-cell table:style-name="Taula4.A3" office:value-type="string">
            <text:p text:style-name="P317">255</text:p>
          </table:table-cell>
          <table:table-cell table:style-name="Taula4.E3" office:value-type="string">
            <text:p text:style-name="P259">Codi de la metadada tipus <text:soft-page-break/>documental de la NTI de document electrònic.</text:p>
          </table:table-cell>
        </table:table-row>
        <table:table-row table:style-name="TableLine776798368">
          <table:table-cell table:style-name="Taula4.A3" office:value-type="string">
            <text:p text:style-name="P318">observacions</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90">50</text:p>
          </table:table-cell>
          <table:table-cell table:style-name="Taula4.E3" office:value-type="string">
            <text:p text:style-name="P292">Observacions a destacar sobre la informació annexada.</text:p>
          </table:table-cell>
        </table:table-row>
        <table:table-row table:style-name="TableLine776734432">
          <table:table-cell table:style-name="Taula4.A3" office:value-type="string">
            <text:p text:style-name="P318">sicresTipoDocumento</text:p>
          </table:table-cell>
          <table:table-cell table:style-name="Taula4.A3" office:value-type="string">
            <text:p text:style-name="P319">sicresTipoDocumento</text:p>
          </table:table-cell>
          <table:table-cell table:style-name="Taula4.A3" office:value-type="string">
            <text:p text:style-name="P268"><text:span text:style-name="T293">0..</text:span>1</text:p>
          </table:table-cell>
          <table:table-cell table:style-name="Taula4.A3" office:value-type="string">
            <text:p text:style-name="P317">2</text:p>
          </table:table-cell>
          <table:table-cell table:style-name="Taula4.E3" office:value-type="string">
            <text:p text:style-name="P259">Codi SICRES del segment Anexo – tipo de documento.</text:p>
          </table:table-cell>
        </table:table-row>
        <table:table-row table:style-name="TableLine776815072">
          <table:table-cell table:style-name="Taula4.A3" office:value-type="string">
            <text:p text:style-name="P318">sicresValidezDocumento</text:p>
          </table:table-cell>
          <table:table-cell table:style-name="Taula4.A3" office:value-type="string">
            <text:p text:style-name="P319">sicresValidezDocumento</text:p>
          </table:table-cell>
          <table:table-cell table:style-name="Taula4.A3" office:value-type="string">
            <text:p text:style-name="P268"><text:span text:style-name="T142">0..</text:span>1</text:p>
          </table:table-cell>
          <table:table-cell table:style-name="Taula4.A3" office:value-type="string">
            <text:p text:style-name="P264"/>
          </table:table-cell>
          <table:table-cell table:style-name="Taula4.E3" office:value-type="string">
            <text:p text:style-name="P271"/>
          </table:table-cell>
        </table:table-row>
        <table:table-row table:style-name="TableLine776784832">
          <table:table-cell table:style-name="Taula4.A3" office:value-type="string">
            <text:p text:style-name="P318">tamany</text:p>
          </table:table-cell>
          <table:table-cell table:style-name="Taula4.A3" office:value-type="string">
            <text:p text:style-name="P319">numèric</text:p>
          </table:table-cell>
          <table:table-cell table:style-name="Taula4.A3" office:value-type="string">
            <text:p text:style-name="P257"/>
          </table:table-cell>
          <table:table-cell table:style-name="Taula4.A3" office:value-type="string">
            <text:p text:style-name="P273"/>
          </table:table-cell>
          <table:table-cell table:style-name="Taula4.E3" office:value-type="string">
            <text:p text:style-name="P316">Tamany en bytes del fitxer annexat. </text:p>
          </table:table-cell>
        </table:table-row>
        <table:table-row table:style-name="TableLine776820832">
          <table:table-cell table:style-name="Taula4.A3" office:value-type="string">
            <text:p text:style-name="P318">tipusMime</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17">30</text:p>
          </table:table-cell>
          <table:table-cell table:style-name="Taula4.E3" office:value-type="string">
            <text:p text:style-name="P288">Tipus MIME del fitxer annexat.</text:p>
          </table:table-cell>
        </table:table-row>
        <table:table-row table:style-name="TableLine776695552">
          <table:table-cell table:style-name="Taula4.A3" office:value-type="string">
            <text:p text:style-name="P318">titol</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60">200</text:p>
          </table:table-cell>
          <table:table-cell table:style-name="Taula4.E3" office:value-type="string">
            <text:p text:style-name="P316">Títol del document. </text:p>
          </table:table-cell>
        </table:table-row>
        <table:table-row table:style-name="TableLine776726368">
          <table:table-cell table:style-name="Taula4.A3" office:value-type="string">
            <text:p text:style-name="P318">uuid</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17">256</text:p>
          </table:table-cell>
          <table:table-cell table:style-name="Taula4.E3" office:value-type="string">
            <text:p text:style-name="P316">Uuid de l’arxiu digital si s’escau. </text:p>
          </table:table-cell>
        </table:table-row>
      </table:table>
      <text:p text:style-name="P137"/>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776792320">
          <table:table-cell table:style-name="Taula7.A1" table:number-columns-spanned="5" office:value-type="string">
            <text:p text:style-name="P142">anotacioRegistreBase</text:p>
          </table:table-cell>
          <table:covered-table-cell/>
          <table:covered-table-cell/>
          <table:covered-table-cell/>
          <table:covered-table-cell/>
        </table:table-row>
        <table:table-row table:style-name="TableLine776718880">
          <table:table-cell table:style-name="Taula7.A2" office:value-type="string">
            <text:p text:style-name="P36">Nom del camp</text:p>
          </table:table-cell>
          <table:table-cell table:style-name="Taula7.A2" office:value-type="string">
            <text:p text:style-name="P36">Tipus</text:p>
          </table:table-cell>
          <table:table-cell table:style-name="Taula7.A2" office:value-type="string">
            <text:p text:style-name="P36">Mult.</text:p>
          </table:table-cell>
          <table:table-cell table:style-name="Taula7.A2" office:value-type="string">
            <text:p text:style-name="P38">Tamany</text:p>
          </table:table-cell>
          <table:table-cell table:style-name="Taula7.E2" office:value-type="string">
            <text:p text:style-name="P38">Descripció</text:p>
          </table:table-cell>
        </table:table-row>
        <table:table-row table:style-name="TableLine992283344">
          <table:table-cell table:style-name="Taula7.A3" office:value-type="string">
            <text:p text:style-name="P318">annexos</text:p>
          </table:table-cell>
          <table:table-cell table:style-name="Taula7.A3" office:value-type="string">
            <text:p text:style-name="P319">annex</text:p>
          </table:table-cell>
          <table:table-cell table:style-name="Taula7.A3" office:value-type="string">
            <text:p text:style-name="P253">0..*</text:p>
          </table:table-cell>
          <table:table-cell table:style-name="Taula7.D3">
            <text:p text:style-name="P253"/>
          </table:table-cell>
          <table:table-cell table:style-name="Taula7.E4" office:value-type="string">
            <text:p text:style-name="P321">Annex al que fa referència amb les seves propietats. </text:p>
          </table:table-cell>
        </table:table-row>
        <table:table-row table:style-name="TableLine992331728">
          <table:table-cell table:style-name="Taula7.A3" office:value-type="string">
            <text:p text:style-name="P318">aplicacioCodi</text:p>
          </table:table-cell>
          <table:table-cell table:style-name="Taula7.A3" office:value-type="string">
            <text:p text:style-name="P319">Cadena</text:p>
          </table:table-cell>
          <table:table-cell table:style-name="Taula7.A3" office:value-type="string">
            <text:p text:style-name="P253">0..1</text:p>
          </table:table-cell>
          <table:table-cell table:style-name="Taula7.D3" office:value-type="float" office:value="255">
            <text:p text:style-name="P361">255</text:p>
          </table:table-cell>
          <table:table-cell table:style-name="Taula7.E4" office:value-type="string">
            <text:p text:style-name="P321">Codi de l’aplicació que fa l’enviament de l’assentament registral. </text:p>
          </table:table-cell>
        </table:table-row>
        <table:table-row table:style-name="TableLine992340080">
          <table:table-cell table:style-name="Taula7.A3" office:value-type="string">
            <text:p text:style-name="P318">aplicacioVersio</text:p>
          </table:table-cell>
          <table:table-cell table:style-name="Taula7.A3" office:value-type="string">
            <text:p text:style-name="P315">Cadena</text:p>
          </table:table-cell>
          <table:table-cell table:style-name="Taula7.A3" office:value-type="string">
            <text:p text:style-name="P253">0..1</text:p>
          </table:table-cell>
          <table:table-cell table:style-name="Taula7.A3" office:value-type="string">
            <text:p text:style-name="P322">255</text:p>
          </table:table-cell>
          <table:table-cell table:style-name="Taula7.E5" office:value-type="string">
            <text:p text:style-name="P261"><text:s/><text:span text:style-name="T124">Versió de l’aplicació que fa l’enviament de l’assentament registral.</text:span></text:p>
          </table:table-cell>
        </table:table-row>
        <table:table-row table:style-name="TableLine992282192">
          <table:table-cell table:style-name="Taula7.A3" office:value-type="string">
            <text:p text:style-name="P318">assumpteCodiCodi</text:p>
          </table:table-cell>
          <table:table-cell table:style-name="Taula7.A3" office:value-type="string">
            <text:p text:style-name="P319">Cadena</text:p>
          </table:table-cell>
          <table:table-cell table:style-name="Taula7.A3" office:value-type="string">
            <text:p text:style-name="P257">0..1</text:p>
          </table:table-cell>
          <table:table-cell table:style-name="Taula7.A3" office:value-type="string">
            <text:p text:style-name="P322">16</text:p>
          </table:table-cell>
          <table:table-cell table:style-name="Taula7.E6" office:value-type="string">
            <text:p text:style-name="P271">Codi de l’ass<text:span text:style-name="T298">umpte</text:span>.</text:p>
          </table:table-cell>
        </table:table-row>
        <table:table-row table:style-name="TableLine992293712">
          <table:table-cell table:style-name="Taula7.A3" office:value-type="string">
            <text:p text:style-name="P318">assumpteCodiDescripcio</text:p>
          </table:table-cell>
          <table:table-cell table:style-name="Taula7.A3" office:value-type="string">
            <text:p text:style-name="P319">Cadena</text:p>
          </table:table-cell>
          <table:table-cell table:style-name="Taula7.A3" office:value-type="string">
            <text:p text:style-name="P320">0..1</text:p>
          </table:table-cell>
          <table:table-cell table:style-name="Taula7.A3" office:value-type="string">
            <text:p text:style-name="P361">255</text:p>
          </table:table-cell>
          <table:table-cell table:style-name="Taula7.E7" office:value-type="string">
            <text:p text:style-name="P271">Denominació de l’assumpte.</text:p>
          </table:table-cell>
        </table:table-row>
        <table:table-row table:style-name="TableLine992289680">
          <table:table-cell table:style-name="Taula7.A3" office:value-type="string">
            <text:p text:style-name="P323">assumpteTipus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61">16</text:p>
          </table:table-cell>
          <table:table-cell table:style-name="Taula7.E8" office:value-type="string">
            <text:p text:style-name="P321">Codi de l’assumpte. </text:p>
          </table:table-cell>
        </table:table-row>
        <table:table-row table:style-name="TableLine992344976">
          <table:table-cell table:style-name="Taula7.A3" office:value-type="string">
            <text:p text:style-name="P323">assumpteTipusDescripci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61">100</text:p>
          </table:table-cell>
          <table:table-cell table:style-name="Taula7.E9" office:value-type="string">
            <text:p text:style-name="P271">Denominació del tipus d’assumpte de l’assentament registral.</text:p>
          </table:table-cell>
        </table:table-row>
        <table:table-row table:style-name="TableLine992341808">
          <table:table-cell table:style-name="Taula7.A3" office:value-type="string">
            <text:p text:style-name="P323">data</text:p>
          </table:table-cell>
          <table:table-cell table:style-name="Taula7.A3" office:value-type="string">
            <text:p text:style-name="P324">dateTime</text:p>
          </table:table-cell>
          <table:table-cell table:style-name="Taula7.A3" office:value-type="string">
            <text:p text:style-name="P268"><text:span text:style-name="T292">0..</text:span>1</text:p>
          </table:table-cell>
          <table:table-cell table:style-name="Taula7.A3" office:value-type="string">
            <text:p text:style-name="P322">14</text:p>
          </table:table-cell>
          <table:table-cell table:style-name="Taula7.E10" office:value-type="string">
            <text:p text:style-name="P321">Data de l’assentament. </text:p>
          </table:table-cell>
        </table:table-row>
        <table:table-row table:style-name="TableLine992338352">
          <table:table-cell table:style-name="Taula7.A3" office:value-type="string">
            <text:p text:style-name="P323">docFisica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19</text:p>
          </table:table-cell>
          <table:table-cell table:style-name="Taula7.E11" office:value-type="string">
            <text:p text:style-name="P261">Codi SICRES del segment internos – Documentación física y/o soportes.</text:p>
          </table:table-cell>
        </table:table-row>
        <table:table-row table:style-name="TableLine992336624">
          <table:table-cell table:style-name="Taula7.A3" office:value-type="string">
            <text:p text:style-name="P323">docFisicaDescripcio</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100</text:p>
          </table:table-cell>
          <table:table-cell table:style-name="Taula7.E12" office:value-type="string">
            <text:p text:style-name="P275">Descripció del segment internos – Documentación física y/o soportes.</text:p>
          </table:table-cell>
        </table:table-row>
        <table:table-row table:style-name="TableLine992292272">
          <table:table-cell table:style-name="Taula7.A3" office:value-type="string">
            <text:p text:style-name="P323">entitat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255</text:p>
          </table:table-cell>
          <table:table-cell table:style-name="Taula7.E13" office:value-type="string">
            <text:p text:style-name="P259">Codi <text:span text:style-name="T123">DIR3 </text:span>de l’entitat governamental a la que va dirigit l’assentament registral.</text:p>
          </table:table-cell>
        </table:table-row>
        <table:table-row table:style-name="TableLine992327120">
          <table:table-cell table:style-name="Taula7.A3" office:value-type="string">
            <text:p text:style-name="P323">entitatDescripcio</text:p>
          </table:table-cell>
          <table:table-cell table:style-name="Taula7.A3" office:value-type="string">
            <text:p text:style-name="P324">Cadena</text:p>
          </table:table-cell>
          <table:table-cell table:style-name="Taula7.A3" office:value-type="string">
            <text:p text:style-name="P268"><text:span text:style-name="T293">0..</text:span>1</text:p>
          </table:table-cell>
          <table:table-cell table:style-name="Taula7.A3" office:value-type="string">
            <text:p text:style-name="P326">255</text:p>
          </table:table-cell>
          <table:table-cell table:style-name="Taula7.E14" office:value-type="string">
            <text:p text:style-name="P259"><text:span text:style-name="T123">Descripció</text:span> de l’entitat governamental a la que va dirigit l’assentament registral.</text:p>
          </table:table-cell>
        </table:table-row>
        <table:table-row table:style-name="TableLine992281040">
          <table:table-cell table:style-name="Taula7.A3" office:value-type="string">
            <text:p text:style-name="P323">expedientNumer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91">255</text:p>
          </table:table-cell>
          <table:table-cell table:style-name="Taula7.E15" office:value-type="string">
            <text:p text:style-name="P327">Número identificador de l’assentament registral. És únic. </text:p>
          </table:table-cell>
        </table:table-row>
        <table:table-row table:style-name="TableLine992326544">
          <table:table-cell table:style-name="Taula7.A3" office:value-type="string">
            <text:p text:style-name="P323">exposa</text:p>
          </table:table-cell>
          <table:table-cell table:style-name="Taula7.A3" office:value-type="string">
            <text:p text:style-name="P324">Cadena</text:p>
          </table:table-cell>
          <table:table-cell table:style-name="Taula7.A3" office:value-type="string">
            <text:p text:style-name="P268"><text:span text:style-name="T293">0..</text:span>1</text:p>
          </table:table-cell>
          <table:table-cell table:style-name="Taula7.A3" office:value-type="string">
            <text:p text:style-name="P326">lob</text:p>
          </table:table-cell>
          <table:table-cell table:style-name="Taula7.E16" office:value-type="string">
            <text:p text:style-name="P327">Exposició de fets. </text:p>
          </table:table-cell>
        </table:table-row>
        <table:table-row table:style-name="TableLine992329136">
          <table:table-cell table:style-name="Taula7.A3" office:value-type="string">
            <text:p text:style-name="P323">extracte</text:p>
          </table:table-cell>
          <table:table-cell table:style-name="Taula7.A3" office:value-type="string">
            <text:p text:style-name="P324">Cadena</text:p>
          </table:table-cell>
          <table:table-cell table:style-name="Taula7.A3" office:value-type="string">
            <text:p text:style-name="P268"><text:span text:style-name="T142">0..</text:span>1</text:p>
          </table:table-cell>
          <table:table-cell table:style-name="Taula7.A3" office:value-type="string">
            <text:p text:style-name="P326">240</text:p>
          </table:table-cell>
          <table:table-cell table:style-name="Taula7.E17" office:value-type="string">
            <text:p text:style-name="P327">Extracte o resum de l’assentament. </text:p>
          </table:table-cell>
        </table:table-row>
        <table:table-row table:style-name="TableLine992330576">
          <table:table-cell table:style-name="Taula7.A3" office:value-type="string">
            <text:p text:style-name="P323">identificador</text:p>
          </table:table-cell>
          <table:table-cell table:style-name="Taula7.A3" office:value-type="string">
            <text:p text:style-name="P324">Cadena</text:p>
          </table:table-cell>
          <table:table-cell table:style-name="Taula7.A3" office:value-type="string">
            <text:p text:style-name="P325">0..1</text:p>
          </table:table-cell>
          <table:table-cell table:style-name="Taula7.A3" office:value-type="string">
            <text:p text:style-name="P326">100</text:p>
          </table:table-cell>
          <table:table-cell table:style-name="Taula7.E18" office:value-type="string">
            <text:p text:style-name="P327">Codi identificador de l’assentament registral. </text:p>
          </table:table-cell>
        </table:table-row>
        <text:soft-page-break/>
        <table:table-row table:style-name="TableLine992291696">
          <table:table-cell table:style-name="Taula7.A3" office:value-type="string">
            <text:p text:style-name="P323">idiomaCodi</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26">2</text:p>
          </table:table-cell>
          <table:table-cell table:style-name="Taula7.E19" office:value-type="string">
            <text:p text:style-name="P275">Codi d’idioma amb el que s’ha fet l’assentament.</text:p>
          </table:table-cell>
        </table:table-row>
        <table:table-row table:style-name="TableLine992294576">
          <table:table-cell table:style-name="Taula7.A3" office:value-type="string">
            <text:p text:style-name="P323">idiomaDescripci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62">100</text:p>
          </table:table-cell>
          <table:table-cell table:style-name="Taula7.E20" office:value-type="string">
            <text:p text:style-name="P275">Descripció d’idioma amb el que s’ha fet l’assentament.</text:p>
          </table:table-cell>
        </table:table-row>
        <table:table-row table:style-name="Taula7.21">
          <table:table-cell table:style-name="Taula7.A3" office:value-type="string">
            <text:p text:style-name="P323">interessats</text:p>
          </table:table-cell>
          <table:table-cell table:style-name="Taula7.A3" office:value-type="string">
            <text:p text:style-name="P324">interessat</text:p>
          </table:table-cell>
          <table:table-cell table:style-name="Taula7.A3" office:value-type="string">
            <text:p text:style-name="P257">0..*</text:p>
          </table:table-cell>
          <table:table-cell table:style-name="Taula7.A3" office:value-type="string">
            <text:p text:style-name="P264"/>
          </table:table-cell>
          <table:table-cell table:style-name="Taula7.E21" office:value-type="string">
            <text:p text:style-name="P279">Dades que componen els interessats de l’assentament registral si n’hi ha.</text:p>
          </table:table-cell>
        </table:table-row>
        <table:table-row table:style-name="Taula7.21">
          <table:table-cell table:style-name="Taula7.A3" office:value-type="string">
            <text:p text:style-name="P328">llibre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4</text:p>
          </table:table-cell>
          <table:table-cell table:style-name="Taula7.E22" office:value-type="string">
            <text:p text:style-name="P271">Codi del llibre al qual s’ha fet l’assentament registral rebut.</text:p>
          </table:table-cell>
        </table:table-row>
        <table:table-row table:style-name="Taula7.21">
          <table:table-cell table:style-name="Taula7.A3" office:value-type="string">
            <text:p text:style-name="P328">llibre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255</text:p>
          </table:table-cell>
          <table:table-cell table:style-name="Taula7.E37" office:value-type="string">
            <text:p text:style-name="P271">Denominació del llibre al qual s’ha fet l’assentament registral rebut.</text:p>
          </table:table-cell>
        </table:table-row>
        <table:table-row table:style-name="Taula7.21">
          <table:table-cell table:style-name="Taula7.A3" office:value-type="string">
            <text:p text:style-name="P328">observacions</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50</text:p>
          </table:table-cell>
          <table:table-cell table:style-name="Taula7.E37" office:value-type="string">
            <text:p text:style-name="P275">Observacions de l’assentament.</text:p>
          </table:table-cell>
        </table:table-row>
        <table:table-row table:style-name="Taula7.21">
          <table:table-cell table:style-name="Taula7.A3" office:value-type="string">
            <text:p text:style-name="P328">oficina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21</text:p>
          </table:table-cell>
          <table:table-cell table:style-name="Taula7.E37" office:value-type="string">
            <text:p text:style-name="P271">Codi DIR3 de l’oficina on es registre.</text:p>
          </table:table-cell>
        </table:table-row>
        <table:table-row table:style-name="Taula7.21">
          <table:table-cell table:style-name="Taula7.A3" office:value-type="string">
            <text:p text:style-name="P328">oficina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300</text:p>
          </table:table-cell>
          <table:table-cell table:style-name="Taula7.E37" office:value-type="string">
            <text:p text:style-name="P261">Denominació DIR3 de l'entitat registral on es registre l'assentament.</text:p>
          </table:table-cell>
        </table:table-row>
        <table:table-row table:style-name="Taula7.21">
          <table:table-cell table:style-name="Taula7.A3" office:value-type="string">
            <text:p text:style-name="P328">origenData</text:p>
          </table:table-cell>
          <table:table-cell table:style-name="Taula7.A3" office:value-type="string">
            <text:p text:style-name="P329">dateTime</text:p>
          </table:table-cell>
          <table:table-cell table:style-name="Taula7.A3" office:value-type="string">
            <text:p text:style-name="P257">0..1</text:p>
          </table:table-cell>
          <table:table-cell table:style-name="Taula7.A3" office:value-type="string">
            <text:p text:style-name="P330">14</text:p>
          </table:table-cell>
          <table:table-cell table:style-name="Taula7.E37" office:value-type="string">
            <text:p text:style-name="P261">Data <text:span text:style-name="T121">origen </text:span>de l’assentament.</text:p>
          </table:table-cell>
        </table:table-row>
        <table:table-row table:style-name="Taula7.21">
          <table:table-cell table:style-name="Taula7.A3" office:value-type="string">
            <text:p text:style-name="P328">origenRegistreNumer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80</text:p>
          </table:table-cell>
          <table:table-cell table:style-name="Taula7.E37" office:value-type="string">
            <text:p text:style-name="P261"/>
          </table:table-cell>
        </table:table-row>
        <table:table-row table:style-name="Taula7.21">
          <table:table-cell table:style-name="Taula7.A3" office:value-type="string">
            <text:p text:style-name="P328">procediment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64</text:p>
          </table:table-cell>
          <table:table-cell table:style-name="Taula7.E37" office:value-type="string">
            <text:p text:style-name="P331">Codi <text:span text:style-name="T367">SIA </text:span>de procediment. </text:p>
          </table:table-cell>
        </table:table-row>
        <table:table-row table:style-name="Taula7.21">
          <table:table-cell table:style-name="Taula7.A3" office:value-type="string">
            <text:p text:style-name="P328"><text:span text:style-name="T367">servei</text:span>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64</text:p>
          </table:table-cell>
          <table:table-cell table:style-name="Taula7.E37" office:value-type="string">
            <text:p text:style-name="P331">Codi <text:span text:style-name="T367">SIA </text:span>de<text:span text:style-name="T367">l servei</text:span>. </text:p>
          </table:table-cell>
        </table:table-row>
        <table:table-row table:style-name="Taula7.21">
          <table:table-cell table:style-name="Taula7.A3" office:value-type="string">
            <text:p text:style-name="P328">refExterna</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264"/>
          </table:table-cell>
          <table:table-cell table:style-name="Taula7.E37" office:value-type="string">
            <text:p text:style-name="P261"/>
          </table:table-cell>
        </table:table-row>
        <table:table-row table:style-name="Taula7.21">
          <table:table-cell table:style-name="Taula7.A3" office:value-type="string">
            <text:p text:style-name="P328">solicita</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lob</text:p>
          </table:table-cell>
          <table:table-cell table:style-name="Taula7.E37" office:value-type="string">
            <text:p text:style-name="P275">Objecte de la sol·licitud si escau.</text:p>
          </table:table-cell>
        </table:table-row>
        <table:table-row table:style-name="Taula7.21">
          <table:table-cell table:style-name="Taula7.A3" office:value-type="string">
            <text:p text:style-name="P328">transportNumer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7" office:value-type="string">
            <text:p text:style-name="P333">Número de transport. </text:p>
          </table:table-cell>
        </table:table-row>
        <table:table-row table:style-name="Taula7.21">
          <table:table-cell table:style-name="Taula7.A3" office:value-type="string">
            <text:p text:style-name="P328">transportTipus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7" office:value-type="string">
            <text:p text:style-name="P261">Codi SICRES3 del segment internos – tipo transporte.</text:p>
          </table:table-cell>
        </table:table-row>
        <table:table-row table:style-name="Taula7.21">
          <table:table-cell table:style-name="Taula7.A3" office:value-type="string">
            <text:p text:style-name="P328">transportTipus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100</text:p>
          </table:table-cell>
          <table:table-cell table:style-name="Taula7.E37" office:value-type="string">
            <text:p text:style-name="P261">Descripció del segment internos – tipo transporte.</text:p>
          </table:table-cell>
        </table:table-row>
        <table:table-row table:style-name="Taula7.21">
          <table:table-cell table:style-name="Taula7.A3" office:value-type="string">
            <text:p text:style-name="P328">usuari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7" office:value-type="string">
            <text:p text:style-name="P261">Codi de l'usuari que vol realitzar l'operació.</text:p>
          </table:table-cell>
        </table:table-row>
        <table:table-row table:style-name="Taula7.21">
          <table:table-cell table:style-name="Taula7.A3" office:value-type="string">
            <text:p text:style-name="P328">usuariNom</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767</text:p>
          </table:table-cell>
          <table:table-cell table:style-name="Taula7.E37" office:value-type="string">
            <text:p text:style-name="P261"><text:span text:style-name="T124">Nom</text:span> de l'usuari que vol realitzar l'operació.</text:p>
          </table:table-cell>
        </table:table-row>
        <table:table-row table:style-name="Taula7.21">
          <table:table-cell table:style-name="Taula7.A3" office:value-type="string">
            <text:p text:style-name="P328">justificantFitxerArxiuUuid</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56</text:p>
          </table:table-cell>
          <table:table-cell table:style-name="Taula7.E40" office:value-type="string">
            <text:p text:style-name="P334">Paràmetre que emmagatzema el uuid del justificant. Serveix per recuperar el justificant des del backoffice.</text:p>
          </table:table-cell>
        </table:table-row>
        <table:table-row table:style-name="Taula7.21">
          <table:table-cell table:style-name="Taula7.A3" office:value-type="string">
            <text:p text:style-name="P347">tramitCodi</text:p>
          </table:table-cell>
          <table:table-cell table:style-name="Taula7.A3" office:value-type="string">
            <text:p text:style-name="P348">Cadena</text:p>
          </table:table-cell>
          <table:table-cell table:style-name="Taula7.A3" office:value-type="string">
            <text:p text:style-name="P349">0..1</text:p>
          </table:table-cell>
          <table:table-cell table:style-name="Taula7.A3" office:value-type="string">
            <text:p text:style-name="P350">64</text:p>
          </table:table-cell>
          <table:table-cell table:style-name="Taula7.E40" office:value-type="string">
            <text:p text:style-name="P347">Codi del tràmit.</text:p>
          </table:table-cell>
        </table:table-row>
        <table:table-row table:style-name="Taula7.21">
          <table:table-cell table:style-name="Taula7.A3" office:value-type="string">
            <text:p text:style-name="P347">tramitNom</text:p>
          </table:table-cell>
          <table:table-cell table:style-name="Taula7.A3" office:value-type="string">
            <text:p text:style-name="P348">Cadena</text:p>
          </table:table-cell>
          <table:table-cell table:style-name="Taula7.A3" office:value-type="string">
            <text:p text:style-name="P349">0..1</text:p>
          </table:table-cell>
          <table:table-cell table:style-name="Taula7.A3" office:value-type="string">
            <text:p text:style-name="P350">256</text:p>
          </table:table-cell>
          <table:table-cell table:style-name="Taula7.E40" office:value-type="string">
            <text:p text:style-name="P347">Nom del tràmit.</text:p>
          </table:table-cell>
        </table:table-row>
      </table:table>
      <text:p text:style-name="P137"/>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992344400">
          <table:table-cell table:style-name="Taula9.A1" table:number-columns-spanned="5" office:value-type="string">
            <text:p text:style-name="P142">AnotacioRegistre<text:span text:style-name="T295">Entrada =&gt; tns:anotacioRegistreBase</text:span></text:p>
          </table:table-cell>
          <table:covered-table-cell/>
          <table:covered-table-cell/>
          <table:covered-table-cell/>
          <table:covered-table-cell/>
        </table:table-row>
        <table:table-row table:style-name="TableLine992322224">
          <table:table-cell table:style-name="Taula9.A2" office:value-type="string">
            <text:p text:style-name="P36">Nom del camp</text:p>
          </table:table-cell>
          <table:table-cell table:style-name="Taula9.A2" office:value-type="string">
            <text:p text:style-name="P36">Tipus</text:p>
          </table:table-cell>
          <table:table-cell table:style-name="Taula9.A2" office:value-type="string">
            <text:p text:style-name="P36">Mult.</text:p>
          </table:table-cell>
          <table:table-cell table:style-name="Taula9.A2" office:value-type="string">
            <text:p text:style-name="P38">Tamany</text:p>
          </table:table-cell>
          <table:table-cell table:style-name="Taula9.E2" office:value-type="string">
            <text:p text:style-name="P38">Descripció</text:p>
          </table:table-cell>
        </table:table-row>
        <table:table-row table:style-name="TableLine992337200">
          <table:table-cell table:style-name="Taula9.A3" office:value-type="string">
            <text:p text:style-name="P335">destiCodi</text:p>
          </table:table-cell>
          <table:table-cell table:style-name="Taula9.A3" office:value-type="string">
            <text:p text:style-name="P329">Cadena</text:p>
          </table:table-cell>
          <table:table-cell table:style-name="Taula9.A3" office:value-type="string">
            <text:p text:style-name="P253">0..<text:span text:style-name="T294">1</text:span></text:p>
          </table:table-cell>
          <table:table-cell table:style-name="Taula9.D3" office:value-type="float" office:value="21">
            <text:p text:style-name="P332">21</text:p>
          </table:table-cell>
          <table:table-cell table:style-name="Taula9.E4" office:value-type="string">
            <text:p text:style-name="P333">Codi DIR3 de la oficina destí. </text:p>
          </table:table-cell>
        </table:table-row>
        <table:table-row table:style-name="TableLine992287088">
          <table:table-cell table:style-name="Taula9.A3" office:value-type="string">
            <text:p text:style-name="P335">destiDescripcio</text:p>
          </table:table-cell>
          <table:table-cell table:style-name="Taula9.A3" office:value-type="string">
            <text:p text:style-name="P319">Cadena</text:p>
          </table:table-cell>
          <table:table-cell table:style-name="Taula9.A3" office:value-type="string">
            <text:p text:style-name="P253">0..1</text:p>
          </table:table-cell>
          <table:table-cell table:style-name="Taula9.D3" office:value-type="float" office:value="300">
            <text:p text:style-name="P363">300</text:p>
          </table:table-cell>
          <table:table-cell table:style-name="Taula9.E4" office:value-type="string">
            <text:p text:style-name="P333">Descripció de la oficina destí. </text:p>
          </table:table-cell>
        </table:table-row>
      </table:table>
      <text:p text:style-name="P137"/>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992321360">
          <table:table-cell table:style-name="Taula8.A1" table:number-columns-spanned="5" office:value-type="string">
            <text:p text:style-name="P142">anotacioRegistre<text:span text:style-name="T294">Id</text:span></text:p>
          </table:table-cell>
          <table:covered-table-cell/>
          <table:covered-table-cell/>
          <table:covered-table-cell/>
          <table:covered-table-cell/>
        </table:table-row>
        <table:table-row table:style-name="TableLine992319056">
          <table:table-cell table:style-name="Taula8.A2" office:value-type="string">
            <text:p text:style-name="P36">Nom del camp</text:p>
          </table:table-cell>
          <table:table-cell table:style-name="Taula8.A2" office:value-type="string">
            <text:p text:style-name="P36">Tipus</text:p>
          </table:table-cell>
          <table:table-cell table:style-name="Taula8.A2" office:value-type="string">
            <text:p text:style-name="P36">Mult.</text:p>
          </table:table-cell>
          <table:table-cell table:style-name="Taula8.A2" office:value-type="string">
            <text:p text:style-name="P38">Tamany</text:p>
          </table:table-cell>
          <table:table-cell table:style-name="Taula8.E2" office:value-type="string">
            <text:p text:style-name="P38">Descripció</text:p>
          </table:table-cell>
        </table:table-row>
        <table:table-row table:style-name="TableLine992320784">
          <table:table-cell table:style-name="Taula8.A3" office:value-type="string">
            <text:p text:style-name="P328">clauAcces</text:p>
          </table:table-cell>
          <table:table-cell table:style-name="Taula8.A3" office:value-type="string">
            <text:p text:style-name="P329">Cadena</text:p>
          </table:table-cell>
          <table:table-cell table:style-name="Taula8.A3" office:value-type="string">
            <text:p text:style-name="P253">0..<text:span text:style-name="T294">1</text:span></text:p>
          </table:table-cell>
          <table:table-cell table:style-name="Taula8.D3">
            <text:p text:style-name="P253"/>
          </table:table-cell>
          <table:table-cell table:style-name="Taula8.E4" office:value-type="string">
            <text:p text:style-name="P338">Clau d’accés per accedir a l’informació. </text:p>
          </table:table-cell>
        </table:table-row>
        <table:table-row table:style-name="Taula8.4">
          <table:table-cell table:style-name="Taula8.A3" office:value-type="string">
            <text:p text:style-name="P328">identificador</text:p>
          </table:table-cell>
          <table:table-cell table:style-name="Taula8.A3" office:value-type="string">
            <text:p text:style-name="P319">Cadena</text:p>
          </table:table-cell>
          <table:table-cell table:style-name="Taula8.A3" office:value-type="string">
            <text:p text:style-name="P253">0..1</text:p>
          </table:table-cell>
          <table:table-cell table:style-name="Taula8.D3">
            <text:p text:style-name="P352"/>
          </table:table-cell>
          <table:table-cell table:style-name="Taula8.E4" office:value-type="string">
            <text:p text:style-name="P338">Identificador de l’usuari per poder accedir a l’informació. </text:p>
          </table:table-cell>
        </table:table-row>
      </table:table>
      <text:p text:style-name="P137"/>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992305808">
          <table:table-cell table:style-name="Taula10.A1" table:number-columns-spanned="5" office:value-type="string">
            <text:p text:style-name="P143">interessatBase</text:p>
          </table:table-cell>
          <table:covered-table-cell/>
          <table:covered-table-cell/>
          <table:covered-table-cell/>
          <table:covered-table-cell/>
        </table:table-row>
        <table:table-row table:style-name="TableLine992303792">
          <table:table-cell table:style-name="Taula10.A2" office:value-type="string">
            <text:p text:style-name="P36">Nom del camp</text:p>
          </table:table-cell>
          <table:table-cell table:style-name="Taula10.A2" office:value-type="string">
            <text:p text:style-name="P36">Tipus</text:p>
          </table:table-cell>
          <table:table-cell table:style-name="Taula10.A2" office:value-type="string">
            <text:p text:style-name="P36">Mult.</text:p>
          </table:table-cell>
          <table:table-cell table:style-name="Taula10.A2" office:value-type="string">
            <text:p text:style-name="P38">Tamany</text:p>
          </table:table-cell>
          <table:table-cell table:style-name="Taula10.E2" office:value-type="string">
            <text:p text:style-name="P38">Descripció</text:p>
          </table:table-cell>
        </table:table-row>
        <table:table-row table:style-name="TableLine992296016">
          <table:table-cell table:style-name="Taula10.A3" office:value-type="string">
            <text:p text:style-name="P335">adresa</text:p>
          </table:table-cell>
          <table:table-cell table:style-name="Taula10.A3" office:value-type="string">
            <text:p text:style-name="P336">Cadena</text:p>
          </table:table-cell>
          <table:table-cell table:style-name="Taula10.A3" office:value-type="string">
            <text:p text:style-name="P253">0..1</text:p>
          </table:table-cell>
          <table:table-cell table:style-name="Taula10.D3" office:value-type="float" office:value="160">
            <text:p text:style-name="P340">160</text:p>
          </table:table-cell>
          <table:table-cell table:style-name="Taula10.E4" office:value-type="string">
            <text:p text:style-name="P307">Adreça postal de l’interessat.</text:p>
          </table:table-cell>
        </table:table-row>
        <table:table-row table:style-name="TableLine992281904">
          <table:table-cell table:style-name="Taula10.A3" office:value-type="string">
            <text:p text:style-name="P335">adresaElectronica</text:p>
          </table:table-cell>
          <table:table-cell table:style-name="Taula10.A3" office:value-type="string">
            <text:p text:style-name="P336">Cadena</text:p>
          </table:table-cell>
          <table:table-cell table:style-name="Taula10.A3" office:value-type="string">
            <text:p text:style-name="P253">0..1</text:p>
          </table:table-cell>
          <table:table-cell table:style-name="Taula10.D3" office:value-type="float" office:value="160">
            <text:p text:style-name="P364">160</text:p>
          </table:table-cell>
          <table:table-cell table:style-name="Taula10.E4" office:value-type="string">
            <text:p text:style-name="P307">Adreça <text:span text:style-name="T299">electrònica</text:span> de l’interessat.</text:p>
          </table:table-cell>
        </table:table-row>
        <table:table-row table:style-name="TableLine992334320">
          <table:table-cell table:style-name="Taula10.A3" office:value-type="string">
            <text:p text:style-name="P335">canal</text:p>
          </table:table-cell>
          <table:table-cell table:style-name="Taula10.A3" office:value-type="string">
            <text:p text:style-name="P315">Cadena</text:p>
          </table:table-cell>
          <table:table-cell table:style-name="Taula10.A3" office:value-type="string">
            <text:p text:style-name="P253">0..1</text:p>
          </table:table-cell>
          <table:table-cell table:style-name="Taula10.A3" office:value-type="string">
            <text:p text:style-name="P340">2</text:p>
          </table:table-cell>
          <table:table-cell table:style-name="Taula10.E5" office:value-type="string">
            <text:p text:style-name="P261"><text:s/><text:span text:style-name="T300">Codi SICRES del segment interesado – canal</text:span></text:p>
            <text:p text:style-name="P297">preferente de notificación del interesado.</text:p>
          </table:table-cell>
        </table:table-row>
        <table:table-row table:style-name="TableLine992327408">
          <table:table-cell table:style-name="Taula10.A3" office:value-type="string">
            <text:p text:style-name="P335">cp</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5</text:p>
          </table:table-cell>
          <table:table-cell table:style-name="Taula10.E6" office:value-type="string">
            <text:p text:style-name="P341">Codi postal del l’interessat. </text:p>
          </table:table-cell>
        </table:table-row>
        <table:table-row table:style-name="TableLine992325392">
          <table:table-cell table:style-name="Taula10.A3" office:value-type="string">
            <text:p text:style-name="P335">documentNumero</text:p>
          </table:table-cell>
          <table:table-cell table:style-name="Taula10.A3" office:value-type="string">
            <text:p text:style-name="P336">Cadena</text:p>
          </table:table-cell>
          <table:table-cell table:style-name="Taula10.A3" office:value-type="string">
            <text:p text:style-name="P337">0..1</text:p>
          </table:table-cell>
          <table:table-cell table:style-name="Taula10.A3" office:value-type="string">
            <text:p text:style-name="P364">17</text:p>
          </table:table-cell>
          <table:table-cell table:style-name="Taula10.E7" office:value-type="string">
            <text:p text:style-name="P304">Número de document identificatiu.</text:p>
          </table:table-cell>
        </table:table-row>
        <table:table-row table:style-name="TableLine992330864">
          <table:table-cell table:style-name="Taula10.A3" office:value-type="string">
            <text:p text:style-name="P335">documentTipus</text:p>
          </table:table-cell>
          <table:table-cell table:style-name="Taula10.A3" office:value-type="string">
            <text:p text:style-name="P336">documentTipus</text:p>
          </table:table-cell>
          <table:table-cell table:style-name="Taula10.A3" office:value-type="string">
            <text:p text:style-name="P257">0..1</text:p>
          </table:table-cell>
          <table:table-cell table:style-name="Taula10.A3" office:value-type="string">
            <text:p text:style-name="P364">1</text:p>
          </table:table-cell>
          <table:table-cell table:style-name="Taula10.E8" office:value-type="string">
            <text:p text:style-name="P299">Codi SICRES del segment interesado –</text:p>
            <text:p text:style-name="P299">documento de identificacion de interesado tipo.</text:p>
          </table:table-cell>
        </table:table-row>
        <table:table-row table:style-name="TableLine992341520">
          <table:table-cell table:style-name="Taula10.A3" office:value-type="string">
            <text:p text:style-name="P335">email</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64">160</text:p>
          </table:table-cell>
          <table:table-cell table:style-name="Taula10.E9" office:value-type="string">
            <text:p text:style-name="P341">Correu electrònic de l’interessat. </text:p>
          </table:table-cell>
        </table:table-row>
        <table:table-row table:style-name="TableLine992340944">
          <table:table-cell table:style-name="Taula10.A3" office:value-type="string">
            <text:p text:style-name="P335">llinatge1</text:p>
          </table:table-cell>
          <table:table-cell table:style-name="Taula10.A3" office:value-type="string">
            <text:p text:style-name="P269">Cadena</text:p>
          </table:table-cell>
          <table:table-cell table:style-name="Taula10.A3" office:value-type="string">
            <text:p text:style-name="P268"><text:span text:style-name="T292">0..</text:span>1</text:p>
          </table:table-cell>
          <table:table-cell table:style-name="Taula10.A3" office:value-type="string">
            <text:p text:style-name="P340">255</text:p>
          </table:table-cell>
          <table:table-cell table:style-name="Taula10.E10" office:value-type="string">
            <text:p text:style-name="P307">Primer llinatge de l’interessat. Obligatori si és una persona física.</text:p>
          </table:table-cell>
        </table:table-row>
        <table:table-row table:style-name="TableLine992338640">
          <table:table-cell table:style-name="Taula10.A3" office:value-type="string">
            <text:p text:style-name="P335">llinatge2</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255</text:p>
          </table:table-cell>
          <table:table-cell table:style-name="Taula10.E11" office:value-type="string">
            <text:p text:style-name="P307">Segon llinatge de l’interessat.</text:p>
          </table:table-cell>
        </table:table-row>
        <table:table-row table:style-name="TableLine992335184">
          <table:table-cell table:style-name="Taula10.A3" office:value-type="string">
            <text:p text:style-name="P335">municipi</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100</text:p>
          </table:table-cell>
          <table:table-cell table:style-name="Taula10.E12" office:value-type="string">
            <text:p text:style-name="P341">Nom del municipi de la persona. </text:p>
          </table:table-cell>
        </table:table-row>
        <table:table-row table:style-name="TableLine992333168">
          <table:table-cell table:style-name="Taula10.A3" office:value-type="string">
            <text:p text:style-name="P335">municipiCodi</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100</text:p>
          </table:table-cell>
          <table:table-cell table:style-name="Taula10.E13" office:value-type="string">
            <text:p text:style-name="P341">Codi del municipi de la persona. </text:p>
          </table:table-cell>
        </table:table-row>
        <table:table-row table:style-name="TableLine992330000">
          <table:table-cell table:style-name="Taula10.A3" office:value-type="string">
            <text:p text:style-name="P335">nom</text:p>
          </table:table-cell>
          <table:table-cell table:style-name="Taula10.A3" office:value-type="string">
            <text:p text:style-name="P336">Cadena</text:p>
          </table:table-cell>
          <table:table-cell table:style-name="Taula10.A3" office:value-type="string">
            <text:p text:style-name="P268"><text:span text:style-name="T293">0..</text:span>1</text:p>
          </table:table-cell>
          <table:table-cell table:style-name="Taula10.A3" office:value-type="string">
            <text:p text:style-name="P340">255</text:p>
          </table:table-cell>
          <table:table-cell table:style-name="Taula10.E14" office:value-type="string">
            <text:p text:style-name="P307">Nom de l’interessat. Obligatori si és una persona física.</text:p>
          </table:table-cell>
        </table:table-row>
        <table:table-row table:style-name="TableLine992325680">
          <table:table-cell table:style-name="Taula10.A3" office:value-type="string">
            <text:p text:style-name="P318">observacions</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92">160</text:p>
          </table:table-cell>
          <table:table-cell table:style-name="Taula10.E15" office:value-type="string">
            <text:p text:style-name="P341">Observacions a destacar sobre la persona interessada. </text:p>
          </table:table-cell>
        </table:table-row>
        <table:table-row table:style-name="TableLine992324528">
          <table:table-cell table:style-name="Taula10.A3" office:value-type="string">
            <text:p text:style-name="P335">organCodi</text:p>
          </table:table-cell>
          <table:table-cell table:style-name="Taula10.A3" office:value-type="string">
            <text:p text:style-name="P336">Cadena</text:p>
          </table:table-cell>
          <table:table-cell table:style-name="Taula10.A3" office:value-type="string">
            <text:p text:style-name="P268"><text:span text:style-name="T293">0..</text:span>1</text:p>
          </table:table-cell>
          <table:table-cell table:style-name="Taula10.A3" office:value-type="string">
            <text:p text:style-name="P273"/>
          </table:table-cell>
          <table:table-cell table:style-name="Taula10.E16" office:value-type="string">
            <text:p text:style-name="P261"/>
          </table:table-cell>
        </table:table-row>
        <table:table-row table:style-name="TableLine992323376">
          <table:table-cell table:style-name="Taula10.A3" office:value-type="string">
            <text:p text:style-name="P335">pais</text:p>
          </table:table-cell>
          <table:table-cell table:style-name="Taula10.A3" office:value-type="string">
            <text:p text:style-name="P336">Cadena</text:p>
          </table:table-cell>
          <table:table-cell table:style-name="Taula10.A3" office:value-type="string">
            <text:p text:style-name="P268"><text:span text:style-name="T142">0..</text:span>1</text:p>
          </table:table-cell>
          <table:table-cell table:style-name="Taula10.A3" office:value-type="string">
            <text:p text:style-name="P339">100</text:p>
          </table:table-cell>
          <table:table-cell table:style-name="Taula10.E17" office:value-type="string">
            <text:p text:style-name="P297"><text:span text:style-name="T301">Nom</text:span> del País de la persona.</text:p>
          </table:table-cell>
        </table:table-row>
        <table:table-row table:style-name="TableLine992302064">
          <table:table-cell table:style-name="Taula10.A3" office:value-type="string">
            <text:p text:style-name="P335">paisCodi</text:p>
          </table:table-cell>
          <table:table-cell table:style-name="Taula10.A3" office:value-type="string">
            <text:p text:style-name="P336">Cadena</text:p>
          </table:table-cell>
          <table:table-cell table:style-name="Taula10.A3" office:value-type="string">
            <text:p text:style-name="P337">0..1</text:p>
          </table:table-cell>
          <table:table-cell table:style-name="Taula10.A3" office:value-type="string">
            <text:p text:style-name="P339">100</text:p>
          </table:table-cell>
          <table:table-cell table:style-name="Taula10.E18" office:value-type="string">
            <text:p text:style-name="P297">Codi ISO numèric del País de la persona.</text:p>
          </table:table-cell>
        </table:table-row>
        <table:table-row table:style-name="TableLine992301200">
          <table:table-cell table:style-name="Taula10.A3" office:value-type="string">
            <text:p text:style-name="P335">provincia</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39">100</text:p>
          </table:table-cell>
          <table:table-cell table:style-name="Taula10.E19" office:value-type="string">
            <text:p text:style-name="P297"><text:span text:style-name="T301">Nom</text:span> de la província de la persona.</text:p>
          </table:table-cell>
        </table:table-row>
        <table:table-row table:style-name="TableLine992300624">
          <table:table-cell table:style-name="Taula10.A3" office:value-type="string">
            <text:p text:style-name="P335">provinciaCodi</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65">100</text:p>
          </table:table-cell>
          <table:table-cell table:style-name="Taula10.E20" office:value-type="string">
            <text:p text:style-name="P297">Codi INE de la província de la persona.</text:p>
          </table:table-cell>
        </table:table-row>
        <table:table-row table:style-name="TableLine992300048">
          <table:table-cell table:style-name="Taula10.A3" office:value-type="string">
            <text:p text:style-name="P342">raoSocial</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39">2000</text:p>
          </table:table-cell>
          <table:table-cell table:style-name="Taula10.E22" office:value-type="string">
            <text:p text:style-name="P307">Raó social de l’interessat. Obligatori si és una persona jurídica.</text:p>
          </table:table-cell>
        </table:table-row>
        <table:table-row table:style-name="TableLine992299184">
          <table:table-cell table:style-name="Taula10.A3" office:value-type="string">
            <text:p text:style-name="P342">telefon</text:p>
          </table:table-cell>
          <table:table-cell table:style-name="Taula10.A3" office:value-type="string">
            <text:p text:style-name="P343">Cadena</text:p>
          </table:table-cell>
          <table:table-cell table:style-name="Taula10.A3" office:value-type="string">
            <text:p text:style-name="P344">0..1</text:p>
          </table:table-cell>
          <table:table-cell table:style-name="Taula10.A3" office:value-type="string">
            <text:p text:style-name="P339">20</text:p>
          </table:table-cell>
          <table:table-cell table:style-name="Taula10.E22" office:value-type="string">
            <text:p text:style-name="P338">Telèfon de l’interessat. </text:p>
          </table:table-cell>
        </table:table-row>
        <table:table-row table:style-name="TableLine992298896">
          <table:table-cell table:style-name="Taula10.A3" office:value-type="string">
            <text:p text:style-name="P342">tipus</text:p>
          </table:table-cell>
          <table:table-cell table:style-name="Taula10.A3" office:value-type="string">
            <text:p text:style-name="P343">interessatTipus</text:p>
          </table:table-cell>
          <table:table-cell table:style-name="Taula10.A3" office:value-type="string">
            <text:p text:style-name="P344">0..1</text:p>
          </table:table-cell>
          <table:table-cell table:style-name="Taula10.A3" office:value-type="string">
            <text:p text:style-name="P339">19</text:p>
          </table:table-cell>
          <table:table-cell table:style-name="Taula10.E23" office:value-type="string">
            <text:p text:style-name="P299">Figura jurídica de la persona <text:line-break/>'1' = Administració.</text:p>
            <text:p text:style-name="P299"><text:soft-page-break/>'2' = Persona física.</text:p>
            <text:p text:style-name="P299">'3' = Persona jurídica.</text:p>
          </table:table-cell>
        </table:table-row>
      </table:table>
      <text:p text:style-name="P137"/>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992298320">
          <table:table-cell table:style-name="Taula11.A1" table:number-columns-spanned="5" office:value-type="string">
            <text:p text:style-name="P143">Interessa<text:span text:style-name="T296">t =&gt; tns:interessatBase</text:span></text:p>
          </table:table-cell>
          <table:covered-table-cell/>
          <table:covered-table-cell/>
          <table:covered-table-cell/>
          <table:covered-table-cell/>
        </table:table-row>
        <table:table-row table:style-name="TableLine992297456">
          <table:table-cell table:style-name="Taula11.A2" office:value-type="string">
            <text:p text:style-name="P36">Nom del camp</text:p>
          </table:table-cell>
          <table:table-cell table:style-name="Taula11.A2" office:value-type="string">
            <text:p text:style-name="P36">Tipus</text:p>
          </table:table-cell>
          <table:table-cell table:style-name="Taula11.A2" office:value-type="string">
            <text:p text:style-name="P36">Mult.</text:p>
          </table:table-cell>
          <table:table-cell table:style-name="Taula11.A2" office:value-type="string">
            <text:p text:style-name="P38">Tamany</text:p>
          </table:table-cell>
          <table:table-cell table:style-name="Taula11.E2" office:value-type="string">
            <text:p text:style-name="P38">Descripció</text:p>
          </table:table-cell>
        </table:table-row>
        <table:table-row table:style-name="TableLine992295440">
          <table:table-cell table:style-name="Taula11.A3" office:value-type="string">
            <text:p text:style-name="P345">representant</text:p>
          </table:table-cell>
          <table:table-cell table:style-name="Taula11.A3" office:value-type="string">
            <text:p text:style-name="P346">representant</text:p>
          </table:table-cell>
          <table:table-cell table:style-name="Taula11.A3" office:value-type="string">
            <text:p text:style-name="P253">0..1</text:p>
          </table:table-cell>
          <table:table-cell table:style-name="Taula11.D3">
            <text:p text:style-name="P253"/>
          </table:table-cell>
          <table:table-cell table:style-name="Taula11.E3" office:value-type="string">
            <text:p text:style-name="P338">Dades de la persona representant descrites amb les mateixes propietats que els interessats. </text:p>
          </table:table-cell>
        </table:table-row>
      </table:table>
      <text:p text:style-name="P249"/>
      <text:list xml:id="list181521629819343" text:continue-numbering="true" text:style-name="Outline">
        <text:list-item>
          <text:list>
            <text:list-item>
              <text:h text:style-name="P407"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0">Aquest servei disposa d’un client que facilita la seva utilització.</text:p>
      <text:p text:style-name="P231">Per a fer ús d’aquest client en una aplicació Java es pot utilitzar la següent dependència Maven:</text:p>
      <text:p text:style-name="P380"/>
      <text:p text:style-name="P240"><text:span text:style-name="T29"><text:s/><text:tab/> </text:span><text:span text:style-name="T15">&lt;</text:span><text:span text:style-name="T16">d</text:span><text:span text:style-name="T22">ependency</text:span><text:span text:style-name="T15">&gt;</text:span></text:p>
      <text:p text:style-name="P62"><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62"><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62"><text:span text:style-name="T29"><text:s/><text:tab/> <text:tab/> </text:span><text:span text:style-name="T15">&lt;</text:span><text:span text:style-name="T22">version</text:span><text:span text:style-name="T15">&gt;</text:span><text:span text:style-name="T30">1.0.</text:span><text:span text:style-name="T34">10</text:span><text:span text:style-name="T15">&lt;/</text:span><text:span text:style-name="T22">version</text:span><text:span text:style-name="T15">&gt;</text:span></text:p>
      <text:p text:style-name="P240"><text:span text:style-name="T29"><text:s/><text:tab/> </text:span><text:span text:style-name="T15">&lt;/</text:span><text:span text:style-name="T22">dependency</text:span><text:span text:style-name="T15">&gt;</text:span></text:p>
      <text:p text:style-name="P240"/>
      <text:p text:style-name="P231">Per a utilitzar aquesta dependència és necessari tenir configurat el següent repository:</text:p>
      <text:p text:style-name="P383"/>
      <text:p text:style-name="P239"><text:span text:style-name="T29"><text:s/><text:tab/> </text:span><text:span text:style-name="T15">&lt;</text:span><text:span text:style-name="T22">repository</text:span><text:span text:style-name="T15">&gt;</text:span></text:p>
      <text:p text:style-name="P62"><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62"><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62"><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39"><text:span text:style-name="T29"><text:s/><text:tab/> </text:span><text:span text:style-name="T15">&lt;/</text:span><text:span text:style-name="T22">repository</text:span><text:span text:style-name="T15">&gt;</text:span></text:p>
      <text:p text:style-name="P239"/>
      <text:p text:style-name="P230"/>
      <text:p text:style-name="P230">Aquesta dependència ens dona accés a la classe BackofficeIntegracioRestClient que ens permet fer cridades al servei. En el següent fragment de codi es pot veure un exemple de com utilitzar aquesta classe per a fer cridades al servei:</text:p>
      <text:p text:style-name="P112"/>
      <text:p text:style-name="P61"><text:span text:style-name="T64"><text:tab/><text:tab/></text:span><text:span text:style-name="T65">BackofficeIntegracioRestClient </text:span><text:span text:style-name="T104">restClient</text:span><text:span text:style-name="T64"> = BackofficeIntegracioRestClientFactory.</text:span><text:span text:style-name="T68">getRestClient</text:span><text:span text:style-name="T64">(</text:span></text:p>
      <text:p text:style-name="P57"><text:span text:style-name="T64"><text:tab/><text:tab/><text:tab/><text:tab/></text:span><text:span text:style-name="T36">"http://DISTRIB_HOST/distribucioapi/interna"</text:span><text:span text:style-name="T64">,</text:span></text:p>
      <text:p text:style-name="P57"><text:span text:style-name="T64"><text:tab/><text:tab/><text:tab/><text:tab/></text:span><text:span text:style-name="T36">"USERNAME"</text:span><text:span text:style-name="T64">,</text:span></text:p>
      <text:p text:style-name="P57"><text:span text:style-name="T64"><text:tab/><text:tab/><text:tab/><text:tab/></text:span><text:span text:style-name="T36">"PASSWORD"</text:span><text:span text:style-name="T64">);</text:span></text:p>
      <text:p text:style-name="P57"><text:span text:style-name="T64"><text:tab/><text:tab/>AnotacioRegistreId </text:span><text:span text:style-name="T104">id</text:span><text:span text:style-name="T64"> = </text:span><text:span text:style-name="T51">new</text:span><text:span text:style-name="T64"> AnotacioRegistreId(</text:span></text:p>
      <text:p text:style-name="P57"><text:span text:style-name="T64"><text:tab/><text:tab/><text:tab/><text:tab/></text:span><text:span text:style-name="T36">"GOIBE1708001141307/2024"</text:span><text:span text:style-name="T64">,</text:span></text:p>
      <text:p text:style-name="P57"><text:span text:style-name="T64"><text:tab/><text:tab/><text:tab/><text:tab/></text:span><text:span text:style-name="T36">"BYlMBmFPLGJSytavAH325Yjbwqo9xfXhM+wM0vzHxL4="</text:span><text:span text:style-name="T64">);</text:span></text:p>
      <text:p text:style-name="P61"><text:span text:style-name="T64"><text:tab/><text:tab/>AnotacioRegistreEntrada </text:span><text:span text:style-name="T104">anotacio</text:span><text:span text:style-name="T64"> = </text:span><text:span text:style-name="T104">restClient</text:span><text:span text:style-name="T64">.consulta(</text:span><text:span text:style-name="T104">id</text:span><text:span text:style-name="T64">);</text:span></text:p>
      <text:p text:style-name="P115"/>
      <text:p text:style-name="P49"/>
      <text:list xml:id="list181521234905353" text:continue-numbering="true" text:style-name="Outline">
        <text:list-item>
          <text:h text:style-name="P400" text:outline-level="1"><text:bookmark-start text:name="Còpia de __RefNumPara__81017_1680181998 1"/><text:bookmark-start text:name="__RefHeading___Toc227365_390838441"/><text:bookmark-start text:name="Còpia de __RefHeading___Toc160470_1680181998 1"/>Servei de gestió <text:span text:style-name="T358">de regles</text:span><text:bookmark-end text:name="Còpia de __RefNumPara__81017_1680181998 1"/><text:bookmark-end text:name="__RefHeading___Toc227365_390838441"/><text:bookmark-end text:name="Còpia de __RefHeading___Toc160470_1680181998 1"/></text:h>
        </text:list-item>
      </text:list>
      <text:p text:style-name="P228">Aquest servei permet <text:span text:style-name="T347">als backoffices </text:span><text:span text:style-name="T360">gestionar les regles per a la distribució automàtica de les anotacions de registre.</text:span></text:p>
      <text:p text:style-name="P216"><draw:frame draw:style-name="fr3" draw:name="Marc4" text:anchor-type="as-char" svg:width="9.763cm" draw:z-index="77"><draw:text-box fo:min-height="10.636cm"><text:p text:style-name="P223"><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60">C</text:span><text:span text:style-name="T339">asos d'ús </text:span><text:span text:style-name="T359">de gestió </text:span><text:span text:style-name="T341">d</text:span><text:span text:style-name="T360">e regles</text:span><text:span text:style-name="T341"> a </text:span><text:span text:style-name="T339">DISTRIBUCIÓ</text:span></text:p></draw:text-box></draw:frame></text:p>
      <text:p text:style-name="P214"/>
      <text:list xml:id="list181520284271976" text:continue-numbering="true" text:style-name="Outline">
        <text:list-item>
          <text:list>
            <text:list-item>
              <text:h text:style-name="P408"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06">Per tal de facilitar la creació automàtica de regles de tipus enviar a backoffice segons un codi SIA de procediment <text:span text:style-name="T335">DISTRIBUCIO</text:span> ofereix una API REST de creació, <text:s/>consulta i modificació de regles. Les dades bàsiques d'aquesta API REST de regles són les següents:</text:p>
      <text:list xml:id="list3773118404" text:style-name="L7">
        <text:list-item>
          <text:p text:style-name="P460">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32">se</text:span></text:a><text:a xlink:type="simple" xlink:href="https://se.caib.es/distribucioapi/interna/regla" text:style-name="Internet_20_link" text:visited-style-name="Visited_20_Internet_20_Link"><text:span text:style-name="T306">.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306">egla</text:span></text:a></text:p>
        </text:list-item>
        <text:list-item>
          <text:p text:style-name="P461">Documentació Swagger: <text:a xlink:type="simple" xlink:href="https://se.caib.es/distribucioapi/interna/api/rest" text:style-name="Internet_20_link" text:visited-style-name="Visited_20_Internet_20_Link"><text:span text:style-name="T305">https://</text:span></text:a><text:a xlink:type="simple" xlink:href="https://se.caib.es/distribucioapi/interna/api/rest" text:style-name="Internet_20_link" text:visited-style-name="Visited_20_Internet_20_Link"><text:span text:style-name="T332">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305">/distribucioapi/interna</text:span></text:a></text:p>
        </text:list-item>
        <text:list-item>
          <text:p text:style-name="P461">Autenticació: WSBASIC</text:p>
        </text:list-item>
        <text:list-item>
          <text:p text:style-name="P461">Rol necessari: DIS_REGLA</text:p>
        </text:list-item>
      </text:list>
      <text:list xml:id="list181520977139253" text:continue-list="list181520284271976" text:style-name="Outline">
        <text:list-item>
          <text:list>
            <text:list-item>
              <text:list>
                <text:list-item>
                  <text:h text:style-name="P419"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196">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0">Crear una regla</text:p>
          </table:table-cell>
          <table:covered-table-cell/>
        </table:table-row>
        <table:table-row table:style-name="TableLine992308400">
          <table:table-cell table:style-name="Taula26.A2" office:value-type="string">
            <text:p text:style-name="P34">URL</text:p>
          </table:table-cell>
          <table:table-cell table:style-name="Taula26.B2" office:value-type="string">
            <text:p text:style-name="P194">http<text:span text:style-name="T346">s</text:span>://<text:span text:style-name="T346">DISTRIB_HOST/distribucioapi/interna</text:span>/regla/add</text:p>
          </table:table-cell>
        </table:table-row>
        <table:table-row table:style-name="TableLine992310128">
          <table:table-cell table:style-name="Taula26.A7" office:value-type="string">
            <text:p text:style-name="P40">Mètode</text:p>
          </table:table-cell>
          <table:table-cell table:style-name="Taula26.B7" office:value-type="string">
            <text:p text:style-name="P211">POST</text:p>
          </table:table-cell>
        </table:table-row>
        <table:table-row table:style-name="TableLine992311280">
          <table:table-cell table:style-name="Taula26.A7" office:value-type="string">
            <text:p text:style-name="P34">Descripció</text:p>
          </table:table-cell>
          <table:table-cell table:style-name="Taula26.B7" office:value-type="string">
            <text:p text:style-name="P46">Dona d'alta una regla pel backoffice i codi SIA indicat per a l'entitat indicada.</text:p>
          </table:table-cell>
        </table:table-row>
        <table:table-row table:style-name="TableLine992310992">
          <table:table-cell table:style-name="Taula26.A7" office:value-type="string">
            <text:p text:style-name="P40">Autenticació</text:p>
          </table:table-cell>
          <table:table-cell table:style-name="Taula26.B7" office:value-type="string">
            <text:p text:style-name="P367">HTTP Basic</text:p>
          </table:table-cell>
        </table:table-row>
        <table:table-row table:style-name="TableLine992311856">
          <table:table-cell table:style-name="Taula26.A7" office:value-type="string">
            <text:p text:style-name="P40">Rols requerits</text:p>
          </table:table-cell>
          <table:table-cell table:style-name="Taula26.B7" office:value-type="string">
            <text:p text:style-name="P367">DIS_REGLA</text:p>
          </table:table-cell>
        </table:table-row>
        <table:table-row table:style-name="TableLine992311568">
          <table:table-cell table:style-name="Taula26.A7" office:value-type="string">
            <text:p text:style-name="P34">Paràmetres</text:p>
          </table:table-cell>
          <table:table-cell table:style-name="Taula26.B7" office:value-type="string">
            <text:list xml:id="list4243975749" text:style-name="L8">
              <text:list-item>
                <text:p text:style-name="P432"><text:span text:style-name="T45">entitat</text:span><text:span text:style-name="T307">: Codi de l'entitat de DISTRIBUCIO on crear la regla. Típicament per l'entorn del Govern el codi d'entitat és "A04003003".</text:span><text:span text:style-name="T309"> Aquest paràmetre és obligatori.</text:span></text:p>
              </text:list-item>
              <text:list-item>
                <text:p text:style-name="P432"><text:span text:style-name="T45">sia</text:span><text:span text:style-name="T307">: Codi de procediment SIA per crear la regla i aplicar-la a les anotacions que es donin d'alta amb aquest codi</text:span><text:span text:style-name="T336"> </text:span><text:span text:style-name="T307">de procediment.</text:span><text:span text:style-name="T309"> Aquest paràmetre és obligatori.</text:span></text:p>
              </text:list-item>
              <text:list-item>
                <text:p text:style-name="P445">tipusSia<text:span text:style-name="T238">: Codi per indicar si la regla aplica al codi SIA del procediment o del servei. Els possibles valors són 'PROCEDIMENT' i 'SERVEI'. És un paràmetre opcional i per defecte es creen les regles pel SIA del procediment.</text:span></text:p>
              </text:list-item>
              <text:list-item>
                <text:p text:style-name="P448"><text:span text:style-name="T45">tramit</text:span>: Codi del tramit associat al procediment o servei. Si s'informa només aplicarà la regla a les anotacions amb el mateix codi de tràmit. Paràmetre opcional.</text:p>
              </text:list-item>
              <text:list-item>
                <text:p text:style-name="P432"><text:span text:style-name="T45">backoffice</text:span><text:span text:style-name="T307">: Codi del backoffice pel qual donar d'alta la regla. El backoffice ha d'estar donat d'alta en el manteniment de backoffices a DISTRIBUCIO per l'entitat indicada.</text:span><text:span text:style-name="T309"> Aquest paràmetre és obligatori.</text:span></text:p>
              </text:list-item>
              <text:list-item>
                <text:p text:style-name="P445">presencial<text:span text:style-name="T239">: Booleà per informar el filtre presencial de la regla. Paràmetre opcional.</text:span></text:p>
              </text:list-item>
            </text:list>
          </table:table-cell>
        </table:table-row>
        <table:table-row table:style-name="TableLine992312144">
          <table:table-cell table:style-name="Taula26.A8" office:value-type="string">
            <text:p text:style-name="P34">Resultat</text:p>
          </table:table-cell>
          <table:table-cell table:style-name="Taula26.B8" office:value-type="string">
            <text:list xml:id="list1617299638" text:style-name="L9">
              <text:list-item>
                <text:p text:style-name="P437">HTTP 200 <text:span text:style-name="T308">si la regla s'ha creat correctament o ja existia pel mateix backoffice i com a cos <text:s/>de la resposta es retorna el text de missatge de confirmació</text:span>.</text:p>
              </text:list-item>
              <text:list-item>
                <text:p text:style-name="P441">HTTP 404 si l'entitat o el backoffice no es troba per codi.</text:p>
              </text:list-item>
              <text:list-item>
                <text:p text:style-name="P441">HTTP 406 si ja existeix una regla pel mateix codi de procediment però per un altre backoffice.</text:p>
              </text:list-item>
              <text:list-item>
                <text:p text:style-name="P441">HTTP 500 si es produe<text:span text:style-name="T336">i</text:span>x un error intern no controlat creant la regla.</text:p>
              </text:list-item>
            </text:list>
          </table:table-cell>
        </table:table-row>
      </table:table>
      <text:p text:style-name="P195"/>
      <text:list xml:id="list181520451026961" text:continue-list="list181520977139253" text:style-name="Outline">
        <text:list-item>
          <text:list>
            <text:list-item>
              <text:list>
                <text:list-item>
                  <text:h text:style-name="P420"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196">Aquest mètode permet <text:span text:style-name="T360">activar o desactivar una </text:span><text:span text:style-name="T310">regla de tipus enviament a backoffice a partir del codi SIA del procedi</text:span><text:span text:style-name="T336">m</text:span><text:span text:style-name="T310">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0">Canviar estat d’una regla</text:p>
          </table:table-cell>
          <table:covered-table-cell/>
        </table:table-row>
        <text:soft-page-break/>
        <table:table-row table:style-name="TableLine992315024">
          <table:table-cell table:style-name="Taula16.A2" office:value-type="string">
            <text:p text:style-name="P34">URL</text:p>
          </table:table-cell>
          <table:table-cell table:style-name="Taula16.B2" office:value-type="string">
            <text:p text:style-name="P194">http<text:span text:style-name="T346">s</text:span>://<text:span text:style-name="T346">DISTRIB_HOST/distribucioapi/interna</text:span>/regla/<text:span text:style-name="T306">canviEstat</text:span></text:p>
          </table:table-cell>
        </table:table-row>
        <table:table-row table:style-name="TableLine992316752">
          <table:table-cell table:style-name="Taula16.A7" office:value-type="string">
            <text:p text:style-name="P40">Mètode</text:p>
          </table:table-cell>
          <table:table-cell table:style-name="Taula16.B7" office:value-type="string">
            <text:p text:style-name="P211">POST</text:p>
          </table:table-cell>
        </table:table-row>
        <table:table-row table:style-name="TableLine992317616">
          <table:table-cell table:style-name="Taula16.A7" office:value-type="string">
            <text:p text:style-name="P34">Descripció</text:p>
          </table:table-cell>
          <table:table-cell table:style-name="Taula16.B7" office:value-type="string">
            <text:p text:style-name="P46"><text:span text:style-name="T360">Canvia l’estat d’una regla donat el codi SIA del procediment</text:span>.</text:p>
          </table:table-cell>
        </table:table-row>
        <table:table-row table:style-name="TableLine992318768">
          <table:table-cell table:style-name="Taula16.A7" office:value-type="string">
            <text:p text:style-name="P40">Autenticació</text:p>
          </table:table-cell>
          <table:table-cell table:style-name="Taula16.B7" office:value-type="string">
            <text:p text:style-name="P367">HTTP Basic</text:p>
          </table:table-cell>
        </table:table-row>
        <table:table-row table:style-name="TableLine992319344">
          <table:table-cell table:style-name="Taula16.A7" office:value-type="string">
            <text:p text:style-name="P40">Rols requerits</text:p>
          </table:table-cell>
          <table:table-cell table:style-name="Taula16.B7" office:value-type="string">
            <text:p text:style-name="P367">DIS_REGLA</text:p>
          </table:table-cell>
        </table:table-row>
        <table:table-row table:style-name="TableLine992319632">
          <table:table-cell table:style-name="Taula16.A7" office:value-type="string">
            <text:p text:style-name="P34">Paràmetres</text:p>
          </table:table-cell>
          <table:table-cell table:style-name="Taula16.B7" office:value-type="string">
            <text:list xml:id="list181519958790758" text:continue-list="list4243975749" text:style-name="L8">
              <text:list-item>
                <text:p text:style-name="P432"><text:span text:style-name="T45">sia</text:span><text:span text:style-name="T307">: Codi de procediment SIA per </text:span><text:span text:style-name="T310">trobar la regla associada</text:span><text:span text:style-name="T307">.</text:span><text:span text:style-name="T309"> Aquest paràmetre és obligatori.</text:span></text:p>
              </text:list-item>
              <text:list-item>
                <text:p text:style-name="P446">tramit<text:span text:style-name="T234">: Codi del tramit de la regla. Paràmetre opcional.</text:span></text:p>
              </text:list-item>
              <text:list-item>
                <text:p text:style-name="P432"><text:span text:style-name="T50">activa</text:span><text:span text:style-name="T307">: </text:span>Paràmetre opcional <text:span text:style-name="T310">de tipus booleà </text:span>per activar o desactivar la regla. Si on s'especifica es canvia segons el valor que tingui actualment.<text:span text:style-name="T310"> Per exemple </text:span><text:span text:style-name="T161">activa=true</text:span><text:span text:style-name="T193">.</text:span></text:p>
              </text:list-item>
            </text:list>
          </table:table-cell>
        </table:table-row>
        <table:table-row table:style-name="TableLine992320208">
          <table:table-cell table:style-name="Taula16.A8" office:value-type="string">
            <text:p text:style-name="P34">Resultat</text:p>
          </table:table-cell>
          <table:table-cell table:style-name="Taula16.B8" office:value-type="string">
            <text:list xml:id="list2976788908" text:style-name="L10">
              <text:list-item>
                <text:p text:style-name="P438">HTTP 200 <text:span text:style-name="T308">si </text:span><text:span text:style-name="T310">la regla s'ha pogut modificar correctament</text:span>.<text:span text:style-name="T312"> Com a cos del missatge de resposta es retorna el text de confirmació conforme si la regla s'ha activat o desactivat correctament. Per exemple "La regla amb codi 12354 s'ha desactivat correctament.".</text:span></text:p>
              </text:list-item>
              <text:list-item>
                <text:p text:style-name="P442">HTTP <text:span text:style-name="T310">409</text:span> si <text:span text:style-name="T310">no s'ha trobat cap regla el codi de procediment SIA.</text:span></text:p>
              </text:list-item>
              <text:list-item>
                <text:p text:style-name="P442">HTTP 500 si es produe<text:span text:style-name="T336">i</text:span>x un error intern no controlat <text:span text:style-name="T310">modificant</text:span> la regla.</text:p>
              </text:list-item>
            </text:list>
          </table:table-cell>
        </table:table-row>
      </table:table>
      <text:p text:style-name="P196"/>
      <text:list xml:id="list181521286050287" text:continue-list="list181520451026961" text:style-name="Outline">
        <text:list-item>
          <text:list>
            <text:list-item>
              <text:list>
                <text:list-item>
                  <text:h text:style-name="P420"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24">Aquest mètode <text:span text:style-name="T310">permet consultar els detalls d'una regla a partir del codi SIA del procediment. En el cos de la respo</text:span><text:span text:style-name="T336">s</text:span><text:span text:style-name="T310">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1"><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992337776">
          <table:table-cell table:style-name="Taula21.A2" office:value-type="string">
            <text:p text:style-name="P34">URL</text:p>
          </table:table-cell>
          <table:table-cell table:style-name="Taula21.B2" office:value-type="string">
            <text:p text:style-name="P194">http<text:span text:style-name="T346">s</text:span>://<text:span text:style-name="T346">DISTRIB_HOST/distribucioapi/interna</text:span>/regla/consultarRegla</text:p>
          </table:table-cell>
        </table:table-row>
        <table:table-row table:style-name="TableLine992282480">
          <table:table-cell table:style-name="Taula21.A7" office:value-type="string">
            <text:p text:style-name="P40">Mètode</text:p>
          </table:table-cell>
          <table:table-cell table:style-name="Taula21.B7" office:value-type="string">
            <text:p text:style-name="P211">POST</text:p>
          </table:table-cell>
        </table:table-row>
        <table:table-row table:style-name="TableLine355673968">
          <table:table-cell table:style-name="Taula21.A7" office:value-type="string">
            <text:p text:style-name="P34">Descripció</text:p>
          </table:table-cell>
          <table:table-cell table:style-name="Taula21.B7" office:value-type="string">
            <text:p text:style-name="P217">Consulta les regles <text:span text:style-name="T360">que coincideixin amb el codi SIA especificat</text:span>. En principi només hi pot haver una regla de tipus backoffice per codi SIA<text:span text:style-name="T312"> però per compatibilitat es retorna una llista de regles que podrien estar creades pel mateix codi SIA de procediment anteriorment.</text:span></text:p>
          </table:table-cell>
        </table:table-row>
        <table:table-row table:style-name="TableLine355613488">
          <table:table-cell table:style-name="Taula21.A7" office:value-type="string">
            <text:p text:style-name="P40">Autenticació</text:p>
          </table:table-cell>
          <table:table-cell table:style-name="Taula21.B7" office:value-type="string">
            <text:p text:style-name="P367">HTTP Basic</text:p>
          </table:table-cell>
        </table:table-row>
        <table:table-row table:style-name="TableLine355675984">
          <table:table-cell table:style-name="Taula21.A7" office:value-type="string">
            <text:p text:style-name="P40">Rols requerits</text:p>
          </table:table-cell>
          <table:table-cell table:style-name="Taula21.B7" office:value-type="string">
            <text:p text:style-name="P367">DIS_REGLA</text:p>
          </table:table-cell>
        </table:table-row>
        <table:table-row table:style-name="TableLine355678000">
          <table:table-cell table:style-name="Taula21.A7" office:value-type="string">
            <text:p text:style-name="P34">Paràmetres</text:p>
          </table:table-cell>
          <table:table-cell table:style-name="Taula21.B7" office:value-type="string">
            <text:list xml:id="list181520727862103" text:continue-list="list181519958790758" text:style-name="L8">
              <text:list-item>
                <text:p text:style-name="P432"><text:span text:style-name="T220">sia</text:span><text:span text:style-name="T194">: </text:span><text:span text:style-name="T193">Codi SIA de la regla que identifica la regla de tipus backoffice.</text:span></text:p>
              </text:list-item>
            </text:list>
          </table:table-cell>
        </table:table-row>
        <table:table-row table:style-name="TableLine355676560">
          <table:table-cell table:style-name="Taula21.A8" office:value-type="string">
            <text:p text:style-name="P34">Resultat</text:p>
          </table:table-cell>
          <table:table-cell table:style-name="Taula21.B8" office:value-type="string">
            <text:list xml:id="list2930949468" text:style-name="L11">
              <text:list-item>
                <text:p text:style-name="P433"><text:span text:style-name="T307">HTTP 200 </text:span><text:span text:style-name="T308">si </text:span><text:span text:style-name="T310">la regla s'ha pogut </text:span><text:span text:style-name="T311">consultar</text:span><text:span text:style-name="T310"> correctament</text:span><text:span text:style-name="T307">.</text:span><text:span text:style-name="T312"> En el cos del missatge hi ha el JSON amb la llista de regles i els seus detalls, per exemple:</text:span></text:p>
                <text:list>
                  <text:list-item>
                    <text:p text:style-name="P449">Petició:</text:p>
                    <text:list>
                      <text:list-item>
                        <text:p text:style-name="P449">GET https://<text:span text:style-name="T332">se</text:span>.caib.es/distribucioapi/interna/regla/consultarRegla?sia=20220429</text:p>
                      </text:list-item>
                    </text:list>
                  </text:list-item>
                  <text:list-item>
                    <text:p text:style-name="P449"><text:soft-page-break/>Cos de la resposta</text:p>
                  </text:list-item>
                </text:list>
              </text:list-item>
            </text:list>
            <text:p text:style-name="P204">[</text:p>
            <text:p text:style-name="P204"><text:s text:c="4"/>{</text:p>
            <text:p text:style-name="P204"><text:s text:c="8"/>"id": 1485186,</text:p>
            <text:p text:style-name="P204"><text:s text:c="8"/>"entitat": "Govern de les Illes Balears",</text:p>
            <text:p text:style-name="P204"><text:s text:c="8"/>"data": "13/05/2022 16:51:55",</text:p>
            <text:p text:style-name="P204"><text:s text:c="8"/>"activa": true,</text:p>
            <text:p text:style-name="P204"><text:s text:c="8"/>"nom": "helium 20220429",</text:p>
            <text:p text:style-name="P205"><text:s text:c="8"/>"tipusSia": "PROCEDIMENT",</text:p>
            <text:p text:style-name="P204"><text:s text:c="8"/>"backofficeDesti": "HELIUM DEV"</text:p>
            <text:p text:style-name="P452"><text:s text:c="8"/>"<text:span text:style-name="T408">sia</text:span>": <text:span text:style-name="T408">"20220429"</text:span></text:p>
            <text:p text:style-name="P452"><text:s text:c="8"/>"<text:span text:style-name="T406">tramit</text:span>": <text:span text:style-name="T406">null</text:span></text:p>
            <text:p text:style-name="P451"><text:s text:c="4"/>}</text:p>
            <text:p text:style-name="P204">]</text:p>
            <text:list xml:id="list3546296737" text:style-name="L12">
              <text:list-item>
                <text:p text:style-name="P450">Els camps de la resposta són els següents:</text:p>
                <text:list>
                  <text:list-item>
                    <text:p text:style-name="P450">id: identificador intern de la regla de tipus long.</text:p>
                  </text:list-item>
                  <text:list-item>
                    <text:p text:style-name="P450">entitat: Descripció de l'entitat de DISTRIBUCIO a la qual pertany la regla. Tipus String.</text:p>
                  </text:list-item>
                  <text:list-item>
                    <text:p text:style-name="P450">data: Data de creació de la regla. String amb format "dd/MM/yyyy HH:mm:ss".</text:p>
                  </text:list-item>
                  <text:list-item>
                    <text:p text:style-name="P450">nom: Nom posat a la regla.</text:p>
                  </text:list-item>
                  <text:list-item>
                    <text:p text:style-name="P450">tipusSia<text:span text:style-name="T363">: Indica si la regla s'aplica pel codi SIA del procediment assignat a l'anotació o pel codi SIA del servei assignat a l'anotació.</text:span><text:span text:style-name="T368"> Els possibles valors són "PROCEDIMENT" o "SERVEI".</text:span></text:p>
                  </text:list-item>
                  <text:list-item>
                    <text:p text:style-name="P450">backofficeDesti: Codi del backoffice al qual es notifiquen les anotacions afectades per la regla.</text:p>
                  </text:list-item>
                  <text:list-item>
                    <text:p text:style-name="P453">sia: Codi SIA del procediment o servei.</text:p>
                  </text:list-item>
                  <text:list-item>
                    <text:p text:style-name="P453">tramit: Codi del tràmit associat a la regla.</text:p>
                  </text:list-item>
                </text:list>
              </text:list-item>
              <text:list-item>
                <text:p text:style-name="P443">HTTP <text:span text:style-name="T311">404</text:span> si <text:span text:style-name="T310">no s'ha trobat cap regla el codi de procediment SIA.</text:span></text:p>
              </text:list-item>
            </text:list>
          </table:table-cell>
        </table:table-row>
      </table:table>
      <text:p text:style-name="P196"/>
      <text:list xml:id="list181521657372226" text:continue-list="list181521286050287" text:style-name="Outline">
        <text:list-item>
          <text:list>
            <text:list-item>
              <text:h text:style-name="P408"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31">Aquest servei disposa d’un client que facilita la seva utilització.</text:p>
      <text:p text:style-name="P231">Per a fer ús d’aquest client en una aplicació Java es pot utilitzar la següent dependència Maven:</text:p>
      <text:p text:style-name="P380"/>
      <text:p text:style-name="P240"><text:span text:style-name="T29"><text:s/><text:tab/> </text:span><text:span text:style-name="T15">&lt;</text:span><text:span text:style-name="T16">d</text:span><text:span text:style-name="T22">ependency</text:span><text:span text:style-name="T15">&gt;</text:span></text:p>
      <text:p text:style-name="P62"><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62"><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62"><text:span text:style-name="T29"><text:s/><text:tab/> <text:tab/> </text:span><text:span text:style-name="T15">&lt;</text:span><text:span text:style-name="T22">version</text:span><text:span text:style-name="T15">&gt;</text:span><text:span text:style-name="T30">1.0.</text:span><text:span text:style-name="T35">10</text:span><text:span text:style-name="T15">&lt;/</text:span><text:span text:style-name="T22">version</text:span><text:span text:style-name="T15">&gt;</text:span></text:p>
      <text:p text:style-name="P240"><text:span text:style-name="T29"><text:s/><text:tab/> </text:span><text:span text:style-name="T15">&lt;/</text:span><text:span text:style-name="T22">dependency</text:span><text:span text:style-name="T15">&gt;</text:span></text:p>
      <text:p text:style-name="P240"/>
      <text:p text:style-name="P231">Per a utilitzar aquesta dependència és necessari tenir configurat el següent repository:</text:p>
      <text:p text:style-name="P383"/>
      <text:p text:style-name="P239"><text:span text:style-name="T29"><text:s/><text:tab/> </text:span><text:span text:style-name="T15">&lt;</text:span><text:span text:style-name="T22">repository</text:span><text:span text:style-name="T15">&gt;</text:span></text:p>
      <text:p text:style-name="P62"><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62"><text:soft-page-break/><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62"><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39"><text:span text:style-name="T29"><text:s/><text:tab/> </text:span><text:span text:style-name="T15">&lt;/</text:span><text:span text:style-name="T22">repository</text:span><text:span text:style-name="T15">&gt;</text:span></text:p>
      <text:p text:style-name="P239"/>
      <text:p text:style-name="P154"/>
      <text:p text:style-name="P232">Aquesta dependència ens dona accés a la classe ReglesRestClient que ens permet fer cridades al servei. En el següent fragment de codi es pot veure un exemple de com utilitzar aquesta classe per a fer cridades al servei:</text:p>
      <text:p text:style-name="P113"/>
      <text:p text:style-name="P63"><text:span text:style-name="T64"><text:tab/><text:tab/>ReglesRestClient</text:span><text:span text:style-name="T65"> </text:span><text:span text:style-name="T104">restClient</text:span><text:span text:style-name="T64"> = ReglesRestClientFactory.</text:span><text:span text:style-name="T68">getRestClient</text:span><text:span text:style-name="T64">(</text:span></text:p>
      <text:p text:style-name="P63"><text:span text:style-name="T64"><text:tab/><text:tab/><text:tab/><text:tab/></text:span><text:span text:style-name="T36">"http://DISTRIB_HOST/distribucioapi/interna"</text:span><text:span text:style-name="T64">,</text:span></text:p>
      <text:p text:style-name="P63"><text:span text:style-name="T64"><text:tab/><text:tab/><text:tab/><text:tab/></text:span><text:span text:style-name="T36">"USERNAME"</text:span><text:span text:style-name="T64">,</text:span></text:p>
      <text:p text:style-name="P63"><text:span text:style-name="T64"><text:tab/><text:tab/><text:tab/><text:tab/></text:span><text:span text:style-name="T36">"PASSWORD"</text:span><text:span text:style-name="T64">);</text:span></text:p>
      <text:p text:style-name="P64"><text:span text:style-name="T64"><text:tab/><text:tab/></text:span><text:span text:style-name="T66">Regla</text:span><text:span text:style-name="T64"> </text:span><text:span text:style-name="T105">regla</text:span><text:span text:style-name="T64"> = </text:span><text:span text:style-name="T104">restClient</text:span><text:span text:style-name="T64">.consulta</text:span><text:span text:style-name="T66">Regla</text:span><text:span text:style-name="T64">(</text:span><text:span text:style-name="T36">"</text:span><text:span text:style-name="T37">CODI_SIA</text:span><text:span text:style-name="T36">"</text:span><text:span text:style-name="T64">);</text:span></text:p>
      <text:p text:style-name="P116"/>
      <text:p text:style-name="P191"/>
      <text:list xml:id="list181519646807902" text:continue-numbering="true" text:style-name="Outline">
        <text:list-item>
          <text:h text:style-name="P401" text:outline-level="1"><text:bookmark-start text:name="__RefHeading___Toc60794_1326387233"/>Llibreria d'utilitats pels backoffices de DISTRIBUCIO<text:bookmark-end text:name="__RefHeading___Toc60794_1326387233"/></text:h>
        </text:list-item>
      </text:list>
      <text:p text:style-name="P133"><text:span text:style-name="T149"><text:s/></text:span>Amb l'objectiu de facilitar la integració dels backoffices amb DISTRIBUCIO <text:span text:style-name="T149">s'ha creat la llibreria </text:span><text:span text:style-name="T151">distribucio-backoffice-utils</text:span><text:span text:style-name="T179"> amb mètodes per facilitar </text:span><text:span text:style-name="T188">tasques comunes dels backoffices per a que s'hagi de fer una implementació específica per cada backoffice com, per exemple, </text:span><text:span text:style-name="T179">traspassar la informació des dels expedients de l'Arxiu de Distribució cap als expedients dins l'Arxiu dels backoffices</text:span><text:span text:style-name="T188"> o extreure dades de documents tècnics de Sistra2.</text:span></text:p>
      <text:p text:style-name="P68"/>
      <text:p text:style-name="P131"><text:span text:style-name="T179"><text:s/>La motivació d'aquesta llibreria és unificar la forma en què els backoffices </text:span><text:span text:style-name="T198">mo</text:span><text:span text:style-name="T203">u</text:span><text:span text:style-name="T198">en la informació des dels expedients de DISTRIBUCIO cap als seus propis expedients dins l'Arxiu. </text:span><text:span text:style-name="T199">D'aquesta forma les crides per moure el contingut i els interessats s'encapsula dins d'una funció que ja té en compte els diferents errors que es poden produir o si els annexos o els interessats ja s'han traspassat en un intent anterior.</text:span></text:p>
      <text:p text:style-name="P79"/>
      <text:p text:style-name="P79">En els següents punts des descriu la llibreria, com funciona i com utilitzar-la.</text:p>
      <text:list xml:id="list181521245035698" text:continue-numbering="true" text:style-name="Outline">
        <text:list-item>
          <text:list>
            <text:list-item>
              <text:h text:style-name="P412" text:outline-level="2"><text:bookmark-start text:name="__RefHeading___Toc50902_2907556958"/>Informació de la llibreria<text:bookmark-end text:name="__RefHeading___Toc50902_2907556958"/></text:h>
            </text:list-item>
          </text:list>
        </text:list-item>
      </text:list>
      <text:p text:style-name="P86">La llibreria consisteix en <text:span text:style-name="T267">classes </text:span>interfície<text:span text:style-name="T267">s</text:span> <text:span text:style-name="T178">amb els mètodes de suport pels </text:span><text:span text:style-name="T150">backoffices</text:span><text:span text:style-name="T178"> i classe</text:span><text:span text:style-name="T191">s</text:span><text:span text:style-name="T178"> amb la implementació</text:span><text:span text:style-name="T191">. La llista de classes d'utilitats són les següents:</text:span></text:p>
      <text:p text:style-name="P71"/>
      <text:list xml:id="list3152820952" text:style-name="L13">
        <text:list-item>
          <text:p text:style-name="P425"><text:span text:style-name="T159">BackofficeArxiuUtils</text:span><text:span text:style-name="T191">: Aquesta classe d'uilitats conté mètodes per tractar les anotacions i crear un expedient a l'Arxiu del backoffice. </text:span><text:span text:style-name="T209"><text:s/></text:span><text:span text:style-name="T210">C</text:span><text:span text:style-name="T180">onté una referència a la instància del plugin de l'Arxiu </text:span><text:span text:style-name="T152">IArxiuPlugin</text:span><text:span text:style-name="T180"> que emprarà per fer les diferents crides i moure la informació dels expedients de DISTRIBUCIO</text:span><text:span text:style-name="T152"> </text:span><text:span text:style-name="T180">cap a un expedient propi. Així mateix, la llibreria </text:span><text:span text:style-name="T152">distribucio-backoffice-utils.jar</text:span><text:span text:style-name="T180"> utilitza les classes definides en la llibreria client de WS de DISTRIBUCIO</text:span><text:span text:style-name="T152"> distribucio-ws-client.jar.</text:span><text:span text:style-name="T180"> </text:span></text:p>
        </text:list-item>
        <text:list-item>
          <text:p text:style-name="P426">BackofficeSistra2Utils<text:span text:style-name="T178">: Aquesta classe d'utilitats té mètodes per tractar els annexos corresponents a documents tècnics de Sistra2 i extreure'n la informació dels formularis o pagaments.</text:span></text:p>
        </text:list-item>
      </text:list>
      <text:p text:style-name="P71"/>
      <text:p text:style-name="P134"><text:span text:style-name="T178">Com que les utilitats de l'Arxiu empren el plugin d'Arxiu la llibreria té dependències del plugin d'Arxiu </text:span>plugin-arxiu-api.jar<text:span text:style-name="T178"> i de la llibreria de Distribució </text:span><text:span text:style-name="T159">distribucio-ws-client.jar</text:span><text:span text:style-name="T191">. A continuació es mostra el diagrama de blocs de les llibreries relacionades i el </text:span><text:span text:style-name="T159">backoffice</text:span><text:span text:style-name="T191"> que empra la llibreria d'utilitats.</text:span></text:p>
      <text:p text:style-name="P69"/>
      <text:p text:style-name="P161"><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53"><text:line-break/></text:span>Fig. <text:sequence text:ref-name="refFig.2" text:name="Fig." text:formula="ooow:Fig.+1" style:num-format="1">3</text:sequence>: Diagrama de blocks de la llibreria</text:p></draw:text-box></draw:frame><text:soft-page-break/></text:p>
      <text:list xml:id="list181520294342376" text:continue-list="list181521245035698" text:style-name="Outline">
        <text:list-item>
          <text:list>
            <text:list-item>
              <text:h text:style-name="P414" text:outline-level="2"><text:bookmark-start text:name="__RefHeading___Toc50904_2907556958"/>Com incloure la llibreria<text:bookmark-end text:name="__RefHeading___Toc50904_2907556958"/></text:h>
            </text:list-item>
          </text:list>
        </text:list-item>
      </text:list>
      <text:p text:style-name="P72">La llibreria es pot incloure com una dependència maven dins del codi del backoffice de la mateixa forma que s'inclouen les dependències del client del WS de DISTRIBUCIO o de l' API de l'Arxiu.</text:p>
      <text:p text:style-name="P387"><text:span text:style-name="T178">S'ha de tenir en compte la versió específica de la llibreria </text:span><text:span text:style-name="T150">distribucio-backoffice-utils</text:span><text:span text:style-name="T178"> ja que aquesta es pot versionar i millorar en el temps. La versió de la llibreria contindrà el número de versió de DISTRIBUCIO i el número de revisió quan aquesta tingui canvis. </text:span></text:p>
      <text:p text:style-name="P387"><text:span text:style-name="T178">En el cas de </text:span><text:span text:style-name="T196">d'aplicacions Java 7 per JBoss 5.2 es pot incloure </text:span><text:span text:style-name="T178">la següent dependència </text:span><text:span text:style-name="T150">maven</text:span><text:span text:style-name="T178">:</text:span></text:p>
      <table:table table:name="Table2" table:style-name="Table2">
        <table:table-column table:style-name="Table2.A"/>
        <table:table-row table:style-name="TableLine355677424">
          <table:table-cell table:style-name="Table2.A1" office:value-type="string">
            <text:p text:style-name="P44"><text:span text:style-name="T18">&lt;</text:span><text:span text:style-name="T24">dependency</text:span><text:span text:style-name="T18">&gt;</text:span></text:p>
            <text:p text:style-name="P58"><text:span text:style-name="T70"><text:tab/></text:span><text:span text:style-name="T18">&lt;</text:span><text:span text:style-name="T24">groupId</text:span><text:span text:style-name="T18">&gt;</text:span><text:span text:style-name="T70">es.caib.distribucio</text:span><text:span text:style-name="T18">&lt;/</text:span><text:span text:style-name="T24">groupId</text:span><text:span text:style-name="T18">&gt;</text:span></text:p>
            <text:p text:style-name="P58"><text:span text:style-name="T70"><text:tab/></text:span><text:span text:style-name="T18">&lt;</text:span><text:span text:style-name="T24">artifactId</text:span><text:span text:style-name="T18">&gt;</text:span><text:span text:style-name="T70">distribucio-backoffice-utils</text:span><text:span text:style-name="T18">&lt;/</text:span><text:span text:style-name="T24">artifactId</text:span><text:span text:style-name="T18">&gt;</text:span></text:p>
            <text:p text:style-name="P58"><text:span text:style-name="T70"><text:tab/></text:span><text:span text:style-name="T18">&lt;</text:span><text:span text:style-name="T24">version</text:span><text:span text:style-name="T18">&gt;</text:span><text:span text:style-name="T70">0.9.</text:span><text:span text:style-name="T75">50</text:span><text:span text:style-name="T18">&lt;/</text:span><text:span text:style-name="T24">version</text:span><text:span text:style-name="T18">&gt;</text:span></text:p>
            <text:p text:style-name="P44"><text:span text:style-name="T18">&lt;/</text:span><text:span text:style-name="T24">dependency</text:span><text:span text:style-name="T18">&gt;</text:span></text:p>
          </table:table-cell>
        </table:table-row>
      </table:table>
      <text:p text:style-name="P72"/>
      <text:p text:style-name="P387"><text:span text:style-name="T178">En el cas de </text:span><text:span text:style-name="T196">d'aplicacions Java 11 per JBoss 7.2 es pot incloure </text:span><text:span text:style-name="T178">la següent dependència </text:span><text:span text:style-name="T150">maven</text:span><text:span text:style-name="T178">:</text:span></text:p>
      <table:table table:name="Table1" table:style-name="Table1">
        <table:table-column table:style-name="Table1.A"/>
        <table:table-row table:style-name="TableLine355675120">
          <table:table-cell table:style-name="Table1.A1" office:value-type="string">
            <text:p text:style-name="P50"><text:span text:style-name="T18">&lt;</text:span><text:span text:style-name="T24">dependency</text:span><text:span text:style-name="T18">&gt;</text:span></text:p>
            <text:p text:style-name="P66"><text:span text:style-name="T70"><text:tab/></text:span><text:span text:style-name="T18">&lt;</text:span><text:span text:style-name="T24">groupId</text:span><text:span text:style-name="T18">&gt;</text:span><text:span text:style-name="T70">es.caib.distribucio</text:span><text:span text:style-name="T18">&lt;/</text:span><text:span text:style-name="T24">groupId</text:span><text:span text:style-name="T18">&gt;</text:span></text:p>
            <text:p text:style-name="P66"><text:span text:style-name="T70"><text:tab/></text:span><text:span text:style-name="T18">&lt;</text:span><text:span text:style-name="T24">artifactId</text:span><text:span text:style-name="T18">&gt;</text:span><text:span text:style-name="T70">distribucio-backoffice-utils</text:span><text:span text:style-name="T18">&lt;/</text:span><text:span text:style-name="T24">artifactId</text:span><text:span text:style-name="T18">&gt;</text:span></text:p>
            <text:p text:style-name="P66"><text:span text:style-name="T70"><text:tab/></text:span><text:span text:style-name="T18">&lt;</text:span><text:span text:style-name="T24">version</text:span><text:span text:style-name="T18">&gt;</text:span><text:span text:style-name="T19">1</text:span><text:span text:style-name="T70">.</text:span><text:span text:style-name="T71">0</text:span><text:span text:style-name="T70">.</text:span><text:span text:style-name="T77">10</text:span><text:span text:style-name="T18">&lt;/</text:span><text:span text:style-name="T24">version</text:span><text:span text:style-name="T18">&gt;</text:span></text:p>
            <text:p text:style-name="P50"><text:span text:style-name="T18">&lt;/</text:span><text:span text:style-name="T24">dependency</text:span><text:span text:style-name="T18">&gt;</text:span></text:p>
          </table:table-cell>
        </table:table-row>
      </table:table>
      <text:p text:style-name="P73"/>
      <text:p text:style-name="P74">Aquesta llibreria depèn de la llibreria client de<text:span text:style-name="T375"> </text:span>l<text:span text:style-name="T375">'API REST </text:span>de DISTRIBUCIO per tractar la informació de DISTRIBUCIO i del plugin d'Arxiu per fer les diferents crides a l'Arxiu.</text:p>
      <text:list xml:id="list181521547348712" text:continue-numbering="true" text:style-name="Outline">
        <text:list-item>
          <text:list>
            <text:list-item>
              <text:h text:style-name="P415" text:outline-level="2"><text:bookmark-start text:name="__RefHeading___Toc366105_93553639"/><text:soft-page-break/>Històric<text:bookmark-end text:name="__RefHeading___Toc366105_93553639"/></text:h>
            </text:list-item>
          </text:list>
        </text:list-item>
      </text:list>
      <text:p text:style-name="P171">La llibreria està pensada per anar incorporant noves utilitats i en principi se cercarà la compatibilitat cap a versions anteriors. <text:span text:style-name="T269">La versió de la llibreria coincideix amb la versió de Distribucio en la que es van introduir els canvis. </text:span>L'històric de versions actual és el següent:</text:p>
      <text:list xml:id="list615945689" text:style-name="L14">
        <text:list-item>
          <text:p text:style-name="P464">0.9.26 Versió inicial de la llibreria amb la classe <text:span text:style-name="T150">BackofficeUtils</text:span><text:span text:style-name="T178"> per traspassar arxius.</text:span></text:p>
        </text:list-item>
        <text:list-item>
          <text:p text:style-name="P462"><text:span text:style-name="T188">0.9.2</text:span><text:span text:style-name="T214">8</text:span><text:span text:style-name="T188"> S'afegeix la classe </text:span><text:span text:style-name="T160">BackofficeSistra2Utils</text:span><text:span text:style-name="T188"> per extreure dades de documents tècnics i es reanomena la classe anterior </text:span><text:span text:style-name="T160">BackofficeUtils </text:span><text:span text:style-name="T188">a</text:span><text:span text:style-name="T160"> BackofficeArxiuUtils</text:span><text:span text:style-name="T188">.</text:span></text:p>
        </text:list-item>
        <text:list-item>
          <text:p text:style-name="P463"><text:span text:style-name="T188">0.9.</text:span><text:span text:style-name="T345">50</text:span><text:span text:style-name="T188"> </text:span><text:span text:style-name="T344">Modificació per llegir els valors de tipus llista de l'XML de formularis de Sistra2.</text:span><text:span text:style-name="T188">a</text:span><text:span text:style-name="T160"> BackofficeArxiuUtils</text:span><text:span text:style-name="T188">.</text:span></text:p>
        </text:list-item>
        <text:list-item>
          <text:p text:style-name="P465"><text:span text:style-name="T188">1</text:span><text:span text:style-name="T178">.0.1 Primera versió de la llibreria per Java 11 i JBoss 7.2</text:span></text:p>
        </text:list-item>
        <text:list-item>
          <text:p text:style-name="P465"><text:span text:style-name="T178">0.9.51 i 1.0.8 Actualització de les llibreries per actualitzar les llibreries </text:span><text:span text:style-name="T150">distribucio-rest-client</text:span><text:span text:style-name="T178"> i per corregir el missatge d'error quan falli la incorporació d'un annex.</text:span></text:p>
        </text:list-item>
        <text:list-item>
          <text:p text:style-name="P470"><text:span text:style-name="T178">1.0.10 Actualització de les llibreries </text:span><text:span text:style-name="T150">distribucio-rest-client</text:span><text:span text:style-name="T178"> i </text:span><text:span text:style-name="T150">distribucio-backoffice-utils</text:span><text:span text:style-name="T178"> amb el tràmit per les regles.</text:span></text:p>
        </text:list-item>
      </text:list>
      <text:list xml:id="list181519885428959" text:continue-list="list181521547348712" text:style-name="Outline">
        <text:list-item>
          <text:list>
            <text:list-item>
              <text:h text:style-name="P416" text:outline-level="2"><text:bookmark-start text:name="__RefHeading___Toc366107_93553639"/>Utilitats per l'Arxiu<text:bookmark-end text:name="__RefHeading___Toc366107_93553639"/></text:h>
            </text:list-item>
          </text:list>
        </text:list-item>
      </text:list>
      <text:p text:style-name="P135">La llibreria d'utilitats inclou la classe <text:span text:style-name="T150">BackofficeArxiuUtils</text:span><text:span text:style-name="T178"> amb els mètodes per fer les tasques de crear un expedient a l'Arxiu i </text:span><text:span text:style-name="T204">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4"><text:span text:style-name="T221"><text:s/>La idea és poder crear i moure la informació de l'expedient a l'Arxiu de DISTRIBUCIO cap a l'expedient a l'Arxiu del </text:span><text:span text:style-name="T152">backoffice</text:span><text:span text:style-name="T180"> a partir de la informació consultada amb el client del WS de DISTRIBUCIO quan el </text:span><text:span text:style-name="T152">backoffice</text:span><text:span text:style-name="T180"> rebi una petició d'anotació pendent. D'aquesta forma la interfície </text:span><text:span text:style-name="T152">BackofficeArxiuUtils</text:span><text:span text:style-name="T180"> defineix el mètode </text:span><text:span text:style-name="T162">crearExpedientAmbAnotacioDeRegistre</text:span><text:span text:style-name="T180"> per a fer el seguit de crides necessàries i retornar un resultat que permeti saber com ha anat el resultat. </text:span></text:p>
      <text:p text:style-name="P70"/>
      <text:p text:style-name="P189"><text:span text:style-name="T181">E</text:span><text:span text:style-name="T178">l mètode </text:span><text:span text:style-name="T150">crearExpedientAmbAnotacioRegistre</text:span><text:span text:style-name="T178"> s'encarrergarà, mitjançant la informació proporcionada, de realitzar les següents crides a l'Arxiu:</text:span></text:p>
      <text:list xml:id="list2108208039" text:style-name="L15">
        <text:list-item>
          <text:p text:style-name="P394"><text:span text:style-name="T182">Si no s'informa la propietat o paràmetre </text:span><text:span text:style-name="T153">identificador </text:span><text:span text:style-name="T182">llavors es c</text:span><text:span text:style-name="T178">rear</text:span><text:span text:style-name="T182">à</text:span><text:span text:style-name="T178"> el nou expedient a l'arxiu fent una cridada al mètode </text:span><text:span text:style-name="T150">expedientCrear</text:span><text:span text:style-name="T153"> </text:span><text:span text:style-name="T182">amb la infomració de l'expedient passada com a paràmetre</text:span><text:span text:style-name="T178">.</text:span><text:span text:style-name="T183"> Si es detecta que ja està creat llavors continua.</text:span></text:p>
        </text:list-item>
        <text:list-item>
          <text:p text:style-name="P395">Crear els interessats en l'expedient de l'arxiu fent una cridada al mètode <text:span text:style-name="T150">expedientModificar</text:span>.<text:span text:style-name="T222"> Es comprovarà si l'expedient ja conté els interessats.</text:span></text:p>
        </text:list-item>
        <text:list-item>
          <text:p text:style-name="P395"><text:soft-page-break/>Crear una nova carpeta a dins l'expedient de destí que contendrà tots els annexos de l'anotació de registre (aquesta passa és opcional i només es fa si hi ha un paràmetre activat).<text:span text:style-name="T222"> Primer es comprova si la carpeta ja està creada.</text:span></text:p>
        </text:list-item>
        <text:list-item>
          <text:p text:style-name="P394"><text:span text:style-name="T178">Moure el document annex des de l'expedient de l'anotació de registre cap al nou expedient creat emprant el mètode </text:span><text:span text:style-name="T150">documentMoure</text:span><text:span text:style-name="T178">. Com que l'expedient d'origen i el de destí pertanyen a sèries documentals diferents això provocarà una cridada al servei dispatchDocument de l'API REST de l'arxiu.</text:span><text:span text:style-name="T183"> S'ha de comprovar si l'annex s'ha mogut prèviament.</text:span></text:p>
        </text:list-item>
      </text:list>
      <text:p text:style-name="P136"><text:span text:style-name="T209">Com que el mètode pot haver produït un error en el transcurs de les crides anteriors </text:span><text:span text:style-name="T211">internament </text:span><text:span text:style-name="T209">es faran les comprovacions necessàries en cada pas per rependre l'execució del mètode.</text:span><text:span text:style-name="T211"> Així doncs, el backoffice integrador podrà reintentar el processament de l'anotació tornant a invocar el mètode amb els mateixos paràmetres amb l'excepció de la creació de l'expedient, ja que el </text:span><text:span text:style-name="T169">backoffice </text:span><text:span text:style-name="T212">ha de guardar l'identificador dins l'Arxiu de l'expedient per continuar amb el traspàs de la informació de manera que no es creïn nous expedients en cada intent.</text:span></text:p>
      <text:p text:style-name="P81"><text:s/>En els següents apartats es descriuen els possibles paràmetres de configuració i es mostra codi d'exemple per al seu ús.</text:p>
      <text:list xml:id="list181521712946790" text:continue-list="list181519885428959" text:style-name="Outline">
        <text:list-item>
          <text:list>
            <text:list-item>
              <text:list>
                <text:list-item>
                  <text:h text:style-name="P421" text:outline-level="3"><text:bookmark-start text:name="__RefHeading___Toc50906_2907556958"/><text:span text:style-name="T223">P</text:span>aràmetres<text:bookmark-end text:name="__RefHeading___Toc50906_2907556958"/></text:h>
                </text:list-item>
              </text:list>
            </text:list-item>
          </text:list>
        </text:list-item>
      </text:list>
      <text:p text:style-name="P162">La classe <text:span text:style-name="T150">BackofficeArxiuUtils</text:span><text:span text:style-name="T178"> es pot configurar a través dels seus mètodes. Els paràmetres són els següents:</text:span></text:p>
      <text:list xml:id="list3801180864" text:style-name="L16">
        <text:list-item>
          <text:p text:style-name="P466">iArxiuPlugin: </text:p>
          <text:p text:style-name="P467"><text:span text:style-name="T178">És un paràmetre obligatori que s'ha d'especificar a través del constructor </text:span><text:span text:style-name="T150">BackofficeArxiuUtilsImpl(IArxiuPlugin)</text:span><text:span text:style-name="T178"> o a través del métode </text:span><text:span text:style-name="T150">setIArxiuPlugin(IArxiuPlugin)</text:span><text:span text:style-name="T178">. Serveix per tenir referència a la instància de l'API de l'Arxiu i poder fer les crides necessàries per a la creació, modificació i consulta de la informació de l'Arxiu.</text:span></text:p>
        </text:list-item>
        <text:list-item>
          <text:p text:style-name="P466">carpeta:</text:p>
          <text:p text:style-name="P468"><text:span text:style-name="T178">La definició de la carpeta és opcional. Si es fixa un valor per a la carpeta llavors durant les crides es crearà una carpeta on guardar els annexos de l'anotació de registre. És útil quan l'expedient del </text:span><text:span text:style-name="T150">backoffice</text:span><text:span text:style-name="T178"> pot estar relacionat amb diferents anotacions de registre i es vol separar els annexos de les diferents anotacions. Per fixar el nom de la carpeta es pot fer mitjançant el métode </text:span><text:span text:style-name="T150">setCarpeta(String)</text:span><text:span text:style-name="T178">.</text:span></text:p>
        </text:list-item>
        <text:list-item>
          <text:p text:style-name="P466">arxiuPluginListener:</text:p>
          <text:p text:style-name="P468"><text:span text:style-name="T178">A fi de poder controlar les diferents crides que es fan a l'Arxiu la interfície </text:span><text:span text:style-name="T150">BackofficeArxiuUtils</text:span><text:span text:style-name="T178"> permet</text:span><text:span text:style-name="T189"> opcionament</text:span><text:span text:style-name="T178"> fixar una instància que implementi la interfície </text:span><text:span text:style-name="T150">ArxiuPluginListener</text:span><text:span text:style-name="T178">. Cada cop que es cridi a l'Arxiu s'invocarà al mètode </text:span><text:span text:style-name="T150">event</text:span><text:span text:style-name="T178"> de la instància per a que l'aplicació del </text:span><text:span text:style-name="T150">backoffice </text:span><text:span text:style-name="T178">pugui monitoritzar la integració amb l'Arxiu amb la informació dels mètodes invocats, els paràmetres més descriptius, si hi ha hagut error i el temps total de processament en ms. El métode per fixar la instància és </text:span><text:soft-page-break/><text:span text:style-name="T154">setArxiuPluginListener(ArxiuPluginListener) </text:span><text:span text:style-name="T184">i l</text:span><text:span text:style-name="T178">a interfície que ha d'implementar la instància és la següent:</text:span></text:p>
        </text:list-item>
      </text:list>
      <table:table table:name="Table3" table:style-name="Table3">
        <table:table-column table:style-name="Table3.A"/>
        <table:table-row table:style-name="TableLine355683760">
          <table:table-cell table:style-name="Table3.A1" office:value-type="string">
            <text:p text:style-name="P44"><text:span text:style-name="T53">package</text:span><text:span text:style-name="T70"> es.caib.distribucio.backoffice.utils;</text:span></text:p>
            <text:p text:style-name="P180"/>
            <text:p text:style-name="P58"><text:span text:style-name="T53">import</text:span><text:span text:style-name="T70"> java.util.Map;</text:span></text:p>
            <text:p text:style-name="P180"/>
            <text:p text:style-name="P58"><text:span text:style-name="T225">/** </text:span><text:span text:style-name="T227">Interfície</text:span><text:span text:style-name="T225"> a </text:span><text:span text:style-name="T227">implementar</text:span><text:span text:style-name="T225"> </text:span><text:span text:style-name="T227">si</text:span><text:span text:style-name="T225"> </text:span><text:span text:style-name="T227">es</text:span><text:span text:style-name="T225"> </text:span><text:span text:style-name="T227">vol</text:span><text:span text:style-name="T225"> </text:span><text:span text:style-name="T227">estar</text:span><text:span text:style-name="T225"> </text:span><text:span text:style-name="T227">informat</text:span><text:span text:style-name="T225"> </text:span><text:span text:style-name="T227">de</text:span><text:span text:style-name="T225"> </text:span><text:span text:style-name="T227">les</text:span><text:span text:style-name="T225"> </text:span><text:span text:style-name="T227">peticions</text:span><text:span text:style-name="T225"> </text:span><text:span text:style-name="T227">que</text:span><text:span text:style-name="T225"> </text:span><text:span text:style-name="T227">es</text:span><text:span text:style-name="T225"> fan a l'Arxiu</text:span></text:p>
            <text:p text:style-name="P130"><text:s/>* </text:p>
            <text:p text:style-name="P130"><text:s/>*/</text:p>
            <text:p text:style-name="P58"><text:span text:style-name="T53">public</text:span><text:span text:style-name="T70"> </text:span><text:span text:style-name="T53">interface</text:span><text:span text:style-name="T70"> </text:span><text:span text:style-name="T74">ArxiuPluginListener</text:span><text:span text:style-name="T70"> {<text:tab/></text:span></text:p>
            <text:p text:style-name="P88"><text:tab/></text:p>
            <text:p text:style-name="P58"><text:span text:style-name="T70"><text:tab/></text:span><text:span text:style-name="T225">/** </text:span><text:span text:style-name="T227">Mètode</text:span><text:span text:style-name="T225"> per </text:span><text:span text:style-name="T227">notificar</text:span><text:span text:style-name="T225"> </text:span><text:span text:style-name="T227">les</text:span><text:span text:style-name="T225"> </text:span><text:span text:style-name="T227">crides</text:span><text:span text:style-name="T225"> </text:span><text:span text:style-name="T227">fetes</text:span><text:span text:style-name="T225"> a l'arxiu, els </text:span><text:span text:style-name="T227">paràmetres</text:span><text:span text:style-name="T225">, el </text:span><text:span text:style-name="T227">resultat</text:span><text:span text:style-name="T225"> i el </text:span><text:span text:style-name="T227">temps</text:span><text:span text:style-name="T225"> </text:span><text:span text:style-name="T227">de</text:span><text:span text:style-name="T225"> </text:span><text:span text:style-name="T227">la</text:span><text:span text:style-name="T225"> </text:span><text:span text:style-name="T227">petició</text:span></text:p>
            <text:p text:style-name="P130"><text:tab/> * </text:p>
            <text:p text:style-name="P58"><text:span text:style-name="T225"><text:tab/> * </text:span><text:span text:style-name="T229">@param</text:span><text:span text:style-name="T225"> metode</text:span></text:p>
            <text:p text:style-name="P58"><text:span text:style-name="T225"><text:tab/> * <text:tab/><text:tab/><text:tab/></text:span><text:span text:style-name="T227">Mètode</text:span><text:span text:style-name="T225"> </text:span><text:span text:style-name="T227">invocat</text:span></text:p>
            <text:p text:style-name="P58"><text:span text:style-name="T225"><text:tab/> * </text:span><text:span text:style-name="T229">@param</text:span><text:span text:style-name="T225"> parametres</text:span></text:p>
            <text:p text:style-name="P58"><text:span text:style-name="T225"><text:tab/> * <text:tab/><text:tab/><text:tab/></text:span><text:span text:style-name="T227">Paràmetres</text:span><text:span text:style-name="T225"> </text:span><text:span text:style-name="T227">més</text:span><text:span text:style-name="T225"> </text:span><text:span text:style-name="T227">representatius</text:span></text:p>
            <text:p text:style-name="P58"><text:span text:style-name="T225"><text:tab/> * </text:span><text:span text:style-name="T229">@param</text:span><text:span text:style-name="T225"> correcte</text:span></text:p>
            <text:p text:style-name="P58"><text:span text:style-name="T225"><text:tab/> * <text:tab/><text:tab/><text:tab/></text:span><text:span text:style-name="T227">Resultat</text:span><text:span text:style-name="T225"> </text:span><text:span text:style-name="T227">correcte</text:span></text:p>
            <text:p text:style-name="P58"><text:span text:style-name="T225"><text:tab/> * </text:span><text:span text:style-name="T229">@param</text:span><text:span text:style-name="T225"> error</text:span></text:p>
            <text:p text:style-name="P58"><text:span text:style-name="T225"><text:tab/> * <text:tab/><text:tab/><text:tab/></text:span><text:span text:style-name="T227">Descripció</text:span><text:span text:style-name="T225"> </text:span><text:span text:style-name="T227">de</text:span><text:span text:style-name="T225"> l'error </text:span><text:span text:style-name="T227">en</text:span><text:span text:style-name="T225"> </text:span><text:span text:style-name="T227">cas</text:span><text:span text:style-name="T225"> d'error</text:span></text:p>
            <text:p text:style-name="P58"><text:span text:style-name="T225"><text:tab/> * </text:span><text:span text:style-name="T229">@param</text:span><text:span text:style-name="T225"> e</text:span></text:p>
            <text:p text:style-name="P58"><text:span text:style-name="T225"><text:tab/> * <text:tab/><text:tab/><text:tab/></text:span><text:span text:style-name="T227">Excepció</text:span><text:span text:style-name="T225"> </text:span><text:span text:style-name="T227">en</text:span><text:span text:style-name="T225"> </text:span><text:span text:style-name="T227">cas</text:span><text:span text:style-name="T225"> </text:span><text:span text:style-name="T227">de</text:span><text:span text:style-name="T225"> </text:span><text:span text:style-name="T227">produir</text:span><text:span text:style-name="T230">-</text:span><text:span text:style-name="T227">se</text:span><text:span text:style-name="T225"> </text:span><text:span text:style-name="T227">una</text:span><text:span text:style-name="T225"> </text:span><text:span text:style-name="T227">excepció</text:span></text:p>
            <text:p text:style-name="P58"><text:span text:style-name="T225"><text:tab/> * </text:span><text:span text:style-name="T229">@param</text:span><text:span text:style-name="T225"> timeMs</text:span></text:p>
            <text:p text:style-name="P58"><text:span text:style-name="T225"><text:tab/> * <text:tab/><text:tab/><text:tab/></text:span><text:span text:style-name="T227">Temps</text:span><text:span text:style-name="T225"> </text:span><text:span text:style-name="T227">en</text:span><text:span text:style-name="T225"> </text:span><text:span text:style-name="T227">ms</text:span><text:span text:style-name="T225"> </text:span><text:span text:style-name="T227">transcorreguts</text:span><text:span text:style-name="T225"> </text:span><text:span text:style-name="T227">en</text:span><text:span text:style-name="T225"> </text:span><text:span text:style-name="T227">la</text:span><text:span text:style-name="T225"> </text:span><text:span text:style-name="T227">crida</text:span></text:p>
            <text:p text:style-name="P130"><text:tab/> */</text:p>
            <text:p text:style-name="P58"><text:span text:style-name="T70"><text:tab/></text:span><text:span text:style-name="T53">public</text:span><text:span text:style-name="T70"> </text:span><text:span text:style-name="T53">void</text:span><text:span text:style-name="T70"> event(String </text:span><text:span text:style-name="T108">metode</text:span><text:span text:style-name="T70">, Map&lt;String, String&gt; </text:span><text:span text:style-name="T108">parametres</text:span><text:span text:style-name="T70">, </text:span><text:span text:style-name="T53">boolean</text:span><text:span text:style-name="T70"> </text:span><text:span text:style-name="T108">correcte</text:span><text:span text:style-name="T70">, String </text:span><text:span text:style-name="T108">error</text:span><text:span text:style-name="T70">, Exception </text:span><text:span text:style-name="T108">e</text:span><text:span text:style-name="T70">, </text:span><text:span text:style-name="T53">long</text:span><text:span text:style-name="T70"> </text:span><text:span text:style-name="T108">timeMs</text:span><text:span text:style-name="T70">);</text:span></text:p>
            <text:p text:style-name="P180"/>
            <text:p text:style-name="P87">}</text:p>
          </table:table-cell>
        </table:table-row>
      </table:table>
      <text:p text:style-name="P75"/>
      <text:list xml:id="list181520820259346" text:continue-list="list181521712946790" text:style-name="Outline">
        <text:list-item>
          <text:list>
            <text:list-item>
              <text:list>
                <text:list-item>
                  <text:h text:style-name="P421" text:outline-level="3"><text:bookmark-start text:name="__RefHeading___Toc50908_2907556958"/><text:span text:style-name="T223">Ús de </text:span><text:span text:style-name="T260">B</text:span><text:span text:style-name="T261">ackofficeArxiuUtils</text:span><text:bookmark-end text:name="__RefHeading___Toc50908_2907556958"/></text:h>
                </text:list-item>
              </text:list>
            </text:list-item>
          </text:list>
        </text:list-item>
      </text:list>
      <text:p text:style-name="P132"><text:span text:style-name="T231">Per utilitzar la </text:span><text:span text:style-name="T262">classe</text:span><text:span text:style-name="T165"> BackofficeArxiuUtils</text:span><text:span text:style-name="T203"> amb les u</text:span><text:span text:style-name="T207">t</text:span><text:span text:style-name="T203">ilitats per l'A</text:span><text:span text:style-name="T205">r</text:span><text:span text:style-name="T203">xiu</text:span><text:span text:style-name="T155"> </text:span><text:span text:style-name="T231">s'ha de crear un objecte de la classe </text:span><text:span text:style-name="T155">BackofficeArxiuUtilsImpl</text:span><text:span text:style-name="T185"> amb la referència al plugin d'Arxiu </text:span><text:span text:style-name="T155">IPluginArxiu</text:span><text:span text:style-name="T185">, consultar el detall de l'anotació de registre mitjançant la llibreria del client de WS de DISTRIBUCIO </text:span><text:span text:style-name="T155">distribucio-ws-client</text:span><text:span text:style-name="T185"> i invocar el mètode </text:span><text:span text:style-name="T162">crearExpedientAmbAnotacioDeRegistre</text:span><text:span text:style-name="T155"> </text:span><text:span text:style-name="T186">amb la informació de l'expedient a crear o a modificar.</text:span><text:span text:style-name="T187">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00">passades com a paràmetres</text:span><text:span text:style-name="T187">.</text:span><text:span text:style-name="T186">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3"><text:span text:style-name="T186">A</text:span><text:span text:style-name="T178"> continuació es mostra el diagrama de classes pel resultat de la crida.</text:span></text:p>
      <text:p text:style-name="P76"><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53"><text:line-break/></text:span>Fig. <text:sequence text:ref-name="refFig.3" text:name="Fig." text:formula="ooow:Fig.+1" style:num-format="1">4</text:sequence>: Classes per contenir el resultat de la crida al mètode crearExpedientAmbAnotacioDeRegistre.</text:p></draw:text-box></draw:frame><text:soft-page-break/></text:p>
      <text:p text:style-name="P132"><text:span text:style-name="T201">S</text:span><text:span text:style-name="T202">i el mètode falla en la creació de l'expedient o el traspàs dels interessats llavors el resultat contindrà l'error i els annexos no s'hauran traspassat.</text:span></text:p>
      <text:p text:style-name="P132"><text:span text:style-name="T202">Quan es traspassin els diferents annexos s'anirà informant el resultat per cada annex. L'usuari de la llibreria podrà consultar el resultat a partir del seu identificador d'Arxiu uuid original a partir del mètode </text:span><text:span text:style-name="T164">ArxiuResultat.getResultatAnnex(String uuid) </text:span><text:span text:style-name="T202">i obtenir el nou per en l'objecte</text:span><text:span text:style-name="T164"> ArxiuResultatAnnex</text:span><text:span text:style-name="T202"> amb el mètode getIdentificador</text:span><text:span text:style-name="T164">()</text:span><text:span text:style-name="T202">. L'objecte de tipus </text:span><text:span text:style-name="T164">ArxiuResultatAnnex</text:span><text:span text:style-name="T202"> conté l'identificador de l'arxiu si s'ha mogut o existia, l'acció realitzada o la descripció de l'error en el cas que no s'hagi pogut moure. </text:span></text:p>
      <text:p text:style-name="P164"><text:span text:style-name="T197">L'aplicació </text:span><text:span text:style-name="T163">backoffice </text:span><text:span text:style-name="T197">ha d'implementar la seva lògica pròpia per incorporar la informació dels annexos en el seu propi sistema.</text:span></text:p>
      <text:list xml:id="list181519713216836" text:continue-numbering="true" text:style-name="Outline">
        <text:list-item>
          <text:list>
            <text:list-item>
              <text:list>
                <text:list-item>
                  <text:h text:style-name="P421" text:outline-level="3"><text:bookmark-start text:name="__RefHeading___Toc50910_2907556958"/>Exemple Java<text:bookmark-end text:name="__RefHeading___Toc50910_2907556958"/></text:h>
                </text:list-item>
              </text:list>
            </text:list-item>
          </text:list>
        </text:list-item>
      </text:list>
      <text:p text:style-name="P165">En el següent exemple de codi es mostra una im<text:span text:style-name="T393">p</text:span>lementació del WS <text:span text:style-name="T232">de backoffice de DISTRIBUCIO que rep peticions d'anotacions pendents des de DISTRIBUCIO i les processa amb la llibreria d'utilitats. El codi sencer es pot consultar a l' </text:span><text:span text:style-name="T232"><text:bookmark-ref text:reference-format="text" text:ref-name="__RefHeading___Toc60796_1326387233">Annex II: Exemple d'ús de la llibreria de distribucio-backoffice-utils</text:bookmark-ref></text:span><text:span text:style-name="T232">.</text:span></text:p>
      <text:p text:style-name="P166">La classe per a l'exemple és la implementació del WS que rep<text:span text:style-name="T233"> anotacions pendents de registre i té una referència al client del WS d'integració de DISTRIBUCIO per consultar anotacions i una instància del plugin de l'API de l'Arxiu.</text:span></text:p>
      <text:p text:style-name="P30">taula.<text:span text:style-name="T234"> Classe de proves per rebre peticions de WS en el mètode </text:span><text:span text:style-name="T173">comunicarAnotacionsPendents</text:span><text:span text:style-name="T234">.</text:span></text:p>
      <table:table table:name="Table5" table:style-name="Table5">
        <table:table-column table:style-name="Table5.A"/>
        <text:soft-page-break/>
        <table:table-row table:style-name="TableLine355687216">
          <table:table-cell table:style-name="Table5.A1" office:value-type="string">
            <text:p text:style-name="P393"><text:span text:style-name="T379">import </text:span><text:span text:style-name="T94">es.caib.distribucio.logic.intf.service.ws.backoffice.AnotacioRegistreId;</text:span></text:p>
            <text:p text:style-name="P427"/>
            <text:p text:style-name="P392"><text:span text:style-name="T397">@</text:span><text:span text:style-name="T398">Controller</text:span><text:span text:style-name="T402"><text:line-break/></text:span><text:span text:style-name="T397">@RequestMapping</text:span><text:span text:style-name="T93">(</text:span><text:span text:style-name="T391">"/public/backoffice"</text:span><text:span text:style-name="T93">)</text:span><text:span text:style-name="T402"><text:line-break/></text:span><text:span text:style-name="T378">public class </text:span><text:span text:style-name="T93">BackofficeRestController</text:span><text:span text:style-name="T384"> </text:span><text:span text:style-name="T378">extends </text:span><text:span text:style-name="T93">BaseUserController</text:span><text:span text:style-name="T384"> </text:span><text:span text:style-name="T93">{</text:span><text:span text:style-name="T384"><text:line-break/><text:tab/></text:span><text:span text:style-name="T397"><text:line-break/><text:tab/></text:span><text:span text:style-name="T93">BackofficeWsService</text:span><text:span text:style-name="T384"> </text:span><text:span text:style-name="T386">backofficeWs</text:span><text:span text:style-name="T384">;<text:line-break/><text:line-break/><text:tab/></text:span><text:span text:style-name="T397">@RequestMapping</text:span><text:span text:style-name="T93">(value = </text:span><text:span text:style-name="T391">"/comunicarAnotacionsPendents"</text:span><text:span text:style-name="T93">, method =</text:span><text:span text:style-name="T384"> </text:span><text:span text:style-name="T93">RequestMethod.</text:span><text:span text:style-name="T388">POST</text:span><text:span text:style-name="T93">)</text:span><text:span text:style-name="T384"><text:line-break/><text:tab/></text:span><text:span text:style-name="T397">@ResponseBody<text:line-break/><text:tab/></text:span><text:span text:style-name="T378">public </text:span><text:span text:style-name="T93">ResponseEntity&lt;Object&gt;</text:span><text:span text:style-name="T384"> </text:span><text:span text:style-name="T404">comunicarAnotacionsPendents</text:span><text:span text:style-name="T93">(<text:tab/><text:tab/><text:tab/><text:line-break/><text:tab/><text:tab/><text:tab/>HttpServletRequest request,</text:span><text:span text:style-name="T384"><text:line-break/><text:tab/><text:tab/><text:tab/></text:span><text:span text:style-name="T397">@RequestBody</text:span><text:span text:style-name="T93">(required = </text:span><text:span text:style-name="T378">true</text:span><text:span text:style-name="T93">) List&lt;AnotacioRegistreId&gt; ids) {</text:span><text:span text:style-name="T384"><text:line-break/><text:tab/><text:tab/></text:span><text:span text:style-name="T93">...</text:span><text:span text:style-name="T384"><text:line-break/></text:span><text:span text:style-name="T93"><text:tab/>}<text:line-break/>}</text:span></text:p>
          </table:table-cell>
        </table:table-row>
      </table:table>
      <text:p text:style-name="P166"/>
      <text:p text:style-name="P132"><text:span text:style-name="T233">Dins del mètode </text:span><text:span text:style-name="T174">comunicarAnotacionsPendents</text:span><text:span text:style-name="T215"> instancia el client del WS d'integració amb el Backoffice i el plugin de l'API de l'Arxiu</text:span><text:span text:style-name="T217"> i consulta l'anotació del registre d'entrada. En la següent porció de codi es pot veure com es crea l'objecte per a la llibreria d'utilitats del backoffice amb la referència al plugin d'Arxiu.</text:span></text:p>
      <text:p text:style-name="P30"><text:span text:style-name="T197">taula.</text:span><text:span text:style-name="T216"> Creació de l'objecte passant l'API d'Arxiu al constructor.</text:span></text:p>
      <table:table table:name="Table6" table:style-name="Table6">
        <table:table-column table:style-name="Table6.A"/>
        <table:table-row table:style-name="TableLine355684912">
          <table:table-cell table:style-name="Table6.A1" office:value-type="string">
            <text:p text:style-name="P121"><text:span text:style-name="T243">// </text:span><text:span text:style-name="T244">Prepara</text:span><text:span text:style-name="T243"> </text:span><text:span text:style-name="T244">la</text:span><text:span text:style-name="T243"> </text:span><text:span text:style-name="T244">cria</text:span><text:span text:style-name="T243"> a </text:span><text:span text:style-name="T244">la</text:span><text:span text:style-name="T243"> </text:span><text:span text:style-name="T244">llibreria</text:span><text:span text:style-name="T243"> d'utilitats </text:span><text:span text:style-name="T244">pel</text:span><text:span text:style-name="T243"> </text:span><text:span text:style-name="T244">backoffice</text:span><text:span text:style-name="T243"> </text:span><text:span text:style-name="T244">de</text:span><text:span text:style-name="T243"> DISTRIBUCIO</text:span></text:p>
            <text:p text:style-name="P122"><text:span text:style-name="T243">// Constructor </text:span><text:span text:style-name="T244">amb</text:span><text:span text:style-name="T243"> </text:span><text:span text:style-name="T244">la</text:span><text:span text:style-name="T243"> </text:span><text:span text:style-name="T244">referència</text:span><text:span text:style-name="T243"> </text:span><text:span text:style-name="T244">al</text:span><text:span text:style-name="T243"> </text:span><text:span text:style-name="T244">plugin</text:span><text:span text:style-name="T243"> d'Arxiu</text:span></text:p>
            <text:p text:style-name="P122"><text:span text:style-name="T69">BackofficeArxiuUtils </text:span><text:span text:style-name="T107">backoffice</text:span><text:span text:style-name="T115">Arxiu</text:span><text:span text:style-name="T107">Utils</text:span><text:span text:style-name="T69"> = </text:span><text:span text:style-name="T52">new</text:span><text:span text:style-name="T69"> BackofficeArxiuUtilsImpl(getArxiuPlugin());</text:span></text:p>
          </table:table-cell>
        </table:table-row>
      </table:table>
      <text:p text:style-name="P83"/>
      <text:p text:style-name="P82">La llibreria permet fixar el nom de la carpeta on es guardaran els annexos i un objecte de tipus <text:span text:style-name="T150">ArxiuPluginListener</text:span> si es volen rebre notificacions cada cop que es realitzi una acció d'integració amb l'Arxiu. </text:p>
      <text:p text:style-name="P82"/>
      <text:p text:style-name="P132"><text:span text:style-name="T219">taula.</text:span><text:span text:style-name="T217"> Propietat per fixar el nom de la carpeta i l'objecte </text:span><text:span text:style-name="T176">ArxiuPluginListener</text:span><text:span text:style-name="T217">.</text:span></text:p>
      <table:table table:name="Table7" table:style-name="Table7">
        <table:table-column table:style-name="Table7.A"/>
        <table:table-row table:style-name="TableLine355685488">
          <table:table-cell table:style-name="Table7.A1" office:value-type="string">
            <text:p text:style-name="P122"><text:span text:style-name="T243">// </text:span><text:span text:style-name="T244">Afegeix</text:span><text:span text:style-name="T243"> </text:span><text:span text:style-name="T244">la</text:span><text:span text:style-name="T243"> </text:span><text:span text:style-name="T244">instància</text:span><text:span text:style-name="T243"> </text:span><text:span text:style-name="T244">de</text:span><text:span text:style-name="T243"> </text:span><text:span text:style-name="T244">la</text:span><text:span text:style-name="T243"> </text:span><text:span text:style-name="T244">classe</text:span><text:span text:style-name="T243"> </text:span><text:span text:style-name="T244">com</text:span><text:span text:style-name="T243"> a </text:span><text:span text:style-name="T244">escoltador</text:span><text:span text:style-name="T243"> d'events</text:span></text:p>
            <text:p text:style-name="P122"><text:span text:style-name="T107">backofficeArxiuUtils</text:span><text:span text:style-name="T69">.setArxiuPluginListener(</text:span><text:span text:style-name="T52">this</text:span><text:span text:style-name="T69">);</text:span></text:p>
            <text:p text:style-name="P122"><text:span text:style-name="T243">// </text:span><text:span text:style-name="T244">Estableix</text:span><text:span text:style-name="T243"> </text:span><text:span text:style-name="T244">la</text:span><text:span text:style-name="T243"> </text:span><text:span text:style-name="T244">carpeta</text:span><text:span text:style-name="T243"> on </text:span><text:span text:style-name="T244">guardar</text:span><text:span text:style-name="T243"> els </text:span><text:span text:style-name="T244">annexos</text:span><text:span text:style-name="T243"> </text:span><text:span text:style-name="T244">de</text:span><text:span text:style-name="T243"> l'anotació</text:span></text:p>
            <text:p text:style-name="P121"><text:span text:style-name="T107">backoffice</text:span><text:span text:style-name="T115">Arxiu</text:span><text:span text:style-name="T107">Utils</text:span><text:span text:style-name="T69">.setCarpeta(</text:span><text:span text:style-name="T110">anotacio</text:span><text:span text:style-name="T69">.getIdentificador());</text:span></text:p>
          </table:table-cell>
        </table:table-row>
      </table:table>
      <text:p text:style-name="P83"/>
      <text:p text:style-name="P168"><text:span text:style-name="T216">En el cas de l'exemple, la classe que implementa </text:span><text:span text:style-name="T218">la interfície </text:span><text:span text:style-name="T177">ArxiuPluginListener</text:span><text:span text:style-name="T218"> amb el mètode </text:span><text:span text:style-name="T177">event</text:span><text:span text:style-name="T218"> per obtenir la informació de la crida al plugin de l'API de l'Arxiu.</text:span></text:p>
      <table:table table:name="Table8" table:style-name="Table8">
        <table:table-column table:style-name="Table8.A"/>
        <table:table-row table:style-name="TableLine355695856">
          <table:table-cell table:style-name="Table8.A1" office:value-type="string">
            <text:p text:style-name="P118"><text:span text:style-name="T61">public</text:span><text:span text:style-name="T69"> </text:span><text:span text:style-name="T61">class</text:span><text:span text:style-name="T69"> BackofficeWsServiceImpl </text:span><text:span text:style-name="T61">implements</text:span><text:span text:style-name="T69"> </text:span><text:span text:style-name="T82">ArxiuPluginListener</text:span><text:span text:style-name="T69"> {</text:span></text:p>
            <text:p text:style-name="P93">...</text:p>
            <text:p text:style-name="P128"><text:tab/> /** Mètode que la llibreria del backoffice de distribució crida si es </text:p>
            <text:p text:style-name="P123"><text:span text:style-name="T224"><text:tab/> fixa una instància que implementa </text:span><text:span text:style-name="T250">{@link ArxiuPluginListener}</text:span><text:span text:style-name="T224">.</text:span></text:p>
            <text:p text:style-name="P129"><text:tab/> * </text:p>
            <text:p text:style-name="P129"><text:tab/> */</text:p>
            <text:p text:style-name="P119"><text:span text:style-name="T69"><text:tab/></text:span><text:span text:style-name="T131">@Override</text:span></text:p>
            <text:p text:style-name="P119"><text:span text:style-name="T69"><text:tab/></text:span><text:span text:style-name="T61">public</text:span><text:span text:style-name="T69"> </text:span><text:span text:style-name="T61">void</text:span><text:span text:style-name="T69"> </text:span><text:span text:style-name="T81">event</text:span><text:span text:style-name="T69">(</text:span></text:p>
            <text:p text:style-name="P119"><text:span text:style-name="T69"><text:tab/><text:tab/><text:tab/>String </text:span><text:span text:style-name="T107">metode</text:span><text:span text:style-name="T69">, </text:span></text:p>
            <text:p text:style-name="P119"><text:span text:style-name="T69"><text:tab/><text:tab/><text:tab/>Map&lt;String, String&gt; </text:span><text:span text:style-name="T107">parametres</text:span><text:span text:style-name="T69">, </text:span></text:p>
            <text:p text:style-name="P119"><text:span text:style-name="T69"><text:tab/><text:tab/><text:tab/></text:span><text:span text:style-name="T61">boolean</text:span><text:span text:style-name="T69"> </text:span><text:span text:style-name="T107">correcte</text:span><text:span text:style-name="T69">, </text:span></text:p>
            <text:p text:style-name="P119"><text:soft-page-break/><text:span text:style-name="T69"><text:tab/><text:tab/><text:tab/>String </text:span><text:span text:style-name="T107">error</text:span><text:span text:style-name="T69">, </text:span></text:p>
            <text:p text:style-name="P119"><text:span text:style-name="T69"><text:tab/><text:tab/><text:tab/>Exception </text:span><text:span text:style-name="T107">e</text:span><text:span text:style-name="T69">,</text:span></text:p>
            <text:p text:style-name="P119"><text:span text:style-name="T69"><text:tab/><text:tab/><text:tab/></text:span><text:span text:style-name="T61">long</text:span><text:span text:style-name="T69"> </text:span><text:span text:style-name="T107">timeMs</text:span><text:span text:style-name="T69">) {</text:span></text:p>
            <text:p text:style-name="P119"><text:span text:style-name="T69"><text:tab/><text:tab/>StringBuilder </text:span><text:span text:style-name="T107">str</text:span><text:span text:style-name="T69"> = </text:span><text:span text:style-name="T61">new</text:span><text:span text:style-name="T69"> StringBuilder()</text:span></text:p>
            <text:p text:style-name="P119"><text:span text:style-name="T69"><text:tab/><text:tab/><text:tab/><text:tab/>.append(</text:span><text:span text:style-name="T38">"S'ha invocat el mètode \""</text:span><text:span text:style-name="T69">)</text:span></text:p>
            <text:p text:style-name="P119"><text:span text:style-name="T69"><text:tab/><text:tab/><text:tab/><text:tab/>.append(</text:span><text:span text:style-name="T107">metode</text:span><text:span text:style-name="T69">)</text:span></text:p>
            <text:p text:style-name="P119"><text:span text:style-name="T69"><text:tab/><text:tab/><text:tab/><text:tab/>.append(</text:span><text:span text:style-name="T38">"\" amb els paràmetres {"</text:span><text:span text:style-name="T69">);</text:span></text:p>
            <text:p text:style-name="P119"><text:span text:style-name="T69"><text:tab/><text:tab/></text:span><text:span text:style-name="T61">int</text:span><text:span text:style-name="T69"> </text:span><text:span text:style-name="T107">i</text:span><text:span text:style-name="T69"> = 0;</text:span></text:p>
            <text:p text:style-name="P119"><text:span text:style-name="T69"><text:tab/><text:tab/></text:span><text:span text:style-name="T61">for</text:span><text:span text:style-name="T69"> (String </text:span><text:span text:style-name="T107">key</text:span><text:span text:style-name="T69"> : </text:span><text:span text:style-name="T107">parametres</text:span><text:span text:style-name="T69">.keySet()) {</text:span></text:p>
            <text:p text:style-name="P119"><text:span text:style-name="T69"><text:tab/><text:tab/><text:tab/></text:span><text:span text:style-name="T107">str</text:span><text:span text:style-name="T69">.append(</text:span><text:span text:style-name="T107">key</text:span><text:span text:style-name="T69">).append(</text:span><text:span text:style-name="T38">"="</text:span><text:span text:style-name="T69">).append(</text:span><text:span text:style-name="T107">parametres</text:span><text:span text:style-name="T69">.get(</text:span><text:span text:style-name="T107">key</text:span><text:span text:style-name="T69">));</text:span></text:p>
            <text:p text:style-name="P119"><text:span text:style-name="T69"><text:tab/><text:tab/><text:tab/></text:span><text:span text:style-name="T107">i</text:span><text:span text:style-name="T69">++;</text:span></text:p>
            <text:p text:style-name="P119"><text:span text:style-name="T69"><text:tab/><text:tab/><text:tab/></text:span><text:span text:style-name="T61">if</text:span><text:span text:style-name="T69"> (</text:span><text:span text:style-name="T107">i</text:span><text:span text:style-name="T69">&lt;</text:span><text:span text:style-name="T107">parametres</text:span><text:span text:style-name="T69">.size())</text:span></text:p>
            <text:p text:style-name="P119"><text:span text:style-name="T69"><text:tab/><text:tab/><text:tab/><text:tab/></text:span><text:span text:style-name="T107">str</text:span><text:span text:style-name="T69">.append(</text:span><text:span text:style-name="T38">", "</text:span><text:span text:style-name="T69">);</text:span></text:p>
            <text:p text:style-name="P95"><text:tab/><text:tab/>}</text:p>
            <text:p text:style-name="P119"><text:span text:style-name="T69"><text:tab/><text:tab/></text:span><text:span text:style-name="T107">str</text:span><text:span text:style-name="T69">.append(</text:span><text:span text:style-name="T38">"} amb resultat "</text:span><text:span text:style-name="T69">).append(</text:span><text:span text:style-name="T107">correcte</text:span><text:span text:style-name="T69"> ? </text:span><text:span text:style-name="T38">"OK"</text:span><text:span text:style-name="T69"> : </text:span><text:span text:style-name="T38">"KO"</text:span><text:span text:style-name="T69">);</text:span></text:p>
            <text:p text:style-name="P119"><text:span text:style-name="T69"><text:tab/><text:tab/></text:span><text:span text:style-name="T61">if</text:span><text:span text:style-name="T69"> (</text:span><text:span text:style-name="T107">error</text:span><text:span text:style-name="T69"> != </text:span><text:span text:style-name="T61">null</text:span><text:span text:style-name="T69">)</text:span></text:p>
            <text:p text:style-name="P119"><text:span text:style-name="T69"><text:tab/><text:tab/><text:tab/></text:span><text:span text:style-name="T107">str</text:span><text:span text:style-name="T69">.append(</text:span><text:span text:style-name="T38">": "</text:span><text:span text:style-name="T69">).append(</text:span><text:span text:style-name="T107">error</text:span><text:span text:style-name="T69">);</text:span></text:p>
            <text:p text:style-name="P119"><text:span text:style-name="T69"><text:tab/><text:tab/></text:span><text:span text:style-name="T61">if</text:span><text:span text:style-name="T69"> (</text:span><text:span text:style-name="T107">e</text:span><text:span text:style-name="T69"> != </text:span><text:span text:style-name="T61">null</text:span><text:span text:style-name="T69">)</text:span></text:p>
            <text:p text:style-name="P119"><text:span text:style-name="T69"><text:tab/><text:tab/><text:tab/></text:span><text:span text:style-name="T107">str</text:span><text:span text:style-name="T69">.append(</text:span><text:span text:style-name="T38">" "</text:span><text:span text:style-name="T69">).append(</text:span><text:span text:style-name="T107">e</text:span><text:span text:style-name="T69">.getClass()).append(</text:span><text:span text:style-name="T38">" "</text:span><text:span text:style-name="T69">).append(</text:span><text:span text:style-name="T107">e</text:span><text:span text:style-name="T69">.getMessage());</text:span></text:p>
            <text:p text:style-name="P119"><text:span text:style-name="T69"><text:tab/><text:tab/></text:span><text:span text:style-name="T107">str</text:span><text:span text:style-name="T69">.append(</text:span><text:span text:style-name="T38">" "</text:span><text:span text:style-name="T69">).append(</text:span><text:span text:style-name="T107">timeMs</text:span><text:span text:style-name="T69">).append(</text:span><text:span text:style-name="T38">"ms"</text:span><text:span text:style-name="T69">);</text:span></text:p>
            <text:p text:style-name="P95"><text:tab/><text:tab/></text:p>
            <text:p text:style-name="P119"><text:span text:style-name="T69"><text:tab/><text:tab/></text:span><text:span text:style-name="T100">logger</text:span><text:span text:style-name="T69">.debug(</text:span><text:span text:style-name="T107">str</text:span><text:span text:style-name="T69">.toString());</text:span></text:p>
            <text:p text:style-name="P93"><text:tab/>}</text:p>
            <text:p text:style-name="P93">...</text:p>
            <text:p text:style-name="P93">}</text:p>
          </table:table-cell>
        </table:table-row>
      </table:table>
      <text:p text:style-name="P84"/>
      <text:p text:style-name="P169"><text:span text:style-name="T218">E</text:span><text:span text:style-name="T216">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1"><text:span text:style-name="T197">taula.</text:span><text:span text:style-name="T216"> Crida al mètode </text:span><text:span text:style-name="T175">crearExpedientAmbAnotacioRegistre</text:span><text:span text:style-name="T216">.</text:span></text:p>
      <table:table table:name="Table9" table:style-name="Table9">
        <table:table-column table:style-name="Table9.A"/>
        <table:table-row table:style-name="TableLine355693552">
          <table:table-cell table:style-name="Table9.A1" office:value-type="string">
            <text:p text:style-name="P118"><text:span text:style-name="T243">/</text:span><text:span text:style-name="T245">/ Crida a la creació de l'expedient</text:span></text:p>
            <text:p text:style-name="P126"><text:span text:style-name="T69">String </text:span><text:span text:style-name="T107">SERIE_DOCUMENTAL</text:span><text:span text:style-name="T69"> = </text:span><text:span text:style-name="T38">"S0002"</text:span><text:span text:style-name="T69">; </text:span></text:p>
            <text:p text:style-name="P126"><text:span text:style-name="T69">String </text:span><text:span text:style-name="T107">CLASSIFICACIO</text:span><text:span text:style-name="T69"> = </text:span><text:span text:style-name="T38">"000000"</text:span><text:span text:style-name="T69">;</text:span></text:p>
            <text:p text:style-name="P126"><text:span text:style-name="T69">ArxiuResultat </text:span><text:span text:style-name="T107">arxiuResultat</text:span><text:span text:style-name="T69">;</text:span></text:p>
            <text:p text:style-name="P126"><text:span text:style-name="T61">int</text:span><text:span text:style-name="T69"> </text:span><text:span text:style-name="T107">intent</text:span><text:span text:style-name="T69"> = 0;</text:span></text:p>
            <text:p text:style-name="P126"><text:span text:style-name="T69">String </text:span><text:span text:style-name="T107">expedientUuid</text:span><text:span text:style-name="T69"> = </text:span><text:span text:style-name="T61">null</text:span><text:span text:style-name="T69">;</text:span></text:p>
            <text:p text:style-name="P126"><text:span text:style-name="T61">do</text:span><text:span text:style-name="T69"> {</text:span></text:p>
            <text:p text:style-name="P126"><text:span text:style-name="T69"><text:tab/></text:span><text:span text:style-name="T243">// Crida al mètode de creació de la llibreria</text:span></text:p>
            <text:p text:style-name="P126"><text:span text:style-name="T69"><text:tab/></text:span><text:span text:style-name="T107">arxiuResultat</text:span><text:span text:style-name="T69"> = </text:span><text:span text:style-name="T107">BackofficeArxiuUtils</text:span><text:span text:style-name="T69">.crearExpedientAmbAnotacioRegistre(</text:span></text:p>
            <text:p text:style-name="P126"><text:span text:style-name="T69"><text:tab/><text:tab/><text:tab/><text:tab/><text:tab/><text:tab/><text:tab/><text:tab/></text:span><text:span text:style-name="T107">expedientUuid</text:span><text:span text:style-name="T69">,</text:span></text:p>
            <text:p text:style-name="P126"><text:span text:style-name="T69"><text:tab/><text:tab/><text:tab/><text:tab/><text:tab/><text:tab/><text:tab/><text:tab/></text:span><text:span text:style-name="T107">anotacio</text:span><text:span text:style-name="T69">.getIdentificador(),</text:span></text:p>
            <text:p text:style-name="P126"><text:span text:style-name="T69"><text:tab/><text:tab/><text:tab/><text:tab/><text:tab/><text:tab/><text:tab/><text:tab/></text:span><text:span text:style-name="T61">null</text:span><text:span text:style-name="T69">,</text:span></text:p>
            <text:p text:style-name="P126"><text:span text:style-name="T69"><text:tab/><text:tab/><text:tab/><text:tab/><text:tab/><text:tab/><text:tab/><text:tab/>Arrays.</text:span><text:span text:style-name="T83">asList</text:span><text:span text:style-name="T69">(</text:span><text:span text:style-name="T38">"A04019281"</text:span><text:span text:style-name="T69">),</text:span></text:p>
            <text:p text:style-name="P126"><text:span text:style-name="T69"><text:tab/><text:tab/><text:tab/><text:tab/><text:tab/><text:tab/><text:tab/><text:tab/></text:span><text:span text:style-name="T61">new</text:span><text:span text:style-name="T69"> Date(),</text:span></text:p>
            <text:p text:style-name="P126"><text:span text:style-name="T69"><text:tab/><text:tab/><text:tab/><text:tab/><text:tab/><text:tab/><text:tab/><text:tab/></text:span><text:span text:style-name="T107">CLASSIFICACIO</text:span><text:span text:style-name="T69">,</text:span></text:p>
            <text:p text:style-name="P126"><text:span text:style-name="T69"><text:tab/><text:tab/><text:tab/><text:tab/><text:tab/><text:tab/><text:tab/><text:tab/>ExpedientEstatEnumDto.</text:span><text:span text:style-name="T100">OBERT</text:span><text:span text:style-name="T69">,</text:span></text:p>
            <text:p text:style-name="P126"><text:span text:style-name="T69"><text:tab/><text:tab/><text:tab/><text:tab/><text:tab/><text:tab/><text:tab/><text:tab/></text:span><text:span text:style-name="T107">SERIE_DOCUMENTAL</text:span><text:span text:style-name="T69">,</text:span></text:p>
            <text:p text:style-name="P126"><text:span text:style-name="T69"><text:tab/><text:tab/><text:tab/><text:tab/><text:tab/><text:tab/><text:tab/><text:tab/></text:span><text:span text:style-name="T107">anotacio</text:span><text:span text:style-name="T69">);</text:span></text:p>
            <text:p text:style-name="P126"><text:span text:style-name="T69"><text:tab/></text:span><text:span text:style-name="T107">expedientUuid</text:span><text:span text:style-name="T69"> = </text:span><text:span text:style-name="T107">arxiuResultat</text:span><text:span text:style-name="T69">.getIdentificadorExpedient();</text:span></text:p>
            <text:p text:style-name="P126"><text:span text:style-name="T69"><text:tab/></text:span><text:span text:style-name="T243">// Imprimeix el resultat per pantalla</text:span></text:p>
            <text:p text:style-name="P126"><text:span text:style-name="T69"><text:tab/></text:span><text:span text:style-name="T61">this</text:span><text:span text:style-name="T69">.logResultat(</text:span></text:p>
            <text:p text:style-name="P126"><text:span text:style-name="T69"><text:tab/><text:tab/><text:tab/></text:span><text:span text:style-name="T38">"Resultat de la crida "</text:span><text:span text:style-name="T69"> + </text:span><text:span text:style-name="T107">intent</text:span><text:span text:style-name="T69">++ + </text:span><text:span text:style-name="T38">" crearExpedientAmbAnotacioRegistre per l'expedient"</text:span><text:span text:style-name="T69"> + </text:span><text:span text:style-name="T107">anotacio</text:span><text:span text:style-name="T69">.getExpedientNumero(),</text:span></text:p>
            <text:p text:style-name="P126"><text:span text:style-name="T69"><text:tab/><text:tab/><text:tab/></text:span><text:span text:style-name="T107">arxiuResultat</text:span><text:span text:style-name="T69">);<text:tab/><text:tab/><text:tab/><text:tab/><text:tab/></text:span></text:p>
            <text:p text:style-name="P44"><text:span text:style-name="T84">} </text:span><text:span text:style-name="T62">while</text:span><text:span text:style-name="T84">(</text:span><text:span text:style-name="T111">arxiuResultat</text:span><text:span text:style-name="T84">.getErrorCodi() !=</text:span><text:span text:style-name="T85"> Distri</text:span><text:span text:style-name="T86">bucioArxiuError.</text:span><text:span text:style-name="T101">NO_ERROR</text:span><text:span text:style-name="T86"> &amp;&amp; </text:span><text:span text:style-name="T113">in</text:span><text:span text:style-name="T114">tent</text:span><text:span text:style-name="T87"> &lt; 10);<text:tab/></text:span></text:p>
          </table:table-cell>
        </table:table-row>
      </table:table>
      <text:p text:style-name="P85"/>
      <text:p text:style-name="P169"><text:span text:style-name="T216">A mode informatiu a l'exemple s'imprimeix als logs el contingut de l'objecte </text:span><text:span text:style-name="T175">arxiuResultat</text:span><text:span text:style-name="T216"> amb el mètode </text:span><text:span text:style-name="T175">logResultat</text:span><text:span text:style-name="T216">.</text:span></text:p>
      <table:table table:name="Table10" table:style-name="Table10">
        <table:table-column table:style-name="Table10.A"/>
        <table:table-row table:style-name="TableLine355694128">
          <table:table-cell table:style-name="Table10.A1" office:value-type="string">
            <text:p text:style-name="P124"><text:span text:style-name="T61">private</text:span><text:span text:style-name="T69"> </text:span><text:span text:style-name="T61">void</text:span><text:span text:style-name="T69"> </text:span><text:span text:style-name="T81">logResultat</text:span><text:span text:style-name="T69">(String </text:span><text:span text:style-name="T107">descripcio</text:span><text:span text:style-name="T69">, ArxiuResultat </text:span><text:span text:style-name="T107">arxiuResultat</text:span><text:span text:style-name="T69">) {</text:span></text:p>
            <text:p text:style-name="P126"><text:span text:style-name="T69"><text:tab/></text:span><text:span text:style-name="T100">logger</text:span><text:span text:style-name="T69">.debug(</text:span><text:span text:style-name="T107">descripcio</text:span><text:span text:style-name="T69">);</text:span></text:p>
            <text:p text:style-name="P126"><text:soft-page-break/><text:span text:style-name="T69"><text:tab/></text:span><text:span text:style-name="T243">// Resultat a nivell d'expedient</text:span></text:p>
            <text:p text:style-name="P126"><text:span text:style-name="T69"><text:tab/></text:span><text:span text:style-name="T100">logger</text:span><text:span text:style-name="T69">.debug(</text:span><text:span text:style-name="T38">"- uuid: "</text:span><text:span text:style-name="T69"> + </text:span><text:span text:style-name="T107">arxiuResultat</text:span><text:span text:style-name="T69">.getIdentificadorExpedient());</text:span></text:p>
            <text:p text:style-name="P126"><text:span text:style-name="T69"><text:tab/></text:span><text:span text:style-name="T100">logger</text:span><text:span text:style-name="T69">.debug(</text:span><text:span text:style-name="T38">"- accio: "</text:span><text:span text:style-name="T69"> + </text:span><text:span text:style-name="T107">arxiuResultat</text:span><text:span text:style-name="T69">.getAccio());</text:span></text:p>
            <text:p text:style-name="P126"><text:span text:style-name="T69"><text:tab/></text:span><text:span text:style-name="T100">logger</text:span><text:span text:style-name="T69">.debug(</text:span><text:span text:style-name="T38">"- errorCodi: "</text:span><text:span text:style-name="T69"> + </text:span><text:span text:style-name="T107">arxiuResultat</text:span><text:span text:style-name="T69">.getErrorCodi());</text:span></text:p>
            <text:p text:style-name="P126"><text:span text:style-name="T69"><text:tab/></text:span><text:span text:style-name="T100">logger</text:span><text:span text:style-name="T69">.debug(</text:span><text:span text:style-name="T38">"- errorMessage: "</text:span><text:span text:style-name="T69"> + </text:span><text:span text:style-name="T107">arxiuResultat</text:span><text:span text:style-name="T69">.getErrorMessage());</text:span></text:p>
            <text:p text:style-name="P126"><text:span text:style-name="T69"><text:tab/></text:span><text:span text:style-name="T100">logger</text:span><text:span text:style-name="T69">.debug(</text:span><text:span text:style-name="T38">"- excepcio: "</text:span><text:span text:style-name="T69"> + (</text:span><text:span text:style-name="T107">arxiuResultat</text:span><text:span text:style-name="T69">.getException() != </text:span><text:span text:style-name="T61">null</text:span><text:span text:style-name="T69">? </text:span><text:span text:style-name="T107">arxiuResultat</text:span><text:span text:style-name="T69">.getException().getClass() + </text:span><text:span text:style-name="T38">" "</text:span><text:span text:style-name="T69"> + </text:span><text:span text:style-name="T107">arxiuResultat</text:span><text:span text:style-name="T69">.getException().getMessage() : <text:s/></text:span><text:span text:style-name="T38">" - "</text:span><text:span text:style-name="T69">));</text:span></text:p>
            <text:p text:style-name="P182"/>
            <text:p text:style-name="P126"><text:span text:style-name="T69"><text:tab/></text:span><text:span text:style-name="T243">// Resultat pels annexos</text:span></text:p>
            <text:p text:style-name="P126"><text:span text:style-name="T69"><text:tab/>List&lt;ArxiuResultatAnnex&gt; </text:span><text:span text:style-name="T107">resultatAnnexos</text:span><text:span text:style-name="T69"> = </text:span><text:span text:style-name="T107">arxiuResultat</text:span><text:span text:style-name="T69">.getResultatAnnexos(); </text:span></text:p>
            <text:p text:style-name="P126"><text:span text:style-name="T69"><text:tab/></text:span><text:span text:style-name="T100">logger</text:span><text:span text:style-name="T69">.debug(</text:span><text:span text:style-name="T38">" - Resultat dels "</text:span><text:span text:style-name="T69"> + </text:span><text:span text:style-name="T107">resultatAnnexos</text:span><text:span text:style-name="T69">.size() + </text:span><text:span text:style-name="T38">" annexos:"</text:span><text:span text:style-name="T69">);</text:span></text:p>
            <text:p text:style-name="P126"><text:span text:style-name="T69"><text:tab/></text:span><text:span text:style-name="T61">for</text:span><text:span text:style-name="T69"> (ArxiuResultatAnnex </text:span><text:span text:style-name="T107">resultatAnnex</text:span><text:span text:style-name="T69"> : </text:span><text:span text:style-name="T107">resultatAnnexos</text:span><text:span text:style-name="T69">) {</text:span></text:p>
            <text:p text:style-name="P126"><text:span text:style-name="T69"><text:tab/><text:tab/></text:span><text:span text:style-name="T100">logger</text:span><text:span text:style-name="T69">.debug(</text:span><text:span text:style-name="T38">"\b- uuid: "</text:span><text:span text:style-name="T69"> + </text:span><text:span text:style-name="T107">resultatAnnex</text:span><text:span text:style-name="T69">.getIdentificadorAnnex());</text:span></text:p>
            <text:p text:style-name="P126"><text:span text:style-name="T69"><text:tab/><text:tab/></text:span><text:span text:style-name="T100">logger</text:span><text:span text:style-name="T69">.debug(</text:span><text:span text:style-name="T38">"\\b- accio: "</text:span><text:span text:style-name="T69"> + </text:span><text:span text:style-name="T107">resultatAnnex</text:span><text:span text:style-name="T69">.getAccio());</text:span></text:p>
            <text:p text:style-name="P126"><text:span text:style-name="T69"><text:tab/><text:tab/></text:span><text:span text:style-name="T100">logger</text:span><text:span text:style-name="T69">.debug(</text:span><text:span text:style-name="T38">"\\b- errorCodi: "</text:span><text:span text:style-name="T69"> + </text:span><text:span text:style-name="T107">resultatAnnex</text:span><text:span text:style-name="T69">.getErrorCodi());</text:span></text:p>
            <text:p text:style-name="P126"><text:span text:style-name="T69"><text:tab/><text:tab/></text:span><text:span text:style-name="T100">logger</text:span><text:span text:style-name="T69">.debug(</text:span><text:span text:style-name="T38">"\\b- errorMessage: "</text:span><text:span text:style-name="T69"> + </text:span><text:span text:style-name="T107">resultatAnnex</text:span><text:span text:style-name="T69">.getErrorMessage());</text:span></text:p>
            <text:p text:style-name="P126"><text:span text:style-name="T69"><text:tab/><text:tab/></text:span><text:span text:style-name="T100">logger</text:span><text:span text:style-name="T69">.debug(</text:span><text:span text:style-name="T38">"\\b- excepcio: "</text:span><text:span text:style-name="T69"> + (</text:span><text:span text:style-name="T107">resultatAnnex</text:span><text:span text:style-name="T69">.getException() != </text:span><text:span text:style-name="T61">null</text:span><text:span text:style-name="T69">? </text:span><text:span text:style-name="T107">resultatAnnex</text:span><text:span text:style-name="T69">.getException().getClass() + </text:span><text:span text:style-name="T38">" "</text:span><text:span text:style-name="T69"> + </text:span><text:span text:style-name="T107">resultatAnnex</text:span><text:span text:style-name="T69">.getException().getMessage() : <text:s/></text:span><text:span text:style-name="T38">" - "</text:span><text:span text:style-name="T69">));</text:span></text:p>
            <text:p text:style-name="P100"><text:tab/>}</text:p>
            <text:p text:style-name="P98">}</text:p>
          </table:table-cell>
        </table:table-row>
      </table:table>
      <text:p text:style-name="P85"/>
      <text:p text:style-name="P85">En aquest punt ja s'ha utilitzat la llibreria d'integració per moure continguts i a l'Arxiu s'haurien de poder veure els expedients d'origen i final</text:p>
      <text:p text:style-name="P85"/>
      <text:p text:style-name="P85"><draw:frame draw:style-name="fr1" draw:name="Frame3" text:anchor-type="paragraph" svg:width="17cm" draw:z-index="55"><draw:text-box fo:min-height="9.73cm"><text:p text:style-name="Fig."><draw:frame draw:style-name="fr6" draw:name="Image4" text:anchor-type="as-char" svg:width="17cm" style:rel-width="100%" svg:height="9.73cm" style:rel-height="scale" draw:z-index="56"><draw:image xlink:href="Pictures/100000000000042F000002651464A6ADC9A970F9.png" xlink:type="simple" xlink:show="embed" xlink:actuate="onLoad" draw:mime-type="image/png"/></draw:frame><text:span text:style-name="T253"><text:line-break/></text:span>Fig. <text:sequence text:ref-name="refFig.4" text:name="Fig." text:formula="ooow:Fig.+1" style:num-format="1">5</text:sequence>: Expedient origen a l'Arxiu.</text:p></draw:text-box></draw:frame></text:p>
      <text:p text:style-name="P85"><draw:frame draw:style-name="fr1" draw:name="Frame4" text:anchor-type="paragraph" svg:width="17cm" draw:z-index="42"><draw:text-box fo:min-height="9.73cm"><text:p text:style-name="Fig."><draw:frame draw:style-name="fr6" draw:name="Image5" text:anchor-type="as-char" svg:width="17cm" style:rel-width="100%" svg:height="9.73cm" style:rel-height="scale" draw:z-index="43"><draw:image xlink:href="Pictures/100000000000042F00000265CF3198E9D454B4E5.png" xlink:type="simple" xlink:show="embed" xlink:actuate="onLoad" draw:mime-type="image/png"/></draw:frame><text:span text:style-name="T253"><text:line-break/></text:span>Fig. <text:sequence text:ref-name="refFig.5" text:name="Fig." text:formula="ooow:Fig.+1" style:num-format="1">6</text:sequence>: Expedient després de la crida al mètode de la llibreria d'utilitats<text:span text:style-name="T254">.</text:span></text:p></draw:text-box></draw:frame><text:soft-page-break/></text:p>
      <text:p text:style-name="P170">Per acabar es mostra la porció de codi que consulta el nou expedient i comunica l'estat a l'aplicació de DISTRIBUCIO<text:span text:style-name="T252"> segons el codi del resultat.</text:span></text:p>
      <table:table table:name="Table11" table:style-name="Table11">
        <table:table-column table:style-name="Table11.A"/>
        <table:table-row table:style-name="TableLine355693264">
          <table:table-cell table:style-name="Table11.A1" office:value-type="string">
            <text:p text:style-name="P118"><text:span text:style-name="T243">// </text:span><text:span text:style-name="T244">Consultem</text:span><text:span text:style-name="T243"> el </text:span><text:span text:style-name="T244">nou</text:span><text:span text:style-name="T243"> expedient a l'Arxiu</text:span></text:p>
            <text:p text:style-name="P119"><text:span text:style-name="T61">if</text:span><text:span text:style-name="T69"> (</text:span><text:span text:style-name="T107">expedientUuid</text:span><text:span text:style-name="T69"> != </text:span><text:span text:style-name="T61">null</text:span><text:span text:style-name="T69">) {</text:span></text:p>
            <text:p text:style-name="P119"><text:span text:style-name="T69"><text:tab/>Expedient </text:span><text:span text:style-name="T107">expedientDetalls</text:span><text:span text:style-name="T69"> = getArxiuPlugin().expedientDetalls(</text:span><text:span text:style-name="T107">arxiuResultat</text:span><text:span text:style-name="T69">.getIdentificadorExpedient(), </text:span><text:span text:style-name="T61">null</text:span><text:span text:style-name="T69">);</text:span></text:p>
            <text:p text:style-name="P119"><text:span text:style-name="T69"><text:tab/></text:span><text:span text:style-name="T100">logger</text:span><text:span text:style-name="T69">.debug(</text:span><text:span text:style-name="T38">"S'ha creat l'expedient \""</text:span><text:span text:style-name="T69"> + </text:span><text:span text:style-name="T107">expedientDetalls</text:span><text:span text:style-name="T69">.getNom() + </text:span><text:span text:style-name="T38">"\" amb id="</text:span><text:span text:style-name="T69"> + </text:span><text:span text:style-name="T107">expedientDetalls</text:span><text:span text:style-name="T69">.getIdentificador() + </text:span><text:span text:style-name="T38">" per l'anotació "</text:span><text:span text:style-name="T69"> + </text:span><text:span text:style-name="T107">anotacio</text:span><text:span text:style-name="T69">.getIdentificador() + </text:span><text:span text:style-name="T38">" amb els següents continguts:"</text:span><text:span text:style-name="T69">);</text:span></text:p>
            <text:p text:style-name="P119"><text:span text:style-name="T69"><text:tab/></text:span><text:span text:style-name="T61">for</text:span><text:span text:style-name="T69"> (ContingutArxiu </text:span><text:span text:style-name="T107">contingut</text:span><text:span text:style-name="T69"> : </text:span><text:span text:style-name="T107">expedientDetalls</text:span><text:span text:style-name="T69">.getContinguts()) {</text:span></text:p>
            <text:p text:style-name="P119"><text:span text:style-name="T69"><text:tab/><text:tab/></text:span><text:span text:style-name="T100">logger</text:span><text:span text:style-name="T69">.debug(</text:span><text:span text:style-name="T38">"- "</text:span><text:span text:style-name="T69"> + </text:span><text:span text:style-name="T107">contingut</text:span><text:span text:style-name="T69">.getIdentificador() + </text:span><text:span text:style-name="T38">" "</text:span><text:span text:style-name="T69"> + </text:span><text:span text:style-name="T107">contingut</text:span><text:span text:style-name="T69">.getNom() + </text:span><text:span text:style-name="T38">" amb "</text:span><text:span text:style-name="T69"> + (</text:span><text:span text:style-name="T107">contingut</text:span><text:span text:style-name="T69">.getFirmes() != </text:span><text:span text:style-name="T61">null</text:span><text:span text:style-name="T69">? </text:span><text:span text:style-name="T107">contingut</text:span><text:span text:style-name="T69">.getFirmes().size() : 0) + </text:span><text:span text:style-name="T38">" firmes."</text:span><text:span text:style-name="T69">);</text:span></text:p>
            <text:p text:style-name="P95"><text:tab/>}</text:p>
            <text:p text:style-name="P119"><text:span text:style-name="T69">} </text:span><text:span text:style-name="T61">else</text:span><text:span text:style-name="T69"> {</text:span></text:p>
            <text:p text:style-name="P119"><text:span text:style-name="T69"><text:tab/></text:span><text:span text:style-name="T100">logger</text:span><text:span text:style-name="T69">.warn(</text:span><text:span text:style-name="T38">"L'expedient no s'ha pogut crear per l'anotació "</text:span><text:span text:style-name="T69"> + </text:span><text:span text:style-name="T107">anotacio</text:span><text:span text:style-name="T69">.getIdentificador());</text:span></text:p>
            <text:p text:style-name="P95">}</text:p>
            <text:p text:style-name="P119"><text:span text:style-name="T243">// </text:span><text:span text:style-name="T244">Es</text:span><text:span text:style-name="T243"> </text:span><text:span text:style-name="T244">comunica</text:span><text:span text:style-name="T243"> el </text:span><text:span text:style-name="T244">resultat</text:span><text:span text:style-name="T243"> a DISTRIBUCIO</text:span></text:p>
            <text:p text:style-name="P119"><text:span text:style-name="T61">switch</text:span><text:span text:style-name="T69">(</text:span><text:span text:style-name="T107">arxiuResultat</text:span><text:span text:style-name="T69">.getErrorCodi()) {</text:span></text:p>
            <text:p text:style-name="P119"><text:span text:style-name="T69"><text:tab/></text:span><text:span text:style-name="T61">case</text:span><text:span text:style-name="T69"> 0:</text:span></text:p>
            <text:p text:style-name="P119"><text:span text:style-name="T69"><text:tab/><text:tab/></text:span><text:span text:style-name="T107">backofficeClient</text:span><text:span text:style-name="T69">.canviEstat(</text:span><text:span text:style-name="T107">idWs</text:span><text:span text:style-name="T69">, es.caib.distribucio.ws.backofficeintegracio.Estat.</text:span><text:span text:style-name="T100">PROCESSADA</text:span><text:span text:style-name="T69">, </text:span><text:span text:style-name="T38">"Processada"</text:span><text:span text:style-name="T69">);</text:span></text:p>
            <text:p text:style-name="P119"><text:span text:style-name="T69"><text:tab/><text:tab/></text:span><text:span text:style-name="T61">break</text:span><text:span text:style-name="T69">;</text:span></text:p>
            <text:p text:style-name="P119"><text:span text:style-name="T69"><text:tab/></text:span><text:span text:style-name="T61">default</text:span><text:span text:style-name="T69">:</text:span></text:p>
            <text:p text:style-name="P119"><text:span text:style-name="T69"><text:tab/><text:tab/></text:span><text:span text:style-name="T107">backofficeClient</text:span><text:span text:style-name="T69">.canviEstat(</text:span><text:span text:style-name="T107">idWs</text:span><text:span text:style-name="T69">, es.caib.distribucio.ws.backofficeintegracio.Estat.</text:span><text:span text:style-name="T100">ERROR</text:span><text:span text:style-name="T69">, </text:span><text:span text:style-name="T107">arxiuResultat</text:span><text:span text:style-name="T69">.getErrorCodi()</text:span><text:span text:style-name="T89"> + </text:span><text:span text:style-name="T41">" "</text:span><text:span text:style-name="T89"> + </text:span><text:span text:style-name="T107">arxiuResultat</text:span><text:span text:style-name="T69">.getErrorMessage());</text:span></text:p>
            <text:p text:style-name="P119"><text:span text:style-name="T69"><text:tab/><text:tab/></text:span><text:span text:style-name="T61">break</text:span><text:span text:style-name="T69">;</text:span></text:p>
            <text:p text:style-name="P94">}</text:p>
          </table:table-cell>
        </table:table-row>
      </table:table>
      <text:p text:style-name="P80"/>
      <text:list xml:id="list181521737093203" text:continue-numbering="true" text:style-name="Outline">
        <text:list-item>
          <text:list>
            <text:list-item>
              <text:h text:style-name="P413" text:outline-level="2"><text:bookmark-start text:name="__RefHeading___Toc50910_29075569581"/>Utilitats per Sistra2<text:bookmark-end text:name="__RefHeading___Toc50910_29075569581"/></text:h>
            </text:list-item>
          </text:list>
        </text:list-item>
      </text:list>
      <text:p text:style-name="P178"><text:span text:style-name="T263">S</text:span><text:span text:style-name="T264">erà un cas comú que els tràmits telemàtics de Sistra2 arribin als backoffices de Distribucio amb documents tècnics de pagaments o formularis com annexos. Aquests documents contenen un XML </text:span><text:soft-page-break/><text:span text:style-name="T264">definit pels esquemes XSD corresponents de Sistra2 i contenen les dades d'un formulari o d'un pagament. A fi de facilitar el l</text:span><text:span text:style-name="T265">a </text:span><text:span text:style-name="T264">interpretació </text:span><text:span text:style-name="T265">del </text:span><text:span text:style-name="T264">contingut per part dels backoffices de Distribucio s'ha creat la classe d'utilitats </text:span><text:span text:style-name="T171">BackofficeSistra2Utils</text:span><text:span text:style-name="T206"> amb els mètodes per extreure la informació dels documents tècnics XML. En aquest apartat es descriu l'ús de la llibreria per aquest cas i un exemple Java.</text:span></text:p>
      <text:list xml:id="list181521862411501" text:continue-numbering="true" text:style-name="Outline">
        <text:list-item>
          <text:list>
            <text:list-item>
              <text:list>
                <text:list-item>
                  <text:h text:style-name="P422" text:outline-level="3"><text:bookmark-start text:name="__RefHeading___Toc366109_93553639"/><text:span text:style-name="T259">Ús de </text:span><text:span text:style-name="T156">BackofficeSistra2Utils</text:span><text:bookmark-end text:name="__RefHeading___Toc366109_93553639"/></text:h>
                </text:list-item>
              </text:list>
            </text:list-item>
          </text:list>
        </text:list-item>
      </text:list>
      <text:p text:style-name="P172"><text:span text:style-name="T231">Per utilitzar la </text:span><text:span text:style-name="T262">classe</text:span><text:span text:style-name="T165"> BackofficeS</text:span><text:span text:style-name="T166">istra2U</text:span><text:span text:style-name="T165">tils</text:span><text:span text:style-name="T203"> amb les u</text:span><text:span text:style-name="T207">t</text:span><text:span text:style-name="T203">ilitats</text:span><text:span text:style-name="T207"> per Sistra2</text:span><text:span text:style-name="T203"> </text:span><text:span text:style-name="T266">s'ha de crear un objecte de la classe </text:span><text:span text:style-name="T155">Backoffice</text:span><text:span text:style-name="T167">S</text:span><text:span text:style-name="T166">istra2</text:span><text:span text:style-name="T155">UtilsImpl</text:span><text:span text:style-name="T186">.</text:span><text:span text:style-name="T190"> Aquesta classe no precisa de configurar i conté 2 mètodes per llegir el contingut d'un </text:span><text:span text:style-name="T192">document </text:span><text:span text:style-name="T190">annex i retornar la informació d'un formulari o d'un pagament. Els mètodes que conté són:</text:span></text:p>
      <text:list xml:id="list4230469708" text:style-name="L17">
        <text:list-item>
          <text:p text:style-name="P469"><text:span text:style-name="T166">F</text:span><text:span text:style-name="T168">ormulario</text:span><text:span text:style-name="T157"> parseXml</text:span><text:span text:style-name="T158">Formulario</text:span><text:span text:style-name="T157">(</text:span><text:span text:style-name="T166">b</text:span><text:span text:style-name="T170">yte[]</text:span><text:span text:style-name="T157">) </text:span><text:span text:style-name="T190">: Processa el contingut </text:span><text:span text:style-name="T192">en bytes </text:span><text:span text:style-name="T190">de</text:span><text:span text:style-name="T192">l document annex del formulari </text:span><text:span text:style-name="T190">i retorna les dades del pagament en forma d'objecte</text:span><text:span text:style-name="T157"> </text:span><text:span text:style-name="T168">Formulario</text:span><text:span text:style-name="T190">.</text:span></text:p>
        </text:list-item>
        <text:list-item>
          <text:p text:style-name="P469"><text:span text:style-name="T157">Pago parseXmlPago(</text:span><text:span text:style-name="T166">b</text:span><text:span text:style-name="T170">yte[]</text:span><text:span text:style-name="T157">) </text:span><text:span text:style-name="T190">: Processa el contingut </text:span><text:span text:style-name="T192">en bytes del document</text:span><text:span text:style-name="T207"> </text:span><text:span text:style-name="T190">annex </text:span><text:span text:style-name="T192">del pagament </text:span><text:span text:style-name="T190">i retorna les dades del pagament en forma d'objecte</text:span><text:span text:style-name="T157"> Pago</text:span><text:span text:style-name="T190">.</text:span><text:span text:style-name="T157"> </text:span></text:p>
        </text:list-item>
      </text:list>
      <text:p text:style-name="P172"><text:span text:style-name="T201">T</text:span><text:span text:style-name="T208">ant la classe </text:span><text:span text:style-name="T168">Formulario</text:span><text:span text:style-name="T208"> com la classe </text:span><text:span text:style-name="T168">Pago</text:span><text:span text:style-name="T208"> estan generades a partir dels esquemes XSD de les dades XML provinents de Sistra i els mètodes serveixen per transformar les dades XML a objectes que puguin ser tractats pel backoffice</text:span><text:span text:style-name="T187">.</text:span></text:p>
      <text:p text:style-name="P77"><draw:frame draw:style-name="fr1" draw:name="Frame6" text:anchor-type="paragraph" svg:width="17cm" draw:z-index="38"><draw:text-box fo:min-height="11.411cm"><text:p text:style-name="Fig."><draw:frame draw:style-name="fr5" draw:name="Image7" text:anchor-type="as-char" svg:width="17cm" style:rel-width="100%" svg:height="11.409cm" style:rel-height="scale" draw:z-index="39"><draw:image xlink:href="Pictures/100000010000032A0000021FB5ACBC547137B64A.png" xlink:type="simple" xlink:show="embed" xlink:actuate="onLoad" draw:mime-type="image/png"/></draw:frame><text:span text:style-name="T253"><text:line-break/></text:span>Fig. <text:sequence text:ref-name="refFig.6" text:name="Fig." text:formula="ooow:Fig.+1" style:num-format="1">7</text:sequence>: Diagrama de classes de BackofficeSistra2Utils i les classes de Formulario i Pago que retorna.</text:p></draw:text-box></draw:frame></text:p>
      <text:p text:style-name="P173"><text:soft-page-break/><text:span text:style-name="T206">E</text:span><text:span text:style-name="T197">ls mètodes reben </text:span><text:span text:style-name="T213">el contingut en </text:span><text:span text:style-name="T172">byte[]</text:span><text:span text:style-name="T197"> com a paràmetre d'entrada i retornen un objecte </text:span><text:span text:style-name="T163">Formulario</text:span><text:span text:style-name="T197"> o </text:span><text:span text:style-name="T163">Pago</text:span><text:span text:style-name="T197"> segons el mètode invocat. Cal controlar qualsevol excepció que es pugui produir quan el contingut de l'annex no és vàlid i el parseig de l'XML falla.</text:span></text:p>
      <text:list xml:id="list181520431710752" text:continue-list="list181521862411501" text:style-name="Outline">
        <text:list-item>
          <text:list>
            <text:list-item>
              <text:list>
                <text:list-item>
                  <text:h text:style-name="P423" text:outline-level="3"><text:bookmark-start text:name="__RefHeading___Toc366111_93553639"/>Exemple Java<text:bookmark-end text:name="__RefHeading___Toc366111_93553639"/></text:h>
                </text:list-item>
              </text:list>
            </text:list-item>
          </text:list>
        </text:list-item>
      </text:list>
      <text:p text:style-name="P177">En el següent exemple de codi es mostra un exemple de crida al mètode de conversió de l'annex a dades de formulari.</text:p>
      <text:p text:style-name="P174"><text:span text:style-name="T47">taula.</text:span><text:span text:style-name="T235"> </text:span><text:span text:style-name="T240">C</text:span><text:span text:style-name="T241">onversió d'un annex corresponent a un document tècnic d'un formulari XML</text:span><text:span text:style-name="T235">.</text:span></text:p>
      <table:table table:name="Table12" table:style-name="Table12">
        <table:table-column table:style-name="Table12.A"/>
        <table:table-row table:style-name="TableLine355688656">
          <table:table-cell table:style-name="Table12.A1" office:value-type="string">
            <text:p text:style-name="P96"/>
            <text:p text:style-name="P184">// Inicialitza la classe d'utilitats de Sistra2</text:p>
            <text:p text:style-name="P125"><text:span text:style-name="T69">BackofficeSistra2Utils </text:span><text:span text:style-name="T107">sistraUtils</text:span><text:span text:style-name="T69"> = </text:span><text:span text:style-name="T61">new</text:span><text:span text:style-name="T69"> BackofficeSistra2UtilsImpl();</text:span></text:p>
            <text:p text:style-name="P181"/>
            <text:p text:style-name="P183">// Simula l'annex</text:p>
            <text:p text:style-name="P56"><text:span text:style-name="T62">byte</text:span><text:span text:style-name="T84">[] </text:span><text:span text:style-name="T112">contingut</text:span><text:span text:style-name="T84"> = Files.</text:span><text:span text:style-name="T88">readAllBytes</text:span><text:span text:style-name="T84">(Paths.</text:span><text:span text:style-name="T88">get</text:span><text:span text:style-name="T84">(</text:span><text:span text:style-name="T62">this</text:span><text:span text:style-name="T84">.getClass().getClassLoader().getResource(</text:span><text:span text:style-name="T43">"formulario.xml"</text:span><text:span text:style-name="T84">).toURI()));</text:span></text:p>
            <text:p text:style-name="P183">// Llegeix el formulari</text:p>
            <text:p text:style-name="P125"><text:span text:style-name="T69">Formulario </text:span><text:span text:style-name="T107">formulario</text:span><text:span text:style-name="T69"> = </text:span><text:span text:style-name="T61">null</text:span><text:span text:style-name="T69">;</text:span></text:p>
            <text:p text:style-name="P125"><text:span text:style-name="T61">try</text:span><text:span text:style-name="T69"> {</text:span></text:p>
            <text:p text:style-name="P127"><text:span text:style-name="T69"><text:tab/></text:span><text:span text:style-name="T107">formulario</text:span><text:span text:style-name="T69"> = </text:span><text:span text:style-name="T107">sistraUtils</text:span><text:span text:style-name="T69">.parseXmlFormulario(</text:span><text:span text:style-name="T116">contingut</text:span><text:span text:style-name="T69">);</text:span></text:p>
            <text:p text:style-name="P125"><text:span text:style-name="T69">} </text:span><text:span text:style-name="T61">catch</text:span><text:span text:style-name="T69"> (Exception </text:span><text:span text:style-name="T107">e</text:span><text:span text:style-name="T69">) {</text:span></text:p>
            <text:p text:style-name="P125"><text:span text:style-name="T69"><text:tab/></text:span><text:span text:style-name="T61">throw</text:span><text:span text:style-name="T69"> </text:span><text:span text:style-name="T61">new</text:span><text:span text:style-name="T69"> Exception(</text:span><text:span text:style-name="T38">"Error llegint l'annex : "</text:span><text:span text:style-name="T69"> + </text:span><text:span text:style-name="T107">e</text:span><text:span text:style-name="T69">.getMessage());</text:span></text:p>
            <text:p text:style-name="P99">}</text:p>
            <text:p text:style-name="P125"><text:span text:style-name="T69">System.</text:span><text:span text:style-name="T100">out</text:span><text:span text:style-name="T69">.println(</text:span><text:span text:style-name="T38">"Llegit el fornmulari, formulario.accion="</text:span><text:span text:style-name="T69"> + </text:span><text:span text:style-name="T107">formulario</text:span><text:span text:style-name="T69">.getAccion());</text:span></text:p>
            <text:p text:style-name="P96"/>
          </table:table-cell>
        </table:table-row>
      </table:table>
      <text:p text:style-name="P167"/>
      <text:p text:style-name="P175">Per a l'exemple s'ha creat l'arxiu <text:span text:style-name="T150">formulario.xml</text:span><text:span text:style-name="T178"> amb l' XML d'exemple per a la lectura. A continuació es mostra aquest XML d'exemple.</text:span></text:p>
      <text:p text:style-name="P176"><text:span text:style-name="T47">taula.</text:span><text:span text:style-name="T235"> </text:span><text:span text:style-name="T240">E</text:span><text:span text:style-name="T242">xemple d' </text:span><text:span text:style-name="T241">XML</text:span><text:span text:style-name="T242"> pel formulari</text:span><text:span text:style-name="T235">.</text:span></text:p>
      <table:table table:name="Table13" table:style-name="Table13">
        <table:table-column table:style-name="Table13.A"/>
        <table:table-row table:style-name="TableLine355691824">
          <table:table-cell table:style-name="Table13.A1" office:value-type="string">
            <text:p text:style-name="P97"><text:span text:style-name="T14">&lt;?</text:span><text:span text:style-name="T21">xml</text:span> <text:span text:style-name="T26">version</text:span>=<text:span text:style-name="T44">"1.0"</text:span> <text:span text:style-name="T26">encoding</text:span>=<text:span text:style-name="T44">"UTF-8"</text:span> <text:span text:style-name="T26">standalone</text:span>=<text:span text:style-name="T44">"yes"</text:span><text:span text:style-name="T14">?&gt;</text:span></text:p>
            <text:p text:style-name="P120"><text:span text:style-name="T17">&lt;</text:span><text:span text:style-name="T23">ns2:FORMULARIO</text:span><text:span text:style-name="T140"> </text:span><text:span text:style-name="T27">accion</text:span><text:span text:style-name="T69">=</text:span><text:span text:style-name="T42">"accion"</text:span><text:span text:style-name="T140"> </text:span><text:span text:style-name="T27">xmlns:ns2</text:span><text:span text:style-name="T69">=</text:span><text:span text:style-name="T42">"urn:es:caib:sistra2:xml:formulario:v1:model"</text:span><text:span text:style-name="T17">&gt;</text:span></text:p>
            <text:p text:style-name="P120"><text:span text:style-name="T69"><text:tab/></text:span><text:span text:style-name="T17">&lt;</text:span><text:span text:style-name="T23">CAMPO</text:span><text:span text:style-name="T140"> </text:span><text:span text:style-name="T27">id</text:span><text:span text:style-name="T69">=</text:span><text:span text:style-name="T42">"campo_0"</text:span><text:span text:style-name="T17">&gt;</text:span></text:p>
            <text:p text:style-name="P120"><text:span text:style-name="T69"><text:tab/><text:tab/></text:span><text:span text:style-name="T17">&lt;</text:span><text:span text:style-name="T23">VALOR</text:span><text:span text:style-name="T140"> </text:span><text:span text:style-name="T27">codigo</text:span><text:span text:style-name="T69">=</text:span><text:span text:style-name="T42">"cod_0"</text:span><text:span text:style-name="T17">&gt;</text:span><text:span text:style-name="T69">valor_i</text:span><text:span text:style-name="T17">&lt;/</text:span><text:span text:style-name="T23">VALOR</text:span><text:span text:style-name="T17">&gt;</text:span></text:p>
            <text:p text:style-name="P120"><text:span text:style-name="T69"><text:tab/><text:tab/></text:span><text:span text:style-name="T17">&lt;</text:span><text:span text:style-name="T23">VALOR</text:span><text:span text:style-name="T140"> </text:span><text:span text:style-name="T27">codigo</text:span><text:span text:style-name="T69">=</text:span><text:span text:style-name="T42">"cod_0"</text:span><text:span text:style-name="T17">&gt;</text:span><text:span text:style-name="T69">valor_i</text:span><text:span text:style-name="T17">&lt;/</text:span><text:span text:style-name="T23">VALOR</text:span><text:span text:style-name="T17">&gt;</text:span></text:p>
            <text:p text:style-name="P120"><text:span text:style-name="T69"><text:tab/></text:span><text:span text:style-name="T17">&lt;/</text:span><text:span text:style-name="T23">CAMPO</text:span><text:span text:style-name="T17">&gt;</text:span></text:p>
            <text:p text:style-name="P120"><text:span text:style-name="T69"><text:tab/></text:span><text:span text:style-name="T17">&lt;</text:span><text:span text:style-name="T23">CAMPO</text:span><text:span text:style-name="T140"> </text:span><text:span text:style-name="T27">id</text:span><text:span text:style-name="T69">=</text:span><text:span text:style-name="T42">"campo_1"</text:span><text:span text:style-name="T17">&gt;</text:span></text:p>
            <text:p text:style-name="P120"><text:span text:style-name="T69"><text:tab/><text:tab/></text:span><text:span text:style-name="T17">&lt;</text:span><text:span text:style-name="T23">VALOR</text:span><text:span text:style-name="T140"> </text:span><text:span text:style-name="T27">codigo</text:span><text:span text:style-name="T69">=</text:span><text:span text:style-name="T42">"cod_1"</text:span><text:span text:style-name="T17">&gt;</text:span><text:span text:style-name="T69">valor_i</text:span><text:span text:style-name="T17">&lt;/</text:span><text:span text:style-name="T23">VALOR</text:span><text:span text:style-name="T17">&gt;</text:span></text:p>
            <text:p text:style-name="P120"><text:span text:style-name="T69"><text:tab/><text:tab/></text:span><text:span text:style-name="T17">&lt;</text:span><text:span text:style-name="T23">VALOR</text:span><text:span text:style-name="T140"> </text:span><text:span text:style-name="T27">codigo</text:span><text:span text:style-name="T69">=</text:span><text:span text:style-name="T42">"cod_1"</text:span><text:span text:style-name="T17">&gt;</text:span><text:span text:style-name="T69">valor_i</text:span><text:span text:style-name="T17">&lt;/</text:span><text:span text:style-name="T23">VALOR</text:span><text:span text:style-name="T17">&gt;</text:span></text:p>
            <text:p text:style-name="P120"><text:span text:style-name="T69"><text:tab/></text:span><text:span text:style-name="T17">&lt;/</text:span><text:span text:style-name="T23">CAMPO</text:span><text:span text:style-name="T17">&gt;</text:span></text:p>
            <text:p text:style-name="P97"><text:span text:style-name="T14">&lt;/</text:span><text:span text:style-name="T21">ns2:FORMULARIO</text:span><text:span text:style-name="T14">&gt;</text:span></text:p>
          </table:table-cell>
        </table:table-row>
      </table:table>
      <text:p text:style-name="P78"/>
      <text:p text:style-name="P174"/>
      <text:list xml:id="list181521482312111" text:continue-numbering="true" text:style-name="Outline">
        <text:list-header>
          <text:h text:style-name="P402" text:outline-level="1" text:is-list-header="true"><text:bookmark-start text:name="__RefHeading___Toc117515_1680181998"/><text:span text:style-name="T135">Annex I: WSDL del backoffice</text:span> <text:bookmark-end text:name="__RefHeading___Toc117515_1680181998"/></text:h>
        </text:list-header>
      </text:list>
      <text:p text:style-name="P187"><text:span text:style-name="T18">&lt;?</text:span> <text:span text:style-name="T24">xml</text:span> <text:span text:style-name="T28">version</text:span> <text:span text:style-name="T70">= </text:span><text:span text:style-name="T39">'1.0'</text:span> <text:span text:style-name="T28">encoding</text:span> <text:span text:style-name="T70">= </text:span><text:span text:style-name="T39">'UTF-8'</text:span> <text:span text:style-name="T18">?&gt;&lt;</text:span> <text:span text:style-name="T24">wsdl:definitions</text:span> <text:span text:style-name="T28">name</text:span> <text:span text:style-name="T70">= </text:span><text:span text:style-name="T39">"BackofficeService"</text:span> <text:span text:style-name="T28">targetNamespace</text:span> <text:span text:style-name="T70">= </text:span><text:span text:style-name="T39">"http://www.caib.es/distribucio/ws/backoffice"</text:span> <text:span text:style-name="T28">xmlns:ns1</text:span> <text:span text:style-name="T70">= </text:span><text:span text:style-name="T39">"http://schemas.xmlsoap.org/wsdl/soap/http"</text:span> <text:span text:style-name="T28">xmlns:soap</text:span> <text:span text:style-name="T70">= </text:span><text:span text:style-name="T39">"http://schemas.xmlsoap.org/wsdl/soap/"</text:span> <text:span text:style-name="T28">xmlns:tns</text:span> <text:span text:style-name="T70">= </text:span><text:span text:style-name="T39">"http://www.caib.es/distribucio/ws/backoffice"</text:span> <text:span text:style-name="T70"><text:s text:c="3"/></text:span><text:span text:style-name="T28">xmlns:wsdl</text:span> <text:span text:style-name="T70">= </text:span><text:span text:style-name="T39">"http://schemas.xmlsoap.org/wsdl/"</text:span> <text:span text:style-name="T28">xmlns:xsd</text:span> <text:span text:style-name="T70">= </text:span><text:span text:style-name="T39">"http://www.w3.org/2001/XMLSchema"</text:span> <text:span text:style-name="T18">&gt;</text:span> </text:p>
      <text:p text:style-name="P188"><text:span text:style-name="T70"><text:s text:c="4"/></text:span><text:span text:style-name="T91"><text:s text:c="3"/></text:span><text:span text:style-name="T20">&lt;</text:span> <text:span text:style-name="T25">wsdl:types</text:span> <text:span text:style-name="T20">&gt;</text:span> </text:p>
      <text:p text:style-name="P185"><text:span text:style-name="T14">&lt;</text:span> <text:span text:style-name="T21">xs:schema</text:span> <text:span text:style-name="T26">elementFormDefault</text:span> <text:span text:style-name="T63">=</text:span> <text:span text:style-name="T44">"unqualified"</text:span> <text:span text:style-name="T26">targetNamespace</text:span> <text:span text:style-name="T63">=</text:span> <text:span text:style-name="T44">"http://www.caib.es/distribucio/ws/backoffice"</text:span> <text:span text:style-name="T26">version</text:span> <text:span text:style-name="T63">=</text:span> <text:span text:style-name="T44">"1.0"</text:span> <text:span text:style-name="T26">xmlns:tns</text:span> <text:span text:style-name="T63">=</text:span> <text:span text:style-name="T44">"http://www.caib.es/distribucio/ws/backoffice"</text:span> <text:span text:style-name="T26">xmlns:xs</text:span> <text:span text:style-name="T63">=</text:span> <text:span text:style-name="T44">"http://www.w3.org/2001/XMLSchema"</text:span> <text:span text:style-name="T14">&gt;</text:span> </text:p>
      <text:p text:style-name="P185"><text:span text:style-name="T14">&lt;</text:span> <text:span text:style-name="T21">xs:element</text:span> <text:span text:style-name="T26">name</text:span> <text:span text:style-name="T63">=</text:span> <text:span text:style-name="T44">"comunicarAnotacionsPendents"</text:span> <text:span text:style-name="T26">type</text:span> <text:span text:style-name="T63">=</text:span> <text:span text:style-name="T44">"tns:comunicarAnotacionsPendents"</text:span> <text:span text:style-name="T14">/&gt;</text:span> </text:p>
      <text:p text:style-name="P185"><text:span text:style-name="T14">&lt;</text:span> <text:span text:style-name="T21">xs:element</text:span> <text:span text:style-name="T26">name</text:span> <text:span text:style-name="T63">=</text:span> <text:span text:style-name="T44">"comunicarAnotacionsPendentsResponse"</text:span> <text:span text:style-name="T26">type</text:span> <text:span text:style-name="T63">=</text:span> <text:span text:style-name="T44">"tns:comunicarAnotacionsPendentsResponse"</text:span> <text:span text:style-name="T14">/&gt;</text:span> </text:p>
      <text:p text:style-name="P185"><text:span text:style-name="T14">&lt;</text:span> <text:span text:style-name="T21">xs:complexType</text:span> <text:span text:style-name="T26">name</text:span> <text:span text:style-name="T63">=</text:span> <text:span text:style-name="T44">"comunicarAnotacionsPendents"</text:span> <text:span text:style-name="T14">&gt;</text:span> </text:p>
      <text:p text:style-name="P185"><text:span text:style-name="T14">&lt;</text:span> <text:span text:style-name="T21">xs:sequence</text:span> <text:span text:style-name="T14">&gt;</text:span> </text:p>
      <text:p text:style-name="P185"><text:span text:style-name="T14">&lt;</text:span> <text:span text:style-name="T21">xs:element</text:span> <text:span text:style-name="T26">maxOccurs</text:span> <text:span text:style-name="T63">=</text:span> <text:span text:style-name="T44">"unbounded"</text:span> <text:span text:style-name="T26">name</text:span> <text:span text:style-name="T63">=</text:span> <text:span text:style-name="T44">"ids"</text:span> <text:span text:style-name="T26">type</text:span> <text:span text:style-name="T63">=</text:span> <text:span text:style-name="T44">"tns:anotacioRegistreId"</text:span> <text:span text:style-name="T14">/&gt;</text:span> </text:p>
      <text:p text:style-name="P185"><text:span text:style-name="T14">&lt;/</text:span> <text:span text:style-name="T21">xs:sequence</text:span> <text:span text:style-name="T14">&gt;</text:span> </text:p>
      <text:p text:style-name="P185"><text:span text:style-name="T14">&lt;/</text:span> <text:span text:style-name="T21">xs:complexType</text:span> <text:span text:style-name="T14">&gt;</text:span> </text:p>
      <text:p text:style-name="P185"><text:span text:style-name="T14">&lt;</text:span> <text:span text:style-name="T21">xs:complexType</text:span> <text:span text:style-name="T26">name</text:span> <text:span text:style-name="T63">=</text:span> <text:span text:style-name="T44">"anotacioRegistreId"</text:span> <text:span text:style-name="T14">&gt;</text:span> </text:p>
      <text:p text:style-name="P185"><text:span text:style-name="T14">&lt;</text:span> <text:span text:style-name="T21">xs:sequence</text:span> <text:span text:style-name="T14">&gt;</text:span> </text:p>
      <text:p text:style-name="P185"><text:span text:style-name="T14">&lt;</text:span> <text:span text:style-name="T21">xs:element</text:span> <text:span text:style-name="T26">minOccurs</text:span> <text:span text:style-name="T63">=</text:span> <text:span text:style-name="T44">"0"</text:span> <text:span text:style-name="T26">name</text:span> <text:span text:style-name="T63">=</text:span> <text:span text:style-name="T44">"clauAcces"</text:span> <text:span text:style-name="T26">type</text:span> <text:span text:style-name="T63">=</text:span> <text:span text:style-name="T44">"xs:string"</text:span> <text:span text:style-name="T14">/&gt;</text:span> </text:p>
      <text:p text:style-name="P185"><text:span text:style-name="T14">&lt;</text:span> <text:span text:style-name="T21">xs:element</text:span> <text:span text:style-name="T26">minOccurs</text:span> <text:span text:style-name="T63">=</text:span> <text:span text:style-name="T44">"0"</text:span> <text:span text:style-name="T26">name</text:span> <text:span text:style-name="T63">=</text:span> <text:span text:style-name="T44">"indetificador"</text:span> <text:span text:style-name="T26">type</text:span> <text:span text:style-name="T63">=</text:span> <text:span text:style-name="T44">"xs:string"</text:span> <text:span text:style-name="T14">/&gt;</text:span> </text:p>
      <text:p text:style-name="P185"><text:span text:style-name="T14">&lt;/</text:span> <text:span text:style-name="T21">xs:sequence</text:span> <text:span text:style-name="T14">&gt;</text:span> </text:p>
      <text:p text:style-name="P185"><text:span text:style-name="T14">&lt;/</text:span> <text:span text:style-name="T21">xs:complexType</text:span> <text:span text:style-name="T14">&gt;</text:span> </text:p>
      <text:p text:style-name="P185"><text:span text:style-name="T14">&lt;</text:span> <text:span text:style-name="T21">xs:complexType</text:span> <text:span text:style-name="T26">name</text:span> <text:span text:style-name="T63">=</text:span> <text:span text:style-name="T44">"comunicarAnotacionsPendentsResponse"</text:span> <text:span text:style-name="T14">&gt;</text:span> </text:p>
      <text:p text:style-name="P185"><text:span text:style-name="T14">&lt;</text:span> <text:span text:style-name="T21">xs:sequence</text:span> <text:span text:style-name="T14">/&gt;</text:span> </text:p>
      <text:p text:style-name="P185"><text:span text:style-name="T14">&lt;/</text:span> <text:span text:style-name="T21">xs:complexType</text:span> <text:span text:style-name="T14">&gt;</text:span> </text:p>
      <text:p text:style-name="P185"><text:span text:style-name="T14">&lt;/</text:span> <text:span text:style-name="T21">xs:schema</text:span> <text:span text:style-name="T14">&gt;</text:span> </text:p>
      <text:p text:style-name="P185"><text:span text:style-name="T63"><text:s text:c="5"/></text:span><text:span text:style-name="T14">&lt;/</text:span> <text:span text:style-name="T21">wsdl:types</text:span> <text:span text:style-name="T14">&gt;</text:span> </text:p>
      <text:p text:style-name="P185"><text:span text:style-name="T63"><text:s text:c="5"/></text:span><text:span text:style-name="T14">&lt;</text:span> <text:span text:style-name="T21">wsdl:message</text:span> <text:span text:style-name="T26">name</text:span> <text:span text:style-name="T63">=</text:span> <text:span text:style-name="T44">"comunicarAnotacionsPendents"</text:span> <text:span text:style-name="T14">&gt;</text:span> </text:p>
      <text:p text:style-name="P185"><text:span text:style-name="T63"><text:s text:c="7"/></text:span><text:span text:style-name="T14">&lt;</text:span> <text:span text:style-name="T21">wsdl:part</text:span> <text:span text:style-name="T26">element</text:span> <text:span text:style-name="T63">=</text:span> <text:span text:style-name="T44">"tns:comunicarAnotacionsPendents"</text:span> <text:span text:style-name="T26">name</text:span> <text:span text:style-name="T63">=</text:span> <text:span text:style-name="T44">"parameters"</text:span> <text:span text:style-name="T14">&gt;</text:span> </text:p>
      <text:p text:style-name="P185"><text:span text:style-name="T63"><text:s text:c="7"/></text:span><text:span text:style-name="T14">&lt;/</text:span> <text:span text:style-name="T21">wsdl:part</text:span> <text:span text:style-name="T14">&gt;</text:span> </text:p>
      <text:p text:style-name="P185"><text:span text:style-name="T63"><text:s text:c="5"/></text:span><text:span text:style-name="T14">&lt;/</text:span> <text:span text:style-name="T21">wsdl:message</text:span> <text:span text:style-name="T14">&gt;</text:span> </text:p>
      <text:p text:style-name="P185"><text:span text:style-name="T63"><text:s text:c="5"/></text:span><text:span text:style-name="T14">&lt;</text:span> <text:span text:style-name="T21">wsdl:message</text:span> <text:span text:style-name="T26">name</text:span> <text:span text:style-name="T63">=</text:span> <text:span text:style-name="T44">"comunicarAnotacionsPendentsResponse"</text:span> <text:span text:style-name="T14">&gt;</text:span> </text:p>
      <text:p text:style-name="P185"><text:span text:style-name="T63"><text:s text:c="7"/></text:span><text:span text:style-name="T14">&lt;</text:span> <text:span text:style-name="T21">wsdl:part</text:span> <text:span text:style-name="T26">element</text:span> <text:span text:style-name="T63">=</text:span> <text:span text:style-name="T44">"tns:comunicarAnotacionsPendentsResponse"</text:span> <text:span text:style-name="T26">name</text:span> <text:span text:style-name="T63">=</text:span> <text:span text:style-name="T44">"parameters"</text:span> <text:span text:style-name="T14">&gt;</text:span> </text:p>
      <text:p text:style-name="P185"><text:span text:style-name="T63"><text:s text:c="7"/></text:span><text:span text:style-name="T14">&lt;/</text:span> <text:span text:style-name="T21">wsdl:part</text:span> <text:span text:style-name="T14">&gt;</text:span> </text:p>
      <text:p text:style-name="P185"><text:span text:style-name="T63"><text:s text:c="5"/></text:span><text:span text:style-name="T14">&lt;/</text:span> <text:span text:style-name="T21">wsdl:message</text:span> <text:span text:style-name="T14">&gt;</text:span> </text:p>
      <text:p text:style-name="P185"><text:span text:style-name="T63"><text:s text:c="5"/></text:span><text:span text:style-name="T14">&lt;</text:span> <text:span text:style-name="T21">wsdl:portType</text:span> <text:span text:style-name="T26">name</text:span> <text:span text:style-name="T63">=</text:span> <text:span text:style-name="T44">"Backoffice"</text:span> <text:span text:style-name="T14">&gt;</text:span> </text:p>
      <text:p text:style-name="P185"><text:span text:style-name="T63"><text:s text:c="7"/></text:span><text:span text:style-name="T14">&lt;</text:span> <text:span text:style-name="T21">wsdl:operation</text:span> <text:span text:style-name="T26">name</text:span> <text:span text:style-name="T63">=</text:span> <text:span text:style-name="T44">"comunicarAnotacionsPendents"</text:span> <text:span text:style-name="T14">&gt;</text:span> </text:p>
      <text:p text:style-name="P185"><text:span text:style-name="T63"><text:s text:c="9"/></text:span><text:span text:style-name="T14">&lt;</text:span> <text:span text:style-name="T21">wsdl:input</text:span> <text:span text:style-name="T26">message</text:span> <text:span text:style-name="T63">=</text:span> <text:span text:style-name="T44">"tns:comunicarAnotacionsPendents"</text:span> <text:span text:style-name="T26">name</text:span> <text:span text:style-name="T63">=</text:span> <text:span text:style-name="T44">"comunicarAnotacionsPendents"</text:span> <text:span text:style-name="T14">&gt;</text:span> </text:p>
      <text:p text:style-name="P185"><text:span text:style-name="T63"><text:s text:c="7"/></text:span><text:span text:style-name="T14">&lt;/</text:span> <text:span text:style-name="T21">wsdl:input</text:span> <text:span text:style-name="T14">&gt;</text:span> </text:p>
      <text:p text:style-name="P185"><text:soft-page-break/><text:s/><text:span text:style-name="T63"><text:s text:c="9"/></text:span><text:span text:style-name="T14">&lt;</text:span> <text:span text:style-name="T21">wsdl:output</text:span> <text:span text:style-name="T26">message</text:span> <text:span text:style-name="T63">=</text:span> <text:span text:style-name="T44">"tns:comunicarAnotacionsPendentsResponse"</text:span> <text:span text:style-name="T26">name</text:span> <text:span text:style-name="T63">=</text:span> <text:span text:style-name="T44">"comunicarAnotacionsPendentsResponse"</text:span> <text:span text:style-name="T14">&gt;</text:span> </text:p>
      <text:p text:style-name="P185"><text:span text:style-name="T63"><text:s text:c="7"/></text:span><text:span text:style-name="T14">&lt;/</text:span> <text:span text:style-name="T21">wsdl:output</text:span> <text:span text:style-name="T14">&gt;</text:span> </text:p>
      <text:p text:style-name="P185"><text:s text:c="2"/><text:span text:style-name="T63"><text:s text:c="7"/></text:span><text:span text:style-name="T14">&lt;/</text:span> <text:span text:style-name="T21">wsdl:operation</text:span> <text:span text:style-name="T14">&gt;</text:span> </text:p>
      <text:p text:style-name="P185"><text:span text:style-name="T63"><text:s text:c="5"/></text:span><text:span text:style-name="T14">&lt;/</text:span> <text:span text:style-name="T21">wsdl:portType</text:span> <text:span text:style-name="T14">&gt;</text:span> </text:p>
      <text:p text:style-name="P185"><text:span text:style-name="T63"><text:s text:c="5"/></text:span><text:span text:style-name="T14">&lt;</text:span> <text:span text:style-name="T21">wsdl:binding</text:span> <text:span text:style-name="T26">name</text:span> <text:span text:style-name="T63">=</text:span> <text:span text:style-name="T44">"BackofficeServiceSoapBinding"</text:span> <text:span text:style-name="T26">type</text:span> <text:span text:style-name="T63">=</text:span> <text:span text:style-name="T44">"tns:Backoffice"</text:span> <text:span text:style-name="T14">&gt;</text:span> </text:p>
      <text:p text:style-name="P185"><text:span text:style-name="T63"><text:s text:c="7"/></text:span><text:span text:style-name="T14">&lt;</text:span> <text:span text:style-name="T21">soap:binding</text:span> <text:span text:style-name="T26">style</text:span> <text:span text:style-name="T63">=</text:span> <text:span text:style-name="T44">"document"</text:span> <text:span text:style-name="T26">transport</text:span> <text:span text:style-name="T63">=</text:span> <text:span text:style-name="T44">"http://schemas.xmlsoap.org/soap/http"</text:span> <text:span text:style-name="T14">/&gt;</text:span> </text:p>
      <text:p text:style-name="P185"><text:span text:style-name="T63"><text:s text:c="7"/></text:span><text:span text:style-name="T14">&lt;</text:span> <text:span text:style-name="T21">wsdl:operation</text:span> <text:span text:style-name="T26">name</text:span> <text:span text:style-name="T63">=</text:span> <text:span text:style-name="T44">"comunicarAnotacionsPendents"</text:span> <text:span text:style-name="T14">&gt;</text:span> </text:p>
      <text:p text:style-name="P185"><text:span text:style-name="T63"><text:s text:c="9"/></text:span><text:span text:style-name="T14">&lt;</text:span> <text:span text:style-name="T21">soap:operation</text:span> <text:span text:style-name="T26">soapAction</text:span> <text:span text:style-name="T63">=</text:span> <text:span text:style-name="T44">""</text:span> <text:span text:style-name="T26">style</text:span> <text:span text:style-name="T63">=</text:span> <text:span text:style-name="T44">"document"</text:span> <text:span text:style-name="T14">/&gt;</text:span> </text:p>
      <text:p text:style-name="P185"><text:span text:style-name="T63"><text:s text:c="9"/></text:span><text:span text:style-name="T14">&lt;</text:span> <text:span text:style-name="T21">wsdl:input</text:span> <text:span text:style-name="T26">name</text:span> <text:span text:style-name="T63">=</text:span> <text:span text:style-name="T44">"comunicarAnotacionsPendents"</text:span> <text:span text:style-name="T14">&gt;</text:span> </text:p>
      <text:p text:style-name="P185"><text:span text:style-name="T63"><text:s text:c="11"/></text:span><text:span text:style-name="T14">&lt;</text:span> <text:span text:style-name="T21">soap:body</text:span> <text:span text:style-name="T26">use</text:span> <text:span text:style-name="T63">=</text:span> <text:span text:style-name="T44">"literal"</text:span> <text:span text:style-name="T14">/&gt;</text:span> </text:p>
      <text:p text:style-name="P185"><text:span text:style-name="T63"><text:s text:c="9"/></text:span><text:span text:style-name="T14">&lt;/</text:span> <text:span text:style-name="T21">wsdl:input</text:span> <text:span text:style-name="T14">&gt;</text:span> </text:p>
      <text:p text:style-name="P185"><text:span text:style-name="T63"><text:s text:c="9"/></text:span><text:span text:style-name="T14">&lt;</text:span> <text:span text:style-name="T21">wsdl:output</text:span> <text:span text:style-name="T26">name</text:span> <text:span text:style-name="T63">=</text:span> <text:span text:style-name="T44">"comunicarAnotacionsPendentsResponse"</text:span> <text:span text:style-name="T14">&gt;</text:span> </text:p>
      <text:p text:style-name="P185"><text:span text:style-name="T63"><text:s text:c="11"/></text:span><text:span text:style-name="T14">&lt;</text:span> <text:span text:style-name="T21">soap:body</text:span> <text:span text:style-name="T26">use</text:span> <text:span text:style-name="T63">=</text:span> <text:span text:style-name="T44">"literal"</text:span> <text:span text:style-name="T14">/&gt;</text:span> </text:p>
      <text:p text:style-name="P185"><text:span text:style-name="T63"><text:s text:c="9"/></text:span><text:span text:style-name="T14">&lt;/</text:span> <text:span text:style-name="T21">wsdl:output</text:span> <text:span text:style-name="T14">&gt;</text:span> </text:p>
      <text:p text:style-name="P185"><text:span text:style-name="T63"><text:s text:c="7"/></text:span><text:span text:style-name="T14">&lt;/</text:span> <text:span text:style-name="T21">wsdl:operation</text:span> <text:span text:style-name="T14">&gt;</text:span> </text:p>
      <text:p text:style-name="P185"><text:span text:style-name="T63"><text:s text:c="5"/></text:span><text:span text:style-name="T14">&lt;/</text:span> <text:span text:style-name="T21">wsdl:binding</text:span> <text:span text:style-name="T14">&gt;</text:span> </text:p>
      <text:p text:style-name="P185"><text:span text:style-name="T63"><text:s text:c="5"/></text:span><text:span text:style-name="T14">&lt;</text:span> <text:span text:style-name="T21">wsdl:service</text:span> <text:span text:style-name="T26">name</text:span> <text:span text:style-name="T63">=</text:span> <text:span text:style-name="T44">"BackofficeService"</text:span> <text:span text:style-name="T14">&gt;</text:span> </text:p>
      <text:p text:style-name="P185"><text:s text:c="3"/><text:span text:style-name="T63"><text:s text:c="7"/></text:span><text:span text:style-name="T14">&lt;</text:span> <text:span text:style-name="T21">wsdl:port</text:span> <text:span text:style-name="T26">binding</text:span> <text:span text:style-name="T63">=</text:span> <text:span text:style-name="T44">"tns:BackofficeServiceSoapBinding"</text:span> <text:span text:style-name="T26">name</text:span> <text:span text:style-name="T63">=</text:span> <text:span text:style-name="T44">"BackofficeServicePort"</text:span> <text:span text:style-name="T14">&gt;</text:span> </text:p>
      <text:p text:style-name="P185"><text:span text:style-name="T63"><text:s text:c="9"/></text:span><text:span text:style-name="T14">&lt;</text:span> <text:span text:style-name="T21">soap:address</text:span> <text:span text:style-name="T26">location</text:span> <text:span text:style-name="T63">=</text:span> <text:span text:style-name="T44">"http://localhost:8080/distribucio/ws/backoffice"</text:span> <text:span text:style-name="T14">/&gt;</text:span> </text:p>
      <text:p text:style-name="P185"><text:span text:style-name="T63"><text:s text:c="7"/></text:span><text:span text:style-name="T14">&lt;/</text:span> <text:span text:style-name="T21">wsdl:port</text:span> <text:span text:style-name="T14">&gt;</text:span> </text:p>
      <text:p text:style-name="P185"><text:span text:style-name="T63"><text:s text:c="5"/></text:span><text:span text:style-name="T14">&lt;/</text:span> <text:span text:style-name="T21">wsdl:service</text:span> <text:span text:style-name="T14">&gt;</text:span> </text:p>
      <text:p text:style-name="P186"><text:span text:style-name="T14">&lt;/</text:span> <text:span text:style-name="T21">wsdl:definitions</text:span> <text:span text:style-name="T14">&gt;</text:span> </text:p>
      <text:p text:style-name="P45"><text:s text:c="3"/></text:p>
      <text:list xml:id="list181520426027017" text:continue-numbering="true" text:style-name="Outline">
        <text:list-header>
          <text:h text:style-name="P403" text:outline-level="1" text:is-list-header="true"><text:bookmark-start text:name="__RefHeading___Toc60796_1326387233"/><text:span text:style-name="T135">Annex </text:span><text:span text:style-name="T257">II</text:span><text:span text:style-name="T135">: </text:span><text:span text:style-name="T255">E</text:span><text:span text:style-name="T256">xemple d'ús de la llibreria de </text:span><text:span text:style-name="T258">distribucio-backoffice-utils</text:span><text:bookmark-end text:name="__RefHeading___Toc60796_1326387233"/></text:h>
        </text:list-header>
      </text:list>
      <table:table table:name="Table4" table:style-name="Table4">
        <table:table-column table:style-name="Table4.A"/>
        <table:table-row table:style-name="TableLine355689520">
          <table:table-cell table:style-name="Table4.A1" office:value-type="string">
            <text:p text:style-name="P429"><text:span text:style-name="T394">/**<text:line-break/> * <text:line-break/> */<text:line-break/></text:span><text:span text:style-name="T57">package</text:span><text:span text:style-name="T377"> </text:span><text:span text:style-name="T95">es.caib.</text:span><text:span text:style-name="T96">aplicacio.api.interna</text:span><text:span text:style-name="T95">.rest;</text:span><text:span text:style-name="T382"><text:line-break/><text:line-break/></text:span><text:span text:style-name="T57">import</text:span><text:span text:style-name="T70"> java.util.Arrays;</text:span></text:p>
            <text:p text:style-name="P430"><text:span text:style-name="T53">import</text:span><text:span text:style-name="T70"> java.util.Date;</text:span></text:p>
            <text:p text:style-name="P430"><text:span text:style-name="T53">import</text:span><text:span text:style-name="T70"> java.util.List;</text:span></text:p>
            <text:p text:style-name="P430"><text:span text:style-name="T53">import</text:span><text:span text:style-name="T70"> java.util.Map;</text:span></text:p>
            <text:p text:style-name="P430"><text:span text:style-name="T53">import</text:span><text:span text:style-name="T70"> java.util.Properties;</text:span></text:p>
            <text:p text:style-name="P428"/>
            <text:p text:style-name="P430"><text:span text:style-name="T53">import</text:span><text:span text:style-name="T70"> org.apache.commons.lang.builder.ToStringBuilder;</text:span></text:p>
            <text:p text:style-name="P430"><text:span text:style-name="T53">import</text:span><text:span text:style-name="T70"> org.springframework.http.HttpStatus;</text:span></text:p>
            <text:p text:style-name="P430"><text:span text:style-name="T53">import</text:span><text:span text:style-name="T70"> org.springframework.http.ResponseEntity;</text:span></text:p>
            <text:p text:style-name="P430"><text:span text:style-name="T53">import</text:span><text:span text:style-name="T70"> org.springframework.web.bind.annotation.PostMapping;</text:span></text:p>
            <text:p text:style-name="P430"><text:span text:style-name="T53">import</text:span><text:span text:style-name="T70"> org.springframework.web.bind.annotation.RequestBody;</text:span></text:p>
            <text:p text:style-name="P430"><text:span text:style-name="T53">import</text:span><text:span text:style-name="T70"> org.springframework.web.bind.annotation.RestController;</text:span></text:p>
            <text:p text:style-name="P428"/>
            <text:p text:style-name="P430"><text:span text:style-name="T53">import</text:span><text:span text:style-name="T70"> es.caib.distribucio.backoffice.utils.arxiu.ArxiuPluginListener;</text:span></text:p>
            <text:p text:style-name="P430"><text:span text:style-name="T53">import</text:span><text:span text:style-name="T70"> es.caib.distribucio.backoffice.utils.arxiu.ArxiuResultat;</text:span></text:p>
            <text:p text:style-name="P430"><text:span text:style-name="T53">import</text:span><text:span text:style-name="T70"> es.caib.distribucio.backoffice.utils.arxiu.ArxiuResultatAnnex;</text:span></text:p>
            <text:p text:style-name="P430"><text:span text:style-name="T53">import</text:span><text:span text:style-name="T70"> es.caib.distribucio.backoffice.utils.arxiu.BackofficeArxiuUtils;</text:span></text:p>
            <text:p text:style-name="P430"><text:span text:style-name="T53">import</text:span><text:span text:style-name="T70"> es.caib.distribucio.backoffice.utils.arxiu.BackofficeArxiuUtilsImpl;</text:span></text:p>
            <text:p text:style-name="P430"><text:span text:style-name="T53">import</text:span><text:span text:style-name="T70"> es.caib.distribucio.backoffice.utils.arxiu.DistribucioArxiuError;</text:span></text:p>
            <text:p text:style-name="P430"><text:span text:style-name="T53">import</text:span><text:span text:style-name="T70"> es.caib.distribucio.backoffice.utils.arxiu.ExpedientEstatEnumDto;</text:span></text:p>
            <text:p text:style-name="P430"><text:span text:style-name="T53">import</text:span><text:span text:style-name="T70"> es.caib.distribucio.backoffice.utils.sistra.BackofficeSistra2Utils;</text:span></text:p>
            <text:p text:style-name="P430"><text:span text:style-name="T53">import</text:span><text:span text:style-name="T70"> es.caib.distribucio.backoffice.utils.sistra.BackofficeSistra2UtilsImpl;</text:span></text:p>
            <text:p text:style-name="P430"><text:span text:style-name="T53">import</text:span><text:span text:style-name="T70"> es.caib.distribucio.backoffice.utils.sistra.formulario.Formulario;</text:span></text:p>
            <text:p text:style-name="P430"><text:span text:style-name="T53">import</text:span><text:span text:style-name="T70"> es.caib.distribucio.backoffice.utils.sistra.pago.Pago;</text:span></text:p>
            <text:p text:style-name="P430"><text:span text:style-name="T53">import</text:span><text:span text:style-name="T70"> es.caib.distribucio.rest.client.integracio.BackofficeIntegracioRestClient;</text:span></text:p>
            <text:p text:style-name="P430"><text:span text:style-name="T53">import</text:span><text:span text:style-name="T70"> es.caib.distribucio.rest.client.integracio.BackofficeIntegracioRestClientFactory;</text:span></text:p>
            <text:p text:style-name="P430"><text:span text:style-name="T53">import</text:span><text:span text:style-name="T70"> es.caib.distribucio.rest.client.integracio.domini.Annex;</text:span></text:p>
            <text:p text:style-name="P430"><text:span text:style-name="T53">import</text:span><text:span text:style-name="T70"> es.caib.distribucio.rest.client.integracio.domini.AnotacioRegistreEntrada;</text:span></text:p>
            <text:p text:style-name="P430"><text:span text:style-name="T53">import</text:span><text:span text:style-name="T70"> es.caib.distribucio.rest.client.integracio.domini.AnotacioRegistreId;</text:span></text:p>
            <text:p text:style-name="P430"><text:span text:style-name="T53">import</text:span><text:span text:style-name="T70"> es.caib.distribucio.rest.client.integracio.domini.Estat;</text:span></text:p>
            <text:p text:style-name="P430"><text:span text:style-name="T53">import</text:span><text:span text:style-name="T70"> es.caib.pluginsib.arxiu.api.ContingutArxiu;</text:span></text:p>
            <text:p text:style-name="P430"><text:span text:style-name="T53">import</text:span><text:span text:style-name="T70"> es.caib.pluginsib.arxiu.api.Document;</text:span></text:p>
            <text:p text:style-name="P430"><text:span text:style-name="T53">import</text:span><text:span text:style-name="T70"> es.caib.pluginsib.arxiu.api.Expedient;</text:span></text:p>
            <text:p text:style-name="P430"><text:span text:style-name="T53">import</text:span><text:span text:style-name="T70"> es.caib.pluginsib.arxiu.api.IArxiuPlugin;</text:span></text:p>
            <text:p text:style-name="P430"><text:span text:style-name="T53">import</text:span><text:span text:style-name="T70"> es.caib.pluginsib.arxiu.caib.ArxiuPluginCaib;</text:span></text:p>
            <text:p text:style-name="P430"><text:span text:style-name="T53">import</text:span><text:span text:style-name="T70"> io.swagger.v3.oas.annotations.tags.Tag;</text:span></text:p>
            <text:p text:style-name="P430"><text:span text:style-name="T53">import</text:span><text:span text:style-name="T70"> lombok.extern.slf4j.Slf4j;</text:span></text:p>
            <text:p text:style-name="P429"><text:span text:style-name="T382"><text:line-break/><text:line-break/></text:span><text:span text:style-name="T394">/**<text:line-break/> * Controlador REST per rebre les comunicacions d'anotacions pendents via API REST com<text:line-break/> * a backoffice de Distribucio. És un controlador només de proves, és el mètode API<text:line-break/> * REST que han d'implementar els propis backoffices per rebre anotacions pendents via API REST.<text:line-break/> * <text:line-break/> * <text:line-break/> * </text:span><text:span text:style-name="T399">@author </text:span><text:span text:style-name="T394">Limit Tecnologies </text:span><text:span text:style-name="T400">&lt;limit</text:span><text:span text:style-name="T394">@limit.es&gt;<text:line-break/> */<text:line-break/></text:span><text:span text:style-name="T395">@</text:span><text:span text:style-name="T396">Controller</text:span><text:span text:style-name="T401"><text:line-break/></text:span><text:soft-page-break/><text:span text:style-name="T395">@RequestMapping</text:span><text:span text:style-name="T95">(</text:span><text:span text:style-name="T389">"/</text:span><text:span text:style-name="T390">rest</text:span><text:span text:style-name="T389">/backoffice"</text:span><text:span text:style-name="T95">)</text:span><text:span text:style-name="T401"><text:line-break/></text:span><text:span text:style-name="T57">public</text:span><text:span text:style-name="T70"> </text:span><text:span text:style-name="T53">class</text:span><text:span text:style-name="T70"> </text:span><text:span text:style-name="T95">BackofficeRestController</text:span><text:span text:style-name="T382"> </text:span><text:span text:style-name="T57">implements</text:span><text:span text:style-name="T70"> ArxiuPluginListener </text:span><text:span text:style-name="T95"><text:s/>{</text:span><text:span text:style-name="T382"><text:line-break/><text:tab/></text:span><text:span text:style-name="T395"><text:line-break/></text:span><text:span text:style-name="T79"><text:tab/></text:span><text:span text:style-name="T246">// Dades per consultar l'anotacio</text:span></text:p>
            <text:p text:style-name="P430"><text:span text:style-name="T70"><text:tab/></text:span><text:span text:style-name="T53">public</text:span><text:span text:style-name="T70"> </text:span><text:span text:style-name="T53">static</text:span><text:span text:style-name="T70"> String </text:span><text:span text:style-name="T102">BASE_URL</text:span><text:span text:style-name="T70"> = </text:span><text:span text:style-name="T40">"https://se.caib.es/distribucioapi/interna"</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USERNAME</text:span><text:span text:style-name="T70"> = </text:span><text:span text:style-name="T40">"$usuari_dis"</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PASSWORD</text:span><text:span text:style-name="T70"> = </text:span><text:span text:style-name="T40">"****"</text:span><text:span text:style-name="T70">;</text:span></text:p>
            <text:p text:style-name="P428"/>
            <text:p text:style-name="P430"><text:span text:style-name="T70"><text:tab/></text:span><text:span text:style-name="T246">// Dades per configurar el plugin d'Arxiu.</text:span></text:p>
            <text:p text:style-name="P430"><text:span text:style-name="T70"><text:tab/></text:span><text:span text:style-name="T53">public</text:span><text:span text:style-name="T70"> </text:span><text:span text:style-name="T53">static</text:span><text:span text:style-name="T70"> String </text:span><text:span text:style-name="T102">ARXIU_URL</text:span><text:span text:style-name="T70"> = </text:span><text:span text:style-name="T40">"https://esbse.caib.es:4430/esb"</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APP_CODI</text:span><text:span text:style-name="T70"> = </text:span><text:span text:style-name="T40">"APP_CODI"</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USUARI</text:span><text:span text:style-name="T70">= </text:span><text:span text:style-name="T40">"usuari_arxiu"</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PASSWORD</text:span><text:span text:style-name="T70"> = </text:span><text:span text:style-name="T40">"****"</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IMPRIMIBLE_URl</text:span><text:span text:style-name="T70"> = </text:span><text:span text:style-name="T40">"https://se.caib.es/concsvapi/interna/printable/uuid"</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IMPRIMIBLE_USUARI</text:span><text:span text:style-name="T70"> = </text:span><text:span text:style-name="T40">"$usuari_concsv_se"</text:span><text:span text:style-name="T70">;</text:span></text:p>
            <text:p text:style-name="P430"><text:span text:style-name="T70"><text:tab/></text:span><text:span text:style-name="T53">public</text:span><text:span text:style-name="T70"> </text:span><text:span text:style-name="T53">static</text:span><text:span text:style-name="T70"> String </text:span><text:span text:style-name="T102">ARXIU_IMPRIMIBLE_PASSWORD</text:span><text:span text:style-name="T70"> = </text:span><text:span text:style-name="T40">"****"</text:span><text:span text:style-name="T70">;</text:span></text:p>
            <text:p text:style-name="P429"><text:span text:style-name="T382"><text:line-break/><text:tab/><text:line-break/></text:span><text:span text:style-name="T79"><text:tab/></text:span><text:span text:style-name="T225">/** Mètode API REST que el backoffice ha d'implementar per rebre les anotacions pendents. */</text:span></text:p>
            <text:p text:style-name="P429"><text:span text:style-name="T382"><text:tab/></text:span><text:span text:style-name="T395">@RequestMapping</text:span><text:span text:style-name="T95">(value = </text:span><text:span text:style-name="T389">"/comunicarAnotacionsPendents"</text:span><text:span text:style-name="T95">, method = RequestMethod.</text:span><text:span text:style-name="T387">POST</text:span><text:span text:style-name="T95">)</text:span><text:span text:style-name="T382"><text:line-break/><text:tab/></text:span><text:span text:style-name="T395">@ResponseBody<text:line-break/><text:tab/></text:span><text:span text:style-name="T377">public </text:span><text:span text:style-name="T95">ResponseEntity&lt;Object&gt;</text:span><text:span text:style-name="T382"> </text:span><text:span text:style-name="T403">comunicarAnotacionsPendents</text:span><text:span text:style-name="T95">(<text:tab/><text:tab/><text:tab/><text:line-break/><text:tab/><text:tab/><text:tab/>HttpServletRequest request,</text:span><text:span text:style-name="T382"><text:line-break/><text:tab/><text:tab/><text:tab/></text:span><text:span text:style-name="T395">@RequestBody</text:span><text:span text:style-name="T95">(required = </text:span><text:span text:style-name="T377">true</text:span><text:span text:style-name="T95">) List&lt;AnotacioRegistreId&gt; ids) {</text:span><text:span text:style-name="T382"><text:line-break/></text:span><text:span text:style-name="T79"><text:tab/><text:tab/></text:span><text:span text:style-name="T103">log</text:span><text:span text:style-name="T70">.info(</text:span><text:span text:style-name="T40">"Rebuda la comunicació de "</text:span><text:span text:style-name="T70"> + </text:span><text:span text:style-name="T108">ids</text:span><text:span text:style-name="T70">.size() + </text:span><text:span text:style-name="T40">"anotacions de registre de Distribucio. Inici del processament."</text:span><text:span text:style-name="T70">);</text:span></text:p>
            <text:p text:style-name="P430"><text:span text:style-name="T70"><text:tab/><text:tab/></text:span><text:span text:style-name="T53">try</text:span><text:span text:style-name="T70"> {</text:span></text:p>
            <text:p text:style-name="P430"><text:span text:style-name="T70"><text:tab/><text:tab/><text:tab/></text:span><text:span text:style-name="T246">// Client dels serveis web de backoffice per consultar anotacions</text:span></text:p>
            <text:p text:style-name="P430"><text:span text:style-name="T70"><text:tab/><text:tab/><text:tab/></text:span></text:p>
            <text:p text:style-name="P430"><text:span text:style-name="T70"><text:tab/><text:tab/><text:tab/></text:span><text:span text:style-name="T246">// Configura el client API REST</text:span></text:p>
            <text:p text:style-name="P430"><text:span text:style-name="T70"><text:tab/><text:tab/><text:tab/>BackofficeIntegracioRestClient </text:span><text:span text:style-name="T108">backofficeClient</text:span><text:span text:style-name="T70"> = </text:span></text:p>
            <text:p text:style-name="P430"><text:span text:style-name="T70"><text:tab/><text:tab/><text:tab/><text:tab/><text:tab/>BackofficeIntegracioRestClientFactory.</text:span><text:span text:style-name="T80">getRestClient</text:span><text:span text:style-name="T70">(</text:span><text:span text:style-name="T102">BASE_URL</text:span><text:span text:style-name="T70">, </text:span><text:span text:style-name="T102">USERNAME</text:span><text:span text:style-name="T70">, </text:span><text:span text:style-name="T102">PASSWORD</text:span><text:span text:style-name="T70">);</text:span></text:p>
            <text:p text:style-name="P428"/>
            <text:p text:style-name="P430"><text:span text:style-name="T70"><text:tab/><text:tab/><text:tab/></text:span><text:span text:style-name="T246">// Configura el pluginArxiuCaib que s'usarà per consultar i moure annexos.</text:span></text:p>
            <text:p text:style-name="P430"><text:span text:style-name="T70"><text:tab/><text:tab/><text:tab/>Properties </text:span><text:span text:style-name="T108">properties</text:span><text:span text:style-name="T70"> = </text:span><text:span text:style-name="T53">new</text:span><text:span text:style-name="T70"> Properties();</text:span></text:p>
            <text:p text:style-name="P430"><text:span text:style-name="T70"><text:tab/><text:tab/><text:tab/></text:span><text:span text:style-name="T108">properties</text:span><text:span text:style-name="T70">.put(</text:span><text:span text:style-name="T40">"pluginsib.arxiu.caib.base.url"</text:span><text:span text:style-name="T70">, </text:span><text:span text:style-name="T102">ARXIU_URL</text:span><text:span text:style-name="T70">);</text:span></text:p>
            <text:p text:style-name="P430"><text:span text:style-name="T70"><text:tab/><text:tab/><text:tab/></text:span><text:span text:style-name="T108">properties</text:span><text:span text:style-name="T70">.put(</text:span><text:span text:style-name="T40">"pluginsib.arxiu.caib.aplicacio.codi"</text:span><text:span text:style-name="T70">, </text:span><text:span text:style-name="T102">ARXIU_APP_CODI</text:span><text:span text:style-name="T70">);</text:span></text:p>
            <text:p text:style-name="P430"><text:span text:style-name="T70"><text:tab/><text:tab/><text:tab/></text:span><text:span text:style-name="T108">properties</text:span><text:span text:style-name="T70">.put(</text:span><text:span text:style-name="T40">"pluginsib.arxiu.caib.usuari"</text:span><text:span text:style-name="T70">, </text:span><text:span text:style-name="T102">ARXIU_USUARI</text:span><text:span text:style-name="T70">);</text:span></text:p>
            <text:p text:style-name="P430"><text:span text:style-name="T70"><text:tab/><text:tab/><text:tab/></text:span><text:span text:style-name="T108">properties</text:span><text:span text:style-name="T70">.put(</text:span><text:span text:style-name="T40">"pluginsib.arxiu.caib.contrasenya"</text:span><text:span text:style-name="T70">, </text:span><text:span text:style-name="T102">ARXIU_PASSWORD</text:span><text:span text:style-name="T70">);</text:span></text:p>
            <text:p text:style-name="P430"><text:span text:style-name="T70"><text:tab/><text:tab/><text:tab/></text:span><text:span text:style-name="T108">properties</text:span><text:span text:style-name="T70">.put(</text:span><text:span text:style-name="T40">"pluginsib.arxiu.caib.conversio.imprimible.url"</text:span><text:span text:style-name="T70">, </text:span><text:span text:style-name="T102">ARXIU_IMPRIMIBLE_URl</text:span><text:span text:style-name="T70">);</text:span></text:p>
            <text:p text:style-name="P430"><text:span text:style-name="T70"><text:tab/><text:tab/><text:tab/></text:span><text:span text:style-name="T108">properties</text:span><text:span text:style-name="T70">.put(</text:span><text:span text:style-name="T40">"pluginsib.arxiu.caib.conversio.imprimible.usuari"</text:span><text:span text:style-name="T70">, </text:span><text:span text:style-name="T102">ARXIU_IMPRIMIBLE_USUARI</text:span><text:span text:style-name="T70">);</text:span></text:p>
            <text:p text:style-name="P430"><text:span text:style-name="T70"><text:tab/><text:tab/><text:tab/></text:span><text:span text:style-name="T108">properties</text:span><text:span text:style-name="T70">.put(</text:span><text:span text:style-name="T40">"pluginsib.arxiu.caib.conversio.imprimible.contrasenya"</text:span><text:span text:style-name="T70">, </text:span><text:span text:style-name="T102">ARXIU_IMPRIMIBLE_PASSWORD</text:span><text:span text:style-name="T70">);</text:span></text:p>
            <text:p text:style-name="P430"><text:span text:style-name="T70"><text:tab/><text:tab/><text:tab/>IArxiuPlugin </text:span><text:span text:style-name="T108">arxiuPlugin</text:span><text:span text:style-name="T70"> = </text:span><text:span text:style-name="T53">new</text:span><text:span text:style-name="T70"> ArxiuPluginCaib(</text:span><text:span text:style-name="T40">""</text:span><text:span text:style-name="T70">, </text:span><text:span text:style-name="T108">properties</text:span><text:span text:style-name="T70">);</text:span></text:p>
            <text:p text:style-name="P428"/>
            <text:p text:style-name="P430"><text:span text:style-name="T70"><text:tab/><text:tab/><text:tab/></text:span><text:span text:style-name="T53">for</text:span><text:span text:style-name="T70"> (AnotacioRegistreId </text:span><text:span text:style-name="T108">id</text:span><text:span text:style-name="T70"> : </text:span><text:span text:style-name="T108">ids</text:span><text:span text:style-name="T70">) {</text:span></text:p>
            <text:p text:style-name="P430"><text:span text:style-name="T70"><text:tab/><text:tab/><text:tab/><text:tab/></text:span><text:span text:style-name="T53">try</text:span><text:span text:style-name="T70"> {</text:span></text:p>
            <text:p text:style-name="P430"><text:soft-page-break/><text:span text:style-name="T70"><text:tab/><text:tab/><text:tab/><text:tab/><text:tab/></text:span><text:span text:style-name="T246">// Consulta l'anotació</text:span></text:p>
            <text:p text:style-name="P430"><text:span text:style-name="T70"><text:tab/><text:tab/><text:tab/><text:tab/><text:tab/>AnotacioRegistreEntrada </text:span><text:span text:style-name="T108">anotacio</text:span><text:span text:style-name="T70"> = </text:span><text:span text:style-name="T108">backofficeClient</text:span><text:span text:style-name="T70">.consulta(</text:span><text:span text:style-name="T108">id</text:span><text:span text:style-name="T70">);</text:span></text:p>
            <text:p text:style-name="P430"><text:span text:style-name="T70"><text:tab/><text:tab/><text:tab/><text:tab/><text:tab/></text:span><text:span text:style-name="T246">// Canvia l'estat a Rebuda</text:span></text:p>
            <text:p text:style-name="P430"><text:span text:style-name="T70"><text:tab/><text:tab/><text:tab/><text:tab/><text:tab/></text:span><text:span text:style-name="T108">backofficeClient</text:span><text:span text:style-name="T70">.canviEstat(</text:span></text:p>
            <text:p text:style-name="P430"><text:span text:style-name="T70"><text:tab/><text:tab/><text:tab/><text:tab/><text:tab/><text:tab/><text:tab/></text:span><text:span text:style-name="T108">id</text:span><text:span text:style-name="T70">,</text:span></text:p>
            <text:p text:style-name="P430"><text:span text:style-name="T70"><text:tab/><text:tab/><text:tab/><text:tab/><text:tab/><text:tab/><text:tab/>Estat.</text:span><text:span text:style-name="T103">REBUDA</text:span><text:span text:style-name="T70">,</text:span></text:p>
            <text:p text:style-name="P430"><text:span text:style-name="T70"><text:tab/><text:tab/><text:tab/><text:tab/><text:tab/><text:tab/><text:tab/></text:span><text:span text:style-name="T40">"Canviar l'estat a rebuda"</text:span><text:span text:style-name="T70">);</text:span></text:p>
            <text:p text:style-name="P430"><text:span text:style-name="T70"><text:tab/><text:tab/><text:tab/><text:tab/><text:tab/></text:span></text:p>
            <text:p text:style-name="P430"><text:span text:style-name="T70"><text:tab/><text:tab/><text:tab/><text:tab/><text:tab/></text:span><text:span text:style-name="T246">// Prepara la cria a la llibreria d'utilitats pel backoffice de DISTRIBUCIO</text:span></text:p>
            <text:p text:style-name="P430"><text:span text:style-name="T70"><text:tab/><text:tab/><text:tab/><text:tab/><text:tab/></text:span><text:span text:style-name="T246">// Constructor amb la referència al plugin d'Arxiu</text:span></text:p>
            <text:p text:style-name="P430"><text:span text:style-name="T70"><text:tab/><text:tab/><text:tab/><text:tab/><text:tab/>BackofficeArxiuUtils </text:span><text:span text:style-name="T108">backofficeArxiuUtils</text:span><text:span text:style-name="T70"> = </text:span><text:span text:style-name="T53">new</text:span><text:span text:style-name="T70"> BackofficeArxiuUtilsImpl(</text:span><text:span text:style-name="T108">arxiuPlugin</text:span><text:span text:style-name="T70">);</text:span></text:p>
            <text:p text:style-name="P430"><text:span text:style-name="T70"><text:tab/><text:tab/><text:tab/><text:tab/><text:tab/></text:span><text:span text:style-name="T246">// Afegeix la instància de la classe com a escoltador d'events</text:span></text:p>
            <text:p text:style-name="P430"><text:span text:style-name="T70"><text:tab/><text:tab/><text:tab/><text:tab/><text:tab/></text:span><text:span text:style-name="T108">backofficeArxiuUtils</text:span><text:span text:style-name="T70">.setArxiuPluginListener(</text:span><text:span text:style-name="T53">this</text:span><text:span text:style-name="T70">);</text:span></text:p>
            <text:p text:style-name="P430"><text:span text:style-name="T70"><text:tab/><text:tab/><text:tab/><text:tab/><text:tab/></text:span><text:span text:style-name="T246">// Estableix la carpeta on guardar els annexos de l'anotació</text:span></text:p>
            <text:p text:style-name="P430"><text:span text:style-name="T70"><text:tab/><text:tab/><text:tab/><text:tab/><text:tab/></text:span><text:span text:style-name="T108">backofficeArxiuUtils</text:span><text:span text:style-name="T70">.setCarpeta(</text:span><text:span text:style-name="T108">anotacio</text:span><text:span text:style-name="T70">.getIdentificador());</text:span></text:p>
            <text:p text:style-name="P430"><text:span text:style-name="T70"><text:tab/><text:tab/></text:span></text:p>
            <text:p text:style-name="P430"><text:span text:style-name="T70"><text:tab/><text:tab/><text:tab/><text:tab/><text:tab/></text:span><text:span text:style-name="T246">// Crida a la creació de l'expedient</text:span></text:p>
            <text:p text:style-name="P430"><text:span text:style-name="T70"><text:tab/><text:tab/><text:tab/><text:tab/><text:tab/>String </text:span><text:span text:style-name="T108">SERIE_DOCUMENTAL</text:span><text:span text:style-name="T70"> = </text:span><text:span text:style-name="T40">"S0002"</text:span><text:span text:style-name="T70">; </text:span></text:p>
            <text:p text:style-name="P430"><text:span text:style-name="T70"><text:tab/><text:tab/><text:tab/><text:tab/><text:tab/>String </text:span><text:span text:style-name="T108">CLASSIFICACIO</text:span><text:span text:style-name="T70"> = </text:span><text:span text:style-name="T40">"000000"</text:span><text:span text:style-name="T70">;</text:span></text:p>
            <text:p text:style-name="P430"><text:span text:style-name="T70"><text:tab/><text:tab/><text:tab/><text:tab/><text:tab/>ArxiuResultat </text:span><text:span text:style-name="T108">arxiuResultat</text:span><text:span text:style-name="T70">;</text:span></text:p>
            <text:p text:style-name="P430"><text:span text:style-name="T70"><text:tab/><text:tab/><text:tab/><text:tab/><text:tab/></text:span><text:span text:style-name="T53">int</text:span><text:span text:style-name="T70"> </text:span><text:span text:style-name="T108">intent</text:span><text:span text:style-name="T70"> = 0;</text:span></text:p>
            <text:p text:style-name="P430"><text:span text:style-name="T70"><text:tab/><text:tab/><text:tab/><text:tab/><text:tab/>String </text:span><text:span text:style-name="T108">expedientUuid</text:span><text:span text:style-name="T70"> = </text:span><text:span text:style-name="T53">null</text:span><text:span text:style-name="T70">;</text:span></text:p>
            <text:p text:style-name="P430"><text:span text:style-name="T70"><text:tab/><text:tab/><text:tab/><text:tab/><text:tab/></text:span><text:span text:style-name="T53">do</text:span><text:span text:style-name="T70"> {</text:span></text:p>
            <text:p text:style-name="P430"><text:span text:style-name="T70"><text:tab/><text:tab/><text:tab/><text:tab/><text:tab/><text:tab/></text:span><text:span text:style-name="T246">// Crida al mètode de creació de la llibreria</text:span></text:p>
            <text:p text:style-name="P430"><text:span text:style-name="T70"><text:tab/><text:tab/><text:tab/><text:tab/><text:tab/><text:tab/></text:span><text:span text:style-name="T108">arxiuResultat</text:span><text:span text:style-name="T70"> = </text:span><text:span text:style-name="T108">backofficeArxiuUtils</text:span><text:span text:style-name="T70">.crearExpedientAmbAnotacioRegistre(</text:span></text:p>
            <text:p text:style-name="P430"><text:span text:style-name="T70"><text:tab/><text:tab/><text:tab/><text:tab/><text:tab/><text:tab/><text:tab/><text:tab/></text:span><text:span text:style-name="T108">expedientUuid</text:span><text:span text:style-name="T70">,</text:span></text:p>
            <text:p text:style-name="P430"><text:span text:style-name="T70"><text:tab/><text:tab/><text:tab/><text:tab/><text:tab/><text:tab/><text:tab/><text:tab/></text:span><text:span text:style-name="T108">anotacio</text:span><text:span text:style-name="T70">.getIdentificador(),</text:span></text:p>
            <text:p text:style-name="P430"><text:span text:style-name="T70"><text:tab/><text:tab/><text:tab/><text:tab/><text:tab/><text:tab/><text:tab/><text:tab/></text:span><text:span text:style-name="T53">null</text:span><text:span text:style-name="T70">,</text:span></text:p>
            <text:p text:style-name="P430"><text:span text:style-name="T70"><text:tab/><text:tab/><text:tab/><text:tab/><text:tab/><text:tab/><text:tab/><text:tab/>Arrays.</text:span><text:span text:style-name="T80">asList</text:span><text:span text:style-name="T70">(</text:span><text:span text:style-name="T40">"A04019281"</text:span><text:span text:style-name="T70">),</text:span></text:p>
            <text:p text:style-name="P430"><text:span text:style-name="T70"><text:tab/><text:tab/><text:tab/><text:tab/><text:tab/><text:tab/><text:tab/><text:tab/></text:span><text:span text:style-name="T53">new</text:span><text:span text:style-name="T70"> Date(),</text:span></text:p>
            <text:p text:style-name="P430"><text:span text:style-name="T70"><text:tab/><text:tab/><text:tab/><text:tab/><text:tab/><text:tab/><text:tab/><text:tab/></text:span><text:span text:style-name="T108">CLASSIFICACIO</text:span><text:span text:style-name="T70">,</text:span></text:p>
            <text:p text:style-name="P430"><text:span text:style-name="T70"><text:tab/><text:tab/><text:tab/><text:tab/><text:tab/><text:tab/><text:tab/><text:tab/>ExpedientEstatEnumDto.</text:span><text:span text:style-name="T103">OBERT</text:span><text:span text:style-name="T70">,</text:span></text:p>
            <text:p text:style-name="P430"><text:span text:style-name="T70"><text:tab/><text:tab/><text:tab/><text:tab/><text:tab/><text:tab/><text:tab/><text:tab/></text:span><text:span text:style-name="T108">SERIE_DOCUMENTAL</text:span><text:span text:style-name="T70">,</text:span></text:p>
            <text:p text:style-name="P430"><text:span text:style-name="T70"><text:tab/><text:tab/><text:tab/><text:tab/><text:tab/><text:tab/><text:tab/><text:tab/></text:span><text:span text:style-name="T108">anotacio</text:span><text:span text:style-name="T70">);</text:span></text:p>
            <text:p text:style-name="P430"><text:span text:style-name="T70"><text:tab/><text:tab/><text:tab/><text:tab/><text:tab/><text:tab/></text:span><text:span text:style-name="T108">expedientUuid</text:span><text:span text:style-name="T70"> = </text:span><text:span text:style-name="T108">arxiuResultat</text:span><text:span text:style-name="T70">.getIdentificadorExpedient();</text:span></text:p>
            <text:p text:style-name="P430"><text:span text:style-name="T70"><text:tab/><text:tab/><text:tab/><text:tab/><text:tab/><text:tab/></text:span><text:span text:style-name="T246">// Imprimeix el resultat per pantalla</text:span></text:p>
            <text:p text:style-name="P430"><text:span text:style-name="T70"><text:tab/><text:tab/><text:tab/><text:tab/><text:tab/><text:tab/></text:span><text:span text:style-name="T53">this</text:span><text:span text:style-name="T70">.logResultat(</text:span></text:p>
            <text:p text:style-name="P430"><text:span text:style-name="T70"><text:tab/><text:tab/><text:tab/><text:tab/><text:tab/><text:tab/><text:tab/><text:tab/></text:span><text:span text:style-name="T40">"Resultat de la crida "</text:span><text:span text:style-name="T70"> + </text:span><text:span text:style-name="T108">intent</text:span><text:span text:style-name="T70">++ + </text:span><text:span text:style-name="T40">" crearExpedientAmbAnotacioRegistre per l'expedient"</text:span><text:span text:style-name="T70"> + </text:span><text:span text:style-name="T108">anotacio</text:span><text:span text:style-name="T70">.getExpedientNumero(),</text:span></text:p>
            <text:p text:style-name="P430"><text:span text:style-name="T70"><text:tab/><text:tab/><text:tab/><text:tab/><text:tab/><text:tab/><text:tab/><text:tab/></text:span><text:span text:style-name="T108">arxiuResultat</text:span><text:span text:style-name="T70">);<text:tab/><text:tab/><text:tab/><text:tab/><text:tab/></text:span></text:p>
            <text:p text:style-name="P430"><text:span text:style-name="T70"><text:tab/><text:tab/><text:tab/><text:tab/><text:tab/>} </text:span><text:span text:style-name="T53">while</text:span><text:span text:style-name="T70">(</text:span><text:span text:style-name="T108">arxiuResultat</text:span><text:span text:style-name="T70">.getErrorCodi() != DistribucioArxiuError.</text:span><text:span text:style-name="T103">NO_ERROR</text:span><text:span text:style-name="T70"> &amp;&amp; </text:span><text:span text:style-name="T108">intent</text:span><text:span text:style-name="T70"> &lt; 10);<text:tab/></text:span></text:p>
            <text:p text:style-name="P428"/>
            <text:p text:style-name="P430"><text:span text:style-name="T70"><text:tab/><text:tab/><text:tab/><text:tab/><text:tab/></text:span><text:span text:style-name="T246">// Consultem el nou expedient a l'Arxiu</text:span></text:p>
            <text:p text:style-name="P430"><text:span text:style-name="T70"><text:tab/><text:tab/><text:tab/><text:tab/><text:tab/></text:span><text:span text:style-name="T53">if</text:span><text:span text:style-name="T70"> (</text:span><text:span text:style-name="T108">expedientUuid</text:span><text:span text:style-name="T70"> != </text:span><text:span text:style-name="T53">null</text:span><text:span text:style-name="T70">) {</text:span></text:p>
            <text:p text:style-name="P430"><text:span text:style-name="T70"><text:tab/><text:tab/><text:tab/><text:tab/><text:tab/><text:tab/>Expedient </text:span><text:span text:style-name="T108">expedientDetalls</text:span><text:span text:style-name="T70"> = </text:span><text:span text:style-name="T108">arxiuPlugin</text:span><text:span text:style-name="T70">.expedientDetalls(</text:span><text:span text:style-name="T108">arxiuResultat</text:span><text:span text:style-name="T70">.getIdentificadorExpedient(), </text:span><text:span text:style-name="T53">null</text:span><text:span text:style-name="T70">);</text:span></text:p>
            <text:p text:style-name="P430"><text:span text:style-name="T70"><text:tab/><text:tab/><text:tab/><text:tab/><text:tab/><text:tab/></text:span><text:span text:style-name="T103">log</text:span><text:span text:style-name="T70">.debug(</text:span><text:span text:style-name="T40">"S'ha creat l'expedient \""</text:span><text:span text:style-name="T70"> + </text:span><text:soft-page-break/><text:span text:style-name="T108">expedientDetalls</text:span><text:span text:style-name="T70">.getNom() + </text:span><text:span text:style-name="T40">"\" amb id="</text:span><text:span text:style-name="T70"> + </text:span><text:span text:style-name="T108">expedientDetalls</text:span><text:span text:style-name="T70">.getIdentificador() + </text:span><text:span text:style-name="T40">" per l'anotació "</text:span><text:span text:style-name="T70"> + </text:span><text:span text:style-name="T108">anotacio</text:span><text:span text:style-name="T70">.getIdentificador() + </text:span><text:span text:style-name="T40">" amb els següents continguts:"</text:span><text:span text:style-name="T70">);</text:span></text:p>
            <text:p text:style-name="P430"><text:span text:style-name="T70"><text:tab/><text:tab/><text:tab/><text:tab/><text:tab/><text:tab/></text:span><text:span text:style-name="T53">for</text:span><text:span text:style-name="T70"> (ContingutArxiu </text:span><text:span text:style-name="T108">contingut</text:span><text:span text:style-name="T70"> : </text:span><text:span text:style-name="T108">expedientDetalls</text:span><text:span text:style-name="T70">.getContinguts()) {</text:span></text:p>
            <text:p text:style-name="P430"><text:span text:style-name="T70"><text:tab/><text:tab/><text:tab/><text:tab/><text:tab/><text:tab/><text:tab/></text:span><text:span text:style-name="T103">log</text:span><text:span text:style-name="T70">.debug(</text:span><text:span text:style-name="T40">"- "</text:span><text:span text:style-name="T70"> + </text:span><text:span text:style-name="T108">contingut</text:span><text:span text:style-name="T70">.getIdentificador() + </text:span><text:span text:style-name="T40">" "</text:span><text:span text:style-name="T70"> + </text:span><text:span text:style-name="T108">contingut</text:span><text:span text:style-name="T70">.getNom() + </text:span><text:span text:style-name="T40">" amb "</text:span><text:span text:style-name="T70"> + (</text:span><text:span text:style-name="T108">contingut</text:span><text:span text:style-name="T70">.getFirmes() != </text:span><text:span text:style-name="T53">null</text:span><text:span text:style-name="T70">? </text:span><text:span text:style-name="T108">contingut</text:span><text:span text:style-name="T70">.getFirmes().size() : 0) + </text:span><text:span text:style-name="T40">" firmes."</text:span><text:span text:style-name="T70">);</text:span></text:p>
            <text:p text:style-name="P430"><text:span text:style-name="T70"><text:tab/><text:tab/><text:tab/><text:tab/><text:tab/><text:tab/>}</text:span></text:p>
            <text:p text:style-name="P430"><text:span text:style-name="T70"><text:tab/><text:tab/><text:tab/><text:tab/><text:tab/>} </text:span><text:span text:style-name="T53">else</text:span><text:span text:style-name="T70"> {</text:span></text:p>
            <text:p text:style-name="P430"><text:span text:style-name="T70"><text:tab/><text:tab/><text:tab/><text:tab/><text:tab/><text:tab/></text:span><text:span text:style-name="T103">log</text:span><text:span text:style-name="T70">.warn(</text:span><text:span text:style-name="T40">"L'expedient no s'ha pogut crear per l'anotació "</text:span><text:span text:style-name="T70"> + </text:span><text:span text:style-name="T108">anotacio</text:span><text:span text:style-name="T70">.getIdentificador());</text:span></text:p>
            <text:p text:style-name="P430"><text:span text:style-name="T70"><text:tab/><text:tab/><text:tab/><text:tab/><text:tab/>}</text:span></text:p>
            <text:p text:style-name="P430"><text:span text:style-name="T70"><text:tab/><text:tab/><text:tab/><text:tab/><text:tab/></text:span><text:span text:style-name="T246">// Processament dels annexos de documents tècnics segons el títol</text:span></text:p>
            <text:p text:style-name="P430"><text:span text:style-name="T70"><text:tab/><text:tab/><text:tab/><text:tab/><text:tab/>String </text:span><text:span text:style-name="T108">titol</text:span><text:span text:style-name="T70">;</text:span></text:p>
            <text:p text:style-name="P430"><text:span text:style-name="T70"><text:tab/><text:tab/><text:tab/><text:tab/><text:tab/></text:span><text:span text:style-name="T53">for</text:span><text:span text:style-name="T70"> (Annex </text:span><text:span text:style-name="T108">annex</text:span><text:span text:style-name="T70"> : </text:span><text:span text:style-name="T108">anotacio</text:span><text:span text:style-name="T70">.getAnnexos()) {</text:span></text:p>
            <text:p text:style-name="P430"><text:span text:style-name="T70"><text:tab/><text:tab/><text:tab/><text:tab/><text:tab/><text:tab/></text:span><text:span text:style-name="T108">titol</text:span><text:span text:style-name="T70"> = </text:span><text:span text:style-name="T108">annex</text:span><text:span text:style-name="T70">.getTitol();</text:span></text:p>
            <text:p text:style-name="P430"><text:span text:style-name="T70"><text:tab/><text:tab/><text:tab/><text:tab/><text:tab/><text:tab/></text:span><text:span text:style-name="T53">if</text:span><text:span text:style-name="T70"> (</text:span><text:span text:style-name="T108">titol</text:span><text:span text:style-name="T70"> != </text:span><text:span text:style-name="T53">null</text:span><text:span text:style-name="T70"> </text:span></text:p>
            <text:p text:style-name="P430"><text:span text:style-name="T70"><text:tab/><text:tab/><text:tab/><text:tab/><text:tab/><text:tab/><text:tab/><text:tab/>&amp;&amp; (</text:span><text:span text:style-name="T40">"FORMULARIO"</text:span><text:span text:style-name="T70">.equals(</text:span><text:span text:style-name="T108">titol</text:span><text:span text:style-name="T70">) </text:span></text:p>
            <text:p text:style-name="P430"><text:span text:style-name="T70"><text:tab/><text:tab/><text:tab/><text:tab/><text:tab/><text:tab/><text:tab/><text:tab/><text:tab/><text:tab/>|| </text:span><text:span text:style-name="T40">"PAGO"</text:span><text:span text:style-name="T70">.equals(</text:span><text:span text:style-name="T108">titol</text:span><text:span text:style-name="T70">))) {</text:span></text:p>
            <text:p text:style-name="P430"><text:span text:style-name="T70"><text:tab/><text:tab/><text:tab/><text:tab/><text:tab/><text:tab/><text:tab/></text:span><text:span text:style-name="T246">// Recupera el contingut de l'annex</text:span></text:p>
            <text:p text:style-name="P430"><text:span text:style-name="T70"><text:tab/><text:tab/><text:tab/><text:tab/><text:tab/><text:tab/><text:tab/>Document </text:span><text:span text:style-name="T108">document</text:span><text:span text:style-name="T70"> = </text:span><text:span text:style-name="T108">arxiuPlugin</text:span><text:span text:style-name="T70">.documentDetalls(</text:span><text:span text:style-name="T108">annex</text:span><text:span text:style-name="T70">.getUuid(), </text:span><text:span text:style-name="T53">null</text:span><text:span text:style-name="T70">, </text:span><text:span text:style-name="T53">true</text:span><text:span text:style-name="T70">);<text:tab/><text:tab/><text:tab/><text:tab/><text:tab/><text:tab/><text:tab/></text:span></text:p>
            <text:p text:style-name="P430"><text:span text:style-name="T70"><text:tab/><text:tab/><text:tab/><text:tab/><text:tab/><text:tab/><text:tab/></text:span><text:span text:style-name="T53">byte</text:span><text:span text:style-name="T70">[] </text:span><text:span text:style-name="T108">contingut</text:span><text:span text:style-name="T70"> = </text:span><text:span text:style-name="T108">document</text:span><text:span text:style-name="T70">.getContingut().getContingut();</text:span></text:p>
            <text:p text:style-name="P430"><text:span text:style-name="T70"><text:tab/><text:tab/><text:tab/><text:tab/><text:tab/><text:tab/><text:tab/></text:span><text:span text:style-name="T246">// Interpreta el contingut amb la classe BackofficeSistra2Utils</text:span></text:p>
            <text:p text:style-name="P430"><text:span text:style-name="T70"><text:tab/><text:tab/><text:tab/><text:tab/><text:tab/><text:tab/><text:tab/>BackofficeSistra2Utils </text:span><text:span text:style-name="T108">sistra2Utils</text:span><text:span text:style-name="T70"> = </text:span><text:span text:style-name="T53">new</text:span><text:span text:style-name="T70"> BackofficeSistra2UtilsImpl();</text:span></text:p>
            <text:p text:style-name="P430"><text:span text:style-name="T70"><text:tab/><text:tab/><text:tab/><text:tab/><text:tab/><text:tab/><text:tab/></text:span><text:span text:style-name="T103">log</text:span><text:span text:style-name="T70">.debug(</text:span><text:span text:style-name="T40">" <text:s/>Document tècnic \""</text:span><text:span text:style-name="T70"> + </text:span><text:span text:style-name="T108">titol</text:span><text:span text:style-name="T70"> + </text:span><text:span text:style-name="T40">"\". Dades:"</text:span><text:span text:style-name="T70">);</text:span></text:p>
            <text:p text:style-name="P430"><text:span text:style-name="T70"><text:tab/><text:tab/><text:tab/><text:tab/><text:tab/><text:tab/><text:tab/></text:span><text:span text:style-name="T53">try</text:span><text:span text:style-name="T70"> {</text:span></text:p>
            <text:p text:style-name="P430"><text:span text:style-name="T70"><text:tab/><text:tab/><text:tab/><text:tab/><text:tab/><text:tab/><text:tab/><text:tab/></text:span><text:span text:style-name="T53">if</text:span><text:span text:style-name="T70"> (</text:span><text:span text:style-name="T40">"FORMULARIO"</text:span><text:span text:style-name="T70">.equals(</text:span><text:span text:style-name="T108">titol</text:span><text:span text:style-name="T70">)) {</text:span></text:p>
            <text:p text:style-name="P430"><text:span text:style-name="T70"><text:tab/><text:tab/><text:tab/><text:tab/><text:tab/><text:tab/><text:tab/><text:tab/><text:tab/>Formulario </text:span><text:span text:style-name="T108">formulario</text:span><text:span text:style-name="T70"> = </text:span><text:span text:style-name="T108">sistra2Utils</text:span><text:span text:style-name="T70">.parseXmlFormulario(</text:span><text:span text:style-name="T108">contingut</text:span><text:span text:style-name="T70">);</text:span></text:p>
            <text:p text:style-name="P430"><text:span text:style-name="T70"><text:tab/><text:tab/><text:tab/><text:tab/><text:tab/><text:tab/><text:tab/><text:tab/><text:tab/></text:span><text:span text:style-name="T103">log</text:span><text:span text:style-name="T70">.debug(</text:span><text:span text:style-name="T40">" <text:s/>formulario: "</text:span><text:span text:style-name="T70"> + ToStringBuilder.</text:span><text:span text:style-name="T80">reflectionToString</text:span><text:span text:style-name="T70">(</text:span><text:span text:style-name="T108">formulario</text:span><text:span text:style-name="T70">));<text:tab/><text:tab/><text:tab/><text:tab/><text:tab/><text:tab/><text:tab/><text:tab/></text:span></text:p>
            <text:p text:style-name="P430"><text:span text:style-name="T70"><text:tab/><text:tab/><text:tab/><text:tab/><text:tab/><text:tab/><text:tab/><text:tab/>} </text:span><text:span text:style-name="T53">else</text:span><text:span text:style-name="T70"> </text:span><text:span text:style-name="T53">if</text:span><text:span text:style-name="T70"> (</text:span><text:span text:style-name="T40">"PAGO"</text:span><text:span text:style-name="T70">.equals(</text:span><text:span text:style-name="T108">titol</text:span><text:span text:style-name="T70">)) {</text:span></text:p>
            <text:p text:style-name="P430"><text:span text:style-name="T70"><text:tab/><text:tab/><text:tab/><text:tab/><text:tab/><text:tab/><text:tab/><text:tab/><text:tab/>Pago </text:span><text:span text:style-name="T108">pago</text:span><text:span text:style-name="T70"> = </text:span><text:span text:style-name="T108">sistra2Utils</text:span><text:span text:style-name="T70">.parseXmlPago(</text:span><text:span text:style-name="T108">contingut</text:span><text:span text:style-name="T70">);</text:span></text:p>
            <text:p text:style-name="P430"><text:span text:style-name="T70"><text:tab/><text:tab/><text:tab/><text:tab/><text:tab/><text:tab/><text:tab/><text:tab/><text:tab/></text:span><text:span text:style-name="T103">log</text:span><text:span text:style-name="T70">.debug(</text:span><text:span text:style-name="T40">" <text:s/>pago: "</text:span><text:span text:style-name="T70"> + ToStringBuilder.</text:span><text:span text:style-name="T80">reflectionToString</text:span><text:span text:style-name="T70">(</text:span><text:span text:style-name="T108">pago</text:span><text:span text:style-name="T70">));<text:tab/><text:tab/><text:tab/><text:tab/><text:tab/><text:tab/><text:tab/><text:tab/></text:span></text:p>
            <text:p text:style-name="P430"><text:span text:style-name="T70"><text:tab/><text:tab/><text:tab/><text:tab/><text:tab/><text:tab/><text:tab/><text:tab/>}</text:span></text:p>
            <text:p text:style-name="P430"><text:span text:style-name="T70"><text:tab/><text:tab/><text:tab/><text:tab/><text:tab/><text:tab/><text:tab/>} </text:span><text:span text:style-name="T53">catch</text:span><text:span text:style-name="T70">(Exception </text:span><text:span text:style-name="T108">e</text:span><text:span text:style-name="T70">) {<text:tab/><text:tab/><text:tab/><text:tab/><text:tab/><text:tab/><text:tab/><text:tab/></text:span></text:p>
            <text:p text:style-name="P430"><text:span text:style-name="T70"><text:tab/><text:tab/><text:tab/><text:tab/><text:tab/><text:tab/><text:tab/><text:tab/></text:span><text:span text:style-name="T103">log</text:span><text:span text:style-name="T70">.error(</text:span><text:span text:style-name="T40">"Error obtenint la informació del document tècnic "</text:span><text:span text:style-name="T70"> + </text:span><text:span text:style-name="T108">titol</text:span><text:span text:style-name="T70"> + </text:span><text:span text:style-name="T40">":"</text:span><text:span text:style-name="T70"> + </text:span><text:span text:style-name="T108">e</text:span><text:span text:style-name="T70">.getMessage(), </text:span><text:span text:style-name="T108">e</text:span><text:span text:style-name="T70">);</text:span></text:p>
            <text:p text:style-name="P430"><text:span text:style-name="T70"><text:tab/><text:tab/><text:tab/><text:tab/><text:tab/><text:tab/><text:tab/>}</text:span></text:p>
            <text:p text:style-name="P430"><text:span text:style-name="T70"><text:tab/><text:tab/><text:tab/><text:tab/><text:tab/><text:tab/>}</text:span></text:p>
            <text:p text:style-name="P428"/>
            <text:p text:style-name="P430"><text:span text:style-name="T70"><text:tab/><text:tab/><text:tab/><text:tab/><text:tab/>}</text:span></text:p>
            <text:p text:style-name="P430"><text:span text:style-name="T70"><text:tab/><text:tab/><text:tab/><text:tab/><text:tab/></text:span><text:span text:style-name="T246">// Es comunica el resultat a DISTRIBUCIO</text:span></text:p>
            <text:p text:style-name="P430"><text:span text:style-name="T70"><text:tab/><text:tab/><text:tab/><text:tab/><text:tab/></text:span><text:span text:style-name="T53">switch</text:span><text:span text:style-name="T70">(</text:span><text:span text:style-name="T108">arxiuResultat</text:span><text:span text:style-name="T70">.getErrorCodi()) {</text:span></text:p>
            <text:p text:style-name="P430"><text:span text:style-name="T70"><text:tab/><text:tab/><text:tab/><text:tab/><text:tab/><text:tab/></text:span><text:span text:style-name="T53">case</text:span><text:span text:style-name="T70"> 0:</text:span></text:p>
            <text:p text:style-name="P430"><text:span text:style-name="T70"><text:tab/><text:tab/><text:tab/><text:tab/><text:tab/><text:tab/><text:tab/></text:span><text:span text:style-name="T108">backofficeClient</text:span><text:span text:style-name="T70">.canviEstat(</text:span><text:span text:style-name="T108">id</text:span><text:span text:style-name="T70">, </text:span><text:soft-page-break/><text:span text:style-name="T70">Estat.</text:span><text:span text:style-name="T103">PROCESSADA</text:span><text:span text:style-name="T70">, </text:span><text:span text:style-name="T40">"Processada"</text:span><text:span text:style-name="T70">);</text:span></text:p>
            <text:p text:style-name="P430"><text:span text:style-name="T70"><text:tab/><text:tab/><text:tab/><text:tab/><text:tab/><text:tab/><text:tab/></text:span><text:span text:style-name="T53">break</text:span><text:span text:style-name="T70">;</text:span></text:p>
            <text:p text:style-name="P430"><text:span text:style-name="T70"><text:tab/><text:tab/><text:tab/><text:tab/><text:tab/><text:tab/></text:span><text:span text:style-name="T53">default</text:span><text:span text:style-name="T70">:</text:span></text:p>
            <text:p text:style-name="P430"><text:span text:style-name="T70"><text:tab/><text:tab/><text:tab/><text:tab/><text:tab/><text:tab/><text:tab/></text:span><text:span text:style-name="T108">backofficeClient</text:span><text:span text:style-name="T70">.canviEstat(</text:span><text:span text:style-name="T108">id</text:span><text:span text:style-name="T70">, Estat.</text:span><text:span text:style-name="T103">ERROR</text:span><text:span text:style-name="T70">, </text:span><text:span text:style-name="T108">arxiuResultat</text:span><text:span text:style-name="T70">.getErrorCodi() + </text:span><text:span text:style-name="T40">" "</text:span><text:span text:style-name="T70"> + </text:span><text:span text:style-name="T108">arxiuResultat</text:span><text:span text:style-name="T70">.getErrorMessage());</text:span></text:p>
            <text:p text:style-name="P430"><text:span text:style-name="T70"><text:tab/><text:tab/><text:tab/><text:tab/><text:tab/><text:tab/><text:tab/></text:span><text:span text:style-name="T53">break</text:span><text:span text:style-name="T70">;</text:span></text:p>
            <text:p text:style-name="P430"><text:span text:style-name="T70"><text:tab/><text:tab/><text:tab/><text:tab/><text:tab/>}</text:span></text:p>
            <text:p text:style-name="P430"><text:span text:style-name="T70"><text:tab/><text:tab/><text:tab/><text:tab/>} </text:span><text:span text:style-name="T53">catch</text:span><text:span text:style-name="T70"> (Throwable </text:span><text:span text:style-name="T108">ex</text:span><text:span text:style-name="T70">) {</text:span></text:p>
            <text:p text:style-name="P430"><text:span text:style-name="T70"><text:tab/><text:tab/><text:tab/><text:tab/><text:tab/></text:span><text:span text:style-name="T103">log</text:span><text:span text:style-name="T70">.error(</text:span><text:span text:style-name="T40">"Error al processant la petició d'anotació amb id "</text:span><text:span text:style-name="T70"> + </text:span><text:span text:style-name="T108">id</text:span><text:span text:style-name="T70">.getIdentificador(), </text:span><text:span text:style-name="T108">ex</text:span><text:span text:style-name="T70">);</text:span></text:p>
            <text:p text:style-name="P430"><text:span text:style-name="T70"><text:tab/><text:tab/><text:tab/><text:tab/>}</text:span></text:p>
            <text:p text:style-name="P430"><text:span text:style-name="T70"><text:tab/><text:tab/><text:tab/>}</text:span></text:p>
            <text:p text:style-name="P430"><text:span text:style-name="T70"><text:tab/><text:tab/>} </text:span><text:span text:style-name="T53">catch</text:span><text:span text:style-name="T70">(Exception </text:span><text:span text:style-name="T108">e</text:span><text:span text:style-name="T70">) {</text:span></text:p>
            <text:p text:style-name="P430"><text:span text:style-name="T70"><text:tab/><text:tab/><text:tab/></text:span><text:span text:style-name="T103">log</text:span><text:span text:style-name="T70">.error(</text:span><text:span text:style-name="T40">"Error en el tractament de la comunicació d'anotacions pendents: "</text:span><text:span text:style-name="T70"> + </text:span><text:span text:style-name="T108">e</text:span><text:span text:style-name="T70">.getMessage());</text:span></text:p>
            <text:p text:style-name="P430"><text:span text:style-name="T70"><text:tab/><text:tab/><text:tab/></text:span><text:span text:style-name="T53">return</text:span><text:span text:style-name="T70"> </text:span><text:span text:style-name="T53">new</text:span><text:span text:style-name="T70"> ResponseEntity&lt;String&gt;(</text:span><text:span text:style-name="T40">"Error processant les anotacions: "</text:span><text:span text:style-name="T70"> + </text:span><text:span text:style-name="T108">e</text:span><text:span text:style-name="T70">.getMessage(), HttpStatus.</text:span><text:span text:style-name="T103">INTERNAL_SERVER_ERROR</text:span><text:span text:style-name="T70">);</text:span></text:p>
            <text:p text:style-name="P430"><text:span text:style-name="T70"><text:tab/><text:tab/>}</text:span></text:p>
            <text:p text:style-name="P430"><text:span text:style-name="T70"><text:tab/><text:tab/></text:span><text:span text:style-name="T53">return</text:span><text:span text:style-name="T70"> </text:span><text:span text:style-name="T53">new</text:span><text:span text:style-name="T70"> ResponseEntity&lt;String&gt;(</text:span><text:span text:style-name="T40">"OK"</text:span><text:span text:style-name="T70">, HttpStatus.</text:span><text:span text:style-name="T103">OK</text:span><text:span text:style-name="T70">);</text:span></text:p>
            <text:p text:style-name="P430"><text:span text:style-name="T70"><text:tab/>}</text:span></text:p>
            <text:p text:style-name="P430"><text:span text:style-name="T70"><text:tab/></text:span></text:p>
            <text:p text:style-name="P430"><text:span text:style-name="T70"><text:tab/></text:span></text:p>
            <text:p text:style-name="P430"><text:span text:style-name="T70"><text:tab/></text:span><text:span text:style-name="T225">/** Mètode que la llibreria del backoffice de distribució crida si es fixa una instància que implementa </text:span><text:span text:style-name="T251">{@link ArxiuPluginListener}</text:span><text:span text:style-name="T225">.</text:span></text:p>
            <text:p text:style-name="P430"><text:span text:style-name="T225"><text:tab/> * </text:span></text:p>
            <text:p text:style-name="P430"><text:span text:style-name="T225"><text:tab/> */</text:span></text:p>
            <text:p text:style-name="P430"><text:span text:style-name="T70"><text:tab/></text:span><text:span text:style-name="T132">@Override</text:span></text:p>
            <text:p text:style-name="P430"><text:span text:style-name="T70"><text:tab/></text:span><text:span text:style-name="T53">public</text:span><text:span text:style-name="T70"> </text:span><text:span text:style-name="T53">void</text:span><text:span text:style-name="T70"> event(</text:span></text:p>
            <text:p text:style-name="P430"><text:span text:style-name="T70"><text:tab/><text:tab/><text:tab/>String </text:span><text:span text:style-name="T108">metode</text:span><text:span text:style-name="T70">, </text:span></text:p>
            <text:p text:style-name="P430"><text:span text:style-name="T70"><text:tab/><text:tab/><text:tab/>Map&lt;String, String&gt; </text:span><text:span text:style-name="T108">parametres</text:span><text:span text:style-name="T70">, </text:span></text:p>
            <text:p text:style-name="P430"><text:span text:style-name="T70"><text:tab/><text:tab/><text:tab/></text:span><text:span text:style-name="T53">boolean</text:span><text:span text:style-name="T70"> </text:span><text:span text:style-name="T108">correcte</text:span><text:span text:style-name="T70">, </text:span></text:p>
            <text:p text:style-name="P430"><text:span text:style-name="T70"><text:tab/><text:tab/><text:tab/>String </text:span><text:span text:style-name="T108">error</text:span><text:span text:style-name="T70">, </text:span></text:p>
            <text:p text:style-name="P430"><text:span text:style-name="T70"><text:tab/><text:tab/><text:tab/>Exception </text:span><text:span text:style-name="T108">e</text:span><text:span text:style-name="T70">,</text:span></text:p>
            <text:p text:style-name="P430"><text:span text:style-name="T70"><text:tab/><text:tab/><text:tab/></text:span><text:span text:style-name="T53">long</text:span><text:span text:style-name="T70"> </text:span><text:span text:style-name="T108">timeMs</text:span><text:span text:style-name="T70">) {</text:span></text:p>
            <text:p text:style-name="P430"><text:span text:style-name="T70"><text:tab/><text:tab/>StringBuilder </text:span><text:span text:style-name="T108">str</text:span><text:span text:style-name="T70"> = </text:span><text:span text:style-name="T53">new</text:span><text:span text:style-name="T70"> StringBuilder()</text:span></text:p>
            <text:p text:style-name="P430"><text:span text:style-name="T70"><text:tab/><text:tab/><text:tab/><text:tab/>.append(</text:span><text:span text:style-name="T40">"S'ha invocat el mètode \""</text:span><text:span text:style-name="T70">)</text:span></text:p>
            <text:p text:style-name="P430"><text:span text:style-name="T70"><text:tab/><text:tab/><text:tab/><text:tab/>.append(</text:span><text:span text:style-name="T108">metode</text:span><text:span text:style-name="T70">)</text:span></text:p>
            <text:p text:style-name="P430"><text:span text:style-name="T70"><text:tab/><text:tab/><text:tab/><text:tab/>.append(</text:span><text:span text:style-name="T40">"\" amb els paràmetres {"</text:span><text:span text:style-name="T70">);</text:span></text:p>
            <text:p text:style-name="P430"><text:span text:style-name="T70"><text:tab/><text:tab/></text:span><text:span text:style-name="T53">int</text:span><text:span text:style-name="T70"> </text:span><text:span text:style-name="T108">i</text:span><text:span text:style-name="T70"> = 0;</text:span></text:p>
            <text:p text:style-name="P430"><text:span text:style-name="T70"><text:tab/><text:tab/></text:span><text:span text:style-name="T53">for</text:span><text:span text:style-name="T70"> (String </text:span><text:span text:style-name="T108">key</text:span><text:span text:style-name="T70"> : </text:span><text:span text:style-name="T108">parametres</text:span><text:span text:style-name="T70">.keySet()) {</text:span></text:p>
            <text:p text:style-name="P430"><text:span text:style-name="T70"><text:tab/><text:tab/><text:tab/></text:span><text:span text:style-name="T108">str</text:span><text:span text:style-name="T70">.append(</text:span><text:span text:style-name="T108">key</text:span><text:span text:style-name="T70">).append(</text:span><text:span text:style-name="T40">"="</text:span><text:span text:style-name="T70">).append(</text:span><text:span text:style-name="T108">parametres</text:span><text:span text:style-name="T70">.get(</text:span><text:span text:style-name="T108">key</text:span><text:span text:style-name="T70">));</text:span></text:p>
            <text:p text:style-name="P430"><text:span text:style-name="T70"><text:tab/><text:tab/><text:tab/></text:span><text:span text:style-name="T108">i</text:span><text:span text:style-name="T70">++;</text:span></text:p>
            <text:p text:style-name="P430"><text:span text:style-name="T70"><text:tab/><text:tab/><text:tab/></text:span><text:span text:style-name="T53">if</text:span><text:span text:style-name="T70"> (</text:span><text:span text:style-name="T108">i</text:span><text:span text:style-name="T70">&lt;</text:span><text:span text:style-name="T108">parametres</text:span><text:span text:style-name="T70">.size())</text:span></text:p>
            <text:p text:style-name="P430"><text:span text:style-name="T70"><text:tab/><text:tab/><text:tab/><text:tab/></text:span><text:span text:style-name="T108">str</text:span><text:span text:style-name="T70">.append(</text:span><text:span text:style-name="T40">", "</text:span><text:span text:style-name="T70">);</text:span></text:p>
            <text:p text:style-name="P430"><text:span text:style-name="T70"><text:tab/><text:tab/>}</text:span></text:p>
            <text:p text:style-name="P430"><text:span text:style-name="T70"><text:tab/><text:tab/></text:span><text:span text:style-name="T108">str</text:span><text:span text:style-name="T70">.append(</text:span><text:span text:style-name="T40">"} amb resultat "</text:span><text:span text:style-name="T70">).append(</text:span><text:span text:style-name="T108">correcte</text:span><text:span text:style-name="T70"> ? </text:span><text:span text:style-name="T40">"OK"</text:span><text:span text:style-name="T70"> : </text:span><text:span text:style-name="T40">"KO"</text:span><text:span text:style-name="T70">);</text:span></text:p>
            <text:p text:style-name="P430"><text:span text:style-name="T70"><text:tab/><text:tab/></text:span><text:span text:style-name="T53">if</text:span><text:span text:style-name="T70"> (</text:span><text:span text:style-name="T108">error</text:span><text:span text:style-name="T70"> != </text:span><text:span text:style-name="T53">null</text:span><text:span text:style-name="T70">)</text:span></text:p>
            <text:p text:style-name="P430"><text:span text:style-name="T70"><text:tab/><text:tab/><text:tab/></text:span><text:span text:style-name="T108">str</text:span><text:span text:style-name="T70">.append(</text:span><text:span text:style-name="T40">": "</text:span><text:span text:style-name="T70">).append(</text:span><text:span text:style-name="T108">error</text:span><text:span text:style-name="T70">);</text:span></text:p>
            <text:p text:style-name="P430"><text:span text:style-name="T70"><text:tab/><text:tab/></text:span><text:span text:style-name="T53">if</text:span><text:span text:style-name="T70"> (</text:span><text:span text:style-name="T108">e</text:span><text:span text:style-name="T70"> != </text:span><text:span text:style-name="T53">null</text:span><text:span text:style-name="T70">)</text:span></text:p>
            <text:p text:style-name="P430"><text:span text:style-name="T70"><text:tab/><text:tab/><text:tab/></text:span><text:span text:style-name="T108">str</text:span><text:span text:style-name="T70">.append(</text:span><text:span text:style-name="T40">" "</text:span><text:span text:style-name="T70">).append(</text:span><text:span text:style-name="T108">e</text:span><text:span text:style-name="T70">.getClass()).append(</text:span><text:span text:style-name="T40">" "</text:span><text:span text:style-name="T70">).append(</text:span><text:span text:style-name="T108">e</text:span><text:span text:style-name="T70">.getMessage());</text:span></text:p>
            <text:p text:style-name="P430"><text:span text:style-name="T70"><text:tab/><text:tab/></text:span><text:span text:style-name="T108">str</text:span><text:span text:style-name="T70">.append(</text:span><text:span text:style-name="T40">" "</text:span><text:span text:style-name="T70">).append(</text:span><text:span text:style-name="T108">timeMs</text:span><text:span text:style-name="T70">).append(</text:span><text:span text:style-name="T40">"ms"</text:span><text:span text:style-name="T70">);</text:span></text:p>
            <text:p text:style-name="P430"><text:span text:style-name="T70"><text:tab/><text:tab/></text:span></text:p>
            <text:p text:style-name="P430"><text:span text:style-name="T70"><text:tab/><text:tab/></text:span><text:span text:style-name="T103">log</text:span><text:span text:style-name="T70">.debug(</text:span><text:span text:style-name="T108">str</text:span><text:span text:style-name="T70">.toString());</text:span></text:p>
            <text:p text:style-name="P430"><text:span text:style-name="T70"><text:tab/>}<text:tab/></text:span></text:p>
            <text:p text:style-name="P430"><text:span text:style-name="T70"><text:tab/></text:span></text:p>
            <text:p text:style-name="P430"><text:span text:style-name="T70"><text:tab/></text:span><text:span text:style-name="T53">private</text:span><text:span text:style-name="T70"> </text:span><text:span text:style-name="T53">void</text:span><text:span text:style-name="T70"> logResultat(String </text:span><text:span text:style-name="T108">descripcio</text:span><text:span text:style-name="T70">, ArxiuResultat </text:span><text:span text:style-name="T108">arxiuResultat</text:span><text:span text:style-name="T70">) {</text:span></text:p>
            <text:p text:style-name="P430"><text:span text:style-name="T70"><text:tab/><text:tab/></text:span><text:span text:style-name="T103">log</text:span><text:span text:style-name="T70">.debug(</text:span><text:span text:style-name="T108">descripcio</text:span><text:span text:style-name="T70">);</text:span></text:p>
            <text:p text:style-name="P430"><text:soft-page-break/><text:span text:style-name="T70"><text:tab/><text:tab/></text:span><text:span text:style-name="T246">// Resultat a nivell d'expedient</text:span></text:p>
            <text:p text:style-name="P430"><text:span text:style-name="T70"><text:tab/><text:tab/></text:span><text:span text:style-name="T103">log</text:span><text:span text:style-name="T70">.debug(</text:span><text:span text:style-name="T40">"- uuid: "</text:span><text:span text:style-name="T70"> + </text:span><text:span text:style-name="T108">arxiuResultat</text:span><text:span text:style-name="T70">.getIdentificadorExpedient());</text:span></text:p>
            <text:p text:style-name="P430"><text:span text:style-name="T70"><text:tab/><text:tab/></text:span><text:span text:style-name="T103">log</text:span><text:span text:style-name="T70">.debug(</text:span><text:span text:style-name="T40">"- accio: "</text:span><text:span text:style-name="T70"> + </text:span><text:span text:style-name="T108">arxiuResultat</text:span><text:span text:style-name="T70">.getAccio());</text:span></text:p>
            <text:p text:style-name="P430"><text:span text:style-name="T70"><text:tab/><text:tab/></text:span><text:span text:style-name="T103">log</text:span><text:span text:style-name="T70">.debug(</text:span><text:span text:style-name="T40">"- errorCodi: "</text:span><text:span text:style-name="T70"> + </text:span><text:span text:style-name="T108">arxiuResultat</text:span><text:span text:style-name="T70">.getErrorCodi());</text:span></text:p>
            <text:p text:style-name="P430"><text:span text:style-name="T70"><text:tab/><text:tab/></text:span><text:span text:style-name="T103">log</text:span><text:span text:style-name="T70">.debug(</text:span><text:span text:style-name="T40">"- errorMessage: "</text:span><text:span text:style-name="T70"> + </text:span><text:span text:style-name="T108">arxiuResultat</text:span><text:span text:style-name="T70">.getErrorMessage());</text:span></text:p>
            <text:p text:style-name="P430"><text:span text:style-name="T70"><text:tab/><text:tab/></text:span><text:span text:style-name="T103">log</text:span><text:span text:style-name="T70">.debug(</text:span><text:span text:style-name="T40">"- excepcio: "</text:span><text:span text:style-name="T70"> + (</text:span><text:span text:style-name="T108">arxiuResultat</text:span><text:span text:style-name="T70">.getException() != </text:span><text:span text:style-name="T53">null</text:span><text:span text:style-name="T70">? </text:span><text:span text:style-name="T108">arxiuResultat</text:span><text:span text:style-name="T70">.getException().getClass() + </text:span><text:span text:style-name="T40">" "</text:span><text:span text:style-name="T70"> + </text:span><text:span text:style-name="T108">arxiuResultat</text:span><text:span text:style-name="T70">.getException().getMessage() : <text:s/></text:span><text:span text:style-name="T40">" - "</text:span><text:span text:style-name="T70">));</text:span></text:p>
            <text:p text:style-name="P428"/>
            <text:p text:style-name="P430"><text:span text:style-name="T70"><text:tab/><text:tab/></text:span><text:span text:style-name="T246">// Resultat pels annexos</text:span></text:p>
            <text:p text:style-name="P430"><text:span text:style-name="T70"><text:tab/><text:tab/>List&lt;ArxiuResultatAnnex&gt; </text:span><text:span text:style-name="T108">resultatAnnexos</text:span><text:span text:style-name="T70"> = </text:span><text:span text:style-name="T108">arxiuResultat</text:span><text:span text:style-name="T70">.getResultatAnnexos(); </text:span></text:p>
            <text:p text:style-name="P430"><text:span text:style-name="T70"><text:tab/><text:tab/></text:span><text:span text:style-name="T103">log</text:span><text:span text:style-name="T70">.debug(</text:span><text:span text:style-name="T40">" - Resultat dels "</text:span><text:span text:style-name="T70"> + </text:span><text:span text:style-name="T108">resultatAnnexos</text:span><text:span text:style-name="T70">.size() + </text:span><text:span text:style-name="T40">" annexos:"</text:span><text:span text:style-name="T70">);</text:span></text:p>
            <text:p text:style-name="P430"><text:span text:style-name="T70"><text:tab/><text:tab/></text:span><text:span text:style-name="T53">for</text:span><text:span text:style-name="T70"> (ArxiuResultatAnnex </text:span><text:span text:style-name="T108">resultatAnnex</text:span><text:span text:style-name="T70"> : </text:span><text:span text:style-name="T108">resultatAnnexos</text:span><text:span text:style-name="T70">) {</text:span></text:p>
            <text:p text:style-name="P430"><text:span text:style-name="T70"><text:tab/><text:tab/><text:tab/></text:span><text:span text:style-name="T103">log</text:span><text:span text:style-name="T70">.debug(</text:span><text:span text:style-name="T40">"\b- uuid: "</text:span><text:span text:style-name="T70"> + </text:span><text:span text:style-name="T108">resultatAnnex</text:span><text:span text:style-name="T70">.getIdentificadorAnnex());</text:span></text:p>
            <text:p text:style-name="P430"><text:span text:style-name="T70"><text:tab/><text:tab/><text:tab/></text:span><text:span text:style-name="T103">log</text:span><text:span text:style-name="T70">.debug(</text:span><text:span text:style-name="T40">"\\b- accio: "</text:span><text:span text:style-name="T70"> + </text:span><text:span text:style-name="T108">resultatAnnex</text:span><text:span text:style-name="T70">.getAccio());</text:span></text:p>
            <text:p text:style-name="P430"><text:span text:style-name="T70"><text:tab/><text:tab/><text:tab/></text:span><text:span text:style-name="T103">log</text:span><text:span text:style-name="T70">.debug(</text:span><text:span text:style-name="T40">"\\b- errorCodi: "</text:span><text:span text:style-name="T70"> + </text:span><text:span text:style-name="T108">resultatAnnex</text:span><text:span text:style-name="T70">.getErrorCodi());</text:span></text:p>
            <text:p text:style-name="P430"><text:span text:style-name="T70"><text:tab/><text:tab/><text:tab/></text:span><text:span text:style-name="T103">log</text:span><text:span text:style-name="T70">.debug(</text:span><text:span text:style-name="T40">"\\b- errorMessage: "</text:span><text:span text:style-name="T70"> + </text:span><text:span text:style-name="T108">resultatAnnex</text:span><text:span text:style-name="T70">.getErrorMessage());</text:span></text:p>
            <text:p text:style-name="P430"><text:span text:style-name="T70"><text:tab/><text:tab/><text:tab/></text:span><text:span text:style-name="T103">log</text:span><text:span text:style-name="T70">.debug(</text:span><text:span text:style-name="T40">"\\b- excepcio: "</text:span><text:span text:style-name="T70"> + (</text:span><text:span text:style-name="T108">resultatAnnex</text:span><text:span text:style-name="T70">.getException() != </text:span><text:span text:style-name="T53">null</text:span><text:span text:style-name="T70">? </text:span><text:span text:style-name="T108">resultatAnnex</text:span><text:span text:style-name="T70">.getException().getClass() + </text:span><text:span text:style-name="T40">" "</text:span><text:span text:style-name="T70"> + </text:span><text:span text:style-name="T108">resultatAnnex</text:span><text:span text:style-name="T70">.getException().getMessage() : <text:s/></text:span><text:span text:style-name="T40">" - "</text:span><text:span text:style-name="T70">));</text:span></text:p>
            <text:p text:style-name="P430"><text:span text:style-name="T70"><text:tab/><text:tab/>}</text:span></text:p>
            <text:p text:style-name="P430"><text:span text:style-name="T70"><text:tab/>}</text:span></text:p>
            <text:p text:style-name="P429"><text:span text:style-name="T70">}</text:span></text:p>
          </table:table-cell>
        </table:table-row>
      </table:table>
      <text:p text:style-name="P179"><draw:frame text:anchor-type="paragraph" draw:z-index="59" draw:name="Forma4" draw:style-name="gr2" draw:text-style-name="P473" svg:width="18.058cm" svg:height="5.181cm" svg:x="0.43cm" svg:y="0.766cm"><draw:text-box><text:p/></draw:text-box></draw:frame></text:p>
      <text:p text:style-name="P1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JetBrains Mono" svg:font-family="'JetBrains Mono'"/>
    <style:font-face style:name="JetBrains Mono1" svg:font-family="'JetBrains Mono'" style:font-family-generic="swiss"/>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7799312">
            <table:table-cell office:value-type="string">
              <text:p text:style-name="MP2"><draw:g text:anchor-type="as-char" draw:z-index="54"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48</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6-30T18:15:19.047999847">30/06/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2H32M7S</meta:editing-duration>
    <meta:editing-cycles>314</meta:editing-cycles>
    <meta:generator>LibreOffice/7.3.5.2$Windows_X86_64 LibreOffice_project/184fe81b8c8c30d8b5082578aee2fed2ea847c01</meta:generator>
    <dc:date>2026-06-30T18:15:18.834000000</dc:date>
    <dc:creator>Daniel Moreno Linares</dc:creator>
    <meta:document-statistic meta:table-count="36" meta:image-count="15" meta:object-count="0" meta:page-count="51" meta:paragraph-count="1868" meta:word-count="10189" meta:character-count="76223" meta:non-whitespace-character-count="65844"/>
  </office:meta>
</office:document-meta>
</file>