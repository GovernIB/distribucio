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303000000A2B51A2BC62CB932CC.png" manifest:media-type="image/png"/>
  <manifest:file-entry manifest:full-path="Pictures/10000001000002E6000002BB18D09AEB46C6E810.png" manifest:media-type="image/png"/>
  <manifest:file-entry manifest:full-path="Pictures/100000010000017600000106CDB180781C1628B8.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17100000106B187299E55A52A1D.png" manifest:media-type="image/png"/>
  <manifest:file-entry manifest:full-path="Pictures/10000001000002770000038B81B76A918A4F6C6E.png" manifest:media-type="image/png"/>
  <manifest:file-entry manifest:full-path="Pictures/10000001000002A40000005B1334E899686238FD.png" manifest:media-type="image/png"/>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171000001926974360676B06D40.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1.A11" style:family="table-cell">
      <style:table-cell-properties fo:padding-left="0.132cm" fo:padding-right="0.123cm" fo:padding-top="0cm" fo:padding-bottom="0cm" fo:border-left="1.5pt solid #000000" fo:border-right="0.5pt solid #000000" fo:border-top="none" fo:border-bottom="1.5pt solid #000000"/>
    </style:style>
    <style:style style:name="Taula1.B11" style:family="table-cell">
      <style:table-cell-properties fo:padding-left="0.132cm" fo:padding-right="0.123cm" fo:padding-top="0cm" fo:padding-bottom="0cm" fo:border-left="0.5pt solid #000000" fo:border-right="0.5pt solid #000000" fo:border-top="none" fo:border-bottom="1.5pt solid #000000"/>
    </style:style>
    <style:style style:name="Taula1.C11" style:family="table-cell">
      <style:table-cell-properties fo:padding-left="0.132cm" fo:padding-right="0.123cm" fo:padding-top="0cm" fo:padding-bottom="0cm" fo:border-left="0.5pt solid #000000" fo:border-right="0.5pt solid #000000" fo:border-top="none" fo:border-bottom="1.5pt solid #000000"/>
    </style:style>
    <style:style style:name="Taula1.D11"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8" style:family="paragraph" style:parent-style-name="Standard">
      <style:paragraph-properties fo:margin-top="0cm" fo:margin-bottom="0.212cm" style:contextual-spacing="false" fo:text-align="start" style:justify-single-word="false"/>
      <style:text-properties style:font-name="Calibri1" fo:language="ca" fo:country="ES" officeooo:rsid="01b09e8f" officeooo:paragraph-rsid="01b09e8f" style:font-name-complex="Arial Narrow1"/>
    </style:style>
    <style:style style:name="P19" style:family="paragraph" style:parent-style-name="Standard">
      <style:paragraph-properties fo:margin-top="0cm" fo:margin-bottom="0.212cm" style:contextual-spacing="false" fo:text-align="start" style:justify-single-word="false"/>
      <style:text-properties style:font-name="Calibri1" fo:language="ca" fo:country="ES" officeooo:rsid="01b0de17" officeooo:paragraph-rsid="01b0de17" style:font-name-complex="Arial Narrow1"/>
    </style:style>
    <style:style style:name="P20"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21" style:family="paragraph" style:parent-style-name="Standard">
      <style:paragraph-properties fo:text-align="end" style:justify-single-word="false"/>
      <style:text-properties officeooo:paragraph-rsid="001dc238"/>
    </style:style>
    <style:style style:name="P22" style:family="paragraph" style:parent-style-name="Standard">
      <style:paragraph-properties fo:margin-top="0.499cm" fo:margin-bottom="0.199cm" style:contextual-spacing="false" fo:text-align="end" style:justify-single-word="false"/>
      <style:text-properties officeooo:paragraph-rsid="001bba47"/>
    </style:style>
    <style:style style:name="P23" style:family="paragraph" style:parent-style-name="Standard">
      <style:text-properties officeooo:paragraph-rsid="001bba47"/>
    </style:style>
    <style:style style:name="P24"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5"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6"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7" style:family="paragraph" style:parent-style-name="Standard">
      <style:text-properties fo:font-weight="bold" officeooo:paragraph-rsid="001d1802" style:font-weight-asian="bold" style:font-weight-complex="bold"/>
    </style:style>
    <style:style style:name="P28" style:family="paragraph" style:parent-style-name="Text_20_body">
      <style:text-properties fo:font-weight="bold" officeooo:rsid="00ea866e" officeooo:paragraph-rsid="00d673d7" style:font-weight-asian="bold" style:font-weight-complex="bold"/>
    </style:style>
    <style:style style:name="P29" style:family="paragraph" style:parent-style-name="Text_20_body">
      <style:text-properties fo:font-weight="bold" officeooo:rsid="00ebb296" officeooo:paragraph-rsid="00d673d7" style:font-weight-asian="bold" style:font-weight-complex="bold"/>
    </style:style>
    <style:style style:name="P30"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31"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32"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33"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34"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35"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36"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37"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38"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39"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40"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41" style:family="paragraph" style:parent-style-name="Standard">
      <style:paragraph-properties fo:text-align="justify" style:justify-single-word="false"/>
      <style:text-properties officeooo:paragraph-rsid="008ce69e"/>
    </style:style>
    <style:style style:name="P42" style:family="paragraph" style:parent-style-name="Standard">
      <style:paragraph-properties fo:text-align="justify" style:justify-single-word="false"/>
      <style:text-properties officeooo:paragraph-rsid="00d673d7"/>
    </style:style>
    <style:style style:name="P43"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4" style:family="paragraph" style:parent-style-name="Table_20_Contents">
      <style:paragraph-properties fo:text-align="justify" style:justify-single-word="false"/>
      <style:text-properties officeooo:paragraph-rsid="01a9cdd2"/>
    </style:style>
    <style:style style:name="P45" style:family="paragraph" style:parent-style-name="Table_20_Contents">
      <style:paragraph-properties fo:text-align="justify" style:justify-single-word="false"/>
      <style:text-properties officeooo:paragraph-rsid="019cebf9"/>
    </style:style>
    <style:style style:name="P46" style:family="paragraph" style:parent-style-name="Table_20_Contents">
      <style:paragraph-properties fo:text-align="justify" style:justify-single-word="false"/>
    </style:style>
    <style:style style:name="P47" style:family="paragraph" style:parent-style-name="Text_20_body">
      <style:paragraph-properties fo:text-align="justify" style:justify-single-word="false"/>
      <style:text-properties officeooo:paragraph-rsid="018c7b7a"/>
    </style:style>
    <style:style style:name="P48" style:family="paragraph" style:parent-style-name="Text_20_body">
      <style:paragraph-properties fo:text-align="justify" style:justify-single-word="false"/>
      <style:text-properties officeooo:paragraph-rsid="01a3408a"/>
    </style:style>
    <style:style style:name="P49" style:family="paragraph" style:parent-style-name="Standard">
      <style:paragraph-properties fo:margin-top="0cm" fo:margin-bottom="0.212cm" style:contextual-spacing="false" fo:text-align="start" style:justify-single-word="false"/>
      <style:text-properties officeooo:paragraph-rsid="001d1802"/>
    </style:style>
    <style:style style:name="P50" style:family="paragraph" style:parent-style-name="Standard">
      <style:paragraph-properties fo:margin-top="0cm" fo:margin-bottom="0.212cm" style:contextual-spacing="false" fo:text-align="start" style:justify-single-word="false"/>
      <style:text-properties officeooo:paragraph-rsid="00649479"/>
    </style:style>
    <style:style style:name="P51" style:family="paragraph" style:parent-style-name="Standard">
      <style:paragraph-properties fo:margin-top="0cm" fo:margin-bottom="0.212cm" style:contextual-spacing="false" fo:text-align="start" style:justify-single-word="false"/>
      <style:text-properties officeooo:paragraph-rsid="00ec4c44"/>
    </style:style>
    <style:style style:name="P52" style:family="paragraph" style:parent-style-name="Standard">
      <style:paragraph-properties fo:margin-left="0cm" fo:margin-right="0cm" fo:text-align="start" style:justify-single-word="false" fo:text-indent="0cm" style:auto-text-indent="false"/>
    </style:style>
    <style:style style:name="P53" style:family="paragraph" style:parent-style-name="Standard">
      <style:paragraph-properties fo:margin-left="0cm" fo:margin-right="0cm" fo:text-align="start" style:justify-single-word="false" fo:text-indent="0cm" style:auto-text-indent="false" fo:padding="0.049cm" fo:border="0.06pt solid #000000" style:shadow="#000000 0cm 0cm"/>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55" style:family="paragraph" style:parent-style-name="Standard">
      <style:paragraph-properties fo:margin-left="0cm" fo:margin-right="0cm" fo:text-align="start" style:justify-single-word="false" fo:text-indent="0cm" style:auto-text-indent="false"/>
      <style:text-properties officeooo:paragraph-rsid="00d673d7"/>
    </style:style>
    <style:style style:name="P5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8c7b7a"/>
    </style:style>
    <style:style style:name="P58" style:family="paragraph" style:parent-style-name="Standard">
      <style:paragraph-properties fo:text-align="start" style:justify-single-word="false" fo:padding="0.049cm" fo:border="0.06pt solid #000000" style:shadow="#000000 0cm 0cm"/>
      <style:text-properties officeooo:paragraph-rsid="0195481e"/>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6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61"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62"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63" style:family="paragraph" style:parent-style-name="Standard">
      <style:text-properties fo:font-style="normal" officeooo:rsid="00d63ec8" officeooo:paragraph-rsid="00d673d7" style:font-style-asian="normal" style:font-style-complex="normal"/>
    </style:style>
    <style:style style:name="P64" style:family="paragraph" style:parent-style-name="Standard">
      <style:text-properties fo:font-style="normal" officeooo:rsid="00db5ce5" officeooo:paragraph-rsid="00d673d7" style:font-style-asian="normal" style:font-style-complex="normal"/>
    </style:style>
    <style:style style:name="P65" style:family="paragraph" style:parent-style-name="Standard">
      <style:text-properties fo:font-style="normal" officeooo:rsid="00db5ce5" officeooo:paragraph-rsid="00e8f23e" style:font-style-asian="normal" style:font-style-complex="normal"/>
    </style:style>
    <style:style style:name="P66" style:family="paragraph" style:parent-style-name="Standard">
      <style:text-properties fo:font-style="normal" officeooo:rsid="00e8f23e" officeooo:paragraph-rsid="00e8f23e" style:font-style-asian="normal" style:font-style-complex="normal"/>
    </style:style>
    <style:style style:name="P67" style:family="paragraph" style:parent-style-name="Text_20_body">
      <style:text-properties fo:font-style="normal" officeooo:rsid="00d81a0e" officeooo:paragraph-rsid="00d673d7" style:font-style-asian="normal" style:font-style-complex="normal"/>
    </style:style>
    <style:style style:name="P68" style:family="paragraph" style:parent-style-name="Text_20_body">
      <style:text-properties fo:font-style="normal" officeooo:rsid="00d901df" officeooo:paragraph-rsid="00d673d7" style:font-style-asian="normal" style:font-style-complex="normal"/>
    </style:style>
    <style:style style:name="P69" style:family="paragraph" style:parent-style-name="Text_20_body">
      <style:text-properties fo:font-style="normal" officeooo:rsid="00de9e71" officeooo:paragraph-rsid="00d673d7" style:font-style-asian="normal" style:font-style-complex="normal"/>
    </style:style>
    <style:style style:name="P70" style:family="paragraph" style:parent-style-name="Text_20_body">
      <style:text-properties fo:font-style="normal" officeooo:rsid="00e1e7f8" officeooo:paragraph-rsid="00d673d7" style:font-style-asian="normal" style:font-style-complex="normal"/>
    </style:style>
    <style:style style:name="P71" style:family="paragraph" style:parent-style-name="Text_20_body">
      <style:text-properties fo:font-style="normal" officeooo:rsid="00e1e7f8" officeooo:paragraph-rsid="00e16f63" style:font-style-asian="normal" style:font-style-complex="normal"/>
    </style:style>
    <style:style style:name="P72" style:family="paragraph" style:parent-style-name="Text_20_body">
      <style:text-properties fo:font-style="normal" officeooo:rsid="00ea10cf" officeooo:paragraph-rsid="00e5f97a" style:font-style-asian="normal" style:font-style-complex="normal"/>
    </style:style>
    <style:style style:name="P73" style:family="paragraph" style:parent-style-name="Standard">
      <style:text-properties fo:font-style="normal" officeooo:rsid="00d63ec8" officeooo:paragraph-rsid="00d673d7" fo:background-color="transparent" style:font-style-asian="normal" style:font-style-complex="normal"/>
    </style:style>
    <style:style style:name="P74" style:family="paragraph" style:parent-style-name="Standard">
      <style:text-properties fo:font-style="normal" officeooo:rsid="00e440cb" officeooo:paragraph-rsid="00dda4cb" fo:background-color="transparent" style:font-style-asian="normal" style:font-style-complex="normal"/>
    </style:style>
    <style:style style:name="P75" style:family="paragraph" style:parent-style-name="Text_20_body">
      <style:text-properties fo:font-style="normal" officeooo:rsid="00dfc741" officeooo:paragraph-rsid="00e8f23e" fo:background-color="transparent" style:font-style-asian="normal" style:font-style-complex="normal"/>
    </style:style>
    <style:style style:name="P76"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7"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8"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79"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80" style:family="paragraph" style:parent-style-name="Standard">
      <style:text-properties officeooo:rsid="00db5ce5" officeooo:paragraph-rsid="00e8f23e"/>
    </style:style>
    <style:style style:name="P81"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8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83"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84"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85"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86"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87"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88"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89"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90"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91"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94"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95"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97"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98"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99"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100"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101"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102" style:family="paragraph" style:parent-style-name="Standard">
      <style:paragraph-properties style:line-height-at-least="0.476cm"/>
      <style:text-properties fo:color="#000000" loext:opacity="100%" style:font-name="Consolas2" fo:font-size="9pt" fo:font-weight="normal" officeooo:paragraph-rsid="01b5544c" fo:background-color="#dddddd"/>
    </style:style>
    <style:style style:name="P103" style:family="paragraph" style:parent-style-name="Standard">
      <style:paragraph-properties style:line-height-at-least="0.476cm"/>
      <style:text-properties fo:color="#000000" loext:opacity="100%" officeooo:paragraph-rsid="019cebf9" fo:background-color="#fffffe"/>
    </style:style>
    <style:style style:name="P104" style:family="paragraph" style:parent-style-name="Standard">
      <style:paragraph-properties style:line-height-at-least="0.476cm"/>
      <style:text-properties fo:color="#000000" loext:opacity="100%" officeooo:paragraph-rsid="019cebf9" fo:background-color="#dddddd"/>
    </style:style>
    <style:style style:name="P105" style:family="paragraph" style:parent-style-name="Standard">
      <style:paragraph-properties style:line-height-at-least="0.476cm"/>
      <style:text-properties fo:color="#000000" loext:opacity="100%" officeooo:paragraph-rsid="01b5544c" fo:background-color="#dddddd"/>
    </style:style>
    <style:style style:name="P106"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8c7b7a" style:font-size-asian="10pt"/>
    </style:style>
    <style:style style:name="P107"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108"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109"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8c7b7a" style:font-size-asian="10pt"/>
    </style:style>
    <style:style style:name="P110"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111"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112"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113"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114" style:family="paragraph" style:parent-style-name="Standard">
      <style:paragraph-properties fo:text-align="justify" style:justify-single-word="false"/>
      <style:text-properties fo:font-size="8pt" officeooo:paragraph-rsid="00d673d7" style:font-size-asian="8pt" style:font-size-complex="8pt"/>
    </style:style>
    <style:style style:name="P115" style:family="paragraph" style:parent-style-name="Standard">
      <style:paragraph-properties fo:text-align="start" style:justify-single-word="false"/>
      <style:text-properties fo:font-size="8pt" officeooo:paragraph-rsid="00d673d7" style:font-size-asian="8pt" style:font-size-complex="8pt"/>
    </style:style>
    <style:style style:name="P116"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17"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8"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20"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21"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22"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23"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24"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25"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26"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28"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129"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30" style:family="paragraph" style:parent-style-name="Standard">
      <style:text-properties officeooo:paragraph-rsid="00d673d7"/>
    </style:style>
    <style:style style:name="P131" style:family="paragraph" style:parent-style-name="Text_20_body">
      <style:text-properties officeooo:paragraph-rsid="00d673d7"/>
    </style:style>
    <style:style style:name="P132" style:family="paragraph" style:parent-style-name="Standard">
      <style:text-properties officeooo:rsid="00d4e88a" officeooo:paragraph-rsid="00d8ffe0"/>
    </style:style>
    <style:style style:name="P133" style:family="paragraph" style:parent-style-name="Standard">
      <style:text-properties officeooo:paragraph-rsid="00e8f23e"/>
    </style:style>
    <style:style style:name="P134" style:family="paragraph" style:parent-style-name="Text_20_body">
      <style:text-properties officeooo:paragraph-rsid="00e8f23e"/>
    </style:style>
    <style:style style:name="P135" style:family="paragraph" style:parent-style-name="Fig.">
      <style:text-properties officeooo:paragraph-rsid="00e8f23e"/>
    </style:style>
    <style:style style:name="P136" style:family="paragraph" style:parent-style-name="Standard">
      <style:paragraph-properties fo:text-align="justify" style:justify-single-word="false"/>
      <style:text-properties officeooo:rsid="00931a7c" officeooo:paragraph-rsid="019c96f9"/>
    </style:style>
    <style:style style:name="P137" style:family="paragraph" style:parent-style-name="Text_20_body">
      <style:paragraph-properties fo:text-align="justify" style:justify-single-word="false"/>
      <style:text-properties officeooo:rsid="00931a7c" officeooo:paragraph-rsid="018c7b7a"/>
    </style:style>
    <style:style style:name="P138"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39"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140"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141"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142"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143"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44"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4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46" style:family="paragraph" style:parent-style-name="Text_20_body">
      <style:paragraph-properties fo:text-align="justify" style:justify-single-word="false"/>
      <style:text-properties officeooo:rsid="0052b05f" officeooo:paragraph-rsid="0074fa21"/>
    </style:style>
    <style:style style:name="P147" style:family="paragraph" style:parent-style-name="Text_20_body">
      <style:paragraph-properties fo:text-align="justify" style:justify-single-word="false"/>
      <style:text-properties officeooo:rsid="00771bf9" officeooo:paragraph-rsid="00771bf9"/>
    </style:style>
    <style:style style:name="P148" style:family="paragraph" style:parent-style-name="Text_20_body">
      <style:paragraph-properties fo:text-align="center" style:justify-single-word="false"/>
      <style:text-properties officeooo:rsid="00771bf9" officeooo:paragraph-rsid="00771bf9"/>
    </style:style>
    <style:style style:name="P149" style:family="paragraph" style:parent-style-name="Text_20_body">
      <style:text-properties officeooo:rsid="008ce69e" officeooo:paragraph-rsid="008ce69e"/>
    </style:style>
    <style:style style:name="P150" style:family="paragraph" style:parent-style-name="Text_20_body">
      <style:paragraph-properties fo:text-align="justify" style:justify-single-word="false"/>
      <style:text-properties officeooo:rsid="008ce69e" officeooo:paragraph-rsid="008ce69e"/>
    </style:style>
    <style:style style:name="P151" style:family="paragraph" style:parent-style-name="Text_20_body">
      <style:paragraph-properties fo:text-align="justify" style:justify-single-word="false"/>
      <style:text-properties officeooo:rsid="008ce69e" officeooo:paragraph-rsid="00771bf9"/>
    </style:style>
    <style:style style:name="P152" style:family="paragraph" style:parent-style-name="Text_20_body">
      <style:paragraph-properties fo:text-align="justify" style:justify-single-word="false"/>
      <style:text-properties officeooo:rsid="008ce69e" officeooo:paragraph-rsid="018c7b7a"/>
    </style:style>
    <style:style style:name="P153" style:family="paragraph" style:parent-style-name="Text_20_body">
      <style:paragraph-properties fo:text-align="justify" style:justify-single-word="false"/>
      <style:text-properties officeooo:rsid="008ce69e" officeooo:paragraph-rsid="01a9cdd2"/>
    </style:style>
    <style:style style:name="P154" style:family="paragraph" style:parent-style-name="Text_20_body">
      <style:text-properties officeooo:rsid="00a9a467" officeooo:paragraph-rsid="00a9a467"/>
    </style:style>
    <style:style style:name="P155" style:family="paragraph" style:parent-style-name="Text_20_body">
      <style:text-properties officeooo:rsid="00a9a467" officeooo:paragraph-rsid="019b515e"/>
    </style:style>
    <style:style style:name="P156" style:family="paragraph" style:parent-style-name="Text_20_body">
      <style:text-properties officeooo:rsid="00a9a467" officeooo:paragraph-rsid="019b5d65"/>
    </style:style>
    <style:style style:name="P157" style:family="paragraph" style:parent-style-name="Text_20_body">
      <style:text-properties officeooo:rsid="00aeb4b4" officeooo:paragraph-rsid="0195481e"/>
    </style:style>
    <style:style style:name="P158" style:family="paragraph" style:parent-style-name="Text_20_body">
      <style:paragraph-properties fo:text-align="center" style:justify-single-word="false"/>
      <style:text-properties officeooo:rsid="007af11d" officeooo:paragraph-rsid="01949037"/>
    </style:style>
    <style:style style:name="P159" style:family="paragraph" style:parent-style-name="Text_20_body">
      <style:paragraph-properties fo:text-align="center" style:justify-single-word="false"/>
      <style:text-properties officeooo:rsid="007af11d" officeooo:paragraph-rsid="019c96f9"/>
    </style:style>
    <style:style style:name="P160"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161" style:family="paragraph" style:parent-style-name="Text_20_body">
      <style:text-properties officeooo:rsid="00d81a0e" officeooo:paragraph-rsid="00d673d7"/>
    </style:style>
    <style:style style:name="P162" style:family="paragraph" style:parent-style-name="Text_20_body">
      <style:text-properties officeooo:rsid="00de9e71" officeooo:paragraph-rsid="00d673d7"/>
    </style:style>
    <style:style style:name="P163" style:family="paragraph" style:parent-style-name="Text_20_body">
      <style:text-properties officeooo:rsid="00e2fa38" officeooo:paragraph-rsid="00d673d7"/>
    </style:style>
    <style:style style:name="P164" style:family="paragraph" style:parent-style-name="Text_20_body">
      <style:text-properties officeooo:rsid="00e440cb" officeooo:paragraph-rsid="00d673d7"/>
    </style:style>
    <style:style style:name="P165" style:family="paragraph" style:parent-style-name="Text_20_body">
      <style:text-properties officeooo:rsid="00e59aa6" officeooo:paragraph-rsid="00d673d7"/>
    </style:style>
    <style:style style:name="P166" style:family="paragraph" style:parent-style-name="Text_20_body">
      <style:text-properties officeooo:rsid="00ea10cf" officeooo:paragraph-rsid="00d673d7"/>
    </style:style>
    <style:style style:name="P167" style:family="paragraph" style:parent-style-name="Text_20_body">
      <style:text-properties officeooo:rsid="00ea10cf" officeooo:paragraph-rsid="00e54ccf"/>
    </style:style>
    <style:style style:name="P168" style:family="paragraph" style:parent-style-name="Text_20_body">
      <style:text-properties officeooo:rsid="00ea866e" officeooo:paragraph-rsid="00d673d7"/>
    </style:style>
    <style:style style:name="P169" style:family="paragraph" style:parent-style-name="Text_20_body">
      <style:text-properties officeooo:rsid="00ebb296" officeooo:paragraph-rsid="00d673d7"/>
    </style:style>
    <style:style style:name="P170" style:family="paragraph" style:parent-style-name="Text_20_body">
      <style:text-properties officeooo:rsid="00ecdaee" officeooo:paragraph-rsid="00d673d7"/>
    </style:style>
    <style:style style:name="P171" style:family="paragraph" style:parent-style-name="Text_20_body">
      <style:text-properties officeooo:rsid="00d8ffe0" officeooo:paragraph-rsid="00d8ffe0"/>
    </style:style>
    <style:style style:name="P172" style:family="paragraph" style:parent-style-name="Text_20_body">
      <style:text-properties officeooo:paragraph-rsid="00e16f63"/>
    </style:style>
    <style:style style:name="P173" style:family="paragraph" style:parent-style-name="Text_20_body">
      <style:text-properties officeooo:rsid="00e54ccf" officeooo:paragraph-rsid="00e54ccf"/>
    </style:style>
    <style:style style:name="P174" style:family="paragraph" style:parent-style-name="Text_20_body">
      <style:text-properties officeooo:paragraph-rsid="00e54ccf"/>
    </style:style>
    <style:style style:name="P175" style:family="paragraph" style:parent-style-name="Text_20_body">
      <style:text-properties officeooo:rsid="00e5f97a" officeooo:paragraph-rsid="00e5f97a"/>
    </style:style>
    <style:style style:name="P176" style:family="paragraph" style:parent-style-name="Text_20_body">
      <style:text-properties officeooo:paragraph-rsid="00e5f97a"/>
    </style:style>
    <style:style style:name="P177" style:family="paragraph" style:parent-style-name="Text_20_body">
      <style:text-properties officeooo:rsid="00e54ccf" officeooo:paragraph-rsid="00e54ccf" fo:background-color="transparent"/>
    </style:style>
    <style:style style:name="P178" style:family="paragraph" style:parent-style-name="Text_20_body">
      <style:text-properties officeooo:paragraph-rsid="00dda4cb"/>
    </style:style>
    <style:style style:name="P179"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80"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181"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182"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183"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184"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185"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186"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187"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88"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89"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90"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91" style:family="paragraph" style:parent-style-name="Fig.">
      <style:text-properties officeooo:rsid="00ccb8e2" officeooo:paragraph-rsid="00e8f23e"/>
    </style:style>
    <style:style style:name="P192"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93"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194"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95" style:family="paragraph" style:parent-style-name="Table_20_Contents">
      <style:paragraph-properties fo:text-align="justify" style:justify-single-word="false"/>
      <style:text-properties officeooo:rsid="014c5388" officeooo:paragraph-rsid="01a1cb29"/>
    </style:style>
    <style:style style:name="P196" style:family="paragraph" style:parent-style-name="Table_20_Contents">
      <style:paragraph-properties fo:text-align="justify" style:justify-single-word="false"/>
      <style:text-properties officeooo:rsid="014c5388" officeooo:paragraph-rsid="01a9cdd2"/>
    </style:style>
    <style:style style:name="P197" style:family="paragraph" style:parent-style-name="Standard">
      <style:text-properties officeooo:rsid="014c5388" officeooo:paragraph-rsid="01a9cdd2"/>
    </style:style>
    <style:style style:name="P198" style:family="paragraph" style:parent-style-name="Text_20_body">
      <style:text-properties officeooo:rsid="014c5388" officeooo:paragraph-rsid="01a9cdd2"/>
    </style:style>
    <style:style style:name="P199" style:family="paragraph" style:parent-style-name="Text_20_body">
      <style:text-properties officeooo:rsid="014c5388" officeooo:paragraph-rsid="019cebf9"/>
    </style:style>
    <style:style style:name="P200" style:family="paragraph" style:parent-style-name="Text_20_body">
      <style:text-properties officeooo:rsid="014c5388" officeooo:paragraph-rsid="01a1cb29"/>
    </style:style>
    <style:style style:name="P201" style:family="paragraph" style:parent-style-name="Table_20_Contents">
      <style:paragraph-properties fo:text-align="justify" style:justify-single-word="false"/>
      <style:text-properties style:font-name="Consolas" officeooo:paragraph-rsid="019cebf9"/>
    </style:style>
    <style:style style:name="P202"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203" style:family="paragraph" style:parent-style-name="Table_20_Contents">
      <style:paragraph-properties fo:text-align="justify" style:justify-single-word="false"/>
      <style:text-properties style:font-name="Consolas" officeooo:rsid="015e4779" officeooo:paragraph-rsid="019cebf9"/>
    </style:style>
    <style:style style:name="P204" style:family="paragraph" style:parent-style-name="Table_20_Contents">
      <style:paragraph-properties fo:text-align="justify" style:justify-single-word="false"/>
      <style:text-properties style:font-name="Consolas" officeooo:rsid="01622317" officeooo:paragraph-rsid="019cebf9"/>
    </style:style>
    <style:style style:name="P205"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206"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b1a3a8" fo:background-color="#eeeeee"/>
    </style:style>
    <style:style style:name="P207" style:family="paragraph" style:parent-style-name="Text_20_body">
      <style:text-properties officeooo:rsid="0149cec3" officeooo:paragraph-rsid="01a9cdd2"/>
    </style:style>
    <style:style style:name="P208" style:family="paragraph" style:parent-style-name="Table_20_Contents">
      <style:paragraph-properties fo:text-align="justify" style:justify-single-word="false"/>
      <style:text-properties officeooo:rsid="015c0e13" officeooo:paragraph-rsid="019cebf9"/>
    </style:style>
    <style:style style:name="P209" style:family="paragraph" style:parent-style-name="Table_20_Contents">
      <style:paragraph-properties fo:text-align="justify" style:justify-single-word="false"/>
      <style:text-properties officeooo:rsid="015fa555" officeooo:paragraph-rsid="019cebf9"/>
    </style:style>
    <style:style style:name="P210" style:family="paragraph" style:parent-style-name="Text_20_body">
      <style:text-properties officeooo:rsid="015fa555" officeooo:paragraph-rsid="019cebf9"/>
    </style:style>
    <style:style style:name="P211" style:family="paragraph" style:parent-style-name="Table_20_Contents">
      <style:paragraph-properties fo:text-align="justify" style:justify-single-word="false"/>
      <style:text-properties officeooo:rsid="0160d5f3" officeooo:paragraph-rsid="019cebf9"/>
    </style:style>
    <style:style style:name="P212" style:family="paragraph" style:parent-style-name="Table_20_Contents">
      <style:paragraph-properties fo:text-align="justify" style:justify-single-word="false"/>
      <style:text-properties officeooo:rsid="0160d5f3" officeooo:paragraph-rsid="01a9cdd2"/>
    </style:style>
    <style:style style:name="P213"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14"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15" style:family="paragraph" style:parent-style-name="Standard">
      <style:text-properties officeooo:rsid="007f55bb" officeooo:paragraph-rsid="01a9cdd2"/>
    </style:style>
    <style:style style:name="P216" style:family="paragraph" style:parent-style-name="Text_20_body">
      <style:text-properties officeooo:rsid="007f55bb" officeooo:paragraph-rsid="01915c4c"/>
    </style:style>
    <style:style style:name="P217" style:family="paragraph" style:parent-style-name="Text_20_body">
      <style:paragraph-properties fo:text-align="center" style:justify-single-word="false"/>
      <style:text-properties officeooo:rsid="007f55bb" officeooo:paragraph-rsid="01915c4c"/>
    </style:style>
    <style:style style:name="P218" style:family="paragraph" style:parent-style-name="Table_20_Contents">
      <style:paragraph-properties fo:text-align="justify" style:justify-single-word="false"/>
      <style:text-properties officeooo:rsid="01546630" officeooo:paragraph-rsid="01a9cdd2"/>
    </style:style>
    <style:style style:name="P219" style:family="paragraph" style:parent-style-name="Text_20_body">
      <style:paragraph-properties fo:text-align="center" style:justify-single-word="false"/>
      <style:text-properties officeooo:rsid="007ddc84" officeooo:paragraph-rsid="01915c4c"/>
    </style:style>
    <style:style style:name="P220" style:family="paragraph" style:parent-style-name="Text_20_body">
      <style:text-properties officeooo:rsid="007ddc84" officeooo:paragraph-rsid="01915c4c"/>
    </style:style>
    <style:style style:name="P221" style:family="paragraph" style:parent-style-name="Text_20_body">
      <style:text-properties officeooo:rsid="007ddc84" officeooo:paragraph-rsid="019c96f9"/>
    </style:style>
    <style:style style:name="P222" style:family="paragraph" style:parent-style-name="Text_20_body">
      <style:text-properties officeooo:rsid="01836b49" officeooo:paragraph-rsid="01915c4c"/>
    </style:style>
    <style:style style:name="P223" style:family="paragraph" style:parent-style-name="Contents_20_1">
      <style:paragraph-properties>
        <style:tab-stops>
          <style:tab-stop style:position="17cm" style:type="right" style:leader-style="dotted" style:leader-text="."/>
        </style:tab-stops>
      </style:paragraph-properties>
    </style:style>
    <style:style style:name="P224" style:family="paragraph" style:parent-style-name="Contents_20_2">
      <style:paragraph-properties>
        <style:tab-stops>
          <style:tab-stop style:position="17cm" style:type="right" style:leader-style="dotted" style:leader-text="."/>
        </style:tab-stops>
      </style:paragraph-properties>
    </style:style>
    <style:style style:name="P225" style:family="paragraph" style:parent-style-name="Contents_20_3">
      <style:paragraph-properties>
        <style:tab-stops>
          <style:tab-stop style:position="17cm" style:type="right" style:leader-style="dotted" style:leader-text="."/>
        </style:tab-stops>
      </style:paragraph-properties>
    </style:style>
    <style:style style:name="P226" style:family="paragraph" style:parent-style-name="Figure">
      <style:text-properties officeooo:paragraph-rsid="018d9a1e"/>
    </style:style>
    <style:style style:name="P227" style:family="paragraph" style:parent-style-name="Figure">
      <style:text-properties officeooo:paragraph-rsid="01a9cdd2"/>
    </style:style>
    <style:style style:name="P228" style:family="paragraph" style:parent-style-name="Text_20_body">
      <style:text-properties officeooo:paragraph-rsid="01a9cdd2"/>
    </style:style>
    <style:style style:name="P229" style:family="paragraph" style:parent-style-name="Text_20_body">
      <style:text-properties officeooo:rsid="01915c4c" officeooo:paragraph-rsid="01915c4c"/>
    </style:style>
    <style:style style:name="P230" style:family="paragraph" style:parent-style-name="Text_20_body">
      <style:paragraph-properties fo:margin-left="0cm" fo:margin-right="0cm" fo:text-indent="0cm" style:auto-text-indent="false"/>
      <style:text-properties officeooo:rsid="01915c4c" officeooo:paragraph-rsid="01949037"/>
    </style:style>
    <style:style style:name="P231" style:family="paragraph" style:parent-style-name="Text_20_body">
      <style:text-properties officeooo:rsid="018c7b7a" officeooo:paragraph-rsid="018c7b7a"/>
    </style:style>
    <style:style style:name="P232" style:family="paragraph" style:parent-style-name="Text_20_body">
      <style:text-properties officeooo:rsid="018c7b7a" officeooo:paragraph-rsid="01a9cdd2"/>
    </style:style>
    <style:style style:name="P233" style:family="paragraph" style:parent-style-name="Table_20_Contents">
      <style:paragraph-properties fo:text-align="justify" style:justify-single-word="false"/>
      <style:text-properties officeooo:rsid="018c7b7a" officeooo:paragraph-rsid="018c7b7a"/>
    </style:style>
    <style:style style:name="P234" style:family="paragraph" style:parent-style-name="Text_20_body">
      <style:paragraph-properties fo:text-align="justify" style:justify-single-word="false"/>
      <style:text-properties officeooo:rsid="018c7b7a" officeooo:paragraph-rsid="018c7b7a"/>
    </style:style>
    <style:style style:name="P235" style:family="paragraph" style:parent-style-name="Text_20_body">
      <style:paragraph-properties fo:text-align="justify" style:justify-single-word="false"/>
      <style:text-properties officeooo:rsid="018c7b7a" officeooo:paragraph-rsid="01a3408a"/>
    </style:style>
    <style:style style:name="P236" style:family="paragraph" style:parent-style-name="Text_20_body">
      <style:paragraph-properties fo:text-align="justify" style:justify-single-word="false"/>
      <style:text-properties officeooo:rsid="018c7b7a" officeooo:paragraph-rsid="01a9cdd2"/>
    </style:style>
    <style:style style:name="P237" style:family="paragraph" style:parent-style-name="Text_20_body">
      <style:paragraph-properties fo:text-align="justify" style:justify-single-word="false"/>
      <style:text-properties officeooo:rsid="018c7b7a" officeooo:paragraph-rsid="01aba0a4"/>
    </style:style>
    <style:style style:name="P238" style:family="paragraph" style:parent-style-name="Text_20_body">
      <style:paragraph-properties fo:text-align="center" style:justify-single-word="false"/>
      <style:text-properties officeooo:rsid="018c7b7a" officeooo:paragraph-rsid="018c7b7a"/>
    </style:style>
    <style:style style:name="P239" style:family="paragraph" style:parent-style-name="Text_20_body">
      <style:paragraph-properties fo:text-align="center" style:justify-single-word="false"/>
      <style:text-properties officeooo:rsid="018c7b7a" officeooo:paragraph-rsid="018f92fd"/>
    </style:style>
    <style:style style:name="P240" style:family="paragraph" style:parent-style-name="Text_20_body">
      <style:text-properties officeooo:rsid="018c7b7a" officeooo:paragraph-rsid="018f92fd"/>
    </style:style>
    <style:style style:name="P241"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42"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43" style:family="paragraph" style:parent-style-name="Standard">
      <style:paragraph-properties fo:text-align="justify" style:justify-single-word="false" fo:padding="0.049cm" fo:border="0.06pt solid #000000" style:shadow="#808080 0.18cm 0.18cm"/>
      <style:text-properties officeooo:rsid="005a2d0c" officeooo:paragraph-rsid="018c7b7a"/>
    </style:style>
    <style:style style:name="P244"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45"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46" style:family="paragraph" style:parent-style-name="Standard">
      <style:text-properties fo:language="ca" fo:country="ES" officeooo:rsid="003dd471" officeooo:paragraph-rsid="018c7b7a"/>
    </style:style>
    <style:style style:name="P247"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48" style:family="paragraph" style:parent-style-name="Standard">
      <style:text-properties style:font-name="Calibri" fo:language="ca" fo:country="ES" officeooo:paragraph-rsid="018c7b7a"/>
    </style:style>
    <style:style style:name="P249" style:family="paragraph" style:parent-style-name="Standard">
      <style:paragraph-properties fo:padding="0.049cm" fo:border="0.06pt solid #000000" style:shadow="#000000 0cm 0cm"/>
      <style:text-properties officeooo:paragraph-rsid="0195481e"/>
    </style:style>
    <style:style style:name="P250" style:family="paragraph" style:parent-style-name="Text_20_body">
      <style:text-properties officeooo:rsid="0195481e" officeooo:paragraph-rsid="0195481e"/>
    </style:style>
    <style:style style:name="P251"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52"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53"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54"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255"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256"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57"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258"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259"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260"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61"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262"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63"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264"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65"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266"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267"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68"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269"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270"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271"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72"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73"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274"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75"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276"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77"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278"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79"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280"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281"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282"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83"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284"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285"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286"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287"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88"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289"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290"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291"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92"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294"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295"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296"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297"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298"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299"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300"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301"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302"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303"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304"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305"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306"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307"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308"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309"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310"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311"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312"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313"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314"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315"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316"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317"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318"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319"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320"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321"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322"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323"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324"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325"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326"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327"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328"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329"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330"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331"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332"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333"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334"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335"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336"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337"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338"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339"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340"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341"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342"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343"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344"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345"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346"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347"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348"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349"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350" style:family="paragraph" style:parent-style-name="Table_20_Contents">
      <style:paragraph-properties fo:text-align="start" style:justify-single-word="false"/>
      <style:text-properties style:font-name="Calibri2" fo:font-size="10pt" fo:language="ca" fo:country="ES" officeooo:rsid="01b5e40b" officeooo:paragraph-rsid="01b5e40b" style:font-size-asian="10pt" style:font-size-complex="10pt"/>
    </style:style>
    <style:style style:name="P351" style:family="paragraph" style:parent-style-name="Table_20_Contents">
      <style:paragraph-properties fo:text-align="center" style:justify-single-word="false"/>
      <style:text-properties style:font-name="Calibri2" fo:font-size="10pt" fo:language="ca" fo:country="ES" officeooo:rsid="01b5e40b" officeooo:paragraph-rsid="01b5e40b" style:font-size-asian="10pt" style:font-size-complex="10pt"/>
    </style:style>
    <style:style style:name="P352" style:family="paragraph" style:parent-style-name="Table_20_Contents">
      <style:paragraph-properties fo:text-align="end" style:justify-single-word="false"/>
      <style:text-properties style:font-name="Calibri2" fo:font-size="10pt" fo:language="ca" fo:country="ES" officeooo:rsid="01b5e40b" officeooo:paragraph-rsid="01b5e40b" style:font-size-asian="10pt" style:font-size-complex="10pt"/>
    </style:style>
    <style:style style:name="P353" style:family="paragraph" style:parent-style-name="Table_20_Contents">
      <style:paragraph-properties fo:text-align="center" style:justify-single-word="false"/>
      <style:text-properties style:font-name="Calibri2" fo:font-size="10pt" fo:language="ca" fo:country="ES" officeooo:rsid="01b71330" officeooo:paragraph-rsid="01b71330" style:font-size-asian="10pt" style:font-size-complex="10pt"/>
    </style:style>
    <style:style style:name="P354"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355"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356"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357"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358"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359"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360"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361"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362"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363"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364"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365"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366"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367"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368"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369" style:family="paragraph" style:parent-style-name="Table_20_Contents">
      <style:paragraph-properties fo:text-align="justify" style:justify-single-word="false"/>
      <style:text-properties officeooo:rsid="01a00707" officeooo:paragraph-rsid="01a00707"/>
    </style:style>
    <style:style style:name="P370" style:family="paragraph" style:parent-style-name="Table_20_Contents">
      <style:paragraph-properties fo:text-align="justify" style:justify-single-word="false"/>
      <style:text-properties officeooo:rsid="01a00707" officeooo:paragraph-rsid="01a9cdd2"/>
    </style:style>
    <style:style style:name="P371"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372"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373"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74"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75"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76" style:family="paragraph" style:parent-style-name="Text_20_body">
      <style:paragraph-properties fo:text-align="justify" style:justify-single-word="false"/>
      <style:text-properties officeooo:rsid="009dea99" officeooo:paragraph-rsid="018c7b7a"/>
    </style:style>
    <style:style style:name="P377" style:family="paragraph" style:parent-style-name="Text_20_body">
      <style:paragraph-properties fo:text-align="justify" style:justify-single-word="false"/>
      <style:text-properties officeooo:rsid="007e0567" officeooo:paragraph-rsid="018c7b7a"/>
    </style:style>
    <style:style style:name="P378" style:family="paragraph" style:parent-style-name="Text_20_body">
      <style:paragraph-properties fo:text-align="justify" style:justify-single-word="false"/>
      <style:text-properties officeooo:rsid="002cbdf3" officeooo:paragraph-rsid="018c7b7a"/>
    </style:style>
    <style:style style:name="P379" style:family="paragraph" style:parent-style-name="Text_20_body">
      <style:paragraph-properties fo:text-align="justify" style:justify-single-word="false"/>
      <style:text-properties officeooo:rsid="009edb4e" officeooo:paragraph-rsid="018c7b7a"/>
    </style:style>
    <style:style style:name="P380" style:family="paragraph" style:parent-style-name="Text_20_body">
      <style:text-properties officeooo:rsid="00675fb3" officeooo:paragraph-rsid="00a8be7c"/>
    </style:style>
    <style:style style:name="P381" style:family="paragraph" style:parent-style-name="Text_20_body">
      <style:paragraph-properties fo:margin-left="0cm" fo:margin-right="0cm" fo:text-indent="0cm" style:auto-text-indent="false"/>
      <style:text-properties officeooo:rsid="01949037" officeooo:paragraph-rsid="01949037"/>
    </style:style>
    <style:style style:name="P382" style:family="paragraph" style:parent-style-name="Text_20_body">
      <style:text-properties officeooo:rsid="017c0014" officeooo:paragraph-rsid="019b515e"/>
    </style:style>
    <style:style style:name="P383" style:family="paragraph" style:parent-style-name="Fig.">
      <style:paragraph-properties fo:text-align="center" style:justify-single-word="false"/>
      <style:text-properties officeooo:rsid="017e73c9" officeooo:paragraph-rsid="01794cf9"/>
    </style:style>
    <style:style style:name="P384"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8c7b7a" style:font-size-asian="10pt"/>
    </style:style>
    <style:style style:name="P385"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386"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387"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388" style:family="paragraph" style:parent-style-name="Standard">
      <style:paragraph-properties fo:margin-top="0cm" fo:margin-bottom="0.212cm" style:contextual-spacing="false" fo:text-align="start" style:justify-single-word="false"/>
      <style:text-properties officeooo:rsid="01b368bb" officeooo:paragraph-rsid="01b368bb"/>
    </style:style>
    <style:style style:name="P389" style:family="paragraph" style:parent-style-name="Standard">
      <style:paragraph-properties fo:margin-top="0cm" fo:margin-bottom="0.212cm" style:contextual-spacing="false" fo:text-align="start" style:justify-single-word="false"/>
      <style:text-properties officeooo:rsid="01b09e8f" officeooo:paragraph-rsid="01b09e8f"/>
    </style:style>
    <style:style style:name="P390" style:family="paragraph" style:parent-style-name="Fig." style:list-style-name="L15">
      <style:text-properties officeooo:rsid="00ccb8e2" officeooo:paragraph-rsid="00e8f23e"/>
    </style:style>
    <style:style style:name="P391" style:family="paragraph" style:parent-style-name="Fig." style:list-style-name="L15">
      <style:text-properties fo:font-style="normal" officeooo:rsid="00ccb8e2" officeooo:paragraph-rsid="00e8f23e" style:font-style-asian="normal" style:font-style-complex="normal"/>
    </style:style>
    <style:style style:name="P392" style:family="paragraph" style:parent-style-name="Heading_20_1" style:master-page-name="Cos">
      <style:paragraph-properties fo:margin-left="0cm" fo:margin-right="0cm" fo:text-align="center" style:justify-single-word="false" fo:text-indent="0cm" style:auto-text-indent="false" style:page-number="auto"/>
    </style:style>
    <style:style style:name="P393" style:family="paragraph" style:parent-style-name="Heading_20_1">
      <style:paragraph-properties fo:margin-left="0cm" fo:margin-right="0cm" fo:text-indent="0cm" style:auto-text-indent="false" fo:break-before="page"/>
      <style:text-properties officeooo:rsid="0065d6d8" officeooo:paragraph-rsid="0065d6d8"/>
    </style:style>
    <style:style style:name="P394" style:family="paragraph" style:parent-style-name="Heading_20_1">
      <style:paragraph-properties fo:margin-left="0cm" fo:margin-right="0cm" fo:text-indent="0cm" style:auto-text-indent="false" fo:break-before="page"/>
      <style:text-properties officeooo:rsid="00a8be7c" officeooo:paragraph-rsid="00a9a467"/>
    </style:style>
    <style:style style:name="P395" style:family="paragraph" style:parent-style-name="Heading_20_1">
      <style:paragraph-properties fo:margin-left="0cm" fo:margin-right="0cm" fo:text-indent="0cm" style:auto-text-indent="false" fo:break-before="page"/>
      <style:text-properties officeooo:rsid="01915c4c" officeooo:paragraph-rsid="01915c4c"/>
    </style:style>
    <style:style style:name="P396" style:family="paragraph" style:parent-style-name="Heading_20_1">
      <style:paragraph-properties fo:margin-left="0cm" fo:margin-right="0cm" fo:text-indent="0cm" style:auto-text-indent="false" fo:break-before="page"/>
      <style:text-properties officeooo:rsid="018d9a1e" officeooo:paragraph-rsid="018d9a1e"/>
    </style:style>
    <style:style style:name="P397" style:family="paragraph" style:parent-style-name="Heading_20_1">
      <style:paragraph-properties fo:margin-left="0cm" fo:margin-right="0cm" fo:text-indent="0cm" style:auto-text-indent="false" fo:break-before="page"/>
      <style:text-properties officeooo:rsid="018d9a1e" officeooo:paragraph-rsid="01a3c4fd"/>
    </style:style>
    <style:style style:name="P398"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399"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400"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01" style:family="paragraph" style:parent-style-name="Heading_20_2">
      <style:paragraph-properties fo:margin-left="1.9cm" fo:margin-right="0cm" fo:text-indent="-1.3cm" style:auto-text-indent="false"/>
      <style:text-properties officeooo:rsid="018f92fd" officeooo:paragraph-rsid="018f92fd"/>
    </style:style>
    <style:style style:name="P402" style:family="paragraph" style:parent-style-name="Heading_20_2">
      <style:paragraph-properties fo:margin-left="1.9cm" fo:margin-right="0cm" fo:text-indent="-1.3cm" style:auto-text-indent="false"/>
      <style:text-properties officeooo:rsid="018c7b7a" officeooo:paragraph-rsid="018c7b7a"/>
    </style:style>
    <style:style style:name="P403" style:family="paragraph" style:parent-style-name="Heading_20_2">
      <style:paragraph-properties fo:margin-left="1.9cm" fo:margin-right="0cm" fo:text-indent="-1.3cm" style:auto-text-indent="false"/>
      <style:text-properties officeooo:rsid="018c7b7a" officeooo:paragraph-rsid="019c96f9"/>
    </style:style>
    <style:style style:name="P404" style:family="paragraph" style:parent-style-name="Heading_20_2">
      <style:paragraph-properties fo:margin-left="1.9cm" fo:margin-right="0cm" fo:text-indent="-1.3cm" style:auto-text-indent="false"/>
      <style:text-properties officeooo:rsid="018c7b7a" officeooo:paragraph-rsid="01a3408a"/>
    </style:style>
    <style:style style:name="P405" style:family="paragraph" style:parent-style-name="Heading_20_2">
      <style:paragraph-properties fo:margin-left="1.9cm" fo:margin-right="0cm" fo:text-indent="-1.3cm" style:auto-text-indent="false"/>
      <style:text-properties officeooo:rsid="018c7b7a" officeooo:paragraph-rsid="01a9cdd2"/>
    </style:style>
    <style:style style:name="P406" style:family="paragraph" style:parent-style-name="Heading_20_2">
      <style:paragraph-properties fo:margin-left="1.9cm" fo:margin-right="0cm" fo:text-indent="-1.3cm" style:auto-text-indent="false"/>
      <style:text-properties officeooo:paragraph-rsid="018c7b7a"/>
    </style:style>
    <style:style style:name="P407" style:family="paragraph" style:parent-style-name="Heading_20_2">
      <style:paragraph-properties fo:margin-left="1.9cm" fo:margin-right="0cm" fo:text-indent="-1.3cm" style:auto-text-indent="false"/>
      <style:text-properties officeooo:paragraph-rsid="01915c4c"/>
    </style:style>
    <style:style style:name="P408" style:family="paragraph" style:parent-style-name="Heading_20_2">
      <style:paragraph-properties fo:margin-left="1.9cm" fo:margin-right="0cm" fo:text-indent="-1.3cm" style:auto-text-indent="false"/>
      <style:text-properties officeooo:rsid="019c96f9" officeooo:paragraph-rsid="019c96f9"/>
    </style:style>
    <style:style style:name="P409"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10"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11"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412" style:family="paragraph" style:parent-style-name="Heading_20_2">
      <style:paragraph-properties fo:margin-left="1.9cm" fo:margin-right="0cm" fo:text-indent="-1.3cm" style:auto-text-indent="false"/>
      <style:text-properties officeooo:rsid="00d8ffe0" officeooo:paragraph-rsid="00d8ffe0"/>
    </style:style>
    <style:style style:name="P413" style:family="paragraph" style:parent-style-name="Heading_20_2">
      <style:paragraph-properties fo:margin-left="1.9cm" fo:margin-right="0cm" fo:text-indent="-1.3cm" style:auto-text-indent="false"/>
      <style:text-properties officeooo:rsid="00dbb531" officeooo:paragraph-rsid="00dbb531"/>
    </style:style>
    <style:style style:name="P414" style:family="paragraph" style:parent-style-name="Heading_20_3">
      <style:paragraph-properties fo:margin-left="1.9cm" fo:margin-right="0cm" fo:text-indent="-1.3cm" style:auto-text-indent="false"/>
      <style:text-properties officeooo:rsid="018c7b7a" officeooo:paragraph-rsid="018c7b7a"/>
    </style:style>
    <style:style style:name="P415" style:family="paragraph" style:parent-style-name="Heading_20_3">
      <style:text-properties officeooo:rsid="01a9cdd2" officeooo:paragraph-rsid="01a9cdd2"/>
    </style:style>
    <style:style style:name="P416" style:family="paragraph" style:parent-style-name="Heading_20_3">
      <style:text-properties fo:font-style="italic" fo:font-weight="bold" officeooo:rsid="01a9cdd2" officeooo:paragraph-rsid="01a9cdd2" style:font-style-asian="italic" style:font-weight-asian="bold" style:font-style-complex="italic" style:font-weight-complex="bold"/>
    </style:style>
    <style:style style:name="P417" style:family="paragraph" style:parent-style-name="Heading_20_3">
      <style:paragraph-properties fo:margin-left="1.9cm" fo:margin-right="0cm" fo:text-indent="-1.3cm" style:auto-text-indent="false"/>
      <style:text-properties officeooo:paragraph-rsid="00d673d7"/>
    </style:style>
    <style:style style:name="P418" style:family="paragraph" style:parent-style-name="Heading_20_3">
      <style:paragraph-properties fo:margin-left="1.9cm" fo:margin-right="0cm" fo:text-indent="-1.3cm" style:auto-text-indent="false"/>
      <style:text-properties officeooo:paragraph-rsid="00dda4cb"/>
    </style:style>
    <style:style style:name="P419" style:family="paragraph" style:parent-style-name="Heading_20_3">
      <style:paragraph-properties fo:margin-left="1.9cm" fo:margin-right="0cm" fo:text-indent="-1.3cm" style:auto-text-indent="false"/>
      <style:text-properties officeooo:rsid="00dda4cb" officeooo:paragraph-rsid="00dda4cb"/>
    </style:style>
    <style:style style:name="P420" style:family="paragraph" style:parent-style-name="Standard" style:list-style-name="L13">
      <style:text-properties officeooo:paragraph-rsid="00e8f23e"/>
    </style:style>
    <style:style style:name="P421" style:family="paragraph" style:parent-style-name="Standard" style:list-style-name="L13">
      <style:text-properties fo:font-style="italic" officeooo:rsid="00e8f23e" officeooo:paragraph-rsid="00e8f23e" style:font-style-asian="italic" style:font-style-complex="italic"/>
    </style:style>
    <style:style style:name="P422" style:family="paragraph" style:parent-style-name="Table_20_Contents" style:list-style-name="L4">
      <style:paragraph-properties fo:text-align="justify" style:justify-single-word="false"/>
      <style:text-properties officeooo:paragraph-rsid="019cebf9"/>
    </style:style>
    <style:style style:name="P423" style:family="paragraph" style:parent-style-name="Table_20_Contents" style:list-style-name="L8">
      <style:paragraph-properties fo:text-align="justify" style:justify-single-word="false"/>
      <style:text-properties officeooo:paragraph-rsid="01a9cdd2"/>
    </style:style>
    <style:style style:name="P424" style:family="paragraph" style:parent-style-name="Table_20_Contents" style:list-style-name="L11">
      <style:paragraph-properties fo:text-align="justify" style:justify-single-word="false"/>
      <style:text-properties officeooo:paragraph-rsid="01a9cdd2"/>
    </style:style>
    <style:style style:name="P425" style:family="paragraph" style:parent-style-name="Table_20_Contents" style:list-style-name="L5">
      <style:paragraph-properties fo:text-align="justify" style:justify-single-word="false"/>
      <style:text-properties officeooo:rsid="015fa555" officeooo:paragraph-rsid="019cebf9"/>
    </style:style>
    <style:style style:name="P426" style:family="paragraph" style:parent-style-name="Table_20_Contents" style:list-style-name="L6">
      <style:paragraph-properties fo:text-align="justify" style:justify-single-word="false"/>
      <style:text-properties officeooo:rsid="015fa555" officeooo:paragraph-rsid="019cebf9"/>
    </style:style>
    <style:style style:name="P427" style:family="paragraph" style:parent-style-name="Table_20_Contents" style:list-style-name="L5">
      <style:paragraph-properties fo:text-align="justify" style:justify-single-word="false"/>
      <style:text-properties officeooo:rsid="014f9ade" officeooo:paragraph-rsid="019cebf9"/>
    </style:style>
    <style:style style:name="P428" style:family="paragraph" style:parent-style-name="Table_20_Contents" style:list-style-name="L9">
      <style:paragraph-properties fo:text-align="justify" style:justify-single-word="false"/>
      <style:text-properties officeooo:rsid="014f9ade" officeooo:paragraph-rsid="01a9cdd2"/>
    </style:style>
    <style:style style:name="P429" style:family="paragraph" style:parent-style-name="Table_20_Contents" style:list-style-name="L10">
      <style:paragraph-properties fo:text-align="justify" style:justify-single-word="false"/>
      <style:text-properties officeooo:rsid="014f9ade" officeooo:paragraph-rsid="01a9cdd2"/>
    </style:style>
    <style:style style:name="P430" style:family="paragraph" style:parent-style-name="Table_20_Contents" style:list-style-name="L5">
      <style:paragraph-properties fo:text-align="justify" style:justify-single-word="false"/>
      <style:text-properties officeooo:rsid="0151259d" officeooo:paragraph-rsid="019cebf9"/>
    </style:style>
    <style:style style:name="P431" style:family="paragraph" style:parent-style-name="Table_20_Contents" style:list-style-name="L6">
      <style:paragraph-properties fo:text-align="justify" style:justify-single-word="false"/>
      <style:text-properties officeooo:rsid="0151259d" officeooo:paragraph-rsid="019cebf9"/>
    </style:style>
    <style:style style:name="P432" style:family="paragraph" style:parent-style-name="Table_20_Contents" style:list-style-name="L9">
      <style:paragraph-properties fo:text-align="justify" style:justify-single-word="false"/>
      <style:text-properties officeooo:rsid="0151259d" officeooo:paragraph-rsid="01a9cdd2"/>
    </style:style>
    <style:style style:name="P433" style:family="paragraph" style:parent-style-name="Table_20_Contents" style:list-style-name="L10">
      <style:paragraph-properties fo:text-align="justify" style:justify-single-word="false"/>
      <style:text-properties officeooo:rsid="0151259d" officeooo:paragraph-rsid="01a9cdd2"/>
    </style:style>
    <style:style style:name="P434" style:family="paragraph" style:parent-style-name="Table_20_Contents" style:list-style-name="L12">
      <style:paragraph-properties fo:text-align="justify" style:justify-single-word="false"/>
      <style:text-properties officeooo:rsid="0151259d" officeooo:paragraph-rsid="01a9cdd2"/>
    </style:style>
    <style:style style:name="P435" style:family="paragraph" style:parent-style-name="Table_20_Contents" style:list-style-name="L4">
      <style:paragraph-properties fo:text-align="justify" style:justify-single-word="false"/>
      <style:text-properties fo:font-weight="bold" officeooo:rsid="01622317" officeooo:paragraph-rsid="019cebf9" style:font-weight-asian="bold" style:font-weight-complex="bold"/>
    </style:style>
    <style:style style:name="P436" style:family="paragraph" style:parent-style-name="Table_20_Contents" style:list-style-name="L8">
      <style:paragraph-properties fo:text-align="justify" style:justify-single-word="false"/>
      <style:text-properties fo:font-weight="bold" officeooo:paragraph-rsid="01a9cdd2" style:font-weight-asian="bold" style:font-weight-complex="bold"/>
    </style:style>
    <style:style style:name="P437" style:family="paragraph" style:parent-style-name="Table_20_Contents" style:list-style-name="L4">
      <style:paragraph-properties fo:text-align="justify" style:justify-single-word="false"/>
      <style:text-properties fo:font-weight="normal" officeooo:rsid="0163fbf5" officeooo:paragraph-rsid="019cebf9" style:font-weight-asian="normal" style:font-weight-complex="normal"/>
    </style:style>
    <style:style style:name="P438" style:family="paragraph" style:parent-style-name="Table_20_Contents" style:list-style-name="L11">
      <style:paragraph-properties fo:text-align="justify" style:justify-single-word="false"/>
      <style:text-properties officeooo:rsid="0156bbc2" officeooo:paragraph-rsid="01a9cdd2"/>
    </style:style>
    <style:style style:name="P439" style:family="paragraph" style:parent-style-name="Table_20_Contents" style:list-style-name="L12">
      <style:paragraph-properties fo:text-align="justify" style:justify-single-word="false"/>
      <style:text-properties officeooo:rsid="015ba97b" officeooo:paragraph-rsid="01a9cdd2"/>
    </style:style>
    <style:style style:name="P440" style:family="paragraph" style:parent-style-name="Text_20_body" style:list-style-name="L1">
      <style:text-properties officeooo:rsid="01915c4c" officeooo:paragraph-rsid="01915c4c"/>
    </style:style>
    <style:style style:name="P441" style:family="paragraph" style:parent-style-name="Text_20_body" style:list-style-name="L2">
      <style:text-properties officeooo:rsid="007ddc84" officeooo:paragraph-rsid="01915c4c"/>
    </style:style>
    <style:style style:name="P442" style:family="paragraph" style:parent-style-name="Text_20_body" style:list-style-name="L2">
      <style:text-properties officeooo:rsid="007f55bb" officeooo:paragraph-rsid="01915c4c"/>
    </style:style>
    <style:style style:name="P443" style:family="paragraph" style:parent-style-name="Text_20_body" style:list-style-name="L3">
      <style:text-properties officeooo:rsid="007f55bb" officeooo:paragraph-rsid="01915c4c"/>
    </style:style>
    <style:style style:name="P444" style:family="paragraph" style:parent-style-name="Text_20_body" style:list-style-name="L2">
      <style:text-properties officeooo:rsid="0084ae02" officeooo:paragraph-rsid="01915c4c"/>
    </style:style>
    <style:style style:name="P445" style:family="paragraph" style:parent-style-name="Text_20_body" style:list-style-name="L3">
      <style:text-properties officeooo:rsid="01836b49" officeooo:paragraph-rsid="01915c4c"/>
    </style:style>
    <style:style style:name="P446" style:family="paragraph" style:parent-style-name="Text_20_body" style:list-style-name="L7">
      <style:text-properties officeooo:rsid="0149cec3" officeooo:paragraph-rsid="01a9cdd2"/>
    </style:style>
    <style:style style:name="P447" style:family="paragraph" style:parent-style-name="Text_20_body" style:list-style-name="L7">
      <style:text-properties officeooo:rsid="014adc01" officeooo:paragraph-rsid="01a9cdd2"/>
    </style:style>
    <style:style style:name="P448" style:family="paragraph" style:parent-style-name="Text_20_body" style:list-style-name="L14">
      <style:text-properties officeooo:paragraph-rsid="00d8ffe0"/>
    </style:style>
    <style:style style:name="P449" style:family="paragraph" style:parent-style-name="Text_20_body" style:list-style-name="L14">
      <style:text-properties officeooo:paragraph-rsid="01875821"/>
    </style:style>
    <style:style style:name="P450" style:family="paragraph" style:parent-style-name="Text_20_body" style:list-style-name="L14">
      <style:text-properties officeooo:rsid="00d8ffe0" officeooo:paragraph-rsid="00d8ffe0"/>
    </style:style>
    <style:style style:name="P451" style:family="paragraph" style:parent-style-name="Text_20_body" style:list-style-name="L16">
      <style:text-properties fo:font-style="normal" officeooo:rsid="00de9e71" officeooo:paragraph-rsid="00d673d7" style:font-style-asian="normal" style:font-style-complex="normal"/>
    </style:style>
    <style:style style:name="P452" style:family="paragraph" style:parent-style-name="Text_20_body" style:list-style-name="L16">
      <style:text-properties officeooo:rsid="00de9e71" officeooo:paragraph-rsid="00d673d7"/>
    </style:style>
    <style:style style:name="P453" style:family="paragraph" style:parent-style-name="Text_20_body" style:list-style-name="L17">
      <style:text-properties officeooo:paragraph-rsid="00e16f63"/>
    </style:style>
    <style:style style:name="P454" style:family="paragraph" style:parent-style-name="Text_20_body">
      <style:text-properties officeooo:rsid="014c5388" officeooo:paragraph-rsid="01a1cb29"/>
    </style:style>
    <style:style style:name="P455" style:family="paragraph" style:parent-style-name="Text_20_body">
      <style:text-properties officeooo:rsid="014c5388" officeooo:paragraph-rsid="01baef12"/>
    </style:style>
    <style:style style:name="P456" style:family="paragraph">
      <style:paragraph-properties fo:text-align="center" style:writing-mode="lr-tb"/>
      <style:text-properties fo:color="#ffffff" loext:opacity="100%"/>
    </style:style>
    <style:style style:name="P457" style:family="paragraph">
      <loext:graphic-properties draw:fill="solid" draw:fill-color="#ed1c24"/>
      <style:paragraph-properties fo:text-align="center" style:writing-mode="lr-tb"/>
      <style:text-properties fo:color="#ffffff" loext:opacity="100%"/>
    </style:style>
    <style:style style:name="P458" style:family="paragraph">
      <loext:graphic-properties draw:fill="none" draw:fill-color="#ffffff"/>
    </style:style>
    <style:style style:name="P459"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style:font-name="Calibri1" fo:font-size="12pt" fo:font-weight="bold" style:font-size-asian="12pt" style:font-weight-asian="bold" style:font-weight-complex="bold"/>
    </style:style>
    <style:style style:name="T13" style:family="text">
      <style:text-properties officeooo:rsid="0029d6c9"/>
    </style:style>
    <style:style style:name="T14" style:family="text">
      <style:text-properties fo:color="#008080" loext:opacity="100%"/>
    </style:style>
    <style:style style:name="T15" style:family="text">
      <style:text-properties fo:color="#008080" loext:opacity="100%" style:font-name="Monospace1" fo:font-size="10pt" style:font-size-asian="10pt"/>
    </style:style>
    <style:style style:name="T16" style:family="text">
      <style:text-properties fo:color="#008080" loext:opacity="100%" style:font-name="Monospace1" fo:font-size="10pt" officeooo:rsid="01a9cdd2" style:font-size-asian="10pt"/>
    </style:style>
    <style:style style:name="T17" style:family="text">
      <style:text-properties fo:color="#008080" loext:opacity="100%" style:font-name="Consolas1"/>
    </style:style>
    <style:style style:name="T18" style:family="text">
      <style:text-properties fo:color="#008080" loext:opacity="100%" style:font-name="Consolas1" fo:font-size="10pt" style:font-size-asian="10pt"/>
    </style:style>
    <style:style style:name="T19" style:family="text">
      <style:text-properties fo:color="#008080" loext:opacity="100%" style:font-name="Monospace" fo:font-size="10pt" style:font-size-asian="10pt" style:font-size-complex="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Consolas1"/>
    </style:style>
    <style:style style:name="T23" style:family="text">
      <style:text-properties fo:color="#3f7f7f" loext:opacity="100%" style:font-name="Consolas1" fo:font-size="10pt" style:font-size-asian="10pt"/>
    </style:style>
    <style:style style:name="T24" style:family="text">
      <style:text-properties fo:color="#3f7f7f" loext:opacity="100%" style:font-name="Monospace" fo:font-size="10pt" style:font-size-asian="10pt" style:font-size-complex="10pt"/>
    </style:style>
    <style:style style:name="T25" style:family="text">
      <style:text-properties fo:color="#7f007f" loext:opacity="100%"/>
    </style:style>
    <style:style style:name="T26" style:family="text">
      <style:text-properties fo:color="#7f007f" loext:opacity="100%" style:font-name="Consolas1"/>
    </style:style>
    <style:style style:name="T27" style:family="text">
      <style:text-properties fo:color="#7f007f" loext:opacity="100%" style:font-name="Consolas1" fo:font-size="10pt" style:font-size-asian="10pt"/>
    </style:style>
    <style:style style:name="T28" style:family="text">
      <style:text-properties fo:color="#3c3c3c" loext:opacity="100%" style:font-name="Monospace1" fo:font-size="10pt" style:font-size-asian="10pt"/>
    </style:style>
    <style:style style:name="T29" style:family="text">
      <style:text-properties fo:color="#3c3c3c" loext:opacity="100%" style:font-name="Monospace1" fo:font-size="10pt" officeooo:rsid="018c7b7a" style:font-size-asian="10pt"/>
    </style:style>
    <style:style style:name="T30" style:family="text">
      <style:text-properties fo:color="#3c3c3c" loext:opacity="100%" style:font-name="Monospace1" fo:font-size="10pt" officeooo:rsid="01a3408a" style:font-size-asian="10pt"/>
    </style:style>
    <style:style style:name="T31" style:family="text">
      <style:text-properties fo:color="#2a00ff" loext:opacity="100%" style:font-name="Monospace1" fo:font-size="10pt" style:font-size-asian="10pt"/>
    </style:style>
    <style:style style:name="T32" style:family="text">
      <style:text-properties fo:color="#2a00ff" loext:opacity="100%" style:font-name="Monospace1" fo:font-size="10pt" officeooo:rsid="01aba0a4" style:font-size-asian="10pt"/>
    </style:style>
    <style:style style:name="T33" style:family="text">
      <style:text-properties fo:color="#2a00ff" loext:opacity="100%" style:font-name="Consolas1"/>
    </style:style>
    <style:style style:name="T34" style:family="text">
      <style:text-properties fo:color="#2a00ff" loext:opacity="100%" style:font-name="Consolas1" fo:font-size="10pt" fo:font-style="italic" style:font-size-asian="10pt" style:font-style-asian="italic"/>
    </style:style>
    <style:style style:name="T35" style:family="text">
      <style:text-properties fo:color="#2a00ff" loext:opacity="100%" style:font-name="Consolas1" officeooo:rsid="00ee64c9"/>
    </style:style>
    <style:style style:name="T36" style:family="text">
      <style:text-properties fo:color="#2a00ff" loext:opacity="100%" style:font-name="Consolas1" fo:font-style="italic" style:font-style-asian="italic"/>
    </style:style>
    <style:style style:name="T37" style:family="text">
      <style:text-properties fo:color="#2a00ff" loext:opacity="100%" style:font-name="Consolas1" fo:font-size="8pt" style:text-underline-style="none" style:font-size-asian="8pt" style:font-size-complex="8pt"/>
    </style:style>
    <style:style style:name="T38" style:family="text">
      <style:text-properties fo:color="#2a00ff" loext:opacity="100%" fo:font-style="italic" style:font-style-asian="italic"/>
    </style:style>
    <style:style style:name="T39" style:family="text">
      <style:text-properties fo:font-weight="bold" style:font-weight-asian="bold" style:font-weight-complex="bold"/>
    </style:style>
    <style:style style:name="T40" style:family="text">
      <style:text-properties fo:font-weight="bold" officeooo:rsid="009bb1cd" style:font-weight-asian="bold" style:font-weight-complex="bold"/>
    </style:style>
    <style:style style:name="T41" style:family="text">
      <style:text-properties fo:font-weight="bold" officeooo:rsid="00ea866e" style:font-weight-asian="bold" style:font-weight-complex="bold"/>
    </style:style>
    <style:style style:name="T42" style:family="text">
      <style:text-properties fo:font-weight="bold" officeooo:rsid="014f9ade" style:font-weight-asian="bold" style:font-weight-complex="bold"/>
    </style:style>
    <style:style style:name="T43" style:family="text">
      <style:text-properties fo:font-weight="bold" officeooo:rsid="015c4085" style:font-weight-asian="bold" style:font-weight-complex="bold"/>
    </style:style>
    <style:style style:name="T44" style:family="text">
      <style:text-properties fo:font-weight="bold" officeooo:rsid="01546630" style:font-weight-asian="bold" style:font-weight-complex="bold"/>
    </style:style>
    <style:style style:name="T45" style:family="text">
      <style:text-properties fo:color="#7f0055" loext:opacity="100%" style:font-name="Monospace1" fo:font-size="10pt" fo:font-weight="bold" style:font-size-asian="10pt" style:font-weight-asian="bold"/>
    </style:style>
    <style:style style:name="T46" style:family="text">
      <style:text-properties fo:color="#7f0055" loext:opacity="100%" style:font-name="Consolas1"/>
    </style:style>
    <style:style style:name="T47" style:family="text">
      <style:text-properties fo:color="#7f0055" loext:opacity="100%" style:font-name="Consolas1" fo:font-size="10pt" fo:font-weight="bold" style:font-size-asian="10pt" style:font-weight-asian="bold"/>
    </style:style>
    <style:style style:name="T48" style:family="text">
      <style:text-properties fo:color="#7f0055" loext:opacity="100%" style:font-name="Consolas1" fo:font-weight="bold" style:font-weight-asian="bold"/>
    </style:style>
    <style:style style:name="T49" style:family="text">
      <style:text-properties fo:color="#7f0055" loext:opacity="100%" style:font-name="Consolas1" fo:font-size="8pt" style:text-underline-style="none" fo:font-weight="bold" style:font-size-asian="8pt" style:font-weight-asian="bold" style:font-size-complex="8pt"/>
    </style:style>
    <style:style style:name="T50" style:family="text">
      <style:text-properties fo:color="#7f0055" loext:opacity="100%" style:font-name="Consolas1" style:text-underline-style="none" fo:font-weight="bold" style:font-weight-asian="bold"/>
    </style:style>
    <style:style style:name="T51" style:family="text">
      <style:text-properties fo:color="#000000" loext:opacity="100%"/>
    </style:style>
    <style:style style:name="T52" style:family="text">
      <style:text-properties fo:color="#000000" loext:opacity="100%" style:font-name="Monospace1" fo:font-size="10pt" style:font-size-asian="10pt"/>
    </style:style>
    <style:style style:name="T53" style:family="text">
      <style:text-properties fo:color="#000000" loext:opacity="100%" style:font-name="Monospace1" fo:font-size="10pt" officeooo:rsid="018c7b7a" style:font-size-asian="10pt"/>
    </style:style>
    <style:style style:name="T54" style:family="text">
      <style:text-properties fo:color="#000000" loext:opacity="100%" style:font-name="Monospace1" fo:font-size="10pt" officeooo:rsid="01aba0a4" style:font-size-asian="10pt"/>
    </style:style>
    <style:style style:name="T55" style:family="text">
      <style:text-properties fo:color="#000000" loext:opacity="100%" style:font-name="Monospace1" fo:font-size="10pt" fo:font-style="italic" style:font-size-asian="10pt" style:font-style-asian="italic"/>
    </style:style>
    <style:style style:name="T56" style:family="text">
      <style:text-properties fo:color="#000000" loext:opacity="100%" style:font-name="Consolas1"/>
    </style:style>
    <style:style style:name="T57" style:family="text">
      <style:text-properties fo:color="#000000" loext:opacity="100%" style:font-name="Consolas1" fo:font-size="10pt" style:font-size-asian="10pt"/>
    </style:style>
    <style:style style:name="T58" style:family="text">
      <style:text-properties fo:color="#000000" loext:opacity="100%" style:font-name="Consolas1" fo:font-size="10pt" fo:background-color="#d4d4d4" loext:char-shading-value="0" style:font-size-asian="10pt"/>
    </style:style>
    <style:style style:name="T59"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60" style:family="text">
      <style:text-properties fo:color="#000000" loext:opacity="100%" style:font-name="Consolas1" fo:background-color="#d4d4d4" loext:char-shading-value="0"/>
    </style:style>
    <style:style style:name="T61" style:family="text">
      <style:text-properties fo:color="#000000" loext:opacity="100%" style:font-name="Consolas1" officeooo:rsid="00ea866e"/>
    </style:style>
    <style:style style:name="T62" style:family="text">
      <style:text-properties fo:color="#000000" loext:opacity="100%" style:font-name="Consolas1" fo:font-weight="bold" style:font-weight-asian="bold" style:font-weight-complex="bold"/>
    </style:style>
    <style:style style:name="T63" style:family="text">
      <style:text-properties fo:color="#000000" loext:opacity="100%" style:font-name="Consolas1" fo:font-style="italic" style:font-style-asian="italic"/>
    </style:style>
    <style:style style:name="T64" style:family="text">
      <style:text-properties fo:color="#000000" loext:opacity="100%" style:font-name="Consolas1" fo:font-size="8pt" style:text-underline-style="none" style:font-size-asian="8pt" style:font-size-complex="8pt"/>
    </style:style>
    <style:style style:name="T65" style:family="text">
      <style:text-properties fo:color="#000000" loext:opacity="100%" style:font-name="Consolas1" fo:font-size="8pt" style:text-underline-style="none" fo:background-color="transparent" loext:char-shading-value="0" style:font-size-asian="8pt" style:font-size-complex="8pt"/>
    </style:style>
    <style:style style:name="T66" style:family="text">
      <style:text-properties fo:color="#000000" loext:opacity="100%" style:font-name="Consolas1" fo:font-size="8pt" fo:background-color="transparent" loext:char-shading-value="0" style:font-size-asian="8pt" style:font-size-complex="8pt"/>
    </style:style>
    <style:style style:name="T67" style:family="text">
      <style:text-properties fo:color="#000000" loext:opacity="100%" style:font-name="Consolas1" fo:font-size="8pt" style:font-size-asian="8pt" style:font-size-complex="8pt"/>
    </style:style>
    <style:style style:name="T68" style:family="text">
      <style:text-properties fo:color="#000000" loext:opacity="100%" style:font-name="Consolas1" fo:font-size="8pt" fo:font-style="italic" style:text-underline-style="none" style:font-size-asian="8pt" style:font-style-asian="italic" style:font-size-complex="8pt"/>
    </style:style>
    <style:style style:name="T69" style:family="text">
      <style:text-properties fo:color="#000000" loext:opacity="100%" style:font-name="Consolas1" officeooo:rsid="00ee64c9"/>
    </style:style>
    <style:style style:name="T70" style:family="text">
      <style:text-properties fo:color="#000000" loext:opacity="100%" style:font-name="Consolas1" fo:background-color="transparent" loext:char-shading-value="0"/>
    </style:style>
    <style:style style:name="T71" style:family="text">
      <style:text-properties fo:color="#000000" loext:opacity="100%" style:font-name="Consolas1" style:text-underline-style="none"/>
    </style:style>
    <style:style style:name="T72" style:family="text">
      <style:text-properties fo:color="#000000" loext:opacity="100%" style:font-name="Consolas1" fo:font-size="9pt" style:font-size-asian="9pt"/>
    </style:style>
    <style:style style:name="T73" style:family="text">
      <style:text-properties fo:color="#000000" loext:opacity="100%" style:font-name="Monospace" fo:font-size="10pt" style:font-size-asian="10pt" style:font-size-complex="10pt"/>
    </style:style>
    <style:style style:name="T74" style:family="text">
      <style:text-properties fo:color="#0000c0" loext:opacity="100%" style:font-name="Monospace1" fo:font-size="10pt" fo:font-style="italic" fo:font-weight="bold" style:font-size-asian="10pt" style:font-style-asian="italic" style:font-weight-asian="bold"/>
    </style:style>
    <style:style style:name="T75" style:family="text">
      <style:text-properties fo:color="#0000c0" loext:opacity="100%" style:font-name="Consolas1"/>
    </style:style>
    <style:style style:name="T76" style:family="text">
      <style:text-properties fo:color="#0000c0" loext:opacity="100%" style:font-name="Consolas1" fo:font-style="italic" fo:font-weight="bold" style:font-style-asian="italic" style:font-weight-asian="bold"/>
    </style:style>
    <style:style style:name="T77" style:family="text">
      <style:text-properties fo:color="#0000c0" loext:opacity="100%" style:font-name="Consolas1" fo:font-style="italic" fo:font-weight="bold" fo:background-color="transparent" loext:char-shading-value="0" style:font-style-asian="italic" style:font-weight-asian="bold"/>
    </style:style>
    <style:style style:name="T78"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79" style:family="text">
      <style:text-properties fo:color="#6a3e3e" loext:opacity="100%" style:font-name="Monospace1" fo:font-size="10pt" style:font-size-asian="10pt"/>
    </style:style>
    <style:style style:name="T80" style:family="text">
      <style:text-properties fo:color="#6a3e3e" loext:opacity="100%" style:font-name="Monospace1" fo:font-size="10pt" officeooo:rsid="01aba0a4" style:font-size-asian="10pt"/>
    </style:style>
    <style:style style:name="T81" style:family="text">
      <style:text-properties fo:color="#6a3e3e" loext:opacity="100%" style:font-name="Consolas1"/>
    </style:style>
    <style:style style:name="T82" style:family="text">
      <style:text-properties fo:color="#6a3e3e" loext:opacity="100%" style:font-name="Consolas1" fo:font-size="10pt" style:font-size-asian="10pt"/>
    </style:style>
    <style:style style:name="T83" style:family="text">
      <style:text-properties fo:color="#6a3e3e" loext:opacity="100%" style:font-name="Consolas1" fo:background-color="#d4d4d4" loext:char-shading-value="0"/>
    </style:style>
    <style:style style:name="T84" style:family="text">
      <style:text-properties fo:color="#6a3e3e" loext:opacity="100%" style:font-name="Consolas1" fo:font-size="8pt" style:text-underline-style="none" style:font-size-asian="8pt" style:font-size-complex="8pt"/>
    </style:style>
    <style:style style:name="T85"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86" style:family="text">
      <style:text-properties fo:color="#6a3e3e" loext:opacity="100%" style:font-name="Consolas1" fo:font-size="8pt" fo:background-color="transparent" loext:char-shading-value="0" style:font-size-asian="8pt" style:font-size-complex="8pt"/>
    </style:style>
    <style:style style:name="T87" style:family="text">
      <style:text-properties fo:color="#6a3e3e" loext:opacity="100%" style:font-name="Consolas1" fo:font-size="8pt" style:font-size-asian="8pt" style:font-size-complex="8pt"/>
    </style:style>
    <style:style style:name="T88" style:family="text">
      <style:text-properties fo:color="#6a3e3e" loext:opacity="100%" style:font-name="Consolas1" officeooo:rsid="00dbb531"/>
    </style:style>
    <style:style style:name="T89" style:family="text">
      <style:text-properties fo:color="#6a3e3e" loext:opacity="100%" style:font-name="Consolas1" officeooo:rsid="00f0f9b1" fo:background-color="transparent" loext:char-shading-value="0"/>
    </style:style>
    <style:style style:name="T90" style:family="text">
      <style:text-properties fo:color="#6a3e3e" loext:opacity="100%" style:font-name="Consolas1" style:text-underline-style="none"/>
    </style:style>
    <style:style style:name="T91" style:family="text">
      <style:text-properties officeooo:rsid="0086959c"/>
    </style:style>
    <style:style style:name="T92" style:family="text">
      <style:text-properties officeooo:rsid="008b673d"/>
    </style:style>
    <style:style style:name="T93" style:family="text">
      <style:text-properties officeooo:rsid="0090deb7"/>
    </style:style>
    <style:style style:name="T94" style:family="text">
      <style:text-properties officeooo:rsid="0090e737"/>
    </style:style>
    <style:style style:name="T95" style:family="text">
      <style:text-properties officeooo:rsid="00523cb7"/>
    </style:style>
    <style:style style:name="T96" style:family="text">
      <style:text-properties officeooo:rsid="005032ec"/>
    </style:style>
    <style:style style:name="T97" style:family="text">
      <style:text-properties officeooo:rsid="005362e2"/>
    </style:style>
    <style:style style:name="T98" style:family="text">
      <style:text-properties officeooo:rsid="005608e4"/>
    </style:style>
    <style:style style:name="T99" style:family="text">
      <style:text-properties officeooo:rsid="0051440a"/>
    </style:style>
    <style:style style:name="T100" style:family="text">
      <style:text-properties officeooo:rsid="005bb6f5"/>
    </style:style>
    <style:style style:name="T101" style:family="text">
      <style:text-properties officeooo:rsid="00600629"/>
    </style:style>
    <style:style style:name="T102" style:family="text">
      <style:text-properties officeooo:rsid="0062c50e"/>
    </style:style>
    <style:style style:name="T103" style:family="text">
      <style:text-properties officeooo:rsid="009569da"/>
    </style:style>
    <style:style style:name="T104" style:family="text">
      <style:text-properties officeooo:rsid="009bb1cd"/>
    </style:style>
    <style:style style:name="T105" style:family="text">
      <style:text-properties fo:color="#646464" loext:opacity="100%" style:font-name="Consolas1"/>
    </style:style>
    <style:style style:name="T106" style:family="text">
      <style:text-properties officeooo:rsid="00a8be7c"/>
    </style:style>
    <style:style style:name="T107" style:family="text">
      <style:text-properties officeooo:rsid="00a9a467"/>
    </style:style>
    <style:style style:name="T108" style:family="text">
      <style:text-properties officeooo:rsid="003e02b8"/>
    </style:style>
    <style:style style:name="T109" style:family="text">
      <style:text-properties officeooo:rsid="0084ae02"/>
    </style:style>
    <style:style style:name="T110" style:family="text">
      <style:text-properties officeooo:rsid="007ddc84"/>
    </style:style>
    <style:style style:name="T111" style:family="text">
      <style:text-properties officeooo:rsid="00b5a0a7"/>
    </style:style>
    <style:style style:name="T112" style:family="text">
      <style:text-properties officeooo:rsid="00a824e0"/>
    </style:style>
    <style:style style:name="T113" style:family="text">
      <style:text-properties style:font-name="Consolas1"/>
    </style:style>
    <style:style style:name="T114" style:family="text">
      <style:text-properties style:font-name="Consolas1" fo:font-size="9pt" style:font-size-asian="9pt"/>
    </style:style>
    <style:style style:name="T115" style:family="text">
      <style:text-properties officeooo:rsid="00cc0058"/>
    </style:style>
    <style:style style:name="T116" style:family="text">
      <style:text-properties fo:color="#007dc3" loext:opacity="100%" style:font-name="Calibri2" fo:font-size="18pt" officeooo:rsid="00cd0e15" style:font-size-asian="18pt" style:font-size-complex="18pt"/>
    </style:style>
    <style:style style:name="T117" style:family="text">
      <style:text-properties fo:color="#007dc3" loext:opacity="100%" style:font-name="Calibri2" fo:font-size="18pt" officeooo:rsid="00285050" style:font-size-asian="18pt" style:font-size-complex="18pt"/>
    </style:style>
    <style:style style:name="T118" style:family="text">
      <style:text-properties fo:color="#007dc3" loext:opacity="100%" style:font-name="Calibri2" fo:font-size="18pt" officeooo:rsid="01b368bb" style:font-size-asian="18pt" style:font-size-complex="18pt"/>
    </style:style>
    <style:style style:name="T119" style:family="text">
      <style:text-properties fo:color="#007dc3" loext:opacity="100%" style:font-name="Calibri2" fo:font-size="18pt" officeooo:rsid="01b4bedd" style:font-size-asian="18pt" style:font-size-complex="18pt"/>
    </style:style>
    <style:style style:name="T120" style:family="text">
      <style:text-properties fo:color="#007dc3" loext:opacity="100%" style:font-name="Calibri2" fo:font-size="18pt" officeooo:rsid="00285050" fo:background-color="transparent" loext:char-shading-value="0" style:font-size-asian="18pt" style:font-size-complex="18pt"/>
    </style:style>
    <style:style style:name="T121" style:family="text">
      <style:text-properties fo:color="#007dc3" loext:opacity="100%" style:font-name="Calibri2" fo:font-size="18pt" officeooo:rsid="01b368bb" fo:background-color="transparent" loext:char-shading-value="0" style:font-size-asian="18pt" style:font-size-complex="18pt"/>
    </style:style>
    <style:style style:name="T122" style:family="text">
      <style:text-properties fo:color="#007dc3" loext:opacity="100%" style:font-name="Calibri2" fo:font-size="18pt" officeooo:rsid="01b4bedd" fo:background-color="transparent" loext:char-shading-value="0" style:font-size-asian="18pt" style:font-size-complex="18pt"/>
    </style:style>
    <style:style style:name="T123" style:family="text">
      <style:text-properties officeooo:rsid="00d338c0"/>
    </style:style>
    <style:style style:name="T124" style:family="text">
      <style:text-properties officeooo:rsid="00d63ec8"/>
    </style:style>
    <style:style style:name="T125" style:family="text">
      <style:text-properties fo:font-style="italic" style:font-style-asian="italic" style:font-style-complex="italic"/>
    </style:style>
    <style:style style:name="T126" style:family="text">
      <style:text-properties fo:font-style="italic" officeooo:rsid="00d63ec8" style:font-style-asian="italic" style:font-style-complex="italic"/>
    </style:style>
    <style:style style:name="T127" style:family="text">
      <style:text-properties fo:font-style="italic" officeooo:rsid="00db5ce5" style:font-style-asian="italic" style:font-style-complex="italic"/>
    </style:style>
    <style:style style:name="T128" style:family="text">
      <style:text-properties fo:font-style="italic" officeooo:rsid="00e38553" style:font-style-asian="italic" style:font-style-complex="italic"/>
    </style:style>
    <style:style style:name="T129" style:family="text">
      <style:text-properties fo:font-style="italic" officeooo:rsid="00df575f" style:font-style-asian="italic" style:font-style-complex="italic"/>
    </style:style>
    <style:style style:name="T130" style:family="text">
      <style:text-properties fo:font-style="italic" officeooo:rsid="00e07efa" style:font-style-asian="italic" style:font-style-complex="italic"/>
    </style:style>
    <style:style style:name="T131" style:family="text">
      <style:text-properties fo:font-style="italic" officeooo:rsid="00df017d" style:font-style-asian="italic" style:font-style-complex="italic"/>
    </style:style>
    <style:style style:name="T132" style:family="text">
      <style:text-properties fo:font-style="italic" officeooo:rsid="00e16f63" style:font-style-asian="italic" style:font-style-complex="italic"/>
    </style:style>
    <style:style style:name="T133" style:family="text">
      <style:text-properties fo:font-style="italic" officeooo:rsid="00e33a20" style:font-style-asian="italic" style:font-style-complex="italic"/>
    </style:style>
    <style:style style:name="T134" style:family="text">
      <style:text-properties fo:font-style="italic" officeooo:rsid="00e8f23e" style:font-style-asian="italic" style:font-style-complex="italic"/>
    </style:style>
    <style:style style:name="T135" style:family="text">
      <style:text-properties fo:font-style="italic" officeooo:rsid="00d8ffe0" style:font-style-asian="italic" style:font-style-complex="italic"/>
    </style:style>
    <style:style style:name="T136" style:family="text">
      <style:text-properties fo:font-style="italic" officeooo:rsid="01546630" style:font-style-asian="italic" style:font-style-complex="italic"/>
    </style:style>
    <style:style style:name="T137" style:family="text">
      <style:text-properties fo:font-style="italic" fo:font-weight="bold" officeooo:rsid="00db5ce5" style:font-style-asian="italic" style:font-weight-asian="bold" style:font-style-complex="italic" style:font-weight-complex="bold"/>
    </style:style>
    <style:style style:name="T138" style:family="text">
      <style:text-properties fo:font-style="italic" fo:background-color="transparent" loext:char-shading-value="0" style:font-style-asian="italic" style:font-style-complex="italic"/>
    </style:style>
    <style:style style:name="T139" style:family="text">
      <style:text-properties fo:font-style="italic" officeooo:rsid="00e440cb" fo:background-color="transparent" loext:char-shading-value="0" style:font-style-asian="italic" style:font-style-complex="italic"/>
    </style:style>
    <style:style style:name="T140" style:family="text">
      <style:text-properties fo:font-style="italic" officeooo:rsid="00df017d" fo:background-color="transparent" loext:char-shading-value="0" style:font-style-asian="italic" style:font-style-complex="italic"/>
    </style:style>
    <style:style style:name="T141" style:family="text">
      <style:text-properties fo:font-style="italic" officeooo:rsid="00e16f63" fo:background-color="transparent" loext:char-shading-value="0" style:font-style-asian="italic" style:font-style-complex="italic"/>
    </style:style>
    <style:style style:name="T142" style:family="text">
      <style:text-properties fo:font-style="italic" officeooo:rsid="00e07efa" fo:background-color="transparent" loext:char-shading-value="0" style:font-style-asian="italic" style:font-style-complex="italic"/>
    </style:style>
    <style:style style:name="T143" style:family="text">
      <style:text-properties fo:font-style="italic" officeooo:rsid="00e33a20" fo:background-color="transparent" loext:char-shading-value="0" style:font-style-asian="italic" style:font-style-complex="italic"/>
    </style:style>
    <style:style style:name="T144" style:family="text">
      <style:text-properties fo:font-style="italic" officeooo:rsid="00dd25a6" fo:background-color="transparent" loext:char-shading-value="0" style:font-style-asian="italic" style:font-style-complex="italic"/>
    </style:style>
    <style:style style:name="T145" style:family="text">
      <style:text-properties fo:font-style="italic" officeooo:rsid="00ee103b" fo:background-color="transparent" loext:char-shading-value="0" style:font-style-asian="italic" style:font-style-complex="italic"/>
    </style:style>
    <style:style style:name="T146" style:family="text">
      <style:text-properties fo:font-style="italic" officeooo:rsid="00dda4cb" fo:background-color="transparent" loext:char-shading-value="0" style:font-style-asian="italic" style:font-style-complex="italic"/>
    </style:style>
    <style:style style:name="T147" style:family="text">
      <style:text-properties fo:font-style="italic" officeooo:rsid="00f0f9b1" fo:background-color="transparent" loext:char-shading-value="0" style:font-style-asian="italic" style:font-style-complex="italic"/>
    </style:style>
    <style:style style:name="T148" style:family="text">
      <style:text-properties fo:font-style="italic" fo:font-weight="normal" style:font-style-asian="italic" style:font-weight-asian="normal" style:font-style-complex="italic" style:font-weight-complex="normal"/>
    </style:style>
    <style:style style:name="T149" style:family="text">
      <style:text-properties fo:font-style="italic" fo:font-weight="normal" officeooo:rsid="00ea866e" style:font-style-asian="italic" style:font-weight-asian="normal" style:font-style-complex="italic" style:font-weight-complex="normal"/>
    </style:style>
    <style:style style:name="T150" style:family="text">
      <style:text-properties fo:font-style="italic" fo:font-weight="normal" fo:background-color="transparent" loext:char-shading-value="0" style:font-style-asian="italic" style:font-weight-asian="normal" style:font-style-complex="italic" style:font-weight-complex="normal"/>
    </style:style>
    <style:style style:name="T151"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52"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53" style:family="text">
      <style:text-properties fo:font-style="normal" style:font-style-asian="normal" style:font-style-complex="normal"/>
    </style:style>
    <style:style style:name="T154" style:family="text">
      <style:text-properties fo:font-style="normal" officeooo:rsid="00d63ec8" style:font-style-asian="normal" style:font-style-complex="normal"/>
    </style:style>
    <style:style style:name="T155" style:family="text">
      <style:text-properties fo:font-style="normal" officeooo:rsid="00db5ce5" style:font-style-asian="normal" style:font-style-complex="normal"/>
    </style:style>
    <style:style style:name="T156" style:family="text">
      <style:text-properties fo:font-style="normal" officeooo:rsid="00cb38e8" style:font-style-asian="normal" style:font-style-complex="normal"/>
    </style:style>
    <style:style style:name="T157" style:family="text">
      <style:text-properties fo:font-style="normal" officeooo:rsid="00e38553" style:font-style-asian="normal" style:font-style-complex="normal"/>
    </style:style>
    <style:style style:name="T158" style:family="text">
      <style:text-properties fo:font-style="normal" officeooo:rsid="00d87f80" style:font-style-asian="normal" style:font-style-complex="normal"/>
    </style:style>
    <style:style style:name="T159" style:family="text">
      <style:text-properties fo:font-style="normal" officeooo:rsid="00df575f" style:font-style-asian="normal" style:font-style-complex="normal"/>
    </style:style>
    <style:style style:name="T160" style:family="text">
      <style:text-properties fo:font-style="normal" officeooo:rsid="00e07efa" style:font-style-asian="normal" style:font-style-complex="normal"/>
    </style:style>
    <style:style style:name="T161" style:family="text">
      <style:text-properties fo:font-style="normal" officeooo:rsid="00e1e7f8" style:font-style-asian="normal" style:font-style-complex="normal"/>
    </style:style>
    <style:style style:name="T162" style:family="text">
      <style:text-properties fo:font-style="normal" officeooo:rsid="00e2fa38" style:font-style-asian="normal" style:font-style-complex="normal"/>
    </style:style>
    <style:style style:name="T163" style:family="text">
      <style:text-properties fo:font-style="normal" officeooo:rsid="00d8ffe0" style:font-style-asian="normal" style:font-style-complex="normal"/>
    </style:style>
    <style:style style:name="T164" style:family="text">
      <style:text-properties fo:font-style="normal" officeooo:rsid="00e0368e" style:font-style-asian="normal" style:font-style-complex="normal"/>
    </style:style>
    <style:style style:name="T165" style:family="text">
      <style:text-properties fo:font-style="normal" officeooo:rsid="00e16f63" style:font-style-asian="normal" style:font-style-complex="normal"/>
    </style:style>
    <style:style style:name="T166" style:family="text">
      <style:text-properties fo:font-style="normal" officeooo:rsid="00e8f23e" style:font-style-asian="normal" style:font-style-complex="normal"/>
    </style:style>
    <style:style style:name="T167" style:family="text">
      <style:text-properties fo:font-style="normal" officeooo:rsid="00ee103b" style:font-style-asian="normal" style:font-style-complex="normal"/>
    </style:style>
    <style:style style:name="T168" style:family="text">
      <style:text-properties fo:font-style="normal" officeooo:rsid="01546630" style:font-style-asian="normal" style:font-style-complex="normal"/>
    </style:style>
    <style:style style:name="T169" style:family="text">
      <style:text-properties fo:font-style="normal" officeooo:rsid="014f9ade" style:font-style-asian="normal" style:font-style-complex="normal"/>
    </style:style>
    <style:style style:name="T170" style:family="text">
      <style:text-properties fo:font-style="normal" officeooo:rsid="01b4bedd" style:font-style-asian="normal" style:font-style-complex="normal"/>
    </style:style>
    <style:style style:name="T171" style:family="text">
      <style:text-properties fo:font-style="normal" fo:background-color="transparent" loext:char-shading-value="0" style:font-style-asian="normal" style:font-style-complex="normal"/>
    </style:style>
    <style:style style:name="T172" style:family="text">
      <style:text-properties fo:font-style="normal" officeooo:rsid="00d63ec8" fo:background-color="transparent" loext:char-shading-value="0" style:font-style-asian="normal" style:font-style-complex="normal"/>
    </style:style>
    <style:style style:name="T173" style:family="text">
      <style:text-properties fo:font-style="normal" officeooo:rsid="00d81a0e" fo:background-color="transparent" loext:char-shading-value="0" style:font-style-asian="normal" style:font-style-complex="normal"/>
    </style:style>
    <style:style style:name="T174" style:family="text">
      <style:text-properties fo:font-style="normal" officeooo:rsid="00e2fa38" fo:background-color="transparent" loext:char-shading-value="0" style:font-style-asian="normal" style:font-style-complex="normal"/>
    </style:style>
    <style:style style:name="T175" style:family="text">
      <style:text-properties fo:font-style="normal" officeooo:rsid="00e1e7f8" fo:background-color="transparent" loext:char-shading-value="0" style:font-style-asian="normal" style:font-style-complex="normal"/>
    </style:style>
    <style:style style:name="T176" style:family="text">
      <style:text-properties fo:font-style="normal" officeooo:rsid="00e440cb" fo:background-color="transparent" loext:char-shading-value="0" style:font-style-asian="normal" style:font-style-complex="normal"/>
    </style:style>
    <style:style style:name="T177" style:family="text">
      <style:text-properties fo:font-style="normal" officeooo:rsid="00df017d" fo:background-color="transparent" loext:char-shading-value="0" style:font-style-asian="normal" style:font-style-complex="normal"/>
    </style:style>
    <style:style style:name="T178" style:family="text">
      <style:text-properties fo:font-style="normal" officeooo:rsid="00dfc741" fo:background-color="transparent" loext:char-shading-value="0" style:font-style-asian="normal" style:font-style-complex="normal"/>
    </style:style>
    <style:style style:name="T179" style:family="text">
      <style:text-properties fo:font-style="normal" officeooo:rsid="00e0368e" fo:background-color="transparent" loext:char-shading-value="0" style:font-style-asian="normal" style:font-style-complex="normal"/>
    </style:style>
    <style:style style:name="T180" style:family="text">
      <style:text-properties fo:font-style="normal" officeooo:rsid="00dda4cb" fo:background-color="transparent" loext:char-shading-value="0" style:font-style-asian="normal" style:font-style-complex="normal"/>
    </style:style>
    <style:style style:name="T181" style:family="text">
      <style:text-properties fo:font-style="normal" officeooo:rsid="00e16f63" fo:background-color="transparent" loext:char-shading-value="0" style:font-style-asian="normal" style:font-style-complex="normal"/>
    </style:style>
    <style:style style:name="T182" style:family="text">
      <style:text-properties fo:font-style="normal" officeooo:rsid="00e33a20" fo:background-color="transparent" loext:char-shading-value="0" style:font-style-asian="normal" style:font-style-complex="normal"/>
    </style:style>
    <style:style style:name="T183" style:family="text">
      <style:text-properties fo:font-style="normal" officeooo:rsid="00db5ce5" fo:background-color="transparent" loext:char-shading-value="0" style:font-style-asian="normal" style:font-style-complex="normal"/>
    </style:style>
    <style:style style:name="T184" style:family="text">
      <style:text-properties fo:font-style="normal" officeooo:rsid="00e8f23e" fo:background-color="transparent" loext:char-shading-value="0" style:font-style-asian="normal" style:font-style-complex="normal"/>
    </style:style>
    <style:style style:name="T185" style:family="text">
      <style:text-properties fo:font-style="normal" officeooo:rsid="00d87f80" fo:background-color="transparent" loext:char-shading-value="0" style:font-style-asian="normal" style:font-style-complex="normal"/>
    </style:style>
    <style:style style:name="T186" style:family="text">
      <style:text-properties fo:font-style="normal" officeooo:rsid="00dd25a6" fo:background-color="transparent" loext:char-shading-value="0" style:font-style-asian="normal" style:font-style-complex="normal"/>
    </style:style>
    <style:style style:name="T187" style:family="text">
      <style:text-properties fo:font-style="normal" officeooo:rsid="00f0f9b1" fo:background-color="transparent" loext:char-shading-value="0" style:font-style-asian="normal" style:font-style-complex="normal"/>
    </style:style>
    <style:style style:name="T188" style:family="text">
      <style:text-properties fo:font-style="normal" officeooo:rsid="00d8ffe0" fo:background-color="transparent" loext:char-shading-value="0" style:font-style-asian="normal" style:font-style-complex="normal"/>
    </style:style>
    <style:style style:name="T189" style:family="text">
      <style:text-properties fo:font-style="normal" fo:font-weight="normal" officeooo:rsid="00ea866e" style:font-style-asian="normal" style:font-weight-asian="normal" style:font-style-complex="normal" style:font-weight-complex="normal"/>
    </style:style>
    <style:style style:name="T190" style:family="text">
      <style:text-properties fo:font-style="normal" fo:font-weight="normal" fo:background-color="transparent" loext:char-shading-value="0" style:font-style-asian="normal" style:font-weight-asian="normal" style:font-style-complex="normal" style:font-weight-complex="normal"/>
    </style:style>
    <style:style style:name="T191"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192"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193"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194" style:family="text">
      <style:text-properties fo:font-style="normal" fo:font-weight="bold" officeooo:rsid="01546630" style:font-style-asian="normal" style:font-weight-asian="bold" style:font-style-complex="normal" style:font-weight-complex="bold"/>
    </style:style>
    <style:style style:name="T195" style:family="text">
      <style:text-properties officeooo:rsid="00db5ce5"/>
    </style:style>
    <style:style style:name="T196" style:family="text">
      <style:text-properties officeooo:rsid="00d87f80"/>
    </style:style>
    <style:style style:name="T197" style:family="text">
      <style:text-properties officeooo:rsid="00dac55c"/>
    </style:style>
    <style:style style:name="T198" style:family="text">
      <style:text-properties fo:color="#3f5fbf" loext:opacity="100%" style:font-name="Consolas1"/>
    </style:style>
    <style:style style:name="T199" style:family="text">
      <style:text-properties fo:color="#3f5fbf" loext:opacity="100%" style:font-name="Consolas1" fo:font-size="10pt" style:font-size-asian="10pt"/>
    </style:style>
    <style:style style:name="T200" style:family="text">
      <style:text-properties fo:color="#3f5fbf" loext:opacity="100%" style:font-name="Consolas1" fo:font-size="10pt" style:text-underline-style="solid" style:text-underline-width="auto" style:text-underline-color="font-color" style:font-size-asian="10pt"/>
    </style:style>
    <style:style style:name="T201" style:family="text">
      <style:text-properties fo:color="#3f5fbf" loext:opacity="100%" style:font-name="Consolas1" style:text-underline-style="solid" style:text-underline-width="auto" style:text-underline-color="font-color"/>
    </style:style>
    <style:style style:name="T202" style:family="text">
      <style:text-properties fo:color="#7f9fbf" loext:opacity="100%" style:font-name="Consolas1" fo:font-size="10pt" fo:font-weight="bold" style:font-size-asian="10pt" style:font-weight-asian="bold"/>
    </style:style>
    <style:style style:name="T203" style:family="text">
      <style:text-properties fo:color="#7f9fbf" loext:opacity="100%" style:font-name="Consolas1" fo:font-weight="bold" style:font-weight-asian="bold"/>
    </style:style>
    <style:style style:name="T204" style:family="text">
      <style:text-properties fo:color="#7f7f9f" loext:opacity="100%" style:font-name="Consolas1" fo:font-size="10pt" style:font-size-asian="10pt"/>
    </style:style>
    <style:style style:name="T205" style:family="text">
      <style:text-properties officeooo:rsid="00e07efa"/>
    </style:style>
    <style:style style:name="T206" style:family="text">
      <style:text-properties officeooo:rsid="00e85af2"/>
    </style:style>
    <style:style style:name="T207" style:family="text">
      <style:text-properties officeooo:rsid="00ea866e"/>
    </style:style>
    <style:style style:name="T208" style:family="text">
      <style:text-properties fo:font-weight="normal" style:font-weight-asian="normal" style:font-weight-complex="normal"/>
    </style:style>
    <style:style style:name="T209" style:family="text">
      <style:text-properties fo:font-weight="normal" officeooo:rsid="00ea866e" style:font-weight-asian="normal" style:font-weight-complex="normal"/>
    </style:style>
    <style:style style:name="T210" style:family="text">
      <style:text-properties fo:font-weight="normal" officeooo:rsid="0163fbf5" style:font-weight-asian="normal" style:font-weight-complex="normal"/>
    </style:style>
    <style:style style:name="T211" style:family="text">
      <style:text-properties fo:font-weight="normal" officeooo:rsid="016f0584" style:font-weight-asian="normal" style:font-weight-complex="normal"/>
    </style:style>
    <style:style style:name="T212" style:family="text">
      <style:text-properties fo:font-weight="normal" officeooo:rsid="01b0c851" style:font-weight-asian="normal" style:font-weight-complex="normal"/>
    </style:style>
    <style:style style:name="T213" style:family="text">
      <style:text-properties fo:font-weight="normal" officeooo:rsid="00ea866e" fo:background-color="transparent" loext:char-shading-value="0" style:font-weight-asian="normal" style:font-weight-complex="normal"/>
    </style:style>
    <style:style style:name="T214" style:family="text">
      <style:text-properties fo:font-weight="normal" officeooo:rsid="00e54ccf" fo:background-color="transparent" loext:char-shading-value="0" style:font-weight-asian="normal" style:font-weight-complex="normal"/>
    </style:style>
    <style:style style:name="T215" style:family="text">
      <style:text-properties fo:font-weight="normal" officeooo:rsid="00e5f97a" fo:background-color="transparent" loext:char-shading-value="0" style:font-weight-asian="normal" style:font-weight-complex="normal"/>
    </style:style>
    <style:style style:name="T216" style:family="text">
      <style:text-properties fo:color="#3f7f5f" loext:opacity="100%" style:font-name="Consolas1"/>
    </style:style>
    <style:style style:name="T217" style:family="text">
      <style:text-properties fo:color="#3f7f5f" loext:opacity="100%" style:font-name="Consolas1" style:text-underline-style="solid" style:text-underline-width="auto" style:text-underline-color="font-color"/>
    </style:style>
    <style:style style:name="T218" style:family="text">
      <style:text-properties fo:color="#3f7f5f" loext:opacity="100%" style:font-name="Consolas1" style:text-underline-style="none"/>
    </style:style>
    <style:style style:name="T219" style:family="text">
      <style:text-properties fo:color="#3f7f5f" loext:opacity="100%" style:text-underline-style="none"/>
    </style:style>
    <style:style style:name="T220" style:family="text">
      <style:text-properties fo:color="#3f7f5f" loext:opacity="100%" style:font-name="Monospace1" fo:font-size="10pt" style:font-size-asian="10pt"/>
    </style:style>
    <style:style style:name="T221" style:family="text">
      <style:text-properties fo:color="#3f7f5f" loext:opacity="100%" style:font-name="Monospace1" fo:font-size="10pt" officeooo:rsid="018c7b7a" style:font-size-asian="10pt"/>
    </style:style>
    <style:style style:name="T222" style:family="text">
      <style:text-properties fo:color="#3f3fbf" loext:opacity="100%" style:font-name="Consolas1"/>
    </style:style>
    <style:style style:name="T223" style:family="text">
      <style:text-properties officeooo:rsid="00ee64c9"/>
    </style:style>
    <style:style style:name="T224" style:family="text">
      <style:text-properties text:display="none"/>
    </style:style>
    <style:style style:name="T225" style:family="text">
      <style:text-properties officeooo:rsid="00ebb296"/>
    </style:style>
    <style:style style:name="T226"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7"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8"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9"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30" style:family="text">
      <style:text-properties officeooo:rsid="00dda4cb"/>
    </style:style>
    <style:style style:name="T231"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2"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3" style:family="text">
      <style:text-properties officeooo:rsid="00df017d" fo:background-color="transparent" loext:char-shading-value="0"/>
    </style:style>
    <style:style style:name="T234" style:family="text">
      <style:text-properties officeooo:rsid="00e59aa6" fo:background-color="transparent" loext:char-shading-value="0"/>
    </style:style>
    <style:style style:name="T235" style:family="text">
      <style:text-properties officeooo:rsid="00dda4cb" fo:background-color="transparent" loext:char-shading-value="0"/>
    </style:style>
    <style:style style:name="T236" style:family="text">
      <style:text-properties officeooo:rsid="00ee103b" fo:background-color="transparent" loext:char-shading-value="0"/>
    </style:style>
    <style:style style:name="T237" style:family="text">
      <style:text-properties officeooo:rsid="00e16f63"/>
    </style:style>
    <style:style style:name="T238" style:family="text">
      <style:text-properties officeooo:rsid="00e8f23e"/>
    </style:style>
    <style:style style:name="T239" style:family="text">
      <style:text-properties officeooo:rsid="00ec4c44"/>
    </style:style>
    <style:style style:name="T240" style:family="text">
      <style:text-properties officeooo:rsid="00f7036b"/>
    </style:style>
    <style:style style:name="T241" style:family="text">
      <style:text-properties officeooo:rsid="00f8fa7f"/>
    </style:style>
    <style:style style:name="T242" style:family="text">
      <style:text-properties officeooo:rsid="00f9eb5c"/>
    </style:style>
    <style:style style:name="T243" style:family="text">
      <style:text-properties officeooo:rsid="00fa2108"/>
    </style:style>
    <style:style style:name="T244" style:family="text">
      <style:text-properties officeooo:rsid="00fadb7a"/>
    </style:style>
    <style:style style:name="T245" style:family="text">
      <style:text-properties officeooo:rsid="00fb0ac1"/>
    </style:style>
    <style:style style:name="T246" style:family="text">
      <style:text-properties officeooo:rsid="00fc5e61"/>
    </style:style>
    <style:style style:name="T247" style:family="text">
      <style:text-properties officeooo:rsid="00fdedbb"/>
    </style:style>
    <style:style style:name="T248" style:family="text">
      <style:text-properties officeooo:rsid="00ff2832"/>
    </style:style>
    <style:style style:name="T249" style:family="text">
      <style:text-properties officeooo:rsid="010136dd"/>
    </style:style>
    <style:style style:name="T250" style:family="text">
      <style:text-properties officeooo:rsid="0104c9b6"/>
    </style:style>
    <style:style style:name="T251" style:family="text">
      <style:text-properties officeooo:rsid="0105b899"/>
    </style:style>
    <style:style style:name="T252" style:family="text">
      <style:text-properties officeooo:rsid="0106886f"/>
    </style:style>
    <style:style style:name="T253" style:family="text">
      <style:text-properties officeooo:rsid="01073b25"/>
    </style:style>
    <style:style style:name="T254" style:family="text">
      <style:text-properties officeooo:rsid="0108f91b"/>
    </style:style>
    <style:style style:name="T255" style:family="text">
      <style:text-properties officeooo:rsid="010af096"/>
    </style:style>
    <style:style style:name="T256" style:family="text">
      <style:text-properties officeooo:rsid="010e1f55"/>
    </style:style>
    <style:style style:name="T257" style:family="text">
      <style:text-properties officeooo:rsid="010fbae5"/>
    </style:style>
    <style:style style:name="T258" style:family="text">
      <style:text-properties officeooo:rsid="0110d1f4"/>
    </style:style>
    <style:style style:name="T259" style:family="text">
      <style:text-properties officeooo:rsid="011208a6"/>
    </style:style>
    <style:style style:name="T260" style:family="text">
      <style:text-properties officeooo:rsid="011355b4"/>
    </style:style>
    <style:style style:name="T261" style:family="text">
      <style:text-properties officeooo:rsid="0113da63"/>
    </style:style>
    <style:style style:name="T262" style:family="text">
      <style:text-properties style:text-underline-style="none"/>
    </style:style>
    <style:style style:name="T263" style:family="text">
      <style:text-properties officeooo:rsid="01212e12"/>
    </style:style>
    <style:style style:name="T264" style:family="text">
      <style:text-properties officeooo:rsid="0121d8ec"/>
    </style:style>
    <style:style style:name="T265" style:family="text">
      <style:text-properties officeooo:rsid="0124bd62"/>
    </style:style>
    <style:style style:name="T266" style:family="text">
      <style:text-properties officeooo:rsid="01258e96"/>
    </style:style>
    <style:style style:name="T267" style:family="text">
      <style:text-properties officeooo:rsid="0127de30"/>
    </style:style>
    <style:style style:name="T268" style:family="text">
      <style:text-properties officeooo:rsid="01286d0a"/>
    </style:style>
    <style:style style:name="T269" style:family="text">
      <style:text-properties officeooo:rsid="012ada2e"/>
    </style:style>
    <style:style style:name="T270" style:family="text">
      <style:text-properties officeooo:rsid="012ec9b6"/>
    </style:style>
    <style:style style:name="T271" style:family="text">
      <style:text-properties officeooo:rsid="005eebc7"/>
    </style:style>
    <style:style style:name="T272" style:family="text">
      <style:text-properties officeooo:rsid="012ef337"/>
    </style:style>
    <style:style style:name="T273" style:family="text">
      <style:text-properties fo:color="#a41515" loext:opacity="100%" style:font-name="Consolas1" fo:font-size="9pt" style:font-size-asian="9pt"/>
    </style:style>
    <style:style style:name="T274" style:family="text">
      <style:text-properties fo:color="#0451a6" loext:opacity="100%" style:font-name="Consolas1" fo:font-size="9pt" style:font-size-asian="9pt"/>
    </style:style>
    <style:style style:name="T275" style:family="text">
      <style:text-properties officeooo:rsid="0149cec3"/>
    </style:style>
    <style:style style:name="T276" style:family="text">
      <style:text-properties officeooo:rsid="014adc01"/>
    </style:style>
    <style:style style:name="T277" style:family="text">
      <style:text-properties officeooo:rsid="014f9ade"/>
    </style:style>
    <style:style style:name="T278" style:family="text">
      <style:text-properties officeooo:rsid="0151259d"/>
    </style:style>
    <style:style style:name="T279" style:family="text">
      <style:text-properties officeooo:rsid="0151fd2e"/>
    </style:style>
    <style:style style:name="T280" style:family="text">
      <style:text-properties officeooo:rsid="01546630"/>
    </style:style>
    <style:style style:name="T281" style:family="text">
      <style:text-properties officeooo:rsid="01554eb3"/>
    </style:style>
    <style:style style:name="T282" style:family="text">
      <style:text-properties officeooo:rsid="0155bc3d"/>
    </style:style>
    <style:style style:name="T283" style:family="text">
      <style:text-properties officeooo:rsid="015c0e13"/>
    </style:style>
    <style:style style:name="T284" style:family="text">
      <style:text-properties officeooo:rsid="015c4085"/>
    </style:style>
    <style:style style:name="T285" style:family="text">
      <style:text-properties officeooo:rsid="015e4779"/>
    </style:style>
    <style:style style:name="T286" style:family="text">
      <style:text-properties fo:color="#0451a5" loext:opacity="100%" style:font-name="Consolas2" fo:font-size="9pt" fo:font-weight="normal"/>
    </style:style>
    <style:style style:name="T287" style:family="text">
      <style:text-properties fo:color="#0451a5" loext:opacity="100%" style:font-name="Consolas2" fo:font-size="9pt" fo:font-weight="normal" fo:background-color="#fffffe" loext:char-shading-value="0"/>
    </style:style>
    <style:style style:name="T288" style:family="text">
      <style:text-properties fo:color="#0451a5" loext:opacity="100%" style:font-name="Consolas2" fo:font-size="9pt" fo:font-weight="normal" officeooo:rsid="01b5544c"/>
    </style:style>
    <style:style style:name="T289" style:family="text">
      <style:text-properties fo:color="#0451a5" loext:opacity="100%" style:font-name="Consolas2" fo:font-size="9pt" fo:font-weight="bold"/>
    </style:style>
    <style:style style:name="T290" style:family="text">
      <style:text-properties officeooo:rsid="015fa555"/>
    </style:style>
    <style:style style:name="T291" style:family="text">
      <style:text-properties style:font-name="Consolas2" fo:font-size="9pt" fo:font-weight="normal"/>
    </style:style>
    <style:style style:name="T292" style:family="text">
      <style:text-properties style:font-name="Consolas2" fo:font-size="9pt" fo:font-weight="normal" officeooo:rsid="015fa555"/>
    </style:style>
    <style:style style:name="T293" style:family="text">
      <style:text-properties fo:color="#a31515" loext:opacity="100%" style:font-name="Consolas2" fo:font-size="9pt" fo:font-weight="normal"/>
    </style:style>
    <style:style style:name="T294" style:family="text">
      <style:text-properties fo:color="#a31515" loext:opacity="100%" style:font-name="Consolas2" fo:font-size="9pt" fo:font-weight="normal" officeooo:rsid="01b5544c"/>
    </style:style>
    <style:style style:name="T295" style:family="text">
      <style:text-properties fo:color="#098658" loext:opacity="100%" style:font-name="Consolas2" fo:font-size="9pt" fo:font-weight="normal"/>
    </style:style>
    <style:style style:name="T296" style:family="text">
      <style:text-properties officeooo:rsid="0160d5f3"/>
    </style:style>
    <style:style style:name="T297" style:family="text">
      <style:text-properties officeooo:rsid="01622317"/>
    </style:style>
    <style:style style:name="T298" style:family="text">
      <style:text-properties officeooo:rsid="0163fbf5"/>
    </style:style>
    <style:style style:name="T299" style:family="text">
      <style:text-properties officeooo:rsid="016529da"/>
    </style:style>
    <style:style style:name="T300" style:family="text">
      <style:text-properties officeooo:rsid="016cca63"/>
    </style:style>
    <style:style style:name="T301" style:family="text">
      <style:text-properties officeooo:rsid="016e9a6e"/>
    </style:style>
    <style:style style:name="T302" style:family="text">
      <style:text-properties officeooo:rsid="016f0584"/>
    </style:style>
    <style:style style:name="T303" style:family="text">
      <style:text-properties officeooo:rsid="017087d4"/>
    </style:style>
    <style:style style:name="T304" style:family="text">
      <style:text-properties officeooo:rsid="01723150"/>
    </style:style>
    <style:style style:name="T305" style:family="text">
      <style:text-properties officeooo:rsid="0176c9fd"/>
    </style:style>
    <style:style style:name="T306" style:family="text">
      <style:text-properties officeooo:rsid="0177982d"/>
    </style:style>
    <style:style style:name="T307" style:family="text">
      <style:text-properties officeooo:rsid="01794cf9"/>
    </style:style>
    <style:style style:name="T308" style:family="text">
      <style:text-properties officeooo:rsid="017a98da"/>
    </style:style>
    <style:style style:name="T309" style:family="text">
      <style:text-properties officeooo:rsid="017c0014"/>
    </style:style>
    <style:style style:name="T310" style:family="text">
      <style:text-properties officeooo:rsid="01836b49"/>
    </style:style>
    <style:style style:name="T311" style:family="text">
      <style:text-properties officeooo:rsid="007f55bb"/>
    </style:style>
    <style:style style:name="T312" style:family="text">
      <style:text-properties style:rfc-language-tag="es-ES-u-co-trad" fo:language="es" fo:country="ES" fo:font-style="normal" officeooo:rsid="01875821" style:font-style-asian="normal" style:font-style-complex="normal"/>
    </style:style>
    <style:style style:name="T313" style:family="text">
      <style:text-properties style:rfc-language-tag="es-ES-u-co-trad" fo:language="es" fo:country="ES" fo:font-style="normal" officeooo:rsid="01875821" fo:background-color="transparent" loext:char-shading-value="0" style:font-style-asian="normal" style:font-style-complex="normal"/>
    </style:style>
    <style:style style:name="T314" style:family="text">
      <style:text-properties officeooo:rsid="018c7b7a"/>
    </style:style>
    <style:style style:name="T315" style:family="text">
      <style:text-properties officeooo:rsid="018f92fd"/>
    </style:style>
    <style:style style:name="T316" style:family="text">
      <style:text-properties officeooo:rsid="019009d8"/>
    </style:style>
    <style:style style:name="T317" style:family="text">
      <style:text-properties officeooo:rsid="01915c4c"/>
    </style:style>
    <style:style style:name="T318" style:family="text">
      <style:text-properties officeooo:rsid="007af11d"/>
    </style:style>
    <style:style style:name="T319" style:family="text">
      <style:text-properties officeooo:rsid="01949037"/>
    </style:style>
    <style:style style:name="T320" style:family="text">
      <style:text-properties officeooo:rsid="00b37226"/>
    </style:style>
    <style:style style:name="T321" style:family="text">
      <style:text-properties officeooo:rsid="01974b8c"/>
    </style:style>
    <style:style style:name="T322" style:family="text">
      <style:text-properties officeooo:rsid="01985e2b"/>
    </style:style>
    <style:style style:name="T323" style:family="text">
      <style:text-properties officeooo:rsid="01997fee"/>
    </style:style>
    <style:style style:name="T324" style:family="text">
      <style:text-properties officeooo:rsid="019b515e"/>
    </style:style>
    <style:style style:name="T325" style:family="text">
      <style:text-properties officeooo:rsid="019b5d65"/>
    </style:style>
    <style:style style:name="T326" style:family="text">
      <style:text-properties officeooo:rsid="01a00707"/>
    </style:style>
    <style:style style:name="T327" style:family="text">
      <style:text-properties officeooo:rsid="01a3c4fd"/>
    </style:style>
    <style:style style:name="T328" style:family="text">
      <style:text-properties officeooo:rsid="01a794fe"/>
    </style:style>
    <style:style style:name="T329" style:family="text">
      <style:text-properties officeooo:rsid="01a9cdd2"/>
    </style:style>
    <style:style style:name="T330" style:family="text">
      <style:text-properties officeooo:rsid="01aba0a4"/>
    </style:style>
    <style:style style:name="T331" style:family="text">
      <style:text-properties officeooo:rsid="01af45bb"/>
    </style:style>
    <style:style style:name="T332" style:family="text">
      <style:text-properties officeooo:rsid="01b1a3a8"/>
    </style:style>
    <style:style style:name="T333" style:family="text">
      <style:text-properties officeooo:rsid="01b368bb"/>
    </style:style>
    <style:style style:name="T334" style:family="text">
      <style:text-properties officeooo:rsid="01b46b41"/>
    </style:style>
    <style:style style:name="T335" style:family="text">
      <style:text-properties officeooo:rsid="01b4bedd"/>
    </style:style>
    <style:style style:name="T336" style:family="text">
      <style:text-properties officeooo:rsid="01b5e40b"/>
    </style:style>
    <style:style style:name="T337" style:family="text">
      <style:text-properties officeooo:rsid="01b77b84"/>
    </style:style>
    <style:style style:name="T338" style:family="text">
      <style:text-properties officeooo:rsid="01b8b2cf"/>
    </style:style>
    <style:style style:name="T339"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3"/>
      <text:p text:style-name="P23"><draw:g text:anchor-type="as-char" draw:z-index="0" draw:name="Forma2" draw:style-name="gr3"><draw:frame draw:name="Picture 2" draw:style-name="gr4" draw:text-style-name="P459" svg:width="13.553cm" svg:height="2.514cm" svg:x="3.438cm" svg:y="0cm"><draw:image xlink:href="Pictures/10000000000006A400000104C61E4F84145F3308.png" xlink:type="simple" xlink:show="embed" xlink:actuate="onLoad" draw:mime-type="image/png"><text:p/></draw:image></draw:frame><draw:frame draw:name="Picture 3" draw:style-name="gr5" draw:text-style-name="P459" svg:width="3.209cm" svg:height="2.511cm" svg:x="0cm" svg:y="0cm"><draw:image xlink:href="Pictures/10000001000002E6000002BB18D09AEB46C6E810.png" xlink:type="simple" xlink:show="embed" xlink:actuate="onLoad" draw:mime-type="image/png"><text:p/></draw:image></draw:frame></draw:g><text:s text:c="5"/></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text:span text:style-name="T92">DISTRIBUCIO</text:span>: Manual d’integració </text:p>
      <text:p text:style-name="P22"><text:span text:style-name="T122">09</text:span><text:span text:style-name="T116"> d</text:span><text:span text:style-name="T118">e </text:span><text:span text:style-name="T119">desembre </text:span><text:span text:style-name="T117">de 20</text:span><text:span text:style-name="T120">2</text:span><text:span text:style-name="T121">5</text:span></text:p>
      <text:p text:style-name="P144">Serveis d’Administració Electrònica en el Govern de les Illes Balears</text:p>
      <text:p text:style-name="P143">Lot 3 (Serveis de tramitació d’expedients electrònics)</text:p>
      <text:p text:style-name="P143"/>
      <text:p text:style-name="P143"/>
      <text:p text:style-name="P143"/>
      <text:p text:style-name="P143"/>
      <text:p text:style-name="P4">Oficina Tècnica de Direcció de Projecte</text:p>
      <text:list xml:id="list346430546" text:style-name="Outline">
        <text:list-header>
          <text:h text:style-name="P392"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38">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91">Modificació del document segons plantilla enviada per la DGDT</text:span>.</text:p>
          </table:table-cell>
        </table:table-row>
        <table:table-row table:style-name="Taula1.1">
          <table:table-cell table:style-name="Taula1.A5" office:value-type="string">
            <text:p text:style-name="P49"><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23">2</text:span></text:p>
          </table:table-cell>
          <table:table-cell table:style-name="Taula1.D5" office:value-type="string">
            <text:p text:style-name="P50"><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51"><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39">3</text:span></text:p>
          </table:table-cell>
          <table:table-cell table:style-name="Taula1.D6" office:value-type="string">
            <text:p text:style-name="P50"><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213">10/05/23</text:p>
          </table:table-cell>
          <table:table-cell table:style-name="Taula1.B7" office:value-type="string">
            <text:p text:style-name="P15">Límit Tecnologies</text:p>
          </table:table-cell>
          <table:table-cell table:style-name="Taula1.C7" office:value-type="string">
            <text:p text:style-name="P15">1.4</text:p>
          </table:table-cell>
          <table:table-cell table:style-name="Taula1.D7" office:value-type="string">
            <text:p text:style-name="P213">Afegir punts per explicar les APIs REST d'integració per backoffices i per crear regles de distribucio de forma remota. </text:p>
          </table:table-cell>
        </table:table-row>
        <table:table-row table:style-name="Taula1.1">
          <table:table-cell table:style-name="Taula1.A8" office:value-type="string">
            <text:p text:style-name="P213"><text:span text:style-name="T305">05</text:span>/0<text:span text:style-name="T305">7</text:span>/23</text:p>
          </table:table-cell>
          <table:table-cell table:style-name="Taula1.B8" office:value-type="string">
            <text:p text:style-name="P15">Límit Tecnologies</text:p>
          </table:table-cell>
          <table:table-cell table:style-name="Taula1.C8" office:value-type="string">
            <text:p text:style-name="P15">1.<text:span text:style-name="T305">5</text:span></text:p>
          </table:table-cell>
          <table:table-cell table:style-name="Taula1.D8" office:value-type="string">
            <text:p text:style-name="P213"><text:span text:style-name="T305">Revisar documentació i exemples.</text:span> </text:p>
          </table:table-cell>
        </table:table-row>
        <table:table-row table:style-name="Taula1.1">
          <table:table-cell table:style-name="Taula1.A11" office:value-type="string">
            <text:p text:style-name="P214"><text:span text:style-name="T330">12</text:span>/0<text:span text:style-name="T330">4/</text:span>2<text:span text:style-name="T330">4</text:span></text:p>
          </table:table-cell>
          <table:table-cell table:style-name="Taula1.B11" office:value-type="string">
            <text:p text:style-name="P16">Límit Tecnologies</text:p>
          </table:table-cell>
          <table:table-cell table:style-name="Taula1.C11" office:value-type="string">
            <text:p text:style-name="P17">1.6</text:p>
          </table:table-cell>
          <table:table-cell table:style-name="Taula1.D11" office:value-type="string">
            <text:p text:style-name="P253">Revisió per a la versió 1.0<text:span text:style-name="T331">.1</text:span> de l’aplicació.</text:p>
          </table:table-cell>
        </table:table-row>
        <table:table-row table:style-name="Taula1.1">
          <table:table-cell table:style-name="Taula1.A11" office:value-type="string">
            <text:p text:style-name="P214"><text:span text:style-name="T335">09</text:span>/<text:span text:style-name="T333">1</text:span><text:span text:style-name="T335">2</text:span><text:span text:style-name="T330">/</text:span><text:span text:style-name="T333">25</text:span></text:p>
          </table:table-cell>
          <table:table-cell table:style-name="Taula1.B11" office:value-type="string">
            <text:p text:style-name="P16">Límit Tecnologies</text:p>
          </table:table-cell>
          <table:table-cell table:style-name="Taula1.C11" office:value-type="string">
            <text:p text:style-name="P17">1.<text:span text:style-name="T333">7</text:span></text:p>
          </table:table-cell>
          <table:table-cell table:style-name="Taula1.D11" office:value-type="string">
            <text:p text:style-name="P388">Nou paràmetre <text:span text:style-name="T125">tipusSia</text:span><text:span text:style-name="T153"> a l'API de regles.<text:line-break/></text:span><text:span text:style-name="T170">Informació del codi de servei i codi i nom del trámit en la consulta d'anotacions.</text:span></text:p>
          </table:table-cell>
        </table:table-row>
        <table:table-row table:style-name="Taula1.1">
          <table:table-cell table:style-name="Taula1.A11" office:value-type="string">
            <text:p text:style-name="P389"><text:span text:style-name="T337">10</text:span>/<text:span text:style-name="T337">12</text:span>/25</text:p>
          </table:table-cell>
          <table:table-cell table:style-name="Taula1.B11" office:value-type="string">
            <text:p text:style-name="P18">Límit Tecnologies</text:p>
          </table:table-cell>
          <table:table-cell table:style-name="Taula1.C11" office:value-type="string">
            <text:p text:style-name="P19">1.<text:span text:style-name="T337">8</text:span></text:p>
          </table:table-cell>
          <table:table-cell table:style-name="Taula1.D11" office:value-type="string">
            <text:p text:style-name="P389">Revisió del Servei de gestió d<text:span text:style-name="T338">'</text:span>anotacions pels backoffices.</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38">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45"/>
          </table:table-cell>
          <table:table-cell table:style-name="Taula2.B4" office:value-type="string">
            <text:p text:style-name="P145"/>
          </table:table-cell>
          <table:table-cell table:style-name="Taula2.C4" office:value-type="string">
            <text:p text:style-name="P145"/>
          </table:table-cell>
        </table:table-row>
        <table:table-row table:style-name="Taula2.1">
          <table:table-cell table:style-name="Taula2.A5" office:value-type="string">
            <text:p text:style-name="P145"/>
          </table:table-cell>
          <table:table-cell table:style-name="Taula2.B5" office:value-type="string">
            <text:p text:style-name="P145"/>
          </table:table-cell>
          <table:table-cell table:style-name="Taula2.C5" office:value-type="string">
            <text:p text:style-name="P145"/>
          </table:table-cell>
        </table:table-row>
        <table:table-row table:style-name="Taula2.1">
          <table:table-cell table:style-name="Taula2.A6" office:value-type="string">
            <text:p text:style-name="P145"/>
          </table:table-cell>
          <table:table-cell table:style-name="Taula2.B6" office:value-type="string">
            <text:p text:style-name="P145"/>
          </table:table-cell>
          <table:table-cell table:style-name="Taula2.C6" office:value-type="string">
            <text:p text:style-name="P145"/>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38">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45"/>
          </table:table-cell>
          <table:table-cell table:style-name="Taula3.B4" office:value-type="string">
            <text:p text:style-name="P145"/>
          </table:table-cell>
          <table:table-cell table:style-name="Taula3.C4" office:value-type="string">
            <text:p text:style-name="P145"/>
          </table:table-cell>
        </table:table-row>
        <text:soft-page-break/>
        <table:table-row table:style-name="Taula3.1">
          <table:table-cell table:style-name="Taula3.A5" office:value-type="string">
            <text:p text:style-name="P145"/>
          </table:table-cell>
          <table:table-cell table:style-name="Taula3.B5" office:value-type="string">
            <text:p text:style-name="P145"/>
          </table:table-cell>
          <table:table-cell table:style-name="Taula3.C5" office:value-type="string">
            <text:p text:style-name="P145"/>
          </table:table-cell>
        </table:table-row>
        <table:table-row table:style-name="Taula3.1">
          <table:table-cell table:style-name="Taula3.A6" office:value-type="string">
            <text:p text:style-name="P145"/>
          </table:table-cell>
          <table:table-cell table:style-name="Taula3.B6" office:value-type="string">
            <text:p text:style-name="P145"/>
          </table:table-cell>
          <table:table-cell table:style-name="Taula3.C6" office:value-type="string">
            <text:p text:style-name="P145"/>
          </table:table-cell>
        </table:table-row>
      </table:table>
      <text:p text:style-name="P2"/>
      <text:p text:style-name="P2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38">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45"/>
          </table:table-cell>
          <table:table-cell table:style-name="Taula6.B4" office:value-type="string">
            <text:p text:style-name="P145"/>
          </table:table-cell>
          <table:table-cell table:style-name="Taula6.C4" office:value-type="string">
            <text:p text:style-name="P145"/>
          </table:table-cell>
        </table:table-row>
        <table:table-row table:style-name="Taula6.1">
          <table:table-cell table:style-name="Taula6.A5" office:value-type="string">
            <text:p text:style-name="P145"/>
          </table:table-cell>
          <table:table-cell table:style-name="Taula6.B5" office:value-type="string">
            <text:p text:style-name="P145"/>
          </table:table-cell>
          <table:table-cell table:style-name="Taula6.C5" office:value-type="string">
            <text:p text:style-name="P145"/>
          </table:table-cell>
        </table:table-row>
      </table:table>
      <text:p text:style-name="P2"><text:s text:c="5"/></text:p>
      <text:p text:style-name="P2"/>
      <text:p text:style-name="P25">Índex</text:p>
      <text:p text:style-name="P24"/>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3"><text:a xlink:type="simple" xlink:href="#__RefHeading___Toc21421_3940995463" text:style-name="Index_20_Link" text:visited-style-name="Index_20_Link">Control de versions del document<text:tab/>2</text:a></text:p>
          <text:p text:style-name="P223"><text:a xlink:type="simple" xlink:href="#__RefHeading___Toc16768_2313926538" text:style-name="Index_20_Link" text:visited-style-name="Index_20_Link">1. Objecte<text:tab/>5</text:a></text:p>
          <text:p text:style-name="P223"><text:a xlink:type="simple" xlink:href="#__RefHeading___Toc160468_1680181998" text:style-name="Index_20_Link" text:visited-style-name="Index_20_Link">2. Servei d’enviament d'anotacions<text:tab/>6</text:a></text:p>
          <text:p text:style-name="P224"><text:a xlink:type="simple" xlink:href="#__RefHeading___Toc16770_2313926538" text:style-name="Index_20_Link" text:visited-style-name="Index_20_Link">2.1. Diagrames de seqüència<text:tab/>6</text:a></text:p>
          <text:p text:style-name="P225"><text:a xlink:type="simple" xlink:href="#__RefHeading___Toc8043_1716379843" text:style-name="Index_20_Link" text:visited-style-name="Index_20_Link">2.1.1. Processament síncron<text:tab/>6</text:a></text:p>
          <text:p text:style-name="P225"><text:a xlink:type="simple" xlink:href="#__RefHeading___Toc15562_3365326968" text:style-name="Index_20_Link" text:visited-style-name="Index_20_Link">2.1.2. Processament asíncron<text:tab/>7</text:a></text:p>
          <text:p text:style-name="P224"><text:a xlink:type="simple" xlink:href="#__RefHeading___Toc227353_390838441" text:style-name="Index_20_Link" text:visited-style-name="Index_20_Link">2.2. Descripció del servei<text:tab/>8</text:a></text:p>
          <text:p text:style-name="P224"><text:a xlink:type="simple" xlink:href="#__RefHeading___Toc16772_2313926538" text:style-name="Index_20_Link" text:visited-style-name="Index_20_Link">2.3. Model de dades<text:tab/>8</text:a></text:p>
          <text:p text:style-name="P224"><text:a xlink:type="simple" xlink:href="#__RefHeading___Toc227355_390838441" text:style-name="Index_20_Link" text:visited-style-name="Index_20_Link">2.4. Utilització del servei<text:tab/>14</text:a></text:p>
          <text:p text:style-name="P223"><text:a xlink:type="simple" xlink:href="#__RefHeading___Toc52041_2521683781" text:style-name="Index_20_Link" text:visited-style-name="Index_20_Link">3. Servei de backoffice de distribució<text:tab/>15</text:a></text:p>
          <text:p text:style-name="P223"><text:a xlink:type="simple" xlink:href="#__RefHeading___Toc160470_1680181998" text:style-name="Index_20_Link" text:visited-style-name="Index_20_Link">4. Servei de gestió d’anotacions pels backoffices<text:tab/>16</text:a></text:p>
          <text:p text:style-name="P224"><text:a xlink:type="simple" xlink:href="#__RefHeading___Toc227357_390838441" text:style-name="Index_20_Link" text:visited-style-name="Index_20_Link">4.1. Diagrama de seqüència<text:tab/>16</text:a></text:p>
          <text:p text:style-name="P224"><text:a xlink:type="simple" xlink:href="#__RefHeading___Toc227359_390838441" text:style-name="Index_20_Link" text:visited-style-name="Index_20_Link">4.2. Descripció del servei<text:tab/>18</text:a></text:p>
          <text:p text:style-name="P225"><text:a xlink:type="simple" xlink:href="#__RefHeading___Toc53751_2521683781" text:style-name="Index_20_Link" text:visited-style-name="Index_20_Link">4.2.1. Consulta d'una anotació de registre<text:tab/>18</text:a></text:p>
          <text:p text:style-name="P225"><text:a xlink:type="simple" xlink:href="#__RefHeading___Toc53753_2521683781" text:style-name="Index_20_Link" text:visited-style-name="Index_20_Link">4.2.2. Canvi d'estat d'una anotació<text:tab/>20</text:a></text:p>
          <text:p text:style-name="P224"><text:a xlink:type="simple" xlink:href="#__RefHeading___Toc227361_390838441" text:style-name="Index_20_Link" text:visited-style-name="Index_20_Link">4.3. Model de dades<text:tab/>21</text:a></text:p>
          <text:p text:style-name="P224"><text:a xlink:type="simple" xlink:href="#__RefHeading___Toc227363_390838441" text:style-name="Index_20_Link" text:visited-style-name="Index_20_Link">4.4. Utilització del servei<text:tab/>26</text:a></text:p>
          <text:p text:style-name="P223"><text:a xlink:type="simple" xlink:href="#__RefHeading___Toc227365_390838441" text:style-name="Index_20_Link" text:visited-style-name="Index_20_Link">5. Servei de gestió de regles<text:tab/>27</text:a></text:p>
          <text:p text:style-name="P224"><text:a xlink:type="simple" xlink:href="#__RefHeading___Toc227367_390838441" text:style-name="Index_20_Link" text:visited-style-name="Index_20_Link">5.1. Descripció del servei<text:tab/>27</text:a></text:p>
          <text:p text:style-name="P225"><text:a xlink:type="simple" xlink:href="#__RefHeading___Toc227369_390838441" text:style-name="Index_20_Link" text:visited-style-name="Index_20_Link">5.1.1. Crear una regla<text:tab/>28</text:a></text:p>
          <text:p text:style-name="P225"><text:a xlink:type="simple" xlink:href="#__RefHeading___Toc227371_390838441" text:style-name="Index_20_Link" text:visited-style-name="Index_20_Link">5.1.2. Canviar estat d’una regla<text:tab/>28</text:a></text:p>
          <text:p text:style-name="P225"><text:a xlink:type="simple" xlink:href="#__RefHeading___Toc227373_390838441" text:style-name="Index_20_Link" text:visited-style-name="Index_20_Link">5.1.3. Consultar informació d’una regla<text:tab/>29</text:a></text:p>
          <text:p text:style-name="P224"><text:a xlink:type="simple" xlink:href="#__RefHeading___Toc227375_390838441" text:style-name="Index_20_Link" text:visited-style-name="Index_20_Link">5.2. Utilització del servei<text:tab/>30</text:a></text:p>
          <text:p text:style-name="P223"><text:a xlink:type="simple" xlink:href="#__RefHeading___Toc60794_1326387233" text:style-name="Index_20_Link" text:visited-style-name="Index_20_Link">6. Llibreria d'utilitats pels backoffices de DISTRIBUCIO<text:tab/>32</text:a></text:p>
          <text:p text:style-name="P224"><text:a xlink:type="simple" xlink:href="#__RefHeading___Toc50902_2907556958" text:style-name="Index_20_Link" text:visited-style-name="Index_20_Link">6.1. Informació de la llibreria<text:tab/>32</text:a></text:p>
          <text:p text:style-name="P224"><text:a xlink:type="simple" xlink:href="#__RefHeading___Toc50904_2907556958" text:style-name="Index_20_Link" text:visited-style-name="Index_20_Link">6.2. Com incloure la llibreria<text:tab/>33</text:a></text:p>
          <text:p text:style-name="P224"><text:a xlink:type="simple" xlink:href="#__RefHeading___Toc366105_93553639" text:style-name="Index_20_Link" text:visited-style-name="Index_20_Link">6.3. Històric<text:tab/>33</text:a></text:p>
          <text:p text:style-name="P224"><text:a xlink:type="simple" xlink:href="#__RefHeading___Toc366107_93553639" text:style-name="Index_20_Link" text:visited-style-name="Index_20_Link">6.4. Utilitats per l'Arxiu<text:tab/>34</text:a></text:p>
          <text:p text:style-name="P225"><text:a xlink:type="simple" xlink:href="#__RefHeading___Toc50906_2907556958" text:style-name="Index_20_Link" text:visited-style-name="Index_20_Link">6.4.1. Paràmetres<text:tab/>35</text:a></text:p>
          <text:p text:style-name="P225"><text:a xlink:type="simple" xlink:href="#__RefHeading___Toc50908_2907556958" text:style-name="Index_20_Link" text:visited-style-name="Index_20_Link">6.4.2. Ús de </text:a><text:a xlink:type="simple" xlink:href="#__RefHeading___Toc50908_2907556958" text:style-name="Index_20_Link" text:visited-style-name="Index_20_Link"><text:span text:style-name="T125">B</text:span></text:a><text:a xlink:type="simple" xlink:href="#__RefHeading___Toc50908_2907556958" text:style-name="Index_20_Link" text:visited-style-name="Index_20_Link"><text:span text:style-name="T125">ackofficeArxiuUtils</text:span></text:a><text:a xlink:type="simple" xlink:href="#__RefHeading___Toc50908_2907556958" text:style-name="Index_20_Link" text:visited-style-name="Index_20_Link"><text:tab/>36</text:a></text:p>
          <text:p text:style-name="P225"><text:a xlink:type="simple" xlink:href="#__RefHeading___Toc50910_2907556958" text:style-name="Index_20_Link" text:visited-style-name="Index_20_Link">6.4.3. Exemple Java<text:tab/>37</text:a></text:p>
          <text:p text:style-name="P224"><text:a xlink:type="simple" xlink:href="#__RefHeading___Toc50910_29075569581" text:style-name="Index_20_Link" text:visited-style-name="Index_20_Link">6.5. Utilitats per Sistra2<text:tab/>41</text:a></text:p>
          <text:p text:style-name="P225"><text:a xlink:type="simple" xlink:href="#__RefHeading___Toc366109_93553639" text:style-name="Index_20_Link" text:visited-style-name="Index_20_Link">6.5.1. Ús de </text:a><text:a xlink:type="simple" xlink:href="#__RefHeading___Toc366109_93553639" text:style-name="Index_20_Link" text:visited-style-name="Index_20_Link"><text:span text:style-name="T125">BackofficeSistra2Utils</text:span></text:a><text:a xlink:type="simple" xlink:href="#__RefHeading___Toc366109_93553639" text:style-name="Index_20_Link" text:visited-style-name="Index_20_Link"><text:tab/>42</text:a></text:p>
          <text:p text:style-name="P225"><text:a xlink:type="simple" xlink:href="#__RefHeading___Toc366111_93553639" text:style-name="Index_20_Link" text:visited-style-name="Index_20_Link">6.5.2. Exemple Java<text:tab/>43</text:a></text:p>
          <text:p text:style-name="P223"><text:a xlink:type="simple" xlink:href="#__RefHeading___Toc117515_1680181998" text:style-name="Index_20_Link" text:visited-style-name="Index_20_Link">Annex I: WSDL del backoffice<text:tab/>44</text:a></text:p>
          <text:p text:style-name="P223"><text:a xlink:type="simple" xlink:href="#__RefHeading___Toc60796_1326387233" text:style-name="Index_20_Link" text:visited-style-name="Index_20_Link">Annex </text:a><text:a xlink:type="simple" xlink:href="#__RefHeading___Toc60796_1326387233" text:style-name="Index_20_Link" text:visited-style-name="Index_20_Link">II</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25">distribucio-backoffice-utils</text:span></text:a><text:a xlink:type="simple" xlink:href="#__RefHeading___Toc60796_1326387233" text:style-name="Index_20_Link" text:visited-style-name="Index_20_Link"><text:tab/>46</text:a></text:p>
        </text:index-body>
      </text:table-of-content>
      <text:p text:style-name="Standard"/>
      <text:p text:style-name="Text_20_body"/>
      <text:list xml:id="list155550001630047" text:continue-numbering="true" text:style-name="Outline">
        <text:list-item>
          <text:h text:style-name="P393" text:outline-level="1"><text:bookmark-start text:name="__RefHeading___Toc16768_2313926538"/>Objecte <text:bookmark-end text:name="__RefHeading___Toc16768_2313926538"/></text:h>
        </text:list-item>
      </text:list>
      <text:p text:style-name="P380"><text:span text:style-name="T306">L'objectiu d'aquest document és proporcionar </text:span>la informació necessària per a la integració amb el<text:span text:style-name="T106">s</text:span> <text:span text:style-name="T317">diferents </text:span>servei<text:span text:style-name="T106">s </text:span><text:span text:style-name="T317">que proporciona l’aplicació</text:span><text:span text:style-name="T106"> DISTRIBUCIÓ.</text:span></text:p>
      <text:p text:style-name="P229">Les aplicacions que s’integren amb distribució pertanyen a un dels següents grups:</text:p>
      <text:list xml:id="list487040942" text:style-name="L1">
        <text:list-item>
          <text:p text:style-name="P440">Aplicacions de registre: aquestes aplicacions recullen les anotacions del registre d’entrada i les donen d’alta a distribució.</text:p>
        </text:list-item>
        <text:list-item>
          <text:p text:style-name="P440">Backoffices: aquestes aplicacions son les encarregades de processar les anotacions de registre.</text:p>
        </text:list-item>
      </text:list>
      <text:p text:style-name="P229">Les aplicacions de registre fan us del servei d’enviament d’anotacions de registre per a donar-les d’alta a DISTRIBUCIÓ i que comenci el seu processament.</text:p>
      <text:p text:style-name="P229">Per a cada anotació de registre, DISTRIBUCIÓ s’encarrega de calcular el backoffice encarregat del seu processament (mitjançant l’aplicació de regles) i d’informar a aquests backoffices de les anotacions pendents de processar.</text:p>
      <text:p text:style-name="P229">Els backoffices consulten les anotacions de registre a DISTRIBUCIÓ i canvien el seu estat una vegada les han processat.</text:p>
      <text:p text:style-name="P383"><draw:frame draw:style-name="fr4" draw:name="Marc3" text:anchor-type="as-char" svg:width="16.325cm" draw:z-index="65"><draw:text-box fo:min-height="3.678cm"><text:p text:style-name="Figure"><draw:frame draw:style-name="fr7" draw:name="Image8" text:anchor-type="paragraph" svg:width="16.325cm" style:rel-width="100%" svg:height="3.678cm" style:rel-height="scale" draw:z-index="66"><draw:image xlink:href="Pictures/1000000100000303000000A2B51A2BC62CB932CC.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154"/>
      <text:p text:style-name="P155">A l'apartat <text:bookmark-ref text:reference-format="number" text:ref-name="__RefNumPara__81015_1680181998">2</text:bookmark-ref><text:span text:style-name="T307"><text:s/></text:span>es <text:span text:style-name="T322">descriu el servei d’enviament d’anotacions</text:span> de registre a DISTRIBUCIÓ.</text:p>
      <text:p text:style-name="P156">A l'apartat <text:bookmark-ref text:reference-format="number" text:ref-name="__RefNumPara__52044_2521683781">3</text:bookmark-ref><text:span text:style-name="T307"><text:s/></text:span>es <text:span text:style-name="T322">mostra</text:span> com <text:span text:style-name="T321">implementar el servei dels backoffices que rep la llista d’anotacions pendents de processar de</text:span> DISTRIBUCIÓ.</text:p>
      <text:p text:style-name="P156">A l'apartat <text:bookmark-ref text:reference-format="number" text:ref-name="__RefNumPara__81017_1680181998">4</text:bookmark-ref><text:span text:style-name="T307"><text:s/></text:span>es <text:span text:style-name="T324">descriu el servei </text:span><text:span text:style-name="T323">que permet </text:span><text:span text:style-name="T325">als backoffices </text:span><text:span text:style-name="T324">consultar i </text:span><text:span text:style-name="T323">canviar l’estat de les anotacions</text:span><text:span text:style-name="T324"> </text:span><text:span text:style-name="T325">informades des </text:span><text:span text:style-name="T324">de </text:span>DISTRIBUCIÓ<text:span text:style-name="T308">.</text:span></text:p>
      <text:p text:style-name="P155">A l'apartat <text:bookmark-ref text:reference-format="number" text:ref-name="__RefNumPara__52573_2521683781">5</text:bookmark-ref><text:span text:style-name="T307"><text:s/></text:span>es <text:span text:style-name="T324">descriu el servei que permet gestionar les regles de </text:span>DISTRIBUCIÓ<text:span text:style-name="T308">.</text:span></text:p>
      <text:p text:style-name="P382">A l'apartat <text:bookmark-ref text:reference-format="number-all-superior" text:ref-name="__RefHeading___Toc60794_1326387233">6</text:bookmark-ref><text:s/>es detalla la llibreria d'utilitats comunes de <text:span text:style-name="T107">DISTRIBUCIÓ</text:span> per a backoffices per moure els documents annexos dins de l'Arxiu o per interpretar la informació XML de formularis i pagaments provinents de SISTRA2.</text:p>
      <text:list xml:id="list155549478497690" text:continue-list="list155550001630047" text:style-name="Outline">
        <text:list-item>
          <text:h text:style-name="P394" text:outline-level="1"><text:bookmark-start text:name="__RefNumPara__81015_1680181998"/><text:bookmark-start text:name="__RefHeading___Toc160468_1680181998"/><text:span text:style-name="T314">Servei d’e</text:span>nviament d'anotacions <text:bookmark-end text:name="__RefNumPara__81015_1680181998"/><text:bookmark-end text:name="__RefHeading___Toc160468_1680181998"/></text:h>
        </text:list-item>
      </text:list>
      <text:p text:style-name="P231">Aquest servei permet l’enviament d’anotacions de registre a una de les bústies de distribució. Aquest enviament es pot fer de forma síncrona o de forma asíncrona.</text:p>
      <text:p text:style-name="P231"><text:span text:style-name="T309">En aquest apartat es descriu</text:span>en<text:span text:style-name="T309"> e</text:span>ls casos d’ús<text:span text:style-name="T309">, el model de dades i els detalls i el client per a la seva integració.</text:span></text:p>
      <text:p text:style-name="P238"><draw:frame draw:style-name="fr3" draw:name="Marc2" text:anchor-type="as-char" svg:width="9.895cm" draw:z-index="67"><draw:text-box fo:min-height="6.932cm"><text:p text:style-name="P226"><draw:frame draw:style-name="fr7" draw:name="Imatge6" text:anchor-type="paragraph" svg:width="9.895cm" style:rel-width="100%" svg:height="6.932cm" style:rel-height="scale" draw:z-index="68"><draw:image xlink:href="Pictures/100000010000017600000106CDB180781C1628B8.png" xlink:type="simple" xlink:show="embed" xlink:actuate="onLoad" draw:mime-type="image/png"/></draw:frame>Figura <text:span text:style-name="T107"><text:sequence text:ref-name="refFig.0" text:name="Fig." text:formula="ooow:Fig.+1" style:num-format="1">1</text:sequence></text:span>: <text:s/><text:span text:style-name="T307">Casos d'ús </text:span><text:span text:style-name="T316">de l’enviament</text:span><text:span text:style-name="T309"> d'anotacions a </text:span><text:span text:style-name="T307">DISTRIBUCIO</text:span></text:p></draw:text-box></draw:frame></text:p>
      <text:list xml:id="list155550118720543" text:continue-numbering="true" text:style-name="Outline">
        <text:list-item>
          <text:list>
            <text:list-item>
              <text:h text:style-name="P401" text:outline-level="2"><text:bookmark-start text:name="__RefHeading___Toc16770_2313926538"/>Diagrames d<text:span text:style-name="T316">e seqüència</text:span><text:bookmark-end text:name="__RefHeading___Toc16770_2313926538"/></text:h>
            </text:list-item>
          </text:list>
        </text:list-item>
      </text:list>
      <text:p text:style-name="P149">Segons la configuració de l’aplicació, el processament de l’anotació de registre es <text:span text:style-name="T94">pot dur</text:span> a terme de forma síncrona o de forma asíncrona.</text:p>
      <text:list xml:id="list155548859296921" text:continue-numbering="true" text:style-name="Outline">
        <text:list-item>
          <text:list>
            <text:list-item>
              <text:list>
                <text:list-item>
                  <text:h text:style-name="P414" text:outline-level="3"><text:bookmark-start text:name="__RefHeading___Toc8043_1716379843"/><text:span text:style-name="T315">Processament</text:span> síncron<text:bookmark-end text:name="__RefHeading___Toc8043_1716379843"/></text:h>
                </text:list-item>
              </text:list>
            </text:list-item>
          </text:list>
        </text:list-item>
      </text:list>
      <text:p text:style-name="P151">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47"/>
      <text:p text:style-name="P148"><text:soft-page-break/><text:s text:c="5"/><draw:frame draw:style-name="fr9" draw:name="Imatge2" text:anchor-type="as-char" svg:width="14.526cm" svg:height="7.435cm" draw:z-index="69"><draw:image xlink:href="Pictures/100000010000022500000119CAD32466B41F1941.png" xlink:type="simple" xlink:show="embed" xlink:actuate="onLoad" draw:mime-type="image/png"/></draw:frame><text:s text:c="5"/></text:p>
      <text:p text:style-name="P41"/>
      <text:p text:style-name="P150">La resposta retornada al client podrà retornar un error si alguna de les passes efectuades no s’ha pogut completar correctament.</text:p>
      <text:list xml:id="list155550890134077" text:continue-numbering="true" text:style-name="Outline">
        <text:list-item>
          <text:list>
            <text:list-item>
              <text:list>
                <text:list-item>
                  <text:h text:style-name="P414" text:outline-level="3"><text:bookmark-start text:name="__RefHeading___Toc15562_3365326968"/><text:span text:style-name="T315">Processament</text:span> asíncron<text:bookmark-end text:name="__RefHeading___Toc15562_3365326968"/></text:h>
                </text:list-item>
              </text:list>
            </text:list-item>
          </text:list>
        </text:list-item>
      </text:list>
      <text:p text:style-name="P150">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50"/>
      <text:p text:style-name="P146"><draw:frame draw:style-name="fr9" draw:name="Imatge1" text:anchor-type="as-char" svg:width="14.526cm" svg:height="9.551cm" draw:z-index="70"><draw:image xlink:href="Pictures/1000000100000225000001695E2AE0759B449FC1.png" xlink:type="simple" xlink:show="embed" xlink:actuate="onLoad" draw:mime-type="image/png"/></draw:frame><text:s text:c="5"/></text:p>
      <text:p text:style-name="P150"><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55550011959234" text:continue-numbering="true" text:style-name="Outline">
        <text:list-item>
          <text:list>
            <text:list-item>
              <text:h text:style-name="P402" text:outline-level="2"><text:bookmark-start text:name="Còpia de __RefNumPara__80988_1680181998 2"/><text:bookmark-start text:name="__RefHeading___Toc227353_390838441"/><text:bookmark-start text:name="Còpia de __RefHeading___Toc16772_2313926538 2"/>Descripció del servei<text:bookmark-end text:name="Còpia de __RefNumPara__80988_1680181998 2"/><text:bookmark-end text:name="__RefHeading___Toc227353_390838441"/><text:bookmark-end text:name="Còpia de __RefHeading___Toc16772_2313926538 2"/></text:h>
            </text:list-item>
          </text:list>
        </text:list-item>
      </text:list>
      <text:p text:style-name="P378"><text:span text:style-name="T314">Aquest servei</text:span> <text:span text:style-name="T314">disposa d’un únic mètode</text:span><text:span text:style-name="T104"> </text:span><text:span text:style-name="T40">enviarAnotacioRegistreEntrada</text:span> <text:span text:style-name="T104">que </text:span><text:span text:style-name="T314">permet l’enviament d’</text:span><text:span text:style-name="T104">anotacions provinents del registre d’entrada.</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372">Enviament d’anotacions de registre</text:p>
          </table:table-cell>
          <table:covered-table-cell/>
        </table:table-row>
        <table:table-row table:style-name="Taula12.1">
          <table:table-cell table:style-name="Taula12.A2" office:value-type="string">
            <text:p text:style-name="P40">Adreça</text:p>
          </table:table-cell>
          <table:table-cell table:style-name="Taula12.B2" office:value-type="string">
            <text:p text:style-name="P46">http<text:span text:style-name="T314">s</text:span>://<text:span text:style-name="T314">DISTRIB_HOST</text:span>/distribucio/ws/v1/bustia</text:p>
          </table:table-cell>
        </table:table-row>
        <table:table-row table:style-name="Taula12.1">
          <table:table-cell table:style-name="Taula12.A2" office:value-type="string">
            <text:p text:style-name="P40">Autenticació</text:p>
          </table:table-cell>
          <table:table-cell table:style-name="Taula12.B3" office:value-type="string">
            <text:p text:style-name="P233">HTTP Basic</text:p>
          </table:table-cell>
        </table:table-row>
        <table:table-row table:style-name="Taula12.1">
          <table:table-cell table:style-name="Taula12.A2" office:value-type="string">
            <text:p text:style-name="P40">Rols requerits</text:p>
          </table:table-cell>
          <table:table-cell table:style-name="Taula12.B4" office:value-type="string">
            <text:p text:style-name="P46">DIS_BSTWS</text:p>
          </table:table-cell>
        </table:table-row>
        <table:table-row table:style-name="Taula12.1">
          <table:table-cell table:style-name="Taula12.A2" office:value-type="string">
            <text:p text:style-name="P40">Mètode</text:p>
          </table:table-cell>
          <table:table-cell table:style-name="Taula12.B5" office:value-type="string">
            <text:p text:style-name="P375">enviarAnotacioRegistreEntrada</text:p>
          </table:table-cell>
        </table:table-row>
        <table:table-row table:style-name="Taula12.1">
          <table:table-cell table:style-name="Taula12.A2" office:value-type="string">
            <text:p text:style-name="P40">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233">Nom</text:p>
                </table:table-cell>
                <table:table-cell table:style-name="Taula13.A1" office:value-type="string">
                  <text:p text:style-name="P233">Tipus</text:p>
                </table:table-cell>
                <table:table-cell table:style-name="Taula13.C1" office:value-type="string">
                  <text:p text:style-name="P233">Descripció</text:p>
                </table:table-cell>
              </table:table-row>
              <table:table-row table:style-name="TableLine628085216">
                <table:table-cell table:style-name="Taula13.A2" office:value-type="string">
                  <text:p text:style-name="P46">entitat</text:p>
                </table:table-cell>
                <table:table-cell table:style-name="Taula13.B2" office:value-type="string">
                  <text:p text:style-name="P233">String</text:p>
                </table:table-cell>
                <table:table-cell table:style-name="Taula13.C2" office:value-type="string">
                  <text:p text:style-name="P46">El codi de l’entitat de DISTRIBUCIO a on es vol donar d’alta l’anotació.</text:p>
                </table:table-cell>
              </table:table-row>
              <table:table-row table:style-name="TableLine628086944">
                <table:table-cell table:style-name="Taula13.A3" office:value-type="string">
                  <text:p text:style-name="P46">unitatAdministrativa</text:p>
                </table:table-cell>
                <table:table-cell table:style-name="Taula13.B3" office:value-type="string">
                  <text:p text:style-name="P233">String</text:p>
                </table:table-cell>
                <table:table-cell table:style-name="Taula13.C3" office:value-type="string">
                  <text:p text:style-name="P46">El codi DIR3 de la unitat administrativa destinatària de l’anotació de registre.</text:p>
                </table:table-cell>
              </table:table-row>
              <table:table-row table:style-name="TableLine628090400">
                <table:table-cell table:style-name="Taula13.A4" office:value-type="string">
                  <text:p text:style-name="P46">registreEntrada</text:p>
                </table:table-cell>
                <table:table-cell table:style-name="Taula13.B4" office:value-type="string">
                  <text:p text:style-name="P233">RegistreAnotacio</text:p>
                </table:table-cell>
                <table:table-cell table:style-name="Taula13.C4" office:value-type="string">
                  <text:p text:style-name="P46">objecte amb la informació associada a l’anotació de registre</text:p>
                </table:table-cell>
              </table:table-row>
            </table:table>
            <text:p text:style-name="P46"/>
          </table:table-cell>
        </table:table-row>
        <table:table-row table:style-name="Taula12.1">
          <table:table-cell table:style-name="Taula12.A2" office:value-type="string">
            <text:p text:style-name="P40">Valor retornat</text:p>
          </table:table-cell>
          <table:table-cell table:style-name="Taula12.B7" office:value-type="string">
            <text:p text:style-name="P233">(no retorna cap valor)</text:p>
          </table:table-cell>
        </table:table-row>
      </table:table>
      <text:p text:style-name="P376"/>
      <text:p text:style-name="P379">Per a més informació sobre com emplenar correctament l’objecte de tipus RegistreEntrada es pot consultar el punt <text:bookmark-ref text:reference-format="number" text:ref-name="__RefNumPara__80988_1680181998">2.3</text:bookmark-ref><text:s/>d’aquest mateix document.</text:p>
      <text:p text:style-name="P379">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55549750769870" text:continue-numbering="true" text:style-name="Outline">
        <text:list-item>
          <text:list>
            <text:list-item>
              <text:h text:style-name="P406" text:outline-level="2"><text:bookmark-start text:name="__RefNumPara__80988_1680181998"/><text:bookmark-start text:name="__RefHeading___Toc16772_2313926538"/>Model de <text:span text:style-name="T314">dades</text:span> <text:bookmark-end text:name="__RefNumPara__80988_1680181998"/><text:bookmark-end text:name="__RefHeading___Toc16772_2313926538"/></text:h>
            </text:list-item>
          </text:list>
        </text:list-item>
      </text:list>
      <text:p text:style-name="P377">Aquest és el model de <text:span text:style-name="T314">dades</text:span> del servei d’<text:span text:style-name="T93">enviament d’anotacions de registre</text:span>.</text:p>
      <text:p text:style-name="P377"><draw:frame draw:style-name="fr10" draw:name="Image1" text:anchor-type="paragraph" svg:width="16.669cm" svg:height="23.971cm" draw:z-index="59"><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137"><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628178528">
          <table:table-cell table:style-name="Taula17.A1" table:number-columns-spanned="5" office:value-type="string">
            <text:p text:style-name="P139">RegistreAnotacio</text:p>
          </table:table-cell>
          <table:covered-table-cell/>
          <table:covered-table-cell/>
          <table:covered-table-cell/>
          <table:covered-table-cell/>
        </table:table-row>
        <table:table-row table:style-name="TableLine628198400">
          <table:table-cell table:style-name="Taula17.A2" office:value-type="string">
            <text:p text:style-name="P33">Nom del camp</text:p>
          </table:table-cell>
          <table:table-cell table:style-name="Taula17.A2" office:value-type="string">
            <text:p text:style-name="P33">Tipus</text:p>
          </table:table-cell>
          <table:table-cell table:style-name="Taula17.A2" office:value-type="string">
            <text:p text:style-name="P33">Mult.</text:p>
          </table:table-cell>
          <table:table-cell table:style-name="Taula17.A2" office:value-type="string">
            <text:p text:style-name="P35">Tamany</text:p>
          </table:table-cell>
          <table:table-cell table:style-name="Taula17.E2" office:value-type="string">
            <text:p text:style-name="P35">Descripció</text:p>
          </table:table-cell>
        </table:table-row>
        <table:table-row table:style-name="TableLine628190336">
          <table:table-cell table:style-name="Taula17.A3" office:value-type="string">
            <text:p text:style-name="P254">tipusES</text:p>
          </table:table-cell>
          <table:table-cell table:style-name="Taula17.A3" office:value-type="string">
            <text:p text:style-name="P254">Cadena</text:p>
          </table:table-cell>
          <table:table-cell table:style-name="Taula17.A3" office:value-type="string">
            <text:p text:style-name="P255">0..1</text:p>
          </table:table-cell>
          <table:table-cell table:style-name="Taula17.D3" office:value-type="float" office:value="1">
            <text:p text:style-name="P255">1</text:p>
          </table:table-cell>
          <table:table-cell table:style-name="Taula17.E4" office:value-type="string">
            <text:p text:style-name="P254">Tipus d'assentament registral:<text:line-break/>- "E": entrada<text:line-break/>- "S": sortida<text:line-break/>El camp no és obligatori i si no s'informa es prendrà "E" per defecte.</text:p>
          </table:table-cell>
        </table:table-row>
        <table:table-row table:style-name="TableLine628154048">
          <table:table-cell table:style-name="Taula17.A3" office:value-type="string">
            <text:p text:style-name="P257">numero</text:p>
          </table:table-cell>
          <table:table-cell table:style-name="Taula17.A3" office:value-type="string">
            <text:p text:style-name="P258">Cadena</text:p>
          </table:table-cell>
          <table:table-cell table:style-name="Taula17.D3" office:value-type="float" office:value="1">
            <text:p text:style-name="P259">1</text:p>
          </table:table-cell>
          <table:table-cell table:style-name="Taula17.D3" office:value-type="float" office:value="255">
            <text:p text:style-name="P354"><text:span text:style-name="T241">2</text:span>5<text:span text:style-name="T241">5</text:span></text:p>
          </table:table-cell>
          <table:table-cell table:style-name="Taula17.E4" office:value-type="string">
            <text:p text:style-name="P261">Número identificador de l’assentament registral. És únic.</text:p>
          </table:table-cell>
        </table:table-row>
        <table:table-row table:style-name="TableLine628192640">
          <table:table-cell table:style-name="Taula17.A3" office:value-type="string">
            <text:p text:style-name="P257">data</text:p>
          </table:table-cell>
          <table:table-cell table:style-name="Taula17.A3" office:value-type="string">
            <text:p text:style-name="P263">Data</text:p>
          </table:table-cell>
          <table:table-cell table:style-name="Taula17.A3" office:value-type="string">
            <text:p text:style-name="P259">1</text:p>
          </table:table-cell>
          <table:table-cell table:style-name="Taula17.A3" office:value-type="string">
            <text:p text:style-name="P265">14</text:p>
          </table:table-cell>
          <table:table-cell table:style-name="Taula17.E5" office:value-type="string">
            <text:p text:style-name="P263">Data de <text:span text:style-name="T95">l’assentament.</text:span> </text:p>
          </table:table-cell>
        </table:table-row>
        <table:table-row table:style-name="TableLine628161536">
          <table:table-cell table:style-name="Taula17.A3" office:value-type="string">
            <text:p text:style-name="P257"><text:span text:style-name="T96">d</text:span>ataOrigen</text:p>
          </table:table-cell>
          <table:table-cell table:style-name="Taula17.A3" office:value-type="string">
            <text:p text:style-name="P263">Data</text:p>
          </table:table-cell>
          <table:table-cell table:style-name="Taula17.A3" office:value-type="string">
            <text:p text:style-name="P259">0..1</text:p>
          </table:table-cell>
          <table:table-cell table:style-name="Taula17.A3" office:value-type="string">
            <text:p text:style-name="P266">14</text:p>
          </table:table-cell>
          <table:table-cell table:style-name="Taula17.E6" office:value-type="string">
            <text:p text:style-name="P263">Data <text:span text:style-name="T95">origen </text:span>de l’assentament.</text:p>
          </table:table-cell>
        </table:table-row>
        <table:table-row table:style-name="TableLine628163264">
          <table:table-cell table:style-name="Taula17.A3" office:value-type="string">
            <text:p text:style-name="P268">identificador</text:p>
          </table:table-cell>
          <table:table-cell table:style-name="Taula17.A3" office:value-type="string">
            <text:p text:style-name="P269">Cadena</text:p>
          </table:table-cell>
          <table:table-cell table:style-name="Taula17.A3" office:value-type="string">
            <text:p text:style-name="P270">1</text:p>
          </table:table-cell>
          <table:table-cell table:style-name="Taula17.A3" office:value-type="string">
            <text:p text:style-name="P354">1<text:span text:style-name="T243">00</text:span></text:p>
          </table:table-cell>
          <table:table-cell table:style-name="Taula17.E7" office:value-type="string">
            <text:p text:style-name="P261">Codi identificador de l’assentament registral.</text:p>
          </table:table-cell>
        </table:table-row>
        <table:table-row table:style-name="TableLine628164704">
          <table:table-cell table:style-name="Taula17.A3" office:value-type="string">
            <text:p text:style-name="P268">entitatCodi</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356">2<text:span text:style-name="T241">55</text:span></text:p>
          </table:table-cell>
          <table:table-cell table:style-name="Taula17.E8" office:value-type="string">
            <text:p text:style-name="P261">Codi <text:span text:style-name="T97">DIR3 </text:span>de l’entitat governamental a la que va dirigit l’assentament registral.</text:p>
          </table:table-cell>
        </table:table-row>
        <table:table-row table:style-name="TableLine628165280">
          <table:table-cell table:style-name="Taula17.A3" office:value-type="string">
            <text:p text:style-name="P268">entitatDescripcio</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357">2<text:span text:style-name="T241">55</text:span></text:p>
          </table:table-cell>
          <table:table-cell table:style-name="Taula17.E9" office:value-type="string">
            <text:p text:style-name="P261"><text:span text:style-name="T97">Descripció DIR3</text:span> de l’entitat governamental a la que va dirigit l’assentament registral.</text:p>
          </table:table-cell>
        </table:table-row>
        <table:table-row table:style-name="TableLine628183136">
          <table:table-cell table:style-name="Taula17.A3" office:value-type="string">
            <text:p text:style-name="P268">oficinaCodi</text:p>
          </table:table-cell>
          <table:table-cell table:style-name="Taula17.A3" office:value-type="string">
            <text:p text:style-name="P269">Cadena</text:p>
          </table:table-cell>
          <table:table-cell table:style-name="Taula17.A3" office:value-type="string">
            <text:p text:style-name="P270">1</text:p>
          </table:table-cell>
          <table:table-cell table:style-name="Taula17.A3" office:value-type="string">
            <text:p text:style-name="P266">21</text:p>
          </table:table-cell>
          <table:table-cell table:style-name="Taula17.E10" office:value-type="string">
            <text:p text:style-name="P273">Codi DIR3 de l’oficina on es registre.</text:p>
          </table:table-cell>
        </table:table-row>
        <table:table-row table:style-name="TableLine628210496">
          <table:table-cell table:style-name="Taula17.A3" office:value-type="string">
            <text:p text:style-name="P268">oficinaDescripcio</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75"><text:span text:style-name="T242">3</text:span>00</text:p>
          </table:table-cell>
          <table:table-cell table:style-name="Taula17.E11" office:value-type="string">
            <text:p text:style-name="P263">Denominació DIR3 de l'entitat registral on es registre l'assentament.</text:p>
          </table:table-cell>
        </table:table-row>
        <table:table-row table:style-name="TableLine628196960">
          <table:table-cell table:style-name="Taula17.A3" office:value-type="string">
            <text:p text:style-name="P268">oficinaOrigenCodi</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66">21</text:p>
          </table:table-cell>
          <table:table-cell table:style-name="Taula17.E12" office:value-type="string">
            <text:p text:style-name="P263"/>
          </table:table-cell>
        </table:table-row>
        <table:table-row table:style-name="TableLine628168736">
          <table:table-cell table:style-name="Taula17.A3" office:value-type="string">
            <text:p text:style-name="P268">oficinaOrigenDescripcio</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75">100</text:p>
          </table:table-cell>
          <table:table-cell table:style-name="Taula17.E13" office:value-type="string">
            <text:p text:style-name="P263"/>
          </table:table-cell>
        </table:table-row>
        <table:table-row table:style-name="TableLine628175648">
          <table:table-cell table:style-name="Taula17.A3" office:value-type="string">
            <text:p text:style-name="P268">llibreCodi</text:p>
          </table:table-cell>
          <table:table-cell table:style-name="Taula17.A3" office:value-type="string">
            <text:p text:style-name="P269">Cadena</text:p>
          </table:table-cell>
          <table:table-cell table:style-name="Taula17.A3" office:value-type="string">
            <text:p text:style-name="P270">1</text:p>
          </table:table-cell>
          <table:table-cell table:style-name="Taula17.A3" office:value-type="string">
            <text:p text:style-name="P266">4</text:p>
          </table:table-cell>
          <table:table-cell table:style-name="Taula17.E14" office:value-type="string">
            <text:p text:style-name="P273">Codi del llibre al qual s’ha fet l’assentament registral rebut.</text:p>
          </table:table-cell>
        </table:table-row>
        <table:table-row table:style-name="TableLine628169024">
          <table:table-cell table:style-name="Taula17.A3" office:value-type="string">
            <text:p text:style-name="P268">llibreDescripcio</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83">255</text:p>
          </table:table-cell>
          <table:table-cell table:style-name="Taula17.E15" office:value-type="string">
            <text:p text:style-name="P273">Denominació del llibre al qual s’ha fet l’assentament registral rebut.</text:p>
          </table:table-cell>
        </table:table-row>
        <table:table-row table:style-name="TableLine628167008">
          <table:table-cell table:style-name="Taula17.A3" office:value-type="string">
            <text:p text:style-name="P268">extracte</text:p>
          </table:table-cell>
          <table:table-cell table:style-name="Taula17.A3" office:value-type="string">
            <text:p text:style-name="P269">Cadena</text:p>
          </table:table-cell>
          <table:table-cell table:style-name="Taula17.A3" office:value-type="string">
            <text:p text:style-name="P270">1</text:p>
          </table:table-cell>
          <table:table-cell table:style-name="Taula17.A3" office:value-type="string">
            <text:p text:style-name="P275">240</text:p>
          </table:table-cell>
          <table:table-cell table:style-name="Taula17.E16" office:value-type="string">
            <text:p text:style-name="P263">Extracte o resum de l'assentament.</text:p>
          </table:table-cell>
        </table:table-row>
        <table:table-row table:style-name="TableLine628167584">
          <table:table-cell table:style-name="Taula17.A3" office:value-type="string">
            <text:p text:style-name="P268">assumpteTipusCodi</text:p>
          </table:table-cell>
          <table:table-cell table:style-name="Taula17.A3" office:value-type="string">
            <text:p text:style-name="P269">Cadena</text:p>
          </table:table-cell>
          <table:table-cell table:style-name="Taula17.A3" office:value-type="string">
            <text:p text:style-name="P270"><text:span text:style-name="T115">0..</text:span>1</text:p>
          </table:table-cell>
          <table:table-cell table:style-name="Taula17.A3" office:value-type="string">
            <text:p text:style-name="P266">16</text:p>
          </table:table-cell>
          <table:table-cell table:style-name="Taula17.E17" office:value-type="string">
            <text:p text:style-name="P273">Codi del tipus d’assumpte de l’assentament registral.</text:p>
          </table:table-cell>
        </table:table-row>
        <table:table-row table:style-name="TableLine628169312">
          <table:table-cell table:style-name="Taula17.A3" office:value-type="string">
            <text:p text:style-name="P268">assumpteTipusDescripcio</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75">100</text:p>
          </table:table-cell>
          <table:table-cell table:style-name="Taula17.E18" office:value-type="string">
            <text:p text:style-name="P273">Denominació del tipus d’assumpte de l’assentament registral.</text:p>
          </table:table-cell>
        </table:table-row>
        <table:table-row table:style-name="TableLine628171328">
          <table:table-cell table:style-name="Taula17.A3" office:value-type="string">
            <text:p text:style-name="P268">assumpteCodi</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66">16</text:p>
          </table:table-cell>
          <table:table-cell table:style-name="Taula17.E19" office:value-type="string">
            <text:p text:style-name="P273">Codi de l’assumpte.</text:p>
          </table:table-cell>
        </table:table-row>
        <table:table-row table:style-name="TableLine628161824">
          <table:table-cell table:style-name="Taula17.A3" office:value-type="string">
            <text:p text:style-name="P268"><text:span text:style-name="T97">a</text:span>ssumpteDescripcio</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354">2<text:span text:style-name="T244">55</text:span></text:p>
          </table:table-cell>
          <table:table-cell table:style-name="Taula17.E20" office:value-type="string">
            <text:p text:style-name="P273">Denominació de l’assumpte.</text:p>
          </table:table-cell>
        </table:table-row>
        <table:table-row table:style-name="TableLine628140224">
          <table:table-cell table:style-name="Taula17.A3" office:value-type="string">
            <text:p text:style-name="P268">referencia</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66">16</text:p>
          </table:table-cell>
          <table:table-cell table:style-name="Taula17.E21" office:value-type="string">
            <text:p text:style-name="P263">Referència externa a qualque element de l'assentament.</text:p>
          </table:table-cell>
        </table:table-row>
        <table:table-row table:style-name="TableLine628139072">
          <table:table-cell table:style-name="Taula17.A3" office:value-type="string">
            <text:p text:style-name="P268">expedientNumero</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66">80</text:p>
          </table:table-cell>
          <table:table-cell table:style-name="Taula17.E22" office:value-type="string">
            <text:p text:style-name="P263">Referència al nombre d'expedient de l'assentament.</text:p>
          </table:table-cell>
        </table:table-row>
        <table:table-row table:style-name="TableLine628209344">
          <table:table-cell table:style-name="Taula17.A3" office:value-type="string">
            <text:p text:style-name="P268">numeroOrigen</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66">80</text:p>
          </table:table-cell>
          <table:table-cell table:style-name="Taula17.E23" office:value-type="string">
            <text:p text:style-name="P263"/>
          </table:table-cell>
        </table:table-row>
        <table:table-row table:style-name="TableLine628188896">
          <table:table-cell table:style-name="Taula17.A3" office:value-type="string">
            <text:p text:style-name="P268">idiomaCodi</text:p>
          </table:table-cell>
          <table:table-cell table:style-name="Taula17.A3" office:value-type="string">
            <text:p text:style-name="P269">Cadena</text:p>
          </table:table-cell>
          <table:table-cell table:style-name="Taula17.A3" office:value-type="string">
            <text:p text:style-name="P270">1</text:p>
          </table:table-cell>
          <table:table-cell table:style-name="Taula17.A3" office:value-type="string">
            <text:p text:style-name="P266">2</text:p>
          </table:table-cell>
          <table:table-cell table:style-name="Taula17.E24" office:value-type="string">
            <text:p text:style-name="P277">Codi d’idioma amb el que s’ha fet l’assentament.</text:p>
          </table:table-cell>
        </table:table-row>
        <text:soft-page-break/>
        <table:table-row table:style-name="TableLine628196672">
          <table:table-cell table:style-name="Taula17.A3" office:value-type="string">
            <text:p text:style-name="P268">idiomaDescripcio</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75">100</text:p>
          </table:table-cell>
          <table:table-cell table:style-name="Taula17.E25" office:value-type="string">
            <text:p text:style-name="P277">Descripció d’idioma amb el que s’ha fet l’assentament.</text:p>
          </table:table-cell>
        </table:table-row>
        <table:table-row table:style-name="TableLine628180256">
          <table:table-cell table:style-name="Taula17.A3" office:value-type="string">
            <text:p text:style-name="P269">transportTipusCodi</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66">2<text:span text:style-name="T245">0</text:span></text:p>
          </table:table-cell>
          <table:table-cell table:style-name="Taula17.E26" office:value-type="string">
            <text:p text:style-name="P263">Codi SICRES3 del segment internos – tipo transporte.</text:p>
          </table:table-cell>
        </table:table-row>
        <table:table-row table:style-name="TableLine628148864">
          <table:table-cell table:style-name="Taula17.A3" office:value-type="string">
            <text:p text:style-name="P269">transportTipusDescripcio</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75">100</text:p>
          </table:table-cell>
          <table:table-cell table:style-name="Taula17.E27" office:value-type="string">
            <text:p text:style-name="P263">Descripció SICRES3 del segment internos – tipo transporte.</text:p>
          </table:table-cell>
        </table:table-row>
        <table:table-row table:style-name="TableLine628205024">
          <table:table-cell table:style-name="Taula17.A3" office:value-type="string">
            <text:p text:style-name="P269">transportNumero</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66">20</text:p>
          </table:table-cell>
          <table:table-cell table:style-name="Taula17.E28" office:value-type="string">
            <text:p text:style-name="P263">Número del transport.</text:p>
          </table:table-cell>
        </table:table-row>
        <table:table-row table:style-name="TableLine628149152">
          <table:table-cell table:style-name="Taula17.A3" office:value-type="string">
            <text:p text:style-name="P269">usuariCodi</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66">20</text:p>
          </table:table-cell>
          <table:table-cell table:style-name="Taula17.E29" office:value-type="string">
            <text:p text:style-name="P263">Codi de l'usuari que vol realitzar l'operació.</text:p>
          </table:table-cell>
        </table:table-row>
        <table:table-row table:style-name="TableLine628204448">
          <table:table-cell table:style-name="Taula17.A3" office:value-type="string">
            <text:p text:style-name="P269">usuariNom</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356">7<text:span text:style-name="T246">67</text:span></text:p>
          </table:table-cell>
          <table:table-cell table:style-name="Taula17.E30" office:value-type="string">
            <text:p text:style-name="P263"><text:span text:style-name="T98">Nom</text:span> de l'usuari que vol realitzar l'operació.</text:p>
          </table:table-cell>
        </table:table-row>
        <table:table-row table:style-name="TableLine628191200">
          <table:table-cell table:style-name="Taula17.A3" office:value-type="string">
            <text:p text:style-name="P269">usuariContacte</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354">2<text:span text:style-name="T247">55</text:span></text:p>
          </table:table-cell>
          <table:table-cell table:style-name="Taula17.E31" office:value-type="string">
            <text:p text:style-name="P263">Contacte de l'usuari que fa l'assentament. Si és un registre electrònic el responsable del tràmit.</text:p>
          </table:table-cell>
        </table:table-row>
        <table:table-row table:style-name="TableLine628192352">
          <table:table-cell table:style-name="Taula17.A3" office:value-type="string">
            <text:p text:style-name="P269">aplicacioCodi</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354">2<text:span text:style-name="T248">55</text:span></text:p>
          </table:table-cell>
          <table:table-cell table:style-name="Taula17.E32" office:value-type="string">
            <text:p text:style-name="P277">Codi de l’aplicació que fa l’enviament de l’assentament registral.</text:p>
          </table:table-cell>
        </table:table-row>
        <table:table-row table:style-name="TableLine628192064">
          <table:table-cell table:style-name="Taula17.A3" office:value-type="string">
            <text:p text:style-name="P269">aplicacioVersio</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354">2<text:span text:style-name="T248">55</text:span></text:p>
          </table:table-cell>
          <table:table-cell table:style-name="Taula17.E33" office:value-type="string">
            <text:p text:style-name="P277">Versió de l’aplicació que fa l’enviament de l’assentament registral.</text:p>
          </table:table-cell>
        </table:table-row>
        <table:table-row table:style-name="TableLine628189760">
          <table:table-cell table:style-name="Taula17.A3" office:value-type="string">
            <text:p text:style-name="P269">documentacioFisicaCodi</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79">19</text:p>
          </table:table-cell>
          <table:table-cell table:style-name="Taula17.E34" office:value-type="string">
            <text:p text:style-name="P263">Codi SICRES del segment internos – Documentación física y/o soportes.</text:p>
          </table:table-cell>
        </table:table-row>
        <table:table-row table:style-name="TableLine628130432">
          <table:table-cell table:style-name="Taula17.A3" office:value-type="string">
            <text:p text:style-name="P269">documentacioFisicaDescripcio</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75">100</text:p>
          </table:table-cell>
          <table:table-cell table:style-name="Taula17.E35" office:value-type="string">
            <text:p text:style-name="P277">Descripció del segment internos – Documentación física y/o soportes</text:p>
          </table:table-cell>
        </table:table-row>
        <table:table-row table:style-name="TableLine628124384">
          <table:table-cell table:style-name="Taula17.A3" office:value-type="string">
            <text:p text:style-name="P269">observacions</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75">50</text:p>
          </table:table-cell>
          <table:table-cell table:style-name="Taula17.E36" office:value-type="string">
            <text:p text:style-name="P277">Observacions de l’assentament.</text:p>
          </table:table-cell>
        </table:table-row>
        <table:table-row table:style-name="TableLine628206176">
          <table:table-cell table:style-name="Taula17.A3" office:value-type="string">
            <text:p text:style-name="P269">exposa</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80">lob</text:p>
          </table:table-cell>
          <table:table-cell table:style-name="Taula17.E37" office:value-type="string">
            <text:p text:style-name="P277">Exposició de fets.</text:p>
          </table:table-cell>
        </table:table-row>
        <table:table-row table:style-name="TableLine628194656">
          <table:table-cell table:style-name="Taula17.A3" office:value-type="string">
            <text:p text:style-name="P269">solicita</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280">lob</text:p>
          </table:table-cell>
          <table:table-cell table:style-name="Taula17.E38" office:value-type="string">
            <text:p text:style-name="P277">Objecte de la sol·licitud si escau.</text:p>
          </table:table-cell>
        </table:table-row>
        <table:table-row table:style-name="TableLine628148576">
          <table:table-cell table:style-name="Taula17.A3" office:value-type="string">
            <text:p text:style-name="P269">interessats</text:p>
          </table:table-cell>
          <table:table-cell table:style-name="Taula17.A3" office:value-type="string">
            <text:p text:style-name="P269">RegistreInteressat</text:p>
          </table:table-cell>
          <table:table-cell table:style-name="Taula17.A3" office:value-type="string">
            <text:p text:style-name="P259">0..<text:span text:style-name="T99">n</text:span> </text:p>
          </table:table-cell>
          <table:table-cell table:style-name="Taula17.A3" office:value-type="string">
            <text:p text:style-name="P275"/>
          </table:table-cell>
          <table:table-cell table:style-name="Taula17.E39" office:value-type="string">
            <text:p text:style-name="P281">Dades que componen els interessats de l’assentament registral si n’hi ha.</text:p>
          </table:table-cell>
        </table:table-row>
        <table:table-row table:style-name="TableLine628210208">
          <table:table-cell table:style-name="Taula17.A3" office:value-type="string">
            <text:p text:style-name="P269">annexos</text:p>
          </table:table-cell>
          <table:table-cell table:style-name="Taula17.A3" office:value-type="string">
            <text:p text:style-name="P269">RegistreAnnex</text:p>
          </table:table-cell>
          <table:table-cell table:style-name="Taula17.A3" office:value-type="string">
            <text:p text:style-name="P259">0..<text:span text:style-name="T99">n</text:span> </text:p>
          </table:table-cell>
          <table:table-cell table:style-name="Taula17.A3" office:value-type="string">
            <text:p text:style-name="P275"/>
          </table:table-cell>
          <table:table-cell table:style-name="Taula17.E40" office:value-type="string">
            <text:p text:style-name="P281">Dades que componen els annexos dels assentaments registrals si n’hi ha.</text:p>
          </table:table-cell>
        </table:table-row>
        <table:table-row table:style-name="TableLine628195520">
          <table:table-cell table:style-name="Taula17.A3" office:value-type="string">
            <text:p text:style-name="P269">justificant</text:p>
          </table:table-cell>
          <table:table-cell table:style-name="Taula17.A3" office:value-type="string">
            <text:p text:style-name="P269">RegistreAnnex</text:p>
          </table:table-cell>
          <table:table-cell table:style-name="Taula17.A3" office:value-type="string">
            <text:p text:style-name="P270">0..1</text:p>
          </table:table-cell>
          <table:table-cell table:style-name="Taula17.A3" office:value-type="string">
            <text:p text:style-name="P283"/>
          </table:table-cell>
          <table:table-cell table:style-name="Taula17.E41" office:value-type="string">
            <text:p text:style-name="P281">Dades que componen el justificant de l’assentament registral si n’hi ha. Es compon de les mateixes dades que un annex.</text:p>
          </table:table-cell>
        </table:table-row>
        <table:table-row table:style-name="TableLine628129856">
          <table:table-cell table:style-name="Taula17.A3" office:value-type="string">
            <text:p text:style-name="P268"><text:span text:style-name="T112">procediment</text:span>Codi</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356">6<text:span text:style-name="T249">4</text:span></text:p>
          </table:table-cell>
          <table:table-cell table:style-name="Taula17.E43" office:value-type="string">
            <text:p text:style-name="P273">Codi <text:span text:style-name="T334">SIA </text:span>de<text:span text:style-name="T334">l</text:span> <text:span text:style-name="T112">procediment</text:span>.</text:p>
          </table:table-cell>
        </table:table-row>
        <table:table-row table:style-name="TableLine628084352">
          <table:table-cell table:style-name="Taula17.A3" office:value-type="string">
            <text:p text:style-name="P268"><text:span text:style-name="T334">servei</text:span>Codi</text:p>
          </table:table-cell>
          <table:table-cell table:style-name="Taula17.A3" office:value-type="string">
            <text:p text:style-name="P269">Cadena</text:p>
          </table:table-cell>
          <table:table-cell table:style-name="Taula17.A3" office:value-type="string">
            <text:p text:style-name="P259">0..1</text:p>
          </table:table-cell>
          <table:table-cell table:style-name="Taula17.A3" office:value-type="string">
            <text:p text:style-name="P356">6<text:span text:style-name="T249">4</text:span></text:p>
          </table:table-cell>
          <table:table-cell table:style-name="Taula17.E43" office:value-type="string">
            <text:p text:style-name="P273">Codi <text:span text:style-name="T334">SIA </text:span>de<text:span text:style-name="T334">l servei</text:span>.</text:p>
          </table:table-cell>
        </table:table-row>
        <table:table-row table:style-name="TableLine628124960">
          <table:table-cell table:style-name="Taula17.A3" office:value-type="string">
            <text:p text:style-name="P254">presencial</text:p>
          </table:table-cell>
          <table:table-cell table:style-name="Taula17.A3" office:value-type="string">
            <text:p text:style-name="P254">Boolea</text:p>
          </table:table-cell>
          <table:table-cell table:style-name="Taula17.A3" office:value-type="string">
            <text:p text:style-name="P255">0..1</text:p>
          </table:table-cell>
          <table:table-cell table:style-name="Taula17.A3" office:value-type="string">
            <text:p text:style-name="P284"/>
          </table:table-cell>
          <table:table-cell table:style-name="Taula17.E44" office:value-type="string">
            <text:p text:style-name="P254">Paràmetre booleà per indicar si el registre és prensencial</text:p>
          </table:table-cell>
        </table:table-row>
      </table:table>
      <text:p text:style-name="P248"/>
      <text:p text:style-name="P246"/>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628190048">
          <table:table-cell table:style-name="Taula18.A1" table:number-columns-spanned="5" office:value-type="string">
            <text:p text:style-name="P139">Registre<text:span text:style-name="T103">Annex</text:span> </text:p>
          </table:table-cell>
          <table:covered-table-cell/>
          <table:covered-table-cell/>
          <table:covered-table-cell/>
          <table:covered-table-cell/>
        </table:table-row>
        <table:table-row table:style-name="TableLine628138496">
          <table:table-cell table:style-name="Taula18.A2" office:value-type="string">
            <text:p text:style-name="P33">Nom del camp</text:p>
          </table:table-cell>
          <table:table-cell table:style-name="Taula18.A2" office:value-type="string">
            <text:p text:style-name="P33">Tipus</text:p>
          </table:table-cell>
          <table:table-cell table:style-name="Taula18.A2" office:value-type="string">
            <text:p text:style-name="P33">Mult.</text:p>
          </table:table-cell>
          <table:table-cell table:style-name="Taula18.A2" office:value-type="string">
            <text:p text:style-name="P35">Tamany</text:p>
          </table:table-cell>
          <table:table-cell table:style-name="Taula18.E2" office:value-type="string">
            <text:p text:style-name="P35">Descripció</text:p>
          </table:table-cell>
        </table:table-row>
        <table:table-row table:style-name="TableLine628171040">
          <table:table-cell table:style-name="Taula18.A3" office:value-type="string">
            <text:p text:style-name="P285">titol</text:p>
          </table:table-cell>
          <table:table-cell table:style-name="Taula18.A3" office:value-type="string">
            <text:p text:style-name="P288">Cadena</text:p>
          </table:table-cell>
          <table:table-cell table:style-name="Taula18.A3" office:value-type="string">
            <text:p text:style-name="P289">1</text:p>
          </table:table-cell>
          <table:table-cell table:style-name="Taula18.D3" office:value-type="float" office:value="200">
            <text:p text:style-name="P286">200</text:p>
          </table:table-cell>
          <table:table-cell table:style-name="Taula18.E3" office:value-type="string">
            <text:p text:style-name="P290">Títol del document</text:p>
          </table:table-cell>
        </table:table-row>
        <text:soft-page-break/>
        <table:table-row table:style-name="TableLine628137632">
          <table:table-cell table:style-name="Taula18.A3" office:value-type="string">
            <text:p text:style-name="P285">fitxerNom</text:p>
          </table:table-cell>
          <table:table-cell table:style-name="Taula18.A3" office:value-type="string">
            <text:p text:style-name="P288">Cadena</text:p>
          </table:table-cell>
          <table:table-cell table:style-name="Taula18.D3" office:value-type="float" office:value="1">
            <text:p text:style-name="P289">1</text:p>
          </table:table-cell>
          <table:table-cell table:style-name="Taula18.D3" office:value-type="float" office:value="256">
            <text:p text:style-name="P358">2<text:span text:style-name="T250">56</text:span></text:p>
          </table:table-cell>
          <table:table-cell table:style-name="Taula18.E4" office:value-type="string">
            <text:p text:style-name="P290">Nom del fitxer annexat</text:p>
          </table:table-cell>
        </table:table-row>
        <table:table-row table:style-name="TableLine628186304">
          <table:table-cell table:style-name="Taula18.A3" office:value-type="string">
            <text:p text:style-name="P285">fitxerTamany</text:p>
          </table:table-cell>
          <table:table-cell table:style-name="Taula18.A3" office:value-type="string">
            <text:p text:style-name="P286">Numèric</text:p>
          </table:table-cell>
          <table:table-cell table:style-name="Taula18.A3" office:value-type="string">
            <text:p text:style-name="P289">0..1</text:p>
          </table:table-cell>
          <table:table-cell table:style-name="Taula18.A3" office:value-type="string">
            <text:p text:style-name="P286"/>
          </table:table-cell>
          <table:table-cell table:style-name="Taula18.E5" office:value-type="string">
            <text:p text:style-name="P290">Tamany en <text:span text:style-name="T262">bytes</text:span> del fitxer annexat</text:p>
          </table:table-cell>
        </table:table-row>
        <table:table-row table:style-name="TableLine628185728">
          <table:table-cell table:style-name="Taula18.A3" office:value-type="string">
            <text:p text:style-name="P285">fitxerTipusMime</text:p>
          </table:table-cell>
          <table:table-cell table:style-name="Taula18.A3" office:value-type="string">
            <text:p text:style-name="P288">Cadena</text:p>
          </table:table-cell>
          <table:table-cell table:style-name="Taula18.A3" office:value-type="string">
            <text:p text:style-name="P289">1</text:p>
          </table:table-cell>
          <table:table-cell table:style-name="Taula18.A3" office:value-type="string">
            <text:p text:style-name="P358">3<text:span text:style-name="T250">0</text:span></text:p>
          </table:table-cell>
          <table:table-cell table:style-name="Taula18.E6" office:value-type="string">
            <text:p text:style-name="P290">Tipus MIME del fitxer annexat</text:p>
          </table:table-cell>
        </table:table-row>
        <table:table-row table:style-name="TableLine628133024">
          <table:table-cell table:style-name="Taula18.A3" office:value-type="string">
            <text:p text:style-name="P285">fitxerArxiuUuid</text:p>
          </table:table-cell>
          <table:table-cell table:style-name="Taula18.A3" office:value-type="string">
            <text:p text:style-name="P288">Cadena</text:p>
          </table:table-cell>
          <table:table-cell table:style-name="Taula18.A3" office:value-type="string">
            <text:p text:style-name="P289">0..1</text:p>
          </table:table-cell>
          <table:table-cell table:style-name="Taula18.D3" office:value-type="float" office:value="256">
            <text:p text:style-name="P358">2<text:span text:style-name="T251">56</text:span></text:p>
          </table:table-cell>
          <table:table-cell table:style-name="Taula18.E7" office:value-type="string">
            <text:p text:style-name="P290">Uuid de l’arxiu digital si s’escau</text:p>
          </table:table-cell>
        </table:table-row>
        <table:table-row table:style-name="TableLine628097600">
          <table:table-cell table:style-name="Taula18.A3" office:value-type="string">
            <text:p text:style-name="P285">fitxerContingut</text:p>
          </table:table-cell>
          <table:table-cell table:style-name="Taula18.A3" office:value-type="string">
            <text:p text:style-name="P286">Byte[]</text:p>
          </table:table-cell>
          <table:table-cell table:style-name="Taula18.A3" office:value-type="string">
            <text:p text:style-name="P289">0..1</text:p>
          </table:table-cell>
          <table:table-cell table:style-name="Taula18.A3" office:value-type="string">
            <text:p text:style-name="P286"/>
          </table:table-cell>
          <table:table-cell table:style-name="Taula18.E18" office:value-type="string">
            <text:p text:style-name="P290">Cadena de bytes que compon el contingut del fitxer annexat</text:p>
          </table:table-cell>
        </table:table-row>
        <table:table-row table:style-name="TableLine628097024">
          <table:table-cell table:style-name="Taula18.A3" office:value-type="string">
            <text:p text:style-name="P285">eniDataCaptura</text:p>
          </table:table-cell>
          <table:table-cell table:style-name="Taula18.A3" office:value-type="string">
            <text:p text:style-name="P286">Data</text:p>
          </table:table-cell>
          <table:table-cell table:style-name="Taula18.A3" office:value-type="string">
            <text:p text:style-name="P289">1</text:p>
          </table:table-cell>
          <table:table-cell table:style-name="Taula18.D3" office:value-type="float" office:value="14">
            <text:p text:style-name="P286">14</text:p>
          </table:table-cell>
          <table:table-cell table:style-name="Taula18.E18" office:value-type="string">
            <text:p text:style-name="P290">Data de captura del document</text:p>
          </table:table-cell>
        </table:table-row>
        <table:table-row table:style-name="TableLine628097312">
          <table:table-cell table:style-name="Taula18.A3" office:value-type="string">
            <text:p text:style-name="P285">eniOrigen</text:p>
          </table:table-cell>
          <table:table-cell table:style-name="Taula18.A3" office:value-type="string">
            <text:p text:style-name="P288">Cadena</text:p>
          </table:table-cell>
          <table:table-cell table:style-name="Taula18.A3" office:value-type="string">
            <text:p text:style-name="P289">1</text:p>
          </table:table-cell>
          <table:table-cell table:style-name="Taula18.D3" office:value-type="float" office:value="10">
            <text:p text:style-name="P289">1<text:span text:style-name="T251">0</text:span></text:p>
          </table:table-cell>
          <table:table-cell table:style-name="Taula18.E18" office:value-type="string">
            <text:p text:style-name="P261">Codi de la metadada origen de la NTI de document electrònic</text:p>
          </table:table-cell>
        </table:table-row>
        <table:table-row table:style-name="TableLine628147136">
          <table:table-cell table:style-name="Taula18.A3" office:value-type="string">
            <text:p text:style-name="P285">eniEstatElaboracio</text:p>
          </table:table-cell>
          <table:table-cell table:style-name="Taula18.A3" office:value-type="string">
            <text:p text:style-name="P288">Cadena</text:p>
          </table:table-cell>
          <table:table-cell table:style-name="Taula18.A3" office:value-type="string">
            <text:p text:style-name="P289">1</text:p>
          </table:table-cell>
          <table:table-cell table:style-name="Taula18.D3" office:value-type="float" office:value="4">
            <text:p text:style-name="P289">4</text:p>
          </table:table-cell>
          <table:table-cell table:style-name="Taula18.E18" office:value-type="string">
            <text:p text:style-name="P261">Codi de la metadada <text:span text:style-name="T100">estat elaboració</text:span> de la NTI de document electrònic.</text:p>
          </table:table-cell>
        </table:table-row>
        <table:table-row table:style-name="TableLine628093280">
          <table:table-cell table:style-name="Taula18.A3" office:value-type="string">
            <text:p text:style-name="P285">eniTipusDocumental</text:p>
          </table:table-cell>
          <table:table-cell table:style-name="Taula18.A3" office:value-type="string">
            <text:p text:style-name="P288">Cadena</text:p>
          </table:table-cell>
          <table:table-cell table:style-name="Taula18.A3" office:value-type="string">
            <text:p text:style-name="P289">1</text:p>
          </table:table-cell>
          <table:table-cell table:style-name="Taula18.D3" office:value-type="float" office:value="255">
            <text:p text:style-name="P359">2<text:span text:style-name="T252">55</text:span></text:p>
          </table:table-cell>
          <table:table-cell table:style-name="Taula18.E18" office:value-type="string">
            <text:p text:style-name="P261">Codi de la metadada tipus documental de la NTI de document electrònic.</text:p>
          </table:table-cell>
        </table:table-row>
        <table:table-row table:style-name="TableLine628174208">
          <table:table-cell table:style-name="Taula18.A3" office:value-type="string">
            <text:p text:style-name="P285">sicresTipusDocument</text:p>
          </table:table-cell>
          <table:table-cell table:style-name="Taula18.A3" office:value-type="string">
            <text:p text:style-name="P288">Cadena</text:p>
          </table:table-cell>
          <table:table-cell table:style-name="Taula18.A3" office:value-type="string">
            <text:p text:style-name="P289">0..1</text:p>
          </table:table-cell>
          <table:table-cell table:style-name="Taula18.D3" office:value-type="float" office:value="2">
            <text:p text:style-name="P289">2</text:p>
          </table:table-cell>
          <table:table-cell table:style-name="Taula18.E18" office:value-type="string">
            <text:p text:style-name="P261">Codi SICRES del segment Anexo – tipo de documento</text:p>
          </table:table-cell>
        </table:table-row>
        <table:table-row table:style-name="TableLine628184000">
          <table:table-cell table:style-name="Taula18.A3" office:value-type="string">
            <text:p text:style-name="P285">localitzacio</text:p>
          </table:table-cell>
          <table:table-cell table:style-name="Taula18.A3" office:value-type="string">
            <text:p text:style-name="P288">Cadena</text:p>
          </table:table-cell>
          <table:table-cell table:style-name="Taula18.A3" office:value-type="string">
            <text:p text:style-name="P289">0..1</text:p>
          </table:table-cell>
          <table:table-cell table:style-name="Taula18.D3" office:value-type="float" office:value="80">
            <text:p text:style-name="P289">80</text:p>
          </table:table-cell>
          <table:table-cell table:style-name="Taula18.E18" office:value-type="string">
            <text:p text:style-name="P261"/>
          </table:table-cell>
        </table:table-row>
        <table:table-row table:style-name="TableLine628173920">
          <table:table-cell table:style-name="Taula18.A3" office:value-type="string">
            <text:p text:style-name="P292">metaDades</text:p>
          </table:table-cell>
          <table:table-cell table:style-name="Taula18.A3" office:value-type="string">
            <text:p text:style-name="P293">MetaDades</text:p>
          </table:table-cell>
          <table:table-cell table:style-name="Taula18.A3" office:value-type="string">
            <text:p text:style-name="P293">0..1</text:p>
          </table:table-cell>
          <table:table-cell table:style-name="Taula18.D3">
            <text:p text:style-name="P289"/>
          </table:table-cell>
          <table:table-cell table:style-name="Taula18.E18" office:value-type="string">
            <text:p text:style-name="P292">Camp MetaDada amb entrades de tipus codi i valor per metadades addicionals.</text:p>
          </table:table-cell>
        </table:table-row>
        <table:table-row table:style-name="TableLine628173344">
          <table:table-cell table:style-name="Taula18.A3" office:value-type="string">
            <text:p text:style-name="P285">observacions</text:p>
          </table:table-cell>
          <table:table-cell table:style-name="Taula18.A3" office:value-type="string">
            <text:p text:style-name="P288">Cadena</text:p>
          </table:table-cell>
          <table:table-cell table:style-name="Taula18.A3" office:value-type="string">
            <text:p text:style-name="P289">0..1</text:p>
          </table:table-cell>
          <table:table-cell table:style-name="Taula18.D3" office:value-type="float" office:value="50">
            <text:p text:style-name="P289">50</text:p>
          </table:table-cell>
          <table:table-cell table:style-name="Taula18.E18" office:value-type="string">
            <text:p text:style-name="P294">Observacions a destacar sobre la informació annexada</text:p>
          </table:table-cell>
        </table:table-row>
        <table:table-row table:style-name="TableLine628174496">
          <table:table-cell table:style-name="Taula18.A3" office:value-type="string">
            <text:p text:style-name="P285">firmes</text:p>
          </table:table-cell>
          <table:table-cell table:style-name="Taula18.A3" office:value-type="string">
            <text:p text:style-name="P286">Firma</text:p>
          </table:table-cell>
          <table:table-cell table:style-name="Taula18.A3" office:value-type="string">
            <text:p text:style-name="P289">0..1</text:p>
          </table:table-cell>
          <table:table-cell table:style-name="Taula18.A3" office:value-type="string">
            <text:p text:style-name="P296"/>
          </table:table-cell>
          <table:table-cell table:style-name="Taula18.E18" office:value-type="string">
            <text:p text:style-name="P294">Llista de firmes del fitxer </text:p>
          </table:table-cell>
        </table:table-row>
        <table:table-row table:style-name="TableLine628172768">
          <table:table-cell table:style-name="Taula18.A3" office:value-type="string">
            <text:p text:style-name="P285">timestamp</text:p>
          </table:table-cell>
          <table:table-cell table:style-name="Taula18.A3" office:value-type="string">
            <text:p text:style-name="P288">Cadena</text:p>
          </table:table-cell>
          <table:table-cell table:style-name="Taula18.A3" office:value-type="string">
            <text:p text:style-name="P289">0..1</text:p>
          </table:table-cell>
          <table:table-cell table:style-name="Taula18.D3" office:value-type="float" office:value="100">
            <text:p text:style-name="P289">100</text:p>
          </table:table-cell>
          <table:table-cell table:style-name="Taula18.E18" office:value-type="string">
            <text:p text:style-name="P261">Segell de temps del fitxer annex en base64.</text:p>
          </table:table-cell>
        </table:table-row>
        <table:table-row table:style-name="TableLine628166720">
          <table:table-cell table:style-name="Taula18.A3" office:value-type="string">
            <text:p text:style-name="P285">validacioOCSP</text:p>
          </table:table-cell>
          <table:table-cell table:style-name="Taula18.A3" office:value-type="string">
            <text:p text:style-name="P288">Cadena</text:p>
          </table:table-cell>
          <table:table-cell table:style-name="Taula18.A3" office:value-type="string">
            <text:p text:style-name="P289">0..1</text:p>
          </table:table-cell>
          <table:table-cell table:style-name="Taula18.D3" office:value-type="float" office:value="255">
            <text:p text:style-name="P359">2<text:span text:style-name="T253">55</text:span></text:p>
          </table:table-cell>
          <table:table-cell table:style-name="Taula18.E19" office:value-type="string">
            <text:p text:style-name="P261">Validació OCSP del certificat emprat per signar en base64.</text:p>
          </table:table-cell>
        </table:table-row>
      </table:table>
      <text:p text:style-name="P245"/>
      <text:p text:style-name="P248"/>
      <text:p text:style-name="P246"/>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628147424">
          <table:table-cell table:style-name="Taula19.A1" table:number-columns-spanned="5" office:value-type="string">
            <text:p text:style-name="P139">Registre<text:span text:style-name="T103">Firma</text:span> </text:p>
          </table:table-cell>
          <table:covered-table-cell/>
          <table:covered-table-cell/>
          <table:covered-table-cell/>
          <table:covered-table-cell/>
        </table:table-row>
        <table:table-row table:style-name="TableLine628135616">
          <table:table-cell table:style-name="Taula19.A2" office:value-type="string">
            <text:p text:style-name="P33">Nom del camp</text:p>
          </table:table-cell>
          <table:table-cell table:style-name="Taula19.A2" office:value-type="string">
            <text:p text:style-name="P33">Tipus</text:p>
          </table:table-cell>
          <table:table-cell table:style-name="Taula19.A2" office:value-type="string">
            <text:p text:style-name="P33">Mult.</text:p>
          </table:table-cell>
          <table:table-cell table:style-name="Taula19.A2" office:value-type="string">
            <text:p text:style-name="P35">Tamany</text:p>
          </table:table-cell>
          <table:table-cell table:style-name="Taula19.E2" office:value-type="string">
            <text:p text:style-name="P35">Descripció</text:p>
          </table:table-cell>
        </table:table-row>
        <table:table-row table:style-name="TableLine628153472">
          <table:table-cell table:style-name="Taula19.A3" office:value-type="string">
            <text:p text:style-name="P294">tipus</text:p>
          </table:table-cell>
          <table:table-cell table:style-name="Taula19.A3" office:value-type="string">
            <text:p text:style-name="P288">Cadena</text:p>
          </table:table-cell>
          <table:table-cell table:style-name="Taula19.A3" office:value-type="string">
            <text:p text:style-name="P298">1</text:p>
          </table:table-cell>
          <table:table-cell table:style-name="Taula19.D3" office:value-type="float" office:value="30">
            <text:p text:style-name="P298">30</text:p>
          </table:table-cell>
          <table:table-cell table:style-name="Taula19.E3" office:value-type="string">
            <text:p text:style-name="P301">Codi del tipus de firma</text:p>
          </table:table-cell>
        </table:table-row>
        <table:table-row table:style-name="TableLine628126976">
          <table:table-cell table:style-name="Taula19.A3" office:value-type="string">
            <text:p text:style-name="P294">perfil</text:p>
          </table:table-cell>
          <table:table-cell table:style-name="Taula19.A3" office:value-type="string">
            <text:p text:style-name="P288">Cadena</text:p>
          </table:table-cell>
          <table:table-cell table:style-name="Taula19.A3" office:value-type="string">
            <text:p text:style-name="P298">0..1</text:p>
          </table:table-cell>
          <table:table-cell table:style-name="Taula19.D3" office:value-type="float" office:value="30">
            <text:p text:style-name="P298">30</text:p>
          </table:table-cell>
          <table:table-cell table:style-name="Taula19.E4" office:value-type="string">
            <text:p text:style-name="P301">Codi de perfil de la firma.</text:p>
          </table:table-cell>
        </table:table-row>
        <table:table-row table:style-name="TableLine628122656">
          <table:table-cell table:style-name="Taula19.A3" office:value-type="string">
            <text:p text:style-name="P294">fitxerNom</text:p>
          </table:table-cell>
          <table:table-cell table:style-name="Taula19.A3" office:value-type="string">
            <text:p text:style-name="P288">Cadena</text:p>
          </table:table-cell>
          <table:table-cell table:style-name="Taula19.A3" office:value-type="string">
            <text:p text:style-name="P289">0..1</text:p>
          </table:table-cell>
          <table:table-cell table:style-name="Taula19.A3" office:value-type="string">
            <text:p text:style-name="P360">2<text:span text:style-name="T254">56</text:span></text:p>
          </table:table-cell>
          <table:table-cell table:style-name="Taula19.E5" office:value-type="string">
            <text:p text:style-name="P299">Nom del fitxer de firma de l’annex si n’hi ha. <text:span text:style-name="T101">És obligatori si el tipus de firma és TF04.</text:span> </text:p>
          </table:table-cell>
        </table:table-row>
        <table:table-row table:style-name="TableLine628122944">
          <table:table-cell table:style-name="Taula19.A3" office:value-type="string">
            <text:p text:style-name="P294">contingut</text:p>
          </table:table-cell>
          <table:table-cell table:style-name="Taula19.A3" office:value-type="string">
            <text:p text:style-name="P296">Byte[]</text:p>
          </table:table-cell>
          <table:table-cell table:style-name="Taula19.A3" office:value-type="string">
            <text:p text:style-name="P298">0..1</text:p>
          </table:table-cell>
          <table:table-cell table:style-name="Taula19.A3" office:value-type="string">
            <text:p text:style-name="P298">var</text:p>
          </table:table-cell>
          <table:table-cell table:style-name="Taula19.E6" office:value-type="string">
            <text:p text:style-name="P299">Cadena de bytes que componen el contingut del fitxer de firma annex si n’hi ha. <text:span text:style-name="T101">És obligatori si el tipus de firma és TF04.</text:span> </text:p>
          </table:table-cell>
        </table:table-row>
        <table:table-row table:style-name="TableLine628151744">
          <table:table-cell table:style-name="Taula19.A3" office:value-type="string">
            <text:p text:style-name="P294">tipusMime</text:p>
          </table:table-cell>
          <table:table-cell table:style-name="Taula19.A3" office:value-type="string">
            <text:p text:style-name="P288">Cadena</text:p>
          </table:table-cell>
          <table:table-cell table:style-name="Taula19.A3" office:value-type="string">
            <text:p text:style-name="P289">0..1</text:p>
          </table:table-cell>
          <table:table-cell table:style-name="Taula19.D3" office:value-type="float" office:value="30">
            <text:p text:style-name="P358">3<text:span text:style-name="T254">0</text:span></text:p>
          </table:table-cell>
          <table:table-cell table:style-name="Taula19.E7" office:value-type="string">
            <text:p text:style-name="P299">Tipus MIME del fitxer de firma annexat si n’hi ha. <text:span text:style-name="T101">És obligatori si el tipus de firma és TF04.</text:span> </text:p>
          </table:table-cell>
        </table:table-row>
        <text:soft-page-break/>
        <table:table-row table:style-name="TableLine628112576">
          <table:table-cell table:style-name="Taula19.A3" office:value-type="string">
            <text:p text:style-name="P294">csv</text:p>
          </table:table-cell>
          <table:table-cell table:style-name="Taula19.A3" office:value-type="string">
            <text:p text:style-name="P288">Cadena</text:p>
          </table:table-cell>
          <table:table-cell table:style-name="Taula19.A3" office:value-type="string">
            <text:p text:style-name="P289">0..1</text:p>
          </table:table-cell>
          <table:table-cell table:style-name="Taula19.A3" office:value-type="string">
            <text:p text:style-name="P286"/>
          </table:table-cell>
          <table:table-cell table:style-name="Taula19.E8" office:value-type="string">
            <text:p text:style-name="P290">En cas de que el fitxer es signi amb CSV, contingut del CSV en base64.</text:p>
          </table:table-cell>
        </table:table-row>
        <table:table-row table:style-name="TableLine628105664">
          <table:table-cell table:style-name="Taula19.A3" office:value-type="string">
            <text:p text:style-name="P294">csvRegulacio</text:p>
          </table:table-cell>
          <table:table-cell table:style-name="Taula19.A3" office:value-type="string">
            <text:p text:style-name="P288">Cadena</text:p>
          </table:table-cell>
          <table:table-cell table:style-name="Taula19.A3" office:value-type="string">
            <text:p text:style-name="P289">1</text:p>
          </table:table-cell>
          <table:table-cell table:style-name="Taula19.D3" office:value-type="float" office:value="640">
            <text:p text:style-name="P298">640</text:p>
          </table:table-cell>
          <table:table-cell table:style-name="Taula19.E9" office:value-type="string">
            <text:p text:style-name="P299">Text de regulació CSV.</text:p>
          </table:table-cell>
        </table:table-row>
      </table:table>
      <text:p text:style-name="P245"/>
      <text:p text:style-name="P247"/>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628175072">
          <table:table-cell table:style-name="Taula20.A1" table:number-columns-spanned="5" office:value-type="string">
            <text:p text:style-name="P139">Registre<text:span text:style-name="T103">Interessat</text:span> </text:p>
          </table:table-cell>
          <table:covered-table-cell/>
          <table:covered-table-cell/>
          <table:covered-table-cell/>
          <table:covered-table-cell/>
        </table:table-row>
        <table:table-row table:style-name="TableLine681567984">
          <table:table-cell table:style-name="Taula20.A2" office:value-type="string">
            <text:p text:style-name="P33">Nom del camp</text:p>
          </table:table-cell>
          <table:table-cell table:style-name="Taula20.A2" office:value-type="string">
            <text:p text:style-name="P33">Tipus</text:p>
          </table:table-cell>
          <table:table-cell table:style-name="Taula20.A2" office:value-type="string">
            <text:p text:style-name="P33">Mult.</text:p>
          </table:table-cell>
          <table:table-cell table:style-name="Taula20.A2" office:value-type="string">
            <text:p text:style-name="P35">Tamany</text:p>
          </table:table-cell>
          <table:table-cell table:style-name="Taula20.E2" office:value-type="string">
            <text:p text:style-name="P35">Descripció</text:p>
          </table:table-cell>
        </table:table-row>
        <table:table-row table:style-name="TableLine681571440">
          <table:table-cell table:style-name="Taula20.A3" office:value-type="string">
            <text:p text:style-name="P294">tipus</text:p>
          </table:table-cell>
          <table:table-cell table:style-name="Taula20.A3" office:value-type="string">
            <text:p text:style-name="P288">Cadena</text:p>
          </table:table-cell>
          <table:table-cell table:style-name="Taula20.A3" office:value-type="string">
            <text:p text:style-name="P298">1</text:p>
          </table:table-cell>
          <table:table-cell table:style-name="Taula20.D3" office:value-type="float" office:value="19">
            <text:p text:style-name="P360">1<text:span text:style-name="T255">9</text:span></text:p>
          </table:table-cell>
          <table:table-cell table:style-name="Taula20.E3" office:value-type="string">
            <text:p text:style-name="P301">Figura jurídica de la persona <text:line-break/>'1' = Administració.</text:p>
            <text:p text:style-name="P301">'2' = Persona física.</text:p>
            <text:p text:style-name="P301">'3' = Persona jurídica.</text:p>
          </table:table-cell>
        </table:table-row>
        <table:table-row table:style-name="TableLine681459696">
          <table:table-cell table:style-name="Taula20.A3" office:value-type="string">
            <text:p text:style-name="P303">documentTipus</text:p>
          </table:table-cell>
          <table:table-cell table:style-name="Taula20.A3" office:value-type="string">
            <text:p text:style-name="P288">Cadena</text:p>
          </table:table-cell>
          <table:table-cell table:style-name="Taula20.A3" office:value-type="string">
            <text:p text:style-name="P305">0..1</text:p>
          </table:table-cell>
          <table:table-cell table:style-name="Taula20.D3" office:value-type="float" office:value="1">
            <text:p text:style-name="P361">1</text:p>
          </table:table-cell>
          <table:table-cell table:style-name="Taula20.E4" office:value-type="string">
            <text:p text:style-name="P301">Codi SICRES del segment interesado –</text:p>
            <text:p text:style-name="P301">documento de identificacion de interesado tipo.</text:p>
          </table:table-cell>
        </table:table-row>
        <table:table-row table:style-name="TableLine681471216">
          <table:table-cell table:style-name="Taula20.A3" office:value-type="string">
            <text:p text:style-name="P303">documentNum</text:p>
          </table:table-cell>
          <table:table-cell table:style-name="Taula20.A3" office:value-type="string">
            <text:p text:style-name="P288">Cadena</text:p>
          </table:table-cell>
          <table:table-cell table:style-name="Taula20.A3" office:value-type="string">
            <text:p text:style-name="P308"><text:span text:style-name="T102">0..</text:span>1</text:p>
          </table:table-cell>
          <table:table-cell table:style-name="Taula20.A3" office:value-type="string">
            <text:p text:style-name="P361">1<text:span text:style-name="T256">7</text:span></text:p>
          </table:table-cell>
          <table:table-cell table:style-name="Taula20.E5" office:value-type="string">
            <text:p text:style-name="P306">Número de document identificatiu.</text:p>
          </table:table-cell>
        </table:table-row>
        <table:table-row table:style-name="TableLine681461712">
          <table:table-cell table:style-name="Taula20.A3" office:value-type="string">
            <text:p text:style-name="P303">nom</text:p>
          </table:table-cell>
          <table:table-cell table:style-name="Taula20.A3" office:value-type="string">
            <text:p text:style-name="P296">Cadena</text:p>
          </table:table-cell>
          <table:table-cell table:style-name="Taula20.A3" office:value-type="string">
            <text:p text:style-name="P305">C</text:p>
          </table:table-cell>
          <table:table-cell table:style-name="Taula20.A3" office:value-type="string">
            <text:p text:style-name="P361">2<text:span text:style-name="T256">55</text:span></text:p>
          </table:table-cell>
          <table:table-cell table:style-name="Taula20.E6" office:value-type="string">
            <text:p text:style-name="P309">Nom de l’interessat. Obligatori si és una persona física.</text:p>
          </table:table-cell>
        </table:table-row>
        <table:table-row table:style-name="TableLine681462576">
          <table:table-cell table:style-name="Taula20.A3" office:value-type="string">
            <text:p text:style-name="P303">llinatge1</text:p>
          </table:table-cell>
          <table:table-cell table:style-name="Taula20.A3" office:value-type="string">
            <text:p text:style-name="P288">Cadena</text:p>
          </table:table-cell>
          <table:table-cell table:style-name="Taula20.A3" office:value-type="string">
            <text:p text:style-name="P305">C</text:p>
          </table:table-cell>
          <table:table-cell table:style-name="Taula20.D3" office:value-type="float" office:value="255">
            <text:p text:style-name="P361">2<text:span text:style-name="T256">55</text:span></text:p>
          </table:table-cell>
          <table:table-cell table:style-name="Taula20.E7" office:value-type="string">
            <text:p text:style-name="P309">Primer llinatge de l’interessat. Obligatori si és una persona física.</text:p>
          </table:table-cell>
        </table:table-row>
        <table:table-row table:style-name="TableLine681486480">
          <table:table-cell table:style-name="Taula20.A3" office:value-type="string">
            <text:p text:style-name="P303">llinatge2</text:p>
          </table:table-cell>
          <table:table-cell table:style-name="Taula20.A3" office:value-type="string">
            <text:p text:style-name="P288">Cadena</text:p>
          </table:table-cell>
          <table:table-cell table:style-name="Taula20.A3" office:value-type="string">
            <text:p text:style-name="P305">0..1</text:p>
          </table:table-cell>
          <table:table-cell table:style-name="Taula20.A3" office:value-type="string">
            <text:p text:style-name="P361">2<text:span text:style-name="T256">55</text:span></text:p>
          </table:table-cell>
          <table:table-cell table:style-name="Taula20.E8" office:value-type="string">
            <text:p text:style-name="P309">Segon llinatge de l’interessat</text:p>
          </table:table-cell>
        </table:table-row>
        <table:table-row table:style-name="TableLine681503472">
          <table:table-cell table:style-name="Taula20.A3" office:value-type="string">
            <text:p text:style-name="P303">raoSocial</text:p>
          </table:table-cell>
          <table:table-cell table:style-name="Taula20.A3" office:value-type="string">
            <text:p text:style-name="P288">Cadena</text:p>
          </table:table-cell>
          <table:table-cell table:style-name="Taula20.A3" office:value-type="string">
            <text:p text:style-name="P305">C</text:p>
          </table:table-cell>
          <table:table-cell table:style-name="Taula20.D3" office:value-type="float" office:value="2000">
            <text:p text:style-name="P361">2<text:span text:style-name="T257">000</text:span></text:p>
          </table:table-cell>
          <table:table-cell table:style-name="Taula20.E21" office:value-type="string">
            <text:p text:style-name="P309">Raó social de l’interessat. Obligatori si és una persona jurídica.</text:p>
          </table:table-cell>
        </table:table-row>
        <table:table-row table:style-name="TableLine681466896">
          <table:table-cell table:style-name="Taula20.A3" office:value-type="string">
            <text:p text:style-name="P303">pais</text:p>
          </table:table-cell>
          <table:table-cell table:style-name="Taula20.A3" office:value-type="string">
            <text:p text:style-name="P288">Cadena</text:p>
          </table:table-cell>
          <table:table-cell table:style-name="Taula20.A3" office:value-type="string">
            <text:p text:style-name="P305">C</text:p>
          </table:table-cell>
          <table:table-cell table:style-name="Taula20.D3" office:value-type="float" office:value="100">
            <text:p text:style-name="P361">1<text:span text:style-name="T258">00</text:span></text:p>
          </table:table-cell>
          <table:table-cell table:style-name="Taula20.E21" office:value-type="string">
            <text:p text:style-name="P299">Codi ISO numèric del País de la persona.</text:p>
          </table:table-cell>
        </table:table-row>
        <table:table-row table:style-name="TableLine681470064">
          <table:table-cell table:style-name="Taula20.A3" office:value-type="string">
            <text:p text:style-name="P303">provincia</text:p>
          </table:table-cell>
          <table:table-cell table:style-name="Taula20.A3" office:value-type="string">
            <text:p text:style-name="P288">Cadena</text:p>
          </table:table-cell>
          <table:table-cell table:style-name="Taula20.A3" office:value-type="string">
            <text:p text:style-name="P305">C</text:p>
          </table:table-cell>
          <table:table-cell table:style-name="Taula20.D3" office:value-type="float" office:value="100">
            <text:p text:style-name="P361">1<text:span text:style-name="T259">00</text:span></text:p>
          </table:table-cell>
          <table:table-cell table:style-name="Taula20.E21" office:value-type="string">
            <text:p text:style-name="P299">Codi INE de la província de la persona.</text:p>
          </table:table-cell>
        </table:table-row>
        <table:table-row table:style-name="TableLine681468624">
          <table:table-cell table:style-name="Taula20.A3" office:value-type="string">
            <text:p text:style-name="P303">municipi</text:p>
          </table:table-cell>
          <table:table-cell table:style-name="Taula20.A3" office:value-type="string">
            <text:p text:style-name="P288">Cadena</text:p>
          </table:table-cell>
          <table:table-cell table:style-name="Taula20.A3" office:value-type="string">
            <text:p text:style-name="P305">C</text:p>
          </table:table-cell>
          <table:table-cell table:style-name="Taula20.D3" office:value-type="float" office:value="100">
            <text:p text:style-name="P305">100</text:p>
          </table:table-cell>
          <table:table-cell table:style-name="Taula20.E21" office:value-type="string">
            <text:p text:style-name="P299">Codi del Municipi de la persona.</text:p>
          </table:table-cell>
        </table:table-row>
        <table:table-row table:style-name="TableLine681465168">
          <table:table-cell table:style-name="Taula20.A3" office:value-type="string">
            <text:p text:style-name="P303">adresa</text:p>
          </table:table-cell>
          <table:table-cell table:style-name="Taula20.A3" office:value-type="string">
            <text:p text:style-name="P288">Cadena</text:p>
          </table:table-cell>
          <table:table-cell table:style-name="Taula20.A3" office:value-type="string">
            <text:p text:style-name="P305">C</text:p>
          </table:table-cell>
          <table:table-cell table:style-name="Taula20.D3" office:value-type="float" office:value="160">
            <text:p text:style-name="P361">1<text:span text:style-name="T260">60</text:span></text:p>
          </table:table-cell>
          <table:table-cell table:style-name="Taula20.E21" office:value-type="string">
            <text:p text:style-name="P309">Adreça postal de l’interessat.</text:p>
          </table:table-cell>
        </table:table-row>
        <table:table-row table:style-name="TableLine681469200">
          <table:table-cell table:style-name="Taula20.A3" office:value-type="string">
            <text:p text:style-name="P303">codiPostal</text:p>
          </table:table-cell>
          <table:table-cell table:style-name="Taula20.A3" office:value-type="string">
            <text:p text:style-name="P288">Cadena</text:p>
          </table:table-cell>
          <table:table-cell table:style-name="Taula20.A3" office:value-type="string">
            <text:p text:style-name="P305">C</text:p>
          </table:table-cell>
          <table:table-cell table:style-name="Taula20.D3" office:value-type="float" office:value="5">
            <text:p text:style-name="P361">5</text:p>
          </table:table-cell>
          <table:table-cell table:style-name="Taula20.E21" office:value-type="string">
            <text:p text:style-name="P299"/>
          </table:table-cell>
        </table:table-row>
        <table:table-row table:style-name="TableLine681476976">
          <table:table-cell table:style-name="Taula20.A3" office:value-type="string">
            <text:p text:style-name="P303">email</text:p>
          </table:table-cell>
          <table:table-cell table:style-name="Taula20.A3" office:value-type="string">
            <text:p text:style-name="P288">Cadena</text:p>
          </table:table-cell>
          <table:table-cell table:style-name="Taula20.A3" office:value-type="string">
            <text:p text:style-name="P305">0..1</text:p>
          </table:table-cell>
          <table:table-cell table:style-name="Taula20.D3" office:value-type="float" office:value="160">
            <text:p text:style-name="P361">1<text:span text:style-name="T261">60</text:span></text:p>
          </table:table-cell>
          <table:table-cell table:style-name="Taula20.E21" office:value-type="string">
            <text:p text:style-name="P299"/>
          </table:table-cell>
        </table:table-row>
        <table:table-row table:style-name="TableLine681493968">
          <table:table-cell table:style-name="Taula20.A3" office:value-type="string">
            <text:p text:style-name="P303">telefon</text:p>
          </table:table-cell>
          <table:table-cell table:style-name="Taula20.A3" office:value-type="string">
            <text:p text:style-name="P288">Cadena</text:p>
          </table:table-cell>
          <table:table-cell table:style-name="Taula20.A3" office:value-type="string">
            <text:p text:style-name="P305">0..1</text:p>
          </table:table-cell>
          <table:table-cell table:style-name="Taula20.D3" office:value-type="float" office:value="20">
            <text:p text:style-name="P361">2<text:span text:style-name="T261">0</text:span></text:p>
          </table:table-cell>
          <table:table-cell table:style-name="Taula20.E21" office:value-type="string">
            <text:p text:style-name="P299"/>
          </table:table-cell>
        </table:table-row>
        <table:table-row table:style-name="TableLine681477264">
          <table:table-cell table:style-name="Taula20.A3" office:value-type="string">
            <text:p text:style-name="P303">emailHabilitat</text:p>
          </table:table-cell>
          <table:table-cell table:style-name="Taula20.A3" office:value-type="string">
            <text:p text:style-name="P288">Cadena</text:p>
          </table:table-cell>
          <table:table-cell table:style-name="Taula20.A3" office:value-type="string">
            <text:p text:style-name="P305">0..1</text:p>
          </table:table-cell>
          <table:table-cell table:style-name="Taula20.D3" office:value-type="float" office:value="160">
            <text:p text:style-name="P361">1<text:span text:style-name="T261">60</text:span></text:p>
          </table:table-cell>
          <table:table-cell table:style-name="Taula20.E21" office:value-type="string">
            <text:p text:style-name="P299">En cas de disposar d'adreça electrònica habilitada.</text:p>
          </table:table-cell>
        </table:table-row>
        <table:table-row table:style-name="TableLine681476688">
          <table:table-cell table:style-name="Taula20.A3" office:value-type="string">
            <text:p text:style-name="P303">canalPreferent</text:p>
          </table:table-cell>
          <table:table-cell table:style-name="Taula20.A3" office:value-type="string">
            <text:p text:style-name="P288">Cadena</text:p>
          </table:table-cell>
          <table:table-cell table:style-name="Taula20.A3" office:value-type="string">
            <text:p text:style-name="P305">0..1</text:p>
          </table:table-cell>
          <table:table-cell table:style-name="Taula20.D3" office:value-type="float" office:value="2">
            <text:p text:style-name="P361">2</text:p>
          </table:table-cell>
          <table:table-cell table:style-name="Taula20.E21" office:value-type="string">
            <text:p text:style-name="P299">Codi SICRES del segment interesado – canal</text:p>
            <text:p text:style-name="P299">preferente de notificación del interesado.</text:p>
          </table:table-cell>
        </table:table-row>
        <table:table-row table:style-name="TableLine681489648">
          <table:table-cell table:style-name="Taula20.A3" office:value-type="string">
            <text:p text:style-name="P311">codiDire</text:p>
          </table:table-cell>
          <table:table-cell table:style-name="Taula20.A3" office:value-type="string">
            <text:p text:style-name="P312">cadena</text:p>
          </table:table-cell>
          <table:table-cell table:style-name="Taula20.A3" office:value-type="string">
            <text:p text:style-name="P312">0..1</text:p>
          </table:table-cell>
          <table:table-cell table:style-name="Taula20.D3" office:value-type="float" office:value="20">
            <text:p text:style-name="P312">20</text:p>
          </table:table-cell>
          <table:table-cell table:style-name="Taula20.E21" office:value-type="string">
            <text:p text:style-name="P311">Codi DIRe de l'interessat.</text:p>
          </table:table-cell>
        </table:table-row>
        <table:table-row table:style-name="TableLine681491376">
          <table:table-cell table:style-name="Taula20.A3" office:value-type="string">
            <text:p text:style-name="P303">observacions</text:p>
          </table:table-cell>
          <table:table-cell table:style-name="Taula20.A3" office:value-type="string">
            <text:p text:style-name="P288">Cadena</text:p>
          </table:table-cell>
          <table:table-cell table:style-name="Taula20.A3" office:value-type="string">
            <text:p text:style-name="P305">0..1</text:p>
          </table:table-cell>
          <table:table-cell table:style-name="Taula20.D3" office:value-type="float" office:value="160">
            <text:p text:style-name="P361">1<text:span text:style-name="T261">60</text:span></text:p>
          </table:table-cell>
          <table:table-cell table:style-name="Taula20.E21" office:value-type="string">
            <text:p text:style-name="P299"/>
          </table:table-cell>
        </table:table-row>
        <table:table-row table:style-name="TableLine681492240">
          <table:table-cell table:style-name="Taula20.A3" office:value-type="string">
            <text:p text:style-name="P303">representant</text:p>
          </table:table-cell>
          <table:table-cell table:style-name="Taula20.A3" office:value-type="string">
            <text:p text:style-name="P304">RegistreInteressat</text:p>
          </table:table-cell>
          <table:table-cell table:style-name="Taula20.A3" office:value-type="string">
            <text:p text:style-name="P305">0..1</text:p>
          </table:table-cell>
          <table:table-cell table:style-name="Taula20.A3" office:value-type="string">
            <text:p text:style-name="P305"/>
          </table:table-cell>
          <table:table-cell table:style-name="Taula20.E21" office:value-type="string">
            <text:p text:style-name="P313">Interessat que actua de representant de l’actual.</text:p>
          </table:table-cell>
        </table:table-row>
        <table:table-row table:style-name="TableLine681491952">
          <table:table-cell table:style-name="Taula20.A3" office:value-type="string">
            <text:p text:style-name="P303">representat</text:p>
          </table:table-cell>
          <table:table-cell table:style-name="Taula20.A3" office:value-type="string">
            <text:p text:style-name="P304">RegistreInteressat</text:p>
          </table:table-cell>
          <table:table-cell table:style-name="Taula20.A3" office:value-type="string">
            <text:p text:style-name="P305">0..1</text:p>
          </table:table-cell>
          <table:table-cell table:style-name="Taula20.A3" office:value-type="string">
            <text:p text:style-name="P305"/>
          </table:table-cell>
          <table:table-cell table:style-name="Taula20.E22" office:value-type="string">
            <text:p text:style-name="P313">Interessat que actua com a representat per l’actual.</text:p>
          </table:table-cell>
        </table:table-row>
      </table:table>
      <text:p text:style-name="P245"><text:soft-page-break/></text:p>
      <text:list xml:id="list155549792591260" text:continue-numbering="true" text:style-name="Outline">
        <text:list-item>
          <text:list>
            <text:list-item>
              <text:h text:style-name="P402" text:outline-level="2"><text:bookmark-start text:name="__RefHeading___Toc227355_390838441"/><text:bookmark-start text:name="Còpia de __RefHeading___Toc16776_2313926538 1"/>Utilització del servei<text:bookmark-end text:name="__RefHeading___Toc227355_390838441"/><text:bookmark-end text:name="Còpia de __RefHeading___Toc16776_2313926538 1"/></text:h>
            </text:list-item>
          </text:list>
        </text:list-item>
      </text:list>
      <text:p text:style-name="P234">Aquest servei disposa d’un client que facilita la seva utilització.</text:p>
      <text:p text:style-name="P234">Per a fer ús d’aquest client en una aplicació Java es pot utilitzar la següent dependència Maven:</text:p>
      <text:p text:style-name="P384"/>
      <text:p text:style-name="P243"><text:span text:style-name="T28"><text:s/><text:tab/> </text:span><text:span text:style-name="T15">&lt;</text:span> <text:span text:style-name="T21">dependency</text:span> <text:span text:style-name="T15">&gt;</text:span> </text:p>
      <text:p text:style-name="P56"><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56"><text:span text:style-name="T28"><text:s/><text:tab/> <text:tab/> </text:span><text:span text:style-name="T15">&lt;</text:span> <text:span text:style-name="T21">artifactId</text:span> <text:span text:style-name="T15">&gt;</text:span> <text:span text:style-name="T28">distribucio-ws-client</text:span> <text:span text:style-name="T15">&lt;/</text:span> <text:span text:style-name="T21">artifactId</text:span> <text:span text:style-name="T15">&gt;</text:span> </text:p>
      <text:p text:style-name="P56"><text:span text:style-name="T28"><text:s/><text:tab/> <text:tab/> </text:span><text:span text:style-name="T15">&lt;</text:span> <text:span text:style-name="T21">version</text:span> <text:span text:style-name="T15">&gt;</text:span> <text:span text:style-name="T29">1.0.1</text:span> <text:span text:style-name="T15">&lt;/</text:span> <text:span text:style-name="T21">version</text:span> <text:span text:style-name="T15">&gt;</text:span> </text:p>
      <text:p text:style-name="P243"><text:span text:style-name="T28"><text:s/><text:tab/> </text:span><text:span text:style-name="T15">&lt;/</text:span> <text:span text:style-name="T21">dependency</text:span> <text:span text:style-name="T15">&gt;</text:span> </text:p>
      <text:p text:style-name="P243"/>
      <text:p text:style-name="P234">Per a utilitzar aquesta dependència és necessari tenir configurat el següent repository:</text:p>
      <text:p text:style-name="P386"/>
      <text:p text:style-name="P241"><text:span text:style-name="T28"><text:s/><text:tab/> </text:span><text:span text:style-name="T15">&lt;</text:span> <text:span text:style-name="T21">repository</text:span> <text:span text:style-name="T15">&gt;</text:span> </text:p>
      <text:p text:style-name="P56"><text:span text:style-name="T28"><text:s/><text:tab/> <text:tab/> </text:span><text:span text:style-name="T15">&lt;</text:span> <text:span text:style-name="T21">id</text:span> <text:span text:style-name="T15">&gt;</text:span> <text:span text:style-name="T28">github-governib-maven-repo</text:span> <text:span text:style-name="T15">&lt;/</text:span> <text:span text:style-name="T21">id</text:span> <text:span text:style-name="T15">&gt;</text:span> </text:p>
      <text:p text:style-name="P56"><text:span text:style-name="T28"><text:s/><text:tab/> <text:tab/> </text:span><text:span text:style-name="T15">&lt;</text:span> <text:span text:style-name="T21">name</text:span> <text:span text:style-name="T15">&gt;</text:span> <text:span text:style-name="T28">GitHub GovernIB Maven Repository</text:span> <text:span text:style-name="T15">&lt;/</text:span> <text:span text:style-name="T21">name</text:span> <text:span text:style-name="T15">&gt;</text:span> </text:p>
      <text:p text:style-name="P56"><text:span text:style-name="T28"><text:s/><text:tab/> <text:tab/> </text:span><text:span text:style-name="T15">&lt;</text:span> <text:span text:style-name="T21">url</text:span> <text:span text:style-name="T15">&gt;</text:span> <text:span text:style-name="T28">http://GovernIB.github.io/maven/maven/</text:span> <text:span text:style-name="T15">&lt;/</text:span> <text:span text:style-name="T21">url</text:span> <text:span text:style-name="T15">&gt;</text:span> </text:p>
      <text:p text:style-name="P241"><text:span text:style-name="T28"><text:s/><text:tab/> </text:span><text:span text:style-name="T15">&lt;/</text:span> <text:span text:style-name="T21">repository</text:span> <text:span text:style-name="T15">&gt;</text:span> </text:p>
      <text:p text:style-name="P241"/>
      <text:p text:style-name="P152"/>
      <text:p text:style-name="P234">Aquesta dependència ens dona accés a la classe BustiaV1WsClientFactory que ens permet fer cridades al servei. En el següent fragment de codi es pot veure un exemple de com utilitzar aquesta classe per a fer cridades al servei:</text:p>
      <text:p text:style-name="P106"/>
      <text:p text:style-name="P57"><text:span text:style-name="T52"><text:tab/><text:tab/>BustiaV1 </text:span><text:span text:style-name="T79">bustiaService</text:span><text:span text:style-name="T52"> = BustiaV1WsClientFactory.</text:span><text:span text:style-name="T55">getWsClient</text:span><text:span text:style-name="T52">(</text:span></text:p>
      <text:p text:style-name="P53"><text:span text:style-name="T52"><text:tab/><text:tab/><text:tab/><text:tab/></text:span><text:span text:style-name="T31">"http://DISTRIB_HOST/distribucio/ws/v1/bustia"</text:span><text:span text:style-name="T52">,</text:span></text:p>
      <text:p text:style-name="P53"><text:span text:style-name="T52"><text:tab/><text:tab/><text:tab/><text:tab/></text:span><text:span text:style-name="T31">"USERNAME"</text:span><text:span text:style-name="T52">,</text:span></text:p>
      <text:p text:style-name="P53"><text:span text:style-name="T52"><text:tab/><text:tab/><text:tab/><text:tab/></text:span><text:span text:style-name="T31">"PASSWORD"</text:span><text:span text:style-name="T52">);</text:span></text:p>
      <text:p text:style-name="P53"><text:span text:style-name="T52"><text:tab/><text:tab/>RegistreAnotacio </text:span><text:span text:style-name="T79">registreAnotacio</text:span><text:span text:style-name="T52"> = </text:span><text:span text:style-name="T45">new</text:span><text:span text:style-name="T52"> RegistreAnotacio();</text:span></text:p>
      <text:p text:style-name="P53"><text:span text:style-name="T52"><text:tab/><text:tab/></text:span><text:span text:style-name="T220">// </text:span><text:span text:style-name="T221">TODO e</text:span><text:span text:style-name="T220">mplenar dades de l'anotació de registre</text:span></text:p>
      <text:p text:style-name="P53"><text:span text:style-name="T52"><text:tab/><text:tab/></text:span><text:span text:style-name="T45">try</text:span><text:span text:style-name="T52"> {</text:span></text:p>
      <text:p text:style-name="P53"><text:span text:style-name="T52"><text:tab/><text:tab/><text:tab/></text:span><text:span text:style-name="T79">bustiaService</text:span><text:span text:style-name="T52">.enviarAnotacioRegistreEntrada(</text:span></text:p>
      <text:p text:style-name="P53"><text:span text:style-name="T52"><text:tab/><text:tab/><text:tab/><text:tab/><text:tab/></text:span><text:span text:style-name="T74">ENTITAT_CODI</text:span><text:span text:style-name="T52">,</text:span></text:p>
      <text:p text:style-name="P53"><text:span text:style-name="T52"><text:tab/><text:tab/><text:tab/><text:tab/><text:tab/></text:span><text:span text:style-name="T74">DIR3_CODI</text:span><text:span text:style-name="T52">,</text:span></text:p>
      <text:p text:style-name="P53"><text:span text:style-name="T52"><text:tab/><text:tab/><text:tab/><text:tab/><text:tab/></text:span><text:span text:style-name="T79">registreAnotacio</text:span><text:span text:style-name="T52">);</text:span></text:p>
      <text:p text:style-name="P53"><text:span text:style-name="T52"><text:tab/><text:tab/>} </text:span><text:span text:style-name="T45">catch</text:span><text:span text:style-name="T52"> (Exception </text:span><text:span text:style-name="T79">ex</text:span><text:span text:style-name="T52">) {</text:span></text:p>
      <text:p text:style-name="P53"><text:span text:style-name="T52"><text:tab/><text:tab/><text:tab/></text:span><text:span text:style-name="T220">// </text:span><text:span text:style-name="T221">TODO tractar e</text:span><text:span text:style-name="T220">rrors en l'enviament</text:span></text:p>
      <text:p text:style-name="P53"><text:span text:style-name="T52"><text:tab/><text:tab/><text:tab/></text:span><text:span text:style-name="T79">ex</text:span><text:span text:style-name="T52">.printStackTrace();</text:span></text:p>
      <text:p text:style-name="P109"><text:tab/><text:tab/>}</text:p>
      <text:p text:style-name="P109"/>
      <text:p text:style-name="P47"/>
      <text:list xml:id="list155549507605377" text:continue-numbering="true" text:style-name="Outline">
        <text:list-item>
          <text:h text:style-name="P395" text:outline-level="1"><text:bookmark-start text:name="__RefHeading___Toc52041_2521683781"/><text:bookmark-start text:name="__RefNumPara__52044_2521683781"/><text:span text:style-name="T321">Servei</text:span> d<text:span text:style-name="T321">e</text:span> backoffice de distribució<text:bookmark-end text:name="__RefHeading___Toc52041_2521683781"/><text:bookmark-end text:name="__RefNumPara__52044_2521683781"/></text:h>
        </text:list-item>
      </text:list>
      <text:p text:style-name="P230">Els backoffices son els encarregats de processar les anotacions de registre <text:span text:style-name="T319">que son notificades des de</text:span> <text:span text:style-name="T319">l</text:span>’aplicació <text:span text:style-name="T318">DISTRIBUCIÓ.</text:span></text:p>
      <text:p text:style-name="P381">Aquesta notificació es du a terme mitjançant una cridada un servei que han d’implementar de forma obligatòria tots els backoffices. <text:span text:style-name="T318">La interfície d’aquest servei és la següent:</text:span></text:p>
      <text:p text:style-name="P158"><draw:frame draw:style-name="fr8" draw:name="Còpia de Imatge4 1" text:anchor-type="as-char" svg:width="17cm" svg:height="2.288cm" draw:z-index="71"><draw:image xlink:href="Pictures/10000001000002A40000005B1334E899686238FD.png" xlink:type="simple" xlink:show="embed" xlink:actuate="onLoad" draw:mime-type="image/png"/></draw:frame><text:s text:c="5"/></text:p>
      <text:p text:style-name="P250">Aquest servei es pot implementar com un servei web REST o com un servei web SOAP.</text:p>
      <text:p text:style-name="P250">Per a la implementació REST s’ha d’habilitar una URL que rebi peticions POST a on s’informi d’una llista de les anotacions pendents. Aquesta llista es rebrà en format JSON i tendrà una estructura anàloga a la del següent exemple:</text:p>
      <text:p text:style-name="P97"/>
      <text:p text:style-name="P97">[ {</text:p>
      <text:p text:style-name="P58"><text:span text:style-name="T273">"indetificador" </text:span><text:span text:style-name="T72">: </text:span><text:span text:style-name="T274">"GOIBE1111/2022"</text:span><text:span text:style-name="T72">,</text:span></text:p>
      <text:p text:style-name="P58"><text:span text:style-name="T273">"clauAcces" </text:span><text:span text:style-name="T72">: </text:span><text:span text:style-name="T274">"hv/8hXYRSFYtVEjZyDfEE8KdOIiX3N1UEXGiltl3rbw="</text:span></text:p>
      <text:p text:style-name="P97">}, {</text:p>
      <text:p text:style-name="P58"><text:span text:style-name="T273">"indetificador" </text:span><text:span text:style-name="T72">: </text:span><text:span text:style-name="T274">"GOIBE2222/2022"</text:span><text:span text:style-name="T72">,</text:span></text:p>
      <text:p text:style-name="P249"><text:span text:style-name="T273">"clauAcces" </text:span><text:span text:style-name="T72">: </text:span><text:span text:style-name="T274">"AzRwN0QQV70RR4IxXFZsPj2FYJ2VA7LDiKap19MmA/U="</text:span></text:p>
      <text:p text:style-name="P249"><text:span text:style-name="T274">}</text:span><text:span text:style-name="T114"> ]</text:span></text:p>
      <text:p text:style-name="P249"/>
      <text:p text:style-name="P157"/>
      <text:p text:style-name="P250">Per a <text:s/>la implementació SOAP s’ha de crear un servei que compleixi amb l’estructura descrita a l’<text:span text:style-name="T320"><text:bookmark-ref text:reference-format="text" text:ref-name="__RefHeading___Toc117515_1680181998">Annex I: WSDL del backoffice </text:bookmark-ref></text:span><text:span text:style-name="T320">.</text:span></text:p>
      <text:p text:style-name="P20">En qualsevol d’aquestes implementacions l’autenticació haurà de ser de tipus HTTP Basic.</text:p>
      <text:p text:style-name="P20"/>
      <text:p text:style-name="P251"><text:span text:style-name="T12">Important:</text:span><text:span text:style-name="T11"> Les implementacions REST han de permetre una cridada amb un JSON que representa una llista buida («[]») sense produir cap error.</text:span></text:p>
      <text:p text:style-name="P20"/>
      <text:list xml:id="list155549360518364" text:continue-numbering="true" text:style-name="Outline">
        <text:list-item>
          <text:h text:style-name="P396" text:outline-level="1"><text:bookmark-start text:name="__RefNumPara__81017_1680181998"/><text:bookmark-start text:name="__RefHeading___Toc160470_1680181998"/>Servei de gestió d’anotacions pels backoffices<text:bookmark-end text:name="__RefNumPara__81017_1680181998"/><text:bookmark-end text:name="__RefHeading___Toc160470_1680181998"/></text:h>
        </text:list-item>
      </text:list>
      <text:p text:style-name="P240">Aquest servei permet <text:span text:style-name="T315">als backoffices consultar la informació d’una anotació de registre i canviar el seu estat.</text:span></text:p>
      <text:p text:style-name="P239"><draw:frame draw:style-name="fr3" draw:name="Marc1" text:anchor-type="as-char" svg:width="10.109cm" draw:z-index="72"><draw:text-box fo:min-height="8.481cm"><text:p text:style-name="P226"><draw:frame draw:style-name="fr7" draw:name="Còpia de Imatge6 1" text:anchor-type="paragraph" svg:width="10.109cm" style:rel-width="100%" svg:height="7.08cm" style:rel-height="scale" draw:z-index="73"><draw:image xlink:href="Pictures/100000010000017100000106B187299E55A52A1D.png" xlink:type="simple" xlink:show="embed" xlink:actuate="onLoad" draw:mime-type="image/png"/></draw:frame>Figura <text:span text:style-name="T107"><text:sequence text:ref-name="refFig.1" text:name="Fig." text:formula="ooow:Fig.+1" style:num-format="1">2</text:sequence></text:span>: <text:s/><text:span text:style-name="T307">Casos d'ús </text:span><text:span text:style-name="T328">de gestió </text:span><text:span text:style-name="T309">d'anotacions a </text:span><text:span text:style-name="T307">DISTRIBUCIÓ</text:span></text:p></draw:text-box></draw:frame></text:p>
      <text:list xml:id="list155551162030034" text:continue-numbering="true" text:style-name="Outline">
        <text:list-item>
          <text:list>
            <text:list-item>
              <text:h text:style-name="P407" text:outline-level="2"><text:bookmark-start text:name="__RefHeading___Toc227357_390838441"/><text:bookmark-start text:name="Còpia de __RefHeading___Toc16770_2313926538 1"/><text:span text:style-name="T315">Diagram</text:span><text:span text:style-name="T317">a</text:span><text:span text:style-name="T315"> d</text:span><text:span text:style-name="T316">e seqüència</text:span><text:bookmark-end text:name="__RefHeading___Toc227357_390838441"/><text:bookmark-end text:name="Còpia de __RefHeading___Toc16770_2313926538 1"/></text:h>
            </text:list-item>
          </text:list>
        </text:list-item>
      </text:list>
      <text:p text:style-name="P220">El <text:span text:style-name="T109">detall</text:span> de la comunicació <text:span text:style-name="T109">entre</text:span> l’aplicació DISTRIBUCIÓ <text:span text:style-name="T329">i</text:span><text:span text:style-name="T109"> el backoffice </text:span><text:span text:style-name="T329">per a la gestió de les anotacions </text:span><text:span text:style-name="T109">es pot veure en el següent diagrama.</text:span></text:p>
      <text:p text:style-name="P219"><draw:custom-shape text:anchor-type="paragraph" draw:z-index="60" draw:name="Forma 6" draw:style-name="gr1" draw:text-style-name="P457" svg:width="0.556cm" svg:height="0.454cm" svg:x="8.474cm" svg:y="2.879cm"><text:p text:style-name="P456"><text:span text:style-name="T339">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1" draw:name="Forma 7" draw:style-name="gr1" draw:text-style-name="P457" svg:width="0.556cm" svg:height="0.454cm" svg:x="7.601cm" svg:y="3.487cm"><text:p text:style-name="P456"><text:span text:style-name="T339">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 8" draw:style-name="gr1" draw:text-style-name="P457" svg:width="0.556cm" svg:height="0.454cm" svg:x="1.251cm" svg:y="1.873cm"><text:p text:style-name="P456"><text:span text:style-name="T339">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 9" draw:style-name="gr1" draw:text-style-name="P457" svg:width="0.556cm" svg:height="0.454cm" svg:x="7.442cm" svg:y="5.048cm"><text:p text:style-name="P456"><text:span text:style-name="T339">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 10" draw:style-name="gr1" draw:text-style-name="P457" svg:width="0.556cm" svg:height="0.454cm" svg:x="7.468cm" svg:y="7.165cm"><text:p text:style-name="P456"><text:span text:style-name="T339">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oft-page-break/><draw:frame draw:style-name="fr9" draw:name="Còpia de Imatge5 1" text:anchor-type="as-char" svg:width="15.901cm" svg:height="9.551cm" draw:z-index="74"><draw:image xlink:href="Pictures/10000001000002590000016909E9884BEDF01561.png" xlink:type="simple" xlink:show="embed" xlink:actuate="onLoad" draw:mime-type="image/png"/></draw:frame></text:p>
      <text:list xml:id="list1767013852" text:style-name="L2">
        <text:list-item>
          <text:p text:style-name="P441">L’aplicació de distribució comunica al backoffice <text:span text:style-name="T111">l'existència</text:span> d’anotacions de registre pendents de processar mitjançant el mètode comunicarAnotacionsPendents del servei DistribucioBackoffice.</text:p>
        </text:list-item>
        <text:list-item>
          <text:p text:style-name="P442">El backoffice <text:span text:style-name="T111">ha de </text:span>guardar en una coa la llista d’anotacions a processar i finalitzar la comunicació.</text:p>
        </text:list-item>
        <text:list-item>
          <text:p text:style-name="P444">El backoffice <text:span text:style-name="T111">ha de processar les anotacions pendents que se li han comunicat.</text:span></text:p>
        </text:list-item>
      </text:list>
      <text:p text:style-name="P216">A mesura que el backoffice vagi processant les anotacions de registre, es requer<text:span text:style-name="T111">eix</text:span> la següent comunicació amb l’aplicació de DISTRIBUCIO:</text:p>
      <text:list xml:id="list155550299138514" text:continue-numbering="true" text:style-name="L2">
        <text:list-item>
          <text:p text:style-name="P442">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42"><text:bookmark-start text:name="__RefNumPara__52573_2521683781"/>Una vegada processada l’anotació, el backoffice haurà de comunicar a l’aplicació de DISTRIBUCIO l’estat d’aquest processament mitjançant el mètode canviEstat<text:span text:style-name="T110"> del servei DistribucioBackoffice.</text:span> Els possibles estats son:<text:bookmark-end text:name="__RefNumPara__52573_2521683781"/></text:p>
        </text:list-item>
      </text:list>
      <text:list xml:id="list3273642708" text:style-name="L3">
        <text:list-item>
          <text:list>
            <text:list-item>
              <text:p text:style-name="P445">REBUDA: S'ha rebut la petició al backoffice.</text:p>
            </text:list-item>
            <text:list-item>
              <text:p text:style-name="P443">PENDENT<text:span text:style-name="T310">: L'anotació s'ha rebut i consultat correctament i està pendent de processament.</text:span></text:p>
            </text:list-item>
            <text:list-item>
              <text:p text:style-name="P445">REBUTJADA: Es comunica l'estat i el motiu a DISTRIBUCIO conforme l'anotació es rebutja des del backoffice i per a que quedi com a rebutjada i pendent de processament a DISTRIBUCIO</text:p>
            </text:list-item>
            <text:list-item>
              <text:p text:style-name="P443"><text:soft-page-break/>PROCESSADA<text:span text:style-name="T310">: L'anotació s'ha processat correctament al backoffice.</text:span></text:p>
            </text:list-item>
            <text:list-item>
              <text:p text:style-name="P443">ERROR<text:span text:style-name="T310">: El processament de l'anotació o la consulta ha resultat amb error i es comunica a DISTRIBUCIO per a que reintenti l'enviament o la marqui amb un error.</text:span></text:p>
            </text:list-item>
          </text:list>
        </text:list-item>
      </text:list>
      <text:p text:style-name="P222">Quan el backoffice rep la comunicació d'anotació pendent pot marcar l'estat <text:span text:style-name="T311">«</text:span>REBUDA<text:span text:style-name="T311">»</text:span> conforme ha rebut la petició i si no processa immediatament l'anotació pot posar que està pendent de processament amb l'estat <text:span text:style-name="T311">«</text:span>PENDENT<text:span text:style-name="T311">»</text:span>.</text:p>
      <text:p text:style-name="P216">Si el backoffice ha processat correctament l’anotació de registre l’estat indicat haurà de ser «PROCESSADA». En canvi, si l’anotació ha produït algun tipus d’error de processament, l’estat indicat haurà de ser «ERROR».<text:span text:style-name="T310"> També hi ha la possibilitat de rebutjar les anotacions amb l'estat </text:span>«<text:span text:style-name="T310">REBUTJADA</text:span>»<text:span text:style-name="T310">.</text:span></text:p>
      <text:list xml:id="list155549183302621" text:continue-list="list155551162030034" text:style-name="Outline">
        <text:list-item>
          <text:list>
            <text:list-item>
              <text:h text:style-name="P403" text:outline-level="2"><text:bookmark-start text:name="Còpia de Còpia de __RefNumPara__80988_1680181998 2 1"/><text:bookmark-start text:name="__RefHeading___Toc227359_390838441"/><text:bookmark-start text:name="Còpia de Còpia de __RefHeading___Toc16772_2313926538 2 1"/>Descripció del servei<text:bookmark-end text:name="Còpia de Còpia de __RefNumPara__80988_1680181998 2 1"/><text:bookmark-end text:name="__RefHeading___Toc227359_390838441"/><text:bookmark-end text:name="Còpia de Còpia de __RefHeading___Toc16772_2313926538 2 1"/></text:h>
              <text:list>
                <text:list-item>
                  <text:h text:style-name="Heading_20_3" text:outline-level="3"><text:bookmark-start text:name="__RefHeading___Toc53751_2521683781"/>Consulta d'una anotació <text:span text:style-name="T326">de registre</text:span><text:bookmark-end text:name="__RefHeading___Toc53751_2521683781"/></text:h>
                </text:list-item>
              </text:list>
            </text:list-item>
          </text:list>
        </text:list-item>
      </text:list>
      <text:p text:style-name="P194"/>
      <text:p text:style-name="P200">Aquest mètode és el que permet <text:span text:style-name="T283">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ext:p text:style-name="P455">Els backoffices d’integració hauran de sol·licitar la creació d’un usuari d’integració específic que disposi del rol <text:span text:style-name="Strong_20_Emphasis"><text:span text:style-name="T125">DIS_BACK</text:span></text:span>, necessari per poder accedir als serveis de consulta i canvi d’estat de les anotacions. </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371">Consulta d’una anotació de registre</text:p>
          </table:table-cell>
          <table:covered-table-cell/>
        </table:table-row>
        <table:table-row table:style-name="TableLine681498864">
          <table:table-cell table:style-name="Taula14.A8" office:value-type="string">
            <text:p text:style-name="P37">Mètode</text:p>
          </table:table-cell>
          <table:table-cell table:style-name="Taula14.B8" office:value-type="string">
            <text:p text:style-name="P208">GET</text:p>
          </table:table-cell>
        </table:table-row>
        <table:table-row table:style-name="TableLine681497136">
          <table:table-cell table:style-name="Taula14.A8" office:value-type="string">
            <text:p text:style-name="P31">URL</text:p>
          </table:table-cell>
          <table:table-cell table:style-name="Taula14.B8" office:value-type="string">
            <text:p text:style-name="P195">http<text:span text:style-name="T314">s</text:span>://<text:span text:style-name="T314">DISTRIB_HOST/distribucioapi/interna</text:span>/<text:span text:style-name="T283">backoffice</text:span>/<text:span text:style-name="T283">consulta</text:span></text:p>
          </table:table-cell>
        </table:table-row>
        <table:table-row table:style-name="TableLine681496848">
          <table:table-cell table:style-name="Taula14.A8" office:value-type="string">
            <text:p text:style-name="P30">Descripció</text:p>
          </table:table-cell>
          <table:table-cell table:style-name="Taula14.B8" office:value-type="string">
            <text:p text:style-name="P45"><text:span text:style-name="T283">Consulta les dades d'una anotació i dels seus interessats i annexos a partir de l'identificador i clau comunicada per DISTRIBUCIO</text:span>.<text:span text:style-name="T284"> </text:span></text:p>
          </table:table-cell>
        </table:table-row>
        <table:table-row table:style-name="TableLine681498000">
          <table:table-cell table:style-name="Taula14.A8" office:value-type="string">
            <text:p text:style-name="P37">Autenticació</text:p>
          </table:table-cell>
          <table:table-cell table:style-name="Taula14.B8" office:value-type="string">
            <text:p text:style-name="P369">HTTP Basic</text:p>
          </table:table-cell>
        </table:table-row>
        <table:table-row table:style-name="TableLine681495696">
          <table:table-cell table:style-name="Taula14.A8" office:value-type="string">
            <text:p text:style-name="P37">Rols requerits</text:p>
          </table:table-cell>
          <table:table-cell table:style-name="Taula14.B8" office:value-type="string">
            <text:p text:style-name="P369">DIS_BACKWS</text:p>
          </table:table-cell>
        </table:table-row>
        <table:table-row table:style-name="TableLine681496560">
          <table:table-cell table:style-name="Taula14.A8" office:value-type="string">
            <text:p text:style-name="P30">Paràmetres</text:p>
          </table:table-cell>
          <table:table-cell table:style-name="Taula14.B8" office:value-type="string">
            <text:list xml:id="list1604553357" text:style-name="L4">
              <text:list-item>
                <text:p text:style-name="P422"><text:span text:style-name="T43">identificador</text:span><text:span text:style-name="T277">:</text:span><text:span text:style-name="T284"> És l'identificador de l'anotació comunicada per DISTRIBUCIO. </text:span><text:span text:style-name="T301">Sol coincidir amb </text:span><text:span text:style-name="T284">el número de registre de l'anotació.</text:span></text:p>
              </text:list-item>
              <text:list-item>
                <text:p text:style-name="P422"><text:span text:style-name="T42">clauAcces</text:span><text:span text:style-name="T277">: </text:span><text:span text:style-name="T284">És una clau proporcionada per DISTRIBUCIO en el moment de notificar al backoffice l'anotació de registre que s'ha d'emprar per consultar o canviar l'estat </text:span><text:span text:style-name="T301">de</text:span><text:span text:style-name="T284"> l'anotació.</text:span></text:p>
              </text:list-item>
            </text:list>
            <text:p text:style-name="P45"><text:span text:style-name="T296">Com que és una petició de consulta els paràmetres s'informen en la </text:span><text:span text:style-name="T301">pròpia </text:span><text:span text:style-name="T296">URL. </text:span><text:soft-page-break/><text:span text:style-name="T284">Un exemple de petició seria el següent. </text:span><text:span text:style-name="T285">Pels paràmetres identificador: </text:span><text:span text:style-name="T287">"GOIBE715-DEV/2023"</text:span><text:span text:style-name="T285"> i clau d'accés </text:span><text:span text:style-name="T287">"JRwLmCaMES6JKAAnzhd5K9Qi4ppjudiLwd+2b5LNsVo="</text:span><text:span text:style-name="T285"> la petició amb els paràmetres codif</text:span><text:span text:style-name="T301">i</text:span><text:span text:style-name="T285">cats </text:span><text:span text:style-name="T301">és</text:span><text:span text:style-name="T285">:</text:span></text:p>
            <text:p text:style-name="P203">GET https://<text:span text:style-name="T301">se</text:span>.caib.es/distribucioapi/interna/backoffice/consulta?indetificador=GOIBE715-DEV%2F2023&amp;clauAcces=JRwLmCaMES6JKAAnzhd5K9Qi4ppjudiLwd%2B2b5LNsVo%3D</text:p>
          </table:table-cell>
        </table:table-row>
        <table:table-row table:style-name="TableLine681496272">
          <table:table-cell table:style-name="Taula14.A8" office:value-type="string">
            <text:p text:style-name="P30">Resultat</text:p>
          </table:table-cell>
          <table:table-cell table:style-name="Taula14.B8" office:value-type="string">
            <text:list xml:id="list4164259860" text:style-name="L5">
              <text:list-item>
                <text:p text:style-name="P425">HTTP 200 i el JSON del detall de l'anotació com a cos de la resposta.</text:p>
              </text:list-item>
              <text:list-item>
                <text:p text:style-name="P427">HTTP <text:span text:style-name="T290">401</text:span> <text:span text:style-name="T290">si l'usuari no té el rol DIS_BACKWS amb un missatge d'error com a cos de la resposta.</text:span></text:p>
              </text:list-item>
              <text:list-item>
                <text:p text:style-name="P430">HTTP 500 si es produe<text:span text:style-name="T301">i</text:span>x un error intern no controlat <text:span text:style-name="T290">consultant l'anotació</text:span>.</text:p>
              </text:list-item>
            </text:list>
            <text:p text:style-name="P209"><text:s/>Un exemple de JSON de resposta, de forma abreujada, seria el següent:</text:p>
            <text:p text:style-name="P209"/>
            <text:p text:style-name="P100">{</text:p>
            <text:p text:style-name="P104">    <text:span text:style-name="T293">"identificador"</text:span><text:span text:style-name="T291">: </text:span><text:span text:style-name="T286">"GOIBE715-DEV/2023"</text:span><text:span text:style-name="T291">,</text:span></text:p>
            <text:p text:style-name="P104">    <text:span text:style-name="T293">"procedimentCodi"</text:span><text:span text:style-name="T291">: </text:span><text:span text:style-name="T286">"703381"</text:span><text:span text:style-name="T291">,</text:span></text:p>
            <text:p text:style-name="P104">    <text:span text:style-name="T293">"extracte"</text:span><text:span text:style-name="T291">: </text:span><text:span text:style-name="T286">"Solicitud de equivalencia - Equivalencia con los títulos de Graduado en Educación Secundaria Obligatoria y de Bachiller"</text:span><text:span text:style-name="T291">,</text:span></text:p>
            <text:p text:style-name="P104">    <text:span text:style-name="T293">"data"</text:span><text:span text:style-name="T291">: </text:span><text:span text:style-name="T295">1683181017253</text:span><text:span text:style-name="T291">,</text:span></text:p>
            <text:p text:style-name="P101"><text:s text:c="2"/>...</text:p>
            <text:p text:style-name="P104">    <text:span text:style-name="T293">"interessats"</text:span><text:span text:style-name="T291">: [</text:span></text:p>
            <text:p text:style-name="P104">        <text:span text:style-name="T291">{</text:span></text:p>
            <text:p text:style-name="P104">            <text:span text:style-name="T293">"tipus"</text:span><text:span text:style-name="T291">: </text:span><text:span text:style-name="T286">"PERSONA_FISICA"</text:span><text:span text:style-name="T291">,</text:span></text:p>
            <text:p text:style-name="P104">            <text:span text:style-name="T293">"documentTipus"</text:span><text:span text:style-name="T291">: </text:span><text:span text:style-name="T286">"NIF"</text:span><text:span text:style-name="T291">,</text:span></text:p>
            <text:p text:style-name="P104">            <text:span text:style-name="T290">...</text:span></text:p>
            <text:p text:style-name="P104">        <text:span text:style-name="T291">}</text:span></text:p>
            <text:p text:style-name="P104">    <text:span text:style-name="T291">],</text:span></text:p>
            <text:p text:style-name="P104">    <text:span text:style-name="T293">"annexos"</text:span><text:span text:style-name="T291">: [</text:span></text:p>
            <text:p text:style-name="P104">        <text:span text:style-name="T291">{</text:span></text:p>
            <text:p text:style-name="P104">            <text:span text:style-name="T293">"titol"</text:span><text:span text:style-name="T291">: </text:span><text:span text:style-name="T286">"Formulario de identificación del firmante"</text:span><text:span text:style-name="T291">,</text:span></text:p>
            <text:p text:style-name="P104">            <text:span text:style-name="T293">"nom"</text:span><text:span text:style-name="T291">: </text:span><text:span text:style-name="T286">"FORM-1-1.pdf"</text:span><text:span text:style-name="T291">,</text:span></text:p>
            <text:p text:style-name="P104">            <text:span text:style-name="T293">"contingut"</text:span><text:span text:style-name="T291">: </text:span><text:span text:style-name="T289">null</text:span><text:span text:style-name="T291">,</text:span></text:p>
            <text:p text:style-name="P104">            <text:span text:style-name="T293">"uuid"</text:span><text:span text:style-name="T291">: </text:span><text:span text:style-name="T286">"0276698a-d0f9-44f7-84be-841a98881e4a"</text:span><text:span text:style-name="T291">,</text:span></text:p>
            <text:p text:style-name="P104">            <text:span text:style-name="T292">...</text:span></text:p>
            <text:p text:style-name="P104">            <text:span text:style-name="T293">"documentValid"</text:span><text:span text:style-name="T291">: </text:span><text:span text:style-name="T289">true</text:span><text:span text:style-name="T291">,</text:span></text:p>
            <text:p text:style-name="P104">            <text:span text:style-name="T293">"documentError"</text:span><text:span text:style-name="T291">: </text:span><text:span text:style-name="T289">null</text:span><text:span text:style-name="T291">,</text:span></text:p>
            <text:p text:style-name="P104">            <text:span text:style-name="T293">"estat"</text:span><text:span text:style-name="T291">: </text:span><text:span text:style-name="T286">"DEFINITIU"</text:span></text:p>
            <text:p text:style-name="P104">        <text:span text:style-name="T291">}</text:span></text:p>
            <text:p text:style-name="P104">    <text:span text:style-name="T291">],</text:span></text:p>
            <text:p text:style-name="P104">    <text:span text:style-name="T293">"justificantFitxerArxiuUuid"</text:span><text:span text:style-name="T291">: </text:span><text:span text:style-name="T286">"0cd70aa5-77aa-4d2e-8032-d84cad38669b"</text:span><text:span text:style-name="T291">,</text:span></text:p>
            <text:p text:style-name="P104">    <text:span text:style-name="T293">"destiCodi"</text:span><text:span text:style-name="T291">: </text:span><text:span text:style-name="T286">"A04013522"</text:span><text:span text:style-name="T291">,</text:span></text:p>
            <text:p text:style-name="P104">    <text:span text:style-name="T293">"destiDescripcio"</text:span><text:span text:style-name="T291">: </text:span><text:span text:style-name="T286">"Direcció General de Planificació, Ordenació i Centres"</text:span></text:p>
            <text:p text:style-name="P105">    <text:span text:style-name="T293">"</text:span><text:span text:style-name="T294">tramitCodi</text:span><text:span text:style-name="T293">"</text:span><text:span text:style-name="T291">: </text:span><text:span text:style-name="T286">"</text:span><text:span text:style-name="T288">1234</text:span><text:span text:style-name="T286">"</text:span></text:p>
            <text:p text:style-name="P105">    <text:span text:style-name="T293">"</text:span><text:span text:style-name="T294">tramitNom</text:span><text:span text:style-name="T293">"</text:span><text:span text:style-name="T291">: </text:span><text:span text:style-name="T286">"</text:span><text:span text:style-name="T288">Nom del tràmit</text:span><text:span text:style-name="T286">"</text:span></text:p>
            <text:p text:style-name="P102">}</text:p>
            <text:p text:style-name="P202"><text:soft-page-break/></text:p>
          </table:table-cell>
        </table:table-row>
      </table:table>
      <text:p text:style-name="P200"/>
      <text:p text:style-name="P210">El JSON de la resposta conté les dades de l'anotació, els interessats i dels annexos. És el mapeig a JSON de les classes descrites en el punt anterior del WS d'integració. </text:p>
      <text:list xml:id="list155549218542209" text:continue-list="list155549183302621" text:style-name="Outline">
        <text:list-item>
          <text:list>
            <text:list-item>
              <text:list>
                <text:list-item>
                  <text:h text:style-name="Heading_20_3" text:outline-level="3"><text:bookmark-start text:name="__RefHeading___Toc53753_2521683781"/>Canvi d'estat d'una anotació<text:bookmark-end text:name="__RefHeading___Toc53753_2521683781"/></text:h>
                </text:list-item>
              </text:list>
            </text:list-item>
          </text:list>
        </text:list-item>
      </text:list>
      <text:p text:style-name="P199"><text:span text:style-name="T296">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371">Canvi d'estat d'una anotació</text:p>
          </table:table-cell>
          <table:covered-table-cell/>
        </table:table-row>
        <table:table-row table:style-name="TableLine681498288">
          <table:table-cell table:style-name="Taula15.A2" office:value-type="string">
            <text:p text:style-name="P30">URL</text:p>
          </table:table-cell>
          <table:table-cell table:style-name="Taula15.B2" office:value-type="string">
            <text:p text:style-name="P195">http<text:span text:style-name="T314">s</text:span>://<text:span text:style-name="T314">DISTRIB_HOST/distribucioapi/interna</text:span>/<text:span text:style-name="T283">backoffice</text:span>/<text:span text:style-name="T296">canviEstat</text:span></text:p>
          </table:table-cell>
        </table:table-row>
        <table:table-row table:style-name="TableLine681503184">
          <table:table-cell table:style-name="Taula15.A7" office:value-type="string">
            <text:p text:style-name="P39">Mètode</text:p>
          </table:table-cell>
          <table:table-cell table:style-name="Taula15.B7" office:value-type="string">
            <text:p text:style-name="P211">POST</text:p>
          </table:table-cell>
        </table:table-row>
        <table:table-row table:style-name="TableLine681482160">
          <table:table-cell table:style-name="Taula15.A7" office:value-type="string">
            <text:p text:style-name="P30">Descripció</text:p>
          </table:table-cell>
          <table:table-cell table:style-name="Taula15.B7" office:value-type="string">
            <text:p text:style-name="P45">Canvia l'estat d'una anotació de registre enviada a backoffice.<text:span text:style-name="T284"> </text:span></text:p>
          </table:table-cell>
        </table:table-row>
        <table:table-row table:style-name="TableLine681481872">
          <table:table-cell table:style-name="Taula15.A7" office:value-type="string">
            <text:p text:style-name="P37">Autenticació</text:p>
          </table:table-cell>
          <table:table-cell table:style-name="Taula15.B7" office:value-type="string">
            <text:p text:style-name="P369">HTTP Basic</text:p>
          </table:table-cell>
        </table:table-row>
        <table:table-row table:style-name="TableLine681480432">
          <table:table-cell table:style-name="Taula15.A7" office:value-type="string">
            <text:p text:style-name="P37">Rols requerits</text:p>
          </table:table-cell>
          <table:table-cell table:style-name="Taula15.B7" office:value-type="string">
            <text:p text:style-name="P369">DIS_BACKWS</text:p>
          </table:table-cell>
        </table:table-row>
        <table:table-row table:style-name="TableLine681481296">
          <table:table-cell table:style-name="Taula15.A7" office:value-type="string">
            <text:p text:style-name="P30">Paràmetres</text:p>
          </table:table-cell>
          <table:table-cell table:style-name="Taula15.B7" office:value-type="string">
            <text:p text:style-name="P192"><text:s/>En aquest cas <text:span text:style-name="T297">la petició es passa com a un objecte JSON en el cos de la petició POST on s'ha d</text:span><text:span text:style-name="T302">'</text:span><text:span text:style-name="T297">especificar l'identificador amb la clau, l'estat i les observacions. Els paràmetres serien els següents:</text:span></text:p>
            <text:p text:style-name="P192"/>
            <text:list xml:id="list155549386061935" text:continue-list="list1604553357" text:style-name="L4">
              <text:list-item>
                <text:p text:style-name="P435">id:</text:p>
                <text:list>
                  <text:list-item>
                    <text:p text:style-name="P422"><text:span text:style-name="T43">identificador</text:span><text:span text:style-name="T277">:</text:span><text:span text:style-name="T284"> És l'identificador de l'anotació comunicada per DISTRIBUCIO. Típicament sol ser el número de registre de l'anotació.</text:span><text:span text:style-name="T298"> Format String, dada obligatòria.</text:span></text:p>
                  </text:list-item>
                  <text:list-item>
                    <text:p text:style-name="P422"><text:span text:style-name="T42">clauAcces</text:span><text:span text:style-name="T277">: </text:span><text:span text:style-name="T284">És una clau proporcionada per DISTRIBUCIO en el moment de notificar al backoffice l'anotació de registre que s'ha d'emprar per consultar o canviar l'estat a l'anotació</text:span><text:span text:style-name="T298">. Format String, dada o</text:span><text:span text:style-name="T302">b</text:span><text:span text:style-name="T298">li</text:span><text:span text:style-name="T302">g</text:span><text:span text:style-name="T298">atòria</text:span><text:span text:style-name="T284">.</text:span></text:p>
                  </text:list-item>
                </text:list>
              </text:list-item>
              <text:list-item>
                <text:p text:style-name="P435">estat:<text:span text:style-name="T298"> </text:span><text:span text:style-name="T210">Codi del nou estat a comunicar a DISTRIBUCIO per l'anotació. S'ha d'informar en fo</text:span><text:span text:style-name="T211">r</text:span><text:span text:style-name="T210">mat String i és una dada obligatòria. Els possibles estats són:</text:span></text:p>
                <text:list>
                  <text:list-item>
                    <text:p text:style-name="P437">REBUDA: Indica a DISTRIBUCIO que pot marcar l'anotació com a rebuda al backoffice.</text:p>
                  </text:list-item>
                  <text:list-item>
                    <text:p text:style-name="P437">PROCESSADA: <text:span text:style-name="T302">Marca l'anotació </text:span>l'anotació <text:span text:style-name="T302">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302">n</text:span>t de l'Arxiu de l'expedient del backoffice.</text:p>
                  </text:list-item>
                  <text:list-item>
                    <text:p text:style-name="P437">REBUTJADA: Marca l'anotació com a rebutjada pel backoffice. Aquesta apareixerà com a<text:span text:style-name="T302"> rebutjada pel backoffice </text:span>a DISTRIBUCIO <text:span text:style-name="T302">amb el comentari que s'hagi informat</text:span>.<text:span text:style-name="T302"> </text:span></text:p>
                  </text:list-item>
                  <text:list-item>
                    <text:p text:style-name="P437"><text:soft-page-break/>ERROR: Marca l'anotació com a processada amb error al BACKOFFICE. Aquestes anotacions apareixeran en el llistat d'anotacions pendents i pot ser que es reenviïn cap al backoffice per reintentar el processament.</text:p>
                  </text:list-item>
                </text:list>
              </text:list-item>
              <text:list-item>
                <text:p text:style-name="P435">observacions:<text:span text:style-name="T298"> </text:span><text:span text:style-name="T210">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45"/>
            <text:p text:style-name="P45"><text:span text:style-name="T284"><text:s/>Un exemple de petició seria el següent. </text:span><text:span text:style-name="T285">Pels paràmetres identificador: </text:span><text:span text:style-name="T287">"GOIBE1682590959780/2023"</text:span><text:span text:style-name="T285"> i clau d'accés </text:span><text:span text:style-name="T287">"RfG3stK7Bc7JmuOk+riod/uOnBNGUEPqZt6+1/HiTlc="</text:span><text:span text:style-name="T285"> la petició amb els paràmetres</text:span><text:span text:style-name="T297"> en el cos de la petició POST com a JSON</text:span><text:span text:style-name="T285"> seria:</text:span></text:p>
            <text:p text:style-name="P204">POST</text:p>
            <text:p text:style-name="P99">{</text:p>
            <text:p text:style-name="P103">  <text:span text:style-name="T293">"id"</text:span><text:span text:style-name="T291">: {</text:span></text:p>
            <text:p text:style-name="P103">    <text:span text:style-name="T293">"indetificador"</text:span><text:span text:style-name="T291">: </text:span><text:span text:style-name="T286">"GOIBE1682590959780/2023"</text:span><text:span text:style-name="T291">,</text:span></text:p>
            <text:p text:style-name="P103">    <text:span text:style-name="T293">"clauAcces"</text:span><text:span text:style-name="T291">: </text:span><text:span text:style-name="T286">"RfG3stK7Bc7JmuOk+riod/uOnBNGUEPqZt6+1/HiTlc="</text:span></text:p>
            <text:p text:style-name="P103">  <text:span text:style-name="T291">},</text:span></text:p>
            <text:p text:style-name="P103">  <text:span text:style-name="T293">"estat"</text:span><text:span text:style-name="T291">: </text:span><text:span text:style-name="T286">"PROCESSADA"</text:span><text:span text:style-name="T291">,</text:span></text:p>
            <text:p text:style-name="P103">  <text:span text:style-name="T293">"observacions"</text:span><text:span text:style-name="T291">: </text:span><text:span text:style-name="T286">"S'ha creat l'expedient 123/2023"</text:span></text:p>
            <text:p text:style-name="P98">}</text:p>
            <text:p text:style-name="P201"/>
          </table:table-cell>
        </table:table-row>
        <table:table-row table:style-name="TableLine681481008">
          <table:table-cell table:style-name="Taula15.A8" office:value-type="string">
            <text:p text:style-name="P30">Resultat</text:p>
          </table:table-cell>
          <table:table-cell table:style-name="Taula15.B8" office:value-type="string">
            <text:list xml:id="list1671365282" text:style-name="L6">
              <text:list-item>
                <text:p text:style-name="P426">HTTP 200 <text:span text:style-name="T299">si la petició s'ha processat correctament.</text:span></text:p>
              </text:list-item>
              <text:list-item>
                <text:p text:style-name="P431">HTTP 500 si es produeix un error intern no controlat <text:span text:style-name="T290">consultant l'anotació</text:span>.<text:span text:style-name="T299"> Com a cos de la resposta es retorna el missatge de confirmació.</text:span></text:p>
              </text:list-item>
            </text:list>
          </table:table-cell>
        </table:table-row>
      </table:table>
      <text:p text:style-name="P210"/>
      <text:list xml:id="list155550314421207" text:continue-list="list155549218542209" text:style-name="Outline">
        <text:list-item>
          <text:list>
            <text:list-item>
              <text:h text:style-name="P408" text:outline-level="2"><text:bookmark-start text:name="Còpia de Còpia de Còpia de __RefNumPara__80988_1680181998 2 1 3"/><text:bookmark-start text:name="__RefHeading___Toc227361_390838441"/><text:bookmark-start text:name="Còpia de Còpia de Còpia de __RefHeading___Toc16772_2313926538 2 1 3"/>Model de dades<text:bookmark-end text:name="Còpia de Còpia de Còpia de __RefNumPara__80988_1680181998 2 1 3"/><text:bookmark-end text:name="__RefHeading___Toc227361_390838441"/><text:bookmark-end text:name="Còpia de Còpia de Còpia de __RefHeading___Toc16772_2313926538 2 1 3"/></text:h>
            </text:list-item>
          </text:list>
        </text:list-item>
      </text:list>
      <text:p text:style-name="P221">A continuació es mostra el diagrama de classes amb els detalls de l’objecte AnotacioRegistreEntrada:</text:p>
      <text:p text:style-name="P159"><text:soft-page-break/><draw:frame draw:style-name="fr8" draw:name="Imagen2" text:anchor-type="as-char" svg:width="17cm" svg:height="8.916cm" draw:z-index="75"><draw:image xlink:href="Pictures/10000001000004D90000028BF0E68F0B66FAEA61.png" xlink:type="simple" xlink:show="embed" xlink:actuate="onLoad" draw:mime-type="image/png"/></draw:frame></text:p>
      <text:p text:style-name="P136"/>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681476400">
          <table:table-cell table:style-name="Taula4.A1" table:number-columns-spanned="5" office:value-type="string">
            <text:p text:style-name="P140">annex</text:p>
          </table:table-cell>
          <table:covered-table-cell/>
          <table:covered-table-cell/>
          <table:covered-table-cell/>
          <table:covered-table-cell/>
        </table:table-row>
        <table:table-row table:style-name="TableLine681478128">
          <table:table-cell table:style-name="Taula4.A2" office:value-type="string">
            <text:p text:style-name="P34">Nom del camp</text:p>
          </table:table-cell>
          <table:table-cell table:style-name="Taula4.A2" office:value-type="string">
            <text:p text:style-name="P34">Tipus</text:p>
          </table:table-cell>
          <table:table-cell table:style-name="Taula4.A2" office:value-type="string">
            <text:p text:style-name="P34">Mult.</text:p>
          </table:table-cell>
          <table:table-cell table:style-name="Taula4.A2" office:value-type="string">
            <text:p text:style-name="P36">Tamany</text:p>
          </table:table-cell>
          <table:table-cell table:style-name="Taula4.E2" office:value-type="string">
            <text:p text:style-name="P36">Descripció</text:p>
          </table:table-cell>
        </table:table-row>
        <table:table-row table:style-name="TableLine681476112">
          <table:table-cell table:style-name="Taula4.A3" office:value-type="string">
            <text:p text:style-name="P314">contingut</text:p>
          </table:table-cell>
          <table:table-cell table:style-name="Taula4.A3" office:value-type="string">
            <text:p text:style-name="P297">Byte[]</text:p>
          </table:table-cell>
          <table:table-cell table:style-name="Taula4.A3" office:value-type="string">
            <text:p text:style-name="P256">0..1</text:p>
          </table:table-cell>
          <table:table-cell table:style-name="Taula4.A3" office:value-type="string">
            <text:p text:style-name="P315">var</text:p>
          </table:table-cell>
          <table:table-cell table:style-name="Taula4.E3" office:value-type="string">
            <text:p text:style-name="P300">Cadena de bytes que componen el contingut del fitxer de firma annex si n’hi ha. <text:span text:style-name="T101">És obligatori si el tipus de firma és TF04.</text:span></text:p>
          </table:table-cell>
        </table:table-row>
        <table:table-row table:style-name="TableLine681485328">
          <table:table-cell table:style-name="Taula4.A3" office:value-type="string">
            <text:p text:style-name="P317">firmaContingut</text:p>
          </table:table-cell>
          <table:table-cell table:style-name="Taula4.A3" office:value-type="string">
            <text:p text:style-name="P297">Byte[]</text:p>
          </table:table-cell>
          <table:table-cell table:style-name="Taula4.A3" office:value-type="string">
            <text:p text:style-name="P256">0..1</text:p>
          </table:table-cell>
          <table:table-cell table:style-name="Taula4.A3" office:value-type="string">
            <text:p text:style-name="P362">var</text:p>
          </table:table-cell>
          <table:table-cell table:style-name="Taula4.E3" office:value-type="string">
            <text:p text:style-name="P300">Cadena de bytes que componen el contingut del fitxer de firma annex si n’hi ha. <text:span text:style-name="T101">És obligatori si el tipus de firma és TF04.</text:span> </text:p>
          </table:table-cell>
        </table:table-row>
        <table:table-row table:style-name="TableLine681489360">
          <table:table-cell table:style-name="Taula4.A3" office:value-type="string">
            <text:p text:style-name="P317">firmaNom</text:p>
          </table:table-cell>
          <table:table-cell table:style-name="Taula4.A3" office:value-type="string">
            <text:p text:style-name="P318">Cadena</text:p>
          </table:table-cell>
          <table:table-cell table:style-name="Taula4.A3" office:value-type="string">
            <text:p text:style-name="P256">0..1</text:p>
          </table:table-cell>
          <table:table-cell table:style-name="Taula4.A3" office:value-type="string">
            <text:p text:style-name="P315">256</text:p>
          </table:table-cell>
          <table:table-cell table:style-name="Taula4.E3" office:value-type="string">
            <text:p text:style-name="P264"><text:s/><text:span text:style-name="T268">Nom del fitxer de la firma de l’annex si n’hi ha. És obligatori si el tipus de firma és TF04.</text:span></text:p>
          </table:table-cell>
        </table:table-row>
        <table:table-row table:style-name="TableLine681486768">
          <table:table-cell table:style-name="Taula4.A3" office:value-type="string">
            <text:p text:style-name="P317">firmaPerfil</text:p>
          </table:table-cell>
          <table:table-cell table:style-name="Taula4.A3" office:value-type="string">
            <text:p text:style-name="P318">firmaPerfil</text:p>
          </table:table-cell>
          <table:table-cell table:style-name="Taula4.A3" office:value-type="string">
            <text:p text:style-name="P260">0..1</text:p>
          </table:table-cell>
          <table:table-cell table:style-name="Taula4.A3" office:value-type="string">
            <text:p text:style-name="P315">30</text:p>
          </table:table-cell>
          <table:table-cell table:style-name="Taula4.E3" office:value-type="string">
            <text:p text:style-name="P316">Codi de perfil de la firma. </text:p>
          </table:table-cell>
        </table:table-row>
        <table:table-row table:style-name="TableLine681487920">
          <table:table-cell table:style-name="Taula4.A3" office:value-type="string">
            <text:p text:style-name="P317">firmaTamany</text:p>
          </table:table-cell>
          <table:table-cell table:style-name="Taula4.A3" office:value-type="string">
            <text:p text:style-name="P287">Numèric</text:p>
          </table:table-cell>
          <table:table-cell table:style-name="Taula4.A3" office:value-type="string">
            <text:p text:style-name="P271"/>
          </table:table-cell>
          <table:table-cell table:style-name="Taula4.A3" office:value-type="string">
            <text:p text:style-name="P355"/>
          </table:table-cell>
          <table:table-cell table:style-name="Taula4.E3" office:value-type="string">
            <text:p text:style-name="P262"/>
          </table:table-cell>
        </table:table-row>
        <table:table-row table:style-name="TableLine681485616">
          <table:table-cell table:style-name="Taula4.A3" office:value-type="string">
            <text:p text:style-name="P317">firmaTipus</text:p>
          </table:table-cell>
          <table:table-cell table:style-name="Taula4.A3" office:value-type="string">
            <text:p text:style-name="P318">firmaTipus</text:p>
          </table:table-cell>
          <table:table-cell table:style-name="Taula4.A3" office:value-type="string">
            <text:p text:style-name="P260">0..1</text:p>
          </table:table-cell>
          <table:table-cell table:style-name="Taula4.A3" office:value-type="string">
            <text:p text:style-name="P363">30</text:p>
          </table:table-cell>
          <table:table-cell table:style-name="Taula4.E3" office:value-type="string">
            <text:p text:style-name="P319">Codi del tipus de firma. </text:p>
          </table:table-cell>
        </table:table-row>
        <table:table-row table:style-name="TableLine681485904">
          <table:table-cell table:style-name="Taula4.A3" office:value-type="string">
            <text:p text:style-name="P317">firmaTipusMime</text:p>
          </table:table-cell>
          <table:table-cell table:style-name="Taula4.A3" office:value-type="string">
            <text:p text:style-name="P272">Cadena</text:p>
          </table:table-cell>
          <table:table-cell table:style-name="Taula4.A3" office:value-type="string">
            <text:p text:style-name="P260">0..1</text:p>
          </table:table-cell>
          <table:table-cell table:style-name="Taula4.A3" office:value-type="string">
            <text:p text:style-name="P363">30</text:p>
          </table:table-cell>
          <table:table-cell table:style-name="Taula4.E3" office:value-type="string">
            <text:p text:style-name="P319">Tipus MIME del fitxer de firma annexat si n’hi ha. És obligatori si el tipus de firma és TF04.</text:p>
          </table:table-cell>
        </table:table-row>
        <table:table-row table:style-name="TableLine681486192">
          <table:table-cell table:style-name="Taula4.A3" office:value-type="string">
            <text:p text:style-name="P317">nom</text:p>
          </table:table-cell>
          <table:table-cell table:style-name="Taula4.A3" office:value-type="string">
            <text:p text:style-name="P272">Cadena</text:p>
          </table:table-cell>
          <table:table-cell table:style-name="Taula4.A3" office:value-type="string">
            <text:p text:style-name="P271"><text:span text:style-name="T263">0..</text:span>1</text:p>
          </table:table-cell>
          <table:table-cell table:style-name="Taula4.A3" office:value-type="string">
            <text:p text:style-name="P320">256</text:p>
          </table:table-cell>
          <table:table-cell table:style-name="Taula4.E3" office:value-type="string">
            <text:p text:style-name="P319">Nom del fitxer annexat. </text:p>
          </table:table-cell>
        </table:table-row>
        <table:table-row table:style-name="TableLine681485040">
          <table:table-cell table:style-name="Taula4.A3" office:value-type="string">
            <text:p text:style-name="P317">ntiEstadoElaboracion</text:p>
          </table:table-cell>
          <table:table-cell table:style-name="Taula4.A3" office:value-type="string">
            <text:p text:style-name="P318">ntiEstadoElaboracion</text:p>
          </table:table-cell>
          <table:table-cell table:style-name="Taula4.A3" office:value-type="string">
            <text:p text:style-name="P260">0..1</text:p>
          </table:table-cell>
          <table:table-cell table:style-name="Taula4.A3" office:value-type="string">
            <text:p text:style-name="P320">4</text:p>
          </table:table-cell>
          <table:table-cell table:style-name="Taula4.E3" office:value-type="string">
            <text:p text:style-name="P319">Codi de la metadata estat elaboració de la NTI de document electrònic. </text:p>
          </table:table-cell>
        </table:table-row>
        <table:table-row table:style-name="TableLine681483600">
          <table:table-cell table:style-name="Taula4.A3" office:value-type="string">
            <text:p text:style-name="P317">ntiFechaCaptura</text:p>
          </table:table-cell>
          <table:table-cell table:style-name="Taula4.A3" office:value-type="string">
            <text:p text:style-name="P318">dateTime</text:p>
          </table:table-cell>
          <table:table-cell table:style-name="Taula4.A3" office:value-type="string">
            <text:p text:style-name="P260">0..1</text:p>
          </table:table-cell>
          <table:table-cell table:style-name="Taula4.A3" office:value-type="string">
            <text:p text:style-name="P320">14</text:p>
          </table:table-cell>
          <table:table-cell table:style-name="Taula4.E3" office:value-type="string">
            <text:p text:style-name="P291">Data de captura del document.</text:p>
          </table:table-cell>
        </table:table-row>
        <table:table-row table:style-name="TableLine681484464">
          <table:table-cell table:style-name="Taula4.A3" office:value-type="string">
            <text:p text:style-name="P321">ntiOrigen</text:p>
          </table:table-cell>
          <table:table-cell table:style-name="Taula4.A3" office:value-type="string">
            <text:p text:style-name="P322">ntiOrigen</text:p>
          </table:table-cell>
          <table:table-cell table:style-name="Taula4.A3" office:value-type="string">
            <text:p text:style-name="P260">0..1</text:p>
          </table:table-cell>
          <table:table-cell table:style-name="Taula4.A3" office:value-type="string">
            <text:p text:style-name="P320">10</text:p>
          </table:table-cell>
          <table:table-cell table:style-name="Taula4.E3" office:value-type="string">
            <text:p text:style-name="P262">Codi de la metadada origen de la NTI de document electrònic.</text:p>
          </table:table-cell>
        </table:table-row>
        <table:table-row table:style-name="TableLine681484176">
          <table:table-cell table:style-name="Taula4.A3" office:value-type="string">
            <text:p text:style-name="P321">ntiTipoDocumental</text:p>
          </table:table-cell>
          <table:table-cell table:style-name="Taula4.A3" office:value-type="string">
            <text:p text:style-name="P322">ntiTipoDocumento</text:p>
          </table:table-cell>
          <table:table-cell table:style-name="Taula4.A3" office:value-type="string">
            <text:p text:style-name="P271"><text:span text:style-name="T264">0..</text:span>1</text:p>
          </table:table-cell>
          <table:table-cell table:style-name="Taula4.A3" office:value-type="string">
            <text:p text:style-name="P320">255</text:p>
          </table:table-cell>
          <table:table-cell table:style-name="Taula4.E3" office:value-type="string">
            <text:p text:style-name="P262">Codi de la metadada tipus <text:soft-page-break/>documental de la NTI de document electrònic.</text:p>
          </table:table-cell>
        </table:table-row>
        <table:table-row table:style-name="TableLine681483888">
          <table:table-cell table:style-name="Taula4.A3" office:value-type="string">
            <text:p text:style-name="P321">observacions</text:p>
          </table:table-cell>
          <table:table-cell table:style-name="Taula4.A3" office:value-type="string">
            <text:p text:style-name="P272">Cadena</text:p>
          </table:table-cell>
          <table:table-cell table:style-name="Taula4.A3" office:value-type="string">
            <text:p text:style-name="P260">0..1</text:p>
          </table:table-cell>
          <table:table-cell table:style-name="Taula4.A3" office:value-type="string">
            <text:p text:style-name="P84">50</text:p>
          </table:table-cell>
          <table:table-cell table:style-name="Taula4.E3" office:value-type="string">
            <text:p text:style-name="P295">Observacions a destacar sobre la informació annexada.</text:p>
          </table:table-cell>
        </table:table-row>
        <table:table-row table:style-name="TableLine681482736">
          <table:table-cell table:style-name="Taula4.A3" office:value-type="string">
            <text:p text:style-name="P321">sicresTipoDocumento</text:p>
          </table:table-cell>
          <table:table-cell table:style-name="Taula4.A3" office:value-type="string">
            <text:p text:style-name="P322">sicresTipoDocumento</text:p>
          </table:table-cell>
          <table:table-cell table:style-name="Taula4.A3" office:value-type="string">
            <text:p text:style-name="P271"><text:span text:style-name="T264">0..</text:span>1</text:p>
          </table:table-cell>
          <table:table-cell table:style-name="Taula4.A3" office:value-type="string">
            <text:p text:style-name="P320">2</text:p>
          </table:table-cell>
          <table:table-cell table:style-name="Taula4.E3" office:value-type="string">
            <text:p text:style-name="P262">Codi SICRES del segment Anexo – tipo de documento.</text:p>
          </table:table-cell>
        </table:table-row>
        <table:table-row table:style-name="TableLine681483312">
          <table:table-cell table:style-name="Taula4.A3" office:value-type="string">
            <text:p text:style-name="P321">sicresValidezDocumento</text:p>
          </table:table-cell>
          <table:table-cell table:style-name="Taula4.A3" office:value-type="string">
            <text:p text:style-name="P322">sicresValidezDocumento</text:p>
          </table:table-cell>
          <table:table-cell table:style-name="Taula4.A3" office:value-type="string">
            <text:p text:style-name="P271"><text:span text:style-name="T115">0..</text:span>1</text:p>
          </table:table-cell>
          <table:table-cell table:style-name="Taula4.A3" office:value-type="string">
            <text:p text:style-name="P267"/>
          </table:table-cell>
          <table:table-cell table:style-name="Taula4.E3" office:value-type="string">
            <text:p text:style-name="P274"/>
          </table:table-cell>
        </table:table-row>
        <table:table-row table:style-name="TableLine681483024">
          <table:table-cell table:style-name="Taula4.A3" office:value-type="string">
            <text:p text:style-name="P321">tamany</text:p>
          </table:table-cell>
          <table:table-cell table:style-name="Taula4.A3" office:value-type="string">
            <text:p text:style-name="P322">numèric</text:p>
          </table:table-cell>
          <table:table-cell table:style-name="Taula4.A3" office:value-type="string">
            <text:p text:style-name="P260"/>
          </table:table-cell>
          <table:table-cell table:style-name="Taula4.A3" office:value-type="string">
            <text:p text:style-name="P276"/>
          </table:table-cell>
          <table:table-cell table:style-name="Taula4.E3" office:value-type="string">
            <text:p text:style-name="P319">Tamany en bytes del fitxer annexat. </text:p>
          </table:table-cell>
        </table:table-row>
        <table:table-row table:style-name="TableLine681507216">
          <table:table-cell table:style-name="Taula4.A3" office:value-type="string">
            <text:p text:style-name="P321">tipusMime</text:p>
          </table:table-cell>
          <table:table-cell table:style-name="Taula4.A3" office:value-type="string">
            <text:p text:style-name="P272">Cadena</text:p>
          </table:table-cell>
          <table:table-cell table:style-name="Taula4.A3" office:value-type="string">
            <text:p text:style-name="P260">0..1</text:p>
          </table:table-cell>
          <table:table-cell table:style-name="Taula4.A3" office:value-type="string">
            <text:p text:style-name="P320">30</text:p>
          </table:table-cell>
          <table:table-cell table:style-name="Taula4.E3" office:value-type="string">
            <text:p text:style-name="P291">Tipus MIME del fitxer annexat.</text:p>
          </table:table-cell>
        </table:table-row>
        <table:table-row table:style-name="TableLine681512688">
          <table:table-cell table:style-name="Taula4.A3" office:value-type="string">
            <text:p text:style-name="P321">titol</text:p>
          </table:table-cell>
          <table:table-cell table:style-name="Taula4.A3" office:value-type="string">
            <text:p text:style-name="P272">Cadena</text:p>
          </table:table-cell>
          <table:table-cell table:style-name="Taula4.A3" office:value-type="string">
            <text:p text:style-name="P260">0..1</text:p>
          </table:table-cell>
          <table:table-cell table:style-name="Taula4.A3" office:value-type="string">
            <text:p text:style-name="P363">200</text:p>
          </table:table-cell>
          <table:table-cell table:style-name="Taula4.E3" office:value-type="string">
            <text:p text:style-name="P319">Títol del document. </text:p>
          </table:table-cell>
        </table:table-row>
        <table:table-row table:style-name="TableLine681512400">
          <table:table-cell table:style-name="Taula4.A3" office:value-type="string">
            <text:p text:style-name="P321">uuid</text:p>
          </table:table-cell>
          <table:table-cell table:style-name="Taula4.A3" office:value-type="string">
            <text:p text:style-name="P272">Cadena</text:p>
          </table:table-cell>
          <table:table-cell table:style-name="Taula4.A3" office:value-type="string">
            <text:p text:style-name="P260">0..1</text:p>
          </table:table-cell>
          <table:table-cell table:style-name="Taula4.A3" office:value-type="string">
            <text:p text:style-name="P320">256</text:p>
          </table:table-cell>
          <table:table-cell table:style-name="Taula4.E3" office:value-type="string">
            <text:p text:style-name="P319">Uuid de l’arxiu digital si s’escau. </text:p>
          </table:table-cell>
        </table:table-row>
      </table:table>
      <text:p text:style-name="P136"/>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681517872">
          <table:table-cell table:style-name="Taula7.A1" table:number-columns-spanned="5" office:value-type="string">
            <text:p text:style-name="P141">anotacioRegistreBase</text:p>
          </table:table-cell>
          <table:covered-table-cell/>
          <table:covered-table-cell/>
          <table:covered-table-cell/>
          <table:covered-table-cell/>
        </table:table-row>
        <table:table-row table:style-name="TableLine681530544">
          <table:table-cell table:style-name="Taula7.A2" office:value-type="string">
            <text:p text:style-name="P34">Nom del camp</text:p>
          </table:table-cell>
          <table:table-cell table:style-name="Taula7.A2" office:value-type="string">
            <text:p text:style-name="P34">Tipus</text:p>
          </table:table-cell>
          <table:table-cell table:style-name="Taula7.A2" office:value-type="string">
            <text:p text:style-name="P34">Mult.</text:p>
          </table:table-cell>
          <table:table-cell table:style-name="Taula7.A2" office:value-type="string">
            <text:p text:style-name="P36">Tamany</text:p>
          </table:table-cell>
          <table:table-cell table:style-name="Taula7.E2" office:value-type="string">
            <text:p text:style-name="P36">Descripció</text:p>
          </table:table-cell>
        </table:table-row>
        <table:table-row table:style-name="TableLine681517008">
          <table:table-cell table:style-name="Taula7.A3" office:value-type="string">
            <text:p text:style-name="P321">annexos</text:p>
          </table:table-cell>
          <table:table-cell table:style-name="Taula7.A3" office:value-type="string">
            <text:p text:style-name="P322">annex</text:p>
          </table:table-cell>
          <table:table-cell table:style-name="Taula7.A3" office:value-type="string">
            <text:p text:style-name="P256">0..*</text:p>
          </table:table-cell>
          <table:table-cell table:style-name="Taula7.D3">
            <text:p text:style-name="P256"/>
          </table:table-cell>
          <table:table-cell table:style-name="Taula7.E4" office:value-type="string">
            <text:p text:style-name="P324">Annex al que fa referència amb les seves propietats. </text:p>
          </table:table-cell>
        </table:table-row>
        <table:table-row table:style-name="TableLine681517296">
          <table:table-cell table:style-name="Taula7.A3" office:value-type="string">
            <text:p text:style-name="P321">aplicacioCodi</text:p>
          </table:table-cell>
          <table:table-cell table:style-name="Taula7.A3" office:value-type="string">
            <text:p text:style-name="P322">Cadena</text:p>
          </table:table-cell>
          <table:table-cell table:style-name="Taula7.A3" office:value-type="string">
            <text:p text:style-name="P256">0..1</text:p>
          </table:table-cell>
          <table:table-cell table:style-name="Taula7.D3" office:value-type="float" office:value="255">
            <text:p text:style-name="P364">255</text:p>
          </table:table-cell>
          <table:table-cell table:style-name="Taula7.E4" office:value-type="string">
            <text:p text:style-name="P324">Codi de l’aplicació que fa l’enviament de l’assentament registral. </text:p>
          </table:table-cell>
        </table:table-row>
        <table:table-row table:style-name="TableLine681516432">
          <table:table-cell table:style-name="Taula7.A3" office:value-type="string">
            <text:p text:style-name="P321">aplicacioVersio</text:p>
          </table:table-cell>
          <table:table-cell table:style-name="Taula7.A3" office:value-type="string">
            <text:p text:style-name="P318">Cadena</text:p>
          </table:table-cell>
          <table:table-cell table:style-name="Taula7.A3" office:value-type="string">
            <text:p text:style-name="P256">0..1</text:p>
          </table:table-cell>
          <table:table-cell table:style-name="Taula7.A3" office:value-type="string">
            <text:p text:style-name="P325">255</text:p>
          </table:table-cell>
          <table:table-cell table:style-name="Taula7.E5" office:value-type="string">
            <text:p text:style-name="P264"><text:s/><text:span text:style-name="T98">Versió de l’aplicació que fa l’enviament de l’assentament registral.</text:span></text:p>
          </table:table-cell>
        </table:table-row>
        <table:table-row table:style-name="TableLine681516144">
          <table:table-cell table:style-name="Taula7.A3" office:value-type="string">
            <text:p text:style-name="P321">assumpteCodiCodi</text:p>
          </table:table-cell>
          <table:table-cell table:style-name="Taula7.A3" office:value-type="string">
            <text:p text:style-name="P322">Cadena</text:p>
          </table:table-cell>
          <table:table-cell table:style-name="Taula7.A3" office:value-type="string">
            <text:p text:style-name="P260">0..1</text:p>
          </table:table-cell>
          <table:table-cell table:style-name="Taula7.A3" office:value-type="string">
            <text:p text:style-name="P325">16</text:p>
          </table:table-cell>
          <table:table-cell table:style-name="Taula7.E6" office:value-type="string">
            <text:p text:style-name="P274">Codi de l’ass<text:span text:style-name="T269">umpte</text:span>.</text:p>
          </table:table-cell>
        </table:table-row>
        <table:table-row table:style-name="TableLine681502608">
          <table:table-cell table:style-name="Taula7.A3" office:value-type="string">
            <text:p text:style-name="P321">assumpteCodiDescripcio</text:p>
          </table:table-cell>
          <table:table-cell table:style-name="Taula7.A3" office:value-type="string">
            <text:p text:style-name="P322">Cadena</text:p>
          </table:table-cell>
          <table:table-cell table:style-name="Taula7.A3" office:value-type="string">
            <text:p text:style-name="P323">0..1</text:p>
          </table:table-cell>
          <table:table-cell table:style-name="Taula7.A3" office:value-type="string">
            <text:p text:style-name="P364">255</text:p>
          </table:table-cell>
          <table:table-cell table:style-name="Taula7.E7" office:value-type="string">
            <text:p text:style-name="P274">Denominació de l’assumpte.</text:p>
          </table:table-cell>
        </table:table-row>
        <table:table-row table:style-name="TableLine681502320">
          <table:table-cell table:style-name="Taula7.A3" office:value-type="string">
            <text:p text:style-name="P326">assumpteTipusCodi</text:p>
          </table:table-cell>
          <table:table-cell table:style-name="Taula7.A3" office:value-type="string">
            <text:p text:style-name="P327">Cadena</text:p>
          </table:table-cell>
          <table:table-cell table:style-name="Taula7.A3" office:value-type="string">
            <text:p text:style-name="P260">0..1</text:p>
          </table:table-cell>
          <table:table-cell table:style-name="Taula7.A3" office:value-type="string">
            <text:p text:style-name="P364">16</text:p>
          </table:table-cell>
          <table:table-cell table:style-name="Taula7.E8" office:value-type="string">
            <text:p text:style-name="P324">Codi de l’assumpte. </text:p>
          </table:table-cell>
        </table:table-row>
        <table:table-row table:style-name="TableLine681500592">
          <table:table-cell table:style-name="Taula7.A3" office:value-type="string">
            <text:p text:style-name="P326">assumpteTipusDescripcio</text:p>
          </table:table-cell>
          <table:table-cell table:style-name="Taula7.A3" office:value-type="string">
            <text:p text:style-name="P272">Cadena</text:p>
          </table:table-cell>
          <table:table-cell table:style-name="Taula7.A3" office:value-type="string">
            <text:p text:style-name="P260">0..1</text:p>
          </table:table-cell>
          <table:table-cell table:style-name="Taula7.A3" office:value-type="string">
            <text:p text:style-name="P364">100</text:p>
          </table:table-cell>
          <table:table-cell table:style-name="Taula7.E9" office:value-type="string">
            <text:p text:style-name="P274">Denominació del tipus d’assumpte de l’assentament registral.</text:p>
          </table:table-cell>
        </table:table-row>
        <table:table-row table:style-name="TableLine681501456">
          <table:table-cell table:style-name="Taula7.A3" office:value-type="string">
            <text:p text:style-name="P326">data</text:p>
          </table:table-cell>
          <table:table-cell table:style-name="Taula7.A3" office:value-type="string">
            <text:p text:style-name="P327">dateTime</text:p>
          </table:table-cell>
          <table:table-cell table:style-name="Taula7.A3" office:value-type="string">
            <text:p text:style-name="P271"><text:span text:style-name="T263">0..</text:span>1</text:p>
          </table:table-cell>
          <table:table-cell table:style-name="Taula7.A3" office:value-type="string">
            <text:p text:style-name="P325">14</text:p>
          </table:table-cell>
          <table:table-cell table:style-name="Taula7.E10" office:value-type="string">
            <text:p text:style-name="P324">Data de l’assentament. </text:p>
          </table:table-cell>
        </table:table-row>
        <table:table-row table:style-name="TableLine681500880">
          <table:table-cell table:style-name="Taula7.A3" office:value-type="string">
            <text:p text:style-name="P326">docFisicaCodi</text:p>
          </table:table-cell>
          <table:table-cell table:style-name="Taula7.A3" office:value-type="string">
            <text:p text:style-name="P327">Cadena</text:p>
          </table:table-cell>
          <table:table-cell table:style-name="Taula7.A3" office:value-type="string">
            <text:p text:style-name="P260">0..1</text:p>
          </table:table-cell>
          <table:table-cell table:style-name="Taula7.A3" office:value-type="string">
            <text:p text:style-name="P325">19</text:p>
          </table:table-cell>
          <table:table-cell table:style-name="Taula7.E11" office:value-type="string">
            <text:p text:style-name="P264">Codi SICRES del segment internos – Documentación física y/o soportes.</text:p>
          </table:table-cell>
        </table:table-row>
        <table:table-row table:style-name="TableLine681553008">
          <table:table-cell table:style-name="Taula7.A3" office:value-type="string">
            <text:p text:style-name="P326">docFisicaDescripcio</text:p>
          </table:table-cell>
          <table:table-cell table:style-name="Taula7.A3" office:value-type="string">
            <text:p text:style-name="P327">Cadena</text:p>
          </table:table-cell>
          <table:table-cell table:style-name="Taula7.A3" office:value-type="string">
            <text:p text:style-name="P260">0..1</text:p>
          </table:table-cell>
          <table:table-cell table:style-name="Taula7.A3" office:value-type="string">
            <text:p text:style-name="P325">100</text:p>
          </table:table-cell>
          <table:table-cell table:style-name="Taula7.E12" office:value-type="string">
            <text:p text:style-name="P278">Descripció del segment internos – Documentación física y/o soportes.</text:p>
          </table:table-cell>
        </table:table-row>
        <table:table-row table:style-name="TableLine681504336">
          <table:table-cell table:style-name="Taula7.A3" office:value-type="string">
            <text:p text:style-name="P326">entitatCodi</text:p>
          </table:table-cell>
          <table:table-cell table:style-name="Taula7.A3" office:value-type="string">
            <text:p text:style-name="P327">Cadena</text:p>
          </table:table-cell>
          <table:table-cell table:style-name="Taula7.A3" office:value-type="string">
            <text:p text:style-name="P260">0..1</text:p>
          </table:table-cell>
          <table:table-cell table:style-name="Taula7.A3" office:value-type="string">
            <text:p text:style-name="P325">255</text:p>
          </table:table-cell>
          <table:table-cell table:style-name="Taula7.E13" office:value-type="string">
            <text:p text:style-name="P262">Codi <text:span text:style-name="T97">DIR3 </text:span>de l’entitat governamental a la que va dirigit l’assentament registral.</text:p>
          </table:table-cell>
        </table:table-row>
        <table:table-row table:style-name="TableLine681522192">
          <table:table-cell table:style-name="Taula7.A3" office:value-type="string">
            <text:p text:style-name="P326">entitatDescripcio</text:p>
          </table:table-cell>
          <table:table-cell table:style-name="Taula7.A3" office:value-type="string">
            <text:p text:style-name="P327">Cadena</text:p>
          </table:table-cell>
          <table:table-cell table:style-name="Taula7.A3" office:value-type="string">
            <text:p text:style-name="P271"><text:span text:style-name="T264">0..</text:span>1</text:p>
          </table:table-cell>
          <table:table-cell table:style-name="Taula7.A3" office:value-type="string">
            <text:p text:style-name="P329">255</text:p>
          </table:table-cell>
          <table:table-cell table:style-name="Taula7.E14" office:value-type="string">
            <text:p text:style-name="P262"><text:span text:style-name="T97">Descripció</text:span> de l’entitat governamental a la que va dirigit l’assentament registral.</text:p>
          </table:table-cell>
        </table:table-row>
        <table:table-row table:style-name="TableLine681552720">
          <table:table-cell table:style-name="Taula7.A3" office:value-type="string">
            <text:p text:style-name="P326">expedientNumero</text:p>
          </table:table-cell>
          <table:table-cell table:style-name="Taula7.A3" office:value-type="string">
            <text:p text:style-name="P272">Cadena</text:p>
          </table:table-cell>
          <table:table-cell table:style-name="Taula7.A3" office:value-type="string">
            <text:p text:style-name="P260">0..1</text:p>
          </table:table-cell>
          <table:table-cell table:style-name="Taula7.A3" office:value-type="string">
            <text:p text:style-name="P85">255</text:p>
          </table:table-cell>
          <table:table-cell table:style-name="Taula7.E15" office:value-type="string">
            <text:p text:style-name="P330">Número identificador de l’assentament registral. És únic. </text:p>
          </table:table-cell>
        </table:table-row>
        <table:table-row table:style-name="TableLine681555600">
          <table:table-cell table:style-name="Taula7.A3" office:value-type="string">
            <text:p text:style-name="P326">exposa</text:p>
          </table:table-cell>
          <table:table-cell table:style-name="Taula7.A3" office:value-type="string">
            <text:p text:style-name="P327">Cadena</text:p>
          </table:table-cell>
          <table:table-cell table:style-name="Taula7.A3" office:value-type="string">
            <text:p text:style-name="P271"><text:span text:style-name="T264">0..</text:span>1</text:p>
          </table:table-cell>
          <table:table-cell table:style-name="Taula7.A3" office:value-type="string">
            <text:p text:style-name="P329">lob</text:p>
          </table:table-cell>
          <table:table-cell table:style-name="Taula7.E16" office:value-type="string">
            <text:p text:style-name="P330">Exposició de fets. </text:p>
          </table:table-cell>
        </table:table-row>
        <table:table-row table:style-name="TableLine681538032">
          <table:table-cell table:style-name="Taula7.A3" office:value-type="string">
            <text:p text:style-name="P326">extracte</text:p>
          </table:table-cell>
          <table:table-cell table:style-name="Taula7.A3" office:value-type="string">
            <text:p text:style-name="P327">Cadena</text:p>
          </table:table-cell>
          <table:table-cell table:style-name="Taula7.A3" office:value-type="string">
            <text:p text:style-name="P271"><text:span text:style-name="T115">0..</text:span>1</text:p>
          </table:table-cell>
          <table:table-cell table:style-name="Taula7.A3" office:value-type="string">
            <text:p text:style-name="P329">240</text:p>
          </table:table-cell>
          <table:table-cell table:style-name="Taula7.E17" office:value-type="string">
            <text:p text:style-name="P330">Extracte o resum de l’assentament. </text:p>
          </table:table-cell>
        </table:table-row>
        <table:table-row table:style-name="TableLine681537168">
          <table:table-cell table:style-name="Taula7.A3" office:value-type="string">
            <text:p text:style-name="P326">identificador</text:p>
          </table:table-cell>
          <table:table-cell table:style-name="Taula7.A3" office:value-type="string">
            <text:p text:style-name="P327">Cadena</text:p>
          </table:table-cell>
          <table:table-cell table:style-name="Taula7.A3" office:value-type="string">
            <text:p text:style-name="P328">0..1</text:p>
          </table:table-cell>
          <table:table-cell table:style-name="Taula7.A3" office:value-type="string">
            <text:p text:style-name="P329">100</text:p>
          </table:table-cell>
          <table:table-cell table:style-name="Taula7.E18" office:value-type="string">
            <text:p text:style-name="P330">Codi identificador de l’assentament registral. </text:p>
          </table:table-cell>
        </table:table-row>
        <text:soft-page-break/>
        <table:table-row table:style-name="TableLine681544368">
          <table:table-cell table:style-name="Taula7.A3" office:value-type="string">
            <text:p text:style-name="P326">idiomaCodi</text:p>
          </table:table-cell>
          <table:table-cell table:style-name="Taula7.A3" office:value-type="string">
            <text:p text:style-name="P272">Cadena</text:p>
          </table:table-cell>
          <table:table-cell table:style-name="Taula7.A3" office:value-type="string">
            <text:p text:style-name="P260">0..1</text:p>
          </table:table-cell>
          <table:table-cell table:style-name="Taula7.A3" office:value-type="string">
            <text:p text:style-name="P329">2</text:p>
          </table:table-cell>
          <table:table-cell table:style-name="Taula7.E19" office:value-type="string">
            <text:p text:style-name="P278">Codi d’idioma amb el que s’ha fet l’assentament.</text:p>
          </table:table-cell>
        </table:table-row>
        <table:table-row table:style-name="TableLine681545808">
          <table:table-cell table:style-name="Taula7.A3" office:value-type="string">
            <text:p text:style-name="P326">idiomaDescripcio</text:p>
          </table:table-cell>
          <table:table-cell table:style-name="Taula7.A3" office:value-type="string">
            <text:p text:style-name="P272">Cadena</text:p>
          </table:table-cell>
          <table:table-cell table:style-name="Taula7.A3" office:value-type="string">
            <text:p text:style-name="P260">0..1</text:p>
          </table:table-cell>
          <table:table-cell table:style-name="Taula7.A3" office:value-type="string">
            <text:p text:style-name="P365">100</text:p>
          </table:table-cell>
          <table:table-cell table:style-name="Taula7.E20" office:value-type="string">
            <text:p text:style-name="P278">Descripció d’idioma amb el que s’ha fet l’assentament.</text:p>
          </table:table-cell>
        </table:table-row>
        <table:table-row table:style-name="Taula7.21">
          <table:table-cell table:style-name="Taula7.A3" office:value-type="string">
            <text:p text:style-name="P326">interessats</text:p>
          </table:table-cell>
          <table:table-cell table:style-name="Taula7.A3" office:value-type="string">
            <text:p text:style-name="P327">interessat</text:p>
          </table:table-cell>
          <table:table-cell table:style-name="Taula7.A3" office:value-type="string">
            <text:p text:style-name="P260">0..*</text:p>
          </table:table-cell>
          <table:table-cell table:style-name="Taula7.A3" office:value-type="string">
            <text:p text:style-name="P267"/>
          </table:table-cell>
          <table:table-cell table:style-name="Taula7.E21" office:value-type="string">
            <text:p text:style-name="P282">Dades que componen els interessats de l’assentament registral si n’hi ha.</text:p>
          </table:table-cell>
        </table:table-row>
        <table:table-row table:style-name="Taula7.21">
          <table:table-cell table:style-name="Taula7.A3" office:value-type="string">
            <text:p text:style-name="P331">llibreCodi</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333">4</text:p>
          </table:table-cell>
          <table:table-cell table:style-name="Taula7.E22" office:value-type="string">
            <text:p text:style-name="P274">Codi del llibre al qual s’ha fet l’assentament registral rebut.</text:p>
          </table:table-cell>
        </table:table-row>
        <table:table-row table:style-name="Taula7.21">
          <table:table-cell table:style-name="Taula7.A3" office:value-type="string">
            <text:p text:style-name="P331">llibreDescripcio</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333">255</text:p>
          </table:table-cell>
          <table:table-cell table:style-name="Taula7.E37" office:value-type="string">
            <text:p text:style-name="P274">Denominació del llibre al qual s’ha fet l’assentament registral rebut.</text:p>
          </table:table-cell>
        </table:table-row>
        <table:table-row table:style-name="Taula7.21">
          <table:table-cell table:style-name="Taula7.A3" office:value-type="string">
            <text:p text:style-name="P331">observacions</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333">50</text:p>
          </table:table-cell>
          <table:table-cell table:style-name="Taula7.E37" office:value-type="string">
            <text:p text:style-name="P278">Observacions de l’assentament.</text:p>
          </table:table-cell>
        </table:table-row>
        <table:table-row table:style-name="Taula7.21">
          <table:table-cell table:style-name="Taula7.A3" office:value-type="string">
            <text:p text:style-name="P331">oficinaCodi</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333">21</text:p>
          </table:table-cell>
          <table:table-cell table:style-name="Taula7.E37" office:value-type="string">
            <text:p text:style-name="P274">Codi DIR3 de l’oficina on es registre.</text:p>
          </table:table-cell>
        </table:table-row>
        <table:table-row table:style-name="Taula7.21">
          <table:table-cell table:style-name="Taula7.A3" office:value-type="string">
            <text:p text:style-name="P331">oficinaDescripcio</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333">300</text:p>
          </table:table-cell>
          <table:table-cell table:style-name="Taula7.E37" office:value-type="string">
            <text:p text:style-name="P264">Denominació DIR3 de l'entitat registral on es registre l'assentament.</text:p>
          </table:table-cell>
        </table:table-row>
        <table:table-row table:style-name="Taula7.21">
          <table:table-cell table:style-name="Taula7.A3" office:value-type="string">
            <text:p text:style-name="P331">origenData</text:p>
          </table:table-cell>
          <table:table-cell table:style-name="Taula7.A3" office:value-type="string">
            <text:p text:style-name="P332">dateTime</text:p>
          </table:table-cell>
          <table:table-cell table:style-name="Taula7.A3" office:value-type="string">
            <text:p text:style-name="P260">0..1</text:p>
          </table:table-cell>
          <table:table-cell table:style-name="Taula7.A3" office:value-type="string">
            <text:p text:style-name="P333">14</text:p>
          </table:table-cell>
          <table:table-cell table:style-name="Taula7.E37" office:value-type="string">
            <text:p text:style-name="P264">Data <text:span text:style-name="T95">origen </text:span>de l’assentament.</text:p>
          </table:table-cell>
        </table:table-row>
        <table:table-row table:style-name="Taula7.21">
          <table:table-cell table:style-name="Taula7.A3" office:value-type="string">
            <text:p text:style-name="P331">origenRegistreNumero</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333">80</text:p>
          </table:table-cell>
          <table:table-cell table:style-name="Taula7.E37" office:value-type="string">
            <text:p text:style-name="P264"/>
          </table:table-cell>
        </table:table-row>
        <table:table-row table:style-name="Taula7.21">
          <table:table-cell table:style-name="Taula7.A3" office:value-type="string">
            <text:p text:style-name="P331">procedimentCodi</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333">64</text:p>
          </table:table-cell>
          <table:table-cell table:style-name="Taula7.E37" office:value-type="string">
            <text:p text:style-name="P334">Codi <text:span text:style-name="T336">SIA </text:span>de procediment. </text:p>
          </table:table-cell>
        </table:table-row>
        <table:table-row table:style-name="Taula7.21">
          <table:table-cell table:style-name="Taula7.A3" office:value-type="string">
            <text:p text:style-name="P331"><text:span text:style-name="T336">servei</text:span>Codi</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333">64</text:p>
          </table:table-cell>
          <table:table-cell table:style-name="Taula7.E37" office:value-type="string">
            <text:p text:style-name="P334">Codi <text:span text:style-name="T336">SIA </text:span>de<text:span text:style-name="T336">l servei</text:span>. </text:p>
          </table:table-cell>
        </table:table-row>
        <table:table-row table:style-name="Taula7.21">
          <table:table-cell table:style-name="Taula7.A3" office:value-type="string">
            <text:p text:style-name="P331">refExterna</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267"/>
          </table:table-cell>
          <table:table-cell table:style-name="Taula7.E37" office:value-type="string">
            <text:p text:style-name="P264"/>
          </table:table-cell>
        </table:table-row>
        <table:table-row table:style-name="Taula7.21">
          <table:table-cell table:style-name="Taula7.A3" office:value-type="string">
            <text:p text:style-name="P331">solicita</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333">lob</text:p>
          </table:table-cell>
          <table:table-cell table:style-name="Taula7.E37" office:value-type="string">
            <text:p text:style-name="P278">Objecte de la sol·licitud si escau.</text:p>
          </table:table-cell>
        </table:table-row>
        <table:table-row table:style-name="Taula7.21">
          <table:table-cell table:style-name="Taula7.A3" office:value-type="string">
            <text:p text:style-name="P331">transportNumero</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335">20</text:p>
          </table:table-cell>
          <table:table-cell table:style-name="Taula7.E37" office:value-type="string">
            <text:p text:style-name="P336">Número de transport. </text:p>
          </table:table-cell>
        </table:table-row>
        <table:table-row table:style-name="Taula7.21">
          <table:table-cell table:style-name="Taula7.A3" office:value-type="string">
            <text:p text:style-name="P331">transportTipusCodi</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335">20</text:p>
          </table:table-cell>
          <table:table-cell table:style-name="Taula7.E37" office:value-type="string">
            <text:p text:style-name="P264">Codi SICRES3 del segment internos – tipo transporte.</text:p>
          </table:table-cell>
        </table:table-row>
        <table:table-row table:style-name="Taula7.21">
          <table:table-cell table:style-name="Taula7.A3" office:value-type="string">
            <text:p text:style-name="P331">transportTipusDescripcio</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335">100</text:p>
          </table:table-cell>
          <table:table-cell table:style-name="Taula7.E37" office:value-type="string">
            <text:p text:style-name="P264">Descripció del segment internos – tipo transporte.</text:p>
          </table:table-cell>
        </table:table-row>
        <table:table-row table:style-name="Taula7.21">
          <table:table-cell table:style-name="Taula7.A3" office:value-type="string">
            <text:p text:style-name="P331">usuariCodi</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335">20</text:p>
          </table:table-cell>
          <table:table-cell table:style-name="Taula7.E37" office:value-type="string">
            <text:p text:style-name="P264">Codi de l'usuari que vol realitzar l'operació.</text:p>
          </table:table-cell>
        </table:table-row>
        <table:table-row table:style-name="Taula7.21">
          <table:table-cell table:style-name="Taula7.A3" office:value-type="string">
            <text:p text:style-name="P331">usuariNom</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335">767</text:p>
          </table:table-cell>
          <table:table-cell table:style-name="Taula7.E37" office:value-type="string">
            <text:p text:style-name="P264"><text:span text:style-name="T98">Nom</text:span> de l'usuari que vol realitzar l'operació.</text:p>
          </table:table-cell>
        </table:table-row>
        <table:table-row table:style-name="Taula7.21">
          <table:table-cell table:style-name="Taula7.A3" office:value-type="string">
            <text:p text:style-name="P331">justificantFitxerArxiuUuid</text:p>
          </table:table-cell>
          <table:table-cell table:style-name="Taula7.A3" office:value-type="string">
            <text:p text:style-name="P332">Cadena</text:p>
          </table:table-cell>
          <table:table-cell table:style-name="Taula7.A3" office:value-type="string">
            <text:p text:style-name="P260">0..1</text:p>
          </table:table-cell>
          <table:table-cell table:style-name="Taula7.A3" office:value-type="string">
            <text:p text:style-name="P335">256</text:p>
          </table:table-cell>
          <table:table-cell table:style-name="Taula7.E40" office:value-type="string">
            <text:p text:style-name="P337">Paràmetre que emmagatzema el uuid del justificant. Serveix per recuperar el justificant des del backoffice.</text:p>
          </table:table-cell>
        </table:table-row>
        <table:table-row table:style-name="Taula7.21">
          <table:table-cell table:style-name="Taula7.A3" office:value-type="string">
            <text:p text:style-name="P350">tramitCodi</text:p>
          </table:table-cell>
          <table:table-cell table:style-name="Taula7.A3" office:value-type="string">
            <text:p text:style-name="P351">Cadena</text:p>
          </table:table-cell>
          <table:table-cell table:style-name="Taula7.A3" office:value-type="string">
            <text:p text:style-name="P352">0..1</text:p>
          </table:table-cell>
          <table:table-cell table:style-name="Taula7.A3" office:value-type="string">
            <text:p text:style-name="P353">64</text:p>
          </table:table-cell>
          <table:table-cell table:style-name="Taula7.E40" office:value-type="string">
            <text:p text:style-name="P350">Codi del tràmit.</text:p>
          </table:table-cell>
        </table:table-row>
        <table:table-row table:style-name="Taula7.21">
          <table:table-cell table:style-name="Taula7.A3" office:value-type="string">
            <text:p text:style-name="P350">tramitNom</text:p>
          </table:table-cell>
          <table:table-cell table:style-name="Taula7.A3" office:value-type="string">
            <text:p text:style-name="P351">Cadena</text:p>
          </table:table-cell>
          <table:table-cell table:style-name="Taula7.A3" office:value-type="string">
            <text:p text:style-name="P352">0..1</text:p>
          </table:table-cell>
          <table:table-cell table:style-name="Taula7.A3" office:value-type="string">
            <text:p text:style-name="P353">256</text:p>
          </table:table-cell>
          <table:table-cell table:style-name="Taula7.E40" office:value-type="string">
            <text:p text:style-name="P350">Nom del tràmit.</text:p>
          </table:table-cell>
        </table:table-row>
      </table:table>
      <text:p text:style-name="P136"/>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681530256">
          <table:table-cell table:style-name="Taula9.A1" table:number-columns-spanned="5" office:value-type="string">
            <text:p text:style-name="P141">AnotacioRegistre<text:span text:style-name="T266">Entrada =&gt; tns:anotacioRegistreBase</text:span></text:p>
          </table:table-cell>
          <table:covered-table-cell/>
          <table:covered-table-cell/>
          <table:covered-table-cell/>
          <table:covered-table-cell/>
        </table:table-row>
        <table:table-row table:style-name="TableLine681529104">
          <table:table-cell table:style-name="Taula9.A2" office:value-type="string">
            <text:p text:style-name="P34">Nom del camp</text:p>
          </table:table-cell>
          <table:table-cell table:style-name="Taula9.A2" office:value-type="string">
            <text:p text:style-name="P34">Tipus</text:p>
          </table:table-cell>
          <table:table-cell table:style-name="Taula9.A2" office:value-type="string">
            <text:p text:style-name="P34">Mult.</text:p>
          </table:table-cell>
          <table:table-cell table:style-name="Taula9.A2" office:value-type="string">
            <text:p text:style-name="P36">Tamany</text:p>
          </table:table-cell>
          <table:table-cell table:style-name="Taula9.E2" office:value-type="string">
            <text:p text:style-name="P36">Descripció</text:p>
          </table:table-cell>
        </table:table-row>
        <table:table-row table:style-name="TableLine681527664">
          <table:table-cell table:style-name="Taula9.A3" office:value-type="string">
            <text:p text:style-name="P338">destiCodi</text:p>
          </table:table-cell>
          <table:table-cell table:style-name="Taula9.A3" office:value-type="string">
            <text:p text:style-name="P332">Cadena</text:p>
          </table:table-cell>
          <table:table-cell table:style-name="Taula9.A3" office:value-type="string">
            <text:p text:style-name="P256">0..<text:span text:style-name="T265">1</text:span></text:p>
          </table:table-cell>
          <table:table-cell table:style-name="Taula9.D3" office:value-type="float" office:value="21">
            <text:p text:style-name="P335">21</text:p>
          </table:table-cell>
          <table:table-cell table:style-name="Taula9.E4" office:value-type="string">
            <text:p text:style-name="P336">Codi DIR3 de la oficina destí. </text:p>
          </table:table-cell>
        </table:table-row>
        <table:table-row table:style-name="TableLine681535728">
          <table:table-cell table:style-name="Taula9.A3" office:value-type="string">
            <text:p text:style-name="P338">destiDescripcio</text:p>
          </table:table-cell>
          <table:table-cell table:style-name="Taula9.A3" office:value-type="string">
            <text:p text:style-name="P322">Cadena</text:p>
          </table:table-cell>
          <table:table-cell table:style-name="Taula9.A3" office:value-type="string">
            <text:p text:style-name="P256">0..1</text:p>
          </table:table-cell>
          <table:table-cell table:style-name="Taula9.D3" office:value-type="float" office:value="300">
            <text:p text:style-name="P366">300</text:p>
          </table:table-cell>
          <table:table-cell table:style-name="Taula9.E4" office:value-type="string">
            <text:p text:style-name="P336">Descripció de la oficina destí. </text:p>
          </table:table-cell>
        </table:table-row>
      </table:table>
      <text:p text:style-name="P136"/>
      <table:table table:name="Taula8" table:style-name="Taula8">
        <table:table-column table:style-name="Taula8.A"/>
        <table:table-column table:style-name="Taula8.B"/>
        <table:table-column table:style-name="Taula8.C"/>
        <table:table-column table:style-name="Taula8.D"/>
        <table:table-column table:style-name="Taula8.E"/>
        <text:soft-page-break/>
        <table:table-row table:style-name="TableLine681514128">
          <table:table-cell table:style-name="Taula8.A1" table:number-columns-spanned="5" office:value-type="string">
            <text:p text:style-name="P141">anotacioRegistre<text:span text:style-name="T265">Id</text:span></text:p>
          </table:table-cell>
          <table:covered-table-cell/>
          <table:covered-table-cell/>
          <table:covered-table-cell/>
          <table:covered-table-cell/>
        </table:table-row>
        <table:table-row table:style-name="TableLine681512976">
          <table:table-cell table:style-name="Taula8.A2" office:value-type="string">
            <text:p text:style-name="P34">Nom del camp</text:p>
          </table:table-cell>
          <table:table-cell table:style-name="Taula8.A2" office:value-type="string">
            <text:p text:style-name="P34">Tipus</text:p>
          </table:table-cell>
          <table:table-cell table:style-name="Taula8.A2" office:value-type="string">
            <text:p text:style-name="P34">Mult.</text:p>
          </table:table-cell>
          <table:table-cell table:style-name="Taula8.A2" office:value-type="string">
            <text:p text:style-name="P36">Tamany</text:p>
          </table:table-cell>
          <table:table-cell table:style-name="Taula8.E2" office:value-type="string">
            <text:p text:style-name="P36">Descripció</text:p>
          </table:table-cell>
        </table:table-row>
        <table:table-row table:style-name="TableLine681510384">
          <table:table-cell table:style-name="Taula8.A3" office:value-type="string">
            <text:p text:style-name="P331">clauAcces</text:p>
          </table:table-cell>
          <table:table-cell table:style-name="Taula8.A3" office:value-type="string">
            <text:p text:style-name="P332">Cadena</text:p>
          </table:table-cell>
          <table:table-cell table:style-name="Taula8.A3" office:value-type="string">
            <text:p text:style-name="P256">0..<text:span text:style-name="T265">1</text:span></text:p>
          </table:table-cell>
          <table:table-cell table:style-name="Taula8.D3">
            <text:p text:style-name="P256"/>
          </table:table-cell>
          <table:table-cell table:style-name="Taula8.E4" office:value-type="string">
            <text:p text:style-name="P341">Clau d’accés per accedir a l’informació. </text:p>
          </table:table-cell>
        </table:table-row>
        <table:table-row table:style-name="Taula8.4">
          <table:table-cell table:style-name="Taula8.A3" office:value-type="string">
            <text:p text:style-name="P331">identificador</text:p>
          </table:table-cell>
          <table:table-cell table:style-name="Taula8.A3" office:value-type="string">
            <text:p text:style-name="P322">Cadena</text:p>
          </table:table-cell>
          <table:table-cell table:style-name="Taula8.A3" office:value-type="string">
            <text:p text:style-name="P256">0..1</text:p>
          </table:table-cell>
          <table:table-cell table:style-name="Taula8.D3">
            <text:p text:style-name="P355"/>
          </table:table-cell>
          <table:table-cell table:style-name="Taula8.E4" office:value-type="string">
            <text:p text:style-name="P341">Identificador de l’usuari per poder accedir a l’informació. </text:p>
          </table:table-cell>
        </table:table-row>
      </table:table>
      <text:p text:style-name="P136"/>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681508656">
          <table:table-cell table:style-name="Taula10.A1" table:number-columns-spanned="5" office:value-type="string">
            <text:p text:style-name="P142">interessatBase</text:p>
          </table:table-cell>
          <table:covered-table-cell/>
          <table:covered-table-cell/>
          <table:covered-table-cell/>
          <table:covered-table-cell/>
        </table:table-row>
        <table:table-row table:style-name="TableLine628114016">
          <table:table-cell table:style-name="Taula10.A2" office:value-type="string">
            <text:p text:style-name="P34">Nom del camp</text:p>
          </table:table-cell>
          <table:table-cell table:style-name="Taula10.A2" office:value-type="string">
            <text:p text:style-name="P34">Tipus</text:p>
          </table:table-cell>
          <table:table-cell table:style-name="Taula10.A2" office:value-type="string">
            <text:p text:style-name="P34">Mult.</text:p>
          </table:table-cell>
          <table:table-cell table:style-name="Taula10.A2" office:value-type="string">
            <text:p text:style-name="P36">Tamany</text:p>
          </table:table-cell>
          <table:table-cell table:style-name="Taula10.E2" office:value-type="string">
            <text:p text:style-name="P36">Descripció</text:p>
          </table:table-cell>
        </table:table-row>
        <table:table-row table:style-name="TableLine681507504">
          <table:table-cell table:style-name="Taula10.A3" office:value-type="string">
            <text:p text:style-name="P338">adresa</text:p>
          </table:table-cell>
          <table:table-cell table:style-name="Taula10.A3" office:value-type="string">
            <text:p text:style-name="P339">Cadena</text:p>
          </table:table-cell>
          <table:table-cell table:style-name="Taula10.A3" office:value-type="string">
            <text:p text:style-name="P256">0..1</text:p>
          </table:table-cell>
          <table:table-cell table:style-name="Taula10.D3" office:value-type="float" office:value="160">
            <text:p text:style-name="P343">160</text:p>
          </table:table-cell>
          <table:table-cell table:style-name="Taula10.E4" office:value-type="string">
            <text:p text:style-name="P310">Adreça postal de l’interessat.</text:p>
          </table:table-cell>
        </table:table-row>
        <table:table-row table:style-name="TableLine681504048">
          <table:table-cell table:style-name="Taula10.A3" office:value-type="string">
            <text:p text:style-name="P338">adresaElectronica</text:p>
          </table:table-cell>
          <table:table-cell table:style-name="Taula10.A3" office:value-type="string">
            <text:p text:style-name="P339">Cadena</text:p>
          </table:table-cell>
          <table:table-cell table:style-name="Taula10.A3" office:value-type="string">
            <text:p text:style-name="P256">0..1</text:p>
          </table:table-cell>
          <table:table-cell table:style-name="Taula10.D3" office:value-type="float" office:value="160">
            <text:p text:style-name="P367">160</text:p>
          </table:table-cell>
          <table:table-cell table:style-name="Taula10.E4" office:value-type="string">
            <text:p text:style-name="P310">Adreça <text:span text:style-name="T270">electrònica</text:span> de l’interessat.</text:p>
          </table:table-cell>
        </table:table-row>
        <table:table-row table:style-name="TableLine681523344">
          <table:table-cell table:style-name="Taula10.A3" office:value-type="string">
            <text:p text:style-name="P338">canal</text:p>
          </table:table-cell>
          <table:table-cell table:style-name="Taula10.A3" office:value-type="string">
            <text:p text:style-name="P318">Cadena</text:p>
          </table:table-cell>
          <table:table-cell table:style-name="Taula10.A3" office:value-type="string">
            <text:p text:style-name="P256">0..1</text:p>
          </table:table-cell>
          <table:table-cell table:style-name="Taula10.A3" office:value-type="string">
            <text:p text:style-name="P343">2</text:p>
          </table:table-cell>
          <table:table-cell table:style-name="Taula10.E5" office:value-type="string">
            <text:p text:style-name="P264"><text:s/><text:span text:style-name="T271">Codi SICRES del segment interesado – canal</text:span></text:p>
            <text:p text:style-name="P300">preferente de notificación del interesado.</text:p>
          </table:table-cell>
        </table:table-row>
        <table:table-row table:style-name="TableLine681521904">
          <table:table-cell table:style-name="Taula10.A3" office:value-type="string">
            <text:p text:style-name="P338">cp</text:p>
          </table:table-cell>
          <table:table-cell table:style-name="Taula10.A3" office:value-type="string">
            <text:p text:style-name="P339">Cadena</text:p>
          </table:table-cell>
          <table:table-cell table:style-name="Taula10.A3" office:value-type="string">
            <text:p text:style-name="P260">0..1</text:p>
          </table:table-cell>
          <table:table-cell table:style-name="Taula10.A3" office:value-type="string">
            <text:p text:style-name="P343">5</text:p>
          </table:table-cell>
          <table:table-cell table:style-name="Taula10.E6" office:value-type="string">
            <text:p text:style-name="P344">Codi postal del l’interessat. </text:p>
          </table:table-cell>
        </table:table-row>
        <table:table-row table:style-name="TableLine681519600">
          <table:table-cell table:style-name="Taula10.A3" office:value-type="string">
            <text:p text:style-name="P338">documentNumero</text:p>
          </table:table-cell>
          <table:table-cell table:style-name="Taula10.A3" office:value-type="string">
            <text:p text:style-name="P339">Cadena</text:p>
          </table:table-cell>
          <table:table-cell table:style-name="Taula10.A3" office:value-type="string">
            <text:p text:style-name="P340">0..1</text:p>
          </table:table-cell>
          <table:table-cell table:style-name="Taula10.A3" office:value-type="string">
            <text:p text:style-name="P367">17</text:p>
          </table:table-cell>
          <table:table-cell table:style-name="Taula10.E7" office:value-type="string">
            <text:p text:style-name="P307">Número de document identificatiu.</text:p>
          </table:table-cell>
        </table:table-row>
        <table:table-row table:style-name="TableLine681521040">
          <table:table-cell table:style-name="Taula10.A3" office:value-type="string">
            <text:p text:style-name="P338">documentTipus</text:p>
          </table:table-cell>
          <table:table-cell table:style-name="Taula10.A3" office:value-type="string">
            <text:p text:style-name="P339">documentTipus</text:p>
          </table:table-cell>
          <table:table-cell table:style-name="Taula10.A3" office:value-type="string">
            <text:p text:style-name="P260">0..1</text:p>
          </table:table-cell>
          <table:table-cell table:style-name="Taula10.A3" office:value-type="string">
            <text:p text:style-name="P367">1</text:p>
          </table:table-cell>
          <table:table-cell table:style-name="Taula10.E8" office:value-type="string">
            <text:p text:style-name="P302">Codi SICRES del segment interesado –</text:p>
            <text:p text:style-name="P302">documento de identificacion de interesado tipo.</text:p>
          </table:table-cell>
        </table:table-row>
        <table:table-row table:style-name="TableLine681565680">
          <table:table-cell table:style-name="Taula10.A3" office:value-type="string">
            <text:p text:style-name="P338">email</text:p>
          </table:table-cell>
          <table:table-cell table:style-name="Taula10.A3" office:value-type="string">
            <text:p text:style-name="P272">Cadena</text:p>
          </table:table-cell>
          <table:table-cell table:style-name="Taula10.A3" office:value-type="string">
            <text:p text:style-name="P260">0..1</text:p>
          </table:table-cell>
          <table:table-cell table:style-name="Taula10.A3" office:value-type="string">
            <text:p text:style-name="P367">160</text:p>
          </table:table-cell>
          <table:table-cell table:style-name="Taula10.E9" office:value-type="string">
            <text:p text:style-name="P344">Correu electrònic de l’interessat. </text:p>
          </table:table-cell>
        </table:table-row>
        <table:table-row table:style-name="TableLine681563664">
          <table:table-cell table:style-name="Taula10.A3" office:value-type="string">
            <text:p text:style-name="P338">llinatge1</text:p>
          </table:table-cell>
          <table:table-cell table:style-name="Taula10.A3" office:value-type="string">
            <text:p text:style-name="P272">Cadena</text:p>
          </table:table-cell>
          <table:table-cell table:style-name="Taula10.A3" office:value-type="string">
            <text:p text:style-name="P271"><text:span text:style-name="T263">0..</text:span>1</text:p>
          </table:table-cell>
          <table:table-cell table:style-name="Taula10.A3" office:value-type="string">
            <text:p text:style-name="P343">255</text:p>
          </table:table-cell>
          <table:table-cell table:style-name="Taula10.E10" office:value-type="string">
            <text:p text:style-name="P310">Primer llinatge de l’interessat. Obligatori si és una persona física.</text:p>
          </table:table-cell>
        </table:table-row>
        <table:table-row table:style-name="TableLine681553872">
          <table:table-cell table:style-name="Taula10.A3" office:value-type="string">
            <text:p text:style-name="P338">llinatge2</text:p>
          </table:table-cell>
          <table:table-cell table:style-name="Taula10.A3" office:value-type="string">
            <text:p text:style-name="P339">Cadena</text:p>
          </table:table-cell>
          <table:table-cell table:style-name="Taula10.A3" office:value-type="string">
            <text:p text:style-name="P260">0..1</text:p>
          </table:table-cell>
          <table:table-cell table:style-name="Taula10.A3" office:value-type="string">
            <text:p text:style-name="P343">255</text:p>
          </table:table-cell>
          <table:table-cell table:style-name="Taula10.E11" office:value-type="string">
            <text:p text:style-name="P310">Segon llinatge de l’interessat.</text:p>
          </table:table-cell>
        </table:table-row>
        <table:table-row table:style-name="TableLine681564816">
          <table:table-cell table:style-name="Taula10.A3" office:value-type="string">
            <text:p text:style-name="P338">municipi</text:p>
          </table:table-cell>
          <table:table-cell table:style-name="Taula10.A3" office:value-type="string">
            <text:p text:style-name="P339">Cadena</text:p>
          </table:table-cell>
          <table:table-cell table:style-name="Taula10.A3" office:value-type="string">
            <text:p text:style-name="P260">0..1</text:p>
          </table:table-cell>
          <table:table-cell table:style-name="Taula10.A3" office:value-type="string">
            <text:p text:style-name="P343">100</text:p>
          </table:table-cell>
          <table:table-cell table:style-name="Taula10.E12" office:value-type="string">
            <text:p text:style-name="P344">Nom del municipi de la persona. </text:p>
          </table:table-cell>
        </table:table-row>
        <table:table-row table:style-name="TableLine681565104">
          <table:table-cell table:style-name="Taula10.A3" office:value-type="string">
            <text:p text:style-name="P338">municipiCodi</text:p>
          </table:table-cell>
          <table:table-cell table:style-name="Taula10.A3" office:value-type="string">
            <text:p text:style-name="P339">Cadena</text:p>
          </table:table-cell>
          <table:table-cell table:style-name="Taula10.A3" office:value-type="string">
            <text:p text:style-name="P260">0..1</text:p>
          </table:table-cell>
          <table:table-cell table:style-name="Taula10.A3" office:value-type="string">
            <text:p text:style-name="P343">100</text:p>
          </table:table-cell>
          <table:table-cell table:style-name="Taula10.E13" office:value-type="string">
            <text:p text:style-name="P344">Codi del municipi de la persona. </text:p>
          </table:table-cell>
        </table:table-row>
        <table:table-row table:style-name="TableLine681542640">
          <table:table-cell table:style-name="Taula10.A3" office:value-type="string">
            <text:p text:style-name="P338">nom</text:p>
          </table:table-cell>
          <table:table-cell table:style-name="Taula10.A3" office:value-type="string">
            <text:p text:style-name="P339">Cadena</text:p>
          </table:table-cell>
          <table:table-cell table:style-name="Taula10.A3" office:value-type="string">
            <text:p text:style-name="P271"><text:span text:style-name="T264">0..</text:span>1</text:p>
          </table:table-cell>
          <table:table-cell table:style-name="Taula10.A3" office:value-type="string">
            <text:p text:style-name="P343">255</text:p>
          </table:table-cell>
          <table:table-cell table:style-name="Taula10.E14" office:value-type="string">
            <text:p text:style-name="P310">Nom de l’interessat. Obligatori si és una persona física.</text:p>
          </table:table-cell>
        </table:table-row>
        <table:table-row table:style-name="TableLine681564528">
          <table:table-cell table:style-name="Taula10.A3" office:value-type="string">
            <text:p text:style-name="P321">observacions</text:p>
          </table:table-cell>
          <table:table-cell table:style-name="Taula10.A3" office:value-type="string">
            <text:p text:style-name="P272">Cadena</text:p>
          </table:table-cell>
          <table:table-cell table:style-name="Taula10.A3" office:value-type="string">
            <text:p text:style-name="P260">0..1</text:p>
          </table:table-cell>
          <table:table-cell table:style-name="Taula10.A3" office:value-type="string">
            <text:p text:style-name="P86">160</text:p>
          </table:table-cell>
          <table:table-cell table:style-name="Taula10.E15" office:value-type="string">
            <text:p text:style-name="P344">Observacions a destacar sobre la persona interessada. </text:p>
          </table:table-cell>
        </table:table-row>
        <table:table-row table:style-name="TableLine681563088">
          <table:table-cell table:style-name="Taula10.A3" office:value-type="string">
            <text:p text:style-name="P338">organCodi</text:p>
          </table:table-cell>
          <table:table-cell table:style-name="Taula10.A3" office:value-type="string">
            <text:p text:style-name="P339">Cadena</text:p>
          </table:table-cell>
          <table:table-cell table:style-name="Taula10.A3" office:value-type="string">
            <text:p text:style-name="P271"><text:span text:style-name="T264">0..</text:span>1</text:p>
          </table:table-cell>
          <table:table-cell table:style-name="Taula10.A3" office:value-type="string">
            <text:p text:style-name="P276"/>
          </table:table-cell>
          <table:table-cell table:style-name="Taula10.E16" office:value-type="string">
            <text:p text:style-name="P264"/>
          </table:table-cell>
        </table:table-row>
        <table:table-row table:style-name="TableLine681453072">
          <table:table-cell table:style-name="Taula10.A3" office:value-type="string">
            <text:p text:style-name="P338">pais</text:p>
          </table:table-cell>
          <table:table-cell table:style-name="Taula10.A3" office:value-type="string">
            <text:p text:style-name="P339">Cadena</text:p>
          </table:table-cell>
          <table:table-cell table:style-name="Taula10.A3" office:value-type="string">
            <text:p text:style-name="P271"><text:span text:style-name="T115">0..</text:span>1</text:p>
          </table:table-cell>
          <table:table-cell table:style-name="Taula10.A3" office:value-type="string">
            <text:p text:style-name="P342">100</text:p>
          </table:table-cell>
          <table:table-cell table:style-name="Taula10.E17" office:value-type="string">
            <text:p text:style-name="P300"><text:span text:style-name="T272">Nom</text:span> del País de la persona.</text:p>
          </table:table-cell>
        </table:table-row>
        <table:table-row table:style-name="TableLine681453360">
          <table:table-cell table:style-name="Taula10.A3" office:value-type="string">
            <text:p text:style-name="P338">paisCodi</text:p>
          </table:table-cell>
          <table:table-cell table:style-name="Taula10.A3" office:value-type="string">
            <text:p text:style-name="P339">Cadena</text:p>
          </table:table-cell>
          <table:table-cell table:style-name="Taula10.A3" office:value-type="string">
            <text:p text:style-name="P340">0..1</text:p>
          </table:table-cell>
          <table:table-cell table:style-name="Taula10.A3" office:value-type="string">
            <text:p text:style-name="P342">100</text:p>
          </table:table-cell>
          <table:table-cell table:style-name="Taula10.E18" office:value-type="string">
            <text:p text:style-name="P300">Codi ISO numèric del País de la persona.</text:p>
          </table:table-cell>
        </table:table-row>
        <table:table-row table:style-name="TableLine681454224">
          <table:table-cell table:style-name="Taula10.A3" office:value-type="string">
            <text:p text:style-name="P338">provincia</text:p>
          </table:table-cell>
          <table:table-cell table:style-name="Taula10.A3" office:value-type="string">
            <text:p text:style-name="P272">Cadena</text:p>
          </table:table-cell>
          <table:table-cell table:style-name="Taula10.A3" office:value-type="string">
            <text:p text:style-name="P260">0..1</text:p>
          </table:table-cell>
          <table:table-cell table:style-name="Taula10.A3" office:value-type="string">
            <text:p text:style-name="P342">100</text:p>
          </table:table-cell>
          <table:table-cell table:style-name="Taula10.E19" office:value-type="string">
            <text:p text:style-name="P300"><text:span text:style-name="T272">Nom</text:span> de la província de la persona.</text:p>
          </table:table-cell>
        </table:table-row>
        <table:table-row table:style-name="TableLine681463440">
          <table:table-cell table:style-name="Taula10.A3" office:value-type="string">
            <text:p text:style-name="P338">provinciaCodi</text:p>
          </table:table-cell>
          <table:table-cell table:style-name="Taula10.A3" office:value-type="string">
            <text:p text:style-name="P272">Cadena</text:p>
          </table:table-cell>
          <table:table-cell table:style-name="Taula10.A3" office:value-type="string">
            <text:p text:style-name="P260">0..1</text:p>
          </table:table-cell>
          <table:table-cell table:style-name="Taula10.A3" office:value-type="string">
            <text:p text:style-name="P368">100</text:p>
          </table:table-cell>
          <table:table-cell table:style-name="Taula10.E20" office:value-type="string">
            <text:p text:style-name="P300">Codi INE de la província de la persona.</text:p>
          </table:table-cell>
        </table:table-row>
        <table:table-row table:style-name="TableLine681525072">
          <table:table-cell table:style-name="Taula10.A3" office:value-type="string">
            <text:p text:style-name="P345">raoSocial</text:p>
          </table:table-cell>
          <table:table-cell table:style-name="Taula10.A3" office:value-type="string">
            <text:p text:style-name="P272">Cadena</text:p>
          </table:table-cell>
          <table:table-cell table:style-name="Taula10.A3" office:value-type="string">
            <text:p text:style-name="P260">0..1</text:p>
          </table:table-cell>
          <table:table-cell table:style-name="Taula10.A3" office:value-type="string">
            <text:p text:style-name="P342">2000</text:p>
          </table:table-cell>
          <table:table-cell table:style-name="Taula10.E22" office:value-type="string">
            <text:p text:style-name="P310">Raó social de l’interessat. Obligatori si és una persona jurídica.</text:p>
          </table:table-cell>
        </table:table-row>
        <table:table-row table:style-name="TableLine681524496">
          <table:table-cell table:style-name="Taula10.A3" office:value-type="string">
            <text:p text:style-name="P345">telefon</text:p>
          </table:table-cell>
          <table:table-cell table:style-name="Taula10.A3" office:value-type="string">
            <text:p text:style-name="P346">Cadena</text:p>
          </table:table-cell>
          <table:table-cell table:style-name="Taula10.A3" office:value-type="string">
            <text:p text:style-name="P347">0..1</text:p>
          </table:table-cell>
          <table:table-cell table:style-name="Taula10.A3" office:value-type="string">
            <text:p text:style-name="P342">20</text:p>
          </table:table-cell>
          <table:table-cell table:style-name="Taula10.E22" office:value-type="string">
            <text:p text:style-name="P341">Telèfon de l’interessat. </text:p>
          </table:table-cell>
        </table:table-row>
        <table:table-row table:style-name="TableLine681525360">
          <table:table-cell table:style-name="Taula10.A3" office:value-type="string">
            <text:p text:style-name="P345">tipus</text:p>
          </table:table-cell>
          <table:table-cell table:style-name="Taula10.A3" office:value-type="string">
            <text:p text:style-name="P346">interessatTipus</text:p>
          </table:table-cell>
          <table:table-cell table:style-name="Taula10.A3" office:value-type="string">
            <text:p text:style-name="P347">0..1</text:p>
          </table:table-cell>
          <table:table-cell table:style-name="Taula10.A3" office:value-type="string">
            <text:p text:style-name="P342">19</text:p>
          </table:table-cell>
          <table:table-cell table:style-name="Taula10.E23" office:value-type="string">
            <text:p text:style-name="P302">Figura jurídica de la persona <text:line-break/>'1' = Administració.</text:p>
            <text:p text:style-name="P302"><text:soft-page-break/>'2' = Persona física.</text:p>
            <text:p text:style-name="P302">'3' = Persona jurídica.</text:p>
          </table:table-cell>
        </table:table-row>
      </table:table>
      <text:p text:style-name="P136"/>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681526224">
          <table:table-cell table:style-name="Taula11.A1" table:number-columns-spanned="5" office:value-type="string">
            <text:p text:style-name="P142">Interessa<text:span text:style-name="T267">t =&gt; tns:interessatBase</text:span></text:p>
          </table:table-cell>
          <table:covered-table-cell/>
          <table:covered-table-cell/>
          <table:covered-table-cell/>
          <table:covered-table-cell/>
        </table:table-row>
        <table:table-row table:style-name="TableLine681536880">
          <table:table-cell table:style-name="Taula11.A2" office:value-type="string">
            <text:p text:style-name="P34">Nom del camp</text:p>
          </table:table-cell>
          <table:table-cell table:style-name="Taula11.A2" office:value-type="string">
            <text:p text:style-name="P34">Tipus</text:p>
          </table:table-cell>
          <table:table-cell table:style-name="Taula11.A2" office:value-type="string">
            <text:p text:style-name="P34">Mult.</text:p>
          </table:table-cell>
          <table:table-cell table:style-name="Taula11.A2" office:value-type="string">
            <text:p text:style-name="P36">Tamany</text:p>
          </table:table-cell>
          <table:table-cell table:style-name="Taula11.E2" office:value-type="string">
            <text:p text:style-name="P36">Descripció</text:p>
          </table:table-cell>
        </table:table-row>
        <table:table-row table:style-name="TableLine681542928">
          <table:table-cell table:style-name="Taula11.A3" office:value-type="string">
            <text:p text:style-name="P348">representant</text:p>
          </table:table-cell>
          <table:table-cell table:style-name="Taula11.A3" office:value-type="string">
            <text:p text:style-name="P349">representant</text:p>
          </table:table-cell>
          <table:table-cell table:style-name="Taula11.A3" office:value-type="string">
            <text:p text:style-name="P256">0..1</text:p>
          </table:table-cell>
          <table:table-cell table:style-name="Taula11.D3">
            <text:p text:style-name="P256"/>
          </table:table-cell>
          <table:table-cell table:style-name="Taula11.E3" office:value-type="string">
            <text:p text:style-name="P341">Dades de la persona representant descrites amb les mateixes propietats que els interessats. </text:p>
          </table:table-cell>
        </table:table-row>
      </table:table>
      <text:p text:style-name="P252"/>
      <text:list xml:id="list155549553113304" text:continue-numbering="true" text:style-name="Outline">
        <text:list-item>
          <text:list>
            <text:list-item>
              <text:h text:style-name="P404" text:outline-level="2"><text:bookmark-start text:name="__RefHeading___Toc227363_390838441"/><text:bookmark-start text:name="Còpia de Còpia de __RefHeading___Toc16776_2313926538 1 1"/>Utilització del servei<text:bookmark-end text:name="__RefHeading___Toc227363_390838441"/><text:bookmark-end text:name="Còpia de Còpia de __RefHeading___Toc16776_2313926538 1 1"/></text:h>
            </text:list-item>
          </text:list>
        </text:list-item>
      </text:list>
      <text:p text:style-name="P235">Aquest servei disposa d’un client que facilita la seva utilització.</text:p>
      <text:p text:style-name="P236">Per a fer ús d’aquest client en una aplicació Java es pot utilitzar la següent dependència Maven:</text:p>
      <text:p text:style-name="P385"/>
      <text:p text:style-name="P244"><text:span text:style-name="T28"><text:s/><text:tab/> </text:span><text:span text:style-name="T15">&lt;</text:span><text:span text:style-name="T16">d</text:span><text:span text:style-name="T21">ependency</text:span><text:span text:style-name="T15">&gt;</text:span></text:p>
      <text:p text:style-name="P60"><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60"><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60"><text:span text:style-name="T28"><text:s/><text:tab/> <text:tab/> </text:span><text:span text:style-name="T15">&lt;</text:span><text:span text:style-name="T21">version</text:span><text:span text:style-name="T15">&gt;</text:span><text:span text:style-name="T29">1.0.1</text:span><text:span text:style-name="T15">&lt;/</text:span><text:span text:style-name="T21">version</text:span><text:span text:style-name="T15">&gt;</text:span></text:p>
      <text:p text:style-name="P244"><text:span text:style-name="T28"><text:s/><text:tab/> </text:span><text:span text:style-name="T15">&lt;/</text:span><text:span text:style-name="T21">dependency</text:span><text:span text:style-name="T15">&gt;</text:span></text:p>
      <text:p text:style-name="P244"/>
      <text:p text:style-name="P236">Per a utilitzar aquesta dependència és necessari tenir configurat el següent repository:</text:p>
      <text:p text:style-name="P387"/>
      <text:p text:style-name="P242"><text:span text:style-name="T28"><text:s/><text:tab/> </text:span><text:span text:style-name="T15">&lt;</text:span><text:span text:style-name="T21">repository</text:span><text:span text:style-name="T15">&gt;</text:span></text:p>
      <text:p text:style-name="P60"><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60"><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60"><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2"><text:span text:style-name="T28"><text:s/><text:tab/> </text:span><text:span text:style-name="T15">&lt;/</text:span><text:span text:style-name="T21">repository</text:span><text:span text:style-name="T15">&gt;</text:span></text:p>
      <text:p text:style-name="P242"/>
      <text:p text:style-name="P235"/>
      <text:p text:style-name="P235">Aquesta dependència ens dona accés a la classe BackofficeIntegracioRestClient que ens permet fer cridades al servei. En el següent fragment de codi es pot veure un exemple de com utilitzar aquesta classe per a fer cridades al servei:</text:p>
      <text:p text:style-name="P107"/>
      <text:p text:style-name="P59"><text:span text:style-name="T52"><text:tab/><text:tab/></text:span><text:span text:style-name="T53">BackofficeIntegracioRestClient </text:span><text:span text:style-name="T79">restClient</text:span><text:span text:style-name="T52"> = BackofficeIntegracioRestClientFactory.</text:span><text:span text:style-name="T55">getRestClient</text:span><text:span text:style-name="T52">(</text:span></text:p>
      <text:p text:style-name="P54"><text:span text:style-name="T52"><text:tab/><text:tab/><text:tab/><text:tab/></text:span><text:span text:style-name="T31">"http://DISTRIB_HOST/distribucioapi/interna"</text:span><text:span text:style-name="T52">,</text:span></text:p>
      <text:p text:style-name="P54"><text:span text:style-name="T52"><text:tab/><text:tab/><text:tab/><text:tab/></text:span><text:span text:style-name="T31">"USERNAME"</text:span><text:span text:style-name="T52">,</text:span></text:p>
      <text:p text:style-name="P54"><text:span text:style-name="T52"><text:tab/><text:tab/><text:tab/><text:tab/></text:span><text:span text:style-name="T31">"PASSWORD"</text:span><text:span text:style-name="T52">);</text:span></text:p>
      <text:p text:style-name="P54"><text:span text:style-name="T52"><text:tab/><text:tab/>AnotacioRegistreId </text:span><text:span text:style-name="T79">id</text:span><text:span text:style-name="T52"> = </text:span><text:span text:style-name="T45">new</text:span><text:span text:style-name="T52"> AnotacioRegistreId(</text:span></text:p>
      <text:p text:style-name="P54"><text:span text:style-name="T52"><text:tab/><text:tab/><text:tab/><text:tab/></text:span><text:span text:style-name="T31">"GOIBE1708001141307/2024"</text:span><text:span text:style-name="T52">,</text:span></text:p>
      <text:p text:style-name="P54"><text:span text:style-name="T52"><text:tab/><text:tab/><text:tab/><text:tab/></text:span><text:span text:style-name="T31">"BYlMBmFPLGJSytavAH325Yjbwqo9xfXhM+wM0vzHxL4="</text:span><text:span text:style-name="T52">);</text:span></text:p>
      <text:p text:style-name="P59"><text:span text:style-name="T52"><text:tab/><text:tab/>AnotacioRegistreEntrada </text:span><text:span text:style-name="T79">anotacio</text:span><text:span text:style-name="T52"> = </text:span><text:span text:style-name="T79">restClient</text:span><text:span text:style-name="T52">.consulta(</text:span><text:span text:style-name="T79">id</text:span><text:span text:style-name="T52">);</text:span></text:p>
      <text:p text:style-name="P110"/>
      <text:p text:style-name="P48"/>
      <text:list xml:id="list155549270253201" text:continue-numbering="true" text:style-name="Outline">
        <text:list-item>
          <text:h text:style-name="P397" text:outline-level="1"><text:bookmark-start text:name="Còpia de __RefNumPara__81017_1680181998 1"/><text:bookmark-start text:name="__RefHeading___Toc227365_390838441"/><text:bookmark-start text:name="Còpia de __RefHeading___Toc160470_1680181998 1"/>Servei de gestió <text:span text:style-name="T327">de regles</text:span><text:bookmark-end text:name="Còpia de __RefNumPara__81017_1680181998 1"/><text:bookmark-end text:name="__RefHeading___Toc227365_390838441"/><text:bookmark-end text:name="Còpia de __RefHeading___Toc160470_1680181998 1"/></text:h>
        </text:list-item>
      </text:list>
      <text:p text:style-name="P232">Aquest servei permet <text:span text:style-name="T315">als backoffices </text:span><text:span text:style-name="T329">gestionar les regles per a la distribució automàtica de les anotacions de registre.</text:span></text:p>
      <text:p text:style-name="P217"><draw:frame draw:style-name="fr3" draw:name="Marc4" text:anchor-type="as-char" svg:width="9.763cm" draw:z-index="76"><draw:text-box fo:min-height="10.636cm"><text:p text:style-name="P227"><draw:frame draw:style-name="fr7" draw:name="Imatge3" text:anchor-type="paragraph" svg:width="9.763cm" style:rel-width="100%" svg:height="10.636cm" style:rel-height="scale" draw:z-index="77"><draw:image xlink:href="Pictures/1000000100000171000001926974360676B06D40.png" xlink:type="simple" xlink:show="embed" xlink:actuate="onLoad" draw:mime-type="image/png"/></draw:frame>Figura <text:sequence text:ref-name="refFigure1" text:name="Figure" text:formula="ooow:Figure+1" style:num-format="1">2</text:sequence>: <text:span text:style-name="T329">C</text:span><text:span text:style-name="T307">asos d'ús </text:span><text:span text:style-name="T328">de gestió </text:span><text:span text:style-name="T309">d</text:span><text:span text:style-name="T329">e regles</text:span><text:span text:style-name="T309"> a </text:span><text:span text:style-name="T307">DISTRIBUCIÓ</text:span></text:p></draw:text-box></draw:frame></text:p>
      <text:p text:style-name="P215"/>
      <text:list xml:id="list155549310121166" text:continue-numbering="true" text:style-name="Outline">
        <text:list-item>
          <text:list>
            <text:list-item>
              <text:h text:style-name="P405" text:outline-level="2"><text:bookmark-start text:name="Còpia de Còpia de Còpia de __RefNumPara__80988_1680181998 2 1 4"/><text:bookmark-start text:name="__RefHeading___Toc227367_390838441"/><text:bookmark-start text:name="Còpia de Còpia de Còpia de __RefHeading___Toc16772_2313926538 2 1 4"/>Descripció del servei<text:bookmark-end text:name="Còpia de Còpia de Còpia de __RefNumPara__80988_1680181998 2 1 4"/><text:bookmark-end text:name="__RefHeading___Toc227367_390838441"/><text:bookmark-end text:name="Còpia de Còpia de Còpia de __RefHeading___Toc16772_2313926538 2 1 4"/></text:h>
            </text:list-item>
          </text:list>
        </text:list-item>
      </text:list>
      <text:p text:style-name="P207">Per tal de facilitar la creació automàtica de regles de tipus enviar a backoffice segons un codi SIA de procediment <text:span text:style-name="T303">DISTRIBUCIO</text:span> ofereix una API REST de creació, <text:s/>consulta i modificació de regles. Les dades bàsiques d'aquesta API REST de regles són les següents:</text:p>
      <text:list xml:id="list1549770990" text:style-name="L7">
        <text:list-item>
          <text:p text:style-name="P446">URL base: <text:a xlink:type="simple" xlink:href="https://se.caib.es/distribucioapi/interna/regla" text:style-name="Internet_20_link" text:visited-style-name="Visited_20_Internet_20_Link">https://</text:a><text:a xlink:type="simple" xlink:href="https://se.caib.es/distribucioapi/interna/regla" text:style-name="Internet_20_link" text:visited-style-name="Visited_20_Internet_20_Link"><text:span text:style-name="T300">se</text:span></text:a><text:a xlink:type="simple" xlink:href="https://se.caib.es/distribucioapi/interna/regla" text:style-name="Internet_20_link" text:visited-style-name="Visited_20_Internet_20_Link"><text:span text:style-name="T276">.caib.es</text:span></text:a><text:a xlink:type="simple" xlink:href="https://se.caib.es/distribucioapi/interna/regla" text:style-name="Internet_20_link" text:visited-style-name="Visited_20_Internet_20_Link">/distribucioapi/interna/r</text:a><text:a xlink:type="simple" xlink:href="https://se.caib.es/distribucioapi/interna/regla" text:style-name="Internet_20_link" text:visited-style-name="Visited_20_Internet_20_Link"><text:span text:style-name="T276">egla</text:span></text:a></text:p>
        </text:list-item>
        <text:list-item>
          <text:p text:style-name="P447">Documentació Swagger: <text:a xlink:type="simple" xlink:href="https://se.caib.es/distribucioapi/interna/api/rest" text:style-name="Internet_20_link" text:visited-style-name="Visited_20_Internet_20_Link"><text:span text:style-name="T275">https://</text:span></text:a><text:a xlink:type="simple" xlink:href="https://se.caib.es/distribucioapi/interna/api/rest" text:style-name="Internet_20_link" text:visited-style-name="Visited_20_Internet_20_Link"><text:span text:style-name="T300">se</text:span></text:a><text:a xlink:type="simple" xlink:href="https://se.caib.es/distribucioapi/interna/api/rest" text:style-name="Internet_20_link" text:visited-style-name="Visited_20_Internet_20_Link">.caib.es</text:a><text:a xlink:type="simple" xlink:href="https://se.caib.es/distribucioapi/interna" text:style-name="Internet_20_link" text:visited-style-name="Visited_20_Internet_20_Link"><text:span text:style-name="T275">/distribucioapi/interna</text:span></text:a></text:p>
        </text:list-item>
        <text:list-item>
          <text:p text:style-name="P447">Autenticació: WSBASIC</text:p>
        </text:list-item>
        <text:list-item>
          <text:p text:style-name="P447">Rol necessari: DIS_REGLA</text:p>
        </text:list-item>
      </text:list>
      <text:list xml:id="list155551049108347" text:continue-list="list155549310121166" text:style-name="Outline">
        <text:list-item>
          <text:list>
            <text:list-item>
              <text:list>
                <text:list-item>
                  <text:h text:style-name="P415" text:outline-level="3"><text:bookmark-start text:name="__RefHeading___Toc227369_390838441"/><text:bookmark-start text:name="Còpia de __RefHeading___Toc53751_2521683781 1"/><text:soft-page-break/>Crear una regla<text:bookmark-end text:name="__RefHeading___Toc227369_390838441"/><text:bookmark-end text:name="Còpia de __RefHeading___Toc53751_2521683781 1"/></text:h>
                </text:list-item>
              </text:list>
            </text:list-item>
          </text:list>
        </text:list-item>
      </text:list>
      <text:p text:style-name="P198">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73">Crear una regla</text:p>
          </table:table-cell>
          <table:covered-table-cell/>
        </table:table-row>
        <table:table-row table:style-name="TableLine681536016">
          <table:table-cell table:style-name="Taula26.A2" office:value-type="string">
            <text:p text:style-name="P32">URL</text:p>
          </table:table-cell>
          <table:table-cell table:style-name="Taula26.B2" office:value-type="string">
            <text:p text:style-name="P196">http<text:span text:style-name="T314">s</text:span>://<text:span text:style-name="T314">DISTRIB_HOST/distribucioapi/interna</text:span>/regla/add</text:p>
          </table:table-cell>
        </table:table-row>
        <table:table-row table:style-name="TableLine681535440">
          <table:table-cell table:style-name="Taula26.A7" office:value-type="string">
            <text:p text:style-name="P38">Mètode</text:p>
          </table:table-cell>
          <table:table-cell table:style-name="Taula26.B7" office:value-type="string">
            <text:p text:style-name="P212">POST</text:p>
          </table:table-cell>
        </table:table-row>
        <table:table-row table:style-name="TableLine681534576">
          <table:table-cell table:style-name="Taula26.A7" office:value-type="string">
            <text:p text:style-name="P32">Descripció</text:p>
          </table:table-cell>
          <table:table-cell table:style-name="Taula26.B7" office:value-type="string">
            <text:p text:style-name="P44">Dona d'alta una regla pel backoffice i codi SIA indicat per a l'entitat indicada.</text:p>
          </table:table-cell>
        </table:table-row>
        <table:table-row table:style-name="TableLine681534864">
          <table:table-cell table:style-name="Taula26.A7" office:value-type="string">
            <text:p text:style-name="P38">Autenticació</text:p>
          </table:table-cell>
          <table:table-cell table:style-name="Taula26.B7" office:value-type="string">
            <text:p text:style-name="P370">HTTP Basic</text:p>
          </table:table-cell>
        </table:table-row>
        <table:table-row table:style-name="TableLine681532848">
          <table:table-cell table:style-name="Taula26.A7" office:value-type="string">
            <text:p text:style-name="P38">Rols requerits</text:p>
          </table:table-cell>
          <table:table-cell table:style-name="Taula26.B7" office:value-type="string">
            <text:p text:style-name="P370">DIS_REGLA</text:p>
          </table:table-cell>
        </table:table-row>
        <table:table-row table:style-name="TableLine681535152">
          <table:table-cell table:style-name="Taula26.A7" office:value-type="string">
            <text:p text:style-name="P32">Paràmetres</text:p>
          </table:table-cell>
          <table:table-cell table:style-name="Taula26.B7" office:value-type="string">
            <text:list xml:id="list3082095926" text:style-name="L8">
              <text:list-item>
                <text:p text:style-name="P423"><text:span text:style-name="T39">entitat</text:span><text:span text:style-name="T277">: Codi de l'entitat de DISTRIBUCIO on crear la regla. Típicament per l'entorn del Govern el codi d'entitat és "A04003003".</text:span><text:span text:style-name="T279"> Aquest paràmetre és obligatori.</text:span></text:p>
              </text:list-item>
              <text:list-item>
                <text:p text:style-name="P423"><text:span text:style-name="T39">sia</text:span><text:span text:style-name="T277">: Codi de procediment SIA per crear la regla i aplicar-la a les anotacions que es donin d'alta amb aquest codi</text:span><text:span text:style-name="T304"> </text:span><text:span text:style-name="T277">de procediment.</text:span><text:span text:style-name="T279"> Aquest paràmetre és obligatori.</text:span></text:p>
              </text:list-item>
              <text:list-item>
                <text:p text:style-name="P436">tipusSia<text:span text:style-name="T212">: Codi per indicar si la regla aplica al codi SIA del procediment o del servei. Els possibles valors són 'PROCEDIMENT' i 'SERVEI'. És un paràmetre opcional i per defecte es creen les regles pel SIA del procediment.</text:span></text:p>
              </text:list-item>
              <text:list-item>
                <text:p text:style-name="P423"><text:span text:style-name="T39">backoffice</text:span><text:span text:style-name="T277">: Codi del backoffice pel qual donar d'alta la regla. El backoffice ha d'estar donat d'alta en el manteniment de backoffices a DISTRIBUCIO per l'entitat indicada.</text:span><text:span text:style-name="T279"> Aquest paràmetre és obligatori.</text:span></text:p>
              </text:list-item>
            </text:list>
          </table:table-cell>
        </table:table-row>
        <table:table-row table:style-name="TableLine681549264">
          <table:table-cell table:style-name="Taula26.A8" office:value-type="string">
            <text:p text:style-name="P32">Resultat</text:p>
          </table:table-cell>
          <table:table-cell table:style-name="Taula26.B8" office:value-type="string">
            <text:list xml:id="list2535295435" text:style-name="L9">
              <text:list-item>
                <text:p text:style-name="P428">HTTP 200 <text:span text:style-name="T278">si la regla s'ha creat correctament o ja existia pel mateix backoffice i com a cos <text:s/>de la resposta es retorna el text de missatge de confirmació</text:span>.</text:p>
              </text:list-item>
              <text:list-item>
                <text:p text:style-name="P432">HTTP 404 si l'entitat o el backoffice no es troba per codi.</text:p>
              </text:list-item>
              <text:list-item>
                <text:p text:style-name="P432">HTTP 406 si ja existeix una regla pel mateix codi de procediment però per un altre backoffice.</text:p>
              </text:list-item>
              <text:list-item>
                <text:p text:style-name="P432">HTTP 500 si es produe<text:span text:style-name="T304">i</text:span>x un error intern no controlat creant la regla.</text:p>
              </text:list-item>
            </text:list>
          </table:table-cell>
        </table:table-row>
      </table:table>
      <text:p text:style-name="P197"/>
      <text:list xml:id="list155549490636595" text:continue-list="list155551049108347" text:style-name="Outline">
        <text:list-item>
          <text:list>
            <text:list-item>
              <text:list>
                <text:list-item>
                  <text:h text:style-name="P416" text:outline-level="3"><text:bookmark-start text:name="__RefHeading___Toc227371_390838441"/><text:bookmark-start text:name="Còpia de Còpia de __RefHeading___Toc53751_2521683781 1 1"/>Canviar estat d’una regla<text:bookmark-end text:name="__RefHeading___Toc227371_390838441"/><text:bookmark-end text:name="Còpia de Còpia de __RefHeading___Toc53751_2521683781 1 1"/></text:h>
                </text:list-item>
              </text:list>
            </text:list-item>
          </text:list>
        </text:list-item>
      </text:list>
      <text:p text:style-name="P198">Aquest mètode permet <text:span text:style-name="T329">activar o desactivar una </text:span><text:span text:style-name="T280">regla de tipus enviament a backoffice a partir del codi SIA del procedi</text:span><text:span text:style-name="T304">m</text:span><text:span text:style-name="T280">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73">Canviar estat d’una regla</text:p>
          </table:table-cell>
          <table:covered-table-cell/>
        </table:table-row>
        <table:table-row table:style-name="TableLine681556176">
          <table:table-cell table:style-name="Taula16.A2" office:value-type="string">
            <text:p text:style-name="P32">URL</text:p>
          </table:table-cell>
          <table:table-cell table:style-name="Taula16.B2" office:value-type="string">
            <text:p text:style-name="P196">http<text:span text:style-name="T314">s</text:span>://<text:span text:style-name="T314">DISTRIB_HOST/distribucioapi/interna</text:span>/regla/<text:span text:style-name="T276">canviEstat</text:span></text:p>
          </table:table-cell>
        </table:table-row>
        <table:table-row table:style-name="TableLine681545232">
          <table:table-cell table:style-name="Taula16.A7" office:value-type="string">
            <text:p text:style-name="P38">Mètode</text:p>
          </table:table-cell>
          <table:table-cell table:style-name="Taula16.B7" office:value-type="string">
            <text:p text:style-name="P212">POST</text:p>
          </table:table-cell>
        </table:table-row>
        <table:table-row table:style-name="TableLine681464016">
          <table:table-cell table:style-name="Taula16.A7" office:value-type="string">
            <text:p text:style-name="P32">Descripció</text:p>
          </table:table-cell>
          <table:table-cell table:style-name="Taula16.B7" office:value-type="string">
            <text:p text:style-name="P44"><text:span text:style-name="T329">Canvia l’estat d’una regla donat el codi SIA del procediment</text:span>.</text:p>
          </table:table-cell>
        </table:table-row>
        <table:table-row table:style-name="TableLine681583248">
          <table:table-cell table:style-name="Taula16.A7" office:value-type="string">
            <text:p text:style-name="P38">Autenticació</text:p>
          </table:table-cell>
          <table:table-cell table:style-name="Taula16.B7" office:value-type="string">
            <text:p text:style-name="P370">HTTP Basic</text:p>
          </table:table-cell>
        </table:table-row>
        <text:soft-page-break/>
        <table:table-row table:style-name="TableLine681571728">
          <table:table-cell table:style-name="Taula16.A7" office:value-type="string">
            <text:p text:style-name="P38">Rols requerits</text:p>
          </table:table-cell>
          <table:table-cell table:style-name="Taula16.B7" office:value-type="string">
            <text:p text:style-name="P370">DIS_REGLA</text:p>
          </table:table-cell>
        </table:table-row>
        <table:table-row table:style-name="TableLine681543504">
          <table:table-cell table:style-name="Taula16.A7" office:value-type="string">
            <text:p text:style-name="P32">Paràmetres</text:p>
          </table:table-cell>
          <table:table-cell table:style-name="Taula16.B7" office:value-type="string">
            <text:list xml:id="list155550753360985" text:continue-list="list3082095926" text:style-name="L8">
              <text:list-item>
                <text:p text:style-name="P423"><text:span text:style-name="T39">sia</text:span><text:span text:style-name="T277">: Codi de procediment SIA per </text:span><text:span text:style-name="T280">trobar la regla associada</text:span><text:span text:style-name="T277">.</text:span><text:span text:style-name="T279"> Aquest paràmetre és obligatori.</text:span></text:p>
              </text:list-item>
              <text:list-item>
                <text:p text:style-name="P423"><text:span text:style-name="T44">activa</text:span><text:span text:style-name="T277">: </text:span>Paràmetre opcional <text:span text:style-name="T280">de tipus booleà </text:span>per activar o desactivar la regla. Si on s'especifica es canvia segons el valor que tingui actualment.<text:span text:style-name="T280"> Per exemple </text:span><text:span text:style-name="T136">activa=true</text:span><text:span text:style-name="T168">.</text:span></text:p>
              </text:list-item>
            </text:list>
          </table:table-cell>
        </table:table-row>
        <table:table-row table:style-name="TableLine681458256">
          <table:table-cell table:style-name="Taula16.A8" office:value-type="string">
            <text:p text:style-name="P32">Resultat</text:p>
          </table:table-cell>
          <table:table-cell table:style-name="Taula16.B8" office:value-type="string">
            <text:list xml:id="list3485990409" text:style-name="L10">
              <text:list-item>
                <text:p text:style-name="P429">HTTP 200 <text:span text:style-name="T278">si </text:span><text:span text:style-name="T280">la regla s'ha pogut modificar correctament</text:span>.<text:span text:style-name="T282"> Com a cos del missatge de resposta es retorna el text de confirmació conforme si la regla s'ha activat o desactivat correctament. Per exemple "La regla amb codi 12354 s'ha desactivat correctament.".</text:span></text:p>
              </text:list-item>
              <text:list-item>
                <text:p text:style-name="P433">HTTP <text:span text:style-name="T280">409</text:span> si <text:span text:style-name="T280">no s'ha trobat cap regla el codi de procediment SIA.</text:span></text:p>
              </text:list-item>
              <text:list-item>
                <text:p text:style-name="P433">HTTP 500 si es produe<text:span text:style-name="T304">i</text:span>x un error intern no controlat <text:span text:style-name="T280">modificant</text:span> la regla.</text:p>
              </text:list-item>
            </text:list>
          </table:table-cell>
        </table:table-row>
      </table:table>
      <text:p text:style-name="P198"/>
      <text:list xml:id="list155549754997729" text:continue-list="list155549490636595" text:style-name="Outline">
        <text:list-item>
          <text:list>
            <text:list-item>
              <text:list>
                <text:list-item>
                  <text:h text:style-name="P416" text:outline-level="3"><text:bookmark-start text:name="__RefHeading___Toc227373_390838441"/><text:bookmark-start text:name="Còpia de Còpia de Còpia de __RefHeading___Toc53751_2521683781 1 1 1"/>Consultar informació d’una regla<text:bookmark-end text:name="__RefHeading___Toc227373_390838441"/><text:bookmark-end text:name="Còpia de Còpia de Còpia de __RefHeading___Toc53751_2521683781 1 1 1"/></text:h>
                </text:list-item>
              </text:list>
            </text:list-item>
          </text:list>
        </text:list-item>
      </text:list>
      <text:p text:style-name="P228">Aquest mètode <text:span text:style-name="T280">permet consultar els detalls d'una regla a partir del codi SIA del procediment. En el cos de la respo</text:span><text:span text:style-name="T304">s</text:span><text:span text:style-name="T280">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74"><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style-name="TableLine681575472">
          <table:table-cell table:style-name="Taula21.A2" office:value-type="string">
            <text:p text:style-name="P32">URL</text:p>
          </table:table-cell>
          <table:table-cell table:style-name="Taula21.B2" office:value-type="string">
            <text:p text:style-name="P196">http<text:span text:style-name="T314">s</text:span>://<text:span text:style-name="T314">DISTRIB_HOST/distribucioapi/interna</text:span>/regla/consultarRegla</text:p>
          </table:table-cell>
        </table:table-row>
        <table:table-row table:style-name="TableLine681581520">
          <table:table-cell table:style-name="Taula21.A7" office:value-type="string">
            <text:p text:style-name="P38">Mètode</text:p>
          </table:table-cell>
          <table:table-cell table:style-name="Taula21.B7" office:value-type="string">
            <text:p text:style-name="P212">POST</text:p>
          </table:table-cell>
        </table:table-row>
        <table:table-row table:style-name="TableLine681581808">
          <table:table-cell table:style-name="Taula21.A7" office:value-type="string">
            <text:p text:style-name="P32">Descripció</text:p>
          </table:table-cell>
          <table:table-cell table:style-name="Taula21.B7" office:value-type="string">
            <text:p text:style-name="P218">Consulta les regles <text:span text:style-name="T329">que coincideixin amb el codi SIA especificat</text:span>. En principi només hi pot haver una regla de tipus backoffice per codi SIA<text:span text:style-name="T282"> però per compatibilitat es retorna una llista de regles que podrien estar creades pel mateix codi SIA de procediment anteriorment.</text:span></text:p>
          </table:table-cell>
        </table:table-row>
        <table:table-row table:style-name="TableLine681582096">
          <table:table-cell table:style-name="Taula21.A7" office:value-type="string">
            <text:p text:style-name="P38">Autenticació</text:p>
          </table:table-cell>
          <table:table-cell table:style-name="Taula21.B7" office:value-type="string">
            <text:p text:style-name="P370">HTTP Basic</text:p>
          </table:table-cell>
        </table:table-row>
        <table:table-row table:style-name="TableLine681582960">
          <table:table-cell table:style-name="Taula21.A7" office:value-type="string">
            <text:p text:style-name="P38">Rols requerits</text:p>
          </table:table-cell>
          <table:table-cell table:style-name="Taula21.B7" office:value-type="string">
            <text:p text:style-name="P370">DIS_REGLA</text:p>
          </table:table-cell>
        </table:table-row>
        <table:table-row table:style-name="TableLine681563376">
          <table:table-cell table:style-name="Taula21.A7" office:value-type="string">
            <text:p text:style-name="P32">Paràmetres</text:p>
          </table:table-cell>
          <table:table-cell table:style-name="Taula21.B7" office:value-type="string">
            <text:list xml:id="list155550203716138" text:continue-list="list155550753360985" text:style-name="L8">
              <text:list-item>
                <text:p text:style-name="P423"><text:span text:style-name="T194">sia</text:span><text:span text:style-name="T169">: </text:span><text:span text:style-name="T168">Codi SIA de la regla que identifica la regla de tipus backoffice.</text:span></text:p>
              </text:list-item>
            </text:list>
          </table:table-cell>
        </table:table-row>
        <table:table-row table:style-name="TableLine681582672">
          <table:table-cell table:style-name="Taula21.A8" office:value-type="string">
            <text:p text:style-name="P32">Resultat</text:p>
          </table:table-cell>
          <table:table-cell table:style-name="Taula21.B8" office:value-type="string">
            <text:list xml:id="list834234136" text:style-name="L11">
              <text:list-item>
                <text:p text:style-name="P424"><text:span text:style-name="T277">HTTP 200 </text:span><text:span text:style-name="T278">si </text:span><text:span text:style-name="T280">la regla s'ha pogut </text:span><text:span text:style-name="T281">consultar</text:span><text:span text:style-name="T280"> correctament</text:span><text:span text:style-name="T277">.</text:span><text:span text:style-name="T282"> En el cos del missatge hi ha el JSON amb la llista de regles i els seus detalls, per exemple:</text:span></text:p>
                <text:list>
                  <text:list-item>
                    <text:p text:style-name="P438">Petició:</text:p>
                    <text:list>
                      <text:list-item>
                        <text:p text:style-name="P438">GET https://<text:span text:style-name="T300">se</text:span>.caib.es/distribucioapi/interna/regla/consultarRegla?sia=20220429</text:p>
                      </text:list-item>
                    </text:list>
                  </text:list-item>
                  <text:list-item>
                    <text:p text:style-name="P438">Cos de la resposta</text:p>
                  </text:list-item>
                </text:list>
              </text:list-item>
            </text:list>
            <text:p text:style-name="P205">[</text:p>
            <text:p text:style-name="P205"><text:s text:c="4"/>{</text:p>
            <text:p text:style-name="P205"><text:s text:c="8"/>"id": 1485186,</text:p>
            <text:p text:style-name="P205"><text:s text:c="8"/>"entitat": "Govern de les Illes Balears",</text:p>
            <text:p text:style-name="P205"><text:s text:c="8"/>"data": "13/05/2022 16:51:55",</text:p>
            <text:p text:style-name="P205"><text:s text:c="8"/>"activa": true,</text:p>
            <text:p text:style-name="P205"><text:soft-page-break/><text:s text:c="8"/>"nom": "helium 20220429",</text:p>
            <text:p text:style-name="P206"><text:s text:c="8"/>"tipusSia": "PROCEDIMENT",</text:p>
            <text:p text:style-name="P205"><text:s text:c="8"/>"backofficeDesti": "HELIUM DEV"</text:p>
            <text:p text:style-name="P205"><text:s text:c="4"/>}</text:p>
            <text:p text:style-name="P205">]</text:p>
            <text:list xml:id="list2787694049" text:style-name="L12">
              <text:list-item>
                <text:p text:style-name="P439">Els camps de la resposta són els següents:</text:p>
                <text:list>
                  <text:list-item>
                    <text:p text:style-name="P439">id: identificador intern de la regla de tipus long.</text:p>
                  </text:list-item>
                  <text:list-item>
                    <text:p text:style-name="P439">entitat: Descripció de l'entitat de DISTRIBUCIO a la qual pertany la regla. Tipus String.</text:p>
                  </text:list-item>
                  <text:list-item>
                    <text:p text:style-name="P439">data: Data de creació de la regla. String amb format "dd/MM/yyyy HH:mm:ss".</text:p>
                  </text:list-item>
                  <text:list-item>
                    <text:p text:style-name="P439">nom: Nom posat a la regla.</text:p>
                  </text:list-item>
                  <text:list-item>
                    <text:p text:style-name="P439">tipusSia<text:span text:style-name="T332">: Indica si la regla s'aplica pel codi SIA del procediment assignat a l'anotació o pel codi SIA del servei assignat a l'anotació.</text:span></text:p>
                  </text:list-item>
                  <text:list-item>
                    <text:p text:style-name="P439">backofficeDesti: Codi del backoffice al qual es notifiquen les anotacions afectades per la regla.</text:p>
                  </text:list-item>
                </text:list>
              </text:list-item>
              <text:list-item>
                <text:p text:style-name="P434">HTTP <text:span text:style-name="T281">404</text:span> si <text:span text:style-name="T280">no s'ha trobat cap regla el codi de procediment SIA.</text:span></text:p>
              </text:list-item>
            </text:list>
          </table:table-cell>
        </table:table-row>
      </table:table>
      <text:p text:style-name="P198"/>
      <text:list xml:id="list155550614000728" text:continue-list="list155549754997729" text:style-name="Outline">
        <text:list-item>
          <text:list>
            <text:list-item>
              <text:h text:style-name="P405" text:outline-level="2"><text:bookmark-start text:name="__RefHeading___Toc227375_390838441"/><text:bookmark-start text:name="Còpia de Còpia de Còpia de __RefHeading___Toc16776_2313926538 1 1 1"/>Utilització del servei<text:bookmark-end text:name="__RefHeading___Toc227375_390838441"/><text:bookmark-end text:name="Còpia de Còpia de Còpia de __RefHeading___Toc16776_2313926538 1 1 1"/></text:h>
            </text:list-item>
          </text:list>
        </text:list-item>
      </text:list>
      <text:p text:style-name="P236">Aquest servei disposa d’un client que facilita la seva utilització.</text:p>
      <text:p text:style-name="P236">Per a fer ús d’aquest client en una aplicació Java es pot utilitzar la següent dependència Maven:</text:p>
      <text:p text:style-name="P385"/>
      <text:p text:style-name="P244"><text:span text:style-name="T28"><text:s/><text:tab/> </text:span><text:span text:style-name="T15">&lt;</text:span><text:span text:style-name="T16">d</text:span><text:span text:style-name="T21">ependency</text:span><text:span text:style-name="T15">&gt;</text:span></text:p>
      <text:p text:style-name="P60"><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60"><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60"><text:span text:style-name="T28"><text:s/><text:tab/> <text:tab/> </text:span><text:span text:style-name="T15">&lt;</text:span><text:span text:style-name="T21">version</text:span><text:span text:style-name="T15">&gt;</text:span><text:span text:style-name="T29">1.0.1</text:span><text:span text:style-name="T15">&lt;/</text:span><text:span text:style-name="T21">version</text:span><text:span text:style-name="T15">&gt;</text:span></text:p>
      <text:p text:style-name="P244"><text:span text:style-name="T28"><text:s/><text:tab/> </text:span><text:span text:style-name="T15">&lt;/</text:span><text:span text:style-name="T21">dependency</text:span><text:span text:style-name="T15">&gt;</text:span></text:p>
      <text:p text:style-name="P244"/>
      <text:p text:style-name="P236">Per a utilitzar aquesta dependència és necessari tenir configurat el següent repository:</text:p>
      <text:p text:style-name="P387"/>
      <text:p text:style-name="P242"><text:span text:style-name="T28"><text:s/><text:tab/> </text:span><text:span text:style-name="T15">&lt;</text:span><text:span text:style-name="T21">repository</text:span><text:span text:style-name="T15">&gt;</text:span></text:p>
      <text:p text:style-name="P60"><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60"><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60"><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2"><text:span text:style-name="T28"><text:s/><text:tab/> </text:span><text:span text:style-name="T15">&lt;/</text:span><text:span text:style-name="T21">repository</text:span><text:span text:style-name="T15">&gt;</text:span></text:p>
      <text:p text:style-name="P242"/>
      <text:p text:style-name="P153"/>
      <text:p text:style-name="P237">Aquesta dependència ens dona accés a la classe ReglesRestClient que ens permet fer cridades al servei. En el següent fragment de codi es pot veure un exemple de com utilitzar aquesta classe per a fer cridades al servei:</text:p>
      <text:p text:style-name="P108"/>
      <text:p text:style-name="P61"><text:span text:style-name="T52"><text:tab/><text:tab/>ReglesRestClient</text:span><text:span text:style-name="T53"> </text:span><text:span text:style-name="T79">restClient</text:span><text:span text:style-name="T52"> = ReglesRestClientFactory.</text:span><text:span text:style-name="T55">getRestClient</text:span><text:span text:style-name="T52">(</text:span></text:p>
      <text:p text:style-name="P61"><text:span text:style-name="T52"><text:tab/><text:tab/><text:tab/><text:tab/></text:span><text:span text:style-name="T31">"http://DISTRIB_HOST/distribucioapi/interna"</text:span><text:span text:style-name="T52">,</text:span></text:p>
      <text:p text:style-name="P61"><text:soft-page-break/><text:span text:style-name="T52"><text:tab/><text:tab/><text:tab/><text:tab/></text:span><text:span text:style-name="T31">"USERNAME"</text:span><text:span text:style-name="T52">,</text:span></text:p>
      <text:p text:style-name="P61"><text:span text:style-name="T52"><text:tab/><text:tab/><text:tab/><text:tab/></text:span><text:span text:style-name="T31">"PASSWORD"</text:span><text:span text:style-name="T52">);</text:span></text:p>
      <text:p text:style-name="P62"><text:span text:style-name="T52"><text:tab/><text:tab/></text:span><text:span text:style-name="T54">Regla</text:span><text:span text:style-name="T52"> </text:span><text:span text:style-name="T80">regla</text:span><text:span text:style-name="T52"> = </text:span><text:span text:style-name="T79">restClient</text:span><text:span text:style-name="T52">.consulta</text:span><text:span text:style-name="T54">Regla</text:span><text:span text:style-name="T52">(</text:span><text:span text:style-name="T31">"</text:span><text:span text:style-name="T32">CODI_SIA</text:span><text:span text:style-name="T31">"</text:span><text:span text:style-name="T52">);</text:span></text:p>
      <text:p text:style-name="P111"/>
      <text:p text:style-name="P193"/>
      <text:list xml:id="list155550029732577" text:continue-numbering="true" text:style-name="Outline">
        <text:list-item>
          <text:h text:style-name="P398" text:outline-level="1"><text:bookmark-start text:name="__RefHeading___Toc60794_1326387233"/>Llibreria d'utilitats pels backoffices de DISTRIBUCIO<text:bookmark-end text:name="__RefHeading___Toc60794_1326387233"/></text:h>
        </text:list-item>
      </text:list>
      <text:p text:style-name="P132"><text:span text:style-name="T124"><text:s/></text:span>Amb l'objectiu de facilitar la integració dels backoffices amb DISTRIBUCIO <text:span text:style-name="T124">s'ha creat la llibreria </text:span><text:span text:style-name="T126">distribucio-backoffice-utils</text:span><text:span text:style-name="T154"> amb mètodes per facilitar </text:span><text:span text:style-name="T163">tasques comunes dels backoffices per a que s'hagi de fer una implementació específica per cada backoffice com, per exemple, </text:span><text:span text:style-name="T154">traspassar la informació des dels expedients de l'Arxiu de Distribució cap als expedients dins l'Arxiu dels backoffices</text:span><text:span text:style-name="T163"> o extreure dades de documents tècnics de Sistra2.</text:span></text:p>
      <text:p text:style-name="P63"/>
      <text:p text:style-name="P130"><text:span text:style-name="T154"><text:s/>La motivació d'aquesta llibreria és unificar la forma en què els backoffices </text:span><text:span text:style-name="T172">mo</text:span><text:span text:style-name="T177">u</text:span><text:span text:style-name="T172">en la informació des dels expedients de DISTRIBUCIO cap als seus propis expedients dins l'Arxiu. </text:span><text:span text:style-name="T173">D'aquesta forma les crides per moure el contingut i els interessats s'encapsula dins d'una funció que ja té en compte els diferents errors que es poden produir o si els annexos o els interessats ja s'han traspassat en un intent anterior.</text:span></text:p>
      <text:p text:style-name="P73"/>
      <text:p text:style-name="P73">En els següents punts des descriu la llibreria, com funciona i com utilitzar-la.</text:p>
      <text:list xml:id="list155550677753896" text:continue-numbering="true" text:style-name="Outline">
        <text:list-item>
          <text:list>
            <text:list-item>
              <text:h text:style-name="P409" text:outline-level="2"><text:bookmark-start text:name="__RefHeading___Toc50902_2907556958"/>Informació de la llibreria<text:bookmark-end text:name="__RefHeading___Toc50902_2907556958"/></text:h>
            </text:list-item>
          </text:list>
        </text:list-item>
      </text:list>
      <text:p text:style-name="P80">La llibreria consisteix en <text:span text:style-name="T238">classes </text:span>interfície<text:span text:style-name="T238">s</text:span> <text:span text:style-name="T153">amb els mètodes de suport pels </text:span><text:span text:style-name="T125">backoffices</text:span><text:span text:style-name="T153"> i classe</text:span><text:span text:style-name="T166">s</text:span><text:span text:style-name="T153"> amb la implementació</text:span><text:span text:style-name="T166">. La llista de classes d'utilitats són les següents:</text:span></text:p>
      <text:p text:style-name="P66"/>
      <text:list xml:id="list2482280832" text:style-name="L13">
        <text:list-item>
          <text:p text:style-name="P420"><text:span text:style-name="T134">BackofficeArxiuUtils</text:span><text:span text:style-name="T166">: Aquesta classe d'uilitats conté mètodes per tractar les anotacions i crear un expedient a l'Arxiu del backoffice. </text:span><text:span text:style-name="T183"><text:s/></text:span><text:span text:style-name="T184">C</text:span><text:span text:style-name="T155">onté una referència a la instància del plugin de l'Arxiu </text:span><text:span text:style-name="T127">IArxiuPlugin</text:span><text:span text:style-name="T155"> que emprarà per fer les diferents crides i moure la informació dels expedients de DISTRIBUCIO</text:span><text:span text:style-name="T127"> </text:span><text:span text:style-name="T155">cap a un expedient propi. Així mateix, la llibreria </text:span><text:span text:style-name="T127">distribucio-backoffice-utils.jar</text:span><text:span text:style-name="T155"> utilitza les classes definides en la llibreria client de WS de DISTRIBUCIO</text:span><text:span text:style-name="T127"> distribucio-ws-client.jar.</text:span><text:span text:style-name="T155"> </text:span></text:p>
        </text:list-item>
        <text:list-item>
          <text:p text:style-name="P421">BackofficeSistra2Utils<text:span text:style-name="T153">: Aquesta classe d'utilitats té mètodes per tractar els annexos corresponents a documents tècnics de Sistra2 i extreure'n la informació dels formularis o pagaments.</text:span></text:p>
        </text:list-item>
      </text:list>
      <text:p text:style-name="P66"/>
      <text:p text:style-name="P133"><text:span text:style-name="T153">Com que les utilitats de l'Arxiu empren el plugin d'Arxiu la llibreria té dependències del plugin d'Arxiu </text:span>plugin-arxiu-api.jar<text:span text:style-name="T153"> i de la llibreria de Distribució </text:span><text:span text:style-name="T134">distribucio-ws-client.jar</text:span><text:span text:style-name="T166">. A continuació es mostra el diagrama de blocs de les llibreries relacionades i el </text:span><text:span text:style-name="T134">backoffice</text:span><text:span text:style-name="T166"> que empra la llibreria d'utilitats.</text:span></text:p>
      <text:p text:style-name="P64"/>
      <text:p text:style-name="P160"><draw:frame draw:style-name="fr1" draw:name="Frame1" text:anchor-type="paragraph" svg:width="17cm" draw:z-index="56"><draw:text-box fo:min-height="7.294cm"><text:p text:style-name="Fig."><draw:frame draw:style-name="fr6" draw:name="Image2" text:anchor-type="as-char" svg:width="17cm" style:rel-width="100%" svg:height="7.294cm" style:rel-height="scale" draw:z-index="79"><draw:image xlink:href="Pictures/100000010000041B000001C3EA54028351BC0DD3.png" xlink:type="simple" xlink:show="embed" xlink:actuate="onLoad" draw:mime-type="image/png"/></draw:frame><text:span text:style-name="T224"><text:line-break/></text:span>Fig. <text:sequence text:ref-name="refFig.2" text:name="Fig." text:formula="ooow:Fig.+1" style:num-format="1">3</text:sequence>: Diagrama de blocks de la llibreria</text:p></draw:text-box></draw:frame><text:soft-page-break/></text:p>
      <text:list xml:id="list155551108065733" text:continue-list="list155550677753896" text:style-name="Outline">
        <text:list-item>
          <text:list>
            <text:list-item>
              <text:h text:style-name="P411" text:outline-level="2"><text:bookmark-start text:name="__RefHeading___Toc50904_2907556958"/>Com incloure la llibreria<text:bookmark-end text:name="__RefHeading___Toc50904_2907556958"/></text:h>
            </text:list-item>
          </text:list>
        </text:list-item>
      </text:list>
      <text:p text:style-name="P67">La llibreria es pot incloure com una dependència maven dins del codi del backoffice de la mateixa forma que s'inclouen les dependències del client del WS de DISTRIBUCIO o de l' API de l'Arxiu.</text:p>
      <text:p text:style-name="P161"><text:span text:style-name="T153">S'ha de tenir en compte la versió específica de la llibreria </text:span><text:span text:style-name="T125">distribucio-backoffice-utils</text:span><text:span text:style-name="T153">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25">maven</text:span><text:span text:style-name="T153">:</text:span></text:p>
      <table:table table:name="Table2" table:style-name="Table2">
        <table:table-column table:style-name="Table2.A"/>
        <table:table-row table:style-name="TableLine681573744">
          <table:table-cell table:style-name="Table2.A1" office:value-type="string">
            <text:p text:style-name="P42"><text:span text:style-name="T18">&lt;</text:span><text:span text:style-name="T23">dependency</text:span><text:span text:style-name="T18">&gt;</text:span></text:p>
            <text:p text:style-name="P55"><text:span text:style-name="T57"><text:tab/></text:span><text:span text:style-name="T18">&lt;</text:span><text:span text:style-name="T23">groupId</text:span><text:span text:style-name="T18">&gt;</text:span><text:span text:style-name="T57">es.caib.distribucio</text:span><text:span text:style-name="T18">&lt;/</text:span><text:span text:style-name="T23">groupId</text:span><text:span text:style-name="T18">&gt;</text:span></text:p>
            <text:p text:style-name="P55"><text:span text:style-name="T57"><text:tab/></text:span><text:span text:style-name="T18">&lt;</text:span><text:span text:style-name="T23">artifactId</text:span><text:span text:style-name="T18">&gt;</text:span><text:span text:style-name="T57">distribucio-backoffice-utils</text:span><text:span text:style-name="T18">&lt;/</text:span><text:span text:style-name="T23">artifactId</text:span><text:span text:style-name="T18">&gt;</text:span></text:p>
            <text:p text:style-name="P55"><text:span text:style-name="T57"><text:tab/></text:span><text:span text:style-name="T18">&lt;</text:span><text:span text:style-name="T23">version</text:span><text:span text:style-name="T18">&gt;</text:span><text:span text:style-name="T57">0.9.</text:span><text:span text:style-name="T59">50</text:span><text:span text:style-name="T18">&lt;/</text:span><text:span text:style-name="T23">version</text:span><text:span text:style-name="T18">&gt;</text:span></text:p>
            <text:p text:style-name="P42"><text:span text:style-name="T18">&lt;/</text:span><text:span text:style-name="T23">dependency</text:span><text:span text:style-name="T18">&gt;</text:span></text:p>
          </table:table-cell>
        </table:table-row>
      </table:table>
      <text:p text:style-name="P67"/>
      <text:p text:style-name="P68">Aquesta llibreria depèn de la llibreria client del WS de DISTRIBUCIO per tractar la informació de DISTRIBUCIO i del plugin d'Arxiu per fer les diferents crides a l'Arxiu.</text:p>
      <text:list xml:id="list155551156280609" text:continue-numbering="true" text:style-name="Outline">
        <text:list-item>
          <text:list>
            <text:list-item>
              <text:h text:style-name="P412" text:outline-level="2"><text:bookmark-start text:name="__RefHeading___Toc366105_93553639"/>Històric<text:bookmark-end text:name="__RefHeading___Toc366105_93553639"/></text:h>
            </text:list-item>
          </text:list>
        </text:list-item>
      </text:list>
      <text:p text:style-name="P171">La llibreria està pensada per anar incorporant noves utilitats i en principi se cercarà la compatibilitat cap a versions anteriors. <text:span text:style-name="T240">La versió de la llibreria coincideix amb la versió de Distribucio en la que es van introduir els canvis. </text:span>L'històric de versions actual és el següent:</text:p>
      <text:list xml:id="list37950344" text:style-name="L14">
        <text:list-item>
          <text:p text:style-name="P450">0.9.26 Versió inicial de la llibreria amb la classe <text:span text:style-name="T125">BackofficeUtils</text:span><text:span text:style-name="T153"> per traspassar arxius.</text:span></text:p>
        </text:list-item>
        <text:list-item>
          <text:p text:style-name="P448"><text:span text:style-name="T163">0.9.2</text:span><text:span text:style-name="T188">8</text:span><text:span text:style-name="T163"> S'afegeix la classe </text:span><text:span text:style-name="T135">BackofficeSistra2Utils</text:span><text:span text:style-name="T163"> per extreure dades de documents tècnics i es reanomena la classe anterior </text:span><text:span text:style-name="T135">BackofficeUtils </text:span><text:span text:style-name="T163">a</text:span><text:span text:style-name="T135"> BackofficeArxiuUtils</text:span><text:span text:style-name="T163">.</text:span></text:p>
        </text:list-item>
        <text:list-item>
          <text:p text:style-name="P449"><text:soft-page-break/><text:span text:style-name="T163">0.9.</text:span><text:span text:style-name="T313">50</text:span><text:span text:style-name="T163"> </text:span><text:span text:style-name="T312">Modificació per llegir els valors de tipus llista de l'XML de formularis de Sistra2.</text:span><text:span text:style-name="T163">a</text:span><text:span text:style-name="T135"> BackofficeArxiuUtils</text:span><text:span text:style-name="T163">.</text:span></text:p>
        </text:list-item>
      </text:list>
      <text:list xml:id="list155549552789263" text:continue-list="list155551156280609" text:style-name="Outline">
        <text:list-item>
          <text:list>
            <text:list-item>
              <text:h text:style-name="P413" text:outline-level="2"><text:bookmark-start text:name="__RefHeading___Toc366107_93553639"/>Utilitats per l'Arxiu<text:bookmark-end text:name="__RefHeading___Toc366107_93553639"/></text:h>
            </text:list-item>
          </text:list>
        </text:list-item>
      </text:list>
      <text:p text:style-name="P134">La llibreria d'utilitats inclou la classe <text:span text:style-name="T125">BackofficeArxiuUtils</text:span><text:span text:style-name="T153"> amb els mètodes per fer les tasques de crear un expedient a l'Arxiu i </text:span><text:span text:style-name="T178">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33"><text:span text:style-name="T195"><text:s/>La idea és poder crear i moure la informació de l'expedient a l'Arxiu de DISTRIBUCIO cap a l'expedient a l'Arxiu del </text:span><text:span text:style-name="T127">backoffice</text:span><text:span text:style-name="T155"> a partir de la informació consultada amb el client del WS de DISTRIBUCIO quan el </text:span><text:span text:style-name="T127">backoffice</text:span><text:span text:style-name="T155"> rebi una petició d'anotació pendent. D'aquesta forma la interfície </text:span><text:span text:style-name="T127">BackofficeArxiuUtils</text:span><text:span text:style-name="T155"> defineix el mètode </text:span><text:span text:style-name="T137">crearExpedientAmbAnotacioDeRegistre</text:span><text:span text:style-name="T155"> per a fer el seguit de crides necessàries i retornar un resultat que permeti saber com ha anat el resultat. </text:span></text:p>
      <text:p text:style-name="P65"/>
      <text:p text:style-name="P191"><text:span text:style-name="T156">E</text:span><text:span text:style-name="T153">l mètode </text:span><text:span text:style-name="T125">crearExpedientAmbAnotacioRegistre</text:span><text:span text:style-name="T153"> s'encarrergarà, mitjançant la informació proporcionada, de realitzar les següents crides a l'Arxiu:</text:span></text:p>
      <text:list xml:id="list3543018959" text:style-name="L15">
        <text:list-item>
          <text:p text:style-name="P390"><text:span text:style-name="T157">Si no s'informa la propietat o paràmetre </text:span><text:span text:style-name="T128">identificador </text:span><text:span text:style-name="T157">llavors es c</text:span><text:span text:style-name="T153">rear</text:span><text:span text:style-name="T157">à</text:span><text:span text:style-name="T153"> el nou expedient a l'arxiu fent una cridada al mètode </text:span><text:span text:style-name="T125">expedientCrear</text:span><text:span text:style-name="T128"> </text:span><text:span text:style-name="T157">amb la infomració de l'expedient passada com a paràmetre</text:span><text:span text:style-name="T153">.</text:span><text:span text:style-name="T158"> Si es detecta que ja està creat llavors continua.</text:span></text:p>
        </text:list-item>
        <text:list-item>
          <text:p text:style-name="P391">Crear els interessats en l'expedient de l'arxiu fent una cridada al mètode <text:span text:style-name="T125">expedientModificar</text:span>.<text:span text:style-name="T196"> Es comprovarà si l'expedient ja conté els interessats.</text:span></text:p>
        </text:list-item>
        <text:list-item>
          <text:p text:style-name="P391">Crear una nova carpeta a dins l'expedient de destí que contendrà tots els annexos de l'anotació de registre (aquesta passa és opcional i només es fa si hi ha un paràmetre activat).<text:span text:style-name="T196"> Primer es comprova si la carpeta ja està creada.</text:span></text:p>
        </text:list-item>
        <text:list-item>
          <text:p text:style-name="P390"><text:span text:style-name="T153">Moure el document annex des de l'expedient de l'anotació de registre cap al nou expedient creat emprant el mètode </text:span><text:span text:style-name="T125">documentMoure</text:span><text:span text:style-name="T153">. Com que l'expedient d'origen i el de destí pertanyen a sèries documentals diferents això provocarà una cridada al servei dispatchDocument de l'API REST de l'arxiu.</text:span><text:span text:style-name="T158"> S'ha de comprovar si l'annex s'ha mogut prèviament.</text:span></text:p>
        </text:list-item>
      </text:list>
      <text:p text:style-name="P135"><text:span text:style-name="T183">Com que el mètode pot haver produït un error en el transcurs de les crides anteriors </text:span><text:span text:style-name="T185">internament </text:span><text:span text:style-name="T183">es faran les comprovacions necessàries en cada pas per rependre l'execució del mètode.</text:span><text:span text:style-name="T185"> Així doncs, el backoffice integrador podrà reintentar el processament de l'anotació tornant a invocar el mètode amb els mateixos paràmetres amb l'excepció de la creació de l'expedient, ja que el </text:span><text:span text:style-name="T144">backoffice </text:span><text:span text:style-name="T186">ha de guardar l'identificador dins l'Arxiu de l'expedient per continuar amb el traspàs de la informació de manera que no es creïn nous expedients en cada intent.</text:span></text:p>
      <text:p text:style-name="P75"><text:s/>En els següents apartats es descriuen els possibles paràmetres de configuració i es mostra codi d'exemple per al seu ús.</text:p>
      <text:list xml:id="list155549355744108" text:continue-list="list155549552789263" text:style-name="Outline">
        <text:list-item>
          <text:list>
            <text:list-item>
              <text:list>
                <text:list-item>
                  <text:h text:style-name="P417" text:outline-level="3"><text:bookmark-start text:name="__RefHeading___Toc50906_2907556958"/><text:soft-page-break/><text:span text:style-name="T197">P</text:span>aràmetres<text:bookmark-end text:name="__RefHeading___Toc50906_2907556958"/></text:h>
                </text:list-item>
              </text:list>
            </text:list-item>
          </text:list>
        </text:list-item>
      </text:list>
      <text:p text:style-name="P162">La classe <text:span text:style-name="T125">BackofficeArxiuUtils</text:span><text:span text:style-name="T153"> es pot configurar a través dels seus mètodes. Els paràmetres són els següents:</text:span></text:p>
      <text:list xml:id="list1218821427" text:style-name="L16">
        <text:list-item>
          <text:p text:style-name="P451">iArxiuPlugin: </text:p>
          <text:p text:style-name="P452"><text:span text:style-name="T153">És un paràmetre obligatori que s'ha d'especificar a través del constructor </text:span><text:span text:style-name="T125">BackofficeArxiuUtilsImpl(IArxiuPlugin)</text:span><text:span text:style-name="T153"> o a través del métode </text:span><text:span text:style-name="T125">setIArxiuPlugin(IArxiuPlugin)</text:span><text:span text:style-name="T153">. Serveix per tenir referència a la instància de l'API de l'Arxiu i poder fer les crides necessàries per a la creació, modificació i consulta de la informació de l'Arxiu.</text:span></text:p>
        </text:list-item>
        <text:list-item>
          <text:p text:style-name="P451">carpeta:</text:p>
          <text:p text:style-name="P452"><text:span text:style-name="T153">La definició de la carpeta és opcional. Si es fixa un valor per a la carpeta llavors durant les crides es crearà una carpeta on guardar els annexos de l'anotació de registre. És útil quan l'expedient del </text:span><text:span text:style-name="T125">backoffice</text:span><text:span text:style-name="T153"> pot estar relacionat amb diferents anotacions de registre i es vol separar els annexos de les diferents anotacions. Per fixar el nom de la carpeta es pot fer mitjançant el métode </text:span><text:span text:style-name="T125">setCarpeta(String)</text:span><text:span text:style-name="T153">.</text:span></text:p>
        </text:list-item>
        <text:list-item>
          <text:p text:style-name="P451">arxiuPluginListener:</text:p>
          <text:p text:style-name="P452"><text:span text:style-name="T153">A fi de poder controlar les diferents crides que es fan a l'Arxiu la interfície </text:span><text:span text:style-name="T125">BackofficeArxiuUtils</text:span><text:span text:style-name="T153"> permet</text:span><text:span text:style-name="T164"> opcionament</text:span><text:span text:style-name="T153"> fixar una instància que implementi la interfície </text:span><text:span text:style-name="T125">ArxiuPluginListener</text:span><text:span text:style-name="T153">. Cada cop que es cridi a l'Arxiu s'invocarà al mètode </text:span><text:span text:style-name="T125">event</text:span><text:span text:style-name="T153"> de la instància per a que l'aplicació del </text:span><text:span text:style-name="T125">backoffice </text:span><text:span text:style-name="T153">pugui monitoritzar la integració amb l'Arxiu amb la informació dels mètodes invocats, els paràmetres més descriptius, si hi ha hagut error i el temps total de processament en ms. El métode per fixar la instància és </text:span><text:span text:style-name="T129">setArxiuPluginListener(ArxiuPluginListener) </text:span><text:span text:style-name="T159">i l</text:span><text:span text:style-name="T153">a interfície que ha d'implementar la instància és la següent:</text:span></text:p>
        </text:list-item>
      </text:list>
      <table:table table:name="Table3" table:style-name="Table3">
        <table:table-column table:style-name="Table3.A"/>
        <table:table-row table:style-name="TableLine681577488">
          <table:table-cell table:style-name="Table3.A1" office:value-type="string">
            <text:p text:style-name="P42"><text:span text:style-name="T47">package</text:span><text:span text:style-name="T57"> es.caib.distribucio.backoffice.utils;</text:span></text:p>
            <text:p text:style-name="P180"/>
            <text:p text:style-name="P55"><text:span text:style-name="T47">import</text:span><text:span text:style-name="T57"> java.util.Map;</text:span></text:p>
            <text:p text:style-name="P180"/>
            <text:p text:style-name="P55"><text:span text:style-name="T199">/** </text:span><text:span text:style-name="T200">Interfície</text:span><text:span text:style-name="T199"> a </text:span><text:span text:style-name="T200">implementar</text:span><text:span text:style-name="T199"> </text:span><text:span text:style-name="T200">si</text:span><text:span text:style-name="T199"> </text:span><text:span text:style-name="T200">es</text:span><text:span text:style-name="T199"> </text:span><text:span text:style-name="T200">vol</text:span><text:span text:style-name="T199"> </text:span><text:span text:style-name="T200">estar</text:span><text:span text:style-name="T199"> </text:span><text:span text:style-name="T200">informat</text:span><text:span text:style-name="T199"> </text:span><text:span text:style-name="T200">de</text:span><text:span text:style-name="T199"> </text:span><text:span text:style-name="T200">les</text:span><text:span text:style-name="T199"> </text:span><text:span text:style-name="T200">peticions</text:span><text:span text:style-name="T199"> </text:span><text:span text:style-name="T200">que</text:span><text:span text:style-name="T199"> </text:span><text:span text:style-name="T200">es</text:span><text:span text:style-name="T199"> fan a l'Arxiu</text:span></text:p>
            <text:p text:style-name="P129"><text:s/>* </text:p>
            <text:p text:style-name="P129"><text:s/>*/</text:p>
            <text:p text:style-name="P55"><text:span text:style-name="T47">public</text:span><text:span text:style-name="T57"> </text:span><text:span text:style-name="T47">interface</text:span><text:span text:style-name="T57"> </text:span><text:span text:style-name="T58">ArxiuPluginListener</text:span><text:span text:style-name="T57"> {<text:tab/></text:span></text:p>
            <text:p text:style-name="P82"><text:tab/></text:p>
            <text:p text:style-name="P55"><text:span text:style-name="T57"><text:tab/></text:span><text:span text:style-name="T199">/** </text:span><text:span text:style-name="T200">Mètode</text:span><text:span text:style-name="T199"> per </text:span><text:span text:style-name="T200">notificar</text:span><text:span text:style-name="T199"> </text:span><text:span text:style-name="T200">les</text:span><text:span text:style-name="T199"> </text:span><text:span text:style-name="T200">crides</text:span><text:span text:style-name="T199"> </text:span><text:span text:style-name="T200">fetes</text:span><text:span text:style-name="T199"> a l'arxiu, els </text:span><text:span text:style-name="T200">paràmetres</text:span><text:span text:style-name="T199">, el </text:span><text:span text:style-name="T200">resultat</text:span><text:span text:style-name="T199"> i el </text:span><text:span text:style-name="T200">temps</text:span><text:span text:style-name="T199"> </text:span><text:span text:style-name="T200">de</text:span><text:span text:style-name="T199"> </text:span><text:span text:style-name="T200">la</text:span><text:span text:style-name="T199"> </text:span><text:span text:style-name="T200">petició</text:span></text:p>
            <text:p text:style-name="P129"><text:tab/> * </text:p>
            <text:p text:style-name="P55"><text:span text:style-name="T199"><text:tab/> * </text:span><text:span text:style-name="T202">@param</text:span><text:span text:style-name="T199"> metode</text:span></text:p>
            <text:p text:style-name="P55"><text:span text:style-name="T199"><text:tab/> * <text:tab/><text:tab/><text:tab/></text:span><text:span text:style-name="T200">Mètode</text:span><text:span text:style-name="T199"> </text:span><text:span text:style-name="T200">invocat</text:span></text:p>
            <text:p text:style-name="P55"><text:span text:style-name="T199"><text:tab/> * </text:span><text:span text:style-name="T202">@param</text:span><text:span text:style-name="T199"> parametres</text:span></text:p>
            <text:p text:style-name="P55"><text:span text:style-name="T199"><text:tab/> * <text:tab/><text:tab/><text:tab/></text:span><text:span text:style-name="T200">Paràmetres</text:span><text:span text:style-name="T199"> </text:span><text:span text:style-name="T200">més</text:span><text:span text:style-name="T199"> </text:span><text:span text:style-name="T200">representatius</text:span></text:p>
            <text:p text:style-name="P55"><text:span text:style-name="T199"><text:tab/> * </text:span><text:span text:style-name="T202">@param</text:span><text:span text:style-name="T199"> correcte</text:span></text:p>
            <text:p text:style-name="P55"><text:span text:style-name="T199"><text:tab/> * <text:tab/><text:tab/><text:tab/></text:span><text:span text:style-name="T200">Resultat</text:span><text:span text:style-name="T199"> </text:span><text:span text:style-name="T200">correcte</text:span></text:p>
            <text:p text:style-name="P55"><text:span text:style-name="T199"><text:tab/> * </text:span><text:span text:style-name="T202">@param</text:span><text:span text:style-name="T199"> error</text:span></text:p>
            <text:p text:style-name="P55"><text:soft-page-break/><text:span text:style-name="T199"><text:tab/> * <text:tab/><text:tab/><text:tab/></text:span><text:span text:style-name="T200">Descripció</text:span><text:span text:style-name="T199"> </text:span><text:span text:style-name="T200">de</text:span><text:span text:style-name="T199"> l'error </text:span><text:span text:style-name="T200">en</text:span><text:span text:style-name="T199"> </text:span><text:span text:style-name="T200">cas</text:span><text:span text:style-name="T199"> d'error</text:span></text:p>
            <text:p text:style-name="P55"><text:span text:style-name="T199"><text:tab/> * </text:span><text:span text:style-name="T202">@param</text:span><text:span text:style-name="T199"> e</text:span></text:p>
            <text:p text:style-name="P55"><text:span text:style-name="T199"><text:tab/> * <text:tab/><text:tab/><text:tab/></text:span><text:span text:style-name="T200">Excepció</text:span><text:span text:style-name="T199"> </text:span><text:span text:style-name="T200">en</text:span><text:span text:style-name="T199"> </text:span><text:span text:style-name="T200">cas</text:span><text:span text:style-name="T199"> </text:span><text:span text:style-name="T200">de</text:span><text:span text:style-name="T199"> </text:span><text:span text:style-name="T200">produir</text:span><text:span text:style-name="T204">-</text:span><text:span text:style-name="T200">se</text:span><text:span text:style-name="T199"> </text:span><text:span text:style-name="T200">una</text:span><text:span text:style-name="T199"> </text:span><text:span text:style-name="T200">excepció</text:span></text:p>
            <text:p text:style-name="P55"><text:span text:style-name="T199"><text:tab/> * </text:span><text:span text:style-name="T202">@param</text:span><text:span text:style-name="T199"> timeMs</text:span></text:p>
            <text:p text:style-name="P55"><text:span text:style-name="T199"><text:tab/> * <text:tab/><text:tab/><text:tab/></text:span><text:span text:style-name="T200">Temps</text:span><text:span text:style-name="T199"> </text:span><text:span text:style-name="T200">en</text:span><text:span text:style-name="T199"> </text:span><text:span text:style-name="T200">ms</text:span><text:span text:style-name="T199"> </text:span><text:span text:style-name="T200">transcorreguts</text:span><text:span text:style-name="T199"> </text:span><text:span text:style-name="T200">en</text:span><text:span text:style-name="T199"> </text:span><text:span text:style-name="T200">la</text:span><text:span text:style-name="T199"> </text:span><text:span text:style-name="T200">crida</text:span></text:p>
            <text:p text:style-name="P129"><text:tab/> */</text:p>
            <text:p text:style-name="P55"><text:span text:style-name="T57"><text:tab/></text:span><text:span text:style-name="T47">public</text:span><text:span text:style-name="T57"> </text:span><text:span text:style-name="T47">void</text:span><text:span text:style-name="T57"> event(String </text:span><text:span text:style-name="T82">metode</text:span><text:span text:style-name="T57">, Map&lt;String, String&gt; </text:span><text:span text:style-name="T82">parametres</text:span><text:span text:style-name="T57">, </text:span><text:span text:style-name="T47">boolean</text:span><text:span text:style-name="T57"> </text:span><text:span text:style-name="T82">correcte</text:span><text:span text:style-name="T57">, String </text:span><text:span text:style-name="T82">error</text:span><text:span text:style-name="T57">, Exception </text:span><text:span text:style-name="T82">e</text:span><text:span text:style-name="T57">, </text:span><text:span text:style-name="T47">long</text:span><text:span text:style-name="T57"> </text:span><text:span text:style-name="T82">timeMs</text:span><text:span text:style-name="T57">);</text:span></text:p>
            <text:p text:style-name="P180"/>
            <text:p text:style-name="P81">}</text:p>
          </table:table-cell>
        </table:table-row>
      </table:table>
      <text:p text:style-name="P69"/>
      <text:list xml:id="list155551414412348" text:continue-list="list155549355744108" text:style-name="Outline">
        <text:list-item>
          <text:list>
            <text:list-item>
              <text:list>
                <text:list-item>
                  <text:h text:style-name="P417" text:outline-level="3"><text:bookmark-start text:name="__RefHeading___Toc50908_2907556958"/><text:span text:style-name="T197">Ús de </text:span><text:span text:style-name="T231">B</text:span><text:span text:style-name="T232">ackofficeArxiuUtils</text:span><text:bookmark-end text:name="__RefHeading___Toc50908_2907556958"/></text:h>
                </text:list-item>
              </text:list>
            </text:list-item>
          </text:list>
        </text:list-item>
      </text:list>
      <text:p text:style-name="P131"><text:span text:style-name="T205">Per utilitzar la </text:span><text:span text:style-name="T233">classe</text:span><text:span text:style-name="T140"> BackofficeArxiuUtils</text:span><text:span text:style-name="T177"> amb les u</text:span><text:span text:style-name="T181">t</text:span><text:span text:style-name="T177">ilitats per l'A</text:span><text:span text:style-name="T179">r</text:span><text:span text:style-name="T177">xiu</text:span><text:span text:style-name="T130"> </text:span><text:span text:style-name="T205">s'ha de crear un objecte de la classe </text:span><text:span text:style-name="T130">BackofficeArxiuUtilsImpl</text:span><text:span text:style-name="T160"> amb la referència al plugin d'Arxiu </text:span><text:span text:style-name="T130">IPluginArxiu</text:span><text:span text:style-name="T160">, consultar el detall de l'anotació de registre mitjançant la llibreria del client de WS de DISTRIBUCIO </text:span><text:span text:style-name="T130">distribucio-ws-client</text:span><text:span text:style-name="T160"> i invocar el mètode <text:s/></text:span><text:span text:style-name="T137">crearExpedientAmbAnotacioDeRegistre</text:span><text:span text:style-name="T130"> </text:span><text:span text:style-name="T161">amb la informació de l'expedient a crear o a modificar.</text:span><text:span text:style-name="T162">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74">passades com a paràmetres</text:span><text:span text:style-name="T162">.</text:span><text:span text:style-name="T161">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63"><text:span text:style-name="T161">A</text:span><text:span text:style-name="T153"> continuació es mostra el diagrama de classes pel resultat de la crida.</text:span></text:p>
      <text:p text:style-name="P70"><draw:frame draw:style-name="fr2" draw:name="Frame2" text:anchor-type="paragraph" svg:x="0cm" svg:y="0.153cm" svg:width="17cm" draw:z-index="57"><draw:text-box fo:min-height="9.454cm"><text:p text:style-name="Fig."><draw:frame draw:style-name="fr6" draw:name="Image3" text:anchor-type="as-char" svg:width="17cm" style:rel-width="100%" svg:height="9.454cm" style:rel-height="scale" draw:z-index="78"><draw:image xlink:href="Pictures/10000001000002A400000178D62A6DD28F96FC43.png" xlink:type="simple" xlink:show="embed" xlink:actuate="onLoad" draw:mime-type="image/png"/></draw:frame><text:span text:style-name="T224"><text:line-break/></text:span>Fig. <text:sequence text:ref-name="refFig.3" text:name="Fig." text:formula="ooow:Fig.+1" style:num-format="1">4</text:sequence>: Classes per contenir el resultat de la crida al mètode crearExpedientAmbAnotacioDeRegistre.</text:p></draw:text-box></draw:frame><text:soft-page-break/></text:p>
      <text:p text:style-name="P131"><text:span text:style-name="T175">S</text:span><text:span text:style-name="T176">i el mètode falla en la creació de l'expedient o el traspàs dels interessats llavors el resultat contindrà l'error i els annexos no s'hauran traspassat.</text:span></text:p>
      <text:p text:style-name="P131"><text:span text:style-name="T176">Quan es traspassin els diferents annexos s'anirà informant el resultat per cada annex. L'usuari de la llibreria podrà consultar el resultat a partir del seu identificador d'Arxiu uuid original a partir del mètode </text:span><text:span text:style-name="T139">ArxiuResultat.getResultatAnnex(String uuid) </text:span><text:span text:style-name="T176">i obtenir el nou per en l'objecte</text:span><text:span text:style-name="T139"> ArxiuResultatAnnex</text:span><text:span text:style-name="T176"> amb el mètode getIdentificador</text:span><text:span text:style-name="T139">()</text:span><text:span text:style-name="T176">. L'objecte de tipus </text:span><text:span text:style-name="T139">ArxiuResultatAnnex</text:span><text:span text:style-name="T176"> conté l'identificador de l'arxiu si s'ha mogut o existia, l'acció realitzada o la descripció de l'error en el cas que no s'hagi pogut moure. </text:span></text:p>
      <text:p text:style-name="P164"><text:span text:style-name="T171">L'aplicació </text:span><text:span text:style-name="T138">backoffice </text:span><text:span text:style-name="T171">ha d'implementar la seva lògica pròpia per incorporar la informació dels annexos en el seu propi sistema.</text:span></text:p>
      <text:list xml:id="list155550979079379" text:continue-numbering="true" text:style-name="Outline">
        <text:list-item>
          <text:list>
            <text:list-item>
              <text:list>
                <text:list-item>
                  <text:h text:style-name="P417" text:outline-level="3"><text:bookmark-start text:name="__RefHeading___Toc50910_2907556958"/>Exemple Java<text:bookmark-end text:name="__RefHeading___Toc50910_2907556958"/></text:h>
                </text:list-item>
              </text:list>
            </text:list-item>
          </text:list>
        </text:list-item>
      </text:list>
      <text:p text:style-name="P165">En el següent exemple de codi es mostra una imlementació del WS <text:span text:style-name="T206">de backoffice de DISTRIBUCIO que rep peticions d'anotacions pendents des de DISTRIBUCIO i les processa amb la llibreria d'utilitats. El codi sencer es pot consultar a l' </text:span><text:span text:style-name="T206"><text:bookmark-ref text:reference-format="text" text:ref-name="__RefHeading___Toc60796_1326387233">Annex II: Exemple d'ús de la llibreria de distribucio-backoffice-utils</text:bookmark-ref></text:span><text:span text:style-name="T206">.</text:span></text:p>
      <text:p text:style-name="P166">La classe per a l'exemple és la implementació del WS que rep<text:span text:style-name="T207"> anotacions pendents de registre i té una referència al client del WS d'integració de DISTRIBUCIO per consultar anotacions i una instància del plugin de l'API de l'Arxiu.</text:span></text:p>
      <text:p text:style-name="P28">taula.<text:span text:style-name="T208"> Classe de proves per rebre peticions de WS en el mètode </text:span><text:span text:style-name="T148">comunicarAnotacionsPendents</text:span><text:span text:style-name="T208">.</text:span></text:p>
      <table:table table:name="Table5" table:style-name="Table5">
        <table:table-column table:style-name="Table5.A"/>
        <text:soft-page-break/>
        <table:table-row table:style-name="TableLine681456816">
          <table:table-cell table:style-name="Table5.A1" office:value-type="string">
            <text:p text:style-name="P112">@Component</text:p>
            <text:p text:style-name="P116"><text:span text:style-name="T105">@WebService</text:span><text:span text:style-name="T56">(</text:span></text:p>
            <text:p text:style-name="P116"><text:span text:style-name="T56"><text:tab/><text:tab/>name = </text:span><text:span text:style-name="T33">"Backoffice"</text:span><text:span text:style-name="T56">,</text:span></text:p>
            <text:p text:style-name="P116"><text:span text:style-name="T56"><text:tab/><text:tab/>serviceName = </text:span><text:span text:style-name="T33">"BackofficeService"</text:span><text:span text:style-name="T56">,</text:span></text:p>
            <text:p text:style-name="P116"><text:span text:style-name="T56"><text:tab/><text:tab/>portName = </text:span><text:span text:style-name="T33">"BackofficeServicePort"</text:span><text:span text:style-name="T56">,</text:span></text:p>
            <text:p text:style-name="P116"><text:span text:style-name="T56"><text:tab/><text:tab/>endpointInterface = </text:span><text:span text:style-name="T33">"es.caib.ripea.core.api.service.ws.BackofficeWsServiceBean"</text:span><text:span text:style-name="T56">,</text:span></text:p>
            <text:p text:style-name="P116"><text:span text:style-name="T56"><text:tab/><text:tab/>targetNamespace = </text:span><text:span text:style-name="T33">"http://www.caib.es/distribucio/ws/backoffice"</text:span><text:span text:style-name="T56">)</text:span></text:p>
            <text:p text:style-name="P116"><text:span text:style-name="T48">public</text:span><text:span text:style-name="T56"> </text:span><text:span text:style-name="T48">class</text:span><text:span text:style-name="T56"> BackofficeWsServiceImpl </text:span><text:span text:style-name="T48">implements</text:span><text:span text:style-name="T56"> BackofficeWsService, </text:span></text:p>
            <text:p text:style-name="P91"><text:tab/><text:tab/><text:tab/><text:tab/><text:tab/><text:tab/><text:tab/><text:tab/><text:tab/><text:tab/><text:tab/><text:tab/>ArxiuPluginListener {</text:p>
            <text:p text:style-name="P91"><text:tab/></text:p>
            <text:p text:style-name="P116"><text:span text:style-name="T56"><text:tab/></text:span><text:span text:style-name="T198">/** </text:span><text:span text:style-name="T201">Instància</text:span><text:span text:style-name="T198"> </text:span><text:span text:style-name="T201">del</text:span><text:span text:style-name="T198"> </text:span><text:span text:style-name="T201">plugin</text:span><text:span text:style-name="T198"> d'Arxiu */</text:span></text:p>
            <text:p text:style-name="P116"><text:span text:style-name="T56"><text:tab/></text:span><text:span text:style-name="T48">private</text:span><text:span text:style-name="T56"> IArxiuPlugin </text:span><text:span text:style-name="T75">arxiuPlugin</text:span><text:span text:style-name="T56"> = </text:span><text:span text:style-name="T48">null</text:span><text:span text:style-name="T56">;</text:span></text:p>
            <text:p text:style-name="P91"><text:tab/><text:tab/></text:p>
            <text:p text:style-name="P116"><text:span text:style-name="T56"><text:tab/></text:span><text:span text:style-name="T198">/** </text:span><text:span text:style-name="T201">Mètode</text:span><text:span text:style-name="T198"> </text:span><text:span text:style-name="T201">del</text:span><text:span text:style-name="T198"> WS </text:span><text:span text:style-name="T201">que</text:span><text:span text:style-name="T198"> </text:span><text:span text:style-name="T201">rep</text:span><text:span text:style-name="T198"> </text:span><text:span text:style-name="T201">les</text:span><text:span text:style-name="T198"> </text:span><text:span text:style-name="T201">comunicacions</text:span><text:span text:style-name="T198"> d'anotacions </text:span><text:span text:style-name="T201">pendents</text:span><text:span text:style-name="T198">. */</text:span></text:p>
            <text:p text:style-name="P116"><text:span text:style-name="T56"><text:tab/></text:span><text:span text:style-name="T105">@Override</text:span></text:p>
            <text:p text:style-name="P114"><text:span text:style-name="T56"><text:tab/></text:span><text:span text:style-name="T48">public</text:span><text:span text:style-name="T56"> </text:span><text:span text:style-name="T48">void</text:span><text:span text:style-name="T56"> </text:span><text:span text:style-name="T60">comunicarAnotacionsPendents</text:span><text:span text:style-name="T56">(List&lt;AnotacioRegistreId&gt; </text:span><text:span text:style-name="T81">ids</text:span><text:span text:style-name="T56">) {</text:span></text:p>
            <text:p text:style-name="P114"><text:span text:style-name="T56"><text:tab/><text:tab/></text:span><text:span text:style-name="T61">....</text:span></text:p>
            <text:p text:style-name="P87"><text:tab/>}</text:p>
            <text:p text:style-name="P87"><text:tab/>...</text:p>
            <text:p text:style-name="P87">}</text:p>
          </table:table-cell>
        </table:table-row>
      </table:table>
      <text:p text:style-name="P166"/>
      <text:p text:style-name="P131"><text:span text:style-name="T207">Dins del mètode <text:s/></text:span><text:span text:style-name="T149">comunicarAnotacionsPendents</text:span><text:span text:style-name="T189"> instancia el client del WS d'integració amb el Backoffice i el plugin de l'API de l'Arxiu</text:span><text:span text:style-name="T191"> i consulta l'anotació del registre d'entrada. En la següent porció de codi es pot veure com es crea l'objecte per a la llibreria d'utilitats del backoffice amb la referència al plugin d'Arxiu.</text:span></text:p>
      <text:p text:style-name="P28"><text:span text:style-name="T171">taula.</text:span><text:span text:style-name="T190"> Creació de l'objecte passant l'API d'Arxiu al constructor.</text:span></text:p>
      <table:table table:name="Table6" table:style-name="Table6">
        <table:table-column table:style-name="Table6.A"/>
        <table:table-row table:style-name="TableLine681455664">
          <table:table-cell table:style-name="Table6.A1" office:value-type="string">
            <text:p text:style-name="P118"><text:span text:style-name="T216">// </text:span><text:span text:style-name="T217">Prepara</text:span><text:span text:style-name="T216"> </text:span><text:span text:style-name="T217">la</text:span><text:span text:style-name="T216"> </text:span><text:span text:style-name="T217">cria</text:span><text:span text:style-name="T216"> a </text:span><text:span text:style-name="T217">la</text:span><text:span text:style-name="T216"> </text:span><text:span text:style-name="T217">llibreria</text:span><text:span text:style-name="T216"> d'utilitats </text:span><text:span text:style-name="T217">pel</text:span><text:span text:style-name="T216"> </text:span><text:span text:style-name="T217">backoffice</text:span><text:span text:style-name="T216"> </text:span><text:span text:style-name="T217">de</text:span><text:span text:style-name="T216"> DISTRIBUCIO</text:span></text:p>
            <text:p text:style-name="P119"><text:span text:style-name="T216">// Constructor </text:span><text:span text:style-name="T217">amb</text:span><text:span text:style-name="T216"> </text:span><text:span text:style-name="T217">la</text:span><text:span text:style-name="T216"> </text:span><text:span text:style-name="T217">referència</text:span><text:span text:style-name="T216"> </text:span><text:span text:style-name="T217">al</text:span><text:span text:style-name="T216"> </text:span><text:span text:style-name="T217">plugin</text:span><text:span text:style-name="T216"> d'Arxiu</text:span></text:p>
            <text:p text:style-name="P119"><text:span text:style-name="T56">BackofficeArxiuUtils </text:span><text:span text:style-name="T81">backoffice</text:span><text:span text:style-name="T88">Arxiu</text:span><text:span text:style-name="T81">Utils</text:span><text:span text:style-name="T56"> = </text:span><text:span text:style-name="T46">new</text:span><text:span text:style-name="T56"> BackofficeArxiuUtilsImpl(getArxiuPlugin());</text:span></text:p>
          </table:table-cell>
        </table:table-row>
      </table:table>
      <text:p text:style-name="P77"/>
      <text:p text:style-name="P76">La llibreria permet fixar el nom de la carpeta on es guardaran els annexos i un objecte de tipus <text:span text:style-name="T125">ArxiuPluginListener</text:span> si es volen rebre notificacions cada cop que es realitzi una acció d'integració amb l'Arxiu. </text:p>
      <text:p text:style-name="P76"/>
      <text:p text:style-name="P131"><text:span text:style-name="T193">taula.</text:span><text:span text:style-name="T191"> Propietat per fixar el nom de la carpeta i l'objecte </text:span><text:span text:style-name="T151">ArxiuPluginListener</text:span><text:span text:style-name="T191">.</text:span></text:p>
      <table:table table:name="Table7" table:style-name="Table7">
        <table:table-column table:style-name="Table7.A"/>
        <table:table-row table:style-name="TableLine681459120">
          <table:table-cell table:style-name="Table7.A1" office:value-type="string">
            <text:p text:style-name="P119"><text:span text:style-name="T216">// </text:span><text:span text:style-name="T217">Afegeix</text:span><text:span text:style-name="T216"> </text:span><text:span text:style-name="T217">la</text:span><text:span text:style-name="T216"> </text:span><text:span text:style-name="T217">instància</text:span><text:span text:style-name="T216"> </text:span><text:span text:style-name="T217">de</text:span><text:span text:style-name="T216"> </text:span><text:span text:style-name="T217">la</text:span><text:span text:style-name="T216"> </text:span><text:span text:style-name="T217">classe</text:span><text:span text:style-name="T216"> </text:span><text:span text:style-name="T217">com</text:span><text:span text:style-name="T216"> a </text:span><text:span text:style-name="T217">escoltador</text:span><text:span text:style-name="T216"> d'events</text:span></text:p>
            <text:p text:style-name="P119"><text:span text:style-name="T81">backofficeArxiuUtils</text:span><text:span text:style-name="T56">.setArxiuPluginListener(</text:span><text:span text:style-name="T46">this</text:span><text:span text:style-name="T56">);</text:span></text:p>
            <text:p text:style-name="P119"><text:span text:style-name="T216">// </text:span><text:span text:style-name="T217">Estableix</text:span><text:span text:style-name="T216"> </text:span><text:span text:style-name="T217">la</text:span><text:span text:style-name="T216"> </text:span><text:span text:style-name="T217">carpeta</text:span><text:span text:style-name="T216"> on </text:span><text:span text:style-name="T217">guardar</text:span><text:span text:style-name="T216"> els </text:span><text:span text:style-name="T217">annexos</text:span><text:span text:style-name="T216"> </text:span><text:span text:style-name="T217">de</text:span><text:span text:style-name="T216"> l'anotació</text:span></text:p>
            <text:p text:style-name="P118"><text:span text:style-name="T81">backoffice</text:span><text:span text:style-name="T88">Arxiu</text:span><text:span text:style-name="T81">Utils</text:span><text:span text:style-name="T56">.setCarpeta(</text:span><text:span text:style-name="T83">anotacio</text:span><text:span text:style-name="T56">.getIdentificador());</text:span></text:p>
          </table:table-cell>
        </table:table-row>
      </table:table>
      <text:p text:style-name="P77"/>
      <text:p text:style-name="P168"><text:span text:style-name="T190">En el cas de l'exemple, la classe que implementa el WS també implementa </text:span><text:span text:style-name="T192">la interfície </text:span><text:span text:style-name="T152">ArxiuPluginListener</text:span><text:span text:style-name="T192"> amb el mètode </text:span><text:span text:style-name="T152">event</text:span><text:span text:style-name="T192"> per obtenir la informació de la crida al plugin de l'API de l'Arxiu.</text:span></text:p>
      <table:table table:name="Table8" table:style-name="Table8">
        <table:table-column table:style-name="Table8.A"/>
        <table:table-row table:style-name="TableLine681462000">
          <table:table-cell table:style-name="Table8.A1" office:value-type="string">
            <text:p text:style-name="P114"><text:span text:style-name="T48">public</text:span><text:span text:style-name="T56"> </text:span><text:span text:style-name="T48">class</text:span><text:span text:style-name="T56"> BackofficeWsServiceImpl </text:span><text:span text:style-name="T48">implements</text:span><text:span text:style-name="T56"> BackofficeWsService, , <text:tab/><text:tab/><text:tab/><text:tab/><text:tab/><text:tab/><text:tab/><text:tab/><text:tab/><text:tab/><text:tab/></text:span><text:span text:style-name="T62">ArxiuPluginListener</text:span><text:span text:style-name="T56"> {</text:span></text:p>
            <text:p text:style-name="P88">...</text:p>
            <text:p text:style-name="P126"><text:tab/> /** Mètode que la llibreria del backoffice de distribució crida si es </text:p>
            <text:p text:style-name="P120"><text:span text:style-name="T198"><text:tab/> fixa una instància que implementa </text:span><text:span text:style-name="T222">{@link ArxiuPluginListener}</text:span><text:span text:style-name="T198">.</text:span></text:p>
            <text:p text:style-name="P127"><text:tab/> * </text:p>
            <text:p text:style-name="P127"><text:tab/> */</text:p>
            <text:p text:style-name="P116"><text:span text:style-name="T56"><text:tab/></text:span><text:span text:style-name="T105">@Override</text:span></text:p>
            <text:p text:style-name="P116"><text:span text:style-name="T56"><text:tab/></text:span><text:span text:style-name="T48">public</text:span><text:span text:style-name="T56"> </text:span><text:span text:style-name="T48">void</text:span><text:span text:style-name="T56"> </text:span><text:span text:style-name="T60">event</text:span><text:span text:style-name="T56">(</text:span></text:p>
            <text:p text:style-name="P116"><text:span text:style-name="T56"><text:tab/><text:tab/><text:tab/>String </text:span><text:span text:style-name="T81">metode</text:span><text:span text:style-name="T56">, </text:span></text:p>
            <text:p text:style-name="P116"><text:soft-page-break/><text:span text:style-name="T56"><text:tab/><text:tab/><text:tab/>Map&lt;String, String&gt; </text:span><text:span text:style-name="T81">parametres</text:span><text:span text:style-name="T56">, </text:span></text:p>
            <text:p text:style-name="P116"><text:span text:style-name="T56"><text:tab/><text:tab/><text:tab/></text:span><text:span text:style-name="T48">boolean</text:span><text:span text:style-name="T56"> </text:span><text:span text:style-name="T81">correcte</text:span><text:span text:style-name="T56">, </text:span></text:p>
            <text:p text:style-name="P116"><text:span text:style-name="T56"><text:tab/><text:tab/><text:tab/>String </text:span><text:span text:style-name="T81">error</text:span><text:span text:style-name="T56">, </text:span></text:p>
            <text:p text:style-name="P116"><text:span text:style-name="T56"><text:tab/><text:tab/><text:tab/>Exception </text:span><text:span text:style-name="T81">e</text:span><text:span text:style-name="T56">,</text:span></text:p>
            <text:p text:style-name="P116"><text:span text:style-name="T56"><text:tab/><text:tab/><text:tab/></text:span><text:span text:style-name="T48">long</text:span><text:span text:style-name="T56"> </text:span><text:span text:style-name="T81">timeMs</text:span><text:span text:style-name="T56">) {</text:span></text:p>
            <text:p text:style-name="P116"><text:span text:style-name="T56"><text:tab/><text:tab/>StringBuilder </text:span><text:span text:style-name="T81">str</text:span><text:span text:style-name="T56"> = </text:span><text:span text:style-name="T48">new</text:span><text:span text:style-name="T56"> StringBuilder()</text:span></text:p>
            <text:p text:style-name="P116"><text:span text:style-name="T56"><text:tab/><text:tab/><text:tab/><text:tab/>.append(</text:span><text:span text:style-name="T33">"S'ha invocat el mètode \""</text:span><text:span text:style-name="T56">)</text:span></text:p>
            <text:p text:style-name="P116"><text:span text:style-name="T56"><text:tab/><text:tab/><text:tab/><text:tab/>.append(</text:span><text:span text:style-name="T81">metode</text:span><text:span text:style-name="T56">)</text:span></text:p>
            <text:p text:style-name="P116"><text:span text:style-name="T56"><text:tab/><text:tab/><text:tab/><text:tab/>.append(</text:span><text:span text:style-name="T33">"\" amb els paràmetres {"</text:span><text:span text:style-name="T56">);</text:span></text:p>
            <text:p text:style-name="P116"><text:span text:style-name="T56"><text:tab/><text:tab/></text:span><text:span text:style-name="T48">int</text:span><text:span text:style-name="T56"> </text:span><text:span text:style-name="T81">i</text:span><text:span text:style-name="T56"> = 0;</text:span></text:p>
            <text:p text:style-name="P116"><text:span text:style-name="T56"><text:tab/><text:tab/></text:span><text:span text:style-name="T48">for</text:span><text:span text:style-name="T56"> (String </text:span><text:span text:style-name="T81">key</text:span><text:span text:style-name="T56"> : </text:span><text:span text:style-name="T81">parametres</text:span><text:span text:style-name="T56">.keySet()) {</text:span></text:p>
            <text:p text:style-name="P116"><text:span text:style-name="T56"><text:tab/><text:tab/><text:tab/></text:span><text:span text:style-name="T81">str</text:span><text:span text:style-name="T56">.append(</text:span><text:span text:style-name="T81">key</text:span><text:span text:style-name="T56">).append(</text:span><text:span text:style-name="T33">"="</text:span><text:span text:style-name="T56">).append(</text:span><text:span text:style-name="T81">parametres</text:span><text:span text:style-name="T56">.get(</text:span><text:span text:style-name="T81">key</text:span><text:span text:style-name="T56">));</text:span></text:p>
            <text:p text:style-name="P116"><text:span text:style-name="T56"><text:tab/><text:tab/><text:tab/></text:span><text:span text:style-name="T81">i</text:span><text:span text:style-name="T56">++;</text:span></text:p>
            <text:p text:style-name="P116"><text:span text:style-name="T56"><text:tab/><text:tab/><text:tab/></text:span><text:span text:style-name="T48">if</text:span><text:span text:style-name="T56"> (</text:span><text:span text:style-name="T81">i</text:span><text:span text:style-name="T56">&lt;</text:span><text:span text:style-name="T81">parametres</text:span><text:span text:style-name="T56">.size())</text:span></text:p>
            <text:p text:style-name="P116"><text:span text:style-name="T56"><text:tab/><text:tab/><text:tab/><text:tab/></text:span><text:span text:style-name="T81">str</text:span><text:span text:style-name="T56">.append(</text:span><text:span text:style-name="T33">", "</text:span><text:span text:style-name="T56">);</text:span></text:p>
            <text:p text:style-name="P91"><text:tab/><text:tab/>}</text:p>
            <text:p text:style-name="P116"><text:span text:style-name="T56"><text:tab/><text:tab/></text:span><text:span text:style-name="T81">str</text:span><text:span text:style-name="T56">.append(</text:span><text:span text:style-name="T33">"} amb resultat "</text:span><text:span text:style-name="T56">).append(</text:span><text:span text:style-name="T81">correcte</text:span><text:span text:style-name="T56"> ? </text:span><text:span text:style-name="T33">"OK"</text:span><text:span text:style-name="T56"> : </text:span><text:span text:style-name="T33">"KO"</text:span><text:span text:style-name="T56">);</text:span></text:p>
            <text:p text:style-name="P116"><text:span text:style-name="T56"><text:tab/><text:tab/></text:span><text:span text:style-name="T48">if</text:span><text:span text:style-name="T56"> (</text:span><text:span text:style-name="T81">error</text:span><text:span text:style-name="T56"> != </text:span><text:span text:style-name="T48">null</text:span><text:span text:style-name="T56">)</text:span></text:p>
            <text:p text:style-name="P116"><text:span text:style-name="T56"><text:tab/><text:tab/><text:tab/></text:span><text:span text:style-name="T81">str</text:span><text:span text:style-name="T56">.append(</text:span><text:span text:style-name="T33">": "</text:span><text:span text:style-name="T56">).append(</text:span><text:span text:style-name="T81">error</text:span><text:span text:style-name="T56">);</text:span></text:p>
            <text:p text:style-name="P116"><text:span text:style-name="T56"><text:tab/><text:tab/></text:span><text:span text:style-name="T48">if</text:span><text:span text:style-name="T56"> (</text:span><text:span text:style-name="T81">e</text:span><text:span text:style-name="T56"> != </text:span><text:span text:style-name="T48">null</text:span><text:span text:style-name="T56">)</text:span></text:p>
            <text:p text:style-name="P116"><text:span text:style-name="T56"><text:tab/><text:tab/><text:tab/></text:span><text:span text:style-name="T81">str</text:span><text:span text:style-name="T56">.append(</text:span><text:span text:style-name="T33">" "</text:span><text:span text:style-name="T56">).append(</text:span><text:span text:style-name="T81">e</text:span><text:span text:style-name="T56">.getClass()).append(</text:span><text:span text:style-name="T33">" "</text:span><text:span text:style-name="T56">).append(</text:span><text:span text:style-name="T81">e</text:span><text:span text:style-name="T56">.getMessage());</text:span></text:p>
            <text:p text:style-name="P116"><text:span text:style-name="T56"><text:tab/><text:tab/></text:span><text:span text:style-name="T81">str</text:span><text:span text:style-name="T56">.append(</text:span><text:span text:style-name="T33">" "</text:span><text:span text:style-name="T56">).append(</text:span><text:span text:style-name="T81">timeMs</text:span><text:span text:style-name="T56">).append(</text:span><text:span text:style-name="T33">"ms"</text:span><text:span text:style-name="T56">);</text:span></text:p>
            <text:p text:style-name="P91"><text:tab/><text:tab/></text:p>
            <text:p text:style-name="P116"><text:span text:style-name="T56"><text:tab/><text:tab/></text:span><text:span text:style-name="T76">logger</text:span><text:span text:style-name="T56">.debug(</text:span><text:span text:style-name="T81">str</text:span><text:span text:style-name="T56">.toString());</text:span></text:p>
            <text:p text:style-name="P88"><text:tab/>}</text:p>
            <text:p text:style-name="P88">...</text:p>
            <text:p text:style-name="P88">}</text:p>
          </table:table-cell>
        </table:table-row>
      </table:table>
      <text:p text:style-name="P78"/>
      <text:p text:style-name="P169"><text:span text:style-name="T192">E</text:span><text:span text:style-name="T190">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9"><text:span text:style-name="T171">taula.</text:span><text:span text:style-name="T190"> Crida al mètode </text:span><text:span text:style-name="T150">crearExpedientAmbAnotacioRegistre</text:span><text:span text:style-name="T190">.</text:span></text:p>
      <table:table table:name="Table9" table:style-name="Table9">
        <table:table-column table:style-name="Table9.A"/>
        <table:table-row table:style-name="TableLine681560496">
          <table:table-cell table:style-name="Table9.A1" office:value-type="string">
            <text:p text:style-name="P114"><text:span text:style-name="T216">/</text:span><text:span text:style-name="T218">/ Crida a la creació de l'expedient</text:span></text:p>
            <text:p text:style-name="P123"><text:span text:style-name="T56">String </text:span><text:span text:style-name="T81">SERIE_DOCUMENTAL</text:span><text:span text:style-name="T56"> = </text:span><text:span text:style-name="T33">"S0002"</text:span><text:span text:style-name="T56">; </text:span></text:p>
            <text:p text:style-name="P123"><text:span text:style-name="T56">String </text:span><text:span text:style-name="T81">CLASSIFICACIO</text:span><text:span text:style-name="T56"> = </text:span><text:span text:style-name="T33">"000000"</text:span><text:span text:style-name="T56">;</text:span></text:p>
            <text:p text:style-name="P123"><text:span text:style-name="T56">ArxiuResultat </text:span><text:span text:style-name="T81">arxiuResultat</text:span><text:span text:style-name="T56">;</text:span></text:p>
            <text:p text:style-name="P123"><text:span text:style-name="T48">int</text:span><text:span text:style-name="T56"> </text:span><text:span text:style-name="T81">intent</text:span><text:span text:style-name="T56"> = 0;</text:span></text:p>
            <text:p text:style-name="P123"><text:span text:style-name="T56">String </text:span><text:span text:style-name="T81">expedientUuid</text:span><text:span text:style-name="T56"> = </text:span><text:span text:style-name="T48">null</text:span><text:span text:style-name="T56">;</text:span></text:p>
            <text:p text:style-name="P123"><text:span text:style-name="T48">do</text:span><text:span text:style-name="T56"> {</text:span></text:p>
            <text:p text:style-name="P123"><text:span text:style-name="T56"><text:tab/></text:span><text:span text:style-name="T216">// Crida al mètode de creació de la llibreria</text:span></text:p>
            <text:p text:style-name="P123"><text:span text:style-name="T56"><text:tab/></text:span><text:span text:style-name="T81">arxiuResultat</text:span><text:span text:style-name="T56"> = </text:span><text:span text:style-name="T81">BackofficeArxiuUtils</text:span><text:span text:style-name="T56">.crearExpedientAmbAnotacioRegistre(</text:span></text:p>
            <text:p text:style-name="P123"><text:span text:style-name="T56"><text:tab/><text:tab/><text:tab/><text:tab/><text:tab/><text:tab/><text:tab/><text:tab/></text:span><text:span text:style-name="T81">expedientUuid</text:span><text:span text:style-name="T56">,</text:span></text:p>
            <text:p text:style-name="P123"><text:span text:style-name="T56"><text:tab/><text:tab/><text:tab/><text:tab/><text:tab/><text:tab/><text:tab/><text:tab/></text:span><text:span text:style-name="T81">anotacio</text:span><text:span text:style-name="T56">.getIdentificador(),</text:span></text:p>
            <text:p text:style-name="P123"><text:span text:style-name="T56"><text:tab/><text:tab/><text:tab/><text:tab/><text:tab/><text:tab/><text:tab/><text:tab/></text:span><text:span text:style-name="T48">null</text:span><text:span text:style-name="T56">,</text:span></text:p>
            <text:p text:style-name="P123"><text:span text:style-name="T56"><text:tab/><text:tab/><text:tab/><text:tab/><text:tab/><text:tab/><text:tab/><text:tab/>Arrays.</text:span><text:span text:style-name="T63">asList</text:span><text:span text:style-name="T56">(</text:span><text:span text:style-name="T33">"A04019281"</text:span><text:span text:style-name="T56">),</text:span></text:p>
            <text:p text:style-name="P123"><text:span text:style-name="T56"><text:tab/><text:tab/><text:tab/><text:tab/><text:tab/><text:tab/><text:tab/><text:tab/></text:span><text:span text:style-name="T48">new</text:span><text:span text:style-name="T56"> Date(),</text:span></text:p>
            <text:p text:style-name="P123"><text:span text:style-name="T56"><text:tab/><text:tab/><text:tab/><text:tab/><text:tab/><text:tab/><text:tab/><text:tab/></text:span><text:span text:style-name="T81">CLASSIFICACIO</text:span><text:span text:style-name="T56">,</text:span></text:p>
            <text:p text:style-name="P123"><text:span text:style-name="T56"><text:tab/><text:tab/><text:tab/><text:tab/><text:tab/><text:tab/><text:tab/><text:tab/>ExpedientEstatEnumDto.</text:span><text:span text:style-name="T76">OBERT</text:span><text:span text:style-name="T56">,</text:span></text:p>
            <text:p text:style-name="P123"><text:span text:style-name="T56"><text:tab/><text:tab/><text:tab/><text:tab/><text:tab/><text:tab/><text:tab/><text:tab/></text:span><text:span text:style-name="T81">SERIE_DOCUMENTAL</text:span><text:span text:style-name="T56">,</text:span></text:p>
            <text:p text:style-name="P123"><text:span text:style-name="T56"><text:tab/><text:tab/><text:tab/><text:tab/><text:tab/><text:tab/><text:tab/><text:tab/></text:span><text:span text:style-name="T81">anotacio</text:span><text:span text:style-name="T56">);</text:span></text:p>
            <text:p text:style-name="P123"><text:span text:style-name="T56"><text:tab/></text:span><text:span text:style-name="T81">expedientUuid</text:span><text:span text:style-name="T56"> = </text:span><text:span text:style-name="T81">arxiuResultat</text:span><text:span text:style-name="T56">.getIdentificadorExpedient();</text:span></text:p>
            <text:p text:style-name="P123"><text:span text:style-name="T56"><text:tab/></text:span><text:span text:style-name="T216">// Imprimeix el resultat per pantalla</text:span></text:p>
            <text:p text:style-name="P123"><text:span text:style-name="T56"><text:tab/></text:span><text:span text:style-name="T48">this</text:span><text:span text:style-name="T56">.logResultat(</text:span></text:p>
            <text:p text:style-name="P123"><text:span text:style-name="T56"><text:tab/><text:tab/><text:tab/></text:span><text:span text:style-name="T33">"Resultat de la crida "</text:span><text:span text:style-name="T56"> + </text:span><text:span text:style-name="T81">intent</text:span><text:span text:style-name="T56">++ + </text:span><text:span text:style-name="T33">" crearExpedientAmbAnotacioRegistre per l'expedient"</text:span><text:span text:style-name="T56"> + </text:span><text:span text:style-name="T81">anotacio</text:span><text:span text:style-name="T56">.getExpedientNumero(),</text:span></text:p>
            <text:p text:style-name="P123"><text:span text:style-name="T56"><text:tab/><text:tab/><text:tab/></text:span><text:span text:style-name="T81">arxiuResultat</text:span><text:span text:style-name="T56">);<text:tab/><text:tab/><text:tab/><text:tab/><text:tab/></text:span></text:p>
            <text:p text:style-name="P42"><text:span text:style-name="T64">} </text:span><text:span text:style-name="T49">while</text:span><text:span text:style-name="T64">(</text:span><text:span text:style-name="T84">arxiuResultat</text:span><text:span text:style-name="T64">.getErrorCodi() !=</text:span><text:span text:style-name="T65"> Distri</text:span><text:span text:style-name="T66">bucioArxiuError.</text:span><text:span text:style-name="T78">NO_ERROR</text:span><text:span text:style-name="T66"> &amp;&amp; </text:span><text:span text:style-name="T86">in</text:span><text:span text:style-name="T87">tent</text:span><text:span text:style-name="T67"> &lt; 10);<text:tab/></text:span></text:p>
          </table:table-cell>
        </table:table-row>
      </table:table>
      <text:p text:style-name="P79"/>
      <text:p text:style-name="P169"><text:span text:style-name="T190">A mode informatiu a l'exemple s'imprimeix als logs el contingut de l'objecte </text:span><text:span text:style-name="T150">arxiuResultat</text:span><text:span text:style-name="T190"> amb el mètode </text:span><text:span text:style-name="T150">logResultat</text:span><text:span text:style-name="T190">.</text:span></text:p>
      <table:table table:name="Table10" table:style-name="Table10">
        <table:table-column table:style-name="Table10.A"/>
        <text:soft-page-break/>
        <table:table-row table:style-name="TableLine681559344">
          <table:table-cell table:style-name="Table10.A1" office:value-type="string">
            <text:p text:style-name="P121"><text:span text:style-name="T48">private</text:span><text:span text:style-name="T56"> </text:span><text:span text:style-name="T48">void</text:span><text:span text:style-name="T56"> </text:span><text:span text:style-name="T60">logResultat</text:span><text:span text:style-name="T56">(String </text:span><text:span text:style-name="T81">descripcio</text:span><text:span text:style-name="T56">, ArxiuResultat </text:span><text:span text:style-name="T81">arxiuResultat</text:span><text:span text:style-name="T56">) {</text:span></text:p>
            <text:p text:style-name="P123"><text:span text:style-name="T56"><text:tab/></text:span><text:span text:style-name="T76">logger</text:span><text:span text:style-name="T56">.debug(</text:span><text:span text:style-name="T81">descripcio</text:span><text:span text:style-name="T56">);</text:span></text:p>
            <text:p text:style-name="P123"><text:span text:style-name="T56"><text:tab/></text:span><text:span text:style-name="T216">// Resultat a nivell d'expedient</text:span></text:p>
            <text:p text:style-name="P123"><text:span text:style-name="T56"><text:tab/></text:span><text:span text:style-name="T76">logger</text:span><text:span text:style-name="T56">.debug(</text:span><text:span text:style-name="T33">"- uuid: "</text:span><text:span text:style-name="T56"> + </text:span><text:span text:style-name="T81">arxiuResultat</text:span><text:span text:style-name="T56">.getIdentificadorExpedient());</text:span></text:p>
            <text:p text:style-name="P123"><text:span text:style-name="T56"><text:tab/></text:span><text:span text:style-name="T76">logger</text:span><text:span text:style-name="T56">.debug(</text:span><text:span text:style-name="T33">"- accio: "</text:span><text:span text:style-name="T56"> + </text:span><text:span text:style-name="T81">arxiuResultat</text:span><text:span text:style-name="T56">.getAccio());</text:span></text:p>
            <text:p text:style-name="P123"><text:span text:style-name="T56"><text:tab/></text:span><text:span text:style-name="T76">logger</text:span><text:span text:style-name="T56">.debug(</text:span><text:span text:style-name="T33">"- errorCodi: "</text:span><text:span text:style-name="T56"> + </text:span><text:span text:style-name="T81">arxiuResultat</text:span><text:span text:style-name="T56">.getErrorCodi());</text:span></text:p>
            <text:p text:style-name="P123"><text:span text:style-name="T56"><text:tab/></text:span><text:span text:style-name="T76">logger</text:span><text:span text:style-name="T56">.debug(</text:span><text:span text:style-name="T33">"- errorMessage: "</text:span><text:span text:style-name="T56"> + </text:span><text:span text:style-name="T81">arxiuResultat</text:span><text:span text:style-name="T56">.getErrorMessage());</text:span></text:p>
            <text:p text:style-name="P123"><text:span text:style-name="T56"><text:tab/></text:span><text:span text:style-name="T76">logger</text:span><text:span text:style-name="T56">.debug(</text:span><text:span text:style-name="T33">"- excepcio: "</text:span><text:span text:style-name="T56"> + (</text:span><text:span text:style-name="T81">arxiuResultat</text:span><text:span text:style-name="T56">.getException() != </text:span><text:span text:style-name="T48">null</text:span><text:span text:style-name="T56">? </text:span><text:span text:style-name="T81">arxiuResultat</text:span><text:span text:style-name="T56">.getException().getClass() + </text:span><text:span text:style-name="T33">" "</text:span><text:span text:style-name="T56"> + </text:span><text:span text:style-name="T81">arxiuResultat</text:span><text:span text:style-name="T56">.getException().getMessage() : <text:s/></text:span><text:span text:style-name="T33">" - "</text:span><text:span text:style-name="T56">));</text:span></text:p>
            <text:p text:style-name="P182"/>
            <text:p text:style-name="P123"><text:span text:style-name="T56"><text:tab/></text:span><text:span text:style-name="T216">// Resultat pels annexos</text:span></text:p>
            <text:p text:style-name="P123"><text:span text:style-name="T56"><text:tab/>List&lt;ArxiuResultatAnnex&gt; </text:span><text:span text:style-name="T81">resultatAnnexos</text:span><text:span text:style-name="T56"> = </text:span><text:span text:style-name="T81">arxiuResultat</text:span><text:span text:style-name="T56">.getResultatAnnexos(); </text:span></text:p>
            <text:p text:style-name="P123"><text:span text:style-name="T56"><text:tab/></text:span><text:span text:style-name="T76">logger</text:span><text:span text:style-name="T56">.debug(</text:span><text:span text:style-name="T33">" - Resultat dels "</text:span><text:span text:style-name="T56"> + </text:span><text:span text:style-name="T81">resultatAnnexos</text:span><text:span text:style-name="T56">.size() + </text:span><text:span text:style-name="T33">" annexos:"</text:span><text:span text:style-name="T56">);</text:span></text:p>
            <text:p text:style-name="P123"><text:span text:style-name="T56"><text:tab/></text:span><text:span text:style-name="T48">for</text:span><text:span text:style-name="T56"> (ArxiuResultatAnnex </text:span><text:span text:style-name="T81">resultatAnnex</text:span><text:span text:style-name="T56"> : </text:span><text:span text:style-name="T81">resultatAnnexos</text:span><text:span text:style-name="T56">) {</text:span></text:p>
            <text:p text:style-name="P123"><text:span text:style-name="T56"><text:tab/><text:tab/></text:span><text:span text:style-name="T76">logger</text:span><text:span text:style-name="T56">.debug(</text:span><text:span text:style-name="T33">"\b- uuid: "</text:span><text:span text:style-name="T56"> + </text:span><text:span text:style-name="T81">resultatAnnex</text:span><text:span text:style-name="T56">.getIdentificadorAnnex());</text:span></text:p>
            <text:p text:style-name="P123"><text:span text:style-name="T56"><text:tab/><text:tab/></text:span><text:span text:style-name="T76">logger</text:span><text:span text:style-name="T56">.debug(</text:span><text:span text:style-name="T33">"\\b- accio: "</text:span><text:span text:style-name="T56"> + </text:span><text:span text:style-name="T81">resultatAnnex</text:span><text:span text:style-name="T56">.getAccio());</text:span></text:p>
            <text:p text:style-name="P123"><text:span text:style-name="T56"><text:tab/><text:tab/></text:span><text:span text:style-name="T76">logger</text:span><text:span text:style-name="T56">.debug(</text:span><text:span text:style-name="T33">"\\b- errorCodi: "</text:span><text:span text:style-name="T56"> + </text:span><text:span text:style-name="T81">resultatAnnex</text:span><text:span text:style-name="T56">.getErrorCodi());</text:span></text:p>
            <text:p text:style-name="P123"><text:span text:style-name="T56"><text:tab/><text:tab/></text:span><text:span text:style-name="T76">logger</text:span><text:span text:style-name="T56">.debug(</text:span><text:span text:style-name="T33">"\\b- errorMessage: "</text:span><text:span text:style-name="T56"> + </text:span><text:span text:style-name="T81">resultatAnnex</text:span><text:span text:style-name="T56">.getErrorMessage());</text:span></text:p>
            <text:p text:style-name="P123"><text:span text:style-name="T56"><text:tab/><text:tab/></text:span><text:span text:style-name="T76">logger</text:span><text:span text:style-name="T56">.debug(</text:span><text:span text:style-name="T33">"\\b- excepcio: "</text:span><text:span text:style-name="T56"> + (</text:span><text:span text:style-name="T81">resultatAnnex</text:span><text:span text:style-name="T56">.getException() != </text:span><text:span text:style-name="T48">null</text:span><text:span text:style-name="T56">? </text:span><text:span text:style-name="T81">resultatAnnex</text:span><text:span text:style-name="T56">.getException().getClass() + </text:span><text:span text:style-name="T33">" "</text:span><text:span text:style-name="T56"> + </text:span><text:span text:style-name="T81">resultatAnnex</text:span><text:span text:style-name="T56">.getException().getMessage() : <text:s/></text:span><text:span text:style-name="T33">" - "</text:span><text:span text:style-name="T56">));</text:span></text:p>
            <text:p text:style-name="P96"><text:tab/>}</text:p>
            <text:p text:style-name="P94">}</text:p>
          </table:table-cell>
        </table:table-row>
      </table:table>
      <text:p text:style-name="P79"/>
      <text:p text:style-name="P79">En aquest punt ja s'ha utilitzat la llibreria d'integració per moure continguts i a l'Arxiu s'haurien de poder veure els expedients d'origen i final</text:p>
      <text:p text:style-name="P79"/>
      <text:p text:style-name="P79"><draw:frame draw:style-name="fr1" draw:name="Frame3" text:anchor-type="paragraph" svg:width="17cm" draw:z-index="54"><draw:text-box fo:min-height="9.73cm"><text:p text:style-name="Fig."><draw:frame draw:style-name="fr6" draw:name="Image4" text:anchor-type="as-char" svg:width="17cm" style:rel-width="100%" svg:height="9.73cm" style:rel-height="scale" draw:z-index="55"><draw:image xlink:href="Pictures/100000000000042F000002651464A6ADC9A970F9.png" xlink:type="simple" xlink:show="embed" xlink:actuate="onLoad" draw:mime-type="image/png"/></draw:frame><text:span text:style-name="T224"><text:line-break/></text:span>Fig. <text:sequence text:ref-name="refFig.4" text:name="Fig." text:formula="ooow:Fig.+1" style:num-format="1">5</text:sequence>: Expedient origen a l'Arxiu.</text:p></draw:text-box></draw:frame></text:p>
      <text:p text:style-name="P79"><draw:frame draw:style-name="fr1" draw:name="Frame4" text:anchor-type="paragraph" svg:width="17cm" draw:z-index="41"><draw:text-box fo:min-height="9.73cm"><text:p text:style-name="Fig."><draw:frame draw:style-name="fr6" draw:name="Image5" text:anchor-type="as-char" svg:width="17cm" style:rel-width="100%" svg:height="9.73cm" style:rel-height="scale" draw:z-index="42"><draw:image xlink:href="Pictures/100000000000042F00000265CF3198E9D454B4E5.png" xlink:type="simple" xlink:show="embed" xlink:actuate="onLoad" draw:mime-type="image/png"/></draw:frame><text:span text:style-name="T224"><text:line-break/></text:span>Fig. <text:sequence text:ref-name="refFig.5" text:name="Fig." text:formula="ooow:Fig.+1" style:num-format="1">6</text:sequence>: Expedient després de la crida al mètode de la llibreria d'utilitats<text:span text:style-name="T225">.</text:span></text:p></draw:text-box></draw:frame><text:soft-page-break/></text:p>
      <text:p text:style-name="P170">Per acabar es mostra la porció de codi que consulta el nou expedient i comunica l'estat a l'aplicació de DISTRIBUCIO<text:span text:style-name="T223"> segons el codi del resultat.</text:span></text:p>
      <table:table table:name="Table11" table:style-name="Table11">
        <table:table-column table:style-name="Table11.A"/>
        <table:table-row table:style-name="TableLine681559056">
          <table:table-cell table:style-name="Table11.A1" office:value-type="string">
            <text:p text:style-name="P114"><text:span text:style-name="T216">// </text:span><text:span text:style-name="T217">Consultem</text:span><text:span text:style-name="T216"> el </text:span><text:span text:style-name="T217">nou</text:span><text:span text:style-name="T216"> expedient a l'Arxiu</text:span></text:p>
            <text:p text:style-name="P116"><text:span text:style-name="T48">if</text:span><text:span text:style-name="T56"> (</text:span><text:span text:style-name="T81">expedientUuid</text:span><text:span text:style-name="T56"> != </text:span><text:span text:style-name="T48">null</text:span><text:span text:style-name="T56">) {</text:span></text:p>
            <text:p text:style-name="P116"><text:span text:style-name="T56"><text:tab/>Expedient </text:span><text:span text:style-name="T81">expedientDetalls</text:span><text:span text:style-name="T56"> = getArxiuPlugin().expedientDetalls(</text:span><text:span text:style-name="T81">arxiuResultat</text:span><text:span text:style-name="T56">.getIdentificadorExpedient(), </text:span><text:span text:style-name="T48">null</text:span><text:span text:style-name="T56">);</text:span></text:p>
            <text:p text:style-name="P116"><text:span text:style-name="T56"><text:tab/></text:span><text:span text:style-name="T76">logger</text:span><text:span text:style-name="T56">.debug(</text:span><text:span text:style-name="T33">"S'ha creat l'expedient \""</text:span><text:span text:style-name="T56"> + </text:span><text:span text:style-name="T81">expedientDetalls</text:span><text:span text:style-name="T56">.getNom() + </text:span><text:span text:style-name="T33">"\" amb id="</text:span><text:span text:style-name="T56"> + </text:span><text:span text:style-name="T81">expedientDetalls</text:span><text:span text:style-name="T56">.getIdentificador() + </text:span><text:span text:style-name="T33">" per l'anotació "</text:span><text:span text:style-name="T56"> + </text:span><text:span text:style-name="T81">anotacio</text:span><text:span text:style-name="T56">.getIdentificador() + </text:span><text:span text:style-name="T33">" amb els següents continguts:"</text:span><text:span text:style-name="T56">);</text:span></text:p>
            <text:p text:style-name="P116"><text:span text:style-name="T56"><text:tab/></text:span><text:span text:style-name="T48">for</text:span><text:span text:style-name="T56"> (ContingutArxiu </text:span><text:span text:style-name="T81">contingut</text:span><text:span text:style-name="T56"> : </text:span><text:span text:style-name="T81">expedientDetalls</text:span><text:span text:style-name="T56">.getContinguts()) {</text:span></text:p>
            <text:p text:style-name="P116"><text:span text:style-name="T56"><text:tab/><text:tab/></text:span><text:span text:style-name="T76">logger</text:span><text:span text:style-name="T56">.debug(</text:span><text:span text:style-name="T33">"- "</text:span><text:span text:style-name="T56"> + </text:span><text:span text:style-name="T81">contingut</text:span><text:span text:style-name="T56">.getIdentificador() + </text:span><text:span text:style-name="T33">" "</text:span><text:span text:style-name="T56"> + </text:span><text:span text:style-name="T81">contingut</text:span><text:span text:style-name="T56">.getNom() + </text:span><text:span text:style-name="T33">" amb "</text:span><text:span text:style-name="T56"> + (</text:span><text:span text:style-name="T81">contingut</text:span><text:span text:style-name="T56">.getFirmes() != </text:span><text:span text:style-name="T48">null</text:span><text:span text:style-name="T56">? </text:span><text:span text:style-name="T81">contingut</text:span><text:span text:style-name="T56">.getFirmes().size() : 0) + </text:span><text:span text:style-name="T33">" firmes."</text:span><text:span text:style-name="T56">);</text:span></text:p>
            <text:p text:style-name="P91"><text:tab/>}</text:p>
            <text:p text:style-name="P116"><text:span text:style-name="T56">} </text:span><text:span text:style-name="T48">else</text:span><text:span text:style-name="T56"> {</text:span></text:p>
            <text:p text:style-name="P116"><text:span text:style-name="T56"><text:tab/></text:span><text:span text:style-name="T76">logger</text:span><text:span text:style-name="T56">.warn(</text:span><text:span text:style-name="T33">"L'expedient no s'ha pogut crear per l'anotació "</text:span><text:span text:style-name="T56"> + </text:span><text:span text:style-name="T81">anotacio</text:span><text:span text:style-name="T56">.getIdentificador());</text:span></text:p>
            <text:p text:style-name="P91">}</text:p>
            <text:p text:style-name="P116"><text:span text:style-name="T216">// </text:span><text:span text:style-name="T217">Es</text:span><text:span text:style-name="T216"> </text:span><text:span text:style-name="T217">comunica</text:span><text:span text:style-name="T216"> el </text:span><text:span text:style-name="T217">resultat</text:span><text:span text:style-name="T216"> a DISTRIBUCIO</text:span></text:p>
            <text:p text:style-name="P116"><text:span text:style-name="T48">switch</text:span><text:span text:style-name="T56">(</text:span><text:span text:style-name="T81">arxiuResultat</text:span><text:span text:style-name="T56">.getErrorCodi()) {</text:span></text:p>
            <text:p text:style-name="P116"><text:span text:style-name="T56"><text:tab/></text:span><text:span text:style-name="T48">case</text:span><text:span text:style-name="T56"> 0:</text:span></text:p>
            <text:p text:style-name="P116"><text:span text:style-name="T56"><text:tab/><text:tab/></text:span><text:span text:style-name="T81">backofficeClient</text:span><text:span text:style-name="T56">.canviEstat(</text:span><text:span text:style-name="T81">idWs</text:span><text:span text:style-name="T56">, es.caib.distribucio.ws.backofficeintegracio.Estat.</text:span><text:span text:style-name="T76">PROCESSADA</text:span><text:span text:style-name="T56">, </text:span><text:span text:style-name="T33">"Processada"</text:span><text:span text:style-name="T56">);</text:span></text:p>
            <text:p text:style-name="P116"><text:span text:style-name="T56"><text:tab/><text:tab/></text:span><text:span text:style-name="T48">break</text:span><text:span text:style-name="T56">;</text:span></text:p>
            <text:p text:style-name="P116"><text:span text:style-name="T56"><text:tab/></text:span><text:span text:style-name="T48">default</text:span><text:span text:style-name="T56">:</text:span></text:p>
            <text:p text:style-name="P116"><text:span text:style-name="T56"><text:tab/><text:tab/></text:span><text:span text:style-name="T81">backofficeClient</text:span><text:span text:style-name="T56">.canviEstat(</text:span><text:span text:style-name="T81">idWs</text:span><text:span text:style-name="T56">, es.caib.distribucio.ws.backofficeintegracio.Estat.</text:span><text:span text:style-name="T76">ERROR</text:span><text:span text:style-name="T56">, </text:span><text:span text:style-name="T81">arxiuResultat</text:span><text:span text:style-name="T56">.getErrorCodi()</text:span><text:span text:style-name="T69"> + </text:span><text:span text:style-name="T35">" "</text:span><text:span text:style-name="T69"> + </text:span><text:span text:style-name="T81">arxiuResultat</text:span><text:span text:style-name="T56">.getErrorMessage());</text:span></text:p>
            <text:p text:style-name="P116"><text:span text:style-name="T56"><text:tab/><text:tab/></text:span><text:span text:style-name="T48">break</text:span><text:span text:style-name="T56">;</text:span></text:p>
            <text:p text:style-name="P89">}</text:p>
          </table:table-cell>
        </table:table-row>
      </table:table>
      <text:p text:style-name="P74"/>
      <text:list xml:id="list155550998078114" text:continue-numbering="true" text:style-name="Outline">
        <text:list-item>
          <text:list>
            <text:list-item>
              <text:h text:style-name="P410" text:outline-level="2"><text:bookmark-start text:name="__RefHeading___Toc50910_29075569581"/>Utilitats per Sistra2<text:bookmark-end text:name="__RefHeading___Toc50910_29075569581"/></text:h>
            </text:list-item>
          </text:list>
        </text:list-item>
      </text:list>
      <text:p text:style-name="P178"><text:span text:style-name="T234">S</text:span><text:span text:style-name="T235">erà un cas comú que els tràmits telemàtics de Sistra2 arribin als backoffices de Distribucio amb documents tècnics de pagaments o formularis com annexos. Aquests documents contenen un XML </text:span><text:soft-page-break/><text:span text:style-name="T235">definit pels esquemes XSD corresponents de Sistra2 i contenen les dades d'un formulari o d'un pagament. A fi de facilitar el l</text:span><text:span text:style-name="T236">a </text:span><text:span text:style-name="T235">interpretació </text:span><text:span text:style-name="T236">del </text:span><text:span text:style-name="T235">contingut per part dels backoffices de Distribucio s'ha creat la classe d'utilitats </text:span><text:span text:style-name="T146">BackofficeSistra2Utils</text:span><text:span text:style-name="T180"> amb els mètodes per extreure la informació dels documents tècnics XML. En aquest apartat es descriu l'ús de la llibreria per aquest cas i un exemple Java.</text:span></text:p>
      <text:list xml:id="list155551323836276" text:continue-numbering="true" text:style-name="Outline">
        <text:list-item>
          <text:list>
            <text:list-item>
              <text:list>
                <text:list-item>
                  <text:h text:style-name="P418" text:outline-level="3"><text:bookmark-start text:name="__RefHeading___Toc366109_93553639"/><text:span text:style-name="T230">Ús de </text:span><text:span text:style-name="T131">BackofficeSistra2Utils</text:span><text:bookmark-end text:name="__RefHeading___Toc366109_93553639"/></text:h>
                </text:list-item>
              </text:list>
            </text:list-item>
          </text:list>
        </text:list-item>
      </text:list>
      <text:p text:style-name="P172"><text:span text:style-name="T205">Per utilitzar la </text:span><text:span text:style-name="T233">classe</text:span><text:span text:style-name="T140"> BackofficeS</text:span><text:span text:style-name="T141">istra2U</text:span><text:span text:style-name="T140">tils</text:span><text:span text:style-name="T177"> amb les u</text:span><text:span text:style-name="T181">t</text:span><text:span text:style-name="T177">ilitats</text:span><text:span text:style-name="T181"> per Sistra2</text:span><text:span text:style-name="T177"> </text:span><text:span text:style-name="T237">s'ha de crear un objecte de la classe </text:span><text:span text:style-name="T130">Backoffice</text:span><text:span text:style-name="T142">S</text:span><text:span text:style-name="T141">istra2</text:span><text:span text:style-name="T130">UtilsImpl</text:span><text:span text:style-name="T161">.</text:span><text:span text:style-name="T165"> Aquesta classe no precisa de configurar i conté 2 mètodes per llegir el contingut d'un </text:span><text:span text:style-name="T167">document </text:span><text:span text:style-name="T165">annex i retornar la informació d'un formulari o d'un pagament. Els mètodes que conté són:</text:span></text:p>
      <text:list xml:id="list745306415" text:style-name="L17">
        <text:list-item>
          <text:p text:style-name="P453"><text:span text:style-name="T141">F</text:span><text:span text:style-name="T143">ormulario</text:span><text:span text:style-name="T132"> parseXml</text:span><text:span text:style-name="T133">Formulario</text:span><text:span text:style-name="T132">(</text:span><text:span text:style-name="T141">b</text:span><text:span text:style-name="T145">yte[]</text:span><text:span text:style-name="T132">) </text:span><text:span text:style-name="T165">: Processa el contingut </text:span><text:span text:style-name="T167">en bytes </text:span><text:span text:style-name="T165">de</text:span><text:span text:style-name="T167">l document annex del formulari </text:span><text:span text:style-name="T165">i retorna les dades del pagament en forma d'objecte</text:span><text:span text:style-name="T132"> </text:span><text:span text:style-name="T143">Formulario</text:span><text:span text:style-name="T165">.</text:span></text:p>
        </text:list-item>
        <text:list-item>
          <text:p text:style-name="P453"><text:span text:style-name="T132">Pago parseXmlPago(</text:span><text:span text:style-name="T141">b</text:span><text:span text:style-name="T145">yte[]</text:span><text:span text:style-name="T132">) </text:span><text:span text:style-name="T165">: Processa el contingut </text:span><text:span text:style-name="T167">en bytes del document</text:span><text:span text:style-name="T181"> </text:span><text:span text:style-name="T165">annex </text:span><text:span text:style-name="T167">del pagament </text:span><text:span text:style-name="T165">i retorna les dades del pagament en forma d'objecte</text:span><text:span text:style-name="T132"> Pago</text:span><text:span text:style-name="T165">.</text:span><text:span text:style-name="T132"> </text:span></text:p>
        </text:list-item>
      </text:list>
      <text:p text:style-name="P172"><text:span text:style-name="T175">T</text:span><text:span text:style-name="T182">ant la classe </text:span><text:span text:style-name="T143">Formulario</text:span><text:span text:style-name="T182"> com la classe </text:span><text:span text:style-name="T143">Pago</text:span><text:span text:style-name="T182"> estan generades a partir dels esquemes XSD de les dades XML provinents de Sistra i els mètodes serveixen per transformar les dades XML a objectes que puguin ser tractats pel backoffice</text:span><text:span text:style-name="T162">.</text:span></text:p>
      <text:p text:style-name="P71"><draw:frame draw:style-name="fr1" draw:name="Frame6" text:anchor-type="paragraph" svg:width="17cm" draw:z-index="37"><draw:text-box fo:min-height="11.411cm"><text:p text:style-name="Fig."><draw:frame draw:style-name="fr5" draw:name="Image7" text:anchor-type="as-char" svg:width="17cm" style:rel-width="100%" svg:height="11.409cm" style:rel-height="scale" draw:z-index="38"><draw:image xlink:href="Pictures/100000010000032A0000021FB5ACBC547137B64A.png" xlink:type="simple" xlink:show="embed" xlink:actuate="onLoad" draw:mime-type="image/png"/></draw:frame><text:span text:style-name="T224"><text:line-break/></text:span>Fig. <text:sequence text:ref-name="refFig.6" text:name="Fig." text:formula="ooow:Fig.+1" style:num-format="1">7</text:sequence>: Diagrama de classes de BackofficeSistra2Utils i les classes de Formulario i Pago que retorna.</text:p></draw:text-box></draw:frame></text:p>
      <text:p text:style-name="P173"><text:soft-page-break/><text:span text:style-name="T180">E</text:span><text:span text:style-name="T171">ls mètodes reben </text:span><text:span text:style-name="T187">el contingut en </text:span><text:span text:style-name="T147">byte[]</text:span><text:span text:style-name="T171"> com a paràmetre d'entrada i retornen un objecte </text:span><text:span text:style-name="T138">Formulario</text:span><text:span text:style-name="T171"> o </text:span><text:span text:style-name="T138">Pago</text:span><text:span text:style-name="T171"> segons el mètode invocat. Cal controlar qualsevol excepció que es pugui produir quan el contingut de l'annex no és vàlid i el parseig de l'XML falla.</text:span></text:p>
      <text:list xml:id="list155549507695122" text:continue-list="list155551323836276" text:style-name="Outline">
        <text:list-item>
          <text:list>
            <text:list-item>
              <text:list>
                <text:list-item>
                  <text:h text:style-name="P419" text:outline-level="3"><text:bookmark-start text:name="__RefHeading___Toc366111_93553639"/>Exemple Java<text:bookmark-end text:name="__RefHeading___Toc366111_93553639"/></text:h>
                </text:list-item>
              </text:list>
            </text:list-item>
          </text:list>
        </text:list-item>
      </text:list>
      <text:p text:style-name="P177">En el següent exemple de codi es mostra un exemple de crida al mètode de conversió de l'annex a dades de formulari.</text:p>
      <text:p text:style-name="P174"><text:span text:style-name="T41">taula.</text:span><text:span text:style-name="T209"> </text:span><text:span text:style-name="T213">C</text:span><text:span text:style-name="T214">onversió d'un annex corresponent a un document tècnic d'un formulari XML</text:span><text:span text:style-name="T209">.</text:span></text:p>
      <table:table table:name="Table12" table:style-name="Table12">
        <table:table-column table:style-name="Table12.A"/>
        <table:table-row table:style-name="TableLine681519312">
          <table:table-cell table:style-name="Table12.A1" office:value-type="string">
            <text:p text:style-name="P92"/>
            <text:p text:style-name="P186">// Inicialitza la classe d'utilitats de Sistra2</text:p>
            <text:p text:style-name="P122"><text:span text:style-name="T56">BackofficeSistra2Utils </text:span><text:span text:style-name="T81">sistraUtils</text:span><text:span text:style-name="T56"> = </text:span><text:span text:style-name="T48">new</text:span><text:span text:style-name="T56"> BackofficeSistra2UtilsImpl();</text:span></text:p>
            <text:p text:style-name="P181"/>
            <text:p text:style-name="P185">// Simula l'annex</text:p>
            <text:p text:style-name="P52"><text:span text:style-name="T49">byte</text:span><text:span text:style-name="T64">[] </text:span><text:span text:style-name="T85">contingut</text:span><text:span text:style-name="T64"> = Files.</text:span><text:span text:style-name="T68">readAllBytes</text:span><text:span text:style-name="T64">(Paths.</text:span><text:span text:style-name="T68">get</text:span><text:span text:style-name="T64">(</text:span><text:span text:style-name="T49">this</text:span><text:span text:style-name="T64">.getClass().getClassLoader().getResource(</text:span><text:span text:style-name="T37">"formulario.xml"</text:span><text:span text:style-name="T64">).toURI()));</text:span></text:p>
            <text:p text:style-name="P185">// Llegeix el formulari</text:p>
            <text:p text:style-name="P122"><text:span text:style-name="T56">Formulario </text:span><text:span text:style-name="T81">formulario</text:span><text:span text:style-name="T56"> = </text:span><text:span text:style-name="T48">null</text:span><text:span text:style-name="T56">;</text:span></text:p>
            <text:p text:style-name="P122"><text:span text:style-name="T48">try</text:span><text:span text:style-name="T56"> {</text:span></text:p>
            <text:p text:style-name="P124"><text:span text:style-name="T56"><text:tab/></text:span><text:span text:style-name="T81">formulario</text:span><text:span text:style-name="T56"> = </text:span><text:span text:style-name="T81">sistraUtils</text:span><text:span text:style-name="T56">.parseXmlFormulario(</text:span><text:span text:style-name="T89">contingut</text:span><text:span text:style-name="T56">);</text:span></text:p>
            <text:p text:style-name="P122"><text:span text:style-name="T56">} </text:span><text:span text:style-name="T48">catch</text:span><text:span text:style-name="T56"> (Exception </text:span><text:span text:style-name="T81">e</text:span><text:span text:style-name="T56">) {</text:span></text:p>
            <text:p text:style-name="P122"><text:span text:style-name="T56"><text:tab/></text:span><text:span text:style-name="T48">throw</text:span><text:span text:style-name="T56"> </text:span><text:span text:style-name="T48">new</text:span><text:span text:style-name="T56"> Exception(</text:span><text:span text:style-name="T33">"Error llegint l'annex : "</text:span><text:span text:style-name="T56"> + </text:span><text:span text:style-name="T81">e</text:span><text:span text:style-name="T56">.getMessage());</text:span></text:p>
            <text:p text:style-name="P95">}</text:p>
            <text:p text:style-name="P122"><text:span text:style-name="T56">System.</text:span><text:span text:style-name="T76">out</text:span><text:span text:style-name="T56">.println(</text:span><text:span text:style-name="T33">"Llegit el fornmulari, formulario.accion="</text:span><text:span text:style-name="T56"> + </text:span><text:span text:style-name="T81">formulario</text:span><text:span text:style-name="T56">.getAccion());</text:span></text:p>
            <text:p text:style-name="P92"/>
          </table:table-cell>
        </table:table-row>
      </table:table>
      <text:p text:style-name="P167"/>
      <text:p text:style-name="P175">Per a l'exemple s'ha creat l'arxiu <text:span text:style-name="T125">formulario.xml</text:span><text:span text:style-name="T153"> amb l' XML d'exemple per a la lectura. A continuació es mostra aquest XML d'exemple.</text:span></text:p>
      <text:p text:style-name="P176"><text:span text:style-name="T41">taula.</text:span><text:span text:style-name="T209"> </text:span><text:span text:style-name="T213">E</text:span><text:span text:style-name="T215">xemple d' </text:span><text:span text:style-name="T214">XML</text:span><text:span text:style-name="T215"> pel formulari</text:span><text:span text:style-name="T209">.</text:span></text:p>
      <table:table table:name="Table13" table:style-name="Table13">
        <table:table-column table:style-name="Table13.A"/>
        <table:table-row table:style-name="TableLine681489936">
          <table:table-cell table:style-name="Table13.A1" office:value-type="string">
            <text:p text:style-name="P93"><text:span text:style-name="T14">&lt;?</text:span><text:span text:style-name="T20">xml</text:span> <text:span text:style-name="T25">version</text:span>=<text:span text:style-name="T38">"1.0"</text:span> <text:span text:style-name="T25">encoding</text:span>=<text:span text:style-name="T38">"UTF-8"</text:span> <text:span text:style-name="T25">standalone</text:span>=<text:span text:style-name="T38">"yes"</text:span><text:span text:style-name="T14">?&gt;</text:span></text:p>
            <text:p text:style-name="P117"><text:span text:style-name="T17">&lt;</text:span><text:span text:style-name="T22">ns2:FORMULARIO</text:span><text:span text:style-name="T113"> </text:span><text:span text:style-name="T26">accion</text:span><text:span text:style-name="T56">=</text:span><text:span text:style-name="T36">"accion"</text:span><text:span text:style-name="T113"> </text:span><text:span text:style-name="T26">xmlns:ns2</text:span><text:span text:style-name="T56">=</text:span><text:span text:style-name="T36">"urn:es:caib:sistra2:xml:formulario:v1:model"</text:span><text:span text:style-name="T17">&gt;</text:span></text:p>
            <text:p text:style-name="P117"><text:span text:style-name="T56"><text:tab/></text:span><text:span text:style-name="T17">&lt;</text:span><text:span text:style-name="T22">CAMPO</text:span><text:span text:style-name="T113"> </text:span><text:span text:style-name="T26">id</text:span><text:span text:style-name="T56">=</text:span><text:span text:style-name="T36">"campo_0"</text:span><text:span text:style-name="T17">&gt;</text:span></text:p>
            <text:p text:style-name="P117"><text:span text:style-name="T56"><text:tab/><text:tab/></text:span><text:span text:style-name="T17">&lt;</text:span><text:span text:style-name="T22">VALOR</text:span><text:span text:style-name="T113"> </text:span><text:span text:style-name="T26">codigo</text:span><text:span text:style-name="T56">=</text:span><text:span text:style-name="T36">"cod_0"</text:span><text:span text:style-name="T17">&gt;</text:span><text:span text:style-name="T56">valor_i</text:span><text:span text:style-name="T17">&lt;/</text:span><text:span text:style-name="T22">VALOR</text:span><text:span text:style-name="T17">&gt;</text:span></text:p>
            <text:p text:style-name="P117"><text:span text:style-name="T56"><text:tab/><text:tab/></text:span><text:span text:style-name="T17">&lt;</text:span><text:span text:style-name="T22">VALOR</text:span><text:span text:style-name="T113"> </text:span><text:span text:style-name="T26">codigo</text:span><text:span text:style-name="T56">=</text:span><text:span text:style-name="T36">"cod_0"</text:span><text:span text:style-name="T17">&gt;</text:span><text:span text:style-name="T56">valor_i</text:span><text:span text:style-name="T17">&lt;/</text:span><text:span text:style-name="T22">VALOR</text:span><text:span text:style-name="T17">&gt;</text:span></text:p>
            <text:p text:style-name="P117"><text:span text:style-name="T56"><text:tab/></text:span><text:span text:style-name="T17">&lt;/</text:span><text:span text:style-name="T22">CAMPO</text:span><text:span text:style-name="T17">&gt;</text:span></text:p>
            <text:p text:style-name="P117"><text:span text:style-name="T56"><text:tab/></text:span><text:span text:style-name="T17">&lt;</text:span><text:span text:style-name="T22">CAMPO</text:span><text:span text:style-name="T113"> </text:span><text:span text:style-name="T26">id</text:span><text:span text:style-name="T56">=</text:span><text:span text:style-name="T36">"campo_1"</text:span><text:span text:style-name="T17">&gt;</text:span></text:p>
            <text:p text:style-name="P117"><text:span text:style-name="T56"><text:tab/><text:tab/></text:span><text:span text:style-name="T17">&lt;</text:span><text:span text:style-name="T22">VALOR</text:span><text:span text:style-name="T113"> </text:span><text:span text:style-name="T26">codigo</text:span><text:span text:style-name="T56">=</text:span><text:span text:style-name="T36">"cod_1"</text:span><text:span text:style-name="T17">&gt;</text:span><text:span text:style-name="T56">valor_i</text:span><text:span text:style-name="T17">&lt;/</text:span><text:span text:style-name="T22">VALOR</text:span><text:span text:style-name="T17">&gt;</text:span></text:p>
            <text:p text:style-name="P117"><text:span text:style-name="T56"><text:tab/><text:tab/></text:span><text:span text:style-name="T17">&lt;</text:span><text:span text:style-name="T22">VALOR</text:span><text:span text:style-name="T113"> </text:span><text:span text:style-name="T26">codigo</text:span><text:span text:style-name="T56">=</text:span><text:span text:style-name="T36">"cod_1"</text:span><text:span text:style-name="T17">&gt;</text:span><text:span text:style-name="T56">valor_i</text:span><text:span text:style-name="T17">&lt;/</text:span><text:span text:style-name="T22">VALOR</text:span><text:span text:style-name="T17">&gt;</text:span></text:p>
            <text:p text:style-name="P117"><text:span text:style-name="T56"><text:tab/></text:span><text:span text:style-name="T17">&lt;/</text:span><text:span text:style-name="T22">CAMPO</text:span><text:span text:style-name="T17">&gt;</text:span></text:p>
            <text:p text:style-name="P93"><text:span text:style-name="T14">&lt;/</text:span><text:span text:style-name="T20">ns2:FORMULARIO</text:span><text:span text:style-name="T14">&gt;</text:span></text:p>
          </table:table-cell>
        </table:table-row>
      </table:table>
      <text:p text:style-name="P72"/>
      <text:p text:style-name="P174"/>
      <text:list xml:id="list155550527244700" text:continue-numbering="true" text:style-name="Outline">
        <text:list-header>
          <text:h text:style-name="P399" text:outline-level="1" text:is-list-header="true"><text:bookmark-start text:name="__RefHeading___Toc117515_1680181998"/><text:span text:style-name="T108">Annex I: WSDL del backoffice</text:span> <text:bookmark-end text:name="__RefHeading___Toc117515_1680181998"/></text:h>
        </text:list-header>
      </text:list>
      <text:p text:style-name="P189"><text:span text:style-name="T18">&lt;?</text:span> <text:span text:style-name="T23">xml</text:span> <text:span text:style-name="T27">version</text:span> <text:span text:style-name="T57">= </text:span><text:span text:style-name="T34">'1.0'</text:span> <text:span text:style-name="T27">encoding</text:span> <text:span text:style-name="T57">= </text:span><text:span text:style-name="T34">'UTF-8'</text:span> <text:span text:style-name="T18">?&gt;&lt;</text:span> <text:span text:style-name="T23">wsdl:definitions</text:span> <text:span text:style-name="T27">name</text:span> <text:span text:style-name="T57">= </text:span><text:span text:style-name="T34">"BackofficeService"</text:span> <text:span text:style-name="T27">targetNamespace</text:span> <text:span text:style-name="T57">= </text:span><text:span text:style-name="T34">"http://www.caib.es/distribucio/ws/backoffice"</text:span> <text:span text:style-name="T27">xmlns:ns1</text:span> <text:span text:style-name="T57">= </text:span><text:span text:style-name="T34">"http://schemas.xmlsoap.org/wsdl/soap/http"</text:span> <text:span text:style-name="T27">xmlns:soap</text:span> <text:span text:style-name="T57">= </text:span><text:span text:style-name="T34">"http://schemas.xmlsoap.org/wsdl/soap/"</text:span> <text:span text:style-name="T27">xmlns:tns</text:span> <text:span text:style-name="T57">= </text:span><text:span text:style-name="T34">"http://www.caib.es/distribucio/ws/backoffice"</text:span> <text:span text:style-name="T57"><text:s text:c="3"/></text:span><text:span text:style-name="T27">xmlns:wsdl</text:span> <text:span text:style-name="T57">= </text:span><text:span text:style-name="T34">"http://schemas.xmlsoap.org/wsdl/"</text:span> <text:span text:style-name="T27">xmlns:xsd</text:span> <text:span text:style-name="T57">= </text:span><text:span text:style-name="T34">"http://www.w3.org/2001/XMLSchema"</text:span> <text:span text:style-name="T18">&gt;</text:span> </text:p>
      <text:p text:style-name="P190"><text:span text:style-name="T57"><text:s text:c="4"/></text:span><text:span text:style-name="T73"><text:s text:c="3"/></text:span><text:span text:style-name="T19">&lt;</text:span> <text:span text:style-name="T24">wsdl:types</text:span> <text:span text:style-name="T19">&gt;</text:span> </text:p>
      <text:p text:style-name="P187"><text:span text:style-name="T14">&lt;</text:span> <text:span text:style-name="T20">xs:schema</text:span> <text:span text:style-name="T25">elementFormDefault</text:span> <text:span text:style-name="T51">=</text:span> <text:span text:style-name="T38">"unqualified"</text:span> <text:span text:style-name="T25">targetNamespace</text:span> <text:span text:style-name="T51">=</text:span> <text:span text:style-name="T38">"http://www.caib.es/distribucio/ws/backoffice"</text:span> <text:span text:style-name="T25">version</text:span> <text:span text:style-name="T51">=</text:span> <text:span text:style-name="T38">"1.0"</text:span> <text:span text:style-name="T25">xmlns:tns</text:span> <text:span text:style-name="T51">=</text:span> <text:span text:style-name="T38">"http://www.caib.es/distribucio/ws/backoffice"</text:span> <text:span text:style-name="T25">xmlns:xs</text:span> <text:span text:style-name="T51">=</text:span> <text:span text:style-name="T38">"http://www.w3.org/2001/XMLSchema"</text:span> <text:span text:style-name="T14">&gt;</text:span> </text:p>
      <text:p text:style-name="P187"><text:span text:style-name="T14">&lt;</text:span> <text:span text:style-name="T20">xs:element</text:span> <text:span text:style-name="T25">name</text:span> <text:span text:style-name="T51">=</text:span> <text:span text:style-name="T38">"comunicarAnotacionsPendents"</text:span> <text:span text:style-name="T25">type</text:span> <text:span text:style-name="T51">=</text:span> <text:span text:style-name="T38">"tns:comunicarAnotacionsPendents"</text:span> <text:span text:style-name="T14">/&gt;</text:span> </text:p>
      <text:p text:style-name="P187"><text:span text:style-name="T14">&lt;</text:span> <text:span text:style-name="T20">xs:element</text:span> <text:span text:style-name="T25">name</text:span> <text:span text:style-name="T51">=</text:span> <text:span text:style-name="T38">"comunicarAnotacionsPendentsResponse"</text:span> <text:span text:style-name="T25">type</text:span> <text:span text:style-name="T51">=</text:span> <text:span text:style-name="T38">"tns:comunicarAnotacionsPendentsResponse"</text:span> <text:span text:style-name="T14">/&gt;</text:span> </text:p>
      <text:p text:style-name="P187"><text:span text:style-name="T14">&lt;</text:span> <text:span text:style-name="T20">xs:complexType</text:span> <text:span text:style-name="T25">name</text:span> <text:span text:style-name="T51">=</text:span> <text:span text:style-name="T38">"comunicarAnotacionsPendents"</text:span> <text:span text:style-name="T14">&gt;</text:span> </text:p>
      <text:p text:style-name="P187"><text:span text:style-name="T14">&lt;</text:span> <text:span text:style-name="T20">xs:sequence</text:span> <text:span text:style-name="T14">&gt;</text:span> </text:p>
      <text:p text:style-name="P187"><text:span text:style-name="T14">&lt;</text:span> <text:span text:style-name="T20">xs:element</text:span> <text:span text:style-name="T25">maxOccurs</text:span> <text:span text:style-name="T51">=</text:span> <text:span text:style-name="T38">"unbounded"</text:span> <text:span text:style-name="T25">name</text:span> <text:span text:style-name="T51">=</text:span> <text:span text:style-name="T38">"ids"</text:span> <text:span text:style-name="T25">type</text:span> <text:span text:style-name="T51">=</text:span> <text:span text:style-name="T38">"tns:anotacioRegistreId"</text:span> <text:span text:style-name="T14">/&gt;</text:span> </text:p>
      <text:p text:style-name="P187"><text:span text:style-name="T14">&lt;/</text:span> <text:span text:style-name="T20">xs:sequence</text:span> <text:span text:style-name="T14">&gt;</text:span> </text:p>
      <text:p text:style-name="P187"><text:span text:style-name="T14">&lt;/</text:span> <text:span text:style-name="T20">xs:complexType</text:span> <text:span text:style-name="T14">&gt;</text:span> </text:p>
      <text:p text:style-name="P187"><text:span text:style-name="T14">&lt;</text:span> <text:span text:style-name="T20">xs:complexType</text:span> <text:span text:style-name="T25">name</text:span> <text:span text:style-name="T51">=</text:span> <text:span text:style-name="T38">"anotacioRegistreId"</text:span> <text:span text:style-name="T14">&gt;</text:span> </text:p>
      <text:p text:style-name="P187"><text:span text:style-name="T14">&lt;</text:span> <text:span text:style-name="T20">xs:sequence</text:span> <text:span text:style-name="T14">&gt;</text:span> </text:p>
      <text:p text:style-name="P187"><text:span text:style-name="T14">&lt;</text:span> <text:span text:style-name="T20">xs:element</text:span> <text:span text:style-name="T25">minOccurs</text:span> <text:span text:style-name="T51">=</text:span> <text:span text:style-name="T38">"0"</text:span> <text:span text:style-name="T25">name</text:span> <text:span text:style-name="T51">=</text:span> <text:span text:style-name="T38">"clauAcces"</text:span> <text:span text:style-name="T25">type</text:span> <text:span text:style-name="T51">=</text:span> <text:span text:style-name="T38">"xs:string"</text:span> <text:span text:style-name="T14">/&gt;</text:span> </text:p>
      <text:p text:style-name="P187"><text:span text:style-name="T14">&lt;</text:span> <text:span text:style-name="T20">xs:element</text:span> <text:span text:style-name="T25">minOccurs</text:span> <text:span text:style-name="T51">=</text:span> <text:span text:style-name="T38">"0"</text:span> <text:span text:style-name="T25">name</text:span> <text:span text:style-name="T51">=</text:span> <text:span text:style-name="T38">"indetificador"</text:span> <text:span text:style-name="T25">type</text:span> <text:span text:style-name="T51">=</text:span> <text:span text:style-name="T38">"xs:string"</text:span> <text:span text:style-name="T14">/&gt;</text:span> </text:p>
      <text:p text:style-name="P187"><text:span text:style-name="T14">&lt;/</text:span> <text:span text:style-name="T20">xs:sequence</text:span> <text:span text:style-name="T14">&gt;</text:span> </text:p>
      <text:p text:style-name="P187"><text:span text:style-name="T14">&lt;/</text:span> <text:span text:style-name="T20">xs:complexType</text:span> <text:span text:style-name="T14">&gt;</text:span> </text:p>
      <text:p text:style-name="P187"><text:span text:style-name="T14">&lt;</text:span> <text:span text:style-name="T20">xs:complexType</text:span> <text:span text:style-name="T25">name</text:span> <text:span text:style-name="T51">=</text:span> <text:span text:style-name="T38">"comunicarAnotacionsPendentsResponse"</text:span> <text:span text:style-name="T14">&gt;</text:span> </text:p>
      <text:p text:style-name="P187"><text:span text:style-name="T14">&lt;</text:span> <text:span text:style-name="T20">xs:sequence</text:span> <text:span text:style-name="T14">/&gt;</text:span> </text:p>
      <text:p text:style-name="P187"><text:span text:style-name="T14">&lt;/</text:span> <text:span text:style-name="T20">xs:complexType</text:span> <text:span text:style-name="T14">&gt;</text:span> </text:p>
      <text:p text:style-name="P187"><text:span text:style-name="T14">&lt;/</text:span> <text:span text:style-name="T20">xs:schema</text:span> <text:span text:style-name="T14">&gt;</text:span> </text:p>
      <text:p text:style-name="P187"><text:span text:style-name="T51"><text:s text:c="5"/></text:span><text:span text:style-name="T14">&lt;/</text:span> <text:span text:style-name="T20">wsdl:types</text:span> <text:span text:style-name="T14">&gt;</text:span> </text:p>
      <text:p text:style-name="P187"><text:span text:style-name="T51"><text:s text:c="5"/></text:span><text:span text:style-name="T14">&lt;</text:span> <text:span text:style-name="T20">wsdl:message</text:span> <text:span text:style-name="T25">name</text:span> <text:span text:style-name="T51">=</text:span> <text:span text:style-name="T38">"comunicarAnotacionsPendents"</text:span> <text:span text:style-name="T14">&gt;</text:span> </text:p>
      <text:p text:style-name="P187"><text:span text:style-name="T51"><text:s text:c="7"/></text:span><text:span text:style-name="T14">&lt;</text:span> <text:span text:style-name="T20">wsdl:part</text:span> <text:span text:style-name="T25">element</text:span> <text:span text:style-name="T51">=</text:span> <text:span text:style-name="T38">"tns:comunicarAnotacionsPendents"</text:span> <text:span text:style-name="T25">name</text:span> <text:span text:style-name="T51">=</text:span> <text:span text:style-name="T38">"parameters"</text:span> <text:span text:style-name="T14">&gt;</text:span> </text:p>
      <text:p text:style-name="P187"><text:span text:style-name="T51"><text:s text:c="7"/></text:span><text:span text:style-name="T14">&lt;/</text:span> <text:span text:style-name="T20">wsdl:part</text:span> <text:span text:style-name="T14">&gt;</text:span> </text:p>
      <text:p text:style-name="P187"><text:span text:style-name="T51"><text:s text:c="5"/></text:span><text:span text:style-name="T14">&lt;/</text:span> <text:span text:style-name="T20">wsdl:message</text:span> <text:span text:style-name="T14">&gt;</text:span> </text:p>
      <text:p text:style-name="P187"><text:span text:style-name="T51"><text:s text:c="5"/></text:span><text:span text:style-name="T14">&lt;</text:span> <text:span text:style-name="T20">wsdl:message</text:span> <text:span text:style-name="T25">name</text:span> <text:span text:style-name="T51">=</text:span> <text:span text:style-name="T38">"comunicarAnotacionsPendentsResponse"</text:span> <text:span text:style-name="T14">&gt;</text:span> </text:p>
      <text:p text:style-name="P187"><text:span text:style-name="T51"><text:s text:c="7"/></text:span><text:span text:style-name="T14">&lt;</text:span> <text:span text:style-name="T20">wsdl:part</text:span> <text:span text:style-name="T25">element</text:span> <text:span text:style-name="T51">=</text:span> <text:span text:style-name="T38">"tns:comunicarAnotacionsPendentsResponse"</text:span> <text:span text:style-name="T25">name</text:span> <text:span text:style-name="T51">=</text:span> <text:span text:style-name="T38">"parameters"</text:span> <text:span text:style-name="T14">&gt;</text:span> </text:p>
      <text:p text:style-name="P187"><text:span text:style-name="T51"><text:s text:c="7"/></text:span><text:span text:style-name="T14">&lt;/</text:span> <text:span text:style-name="T20">wsdl:part</text:span> <text:span text:style-name="T14">&gt;</text:span> </text:p>
      <text:p text:style-name="P187"><text:span text:style-name="T51"><text:s text:c="5"/></text:span><text:span text:style-name="T14">&lt;/</text:span> <text:span text:style-name="T20">wsdl:message</text:span> <text:span text:style-name="T14">&gt;</text:span> </text:p>
      <text:p text:style-name="P187"><text:span text:style-name="T51"><text:s text:c="5"/></text:span><text:span text:style-name="T14">&lt;</text:span> <text:span text:style-name="T20">wsdl:portType</text:span> <text:span text:style-name="T25">name</text:span> <text:span text:style-name="T51">=</text:span> <text:span text:style-name="T38">"Backoffice"</text:span> <text:span text:style-name="T14">&gt;</text:span> </text:p>
      <text:p text:style-name="P187"><text:span text:style-name="T51"><text:s text:c="7"/></text:span><text:span text:style-name="T14">&lt;</text:span> <text:span text:style-name="T20">wsdl:operation</text:span> <text:span text:style-name="T25">name</text:span> <text:span text:style-name="T51">=</text:span> <text:span text:style-name="T38">"comunicarAnotacionsPendents"</text:span> <text:span text:style-name="T14">&gt;</text:span> </text:p>
      <text:p text:style-name="P187"><text:span text:style-name="T51"><text:s text:c="9"/></text:span><text:span text:style-name="T14">&lt;</text:span> <text:span text:style-name="T20">wsdl:input</text:span> <text:span text:style-name="T25">message</text:span> <text:span text:style-name="T51">=</text:span> <text:span text:style-name="T38">"tns:comunicarAnotacionsPendents"</text:span> <text:span text:style-name="T25">name</text:span> <text:span text:style-name="T51">=</text:span> <text:span text:style-name="T38">"comunicarAnotacionsPendents"</text:span> <text:span text:style-name="T14">&gt;</text:span> </text:p>
      <text:p text:style-name="P187"><text:span text:style-name="T51"><text:s text:c="7"/></text:span><text:span text:style-name="T14">&lt;/</text:span> <text:span text:style-name="T20">wsdl:input</text:span> <text:span text:style-name="T14">&gt;</text:span> </text:p>
      <text:p text:style-name="P187"><text:soft-page-break/><text:s/><text:span text:style-name="T51"><text:s text:c="9"/></text:span><text:span text:style-name="T14">&lt;</text:span> <text:span text:style-name="T20">wsdl:output</text:span> <text:span text:style-name="T25">message</text:span> <text:span text:style-name="T51">=</text:span> <text:span text:style-name="T38">"tns:comunicarAnotacionsPendentsResponse"</text:span> <text:span text:style-name="T25">name</text:span> <text:span text:style-name="T51">=</text:span> <text:span text:style-name="T38">"comunicarAnotacionsPendentsResponse"</text:span> <text:span text:style-name="T14">&gt;</text:span> </text:p>
      <text:p text:style-name="P187"><text:span text:style-name="T51"><text:s text:c="7"/></text:span><text:span text:style-name="T14">&lt;/</text:span> <text:span text:style-name="T20">wsdl:output</text:span> <text:span text:style-name="T14">&gt;</text:span> </text:p>
      <text:p text:style-name="P187"><text:s text:c="2"/><text:span text:style-name="T51"><text:s text:c="7"/></text:span><text:span text:style-name="T14">&lt;/</text:span> <text:span text:style-name="T20">wsdl:operation</text:span> <text:span text:style-name="T14">&gt;</text:span> </text:p>
      <text:p text:style-name="P187"><text:span text:style-name="T51"><text:s text:c="5"/></text:span><text:span text:style-name="T14">&lt;/</text:span> <text:span text:style-name="T20">wsdl:portType</text:span> <text:span text:style-name="T14">&gt;</text:span> </text:p>
      <text:p text:style-name="P187"><text:span text:style-name="T51"><text:s text:c="5"/></text:span><text:span text:style-name="T14">&lt;</text:span> <text:span text:style-name="T20">wsdl:binding</text:span> <text:span text:style-name="T25">name</text:span> <text:span text:style-name="T51">=</text:span> <text:span text:style-name="T38">"BackofficeServiceSoapBinding"</text:span> <text:span text:style-name="T25">type</text:span> <text:span text:style-name="T51">=</text:span> <text:span text:style-name="T38">"tns:Backoffice"</text:span> <text:span text:style-name="T14">&gt;</text:span> </text:p>
      <text:p text:style-name="P187"><text:span text:style-name="T51"><text:s text:c="7"/></text:span><text:span text:style-name="T14">&lt;</text:span> <text:span text:style-name="T20">soap:binding</text:span> <text:span text:style-name="T25">style</text:span> <text:span text:style-name="T51">=</text:span> <text:span text:style-name="T38">"document"</text:span> <text:span text:style-name="T25">transport</text:span> <text:span text:style-name="T51">=</text:span> <text:span text:style-name="T38">"http://schemas.xmlsoap.org/soap/http"</text:span> <text:span text:style-name="T14">/&gt;</text:span> </text:p>
      <text:p text:style-name="P187"><text:span text:style-name="T51"><text:s text:c="7"/></text:span><text:span text:style-name="T14">&lt;</text:span> <text:span text:style-name="T20">wsdl:operation</text:span> <text:span text:style-name="T25">name</text:span> <text:span text:style-name="T51">=</text:span> <text:span text:style-name="T38">"comunicarAnotacionsPendents"</text:span> <text:span text:style-name="T14">&gt;</text:span> </text:p>
      <text:p text:style-name="P187"><text:span text:style-name="T51"><text:s text:c="9"/></text:span><text:span text:style-name="T14">&lt;</text:span> <text:span text:style-name="T20">soap:operation</text:span> <text:span text:style-name="T25">soapAction</text:span> <text:span text:style-name="T51">=</text:span> <text:span text:style-name="T38">""</text:span> <text:span text:style-name="T25">style</text:span> <text:span text:style-name="T51">=</text:span> <text:span text:style-name="T38">"document"</text:span> <text:span text:style-name="T14">/&gt;</text:span> </text:p>
      <text:p text:style-name="P187"><text:span text:style-name="T51"><text:s text:c="9"/></text:span><text:span text:style-name="T14">&lt;</text:span> <text:span text:style-name="T20">wsdl:input</text:span> <text:span text:style-name="T25">name</text:span> <text:span text:style-name="T51">=</text:span> <text:span text:style-name="T38">"comunicarAnotacionsPendents"</text:span> <text:span text:style-name="T14">&gt;</text:span> </text:p>
      <text:p text:style-name="P187"><text:span text:style-name="T51"><text:s text:c="11"/></text:span><text:span text:style-name="T14">&lt;</text:span> <text:span text:style-name="T20">soap:body</text:span> <text:span text:style-name="T25">use</text:span> <text:span text:style-name="T51">=</text:span> <text:span text:style-name="T38">"literal"</text:span> <text:span text:style-name="T14">/&gt;</text:span> </text:p>
      <text:p text:style-name="P187"><text:span text:style-name="T51"><text:s text:c="9"/></text:span><text:span text:style-name="T14">&lt;/</text:span> <text:span text:style-name="T20">wsdl:input</text:span> <text:span text:style-name="T14">&gt;</text:span> </text:p>
      <text:p text:style-name="P187"><text:span text:style-name="T51"><text:s text:c="9"/></text:span><text:span text:style-name="T14">&lt;</text:span> <text:span text:style-name="T20">wsdl:output</text:span> <text:span text:style-name="T25">name</text:span> <text:span text:style-name="T51">=</text:span> <text:span text:style-name="T38">"comunicarAnotacionsPendentsResponse"</text:span> <text:span text:style-name="T14">&gt;</text:span> </text:p>
      <text:p text:style-name="P187"><text:span text:style-name="T51"><text:s text:c="11"/></text:span><text:span text:style-name="T14">&lt;</text:span> <text:span text:style-name="T20">soap:body</text:span> <text:span text:style-name="T25">use</text:span> <text:span text:style-name="T51">=</text:span> <text:span text:style-name="T38">"literal"</text:span> <text:span text:style-name="T14">/&gt;</text:span> </text:p>
      <text:p text:style-name="P187"><text:span text:style-name="T51"><text:s text:c="9"/></text:span><text:span text:style-name="T14">&lt;/</text:span> <text:span text:style-name="T20">wsdl:output</text:span> <text:span text:style-name="T14">&gt;</text:span> </text:p>
      <text:p text:style-name="P187"><text:span text:style-name="T51"><text:s text:c="7"/></text:span><text:span text:style-name="T14">&lt;/</text:span> <text:span text:style-name="T20">wsdl:operation</text:span> <text:span text:style-name="T14">&gt;</text:span> </text:p>
      <text:p text:style-name="P187"><text:span text:style-name="T51"><text:s text:c="5"/></text:span><text:span text:style-name="T14">&lt;/</text:span> <text:span text:style-name="T20">wsdl:binding</text:span> <text:span text:style-name="T14">&gt;</text:span> </text:p>
      <text:p text:style-name="P187"><text:span text:style-name="T51"><text:s text:c="5"/></text:span><text:span text:style-name="T14">&lt;</text:span> <text:span text:style-name="T20">wsdl:service</text:span> <text:span text:style-name="T25">name</text:span> <text:span text:style-name="T51">=</text:span> <text:span text:style-name="T38">"BackofficeService"</text:span> <text:span text:style-name="T14">&gt;</text:span> </text:p>
      <text:p text:style-name="P187"><text:s text:c="3"/><text:span text:style-name="T51"><text:s text:c="7"/></text:span><text:span text:style-name="T14">&lt;</text:span> <text:span text:style-name="T20">wsdl:port</text:span> <text:span text:style-name="T25">binding</text:span> <text:span text:style-name="T51">=</text:span> <text:span text:style-name="T38">"tns:BackofficeServiceSoapBinding"</text:span> <text:span text:style-name="T25">name</text:span> <text:span text:style-name="T51">=</text:span> <text:span text:style-name="T38">"BackofficeServicePort"</text:span> <text:span text:style-name="T14">&gt;</text:span> </text:p>
      <text:p text:style-name="P187"><text:span text:style-name="T51"><text:s text:c="9"/></text:span><text:span text:style-name="T14">&lt;</text:span> <text:span text:style-name="T20">soap:address</text:span> <text:span text:style-name="T25">location</text:span> <text:span text:style-name="T51">=</text:span> <text:span text:style-name="T38">"http://localhost:8080/distribucio/ws/backoffice"</text:span> <text:span text:style-name="T14">/&gt;</text:span> </text:p>
      <text:p text:style-name="P187"><text:span text:style-name="T51"><text:s text:c="7"/></text:span><text:span text:style-name="T14">&lt;/</text:span> <text:span text:style-name="T20">wsdl:port</text:span> <text:span text:style-name="T14">&gt;</text:span> </text:p>
      <text:p text:style-name="P187"><text:span text:style-name="T51"><text:s text:c="5"/></text:span><text:span text:style-name="T14">&lt;/</text:span> <text:span text:style-name="T20">wsdl:service</text:span> <text:span text:style-name="T14">&gt;</text:span> </text:p>
      <text:p text:style-name="P188"><text:span text:style-name="T14">&lt;/</text:span> <text:span text:style-name="T20">wsdl:definitions</text:span> <text:span text:style-name="T14">&gt;</text:span> </text:p>
      <text:p text:style-name="P43"><text:s text:c="3"/></text:p>
      <text:list xml:id="list155551148399894" text:continue-numbering="true" text:style-name="Outline">
        <text:list-header>
          <text:h text:style-name="P400" text:outline-level="1" text:is-list-header="true"><text:bookmark-start text:name="__RefHeading___Toc60796_1326387233"/><text:span text:style-name="T108">Annex </text:span><text:span text:style-name="T228">II</text:span><text:span text:style-name="T108">: </text:span><text:span text:style-name="T226">E</text:span><text:span text:style-name="T227">xemple d'ús de la llibreria de </text:span><text:span text:style-name="T229">distribucio-backoffice-utils</text:span><text:bookmark-end text:name="__RefHeading___Toc60796_1326387233"/></text:h>
        </text:list-header>
      </text:list>
      <table:table table:name="Table4" table:style-name="Table4">
        <table:table-column table:style-name="Table4.A"/>
        <table:table-row table:style-name="TableLine681459408">
          <table:table-cell table:style-name="Table4.A1" office:value-type="string">
            <text:p text:style-name="P115"><text:span text:style-name="T48">package</text:span><text:span text:style-name="T56"> es.caib.distribucio.core.service.ws.backoffice;</text:span></text:p>
            <text:p text:style-name="P183"/>
            <text:p text:style-name="P117"><text:span text:style-name="T48">import</text:span><text:span text:style-name="T56"> java.util.Arrays;</text:span></text:p>
            <text:p text:style-name="P117"><text:span text:style-name="T48">import</text:span><text:span text:style-name="T56"> java.util.Date;</text:span></text:p>
            <text:p text:style-name="P117"><text:span text:style-name="T48">import</text:span><text:span text:style-name="T56"> java.util.List;</text:span></text:p>
            <text:p text:style-name="P117"><text:span text:style-name="T48">import</text:span><text:span text:style-name="T56"> java.util.Map;</text:span></text:p>
            <text:p text:style-name="P117"><text:span text:style-name="T48">import</text:span><text:span text:style-name="T56"> java.util.Properties;</text:span></text:p>
            <text:p text:style-name="P183"/>
            <text:p text:style-name="P117"><text:span text:style-name="T48">import</text:span><text:span text:style-name="T56"> javax.jws.WebService;</text:span></text:p>
            <text:p text:style-name="P183"/>
            <text:p text:style-name="P117"><text:span text:style-name="T48">import</text:span><text:span text:style-name="T56"> org.apache.commons.lang.builder.ToStringBuilder;</text:span></text:p>
            <text:p text:style-name="P117"><text:span text:style-name="T48">import</text:span><text:span text:style-name="T56"> org.slf4j.Logger;</text:span></text:p>
            <text:p text:style-name="P117"><text:span text:style-name="T48">import</text:span><text:span text:style-name="T56"> org.slf4j.LoggerFactory;</text:span></text:p>
            <text:p text:style-name="P117"><text:span text:style-name="T48">import</text:span><text:span text:style-name="T56"> org.springframework.stereotype.Component;</text:span></text:p>
            <text:p text:style-name="P183"/>
            <text:p text:style-name="P117"><text:span text:style-name="T48">import</text:span><text:span text:style-name="T56"> es.caib.distribucio.backoffice.utils.arxiu.ArxiuPluginListener;</text:span></text:p>
            <text:p text:style-name="P117"><text:span text:style-name="T48">import</text:span><text:span text:style-name="T56"> es.caib.distribucio.backoffice.utils.arxiu.ArxiuResultat;</text:span></text:p>
            <text:p text:style-name="P117"><text:span text:style-name="T48">import</text:span><text:span text:style-name="T56"> es.caib.distribucio.backoffice.utils.arxiu.ArxiuResultatAnnex;</text:span></text:p>
            <text:p text:style-name="P117"><text:span text:style-name="T48">import</text:span><text:span text:style-name="T56"> es.caib.distribucio.backoffice.utils.arxiu.BackofficeArxiuUtils;</text:span></text:p>
            <text:p text:style-name="P117"><text:span text:style-name="T48">import</text:span><text:span text:style-name="T56"> es.caib.distribucio.backoffice.utils.arxiu.BackofficeArxiuUtilsImpl;</text:span></text:p>
            <text:p text:style-name="P117"><text:span text:style-name="T48">import</text:span><text:span text:style-name="T56"> es.caib.distribucio.backoffice.utils.arxiu.DistribucioArxiuError;</text:span></text:p>
            <text:p text:style-name="P117"><text:span text:style-name="T48">import</text:span><text:span text:style-name="T56"> es.caib.distribucio.backoffice.utils.sistra.BackofficeSistra2Utils;</text:span></text:p>
            <text:p text:style-name="P117"><text:span text:style-name="T48">import</text:span><text:span text:style-name="T56"> es.caib.distribucio.backoffice.utils.sistra.BackofficeSistra2UtilsImpl;</text:span></text:p>
            <text:p text:style-name="P117"><text:span text:style-name="T48">import</text:span><text:span text:style-name="T56"> es.caib.distribucio.backoffice.utils.sistra.formulario.Formulario;</text:span></text:p>
            <text:p text:style-name="P117"><text:span text:style-name="T48">import</text:span><text:span text:style-name="T56"> es.caib.distribucio.backoffice.utils.sistra.pago.Pago;</text:span></text:p>
            <text:p text:style-name="P117"><text:span text:style-name="T48">import</text:span><text:span text:style-name="T56"> es.caib.distribucio.core.api.dto.ExpedientEstatEnumDto;</text:span></text:p>
            <text:p text:style-name="P117"><text:span text:style-name="T48">import</text:span><text:span text:style-name="T56"> es.caib.distribucio.core.api.service.ws.backoffice.AnotacioRegistreId;</text:span></text:p>
            <text:p text:style-name="P117"><text:span text:style-name="T48">import</text:span><text:span text:style-name="T56"> es.caib.distribucio.core.api.service.ws.backoffice.BackofficeWsService;</text:span></text:p>
            <text:p text:style-name="P117"><text:span text:style-name="T48">import</text:span><text:span text:style-name="T56"> es.caib.distribucio.core.helper.IntegracioHelper;</text:span></text:p>
            <text:p text:style-name="P117"><text:span text:style-name="T48">import</text:span><text:span text:style-name="T56"> es.caib.distribucio.core.helper.PropertiesHelper;</text:span></text:p>
            <text:p text:style-name="P117"><text:span text:style-name="T48">import</text:span><text:span text:style-name="T56"> es.caib.distribucio.core.helper.RegistreHelper;</text:span></text:p>
            <text:p text:style-name="P117"><text:span text:style-name="T48">import</text:span><text:span text:style-name="T56"> es.caib.distribucio.plugin.SistemaExternException;</text:span></text:p>
            <text:p text:style-name="P117"><text:span text:style-name="T48">import</text:span><text:span text:style-name="T56"> es.caib.distribucio.ws.backofficeintegracio.Annex;</text:span></text:p>
            <text:p text:style-name="P117"><text:span text:style-name="T48">import</text:span><text:span text:style-name="T56"> es.caib.distribucio.ws.backofficeintegracio.AnotacioRegistreEntrada;</text:span></text:p>
            <text:p text:style-name="P117"><text:span text:style-name="T48">import</text:span><text:span text:style-name="T56"> es.caib.distribucio.ws.backofficeintegracio.BackofficeIntegracio;</text:span></text:p>
            <text:p text:style-name="P117"><text:span text:style-name="T48">import</text:span><text:span text:style-name="T56"> es.caib.distribucio.ws.client.BackofficeIntegracioWsClientFactory;</text:span></text:p>
            <text:p text:style-name="P117"><text:span text:style-name="T48">import</text:span><text:span text:style-name="T56"> es.caib.plugins.arxiu.api.ContingutArxiu;</text:span></text:p>
            <text:p text:style-name="P117"><text:span text:style-name="T48">import</text:span><text:span text:style-name="T56"> es.caib.plugins.arxiu.api.Document;</text:span></text:p>
            <text:p text:style-name="P117"><text:span text:style-name="T48">import</text:span><text:span text:style-name="T56"> es.caib.plugins.arxiu.api.Expedient;</text:span></text:p>
            <text:p text:style-name="P115"><text:span text:style-name="T48">import</text:span><text:span text:style-name="T56"> es.caib.plugins.arxiu.api.IArxiuPlugin;</text:span></text:p>
            <text:p text:style-name="P184"/>
            <text:p text:style-name="P128">/**</text:p>
            <text:p text:style-name="P116"><text:span text:style-name="T198"><text:s/>* </text:span><text:span text:style-name="T201">Exemple</text:span><text:span text:style-name="T198"> </text:span><text:span text:style-name="T201">de</text:span><text:span text:style-name="T198"> WS </text:span><text:span text:style-name="T201">Backoffice</text:span><text:span text:style-name="T198"> </text:span><text:span text:style-name="T201">Distribucio</text:span><text:span text:style-name="T198"> per </text:span><text:span text:style-name="T201">rebre</text:span><text:span text:style-name="T198"> </text:span><text:span text:style-name="T201">peticions</text:span><text:span text:style-name="T198"> d'anotacions </text:span><text:span text:style-name="T201">pendents</text:span></text:p>
            <text:p text:style-name="P128"><text:s/>* </text:p>
            <text:p text:style-name="P116"><text:span text:style-name="T198"><text:s/>* </text:span><text:span text:style-name="T203">@author</text:span><text:span text:style-name="T198"> Limit </text:span><text:span text:style-name="T201">Tecnologies</text:span><text:span text:style-name="T198"> &lt;limit</text:span><text:span text:style-name="T201">@limit.es</text:span><text:span text:style-name="T198">&gt;</text:span></text:p>
            <text:p text:style-name="P128"><text:s/>*/</text:p>
            <text:p text:style-name="P113">@Component</text:p>
            <text:p text:style-name="P116"><text:span text:style-name="T105">@WebService</text:span><text:span text:style-name="T56">(</text:span></text:p>
            <text:p text:style-name="P116"><text:span text:style-name="T56"><text:tab/><text:tab/>name = </text:span><text:span text:style-name="T33">"Backoffice"</text:span><text:span text:style-name="T56">,</text:span></text:p>
            <text:p text:style-name="P116"><text:span text:style-name="T56"><text:tab/><text:tab/>serviceName = </text:span><text:span text:style-name="T33">"BackofficeService"</text:span><text:span text:style-name="T56">,</text:span></text:p>
            <text:p text:style-name="P116"><text:span text:style-name="T56"><text:tab/><text:tab/>portName = </text:span><text:span text:style-name="T33">"BackofficeServicePort"</text:span><text:span text:style-name="T56">,</text:span></text:p>
            <text:p text:style-name="P116"><text:span text:style-name="T56"><text:tab/><text:tab/>endpointInterface = </text:span><text:span text:style-name="T33">"es.caib.ripea.core.api.service.ws.BackofficeWsServiceBean"</text:span><text:span text:style-name="T56">,</text:span></text:p>
            <text:p text:style-name="P116"><text:span text:style-name="T56"><text:tab/><text:tab/>targetNamespace = </text:span><text:span text:style-name="T33">"http://www.caib.es/distribucio/ws/backoffice"</text:span><text:span text:style-name="T56">)</text:span></text:p>
            <text:p text:style-name="P116"><text:span text:style-name="T48">public</text:span><text:span text:style-name="T56"> </text:span><text:span text:style-name="T48">class</text:span><text:span text:style-name="T56"> BackofficeWsServiceImpl </text:span><text:span text:style-name="T48">implements</text:span><text:span text:style-name="T56"> BackofficeWsService, </text:span></text:p>
            <text:p text:style-name="P91"><text:tab/><text:tab/><text:tab/><text:tab/><text:tab/><text:tab/><text:tab/><text:tab/><text:tab/><text:tab/><text:tab/><text:tab/>ArxiuPluginListener {</text:p>
            <text:p text:style-name="P91"><text:tab/></text:p>
            <text:p text:style-name="P116"><text:span text:style-name="T56"><text:tab/></text:span><text:span text:style-name="T198">/** </text:span><text:span text:style-name="T201">Instància</text:span><text:span text:style-name="T198"> </text:span><text:span text:style-name="T201">del</text:span><text:span text:style-name="T198"> </text:span><text:span text:style-name="T201">plugin</text:span><text:span text:style-name="T198"> d'Arxiu */</text:span></text:p>
            <text:p text:style-name="P116"><text:span text:style-name="T56"><text:tab/></text:span><text:span text:style-name="T48">private</text:span><text:span text:style-name="T56"> IArxiuPlugin </text:span><text:span text:style-name="T75">arxiuPlugin</text:span><text:span text:style-name="T56"> = </text:span><text:span text:style-name="T48">null</text:span><text:span text:style-name="T56">;</text:span></text:p>
            <text:p text:style-name="P91"><text:tab/><text:tab/></text:p>
            <text:p text:style-name="P116"><text:span text:style-name="T56"><text:tab/></text:span><text:span text:style-name="T198">/** </text:span><text:span text:style-name="T201">Mètode</text:span><text:span text:style-name="T198"> </text:span><text:span text:style-name="T201">del</text:span><text:span text:style-name="T198"> WS </text:span><text:span text:style-name="T201">que</text:span><text:span text:style-name="T198"> </text:span><text:span text:style-name="T201">rep</text:span><text:span text:style-name="T198"> </text:span><text:span text:style-name="T201">les</text:span><text:span text:style-name="T198"> </text:span><text:span text:style-name="T201">comunicacions</text:span><text:span text:style-name="T198"> d'anotacions </text:span><text:span text:style-name="T201">pendents</text:span><text:span text:style-name="T198">. */</text:span></text:p>
            <text:p text:style-name="P116"><text:span text:style-name="T56"><text:tab/></text:span><text:span text:style-name="T105">@Override</text:span></text:p>
            <text:p text:style-name="P116"><text:span text:style-name="T56"><text:tab/></text:span><text:span text:style-name="T48">public</text:span><text:span text:style-name="T56"> </text:span><text:span text:style-name="T48">void</text:span><text:span text:style-name="T56"> comunicarAnotacionsPendents(List&lt;AnotacioRegistreId&gt; </text:span><text:span text:style-name="T81">ids</text:span><text:span text:style-name="T56">) {</text:span></text:p>
            <text:p text:style-name="P184"/>
            <text:p text:style-name="P116"><text:span text:style-name="T56"><text:tab/><text:tab/></text:span><text:span text:style-name="T48">try</text:span><text:span text:style-name="T56"> {</text:span></text:p>
            <text:p text:style-name="P116"><text:span text:style-name="T56"><text:tab/><text:tab/><text:tab/></text:span><text:span text:style-name="T216">// Client </text:span><text:span text:style-name="T217">dels</text:span><text:span text:style-name="T216"> </text:span><text:span text:style-name="T217">serveis</text:span><text:span text:style-name="T216"> web </text:span><text:span text:style-name="T217">de</text:span><text:span text:style-name="T216"> </text:span><text:span text:style-name="T217">backoffice</text:span><text:span text:style-name="T216"> per </text:span><text:span text:style-name="T217">consultar</text:span><text:span text:style-name="T216"> </text:span><text:span text:style-name="T217">anotacions</text:span></text:p>
            <text:p text:style-name="P116"><text:span text:style-name="T56"><text:tab/><text:tab/><text:tab/>BackofficeIntegracio </text:span><text:span text:style-name="T81">backofficeClient</text:span><text:span text:style-name="T56"> = getBackofficeIntegracioServicePort();</text:span></text:p>
            <text:p text:style-name="P116"><text:span text:style-name="T56"><text:tab/><text:tab/><text:tab/>es.caib.distribucio.ws.backofficeintegracio.AnotacioRegistreId </text:span><text:span text:style-name="T81">idWs</text:span><text:span text:style-name="T56">;</text:span></text:p>
            <text:p text:style-name="P125"><text:span text:style-name="T56"><text:tab/><text:tab/><text:tab/></text:span><text:span text:style-name="T48">for</text:span><text:span text:style-name="T56"> (AnotacioRegistreId </text:span><text:span text:style-name="T81">id</text:span><text:span text:style-name="T56"> : </text:span><text:span text:style-name="T81">ids</text:span><text:span text:style-name="T56">) {</text:span></text:p>
            <text:p text:style-name="P116"><text:soft-page-break/><text:span text:style-name="T56"><text:tab/><text:tab/><text:tab/><text:tab/></text:span><text:span text:style-name="T48">try</text:span><text:span text:style-name="T56"> {</text:span></text:p>
            <text:p text:style-name="P116"><text:span text:style-name="T56"><text:tab/><text:tab/><text:tab/><text:tab/><text:tab/></text:span><text:span text:style-name="T216">// </text:span><text:span text:style-name="T217">Construeix</text:span><text:span text:style-name="T216"> l'identificador </text:span><text:span text:style-name="T217">pel</text:span><text:span text:style-name="T216"> WS </text:span><text:span text:style-name="T217">del</text:span><text:span text:style-name="T216"> </text:span><text:span text:style-name="T217">backoffice</text:span><text:span text:style-name="T216"> </text:span><text:span text:style-name="T217">de</text:span><text:span text:style-name="T216"> DISTRIBUCIO</text:span></text:p>
            <text:p text:style-name="P116"><text:span text:style-name="T56"><text:tab/><text:tab/><text:tab/><text:tab/><text:tab/></text:span><text:span text:style-name="T81">idWs</text:span><text:span text:style-name="T56"> = </text:span><text:span text:style-name="T48">new</text:span><text:span text:style-name="T56"> es.caib.distribucio.ws.backofficeintegracio.AnotacioRegistreId();</text:span></text:p>
            <text:p text:style-name="P116"><text:span text:style-name="T56"><text:tab/><text:tab/><text:tab/><text:tab/><text:tab/></text:span><text:span text:style-name="T81">idWs</text:span><text:span text:style-name="T56">.setClauAcces(</text:span><text:span text:style-name="T81">id</text:span><text:span text:style-name="T56">.getClauAcces());</text:span></text:p>
            <text:p text:style-name="P116"><text:span text:style-name="T56"><text:tab/><text:tab/><text:tab/><text:tab/><text:tab/></text:span><text:span text:style-name="T81">idWs</text:span><text:span text:style-name="T56">.setIndetificador(</text:span><text:span text:style-name="T81">id</text:span><text:span text:style-name="T56">.getIndetificador());</text:span></text:p>
            <text:p text:style-name="P91"><text:tab/><text:tab/></text:p>
            <text:p text:style-name="P116"><text:span text:style-name="T56"><text:tab/><text:tab/><text:tab/><text:tab/><text:tab/></text:span><text:span text:style-name="T216">// </text:span><text:span text:style-name="T217">Consulta</text:span><text:span text:style-name="T216"> l'anotació</text:span></text:p>
            <text:p text:style-name="P116"><text:span text:style-name="T56"><text:tab/><text:tab/><text:tab/><text:tab/><text:tab/>AnotacioRegistreEntrada </text:span><text:span text:style-name="T81">anotacio</text:span><text:span text:style-name="T56"> = </text:span><text:span text:style-name="T81">backofficeClient</text:span><text:span text:style-name="T56">.consulta(</text:span><text:span text:style-name="T81">idWs</text:span><text:span text:style-name="T56">);</text:span></text:p>
            <text:p text:style-name="P116"><text:span text:style-name="T56"><text:tab/><text:tab/><text:tab/><text:tab/><text:tab/></text:span><text:span text:style-name="T216">// </text:span><text:span text:style-name="T217">Canvia</text:span><text:span text:style-name="T216"> l'estat a </text:span><text:span text:style-name="T217">Rebuda</text:span></text:p>
            <text:p text:style-name="P116"><text:span text:style-name="T56"><text:tab/><text:tab/><text:tab/><text:tab/><text:tab/></text:span><text:span text:style-name="T81">backofficeClient</text:span><text:span text:style-name="T56">.canviEstat(</text:span></text:p>
            <text:p text:style-name="P116"><text:span text:style-name="T56"><text:tab/><text:tab/><text:tab/><text:tab/><text:tab/><text:tab/><text:tab/></text:span><text:span text:style-name="T81">idWs</text:span><text:span text:style-name="T56">,</text:span></text:p>
            <text:p text:style-name="P116"><text:span text:style-name="T56"><text:tab/><text:tab/><text:tab/><text:tab/><text:tab/><text:tab/><text:tab/>es.caib.distribucio.ws.backofficeintegracio.Estat.</text:span><text:span text:style-name="T76">REBUDA</text:span><text:span text:style-name="T56">,</text:span></text:p>
            <text:p text:style-name="P116"><text:span text:style-name="T56"><text:tab/><text:tab/><text:tab/><text:tab/><text:tab/><text:tab/><text:tab/></text:span><text:span text:style-name="T33">"Canviar l'estat a rebuda"</text:span><text:span text:style-name="T56">);</text:span></text:p>
            <text:p text:style-name="P91"><text:tab/><text:tab/><text:tab/><text:tab/><text:tab/></text:p>
            <text:p text:style-name="P116"><text:span text:style-name="T56"><text:tab/><text:tab/><text:tab/><text:tab/><text:tab/></text:span><text:span text:style-name="T216">// </text:span><text:span text:style-name="T217">Prepara</text:span><text:span text:style-name="T216"> </text:span><text:span text:style-name="T217">la</text:span><text:span text:style-name="T216"> </text:span><text:span text:style-name="T217">cria</text:span><text:span text:style-name="T216"> a </text:span><text:span text:style-name="T217">la</text:span><text:span text:style-name="T216"> </text:span><text:span text:style-name="T217">llibreria</text:span><text:span text:style-name="T216"> d'utilitats </text:span><text:span text:style-name="T217">pel</text:span><text:span text:style-name="T216"> </text:span><text:span text:style-name="T217">backoffice</text:span><text:span text:style-name="T216"> </text:span><text:span text:style-name="T217">de</text:span><text:span text:style-name="T216"> DISTRIBUCIO</text:span></text:p>
            <text:p text:style-name="P116"><text:span text:style-name="T56"><text:tab/><text:tab/><text:tab/><text:tab/><text:tab/></text:span><text:span text:style-name="T216">// Constructor </text:span><text:span text:style-name="T217">amb</text:span><text:span text:style-name="T216"> </text:span><text:span text:style-name="T217">la</text:span><text:span text:style-name="T216"> </text:span><text:span text:style-name="T217">referència</text:span><text:span text:style-name="T216"> </text:span><text:span text:style-name="T217">al</text:span><text:span text:style-name="T216"> </text:span><text:span text:style-name="T217">plugin</text:span><text:span text:style-name="T216"> d'Arxiu</text:span></text:p>
            <text:p text:style-name="P116"><text:span text:style-name="T56"><text:tab/><text:tab/><text:tab/><text:tab/><text:tab/>BackofficeArxiuUtils </text:span><text:span text:style-name="T81">backoffice</text:span><text:span text:style-name="T88">Arxiu</text:span><text:span text:style-name="T81">Utils</text:span><text:span text:style-name="T56"> = </text:span><text:span text:style-name="T48">new</text:span><text:span text:style-name="T56"> BackofficeArxiuUtilsImpl(getArxiuPlugin());</text:span></text:p>
            <text:p text:style-name="P116"><text:span text:style-name="T56"><text:tab/><text:tab/><text:tab/><text:tab/><text:tab/></text:span><text:span text:style-name="T216">// </text:span><text:span text:style-name="T217">Afegeix</text:span><text:span text:style-name="T216"> </text:span><text:span text:style-name="T217">la</text:span><text:span text:style-name="T216"> </text:span><text:span text:style-name="T217">instància</text:span><text:span text:style-name="T216"> </text:span><text:span text:style-name="T217">de</text:span><text:span text:style-name="T216"> </text:span><text:span text:style-name="T217">la</text:span><text:span text:style-name="T216"> </text:span><text:span text:style-name="T217">classe</text:span><text:span text:style-name="T216"> </text:span><text:span text:style-name="T217">com</text:span><text:span text:style-name="T216"> a </text:span><text:span text:style-name="T217">escoltador</text:span><text:span text:style-name="T216"> d'events</text:span></text:p>
            <text:p text:style-name="P116"><text:span text:style-name="T56"><text:tab/><text:tab/><text:tab/><text:tab/><text:tab/></text:span><text:span text:style-name="T81">backoffice</text:span><text:span text:style-name="T88">Arxiu</text:span><text:span text:style-name="T81">Utils</text:span><text:span text:style-name="T56">.setArxiuPluginListener(</text:span><text:span text:style-name="T48">this</text:span><text:span text:style-name="T56">);</text:span></text:p>
            <text:p text:style-name="P116"><text:span text:style-name="T56"><text:tab/><text:tab/><text:tab/><text:tab/><text:tab/></text:span><text:span text:style-name="T216">// </text:span><text:span text:style-name="T217">Estableix</text:span><text:span text:style-name="T216"> </text:span><text:span text:style-name="T217">la</text:span><text:span text:style-name="T216"> </text:span><text:span text:style-name="T217">carpeta</text:span><text:span text:style-name="T216"> on </text:span><text:span text:style-name="T217">guardar</text:span><text:span text:style-name="T216"> els </text:span><text:span text:style-name="T217">annexos</text:span><text:span text:style-name="T216"> </text:span><text:span text:style-name="T217">de</text:span><text:span text:style-name="T216"> l'anotació</text:span></text:p>
            <text:p text:style-name="P116"><text:span text:style-name="T56"><text:tab/><text:tab/><text:tab/><text:tab/><text:tab/></text:span><text:span text:style-name="T81">backoffice</text:span><text:span text:style-name="T88">Arxiu</text:span><text:span text:style-name="T81">Utils</text:span><text:span text:style-name="T56">.setCarpeta(</text:span><text:span text:style-name="T81">anotacio</text:span><text:span text:style-name="T56">.getIdentificador());</text:span></text:p>
            <text:p text:style-name="P91"><text:tab/><text:tab/></text:p>
            <text:p text:style-name="P116"><text:span text:style-name="T56"><text:tab/><text:tab/><text:tab/><text:tab/><text:tab/></text:span><text:span text:style-name="T216">// </text:span><text:span text:style-name="T217">Crida</text:span><text:span text:style-name="T216"> a </text:span><text:span text:style-name="T217">la</text:span><text:span text:style-name="T216"> </text:span><text:span text:style-name="T217">creació</text:span><text:span text:style-name="T216"> </text:span><text:span text:style-name="T217">de</text:span><text:span text:style-name="T216"> l'expedient</text:span></text:p>
            <text:p text:style-name="P116"><text:span text:style-name="T56"><text:tab/><text:tab/><text:tab/><text:tab/><text:tab/>String </text:span><text:span text:style-name="T81">SERIE_DOCUMENTAL</text:span><text:span text:style-name="T56"> = </text:span><text:span text:style-name="T33">"S0002"</text:span><text:span text:style-name="T56">; </text:span></text:p>
            <text:p text:style-name="P116"><text:span text:style-name="T56"><text:tab/><text:tab/><text:tab/><text:tab/><text:tab/>String </text:span><text:span text:style-name="T81">CLASSIFICACIO</text:span><text:span text:style-name="T56"> = </text:span><text:span text:style-name="T33">"000000"</text:span><text:span text:style-name="T56">;</text:span></text:p>
            <text:p text:style-name="P116"><text:span text:style-name="T56"><text:tab/><text:tab/><text:tab/><text:tab/><text:tab/>ArxiuResultat </text:span><text:span text:style-name="T81">arxiuResultat</text:span><text:span text:style-name="T56">;</text:span></text:p>
            <text:p text:style-name="P116"><text:span text:style-name="T56"><text:tab/><text:tab/><text:tab/><text:tab/><text:tab/></text:span><text:span text:style-name="T48">int</text:span><text:span text:style-name="T56"> </text:span><text:span text:style-name="T81">intent</text:span><text:span text:style-name="T56"> = 0;</text:span></text:p>
            <text:p text:style-name="P116"><text:span text:style-name="T56"><text:tab/><text:tab/><text:tab/><text:tab/><text:tab/>String </text:span><text:span text:style-name="T81">expedientUuid</text:span><text:span text:style-name="T56"> = </text:span><text:span text:style-name="T48">null</text:span><text:span text:style-name="T56">;</text:span></text:p>
            <text:p text:style-name="P116"><text:span text:style-name="T56"><text:tab/><text:tab/><text:tab/><text:tab/><text:tab/></text:span><text:span text:style-name="T48">do</text:span><text:span text:style-name="T56"> {</text:span></text:p>
            <text:p text:style-name="P116"><text:span text:style-name="T56"><text:tab/><text:tab/><text:tab/><text:tab/><text:tab/><text:tab/></text:span><text:span text:style-name="T216">// </text:span><text:span text:style-name="T217">Crida</text:span><text:span text:style-name="T216"> </text:span><text:span text:style-name="T217">al</text:span><text:span text:style-name="T216"> </text:span><text:span text:style-name="T217">mètode</text:span><text:span text:style-name="T216"> </text:span><text:span text:style-name="T217">de</text:span><text:span text:style-name="T216"> </text:span><text:span text:style-name="T217">creació</text:span><text:span text:style-name="T216"> </text:span><text:span text:style-name="T217">de</text:span><text:span text:style-name="T216"> </text:span><text:span text:style-name="T217">la</text:span><text:span text:style-name="T216"> </text:span><text:span text:style-name="T217">llibreria</text:span></text:p>
            <text:p text:style-name="P116"><text:span text:style-name="T56"><text:tab/><text:tab/><text:tab/><text:tab/><text:tab/><text:tab/></text:span><text:span text:style-name="T81">arxiuResultat</text:span><text:span text:style-name="T56"> = </text:span><text:span text:style-name="T81">backoffice</text:span><text:span text:style-name="T88">Arxiu</text:span><text:span text:style-name="T81">Utils</text:span><text:span text:style-name="T56">.crearExpedientAmbAnotacioRegistre(</text:span></text:p>
            <text:p text:style-name="P116"><text:span text:style-name="T56"><text:tab/><text:tab/><text:tab/><text:tab/><text:tab/><text:tab/><text:tab/><text:tab/></text:span><text:span text:style-name="T81">expedientUuid</text:span><text:span text:style-name="T56">,</text:span></text:p>
            <text:p text:style-name="P116"><text:span text:style-name="T56"><text:tab/><text:tab/><text:tab/><text:tab/><text:tab/><text:tab/><text:tab/><text:tab/></text:span><text:span text:style-name="T81">anotacio</text:span><text:span text:style-name="T56">.getIdentificador(),</text:span></text:p>
            <text:p text:style-name="P116"><text:span text:style-name="T56"><text:tab/><text:tab/><text:tab/><text:tab/><text:tab/><text:tab/><text:tab/><text:tab/></text:span><text:span text:style-name="T48">null</text:span><text:span text:style-name="T56">,</text:span></text:p>
            <text:p text:style-name="P116"><text:span text:style-name="T56"><text:tab/><text:tab/><text:tab/><text:tab/><text:tab/><text:tab/><text:tab/><text:tab/>Arrays.</text:span><text:span text:style-name="T63">asList</text:span><text:span text:style-name="T56">(</text:span><text:span text:style-name="T33">"A04019281"</text:span><text:span text:style-name="T56">),</text:span></text:p>
            <text:p text:style-name="P116"><text:span text:style-name="T56"><text:tab/><text:tab/><text:tab/><text:tab/><text:tab/><text:tab/><text:tab/><text:tab/></text:span><text:span text:style-name="T48">new</text:span><text:span text:style-name="T56"> Date(),</text:span></text:p>
            <text:p text:style-name="P116"><text:span text:style-name="T56"><text:tab/><text:tab/><text:tab/><text:tab/><text:tab/><text:tab/><text:tab/><text:tab/></text:span><text:span text:style-name="T81">CLASSIFICACIO</text:span><text:span text:style-name="T56">,</text:span></text:p>
            <text:p text:style-name="P116"><text:span text:style-name="T56"><text:tab/><text:tab/><text:tab/><text:tab/><text:tab/><text:tab/><text:tab/><text:tab/>ExpedientEstatEnumDto.</text:span><text:span text:style-name="T76">OBERT</text:span><text:span text:style-name="T56">,</text:span></text:p>
            <text:p text:style-name="P116"><text:span text:style-name="T56"><text:tab/><text:tab/><text:tab/><text:tab/><text:tab/><text:tab/><text:tab/><text:tab/></text:span><text:span text:style-name="T81">SERIE_DOCUMENTAL</text:span><text:span text:style-name="T56">,</text:span></text:p>
            <text:p text:style-name="P116"><text:span text:style-name="T56"><text:tab/><text:tab/><text:tab/><text:tab/><text:tab/><text:tab/><text:tab/><text:tab/></text:span><text:span text:style-name="T81">anotacio</text:span><text:span text:style-name="T56">);</text:span></text:p>
            <text:p text:style-name="P116"><text:span text:style-name="T56"><text:tab/><text:tab/><text:tab/><text:tab/><text:tab/><text:tab/></text:span><text:span text:style-name="T81">expedientUuid</text:span><text:span text:style-name="T56"> = </text:span><text:span text:style-name="T81">arxiuResultat</text:span><text:span text:style-name="T56">.getIdentificadorExpedient();</text:span></text:p>
            <text:p text:style-name="P116"><text:span text:style-name="T56"><text:tab/><text:tab/><text:tab/><text:tab/><text:tab/><text:tab/></text:span><text:span text:style-name="T216">// </text:span><text:span text:style-name="T217">Imprimeix</text:span><text:span text:style-name="T216"> el </text:span><text:span text:style-name="T217">resultat</text:span><text:span text:style-name="T216"> per </text:span><text:span text:style-name="T217">pantalla</text:span></text:p>
            <text:p text:style-name="P116"><text:span text:style-name="T56"><text:tab/><text:tab/><text:tab/><text:tab/><text:tab/><text:tab/></text:span><text:span text:style-name="T48">this</text:span><text:span text:style-name="T56">.logResultat(</text:span></text:p>
            <text:p text:style-name="P116"><text:span text:style-name="T56"><text:tab/><text:tab/><text:tab/><text:tab/><text:tab/><text:tab/><text:tab/><text:tab/></text:span><text:span text:style-name="T33">"Resultat de la crida "</text:span><text:span text:style-name="T56"> + </text:span><text:span text:style-name="T81">intent</text:span><text:span text:style-name="T56">++ + </text:span><text:span text:style-name="T33">" crearExpedientAmbAnotacioRegistre per l'expedient"</text:span><text:span text:style-name="T56"> + </text:span><text:span text:style-name="T81">anotacio</text:span><text:span text:style-name="T56">.getExpedientNumero(),</text:span></text:p>
            <text:p text:style-name="P116"><text:span text:style-name="T56"><text:tab/><text:tab/><text:tab/><text:tab/><text:tab/><text:tab/><text:tab/><text:tab/></text:span><text:span text:style-name="T81">arxiuResultat</text:span><text:span text:style-name="T56">);<text:tab/><text:tab/><text:tab/><text:tab/><text:tab/></text:span></text:p>
            <text:p text:style-name="P116"><text:span text:style-name="T56"><text:tab/><text:tab/><text:tab/><text:tab/><text:tab/>} </text:span><text:span text:style-name="T48">while</text:span><text:span text:style-name="T56">(</text:span><text:span text:style-name="T81">arxiuResultat</text:span><text:span text:style-name="T56">.getErrorCodi() != </text:span><text:span text:style-name="T70">DistribucioArxiuError.</text:span><text:span text:style-name="T77">NO_ERROR</text:span><text:span text:style-name="T56"> &amp;&amp; </text:span><text:span text:style-name="T81">intent</text:span><text:span text:style-name="T56"> &lt; 10);<text:tab/></text:span></text:p>
            <text:p text:style-name="P184"/>
            <text:p text:style-name="P116"><text:span text:style-name="T56"><text:tab/><text:tab/><text:tab/><text:tab/><text:tab/></text:span><text:span text:style-name="T216">// </text:span><text:span text:style-name="T217">Consultem</text:span><text:span text:style-name="T216"> el </text:span><text:span text:style-name="T217">nou</text:span><text:span text:style-name="T216"> expedient a l'Arxiu</text:span></text:p>
            <text:p text:style-name="P116"><text:span text:style-name="T56"><text:tab/><text:tab/><text:tab/><text:tab/><text:tab/></text:span><text:span text:style-name="T48">if</text:span><text:span text:style-name="T56"> (</text:span><text:span text:style-name="T81">expedientUuid</text:span><text:span text:style-name="T56"> != </text:span><text:span text:style-name="T48">null</text:span><text:span text:style-name="T56">) {</text:span></text:p>
            <text:p text:style-name="P116"><text:span text:style-name="T56"><text:tab/><text:tab/><text:tab/><text:tab/><text:tab/><text:tab/>Expedient </text:span><text:span text:style-name="T81">expedientDetalls</text:span><text:span text:style-name="T56"> = getArxiuPlugin().expedientDetalls(</text:span><text:span text:style-name="T81">arxiuResultat</text:span><text:span text:style-name="T56">.getIdentificadorExpedient(), </text:span><text:span text:style-name="T48">null</text:span><text:span text:style-name="T56">);</text:span></text:p>
            <text:p text:style-name="P116"><text:span text:style-name="T56"><text:tab/><text:tab/><text:tab/><text:tab/><text:tab/><text:tab/></text:span><text:span text:style-name="T76">logger</text:span><text:span text:style-name="T56">.debug(</text:span><text:span text:style-name="T33">"S'ha creat l'expedient \""</text:span><text:span text:style-name="T56"> + </text:span><text:span text:style-name="T81">expedientDetalls</text:span><text:span text:style-name="T56">.getNom() + </text:span><text:span text:style-name="T33">"\" amb id="</text:span><text:span text:style-name="T56"> + </text:span><text:span text:style-name="T81">expedientDetalls</text:span><text:span text:style-name="T56">.getIdentificador() + </text:span><text:span text:style-name="T33">" per l'anotació "</text:span><text:span text:style-name="T56"> + </text:span><text:span text:style-name="T81">anotacio</text:span><text:span text:style-name="T56">.getIdentificador() + </text:span><text:span text:style-name="T33">" amb els següents continguts:"</text:span><text:span text:style-name="T56">);</text:span></text:p>
            <text:p text:style-name="P116"><text:span text:style-name="T56"><text:tab/><text:tab/><text:tab/><text:tab/><text:tab/><text:tab/></text:span><text:span text:style-name="T48">for</text:span><text:span text:style-name="T56"> (ContingutArxiu </text:span><text:span text:style-name="T81">contingut</text:span><text:span text:style-name="T56"> : </text:span><text:span text:style-name="T81">expedientDetalls</text:span><text:span text:style-name="T56">.getContinguts()) {</text:span></text:p>
            <text:p text:style-name="P116"><text:span text:style-name="T56"><text:tab/><text:tab/><text:tab/><text:tab/><text:tab/><text:tab/><text:tab/></text:span><text:span text:style-name="T76">logger</text:span><text:span text:style-name="T56">.debug(</text:span><text:span text:style-name="T33">"- "</text:span><text:span text:style-name="T56"> + </text:span><text:span text:style-name="T81">contingut</text:span><text:span text:style-name="T56">.getIdentificador() + </text:span><text:span text:style-name="T33">" "</text:span><text:span text:style-name="T56"> + </text:span><text:span text:style-name="T81">contingut</text:span><text:span text:style-name="T56">.getNom() + </text:span><text:span text:style-name="T33">" amb "</text:span><text:span text:style-name="T56"> + (</text:span><text:span text:style-name="T81">contingut</text:span><text:span text:style-name="T56">.getFirmes() != </text:span><text:span text:style-name="T48">null</text:span><text:span text:style-name="T56">? </text:span><text:span text:style-name="T81">contingut</text:span><text:span text:style-name="T56">.getFirmes().size() : 0) + </text:span><text:span text:style-name="T33">" firmes."</text:span><text:span text:style-name="T56">);</text:span></text:p>
            <text:p text:style-name="P91"><text:tab/><text:tab/><text:tab/><text:tab/><text:tab/><text:tab/>}</text:p>
            <text:p text:style-name="P116"><text:span text:style-name="T56"><text:tab/><text:tab/><text:tab/><text:tab/><text:tab/>} </text:span><text:span text:style-name="T48">else</text:span><text:span text:style-name="T56"> {</text:span></text:p>
            <text:p text:style-name="P116"><text:span text:style-name="T56"><text:tab/><text:tab/><text:tab/><text:tab/><text:tab/><text:tab/></text:span><text:span text:style-name="T76">logger</text:span><text:span text:style-name="T56">.warn(</text:span><text:span text:style-name="T33">"L'expedient no s'ha pogut crear per l'anotació "</text:span><text:span text:style-name="T56"> + </text:span><text:span text:style-name="T81">anotacio</text:span><text:span text:style-name="T56">.getIdentificador());</text:span></text:p>
            <text:p text:style-name="P91"><text:tab/><text:tab/><text:tab/><text:tab/><text:tab/>}</text:p>
            <text:p text:style-name="P91"><text:tab/><text:tab/><text:tab/><text:tab/><text:tab/><text:span text:style-name="T219">// Processament dels annexos de documents tècnics segons el títol</text:span></text:p>
            <text:p text:style-name="P122"><text:span text:style-name="T56"><text:tab/><text:tab/><text:tab/><text:tab/><text:tab/>String </text:span><text:span text:style-name="T81">titol</text:span><text:span text:style-name="T56">;</text:span></text:p>
            <text:p text:style-name="P122"><text:soft-page-break/><text:span text:style-name="T56"><text:tab/><text:tab/><text:tab/><text:tab/><text:tab/></text:span><text:span text:style-name="T48">for</text:span><text:span text:style-name="T56"> (Annex </text:span><text:span text:style-name="T81">annex</text:span><text:span text:style-name="T56"> : </text:span><text:span text:style-name="T81">anotacio</text:span><text:span text:style-name="T56">.getAnnexos()) {</text:span></text:p>
            <text:p text:style-name="P122"><text:span text:style-name="T56"><text:tab/><text:tab/><text:tab/><text:tab/><text:tab/><text:tab/></text:span><text:span text:style-name="T81">titol</text:span><text:span text:style-name="T56"> = </text:span><text:span text:style-name="T81">annex</text:span><text:span text:style-name="T56">.getTitol();</text:span></text:p>
            <text:p text:style-name="P122"><text:span text:style-name="T56"><text:tab/><text:tab/><text:tab/><text:tab/><text:tab/><text:tab/></text:span><text:span text:style-name="T48">if</text:span><text:span text:style-name="T56"> (</text:span><text:span text:style-name="T81">titol</text:span><text:span text:style-name="T56"> != </text:span><text:span text:style-name="T48">null</text:span><text:span text:style-name="T56"> </text:span></text:p>
            <text:p text:style-name="P122"><text:span text:style-name="T56"><text:tab/><text:tab/><text:tab/><text:tab/><text:tab/><text:tab/><text:tab/><text:tab/>&amp;&amp; (</text:span><text:span text:style-name="T33">"FORMULARIO"</text:span><text:span text:style-name="T56">.equals(</text:span><text:span text:style-name="T81">titol</text:span><text:span text:style-name="T56">) </text:span></text:p>
            <text:p text:style-name="P122"><text:span text:style-name="T56"><text:tab/><text:tab/><text:tab/><text:tab/><text:tab/><text:tab/><text:tab/><text:tab/><text:tab/><text:tab/>|| </text:span><text:span text:style-name="T33">"PAGO"</text:span><text:span text:style-name="T56">.equals(</text:span><text:span text:style-name="T81">titol</text:span><text:span text:style-name="T56">))) {</text:span></text:p>
            <text:p text:style-name="P122"><text:span text:style-name="T56"><text:tab/><text:tab/><text:tab/><text:tab/><text:tab/><text:tab/><text:tab/></text:span><text:span text:style-name="T216">// Recupera el contingut de l'annex</text:span></text:p>
            <text:p text:style-name="P122"><text:span text:style-name="T56"><text:tab/><text:tab/><text:tab/><text:tab/><text:tab/><text:tab/><text:tab/>Document </text:span><text:span text:style-name="T81">document</text:span><text:span text:style-name="T56"> = getArxiuPlugin().documentDetalls(</text:span><text:span text:style-name="T81">annex</text:span><text:span text:style-name="T56">.getUuid(), </text:span><text:span text:style-name="T48">null</text:span><text:span text:style-name="T56">, </text:span><text:span text:style-name="T48">true</text:span><text:span text:style-name="T56">);<text:tab/><text:tab/><text:tab/><text:tab/><text:tab/><text:tab/><text:tab/></text:span></text:p>
            <text:p text:style-name="P122"><text:span text:style-name="T56"><text:tab/><text:tab/><text:tab/><text:tab/><text:tab/><text:tab/><text:tab/></text:span><text:span text:style-name="T48">byte</text:span><text:span text:style-name="T56">[] </text:span><text:span text:style-name="T81">contingut</text:span><text:span text:style-name="T56"> = </text:span><text:span text:style-name="T81">document</text:span><text:span text:style-name="T56">.getContingut().getContingut();</text:span></text:p>
            <text:p text:style-name="P122"><text:span text:style-name="T56"><text:tab/><text:tab/><text:tab/><text:tab/><text:tab/><text:tab/><text:tab/></text:span><text:span text:style-name="T216">// Interpreta el contingut amb la classe BackofficeSistra2Utils</text:span></text:p>
            <text:p text:style-name="P122"><text:span text:style-name="T56"><text:tab/><text:tab/><text:tab/><text:tab/><text:tab/><text:tab/><text:tab/>BackofficeSistra2Utils </text:span><text:span text:style-name="T81">sistra2Utils</text:span><text:span text:style-name="T56"> = </text:span><text:span text:style-name="T48">new</text:span><text:span text:style-name="T56"> BackofficeSistra2UtilsImpl();</text:span></text:p>
            <text:p text:style-name="P122"><text:span text:style-name="T56"><text:tab/><text:tab/><text:tab/><text:tab/><text:tab/><text:tab/><text:tab/></text:span><text:span text:style-name="T76">logger</text:span><text:span text:style-name="T56">.debug(</text:span><text:span text:style-name="T33">" <text:s/>Document tècnic \""</text:span><text:span text:style-name="T56"> + </text:span><text:span text:style-name="T81">titol</text:span><text:span text:style-name="T56"> + </text:span><text:span text:style-name="T33">"\". Dades:"</text:span><text:span text:style-name="T56">);</text:span></text:p>
            <text:p text:style-name="P122"><text:span text:style-name="T56"><text:tab/><text:tab/><text:tab/><text:tab/><text:tab/><text:tab/><text:tab/></text:span><text:span text:style-name="T48">try</text:span><text:span text:style-name="T56"> {</text:span></text:p>
            <text:p text:style-name="P122"><text:span text:style-name="T56"><text:tab/><text:tab/><text:tab/><text:tab/><text:tab/><text:tab/><text:tab/><text:tab/></text:span><text:span text:style-name="T48">if</text:span><text:span text:style-name="T56"> (</text:span><text:span text:style-name="T33">"FORMULARIO"</text:span><text:span text:style-name="T56">.equals(</text:span><text:span text:style-name="T81">titol</text:span><text:span text:style-name="T56">)) {</text:span></text:p>
            <text:p text:style-name="P122"><text:span text:style-name="T56"><text:tab/><text:tab/><text:tab/><text:tab/><text:tab/><text:tab/><text:tab/><text:tab/><text:tab/>Formulario </text:span><text:span text:style-name="T81">formulario</text:span><text:span text:style-name="T56"> = </text:span><text:span text:style-name="T81">sistra2Utils</text:span><text:span text:style-name="T56">.parseXmlFormulario(</text:span><text:span text:style-name="T81">contingut</text:span><text:span text:style-name="T56">);</text:span></text:p>
            <text:p text:style-name="P122"><text:span text:style-name="T56"><text:tab/><text:tab/><text:tab/><text:tab/><text:tab/><text:tab/><text:tab/><text:tab/><text:tab/></text:span><text:span text:style-name="T76">logger</text:span><text:span text:style-name="T56">.debug(</text:span><text:span text:style-name="T33">" <text:s/>formulario: "</text:span><text:span text:style-name="T56"> + ToStringBuilder.</text:span><text:span text:style-name="T63">reflectionToString</text:span><text:span text:style-name="T56">(</text:span><text:span text:style-name="T81">formulario</text:span><text:span text:style-name="T56">));<text:tab/><text:tab/><text:tab/><text:tab/><text:tab/><text:tab/><text:tab/><text:tab/></text:span></text:p>
            <text:p text:style-name="P122"><text:span text:style-name="T56"><text:tab/><text:tab/><text:tab/><text:tab/><text:tab/><text:tab/><text:tab/><text:tab/>} </text:span><text:span text:style-name="T48">else</text:span><text:span text:style-name="T56"> </text:span><text:span text:style-name="T48">if</text:span><text:span text:style-name="T56"> (</text:span><text:span text:style-name="T33">"PAGO"</text:span><text:span text:style-name="T56">.equals(</text:span><text:span text:style-name="T81">titol</text:span><text:span text:style-name="T56">)) {</text:span></text:p>
            <text:p text:style-name="P122"><text:span text:style-name="T56"><text:tab/><text:tab/><text:tab/><text:tab/><text:tab/><text:tab/><text:tab/><text:tab/><text:tab/>Pago </text:span><text:span text:style-name="T81">pago</text:span><text:span text:style-name="T56"> = </text:span><text:span text:style-name="T81">sistra2Utils</text:span><text:span text:style-name="T56">.parseXmlPago(</text:span><text:span text:style-name="T81">contingut</text:span><text:span text:style-name="T56">);</text:span></text:p>
            <text:p text:style-name="P122"><text:span text:style-name="T56"><text:tab/><text:tab/><text:tab/><text:tab/><text:tab/><text:tab/><text:tab/><text:tab/><text:tab/></text:span><text:span text:style-name="T76">logger</text:span><text:span text:style-name="T56">.debug(</text:span><text:span text:style-name="T33">" <text:s/>pago: "</text:span><text:span text:style-name="T56"> + ToStringBuilder.</text:span><text:span text:style-name="T63">reflectionToString</text:span><text:span text:style-name="T56">(</text:span><text:span text:style-name="T81">pago</text:span><text:span text:style-name="T56">));<text:tab/><text:tab/><text:tab/><text:tab/><text:tab/><text:tab/><text:tab/><text:tab/></text:span></text:p>
            <text:p text:style-name="P95"><text:tab/><text:tab/><text:tab/><text:tab/><text:tab/><text:tab/><text:tab/><text:tab/>}</text:p>
            <text:p text:style-name="P122"><text:span text:style-name="T56"><text:tab/><text:tab/><text:tab/><text:tab/><text:tab/><text:tab/><text:tab/>} </text:span><text:span text:style-name="T48">catch</text:span><text:span text:style-name="T56">(Exception </text:span><text:span text:style-name="T81">e</text:span><text:span text:style-name="T56">) {<text:tab/><text:tab/><text:tab/><text:tab/><text:tab/><text:tab/><text:tab/><text:tab/></text:span></text:p>
            <text:p text:style-name="P122"><text:span text:style-name="T56"><text:tab/><text:tab/><text:tab/><text:tab/><text:tab/><text:tab/><text:tab/><text:tab/></text:span><text:span text:style-name="T76">logger</text:span><text:span text:style-name="T56">.error(</text:span><text:span text:style-name="T33">"Error obtenint la informació del document tècnic "</text:span><text:span text:style-name="T56"> + </text:span><text:span text:style-name="T81">titol</text:span><text:span text:style-name="T56"> + </text:span><text:span text:style-name="T33">":"</text:span><text:span text:style-name="T56"> + </text:span><text:span text:style-name="T81">e</text:span><text:span text:style-name="T56">.getMessage(), </text:span><text:span text:style-name="T81">e</text:span><text:span text:style-name="T56">);</text:span></text:p>
            <text:p text:style-name="P95"><text:tab/><text:tab/><text:tab/><text:tab/><text:tab/><text:tab/><text:tab/>}</text:p>
            <text:p text:style-name="P95"><text:tab/><text:tab/><text:tab/><text:tab/><text:tab/><text:tab/>}</text:p>
            <text:p text:style-name="P181"/>
            <text:p text:style-name="P95"><text:tab/><text:tab/><text:tab/><text:tab/><text:tab/>}</text:p>
            <text:p text:style-name="P123"><text:span text:style-name="T56"><text:tab/><text:tab/><text:tab/><text:tab/><text:tab/></text:span><text:span text:style-name="T216">// Es comunica el resultat a DISTRIBUCIO</text:span></text:p>
            <text:p text:style-name="P116"><text:span text:style-name="T71"><text:tab/><text:tab/><text:tab/><text:tab/><text:tab/></text:span><text:span text:style-name="T50">switch</text:span><text:span text:style-name="T71">(</text:span><text:span text:style-name="T90">arxiuResultat</text:span><text:span text:style-name="T71">.ge</text:span><text:span text:style-name="T56">tErrorCodi()) {</text:span></text:p>
            <text:p text:style-name="P116"><text:span text:style-name="T56"><text:tab/><text:tab/><text:tab/><text:tab/><text:tab/><text:tab/></text:span><text:span text:style-name="T48">case</text:span><text:span text:style-name="T56"> 0:</text:span></text:p>
            <text:p text:style-name="P116"><text:span text:style-name="T56"><text:tab/><text:tab/><text:tab/><text:tab/><text:tab/><text:tab/><text:tab/></text:span><text:span text:style-name="T81">backofficeClient</text:span><text:span text:style-name="T56">.canviEstat(</text:span><text:span text:style-name="T81">idWs</text:span><text:span text:style-name="T56">, es.caib.distribucio.ws.backofficeintegracio.Estat.</text:span><text:span text:style-name="T76">PROCESSADA</text:span><text:span text:style-name="T56">, </text:span><text:span text:style-name="T33">"Processada"</text:span><text:span text:style-name="T56">);</text:span></text:p>
            <text:p text:style-name="P116"><text:span text:style-name="T56"><text:tab/><text:tab/><text:tab/><text:tab/><text:tab/><text:tab/><text:tab/></text:span><text:span text:style-name="T48">break</text:span><text:span text:style-name="T56">;</text:span></text:p>
            <text:p text:style-name="P116"><text:span text:style-name="T56"><text:tab/><text:tab/><text:tab/><text:tab/><text:tab/><text:tab/></text:span><text:span text:style-name="T48">default</text:span><text:span text:style-name="T56">:</text:span></text:p>
            <text:p text:style-name="P116"><text:span text:style-name="T56"><text:tab/><text:tab/><text:tab/><text:tab/><text:tab/><text:tab/><text:tab/></text:span><text:span text:style-name="T81">backofficeClient</text:span><text:span text:style-name="T56">.canviEstat(</text:span><text:span text:style-name="T81">idWs</text:span><text:span text:style-name="T56">, es.caib.distribucio.ws.backofficeintegracio.Estat.</text:span><text:span text:style-name="T76">ERROR</text:span><text:span text:style-name="T56">, </text:span><text:span text:style-name="T81">arxiuResultat</text:span><text:span text:style-name="T56">.getErrorCodi()</text:span><text:span text:style-name="T69"> + </text:span><text:span text:style-name="T35">" "</text:span><text:span text:style-name="T69"> + </text:span><text:span text:style-name="T81">arxiuResultat</text:span><text:span text:style-name="T56">.getErrorMessage());</text:span></text:p>
            <text:p text:style-name="P116"><text:span text:style-name="T56"><text:tab/><text:tab/><text:tab/><text:tab/><text:tab/><text:tab/><text:tab/></text:span><text:span text:style-name="T48">break</text:span><text:span text:style-name="T56">;</text:span></text:p>
            <text:p text:style-name="P91"><text:tab/><text:tab/><text:tab/><text:tab/><text:tab/>}</text:p>
            <text:p text:style-name="P116"><text:span text:style-name="T56"><text:tab/><text:tab/><text:tab/><text:tab/>} </text:span><text:span text:style-name="T48">catch</text:span><text:span text:style-name="T56"> (Throwable </text:span><text:span text:style-name="T81">ex</text:span><text:span text:style-name="T56">) {</text:span></text:p>
            <text:p text:style-name="P116"><text:span text:style-name="T56"><text:tab/><text:tab/><text:tab/><text:tab/><text:tab/></text:span><text:span text:style-name="T76">logger</text:span><text:span text:style-name="T56">.error(</text:span><text:span text:style-name="T33">"Error al processant la petició d'anotació amb id "</text:span><text:span text:style-name="T56"> + </text:span><text:span text:style-name="T81">id</text:span><text:span text:style-name="T56">.getIndetificador(), </text:span><text:span text:style-name="T81">ex</text:span><text:span text:style-name="T56">);</text:span></text:p>
            <text:p text:style-name="P91"><text:tab/><text:tab/><text:tab/><text:tab/>}</text:p>
            <text:p text:style-name="P91"><text:tab/><text:tab/><text:tab/>}<text:tab/><text:tab/><text:tab/></text:p>
            <text:p text:style-name="P116"><text:span text:style-name="T56"><text:tab/><text:tab/>} </text:span><text:span text:style-name="T48">catch</text:span><text:span text:style-name="T56"> (Exception </text:span><text:span text:style-name="T81">e</text:span><text:span text:style-name="T56">) {</text:span></text:p>
            <text:p text:style-name="P116"><text:span text:style-name="T56"><text:tab/><text:tab/><text:tab/></text:span><text:span text:style-name="T76">logger</text:span><text:span text:style-name="T56">.error(</text:span><text:span text:style-name="T33">"Error no controlat en el mètode de comunicació d'anotacions pendents: "</text:span><text:span text:style-name="T56"> + </text:span><text:span text:style-name="T81">e</text:span><text:span text:style-name="T56">.getMessage(), </text:span><text:span text:style-name="T81">e</text:span><text:span text:style-name="T56">);</text:span></text:p>
            <text:p text:style-name="P91"><text:tab/><text:tab/>}</text:p>
            <text:p text:style-name="P91"><text:tab/>}</text:p>
            <text:p text:style-name="P184"/>
            <text:p text:style-name="P184"/>
            <text:p text:style-name="P91"><text:tab/></text:p>
            <text:p text:style-name="P91"><text:tab/></text:p>
            <text:p text:style-name="P116"><text:span text:style-name="T56"><text:tab/></text:span><text:span text:style-name="T48">private</text:span><text:span text:style-name="T56"> </text:span><text:span text:style-name="T48">void</text:span><text:span text:style-name="T56"> logResultat(String </text:span><text:span text:style-name="T81">descripcio</text:span><text:span text:style-name="T56">, ArxiuResultat </text:span><text:span text:style-name="T81">arxiuResultat</text:span><text:span text:style-name="T56">) {</text:span></text:p>
            <text:p text:style-name="P116"><text:span text:style-name="T56"><text:tab/><text:tab/></text:span><text:span text:style-name="T76">logger</text:span><text:span text:style-name="T56">.debug(</text:span><text:span text:style-name="T81">descripcio</text:span><text:span text:style-name="T56">);</text:span></text:p>
            <text:p text:style-name="P116"><text:span text:style-name="T56"><text:tab/><text:tab/></text:span><text:span text:style-name="T216">// </text:span><text:span text:style-name="T217">Resultat</text:span><text:span text:style-name="T216"> a </text:span><text:span text:style-name="T217">nivell</text:span><text:span text:style-name="T216"> d'expedient</text:span></text:p>
            <text:p text:style-name="P116"><text:span text:style-name="T56"><text:tab/><text:tab/></text:span><text:span text:style-name="T76">logger</text:span><text:span text:style-name="T56">.debug(</text:span><text:span text:style-name="T33">"- uuid: "</text:span><text:span text:style-name="T56"> + </text:span><text:span text:style-name="T81">arxiuResultat</text:span><text:span text:style-name="T56">.getIdentificadorExpedient());</text:span></text:p>
            <text:p text:style-name="P116"><text:span text:style-name="T56"><text:tab/><text:tab/></text:span><text:span text:style-name="T76">logger</text:span><text:span text:style-name="T56">.debug(</text:span><text:span text:style-name="T33">"- accio: "</text:span><text:span text:style-name="T56"> + </text:span><text:span text:style-name="T81">arxiuResultat</text:span><text:span text:style-name="T56">.getAccio());</text:span></text:p>
            <text:p text:style-name="P116"><text:span text:style-name="T56"><text:tab/><text:tab/></text:span><text:span text:style-name="T76">logger</text:span><text:span text:style-name="T56">.debug(</text:span><text:span text:style-name="T33">"- errorCodi: "</text:span><text:span text:style-name="T56"> + </text:span><text:span text:style-name="T81">arxiuResultat</text:span><text:span text:style-name="T56">.getErrorCodi());</text:span></text:p>
            <text:p text:style-name="P116"><text:span text:style-name="T56"><text:tab/><text:tab/></text:span><text:span text:style-name="T76">logger</text:span><text:span text:style-name="T56">.debug(</text:span><text:span text:style-name="T33">"- errorMessage: "</text:span><text:span text:style-name="T56"> + </text:span><text:span text:style-name="T81">arxiuResultat</text:span><text:span text:style-name="T56">.getErrorMessage());</text:span></text:p>
            <text:p text:style-name="P116"><text:span text:style-name="T56"><text:tab/><text:tab/></text:span><text:span text:style-name="T76">logger</text:span><text:span text:style-name="T56">.debug(</text:span><text:span text:style-name="T33">"- excepcio: "</text:span><text:span text:style-name="T56"> + (</text:span><text:span text:style-name="T81">arxiuResultat</text:span><text:span text:style-name="T56">.getException() != </text:span><text:span text:style-name="T48">null</text:span><text:span text:style-name="T56">? </text:span><text:span text:style-name="T81">arxiuResultat</text:span><text:span text:style-name="T56">.getException().getClass() + </text:span><text:span text:style-name="T33">" "</text:span><text:span text:style-name="T56"> + </text:span><text:span text:style-name="T81">arxiuResultat</text:span><text:span text:style-name="T56">.getException().getMessage() : <text:s/></text:span><text:span text:style-name="T33">" - "</text:span><text:span text:style-name="T56">));</text:span></text:p>
            <text:p text:style-name="P184"/>
            <text:p text:style-name="P116"><text:soft-page-break/><text:span text:style-name="T56"><text:tab/><text:tab/></text:span><text:span text:style-name="T216">// </text:span><text:span text:style-name="T217">Resultat</text:span><text:span text:style-name="T216"> </text:span><text:span text:style-name="T217">pels</text:span><text:span text:style-name="T216"> </text:span><text:span text:style-name="T217">annexos</text:span></text:p>
            <text:p text:style-name="P116"><text:span text:style-name="T56"><text:tab/><text:tab/>List&lt;ArxiuResultatAnnex&gt; </text:span><text:span text:style-name="T81">resultatAnnexos</text:span><text:span text:style-name="T56"> = </text:span><text:span text:style-name="T81">arxiuResultat</text:span><text:span text:style-name="T56">.getResultatAnnexos(); </text:span></text:p>
            <text:p text:style-name="P116"><text:span text:style-name="T56"><text:tab/><text:tab/></text:span><text:span text:style-name="T76">logger</text:span><text:span text:style-name="T56">.debug(</text:span><text:span text:style-name="T33">" - Resultat dels "</text:span><text:span text:style-name="T56"> + </text:span><text:span text:style-name="T81">resultatAnnexos</text:span><text:span text:style-name="T56">.size() + </text:span><text:span text:style-name="T33">" annexos:"</text:span><text:span text:style-name="T56">);</text:span></text:p>
            <text:p text:style-name="P116"><text:span text:style-name="T56"><text:tab/><text:tab/></text:span><text:span text:style-name="T48">for</text:span><text:span text:style-name="T56"> (ArxiuResultatAnnex </text:span><text:span text:style-name="T81">resultatAnnex</text:span><text:span text:style-name="T56"> : </text:span><text:span text:style-name="T81">resultatAnnexos</text:span><text:span text:style-name="T56">) {</text:span></text:p>
            <text:p text:style-name="P116"><text:span text:style-name="T56"><text:tab/><text:tab/><text:tab/></text:span><text:span text:style-name="T76">logger</text:span><text:span text:style-name="T56">.debug(</text:span><text:span text:style-name="T33">"\b- uuid: "</text:span><text:span text:style-name="T56"> + </text:span><text:span text:style-name="T81">resultatAnnex</text:span><text:span text:style-name="T56">.getIdentificadorAnnex());</text:span></text:p>
            <text:p text:style-name="P116"><text:span text:style-name="T56"><text:tab/><text:tab/><text:tab/></text:span><text:span text:style-name="T76">logger</text:span><text:span text:style-name="T56">.debug(</text:span><text:span text:style-name="T33">"\\b- accio: "</text:span><text:span text:style-name="T56"> + </text:span><text:span text:style-name="T81">resultatAnnex</text:span><text:span text:style-name="T56">.getAccio());</text:span></text:p>
            <text:p text:style-name="P116"><text:span text:style-name="T56"><text:tab/><text:tab/><text:tab/></text:span><text:span text:style-name="T76">logger</text:span><text:span text:style-name="T56">.debug(</text:span><text:span text:style-name="T33">"\\b- errorCodi: "</text:span><text:span text:style-name="T56"> + </text:span><text:span text:style-name="T81">resultatAnnex</text:span><text:span text:style-name="T56">.getErrorCodi());</text:span></text:p>
            <text:p text:style-name="P116"><text:span text:style-name="T56"><text:tab/><text:tab/><text:tab/></text:span><text:span text:style-name="T76">logger</text:span><text:span text:style-name="T56">.debug(</text:span><text:span text:style-name="T33">"\\b- errorMessage: "</text:span><text:span text:style-name="T56"> + </text:span><text:span text:style-name="T81">resultatAnnex</text:span><text:span text:style-name="T56">.getErrorMessage());</text:span></text:p>
            <text:p text:style-name="P116"><text:span text:style-name="T56"><text:tab/><text:tab/><text:tab/></text:span><text:span text:style-name="T76">logger</text:span><text:span text:style-name="T56">.debug(</text:span><text:span text:style-name="T33">"\\b- excepcio: "</text:span><text:span text:style-name="T56"> + (</text:span><text:span text:style-name="T81">resultatAnnex</text:span><text:span text:style-name="T56">.getException() != </text:span><text:span text:style-name="T48">null</text:span><text:span text:style-name="T56">? </text:span><text:span text:style-name="T81">resultatAnnex</text:span><text:span text:style-name="T56">.getException().getClass() + </text:span><text:span text:style-name="T33">" "</text:span><text:span text:style-name="T56"> + </text:span><text:span text:style-name="T81">resultatAnnex</text:span><text:span text:style-name="T56">.getException().getMessage() : <text:s/></text:span><text:span text:style-name="T33">" - "</text:span><text:span text:style-name="T56">));</text:span></text:p>
            <text:p text:style-name="P91"><text:tab/><text:tab/>}</text:p>
            <text:p text:style-name="P91"><text:tab/>}</text:p>
            <text:p text:style-name="P184"/>
            <text:p text:style-name="P116"><text:span text:style-name="T56"><text:tab/></text:span><text:span text:style-name="T48">private</text:span><text:span text:style-name="T56"> IArxiuPlugin getArxiuPlugin() </text:span><text:span text:style-name="T48">throws</text:span><text:span text:style-name="T56"> SistemaExternException {</text:span></text:p>
            <text:p text:style-name="P116"><text:span text:style-name="T56"><text:tab/><text:tab/></text:span><text:span text:style-name="T48">if</text:span><text:span text:style-name="T56"> (</text:span><text:span text:style-name="T75">arxiuPlugin</text:span><text:span text:style-name="T56"> == </text:span><text:span text:style-name="T48">null</text:span><text:span text:style-name="T56">) {</text:span></text:p>
            <text:p text:style-name="P116"><text:span text:style-name="T56"><text:tab/><text:tab/><text:tab/>String </text:span><text:span text:style-name="T81">pluginClass</text:span><text:span text:style-name="T56"> = getPropertyPluginArxiu();</text:span></text:p>
            <text:p text:style-name="P116"><text:span text:style-name="T56"><text:tab/><text:tab/><text:tab/></text:span><text:span text:style-name="T48">if</text:span><text:span text:style-name="T56"> (</text:span><text:span text:style-name="T81">pluginClass</text:span><text:span text:style-name="T56"> != </text:span><text:span text:style-name="T48">null</text:span><text:span text:style-name="T56"> &amp;&amp; </text:span><text:span text:style-name="T81">pluginClass</text:span><text:span text:style-name="T56">.length() &gt; 0) {</text:span></text:p>
            <text:p text:style-name="P116"><text:span text:style-name="T56"><text:tab/><text:tab/><text:tab/><text:tab/></text:span><text:span text:style-name="T48">try</text:span><text:span text:style-name="T56"> {</text:span></text:p>
            <text:p text:style-name="P116"><text:span text:style-name="T56"><text:tab/><text:tab/><text:tab/><text:tab/><text:tab/>Class&lt;?&gt; </text:span><text:span text:style-name="T81">clazz</text:span><text:span text:style-name="T56"> = Class.</text:span><text:span text:style-name="T63">forName</text:span><text:span text:style-name="T56">(</text:span><text:span text:style-name="T81">pluginClass</text:span><text:span text:style-name="T56">);</text:span></text:p>
            <text:p text:style-name="P116"><text:span text:style-name="T56"><text:tab/><text:tab/><text:tab/><text:tab/><text:tab/></text:span><text:span text:style-name="T48">if</text:span><text:span text:style-name="T56"> (PropertiesHelper.</text:span><text:span text:style-name="T63">getProperties</text:span><text:span text:style-name="T56">().isLlegirSystem()) {</text:span></text:p>
            <text:p text:style-name="P116"><text:span text:style-name="T56"><text:tab/><text:tab/><text:tab/><text:tab/><text:tab/><text:tab/></text:span><text:span text:style-name="T75">arxiuPlugin</text:span><text:span text:style-name="T56"> = (IArxiuPlugin)</text:span><text:span text:style-name="T81">clazz</text:span><text:span text:style-name="T56">.getDeclaredConstructor(</text:span></text:p>
            <text:p text:style-name="P116"><text:span text:style-name="T56"><text:tab/><text:tab/><text:tab/><text:tab/><text:tab/><text:tab/><text:tab/><text:tab/>String.</text:span><text:span text:style-name="T48">class</text:span><text:span text:style-name="T56">).newInstance(</text:span></text:p>
            <text:p text:style-name="P116"><text:span text:style-name="T56"><text:tab/><text:tab/><text:tab/><text:tab/><text:tab/><text:tab/><text:tab/><text:tab/></text:span><text:span text:style-name="T33">"es.caib.distribucio."</text:span><text:span text:style-name="T56">);</text:span></text:p>
            <text:p text:style-name="P116"><text:span text:style-name="T56"><text:tab/><text:tab/><text:tab/><text:tab/><text:tab/>} </text:span><text:span text:style-name="T48">else</text:span><text:span text:style-name="T56"> {</text:span></text:p>
            <text:p text:style-name="P116"><text:span text:style-name="T56"><text:tab/><text:tab/><text:tab/><text:tab/><text:tab/><text:tab/></text:span><text:span text:style-name="T75">arxiuPlugin</text:span><text:span text:style-name="T56"> = (IArxiuPlugin)</text:span><text:span text:style-name="T81">clazz</text:span><text:span text:style-name="T56">.getDeclaredConstructor(</text:span></text:p>
            <text:p text:style-name="P116"><text:span text:style-name="T56"><text:tab/><text:tab/><text:tab/><text:tab/><text:tab/><text:tab/><text:tab/><text:tab/>String.</text:span><text:span text:style-name="T48">class</text:span><text:span text:style-name="T56">,</text:span></text:p>
            <text:p text:style-name="P116"><text:span text:style-name="T56"><text:tab/><text:tab/><text:tab/><text:tab/><text:tab/><text:tab/><text:tab/><text:tab/>Properties.</text:span><text:span text:style-name="T48">class</text:span><text:span text:style-name="T56">).newInstance(</text:span></text:p>
            <text:p text:style-name="P116"><text:span text:style-name="T56"><text:tab/><text:tab/><text:tab/><text:tab/><text:tab/><text:tab/><text:tab/><text:tab/></text:span><text:span text:style-name="T33">"es.caib.distribucio."</text:span><text:span text:style-name="T56">,</text:span></text:p>
            <text:p text:style-name="P116"><text:span text:style-name="T56"><text:tab/><text:tab/><text:tab/><text:tab/><text:tab/><text:tab/><text:tab/><text:tab/>PropertiesHelper.</text:span><text:span text:style-name="T63">getProperties</text:span><text:span text:style-name="T56">().findAll());</text:span></text:p>
            <text:p text:style-name="P91"><text:tab/><text:tab/><text:tab/><text:tab/><text:tab/>}</text:p>
            <text:p text:style-name="P116"><text:span text:style-name="T56"><text:tab/><text:tab/><text:tab/><text:tab/>} </text:span><text:span text:style-name="T48">catch</text:span><text:span text:style-name="T56"> (Exception </text:span><text:span text:style-name="T81">ex</text:span><text:span text:style-name="T56">) {</text:span></text:p>
            <text:p text:style-name="P116"><text:span text:style-name="T56"><text:tab/><text:tab/><text:tab/><text:tab/><text:tab/></text:span><text:span text:style-name="T48">throw</text:span><text:span text:style-name="T56"> </text:span><text:span text:style-name="T48">new</text:span><text:span text:style-name="T56"> SistemaExternException(</text:span></text:p>
            <text:p text:style-name="P116"><text:span text:style-name="T56"><text:tab/><text:tab/><text:tab/><text:tab/><text:tab/><text:tab/><text:tab/>IntegracioHelper.</text:span><text:span text:style-name="T76">INTCODI_ARXIU</text:span><text:span text:style-name="T56">,</text:span></text:p>
            <text:p text:style-name="P116"><text:span text:style-name="T56"><text:tab/><text:tab/><text:tab/><text:tab/><text:tab/><text:tab/><text:tab/></text:span><text:span text:style-name="T33">"Error al crear la instància del plugin d'arxiu digital"</text:span><text:span text:style-name="T56">,</text:span></text:p>
            <text:p text:style-name="P116"><text:span text:style-name="T56"><text:tab/><text:tab/><text:tab/><text:tab/><text:tab/><text:tab/><text:tab/></text:span><text:span text:style-name="T81">ex</text:span><text:span text:style-name="T56">);</text:span></text:p>
            <text:p text:style-name="P91"><text:tab/><text:tab/><text:tab/><text:tab/>}</text:p>
            <text:p text:style-name="P116"><text:span text:style-name="T56"><text:tab/><text:tab/><text:tab/>} </text:span><text:span text:style-name="T48">else</text:span><text:span text:style-name="T56"> {</text:span></text:p>
            <text:p text:style-name="P116"><text:span text:style-name="T56"><text:tab/><text:tab/><text:tab/><text:tab/></text:span><text:span text:style-name="T48">throw</text:span><text:span text:style-name="T56"> </text:span><text:span text:style-name="T48">new</text:span><text:span text:style-name="T56"> SistemaExternException(</text:span></text:p>
            <text:p text:style-name="P116"><text:span text:style-name="T56"><text:tab/><text:tab/><text:tab/><text:tab/><text:tab/><text:tab/>IntegracioHelper.</text:span><text:span text:style-name="T76">INTCODI_ARXIU</text:span><text:span text:style-name="T56">,</text:span></text:p>
            <text:p text:style-name="P116"><text:span text:style-name="T56"><text:tab/><text:tab/><text:tab/><text:tab/><text:tab/><text:tab/></text:span><text:span text:style-name="T33">"No està configurada la classe per al plugin d'arxiu digital"</text:span><text:span text:style-name="T56">);</text:span></text:p>
            <text:p text:style-name="P91"><text:tab/><text:tab/><text:tab/>}</text:p>
            <text:p text:style-name="P91"><text:tab/><text:tab/>}</text:p>
            <text:p text:style-name="P116"><text:span text:style-name="T56"><text:tab/><text:tab/></text:span><text:span text:style-name="T48">return</text:span><text:span text:style-name="T56"> </text:span><text:span text:style-name="T75">arxiuPlugin</text:span><text:span text:style-name="T56">;</text:span></text:p>
            <text:p text:style-name="P91"><text:tab/>}</text:p>
            <text:p text:style-name="P116"><text:span text:style-name="T56"><text:tab/></text:span><text:span text:style-name="T48">private</text:span><text:span text:style-name="T56"> String getPropertyPluginArxiu() {</text:span></text:p>
            <text:p text:style-name="P116"><text:span text:style-name="T56"><text:tab/><text:tab/></text:span><text:span text:style-name="T48">return</text:span><text:span text:style-name="T56"> PropertiesHelper.</text:span><text:span text:style-name="T63">getProperties</text:span><text:span text:style-name="T56">().getProperty(</text:span></text:p>
            <text:p text:style-name="P116"><text:span text:style-name="T56"><text:tab/><text:tab/><text:tab/><text:tab/></text:span><text:span text:style-name="T33">"es.caib.distribucio.plugin.arxiu.class"</text:span><text:span text:style-name="T56">);</text:span></text:p>
            <text:p text:style-name="P91"><text:tab/>}</text:p>
            <text:p text:style-name="P91"><text:tab/></text:p>
            <text:p text:style-name="P116"><text:span text:style-name="T56"><text:tab/></text:span><text:span text:style-name="T48">private</text:span><text:span text:style-name="T56"> BackofficeIntegracio getBackofficeIntegracioServicePort() </text:span><text:span text:style-name="T48">throws</text:span><text:span text:style-name="T56"> Exception {</text:span></text:p>
            <text:p text:style-name="P116"><text:span text:style-name="T56"><text:tab/><text:tab/>BackofficeIntegracio </text:span><text:span text:style-name="T81">wsClient</text:span><text:span text:style-name="T56"> = </text:span><text:span text:style-name="T48">null</text:span><text:span text:style-name="T56">;</text:span></text:p>
            <text:p text:style-name="P116"><text:span text:style-name="T56"><text:tab/><text:tab/>String </text:span><text:span text:style-name="T81">url</text:span><text:span text:style-name="T56"> = PropertiesHelper.</text:span><text:span text:style-name="T63">getProperties</text:span><text:span text:style-name="T56">().getProperty(</text:span><text:span text:style-name="T33">"es.caib.distribucio.backoffice.test.backofficeIntegracio.url"</text:span><text:span text:style-name="T56">);</text:span></text:p>
            <text:p text:style-name="P116"><text:span text:style-name="T56"><text:tab/><text:tab/>String </text:span><text:span text:style-name="T81">usuari</text:span><text:span text:style-name="T56"> = PropertiesHelper.</text:span><text:span text:style-name="T63">getProperties</text:span><text:span text:style-name="T56">().getProperty(</text:span><text:span text:style-name="T33">"es.caib.distribucio.backoffice.test.backofficeIntegracio.usuari"</text:span><text:span text:style-name="T56">);</text:span></text:p>
            <text:p text:style-name="P116"><text:span text:style-name="T56"><text:tab/><text:tab/>String </text:span><text:span text:style-name="T81">contrasenya</text:span><text:span text:style-name="T56"> = PropertiesHelper.</text:span><text:span text:style-name="T63">getProperties</text:span><text:span text:style-name="T56">().getProperty(</text:span><text:span text:style-name="T33">"es.caib.distribucio.backoffice.test.backofficeIntegracio.contrasenya"</text:span><text:span text:style-name="T56">);</text:span></text:p>
            <text:p text:style-name="P116"><text:span text:style-name="T56"><text:tab/><text:tab/></text:span><text:span text:style-name="T48">if</text:span><text:span text:style-name="T56"> (</text:span><text:span text:style-name="T81">url</text:span><text:span text:style-name="T56"> != </text:span><text:span text:style-name="T48">null</text:span><text:span text:style-name="T56"> &amp;&amp; </text:span><text:span text:style-name="T81">usuari</text:span><text:span text:style-name="T56"> != </text:span><text:span text:style-name="T48">null</text:span><text:span text:style-name="T56"> &amp;&amp; </text:span><text:span text:style-name="T81">contrasenya</text:span><text:span text:style-name="T56"> != </text:span><text:span text:style-name="T48">null</text:span><text:span text:style-name="T56">) {</text:span></text:p>
            <text:p text:style-name="P116"><text:span text:style-name="T56"><text:tab/><text:tab/><text:tab/></text:span><text:span text:style-name="T76">logger</text:span><text:span text:style-name="T56">.debug(</text:span><text:span text:style-name="T33">"&gt;&gt;&gt; Creant el client BackofficeIntegracio WS"</text:span><text:span text:style-name="T56">);</text:span></text:p>
            <text:p text:style-name="P116"><text:span text:style-name="T56"><text:tab/><text:tab/><text:tab/></text:span><text:span text:style-name="T81">wsClient</text:span><text:span text:style-name="T56"> = BackofficeIntegracioWsClientFactory.</text:span><text:span text:style-name="T63">getWsClient</text:span><text:span text:style-name="T56">(</text:span></text:p>
            <text:p text:style-name="P116"><text:span text:style-name="T56"><text:tab/><text:tab/><text:tab/><text:tab/><text:tab/></text:span><text:span text:style-name="T81">url</text:span><text:span text:style-name="T56">,</text:span></text:p>
            <text:p text:style-name="P116"><text:span text:style-name="T56"><text:tab/><text:tab/><text:tab/><text:tab/><text:tab/></text:span><text:span text:style-name="T81">usuari</text:span><text:span text:style-name="T56">,</text:span></text:p>
            <text:p text:style-name="P116"><text:span text:style-name="T56"><text:tab/><text:tab/><text:tab/><text:tab/><text:tab/></text:span><text:span text:style-name="T81">contrasenya</text:span><text:span text:style-name="T56">);</text:span></text:p>
            <text:p text:style-name="P116"><text:span text:style-name="T56"><text:tab/><text:tab/>} </text:span><text:span text:style-name="T48">else</text:span><text:span text:style-name="T56"> {</text:span></text:p>
            <text:p text:style-name="P116"><text:span text:style-name="T56"><text:tab/><text:tab/><text:tab/></text:span><text:span text:style-name="T48">throw</text:span><text:span text:style-name="T56"> </text:span><text:span text:style-name="T48">new</text:span><text:span text:style-name="T56"> RuntimeException(</text:span><text:span text:style-name="T33">"Falta configurar les propietats pel client de Backoffice de DISTRIBUCIO <text:s/>es.caib.distribucio.backoffice.test.backofficeIntegracio.*"</text:span><text:span text:style-name="T56">);</text:span></text:p>
            <text:p text:style-name="P91"><text:tab/><text:tab/>}</text:p>
            <text:p text:style-name="P116"><text:soft-page-break/><text:span text:style-name="T56"><text:tab/><text:tab/></text:span><text:span text:style-name="T48">return</text:span><text:span text:style-name="T56"> </text:span><text:span text:style-name="T81">wsClient</text:span><text:span text:style-name="T56">;</text:span></text:p>
            <text:p text:style-name="P91"><text:tab/>}</text:p>
            <text:p text:style-name="P184"/>
            <text:p text:style-name="P116"><text:span text:style-name="T56"><text:tab/></text:span><text:span text:style-name="T48">private</text:span><text:span text:style-name="T56"> </text:span><text:span text:style-name="T48">static</text:span><text:span text:style-name="T56"> </text:span><text:span text:style-name="T48">final</text:span><text:span text:style-name="T56"> Logger </text:span><text:span text:style-name="T76">logger</text:span><text:span text:style-name="T56"> = LoggerFactory.</text:span><text:span text:style-name="T63">getLogger</text:span><text:span text:style-name="T56">(RegistreHelper.</text:span><text:span text:style-name="T48">class</text:span><text:span text:style-name="T56">);</text:span></text:p>
            <text:p text:style-name="P184"/>
            <text:p text:style-name="P116"><text:span text:style-name="T56"><text:tab/></text:span><text:span text:style-name="T198">/** </text:span><text:span text:style-name="T201">Mètode</text:span><text:span text:style-name="T198"> </text:span><text:span text:style-name="T201">que</text:span><text:span text:style-name="T198"> </text:span><text:span text:style-name="T201">la</text:span><text:span text:style-name="T198"> </text:span><text:span text:style-name="T201">llibreria</text:span><text:span text:style-name="T198"> </text:span><text:span text:style-name="T201">del</text:span><text:span text:style-name="T198"> </text:span><text:span text:style-name="T201">backoffice</text:span><text:span text:style-name="T198"> </text:span><text:span text:style-name="T201">de</text:span><text:span text:style-name="T198"> </text:span><text:span text:style-name="T201">distribució</text:span><text:span text:style-name="T198"> </text:span><text:span text:style-name="T201">crida</text:span><text:span text:style-name="T198"> </text:span><text:span text:style-name="T201">si</text:span><text:span text:style-name="T198"> </text:span><text:span text:style-name="T201">es</text:span><text:span text:style-name="T198"> </text:span><text:span text:style-name="T201">fixa</text:span><text:span text:style-name="T198"> </text:span><text:span text:style-name="T201">una</text:span><text:span text:style-name="T198"> </text:span><text:span text:style-name="T201">instància</text:span><text:span text:style-name="T198"> </text:span><text:span text:style-name="T201">que</text:span><text:span text:style-name="T198"> </text:span><text:span text:style-name="T201">implementa</text:span><text:span text:style-name="T198"> </text:span><text:span text:style-name="T222">{@link ArxiuPluginListener}</text:span><text:span text:style-name="T198">.</text:span></text:p>
            <text:p text:style-name="P128"><text:tab/> * </text:p>
            <text:p text:style-name="P128"><text:tab/> */</text:p>
            <text:p text:style-name="P116"><text:span text:style-name="T56"><text:tab/></text:span><text:span text:style-name="T105">@Override</text:span></text:p>
            <text:p text:style-name="P116"><text:span text:style-name="T56"><text:tab/></text:span><text:span text:style-name="T48">public</text:span><text:span text:style-name="T56"> </text:span><text:span text:style-name="T48">void</text:span><text:span text:style-name="T56"> event(</text:span></text:p>
            <text:p text:style-name="P116"><text:span text:style-name="T56"><text:tab/><text:tab/><text:tab/>String </text:span><text:span text:style-name="T81">metode</text:span><text:span text:style-name="T56">, </text:span></text:p>
            <text:p text:style-name="P116"><text:span text:style-name="T56"><text:tab/><text:tab/><text:tab/>Map&lt;String, String&gt; </text:span><text:span text:style-name="T81">parametres</text:span><text:span text:style-name="T56">, </text:span></text:p>
            <text:p text:style-name="P116"><text:span text:style-name="T56"><text:tab/><text:tab/><text:tab/></text:span><text:span text:style-name="T48">boolean</text:span><text:span text:style-name="T56"> </text:span><text:span text:style-name="T81">correcte</text:span><text:span text:style-name="T56">, </text:span></text:p>
            <text:p text:style-name="P116"><text:span text:style-name="T56"><text:tab/><text:tab/><text:tab/>String </text:span><text:span text:style-name="T81">error</text:span><text:span text:style-name="T56">, </text:span></text:p>
            <text:p text:style-name="P116"><text:span text:style-name="T56"><text:tab/><text:tab/><text:tab/>Exception </text:span><text:span text:style-name="T81">e</text:span><text:span text:style-name="T56">,</text:span></text:p>
            <text:p text:style-name="P116"><text:span text:style-name="T56"><text:tab/><text:tab/><text:tab/></text:span><text:span text:style-name="T48">long</text:span><text:span text:style-name="T56"> </text:span><text:span text:style-name="T81">timeMs</text:span><text:span text:style-name="T56">) {</text:span></text:p>
            <text:p text:style-name="P116"><text:span text:style-name="T56"><text:tab/><text:tab/>StringBuilder </text:span><text:span text:style-name="T81">str</text:span><text:span text:style-name="T56"> = </text:span><text:span text:style-name="T48">new</text:span><text:span text:style-name="T56"> StringBuilder()</text:span></text:p>
            <text:p text:style-name="P116"><text:span text:style-name="T56"><text:tab/><text:tab/><text:tab/><text:tab/>.append(</text:span><text:span text:style-name="T33">"S'ha invocat el mètode \""</text:span><text:span text:style-name="T56">)</text:span></text:p>
            <text:p text:style-name="P116"><text:span text:style-name="T56"><text:tab/><text:tab/><text:tab/><text:tab/>.append(</text:span><text:span text:style-name="T81">metode</text:span><text:span text:style-name="T56">)</text:span></text:p>
            <text:p text:style-name="P116"><text:span text:style-name="T56"><text:tab/><text:tab/><text:tab/><text:tab/>.append(</text:span><text:span text:style-name="T33">"\" amb els paràmetres {"</text:span><text:span text:style-name="T56">);</text:span></text:p>
            <text:p text:style-name="P116"><text:span text:style-name="T56"><text:tab/><text:tab/></text:span><text:span text:style-name="T48">int</text:span><text:span text:style-name="T56"> </text:span><text:span text:style-name="T81">i</text:span><text:span text:style-name="T56"> = 0;</text:span></text:p>
            <text:p text:style-name="P116"><text:span text:style-name="T56"><text:tab/><text:tab/></text:span><text:span text:style-name="T48">for</text:span><text:span text:style-name="T56"> (String </text:span><text:span text:style-name="T81">key</text:span><text:span text:style-name="T56"> : </text:span><text:span text:style-name="T81">parametres</text:span><text:span text:style-name="T56">.keySet()) {</text:span></text:p>
            <text:p text:style-name="P116"><text:span text:style-name="T56"><text:tab/><text:tab/><text:tab/></text:span><text:span text:style-name="T81">str</text:span><text:span text:style-name="T56">.append(</text:span><text:span text:style-name="T81">key</text:span><text:span text:style-name="T56">).append(</text:span><text:span text:style-name="T33">"="</text:span><text:span text:style-name="T56">).append(</text:span><text:span text:style-name="T81">parametres</text:span><text:span text:style-name="T56">.get(</text:span><text:span text:style-name="T81">key</text:span><text:span text:style-name="T56">));</text:span></text:p>
            <text:p text:style-name="P116"><text:span text:style-name="T56"><text:tab/><text:tab/><text:tab/></text:span><text:span text:style-name="T81">i</text:span><text:span text:style-name="T56">++;</text:span></text:p>
            <text:p text:style-name="P116"><text:span text:style-name="T56"><text:tab/><text:tab/><text:tab/></text:span><text:span text:style-name="T48">if</text:span><text:span text:style-name="T56"> (</text:span><text:span text:style-name="T81">i</text:span><text:span text:style-name="T56">&lt;</text:span><text:span text:style-name="T81">parametres</text:span><text:span text:style-name="T56">.size())</text:span></text:p>
            <text:p text:style-name="P116"><text:span text:style-name="T56"><text:tab/><text:tab/><text:tab/><text:tab/></text:span><text:span text:style-name="T81">str</text:span><text:span text:style-name="T56">.append(</text:span><text:span text:style-name="T33">", "</text:span><text:span text:style-name="T56">);</text:span></text:p>
            <text:p text:style-name="P91"><text:tab/><text:tab/>}</text:p>
            <text:p text:style-name="P116"><text:span text:style-name="T56"><text:tab/><text:tab/></text:span><text:span text:style-name="T81">str</text:span><text:span text:style-name="T56">.append(</text:span><text:span text:style-name="T33">"} amb resultat "</text:span><text:span text:style-name="T56">).append(</text:span><text:span text:style-name="T81">correcte</text:span><text:span text:style-name="T56"> ? </text:span><text:span text:style-name="T33">"OK"</text:span><text:span text:style-name="T56"> : </text:span><text:span text:style-name="T33">"KO"</text:span><text:span text:style-name="T56">);</text:span></text:p>
            <text:p text:style-name="P116"><text:span text:style-name="T56"><text:tab/><text:tab/></text:span><text:span text:style-name="T48">if</text:span><text:span text:style-name="T56"> (</text:span><text:span text:style-name="T81">error</text:span><text:span text:style-name="T56"> != </text:span><text:span text:style-name="T48">null</text:span><text:span text:style-name="T56">)</text:span></text:p>
            <text:p text:style-name="P116"><text:span text:style-name="T56"><text:tab/><text:tab/><text:tab/></text:span><text:span text:style-name="T81">str</text:span><text:span text:style-name="T56">.append(</text:span><text:span text:style-name="T33">": "</text:span><text:span text:style-name="T56">).append(</text:span><text:span text:style-name="T81">error</text:span><text:span text:style-name="T56">);</text:span></text:p>
            <text:p text:style-name="P116"><text:span text:style-name="T56"><text:tab/><text:tab/></text:span><text:span text:style-name="T48">if</text:span><text:span text:style-name="T56"> (</text:span><text:span text:style-name="T81">e</text:span><text:span text:style-name="T56"> != </text:span><text:span text:style-name="T48">null</text:span><text:span text:style-name="T56">)</text:span></text:p>
            <text:p text:style-name="P116"><text:span text:style-name="T56"><text:tab/><text:tab/><text:tab/></text:span><text:span text:style-name="T81">str</text:span><text:span text:style-name="T56">.append(</text:span><text:span text:style-name="T33">" "</text:span><text:span text:style-name="T56">).append(</text:span><text:span text:style-name="T81">e</text:span><text:span text:style-name="T56">.getClass()).append(</text:span><text:span text:style-name="T33">" "</text:span><text:span text:style-name="T56">).append(</text:span><text:span text:style-name="T81">e</text:span><text:span text:style-name="T56">.getMessage());</text:span></text:p>
            <text:p text:style-name="P116"><text:span text:style-name="T56"><text:tab/><text:tab/></text:span><text:span text:style-name="T81">str</text:span><text:span text:style-name="T56">.append(</text:span><text:span text:style-name="T33">" "</text:span><text:span text:style-name="T56">).append(</text:span><text:span text:style-name="T81">timeMs</text:span><text:span text:style-name="T56">).append(</text:span><text:span text:style-name="T33">"ms"</text:span><text:span text:style-name="T56">);</text:span></text:p>
            <text:p text:style-name="P91"><text:tab/><text:tab/></text:p>
            <text:p text:style-name="P116"><text:span text:style-name="T56"><text:tab/><text:tab/></text:span><text:span text:style-name="T76">logger</text:span><text:span text:style-name="T56">.debug(</text:span><text:span text:style-name="T81">str</text:span><text:span text:style-name="T56">.toString());</text:span></text:p>
            <text:p text:style-name="P91"><text:tab/>}</text:p>
            <text:p text:style-name="P90">}</text:p>
          </table:table-cell>
        </table:table-row>
      </table:table>
      <text:p text:style-name="P179"><draw:frame text:anchor-type="paragraph" draw:z-index="58" draw:name="Forma4" draw:style-name="gr2" draw:text-style-name="P458" svg:width="18.058cm" svg:height="5.181cm" svg:x="0.43cm" svg:y="0.766cm"><draw:text-box><text:p/></draw:text-box></draw:frame></text:p>
      <text:p text:style-name="P179"/>
      <text:p text:style-name="P17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28108544">
            <table:table-cell table:style-name="TableBox628196384" office:value-type="string">
              <text:p text:style-name="MP2"><draw:g text:anchor-type="as-char" draw:z-index="53"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_merged.odt</text:file-name></text:p>
            </table:table-cell>
            <table:covered-table-cell/>
            <table:covered-table-cell/>
            <table:table-cell table:style-name="Taula5.A1" office:value-type="string">
              <text:p text:style-name="MP6"><text:span text:style-name="MT1">Pàgina </text:span><text:span text:style-name="MT1"><text:page-number text:select-page="current">50</text:page-number></text:span><text:span text:style-name="MT1"><text:s/>/ </text:span><text:span text:style-name="MT1"><text:page-count>50</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5-12-09T15:55:48.598000151">09/12/2025</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3DT10H1M47S</meta:editing-duration>
    <meta:editing-cycles>289</meta:editing-cycles>
    <meta:generator>LibreOffice/7.3.5.2$Windows_X86_64 LibreOffice_project/184fe81b8c8c30d8b5082578aee2fed2ea847c01</meta:generator>
    <dc:date>2025-12-09T15:55:48.279000000</dc:date>
    <dc:creator>Daniel Moreno Linares</dc:creator>
    <meta:document-statistic meta:table-count="35" meta:image-count="15" meta:object-count="0" meta:page-count="50" meta:paragraph-count="1918" meta:word-count="10070" meta:character-count="75986" meta:non-whitespace-character-count="65585"/>
  </office:meta>
</office:document-meta>
</file>